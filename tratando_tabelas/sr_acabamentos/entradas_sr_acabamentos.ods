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2/06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3">
            <text:p>3080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6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532">
            <text:p>0,024</text:p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8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37.1">
            <text:p>6737,10</text:p>
          </table:table-cell>
          <table:table-cell table:style-name="ce12N2" office:value-type="float" office:value="6.74">
            <text:p>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63">
            <text:p>60,6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558.78">
            <text:p>55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6041015211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9">
            <text:p>308089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8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">
            <text:p>0,045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6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.75">
            <text:p>131,75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9">
            <text:p>1,19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10.93">
            <text:p>1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83119611538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7">
            <text:p>308317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9.8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6.61">
            <text:p>727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">
            <text:p>47,00</text:p>
          </table:table-cell>
          <table:table-cell table:style-name="ce12N2" office:value-type="float" office:value="7185.25">
            <text:p>718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963">
            <text:p>0,232</text:p>
          </table:table-cell>
          <table:table-cell table:style-name="ce12N2" office:value-type="float" office:value="32.52">
            <text:p>3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76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98.26">
            <text:p>6098,26</text:p>
          </table:table-cell>
          <table:table-cell table:style-name="ce12N2" office:value-type="float" office:value="6.06">
            <text:p>6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86">
            <text:p>54,86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91.36">
            <text:p>91,36</text:p>
          </table:table-cell>
          <table:table-cell table:style-name="ce12N2" office:value-type="float" office:value="7185.25">
            <text:p>7185,25</text:p>
          </table:table-cell>
          <table:table-cell table:style-name="ce12N2" office:value-type="float" office:value="465.38">
            <text:p>46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985017255504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2">
            <text:p>30833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4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4.12">
            <text:p>138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362.12">
            <text:p>1362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412">
            <text:p>0,080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3.47">
            <text:p>1153,47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38">
            <text:p>10,38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1362.12">
            <text:p>1362,12</text:p>
          </table:table-cell>
          <table:table-cell table:style-name="ce12N2" office:value-type="float" office:value="91.06">
            <text:p>9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41918177188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3">
            <text:p>30833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6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.74">
            <text:p>83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36.56">
            <text:p>836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6602">
            <text:p>0,077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8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6.04">
            <text:p>706,04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5">
            <text:p>6,35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836.56">
            <text:p>836,56</text:p>
          </table:table-cell>
          <table:table-cell table:style-name="ce12N2" office:value-type="float" office:value="58.56">
            <text:p>5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69815156048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0">
            <text:p>30846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2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7.06">
            <text:p>364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525">
            <text:p>0,105</text:p>
          </table:table-cell>
          <table:table-cell table:style-name="ce12N2" office:value-type="float" office:value="22.39">
            <text:p>22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7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94.11">
            <text:p>3094,11</text:p>
          </table:table-cell>
          <table:table-cell table:style-name="ce12N2" office:value-type="float" office:value="3.08">
            <text:p>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86">
            <text:p>27,86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3.28">
            <text:p>13,28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224.27">
            <text:p>2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29917400163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4">
            <text:p>308464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2.5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46.88">
            <text:p>246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9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74.86">
            <text:p>3874,86</text:p>
          </table:table-cell>
          <table:table-cell table:style-name="ce12N2" office:value-type="float" office:value="3.87">
            <text:p>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88">
            <text:p>34,8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321.38">
            <text:p>3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25531656758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5">
            <text:p>30852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1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58.7">
            <text:p>915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1734">
            <text:p>0,322</text:p>
          </table:table-cell>
          <table:table-cell table:style-name="ce12N2" office:value-type="float" office:value="38.36">
            <text:p>38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58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1.54">
            <text:p>7721,54</text:p>
          </table:table-cell>
          <table:table-cell table:style-name="ce12N2" office:value-type="float" office:value="7.75">
            <text:p>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">
            <text:p>69,50</text:p>
          </table:table-cell>
          <table:table-cell table:style-name="ce12N2" office:value-type="float" office:value="64">
            <text:p>6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22.8">
            <text:p>122,8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527.41">
            <text:p>52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111113861717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9">
            <text:p>30854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">
            <text:p>0,015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101394853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1">
            <text:p>3085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.72">
            <text:p>11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.78">
            <text:p>106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2">
            <text:p>0,00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3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.12">
            <text:p>90,12</text:p>
          </table:table-cell>
          <table:table-cell table:style-name="ce12N2" office:value-type="float" office:value="0.09">
            <text:p>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6.94">
            <text:p>6,94</text:p>
          </table:table-cell>
          <table:table-cell table:style-name="ce12N2" office:value-type="float" office:value="106.78">
            <text:p>106,78</text:p>
          </table:table-cell>
          <table:table-cell table:style-name="ce12N2" office:value-type="float" office:value="7.47">
            <text:p>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515722357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4">
            <text:p>3085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.5">
            <text:p>10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2">
            <text:p>0,00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.4">
            <text:p>84,40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6">
            <text:p>0,7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410202608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3">
            <text:p>30862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8.86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.87">
            <text:p>32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.87">
            <text:p>328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905">
            <text:p>0,067</text:p>
          </table:table-cell>
          <table:table-cell table:style-name="ce12N2" office:value-type="float" office:value="20.06">
            <text:p>20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5.85">
            <text:p>305,85</text:p>
          </table:table-cell>
          <table:table-cell table:style-name="ce12N2" office:value-type="float" office:value="0.31">
            <text:p>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75">
            <text:p>2,7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87">
            <text:p>328,87</text:p>
          </table:table-cell>
          <table:table-cell table:style-name="ce12N2" office:value-type="float" office:value="23.02">
            <text:p>2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886216029958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6">
            <text:p>308626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7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5.5">
            <text:p>1941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9343.7">
            <text:p>1934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64002">
            <text:p>0,964</text:p>
          </table:table-cell>
          <table:table-cell table:style-name="ce12N2" office:value-type="float" office:value="94.1">
            <text:p>9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1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83.16">
            <text:p>16683,16</text:p>
          </table:table-cell>
          <table:table-cell table:style-name="ce12N2" office:value-type="float" office:value="16.72">
            <text:p>1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.17">
            <text:p>150,17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71.8">
            <text:p>71,80</text:p>
          </table:table-cell>
          <table:table-cell table:style-name="ce12N2" office:value-type="float" office:value="19343.7">
            <text:p>19343,70</text:p>
          </table:table-cell>
          <table:table-cell table:style-name="ce12N2" office:value-type="float" office:value="960.07">
            <text:p>96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7951688803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2">
            <text:p>3086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2.66">
            <text:p>19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.9">
            <text:p>180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2">
            <text:p>0,00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2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2.67">
            <text:p>152,67</text:p>
          </table:table-cell>
          <table:table-cell table:style-name="ce12N2" office:value-type="float" office:value="0.15">
            <text:p>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1.76">
            <text:p>11,76</text:p>
          </table:table-cell>
          <table:table-cell table:style-name="ce12N2" office:value-type="float" office:value="180.9">
            <text:p>180,90</text:p>
          </table:table-cell>
          <table:table-cell table:style-name="ce12N2" office:value-type="float" office:value="12.66">
            <text:p>1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115352056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7">
            <text:p>3086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201577498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70">
            <text:p>308670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7.6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35.13">
            <text:p>753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029.44">
            <text:p>7029,44</text:p>
          </table:table-cell>
          <table:table-cell table:style-name="ce12N2" office:value-type="float" office:value="421.77">
            <text:p>421,77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52">
            <text:p>5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3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96.59">
            <text:p>6896,59</text:p>
          </table:table-cell>
          <table:table-cell table:style-name="ce12N2" office:value-type="float" office:value="6.9">
            <text:p>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07">
            <text:p>62,07</text:p>
          </table:table-cell>
          <table:table-cell table:style-name="ce12N2" office:value-type="float" office:value="74">
            <text:p>7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83.92">
            <text:p>83,92</text:p>
          </table:table-cell>
          <table:table-cell table:style-name="ce12N2" office:value-type="float" office:value="7451.21">
            <text:p>7451,21</text:p>
          </table:table-cell>
          <table:table-cell table:style-name="ce12N2" office:value-type="float" office:value="298.05">
            <text:p>29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24855633000140550010000776971314203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4">
            <text:p>30872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4.1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78.92">
            <text:p>3978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6">
            <text:p>0,003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78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63">
            <text:p>32,63</text:p>
          </table:table-cell>
          <table:table-cell table:style-name="ce12N2" office:value-type="float" office:value="34.38">
            <text:p>34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53.48">
            <text:p>353,48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253.78">
            <text:p>25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41211002641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0">
            <text:p>30873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1.5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11.2">
            <text:p>231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1.2">
            <text:p>231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5">
            <text:p>0,009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1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50.59">
            <text:p>1950,59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56">
            <text:p>17,56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11.2">
            <text:p>2311,20</text:p>
          </table:table-cell>
          <table:table-cell table:style-name="ce12N2" office:value-type="float" office:value="161.78">
            <text:p>16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151110717113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45">
            <text:p>30874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0.43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83.12">
            <text:p>268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83.12">
            <text:p>268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668">
            <text:p>0,011</text:p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8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64.48">
            <text:p>2264,48</text:p>
          </table:table-cell>
          <table:table-cell table:style-name="ce12N2" office:value-type="float" office:value="2.26">
            <text:p>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38">
            <text:p>20,3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83.12">
            <text:p>2683,12</text:p>
          </table:table-cell>
          <table:table-cell table:style-name="ce12N2" office:value-type="float" office:value="187.82">
            <text:p>187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043811817633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75">
            <text:p>308775</text:p>
          </table:table-cell>
          <table:table-cell table:style-name="ce0" table:number-columns-spanned="4" table:number-rows-spanned="1" office:value-type="string" calcext:value-type="string">
            <text:p>10.562 - RENATO MARTINS CIOFFOLETTI ILUM. EPP</text:p>
          </table:table-cell>
          <table:covered-table-cell table:number-columns-repeated="3"/>
          <table:table-cell table:style-name="ce0" office:value-type="string" calcext:value-type="string">
            <text:p>18.8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41.48">
            <text:p>4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373734000120550010000188121106787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84">
            <text:p>308784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7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0.23">
            <text:p>195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776.97">
            <text:p>1776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776">
            <text:p>0,054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50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76.97">
            <text:p>1776,97</text:p>
          </table:table-cell>
          <table:table-cell table:style-name="ce12N2" office:value-type="float" office:value="1.77">
            <text:p>1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98">
            <text:p>15,98</text:p>
          </table:table-cell>
          <table:table-cell table:style-name="ce12N2" office:value-type="float" office:value="43.67">
            <text:p>43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173.26">
            <text:p>173,26</text:p>
          </table:table-cell>
          <table:table-cell table:style-name="ce12N2" office:value-type="float" office:value="1776.97">
            <text:p>1776,97</text:p>
          </table:table-cell>
          <table:table-cell table:style-name="ce12N2" office:value-type="float" office:value="124.39">
            <text:p>12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30228132000136550010000097491280346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4">
            <text:p>308834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89.27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2.89">
            <text:p>100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">
            <text:p>71,00</text:p>
          </table:table-cell>
          <table:table-cell table:style-name="ce12N2" office:value-type="float" office:value="1002.89">
            <text:p>1002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02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300018927810018221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9">
            <text:p>308839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20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8.32">
            <text:p>584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412.32">
            <text:p>541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.010704">
            <text:p>30,011</text:p>
          </table:table-cell>
          <table:table-cell table:style-name="ce12N2" office:value-type="float" office:value="43.2">
            <text:p>4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48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5.22">
            <text:p>4715,22</text:p>
          </table:table-cell>
          <table:table-cell table:style-name="ce12N2" office:value-type="float" office:value="4.72">
            <text:p>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53.91">
            <text:p>53,9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436">
            <text:p>436,00</text:p>
          </table:table-cell>
          <table:table-cell table:style-name="ce12N2" office:value-type="float" office:value="5412.32">
            <text:p>5412,32</text:p>
          </table:table-cell>
          <table:table-cell table:style-name="ce12N2" office:value-type="float" office:value="216.49">
            <text:p>216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20311369945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1">
            <text:p>308851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2.21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844">
            <text:p>0,118</text:p>
          </table:table-cell>
          <table:table-cell table:style-name="ce12N2" office:value-type="float" office:value="236.84">
            <text:p>23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0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7.52">
            <text:p>3317,52</text:p>
          </table:table-cell>
          <table:table-cell table:style-name="ce12N2" office:value-type="float" office:value="3.31">
            <text:p>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5">
            <text:p>29,85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275.16">
            <text:p>27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00000022171469860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3">
            <text:p>308853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92.34">
            <text:p>7892,34</text:p>
          </table:table-cell>
          <table:table-cell table:style-name="ce12N2" office:value-type="float" office:value="1797.8">
            <text:p>1797,8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89">
            <text:p>898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92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41.07">
            <text:p>6641,07</text:p>
          </table:table-cell>
          <table:table-cell table:style-name="ce12N2" office:value-type="float" office:value="6.64">
            <text:p>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77">
            <text:p>59,7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701.14">
            <text:p>701,14</text:p>
          </table:table-cell>
          <table:table-cell table:style-name="ce12N2" office:value-type="float" office:value="7191.2">
            <text:p>7191,20</text:p>
          </table:table-cell>
          <table:table-cell table:style-name="ce12N2" office:value-type="float" office:value="287.65">
            <text:p>287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177814120001095500100001207910003370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8">
            <text:p>308858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8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90.76">
            <text:p>369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62.88">
            <text:p>336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9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10.53">
            <text:p>3110,53</text:p>
          </table:table-cell>
          <table:table-cell table:style-name="ce12N2" office:value-type="float" office:value="3.11">
            <text:p>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327.88">
            <text:p>327,88</text:p>
          </table:table-cell>
          <table:table-cell table:style-name="ce12N2" office:value-type="float" office:value="3362.88">
            <text:p>3362,88</text:p>
          </table:table-cell>
          <table:table-cell table:style-name="ce12N2" office:value-type="float" office:value="134.52">
            <text:p>13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7716263000102550010000108271401105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7">
            <text:p>308867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4.2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07.4">
            <text:p>530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35.9">
            <text:p>483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0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35.9">
            <text:p>4835,90</text:p>
          </table:table-cell>
          <table:table-cell table:style-name="ce12N2" office:value-type="float" office:value="4.84">
            <text:p>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52">
            <text:p>43,52</text:p>
          </table:table-cell>
          <table:table-cell table:style-name="ce12N2" office:value-type="float" office:value="39.16">
            <text:p>39,1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471.5">
            <text:p>471,50</text:p>
          </table:table-cell>
          <table:table-cell table:style-name="ce12N2" office:value-type="float" office:value="4835.9">
            <text:p>4835,90</text:p>
          </table:table-cell>
          <table:table-cell table:style-name="ce12N2" office:value-type="float" office:value="338.52">
            <text:p>338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42131002642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19">
            <text:p>309019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8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84.54">
            <text:p>578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270.65">
            <text:p>5270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83">
            <text:p>0,048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84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70.65">
            <text:p>5270,65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43">
            <text:p>47,43</text:p>
          </table:table-cell>
          <table:table-cell table:style-name="ce12N2" office:value-type="float" office:value="44.06">
            <text:p>44,0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513.89">
            <text:p>513,89</text:p>
          </table:table-cell>
          <table:table-cell table:style-name="ce12N2" office:value-type="float" office:value="5270.65">
            <text:p>5270,65</text:p>
          </table:table-cell>
          <table:table-cell table:style-name="ce12N2" office:value-type="float" office:value="368.94">
            <text:p>36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6.77">
            <text:p>11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063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1/06/2026</text:p>
          </table:table-cell>
          <table:table-cell table:style-name="ce12" office:value-type="string" calcext:value-type="string">
            <text:p>116,77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35260630228132000136550010000098901217910610</text:p>
          </table:table-cell>
          <table:table-cell table:style-name="ce0" office:value-type="string" calcext:value-type="string">
            <text:p>3526061138956500020057005000401063100087377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2">
            <text:p>309022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42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95.86">
            <text:p>59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213.79">
            <text:p>5213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9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42.25">
            <text:p>4542,25</text:p>
          </table:table-cell>
          <table:table-cell table:style-name="ce12N2" office:value-type="float" office:value="4.54">
            <text:p>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88">
            <text:p>40,88</text:p>
          </table:table-cell>
          <table:table-cell table:style-name="ce12N2" office:value-type="float" office:value="43.04">
            <text:p>43,0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782.07">
            <text:p>782,07</text:p>
          </table:table-cell>
          <table:table-cell table:style-name="ce12N2" office:value-type="float" office:value="5213.79">
            <text:p>5213,79</text:p>
          </table:table-cell>
          <table:table-cell table:style-name="ce12N2" office:value-type="float" office:value="208.55">
            <text:p>208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42514010284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0">
            <text:p>309030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9.88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12.09">
            <text:p>151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7.76">
            <text:p>137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12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1.5">
            <text:p>3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34.33">
            <text:p>134,33</text:p>
          </table:table-cell>
          <table:table-cell table:style-name="ce12N2" office:value-type="float" office:value="1377.76">
            <text:p>1377,76</text:p>
          </table:table-cell>
          <table:table-cell table:style-name="ce12N2" office:value-type="float" office:value="96.44">
            <text:p>9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7.01">
            <text:p>47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013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0/06/2026</text:p>
          </table:table-cell>
          <table:table-cell table:style-name="ce12" office:value-type="string" calcext:value-type="string">
            <text:p>47,0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35260610713221000160550020000098871000132474</text:p>
          </table:table-cell>
          <table:table-cell table:style-name="ce0" office:value-type="string" calcext:value-type="string">
            <text:p>3526061138956500020057005000401013100087326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2">
            <text:p>30903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.82">
            <text:p>15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.82">
            <text:p>154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52">
            <text:p>0,000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4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.66">
            <text:p>130,66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.82">
            <text:p>154,82</text:p>
          </table:table-cell>
          <table:table-cell table:style-name="ce12N2" office:value-type="float" office:value="10.84">
            <text:p>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017211191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4">
            <text:p>30905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.98">
            <text:p>4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.98">
            <text:p>44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52">
            <text:p>0,000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.96">
            <text:p>37,96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98">
            <text:p>44,98</text:p>
          </table:table-cell>
          <table:table-cell table:style-name="ce12N2" office:value-type="float" office:value="3.15">
            <text:p>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9471789578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8">
            <text:p>30905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73.34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64">
            <text:p>0,081</text:p>
          </table:table-cell>
          <table:table-cell table:style-name="ce12N2" office:value-type="float" office:value="25.28">
            <text:p>2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5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6.18">
            <text:p>516,18</text:p>
          </table:table-cell>
          <table:table-cell table:style-name="ce12N2" office:value-type="float" office:value="0.52">
            <text:p>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5">
            <text:p>4,6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38.85">
            <text:p>3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7334919439262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5">
            <text:p>35,00</text:p>
          </table:table-cell>
          <table:table-cell table:style-name="ce26N2" office:value-type="float" office:value="1797.8">
            <text:p>1797,80</text:p>
          </table:table-cell>
          <table:table-cell table:style-name="ce26N2" office:value-type="float" office:value="421.77">
            <text:p>421,7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331.71">
            <text:p>4331,71</text:p>
          </table:table-cell>
          <table:table-cell table:style-name="ce26N2" office:value-type="float" office:value="111831.98">
            <text:p>111831,98</text:p>
          </table:table-cell>
          <table:table-cell table:style-name="ce26N2" office:value-type="float" office:value="6331.88">
            <text:p>6331,8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63.78">
            <text:p>163,78</text:p>
          </table:table-cell>
          <table:table-cell table:style-name="ce26N2" office:value-type="float" office:value="117314.08">
            <text:p>117314,0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2.275847">
            <text:p>32,276</text:p>
          </table:table-cell>
          <table:table-cell table:style-name="ce26N2" office:value-type="float" office:value="114358.4">
            <text:p>114358,40</text:p>
          </table:table-cell>
          <table:table-cell table:style-name="ce26N2" office:value-type="float" office:value="117314.08">
            <text:p>117314,0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96592.84">
            <text:p>96592,84</text:p>
          </table:table-cell>
          <table:table-cell table:style-name="ce26N2" office:value-type="float" office:value="96.6">
            <text:p>96,6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69.34">
            <text:p>869,34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859.69">
            <text:p>859,6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2.51">
            <text:p>52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72" meta:object-count="0"/>
    <meta:generator>LibreOffice/4.3.0.4$Windows_x86 LibreOffice_project/62ad5818884a2fc2e5780dd45466868d41009ec0</meta:generator>
  </office:meta>
</office:document-meta>
</file>