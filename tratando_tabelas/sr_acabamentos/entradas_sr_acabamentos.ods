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9">
            <text:p>311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1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3.82">
            <text:p>148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88">
            <text:p>1175,8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0.56">
            <text:p>90,56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97.53">
            <text:p>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1081826263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8">
            <text:p>31106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734">
            <text:p>0,019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5.68">
            <text:p>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4351432127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4">
            <text:p>31111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69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36">
            <text:p>0,00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3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.35">
            <text:p>340,35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28.23">
            <text:p>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6981521714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9">
            <text:p>311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98">
            <text:p>1163,98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96.54">
            <text:p>9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621761485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7">
            <text:p>31116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.107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4">
            <text:p>0,140</text:p>
          </table:table-cell>
          <table:table-cell table:style-name="ce12N2" office:value-type="float" office:value="369">
            <text:p>3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9.52">
            <text:p>2929,52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37">
            <text:p>26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242.98">
            <text:p>2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11071767803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8">
            <text:p>3111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8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.85">
            <text:p>1139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3484">
            <text:p>0,443</text:p>
          </table:table-cell>
          <table:table-cell table:style-name="ce12N2" office:value-type="float" office:value="47.56">
            <text:p>4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01.87">
            <text:p>9601,87</text:p>
          </table:table-cell>
          <table:table-cell table:style-name="ce12N2" office:value-type="float" office:value="9.61">
            <text:p>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42">
            <text:p>86,42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87">
            <text:p>110,87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703.42">
            <text:p>70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8058182303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3">
            <text:p>3111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31">
            <text:p>83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4">
            <text:p>0,017</text:p>
          </table:table-cell>
          <table:table-cell table:style-name="ce12N2" office:value-type="float" office:value="5.91">
            <text:p>5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.12">
            <text:p>665,12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.23">
            <text:p>51,23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55.17">
            <text:p>55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1146873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4">
            <text:p>3111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3.18">
            <text:p>72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2.25">
            <text:p>2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3.1">
            <text:p>573,10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6">
            <text:p>5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4.14">
            <text:p>44,14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47.53">
            <text:p>4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21530067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2">
            <text:p>31123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6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1.05">
            <text:p>497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08">
            <text:p>0,020</text:p>
          </table:table-cell>
          <table:table-cell table:style-name="ce12N2" office:value-type="float" office:value="5.02">
            <text:p>5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6.98">
            <text:p>4116,98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54.62">
            <text:p>54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45.41">
            <text:p>245,41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189.03">
            <text:p>18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621352432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2">
            <text:p>311262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0.84">
            <text:p>128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8.81">
            <text:p>1188,81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">
            <text:p>10,7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94">
            <text:p>33,94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92.03">
            <text:p>9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91218651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7">
            <text:p>3112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4.23">
            <text:p>433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2.83">
            <text:p>3542,83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6.43">
            <text:p>136,43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293.85">
            <text:p>29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61690243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7">
            <text:p>3113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27.2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.56">
            <text:p>244,56</text:p>
          </table:table-cell>
          <table:table-cell table:style-name="ce12N2" office:value-type="float" office:value="17.12">
            <text:p>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80003272541391234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16">
            <text:p>31131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9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4.69">
            <text:p>17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0.58">
            <text:p>158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04">
            <text:p>0,047</text:p>
          </table:table-cell>
          <table:table-cell table:style-name="ce12N2" office:value-type="float" office:value="5.05">
            <text:p>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4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9.67">
            <text:p>1459,67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54.11">
            <text:p>154,11</text:p>
          </table:table-cell>
          <table:table-cell table:style-name="ce12N2" office:value-type="float" office:value="1580.58">
            <text:p>1580,58</text:p>
          </table:table-cell>
          <table:table-cell table:style-name="ce12N2" office:value-type="float" office:value="63.22">
            <text:p>6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91101688236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2">
            <text:p>311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7.5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0.81">
            <text:p>192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61.88">
            <text:p>1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8.74">
            <text:p>1578,74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58.93">
            <text:p>158,93</text:p>
          </table:table-cell>
          <table:table-cell table:style-name="ce12N2" office:value-type="float" office:value="1761.88">
            <text:p>1761,88</text:p>
          </table:table-cell>
          <table:table-cell table:style-name="ce12N2" office:value-type="float" office:value="123.33">
            <text:p>1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5.28">
            <text:p>8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5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1/07/2026</text:p>
          </table:table-cell>
          <table:table-cell table:style-name="ce12" office:value-type="string" calcext:value-type="string">
            <text:p>85,28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35260712077181000133550030002275521274029328</text:p>
          </table:table-cell>
          <table:table-cell table:style-name="ce0" office:value-type="string" calcext:value-type="string">
            <text:p>3526071138956500020057005000403572100090072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3">
            <text:p>31139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7.5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.95">
            <text:p>9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.61">
            <text:p>81,61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8.88">
            <text:p>8,88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5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1/07/2026</text:p>
          </table:table-cell>
          <table:table-cell table:style-name="ce12" office:value-type="string" calcext:value-type="string">
            <text:p>4,44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35260712077181000133550030002275511792351556</text:p>
          </table:table-cell>
          <table:table-cell table:style-name="ce0" office:value-type="string" calcext:value-type="string">
            <text:p>3526071138956500020057005000403572100090072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5">
            <text:p>31139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5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7.37">
            <text:p>410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">
            <text:p>107,00</text:p>
          </table:table-cell>
          <table:table-cell table:style-name="ce12N2" office:value-type="float" office:value="3875.3">
            <text:p>387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29545">
            <text:p>1,330</text:p>
          </table:table-cell>
          <table:table-cell table:style-name="ce12N2" office:value-type="float" office:value="10.45">
            <text:p>1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0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7.81">
            <text:p>3657,81</text:p>
          </table:table-cell>
          <table:table-cell table:style-name="ce12N2" office:value-type="float" office:value="3.64">
            <text:p>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32.07">
            <text:p>232,07</text:p>
          </table:table-cell>
          <table:table-cell table:style-name="ce12N2" office:value-type="float" office:value="4107.37">
            <text:p>4107,37</text:p>
          </table:table-cell>
          <table:table-cell table:style-name="ce12N2" office:value-type="float" office:value="217.49">
            <text:p>21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50214087630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8">
            <text:p>311408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9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9301297072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0">
            <text:p>3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393.68">
            <text:p>2393,68</text:p>
          </table:table-cell>
          <table:table-cell table:style-name="ce26N2" office:value-type="float" office:value="76357.35">
            <text:p>76357,35</text:p>
          </table:table-cell>
          <table:table-cell table:style-name="ce26N2" office:value-type="float" office:value="4683.72">
            <text:p>4683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78505.02">
            <text:p>78505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.031441">
            <text:p>4,031</text:p>
          </table:table-cell>
          <table:table-cell table:style-name="ce26N2" office:value-type="float" office:value="76026.34">
            <text:p>76026,34</text:p>
          </table:table-cell>
          <table:table-cell table:style-name="ce26N2" office:value-type="float" office:value="78505.02">
            <text:p>78505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5400.19">
            <text:p>65400,19</text:p>
          </table:table-cell>
          <table:table-cell table:style-name="ce26N2" office:value-type="float" office:value="65.41">
            <text:p>65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88.56">
            <text:p>588,5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18.97">
            <text:p>1018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89">
            <text:p>39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42" meta:object-count="0"/>
    <meta:generator>LibreOffice/4.3.0.4$Windows_x86 LibreOffice_project/62ad5818884a2fc2e5780dd45466868d41009ec0</meta:generator>
  </office:meta>
</office:document-meta>
</file>