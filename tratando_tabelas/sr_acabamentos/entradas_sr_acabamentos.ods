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7:42:27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4">
            <text:p>31044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3.65">
            <text:p>39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6.54">
            <text:p>3206,54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6">
            <text:p>28,86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61.5">
            <text:p>461,5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138.88">
            <text:p>13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111361121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5">
            <text:p>31047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7.67">
            <text:p>46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7.6">
            <text:p>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.25">
            <text:p>3888,25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37.33">
            <text:p>437,33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168.42">
            <text:p>1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11202722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3">
            <text:p>310533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94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36">
            <text:p>487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.14">
            <text:p>4041,14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40.74">
            <text:p>240,74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185.55">
            <text:p>1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942241750641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1">
            <text:p>4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75.85">
            <text:p>3675,85</text:p>
          </table:table-cell>
          <table:table-cell table:style-name="ce26N2" office:value-type="float" office:value="228512.77">
            <text:p>228512,77</text:p>
          </table:table-cell>
          <table:table-cell table:style-name="ce26N2" office:value-type="float" office:value="14269.7">
            <text:p>14269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232208.62">
            <text:p>232208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5.137212">
            <text:p>265,137</text:p>
          </table:table-cell>
          <table:table-cell table:style-name="ce26N2" office:value-type="float" office:value="219526.41">
            <text:p>219526,41</text:p>
          </table:table-cell>
          <table:table-cell table:style-name="ce26N2" office:value-type="float" office:value="232208.62">
            <text:p>232208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92755.27">
            <text:p>192755,27</text:p>
          </table:table-cell>
          <table:table-cell table:style-name="ce26N2" office:value-type="float" office:value="192.72">
            <text:p>192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34.79">
            <text:p>1734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891.81">
            <text:p>9891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.87">
            <text:p>60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8" meta:object-count="0"/>
    <meta:generator>LibreOffice/4.3.0.4$Windows_x86 LibreOffice_project/62ad5818884a2fc2e5780dd45466868d41009ec0</meta:generator>
  </office:meta>
</office:document-meta>
</file>