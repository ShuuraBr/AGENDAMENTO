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6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5">
            <text:p>310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8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8">
            <text:p>0,01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0.78">
            <text:p>3180,78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3">
            <text:p>28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84">
            <text:p>3768,84</text:p>
          </table:table-cell>
          <table:table-cell table:style-name="ce12N2" office:value-type="float" office:value="263.82">
            <text:p>2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8061373101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0">
            <text:p>310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4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">
            <text:p>0,002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7.2">
            <text:p>1027,20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4">
            <text:p>9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85.2">
            <text:p>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4301622675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2">
            <text:p>31067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9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62.49">
            <text:p>856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24">
            <text:p>0,050</text:p>
          </table:table-cell>
          <table:table-cell table:style-name="ce12N2" office:value-type="float" office:value="45.5">
            <text:p>4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6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2.21">
            <text:p>6962,21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6">
            <text:p>62,66</text:p>
          </table:table-cell>
          <table:table-cell table:style-name="ce12N2" office:value-type="float" office:value="54.13">
            <text:p>54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570.97">
            <text:p>570,97</text:p>
          </table:table-cell>
          <table:table-cell table:style-name="ce12N2" office:value-type="float" office:value="7991.52">
            <text:p>7991,52</text:p>
          </table:table-cell>
          <table:table-cell table:style-name="ce12N2" office:value-type="float" office:value="319.66">
            <text:p>3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9221345408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4">
            <text:p>310694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6">
            <text:p>19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.8">
            <text:p>2200,80</text:p>
          </table:table-cell>
          <table:table-cell table:style-name="ce12N2" office:value-type="float" office:value="154.05">
            <text:p>15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41643007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7">
            <text:p>310697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92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.03">
            <text:p>336,03</text:p>
          </table:table-cell>
          <table:table-cell table:style-name="ce12N2" office:value-type="float" office:value="23.53">
            <text:p>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2256040001685500300005292319629673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2">
            <text:p>310782</text:p>
          </table:table-cell>
          <table:table-cell table:style-name="ce0" table:number-columns-spanned="4" table:number-rows-spanned="1" office:value-type="string" calcext:value-type="string">
            <text:p>38.510 - MAC FER INDUSTRIA E COMERCIO LTDA</text:p>
          </table:table-cell>
          <table:covered-table-cell table:number-columns-repeated="3"/>
          <table:table-cell table:style-name="ce0" office:value-type="string" calcext:value-type="string">
            <text:p>45.4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0.9">
            <text:p>481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4617.48">
            <text:p>461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10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22.75">
            <text:p>4022,75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2">
            <text:p>36,20</text:p>
          </table:table-cell>
          <table:table-cell table:style-name="ce12N2" office:value-type="float" office:value="74.4">
            <text:p>74,4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93.42">
            <text:p>193,42</text:p>
          </table:table-cell>
          <table:table-cell table:style-name="ce12N2" office:value-type="float" office:value="4617.48">
            <text:p>4617,48</text:p>
          </table:table-cell>
          <table:table-cell table:style-name="ce12N2" office:value-type="float" office:value="184.72">
            <text:p>18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7.12">
            <text:p>9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87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97,1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42260701145165000386550000000454351561561609</text:p>
          </table:table-cell>
          <table:table-cell table:style-name="ce0" office:value-type="string" calcext:value-type="string">
            <text:p>352607113895650002005700500040287410008933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6">
            <text:p>31078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87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1496">
            <text:p>0,251</text:p>
          </table:table-cell>
          <table:table-cell table:style-name="ce12N2" office:value-type="float" office:value="507.54">
            <text:p>50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2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9.01">
            <text:p>3209,01</text:p>
          </table:table-cell>
          <table:table-cell table:style-name="ce12N2" office:value-type="float" office:value="3.21">
            <text:p>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8">
            <text:p>28,88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266.17">
            <text:p>26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8761200869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2">
            <text:p>31079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1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.75">
            <text:p>273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2726">
            <text:p>0,2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2.96">
            <text:p>2232,96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62.12">
            <text:p>62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5.99">
            <text:p>85,99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185.2">
            <text:p>1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1695126456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3">
            <text:p>3107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3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116">
            <text:p>0,065</text:p>
          </table:table-cell>
          <table:table-cell table:style-name="ce12N2" office:value-type="float" office:value="5.99">
            <text:p>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06.68">
            <text:p>7006,6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06">
            <text:p>6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2">
            <text:p>8302,00</text:p>
          </table:table-cell>
          <table:table-cell table:style-name="ce12N2" office:value-type="float" office:value="581.14">
            <text:p>5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3301144730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5">
            <text:p>3107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9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.87">
            <text:p>157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576.87">
            <text:p>1576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7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6.85">
            <text:p>1366,85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6.87">
            <text:p>1576,87</text:p>
          </table:table-cell>
          <table:table-cell table:style-name="ce12N2" office:value-type="float" office:value="70.7">
            <text:p>7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912154861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9">
            <text:p>31079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1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63.29">
            <text:p>706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6641.11">
            <text:p>6641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00259">
            <text:p>30,003</text:p>
          </table:table-cell>
          <table:table-cell table:style-name="ce12N2" office:value-type="float" office:value="161.1">
            <text:p>16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63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85.73">
            <text:p>5785,73</text:p>
          </table:table-cell>
          <table:table-cell table:style-name="ce12N2" office:value-type="float" office:value="5.79">
            <text:p>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07">
            <text:p>52,07</text:p>
          </table:table-cell>
          <table:table-cell table:style-name="ce12N2" office:value-type="float" office:value="58.21">
            <text:p>58,2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2.18">
            <text:p>422,18</text:p>
          </table:table-cell>
          <table:table-cell table:style-name="ce12N2" office:value-type="float" office:value="6641.11">
            <text:p>6641,11</text:p>
          </table:table-cell>
          <table:table-cell table:style-name="ce12N2" office:value-type="float" office:value="265.64">
            <text:p>2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129126910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3">
            <text:p>31080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5">
            <text:p>0,000</text:p>
          </table:table-cell>
          <table:table-cell table:style-name="ce12N2" office:value-type="float" office:value="37.88">
            <text:p>37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.56">
            <text:p>202,56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16.8">
            <text:p>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51832890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6">
            <text:p>31080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7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8.84">
            <text:p>1718,84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29.78">
            <text:p>1629,78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67">
            <text:p>14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127.32">
            <text:p>12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8028676000103550010000574421004490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1">
            <text:p>310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324">
            <text:p>0,052</text:p>
          </table:table-cell>
          <table:table-cell table:style-name="ce12N2" office:value-type="float" office:value="12.98">
            <text:p>1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6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48.4">
            <text:p>6048,4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43">
            <text:p>54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64.32">
            <text:p>7064,32</text:p>
          </table:table-cell>
          <table:table-cell table:style-name="ce12N2" office:value-type="float" office:value="399.41">
            <text:p>39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591213091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0">
            <text:p>310830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6">
            <text:p>0,076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.51">
            <text:p>569,51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3">
            <text:p>5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44.49">
            <text:p>4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01502844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3">
            <text:p>3108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27.25">
            <text:p>4127,25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15">
            <text:p>37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201882810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0">
            <text:p>310860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2.14">
            <text:p>497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0.2">
            <text:p>4350,2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15294">
            <text:p>0,153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.95">
            <text:p>3863,95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.25">
            <text:p>42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36.94">
            <text:p>536,94</text:p>
          </table:table-cell>
          <table:table-cell table:style-name="ce12N2" office:value-type="float" office:value="4435.2">
            <text:p>4435,20</text:p>
          </table:table-cell>
          <table:table-cell table:style-name="ce12N2" office:value-type="float" office:value="177.41">
            <text:p>17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101380753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2">
            <text:p>31086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50.92">
            <text:p>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39477000186550010000006111000000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7">
            <text:p>310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8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2.72">
            <text:p>347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77">
            <text:p>0,01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9.17">
            <text:p>2889,1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239.63">
            <text:p>2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8621137012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2">
            <text:p>310872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3.45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55.42">
            <text:p>745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67">
            <text:p>1,237</text:p>
          </table:table-cell>
          <table:table-cell table:style-name="ce12N2" office:value-type="float" office:value="407.63">
            <text:p>4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5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70.03">
            <text:p>6170,03</text:p>
          </table:table-cell>
          <table:table-cell table:style-name="ce12N2" office:value-type="float" office:value="6.16">
            <text:p>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54">
            <text:p>55,5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450.46">
            <text:p>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345514313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8">
            <text:p>3109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52">
            <text:p>0,030</text:p>
          </table:table-cell>
          <table:table-cell table:style-name="ce12N2" office:value-type="float" office:value="12.48">
            <text:p>12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97">
            <text:p>103,97</text:p>
          </table:table-cell>
          <table:table-cell table:style-name="ce12N2" office:value-type="float" office:value="0.11">
            <text:p>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7188269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4">
            <text:p>310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75.35">
            <text:p>767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911">
            <text:p>0,038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75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32.99">
            <text:p>6432,99</text:p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9">
            <text:p>5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3.08">
            <text:p>53,08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533.56">
            <text:p>53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491879096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6">
            <text:p>31095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3.25">
            <text:p>261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66">
            <text:p>0,224</text:p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8.19">
            <text:p>2098,19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89">
            <text:p>18,89</text:p>
          </table:table-cell>
          <table:table-cell table:style-name="ce12N2" office:value-type="float" office:value="40.98">
            <text:p>40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05">
            <text:p>190,05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111.15">
            <text:p>11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7581054620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5">
            <text:p>3109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32">
            <text:p>71,32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6111791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9">
            <text:p>3109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8.82">
            <text:p>678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177.49">
            <text:p>6177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9">
            <text:p>0,03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76.03">
            <text:p>5376,03</text:p>
          </table:table-cell>
          <table:table-cell table:style-name="ce12N2" office:value-type="float" office:value="5.38">
            <text:p>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54.48">
            <text:p>54,4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11.33">
            <text:p>611,33</text:p>
          </table:table-cell>
          <table:table-cell table:style-name="ce12N2" office:value-type="float" office:value="6177.49">
            <text:p>6177,49</text:p>
          </table:table-cell>
          <table:table-cell table:style-name="ce12N2" office:value-type="float" office:value="253.49">
            <text:p>2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4601232266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0">
            <text:p>311000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0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5.9">
            <text:p>231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5.9">
            <text:p>231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324">
            <text:p>0,045</text:p>
          </table:table-cell>
          <table:table-cell table:style-name="ce12N2" office:value-type="float" office:value="4.92">
            <text:p>4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9.5">
            <text:p>1849,50</text:p>
          </table:table-cell>
          <table:table-cell table:style-name="ce12N2" office:value-type="float" office:value="1.85">
            <text:p>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64">
            <text:p>16,6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5.9">
            <text:p>2315,90</text:p>
          </table:table-cell>
          <table:table-cell table:style-name="ce12N2" office:value-type="float" office:value="277.9">
            <text:p>27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088019472698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1">
            <text:p>311001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15">
            <text:p>0,037</text:p>
          </table:table-cell>
          <table:table-cell table:style-name="ce12N2" office:value-type="float" office:value="28.12">
            <text:p>28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7.28">
            <text:p>2087,28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78">
            <text:p>18,7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173.12">
            <text:p>1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6114415000067855001001286594154523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9">
            <text:p>311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1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3.82">
            <text:p>148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88">
            <text:p>1175,8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0.56">
            <text:p>90,56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97.53">
            <text:p>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10818262639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7">
            <text:p>31102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9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88.43">
            <text:p>1408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6">
            <text:p>0,026</text:p>
          </table:table-cell>
          <table:table-cell table:style-name="ce12N2" office:value-type="float" office:value="13.34">
            <text:p>1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8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27.02">
            <text:p>10527,02</text:p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75">
            <text:p>94,7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615.29">
            <text:p>1615,29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873.13">
            <text:p>87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3562859000105550010001696801991696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8">
            <text:p>3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95.5">
            <text:p>495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836.7">
            <text:p>4836,70</text:p>
          </table:table-cell>
          <table:table-cell table:style-name="ce26N2" office:value-type="float" office:value="146473.78">
            <text:p>146473,78</text:p>
          </table:table-cell>
          <table:table-cell table:style-name="ce26N2" office:value-type="float" office:value="8882.26">
            <text:p>8882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7.12">
            <text:p>97,12</text:p>
          </table:table-cell>
          <table:table-cell table:style-name="ce26N2" office:value-type="float" office:value="151330.48">
            <text:p>151330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5.555181">
            <text:p>35,555</text:p>
          </table:table-cell>
          <table:table-cell table:style-name="ce26N2" office:value-type="float" office:value="145998.28">
            <text:p>145998,28</text:p>
          </table:table-cell>
          <table:table-cell table:style-name="ce26N2" office:value-type="float" office:value="151330.48">
            <text:p>151330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4835.4">
            <text:p>124835,40</text:p>
          </table:table-cell>
          <table:table-cell table:style-name="ce26N2" office:value-type="float" office:value="124.84">
            <text:p>124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23.46">
            <text:p>1123,4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809.96">
            <text:p>2809,9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2.35">
            <text:p>52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70" meta:object-count="0"/>
    <meta:generator>LibreOffice/4.3.0.4$Windows_x86 LibreOffice_project/62ad5818884a2fc2e5780dd45466868d41009ec0</meta:generator>
  </office:meta>
</office:document-meta>
</file>