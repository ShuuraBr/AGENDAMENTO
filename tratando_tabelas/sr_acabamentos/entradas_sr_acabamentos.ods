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5/06/2026 07:40:1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9">
            <text:p>309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2">
            <text:p>70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02">
            <text:p>0,00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.67">
            <text:p>555,6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2.8">
            <text:p>42,8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46.09">
            <text:p>4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1136962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9">
            <text:p>3093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8.61">
            <text:p>972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">
            <text:p>0,165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94.71">
            <text:p>7694,71</text:p>
          </table:table-cell>
          <table:table-cell table:style-name="ce12N2" office:value-type="float" office:value="7.71">
            <text:p>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26">
            <text:p>69,26</text:p>
          </table:table-cell>
          <table:table-cell table:style-name="ce12N2" office:value-type="float" office:value="66.13">
            <text:p>66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896.31">
            <text:p>896,31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353.29">
            <text:p>3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9951131047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6">
            <text:p>30942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784">
            <text:p>0,046</text:p>
          </table:table-cell>
          <table:table-cell table:style-name="ce12N2" office:value-type="float" office:value="19.15">
            <text:p>1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33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61.82">
            <text:p>6261,82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36">
            <text:p>56,3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471.32">
            <text:p>4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351538163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8">
            <text:p>309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.14">
            <text:p>748,14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09168994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9">
            <text:p>309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3.74">
            <text:p>1483,74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123.06">
            <text:p>1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231447616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0">
            <text:p>3095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2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92.66">
            <text:p>60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702">
            <text:p>0,037</text:p>
          </table:table-cell>
          <table:table-cell table:style-name="ce12N2" office:value-type="float" office:value="35.6">
            <text:p>3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8.26">
            <text:p>4888,26</text:p>
          </table:table-cell>
          <table:table-cell table:style-name="ce12N2" office:value-type="float" office:value="4.89">
            <text:p>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9">
            <text:p>43,99</text:p>
          </table:table-cell>
          <table:table-cell table:style-name="ce12N2" office:value-type="float" office:value="53.79">
            <text:p>53,7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81.7">
            <text:p>481,7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296123812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2">
            <text:p>3095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749">
            <text:p>0,035</text:p>
          </table:table-cell>
          <table:table-cell table:style-name="ce12N2" office:value-type="float" office:value="18.75">
            <text:p>1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2.72">
            <text:p>1562,72</text:p>
          </table:table-cell>
          <table:table-cell table:style-name="ce12N2" office:value-type="float" office:value="1.56">
            <text:p>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06">
            <text:p>14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129.61">
            <text:p>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371845375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3">
            <text:p>30959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2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53">
            <text:p>118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2.15">
            <text:p>106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.9">
            <text:p>980,90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3">
            <text:p>8,83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38">
            <text:p>119,38</text:p>
          </table:table-cell>
          <table:table-cell table:style-name="ce12N2" office:value-type="float" office:value="1062.15">
            <text:p>1062,15</text:p>
          </table:table-cell>
          <table:table-cell table:style-name="ce12N2" office:value-type="float" office:value="42.49">
            <text:p>4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82551681199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6">
            <text:p>3095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2.59">
            <text:p>315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">
            <text:p>80,0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187">
            <text:p>0,366</text:p>
          </table:table-cell>
          <table:table-cell table:style-name="ce12N2" office:value-type="float" office:value="61.87">
            <text:p>6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2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37.53">
            <text:p>26437,53</text:p>
          </table:table-cell>
          <table:table-cell table:style-name="ce12N2" office:value-type="float" office:value="26.41">
            <text:p>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97.4">
            <text:p>197,4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2192.78">
            <text:p>219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954195930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10">
            <text:p>3096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3.54">
            <text:p>63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7.87">
            <text:p>5277,87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8.46">
            <text:p>598,46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228.6">
            <text:p>2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8851445148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8">
            <text:p>3096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32">
            <text:p>2311,32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21442965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6">
            <text:p>309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4">
            <text:p>0,002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3.56">
            <text:p>1743,56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144.61">
            <text:p>14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501521566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6">
            <text:p>30970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0.39">
            <text:p>249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91.7">
            <text:p>219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41">
            <text:p>0,02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3.46">
            <text:p>1983,46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13.69">
            <text:p>213,69</text:p>
          </table:table-cell>
          <table:table-cell table:style-name="ce12N2" office:value-type="float" office:value="2276.7">
            <text:p>2276,7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3511942340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8">
            <text:p>3097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67.03">
            <text:p>402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0546">
            <text:p>0,411</text:p>
          </table:table-cell>
          <table:table-cell table:style-name="ce12N2" office:value-type="float" office:value="145.11">
            <text:p>145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6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91.03">
            <text:p>32891,03</text:p>
          </table:table-cell>
          <table:table-cell table:style-name="ce12N2" office:value-type="float" office:value="32.91">
            <text:p>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.05">
            <text:p>296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07.62">
            <text:p>1307,62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2715.91">
            <text:p>271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211671913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13">
            <text:p>3097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85">
            <text:p>8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08">
            <text:p>0,000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8.57">
            <text:p>708,57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7.29">
            <text:p>27,29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8.77">
            <text:p>5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261884230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3">
            <text:p>3097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4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39">
            <text:p>396,39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32.88">
            <text:p>3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4781448006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4">
            <text:p>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973.48">
            <text:p>3973,48</text:p>
          </table:table-cell>
          <table:table-cell table:style-name="ce26N2" office:value-type="float" office:value="120662.82">
            <text:p>120662,82</text:p>
          </table:table-cell>
          <table:table-cell table:style-name="ce26N2" office:value-type="float" office:value="7664.2">
            <text:p>7664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0">
            <text:p>200,00</text:p>
          </table:table-cell>
          <table:table-cell table:style-name="ce26N2" office:value-type="float" office:value="124783.8">
            <text:p>124783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497118">
            <text:p>1,497</text:p>
          </table:table-cell>
          <table:table-cell table:style-name="ce26N2" office:value-type="float" office:value="120725.32">
            <text:p>120725,32</text:p>
          </table:table-cell>
          <table:table-cell table:style-name="ce26N2" office:value-type="float" office:value="124783.8">
            <text:p>124783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3708.42">
            <text:p>103708,42</text:p>
          </table:table-cell>
          <table:table-cell table:style-name="ce26N2" office:value-type="float" office:value="103.74">
            <text:p>103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33.39">
            <text:p>933,3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77.05">
            <text:p>477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.46">
            <text:p>34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6" meta:object-count="0"/>
    <meta:generator>LibreOffice/4.3.0.4$Windows_x86 LibreOffice_project/62ad5818884a2fc2e5780dd45466868d41009ec0</meta:generator>
  </office:meta>
</office:document-meta>
</file>