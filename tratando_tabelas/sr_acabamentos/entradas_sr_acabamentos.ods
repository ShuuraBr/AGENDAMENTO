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30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3">
            <text:p>3097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85">
            <text:p>8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08">
            <text:p>0,000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8.57">
            <text:p>708,57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7.29">
            <text:p>27,29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8.77">
            <text:p>5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261884230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3">
            <text:p>3097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4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39">
            <text:p>396,39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32.88">
            <text:p>3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4781448006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2">
            <text:p>309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3.69">
            <text:p>1840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0165">
            <text:p>0,220</text:p>
          </table:table-cell>
          <table:table-cell table:style-name="ce12N2" office:value-type="float" office:value="55.98">
            <text:p>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03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05.86">
            <text:p>15505,86</text:p>
          </table:table-cell>
          <table:table-cell table:style-name="ce12N2" office:value-type="float" office:value="15.54">
            <text:p>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56">
            <text:p>139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32.96">
            <text:p>32,96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1284.37">
            <text:p>12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2621277311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6">
            <text:p>30984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6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0.77">
            <text:p>198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8.04">
            <text:p>176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0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36">
            <text:p>1635,36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12.73">
            <text:p>212,73</text:p>
          </table:table-cell>
          <table:table-cell table:style-name="ce12N2" office:value-type="float" office:value="1768.04">
            <text:p>1768,04</text:p>
          </table:table-cell>
          <table:table-cell table:style-name="ce12N2" office:value-type="float" office:value="70.72">
            <text:p>7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94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5260610599342000123550020001056881965417797</text:p>
          </table:table-cell>
          <table:table-cell table:style-name="ce0" office:value-type="string" calcext:value-type="string">
            <text:p>3526061138956500020057005000401944100088341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7">
            <text:p>3098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4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5.98">
            <text:p>445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36.99">
            <text:p>3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47515332883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9">
            <text:p>309869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.36">
            <text:p>64,36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91156444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5">
            <text:p>309875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9.2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6">
            <text:p>81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72">
            <text:p>0,028</text:p>
          </table:table-cell>
          <table:table-cell table:style-name="ce12N2" office:value-type="float" office:value="1.73">
            <text:p>1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9.9">
            <text:p>659,9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43.44">
            <text:p>43,44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40.36">
            <text:p>4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92121844864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3">
            <text:p>30992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1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2.89">
            <text:p>4112,89</text:p>
          </table:table-cell>
          <table:table-cell table:style-name="ce12N2" office:value-type="float" office:value="4.11">
            <text:p>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2">
            <text:p>3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321.3">
            <text:p>32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71661004474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6">
            <text:p>309926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12.89">
            <text:p>1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5.4">
            <text:p>2455,40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">
            <text:p>22,1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368.96">
            <text:p>36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0142240000120550010007181471947263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9">
            <text:p>309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12">
            <text:p>1635,12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135.62">
            <text:p>13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03141597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0">
            <text:p>310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3.94">
            <text:p>49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29">
            <text:p>0,031</text:p>
          </table:table-cell>
          <table:table-cell table:style-name="ce12N2" office:value-type="float" office:value="6.13">
            <text:p>6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99">
            <text:p>4089,99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1">
            <text:p>3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7.84">
            <text:p>87,84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339.22">
            <text:p>33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71314958552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4">
            <text:p>3100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699.78">
            <text:p>3469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804">
            <text:p>0,199</text:p>
          </table:table-cell>
          <table:table-cell table:style-name="ce12N2" office:value-type="float" office:value="31.62">
            <text:p>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69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11.42">
            <text:p>28911,42</text:p>
          </table:table-cell>
          <table:table-cell table:style-name="ce12N2" office:value-type="float" office:value="28.9">
            <text:p>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22">
            <text:p>260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69.29">
            <text:p>469,29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2372.09">
            <text:p>23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611544103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0">
            <text:p>3100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8">
            <text:p>0,001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87">
            <text:p>273,87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22.72">
            <text:p>2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11146552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5">
            <text:p>3100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2.7">
            <text:p>17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04">
            <text:p>0,00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16">
            <text:p>1365,16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5.14">
            <text:p>105,14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113.23">
            <text:p>11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731738547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7">
            <text:p>3100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5.99">
            <text:p>15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247">
            <text:p>0,024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4.36">
            <text:p>1304,36</text:p>
          </table:table-cell>
          <table:table-cell table:style-name="ce12N2" office:value-type="float" office:value="1.31">
            <text:p>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108.17">
            <text:p>1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89171437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46">
            <text:p>24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395.17">
            <text:p>3395,17</text:p>
          </table:table-cell>
          <table:table-cell table:style-name="ce26N2" office:value-type="float" office:value="173735.77">
            <text:p>173735,77</text:p>
          </table:table-cell>
          <table:table-cell table:style-name="ce26N2" office:value-type="float" office:value="11906.16">
            <text:p>11906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9.72">
            <text:p>289,72</text:p>
          </table:table-cell>
          <table:table-cell table:style-name="ce26N2" office:value-type="float" office:value="177278.44">
            <text:p>177278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017905">
            <text:p>2,018</text:p>
          </table:table-cell>
          <table:table-cell table:style-name="ce26N2" office:value-type="float" office:value="173637.27">
            <text:p>173637,27</text:p>
          </table:table-cell>
          <table:table-cell table:style-name="ce26N2" office:value-type="float" office:value="177278.44">
            <text:p>177278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7538.1">
            <text:p>147538,10</text:p>
          </table:table-cell>
          <table:table-cell table:style-name="ce26N2" office:value-type="float" office:value="147.57">
            <text:p>147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27.89">
            <text:p>1327,8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02.58">
            <text:p>802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7">
            <text:p>31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8" meta:object-count="0"/>
    <meta:generator>LibreOffice/4.3.0.4$Windows_x86 LibreOffice_project/62ad5818884a2fc2e5780dd45466868d41009ec0</meta:generator>
  </office:meta>
</office:document-meta>
</file>