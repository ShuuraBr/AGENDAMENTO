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6/06/2026 07:31:43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9">
            <text:p>30854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">
            <text:p>0,015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101394853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6">
            <text:p>309316</text:p>
          </table:table-cell>
          <table:table-cell table:style-name="ce0" table:number-columns-spanned="4" table:number-rows-spanned="1" office:value-type="string" calcext:value-type="string">
            <text:p>38.731 - CLARAO INDUSTRIA E COMERCIO DE ILUMINACAO LTDA</text:p>
          </table:table-cell>
          <table:covered-table-cell table:number-columns-repeated="3"/>
          <table:table-cell table:style-name="ce0" office:value-type="string" calcext:value-type="string">
            <text:p>23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40.61">
            <text:p>1840,61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57">
            <text:p>16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144.2">
            <text:p>14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100.725</text:p>
          </table:table-cell>
          <table:table-cell table:style-name="ce0" office:value-type="string" calcext:value-type="string">
            <text:p>2.123 - RG TRANSPORTES RODOVIARIOS LTDA</text:p>
          </table:table-cell>
          <table:table-cell table:style-name="ce0" office:value-type="string" calcext:value-type="string">
            <text:p>18/06/2026</text:p>
          </table:table-cell>
          <table:table-cell table:style-name="ce12" office:value-type="string" calcext:value-type="string">
            <text:p>200,00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35260667263012000180550010000234001327329443</text:p>
          </table:table-cell>
          <table:table-cell table:style-name="ce0" office:value-type="string" calcext:value-type="string">
            <text:p>3526060259242100018457002000100725190306158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8">
            <text:p>3094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88">
            <text:p>0,000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6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8.14">
            <text:p>748,14</text:p>
          </table:table-cell>
          <table:table-cell table:style-name="ce12N2" office:value-type="float" office:value="0.75">
            <text:p>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73">
            <text:p>6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62.05">
            <text:p>6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091689942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9">
            <text:p>3094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0.5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8.04">
            <text:p>175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8.04">
            <text:p>1758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466">
            <text:p>0,175</text:p>
          </table:table-cell>
          <table:table-cell table:style-name="ce12N2" office:value-type="float" office:value="75.42">
            <text:p>75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3.74">
            <text:p>1483,74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35">
            <text:p>13,3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8.04">
            <text:p>1758,04</text:p>
          </table:table-cell>
          <table:table-cell table:style-name="ce12N2" office:value-type="float" office:value="123.06">
            <text:p>12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05231447616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0">
            <text:p>309590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5.29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92.66">
            <text:p>609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610.96">
            <text:p>5610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702">
            <text:p>0,037</text:p>
          </table:table-cell>
          <table:table-cell table:style-name="ce12N2" office:value-type="float" office:value="35.6">
            <text:p>3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92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88.26">
            <text:p>4888,26</text:p>
          </table:table-cell>
          <table:table-cell table:style-name="ce12N2" office:value-type="float" office:value="4.89">
            <text:p>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99">
            <text:p>43,99</text:p>
          </table:table-cell>
          <table:table-cell table:style-name="ce12N2" office:value-type="float" office:value="53.79">
            <text:p>53,7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481.7">
            <text:p>481,70</text:p>
          </table:table-cell>
          <table:table-cell table:style-name="ce12N2" office:value-type="float" office:value="5610.96">
            <text:p>5610,96</text:p>
          </table:table-cell>
          <table:table-cell table:style-name="ce12N2" office:value-type="float" office:value="224.44">
            <text:p>22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52961238127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2">
            <text:p>30959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0.5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1.61">
            <text:p>185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51.61">
            <text:p>1851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749">
            <text:p>0,035</text:p>
          </table:table-cell>
          <table:table-cell table:style-name="ce12N2" office:value-type="float" office:value="18.75">
            <text:p>18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51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2.72">
            <text:p>1562,72</text:p>
          </table:table-cell>
          <table:table-cell table:style-name="ce12N2" office:value-type="float" office:value="1.56">
            <text:p>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06">
            <text:p>14,0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1.61">
            <text:p>1851,61</text:p>
          </table:table-cell>
          <table:table-cell table:style-name="ce12N2" office:value-type="float" office:value="129.61">
            <text:p>12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053718453758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6">
            <text:p>3095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0.95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22.59">
            <text:p>3152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">
            <text:p>80,00</text:p>
          </table:table-cell>
          <table:table-cell table:style-name="ce12N2" office:value-type="float" office:value="31325.19">
            <text:p>31325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6187">
            <text:p>0,366</text:p>
          </table:table-cell>
          <table:table-cell table:style-name="ce12N2" office:value-type="float" office:value="61.87">
            <text:p>61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52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437.53">
            <text:p>26437,53</text:p>
          </table:table-cell>
          <table:table-cell table:style-name="ce12N2" office:value-type="float" office:value="26.41">
            <text:p>2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7.89">
            <text:p>237,8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97.4">
            <text:p>197,40</text:p>
          </table:table-cell>
          <table:table-cell table:style-name="ce12N2" office:value-type="float" office:value="31325.19">
            <text:p>31325,19</text:p>
          </table:table-cell>
          <table:table-cell table:style-name="ce12N2" office:value-type="float" office:value="2192.78">
            <text:p>2192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09541959306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10">
            <text:p>309610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8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13.54">
            <text:p>631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715.08">
            <text:p>5715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2.8">
            <text:p>3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1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77.87">
            <text:p>5277,87</text:p>
          </table:table-cell>
          <table:table-cell table:style-name="ce12N2" office:value-type="float" office:value="5.29">
            <text:p>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5">
            <text:p>47,50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598.46">
            <text:p>598,46</text:p>
          </table:table-cell>
          <table:table-cell table:style-name="ce12N2" office:value-type="float" office:value="5715.08">
            <text:p>5715,08</text:p>
          </table:table-cell>
          <table:table-cell table:style-name="ce12N2" office:value-type="float" office:value="228.6">
            <text:p>22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0587017000285550010000408851445148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8">
            <text:p>3096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76">
            <text:p>0,001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96.27">
            <text:p>1496,27</text:p>
          </table:table-cell>
          <table:table-cell table:style-name="ce12N2" office:value-type="float" office:value="1.5">
            <text:p>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47">
            <text:p>13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124.1">
            <text:p>12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310668984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9">
            <text:p>3096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.78">
            <text:p>57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2.52">
            <text:p>542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7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7.87">
            <text:p>457,87</text:p>
          </table:table-cell>
          <table:table-cell table:style-name="ce12N2" office:value-type="float" office:value="0.46">
            <text:p>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5.26">
            <text:p>35,26</text:p>
          </table:table-cell>
          <table:table-cell table:style-name="ce12N2" office:value-type="float" office:value="542.52">
            <text:p>542,52</text:p>
          </table:table-cell>
          <table:table-cell table:style-name="ce12N2" office:value-type="float" office:value="37.98">
            <text:p>37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41333415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2">
            <text:p>30965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4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9.46">
            <text:p>393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891.51">
            <text:p>3891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953">
            <text:p>0,080</text:p>
          </table:table-cell>
          <table:table-cell table:style-name="ce12N2" office:value-type="float" office:value="21.69">
            <text:p>21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44.3">
            <text:p>3344,30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11">
            <text:p>30,11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47.95">
            <text:p>47,95</text:p>
          </table:table-cell>
          <table:table-cell table:style-name="ce12N2" office:value-type="float" office:value="3891.51">
            <text:p>3891,51</text:p>
          </table:table-cell>
          <table:table-cell table:style-name="ce12N2" office:value-type="float" office:value="206.36">
            <text:p>20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41581540824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68">
            <text:p>30966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35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8.64">
            <text:p>273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38.64">
            <text:p>273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15">
            <text:p>0,033</text:p>
          </table:table-cell>
          <table:table-cell table:style-name="ce12N2" office:value-type="float" office:value="8.7">
            <text:p>8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3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11.32">
            <text:p>2311,32</text:p>
          </table:table-cell>
          <table:table-cell table:style-name="ce12N2" office:value-type="float" office:value="2.31">
            <text:p>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8">
            <text:p>20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38.64">
            <text:p>2738,64</text:p>
          </table:table-cell>
          <table:table-cell table:style-name="ce12N2" office:value-type="float" office:value="191.7">
            <text:p>19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3521442965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6">
            <text:p>30967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8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5.9">
            <text:p>206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5.9">
            <text:p>206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714">
            <text:p>0,002</text:p>
          </table:table-cell>
          <table:table-cell table:style-name="ce12N2" office:value-type="float" office:value="1.82">
            <text:p>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3.56">
            <text:p>1743,56</text:p>
          </table:table-cell>
          <table:table-cell table:style-name="ce12N2" office:value-type="float" office:value="1.74">
            <text:p>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69">
            <text:p>15,6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5.9">
            <text:p>2065,90</text:p>
          </table:table-cell>
          <table:table-cell table:style-name="ce12N2" office:value-type="float" office:value="144.61">
            <text:p>14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8501521566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6">
            <text:p>309706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6.3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0.39">
            <text:p>249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91.7">
            <text:p>2191,7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2941">
            <text:p>0,029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90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83.46">
            <text:p>1983,46</text:p>
          </table:table-cell>
          <table:table-cell table:style-name="ce12N2" office:value-type="float" office:value="1.99">
            <text:p>1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86">
            <text:p>17,8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13.69">
            <text:p>213,69</text:p>
          </table:table-cell>
          <table:table-cell table:style-name="ce12N2" office:value-type="float" office:value="2276.7">
            <text:p>2276,70</text:p>
          </table:table-cell>
          <table:table-cell table:style-name="ce12N2" office:value-type="float" office:value="91.07">
            <text:p>9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06911580003705500100029635119423400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8">
            <text:p>30970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12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267.03">
            <text:p>4026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">
            <text:p>76,00</text:p>
          </table:table-cell>
          <table:table-cell table:style-name="ce12N2" office:value-type="float" office:value="38959.41">
            <text:p>38959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10546">
            <text:p>0,411</text:p>
          </table:table-cell>
          <table:table-cell table:style-name="ce12N2" office:value-type="float" office:value="145.11">
            <text:p>145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267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891.03">
            <text:p>32891,03</text:p>
          </table:table-cell>
          <table:table-cell table:style-name="ce12N2" office:value-type="float" office:value="32.91">
            <text:p>3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6.05">
            <text:p>296,0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307.62">
            <text:p>1307,62</text:p>
          </table:table-cell>
          <table:table-cell table:style-name="ce12N2" office:value-type="float" office:value="38959.41">
            <text:p>38959,41</text:p>
          </table:table-cell>
          <table:table-cell table:style-name="ce12N2" office:value-type="float" office:value="2715.91">
            <text:p>2715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12116719130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13">
            <text:p>30971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2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.85">
            <text:p>86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9.56">
            <text:p>839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08">
            <text:p>0,000</text:p>
          </table:table-cell>
          <table:table-cell table:style-name="ce12N2" office:value-type="float" office:value="0.16">
            <text:p>0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8.57">
            <text:p>708,57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8">
            <text:p>6,3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7.29">
            <text:p>27,29</text:p>
          </table:table-cell>
          <table:table-cell table:style-name="ce12N2" office:value-type="float" office:value="839.56">
            <text:p>839,56</text:p>
          </table:table-cell>
          <table:table-cell table:style-name="ce12N2" office:value-type="float" office:value="58.77">
            <text:p>5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2618842300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3">
            <text:p>30976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4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9.67">
            <text:p>469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9.67">
            <text:p>469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353">
            <text:p>0,010</text:p>
          </table:table-cell>
          <table:table-cell table:style-name="ce12N2" office:value-type="float" office:value="0.65">
            <text:p>0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9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6.39">
            <text:p>396,39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57">
            <text:p>3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9.67">
            <text:p>469,67</text:p>
          </table:table-cell>
          <table:table-cell table:style-name="ce12N2" office:value-type="float" office:value="32.88">
            <text:p>3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47814480067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12">
            <text:p>3098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4.2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03.69">
            <text:p>1840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">
            <text:p>67,00</text:p>
          </table:table-cell>
          <table:table-cell table:style-name="ce12N2" office:value-type="float" office:value="18370.73">
            <text:p>18370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0165">
            <text:p>0,220</text:p>
          </table:table-cell>
          <table:table-cell table:style-name="ce12N2" office:value-type="float" office:value="55.98">
            <text:p>55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403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505.86">
            <text:p>15505,86</text:p>
          </table:table-cell>
          <table:table-cell table:style-name="ce12N2" office:value-type="float" office:value="15.54">
            <text:p>1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.56">
            <text:p>139,5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32.96">
            <text:p>32,96</text:p>
          </table:table-cell>
          <table:table-cell table:style-name="ce12N2" office:value-type="float" office:value="18370.73">
            <text:p>18370,73</text:p>
          </table:table-cell>
          <table:table-cell table:style-name="ce12N2" office:value-type="float" office:value="1284.37">
            <text:p>128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426212773114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0">
            <text:p>2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947.95">
            <text:p>2947,95</text:p>
          </table:table-cell>
          <table:table-cell table:style-name="ce26N2" office:value-type="float" office:value="121192.53">
            <text:p>121192,53</text:p>
          </table:table-cell>
          <table:table-cell table:style-name="ce26N2" office:value-type="float" office:value="7996.53">
            <text:p>7996,5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00">
            <text:p>200,00</text:p>
          </table:table-cell>
          <table:table-cell table:style-name="ce26N2" office:value-type="float" office:value="124287.98">
            <text:p>124287,9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425657">
            <text:p>1,426</text:p>
          </table:table-cell>
          <table:table-cell table:style-name="ce26N2" office:value-type="float" office:value="121255.03">
            <text:p>121255,03</text:p>
          </table:table-cell>
          <table:table-cell table:style-name="ce26N2" office:value-type="float" office:value="124287.98">
            <text:p>124287,9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3205">
            <text:p>103205,00</text:p>
          </table:table-cell>
          <table:table-cell table:style-name="ce26N2" office:value-type="float" office:value="103.25">
            <text:p>103,2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928.85">
            <text:p>928,85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482.38">
            <text:p>482,3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3.13">
            <text:p>33,1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82" meta:object-count="0"/>
    <meta:generator>LibreOffice/4.3.0.4$Windows_x86 LibreOffice_project/62ad5818884a2fc2e5780dd45466868d41009ec0</meta:generator>
  </office:meta>
</office:document-meta>
</file>