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1/06/2026 07:30:45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7">
            <text:p>307317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8.160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7.12">
            <text:p>172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73.69">
            <text:p>1573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2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53.43">
            <text:p>153,43</text:p>
          </table:table-cell>
          <table:table-cell table:style-name="ce12N2" office:value-type="float" office:value="1573.69">
            <text:p>1573,69</text:p>
          </table:table-cell>
          <table:table-cell table:style-name="ce12N2" office:value-type="float" office:value="110.16">
            <text:p>11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4546165000393550040000981601962020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53">
            <text:p>307753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7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77.49">
            <text:p>5277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808.64">
            <text:p>480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77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468.85">
            <text:p>468,85</text:p>
          </table:table-cell>
          <table:table-cell table:style-name="ce12N2" office:value-type="float" office:value="4808.64">
            <text:p>4808,64</text:p>
          </table:table-cell>
          <table:table-cell table:style-name="ce12N2" office:value-type="float" office:value="192.35">
            <text:p>192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77162630001025500100001076313972643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49">
            <text:p>307949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3.0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83.18">
            <text:p>288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592.9">
            <text:p>2592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8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1.15">
            <text:p>31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290.28">
            <text:p>290,28</text:p>
          </table:table-cell>
          <table:table-cell table:style-name="ce12N2" office:value-type="float" office:value="2592.9">
            <text:p>2592,90</text:p>
          </table:table-cell>
          <table:table-cell table:style-name="ce12N2" office:value-type="float" office:value="181.5">
            <text:p>18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3296080001445500100026308210026308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60">
            <text:p>30796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0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49.44">
            <text:p>4249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49.44">
            <text:p>424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09">
            <text:p>0,009</text:p>
          </table:table-cell>
          <table:table-cell table:style-name="ce12N2" office:value-type="float" office:value="5.26">
            <text:p>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49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49.44">
            <text:p>4249,44</text:p>
          </table:table-cell>
          <table:table-cell table:style-name="ce12N2" office:value-type="float" office:value="297.46">
            <text:p>297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09911342889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82">
            <text:p>307982</text:p>
          </table:table-cell>
          <table:table-cell table:style-name="ce0" table:number-columns-spanned="4" table:number-rows-spanned="1" office:value-type="string" calcext:value-type="string">
            <text:p>17.338 - ELGIN DISTRIBUIDORA LTDA</text:p>
          </table:table-cell>
          <table:covered-table-cell table:number-columns-repeated="3"/>
          <table:table-cell table:style-name="ce0" office:value-type="string" calcext:value-type="string">
            <text:p>385.6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8.02">
            <text:p>178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5.14">
            <text:p>165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8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2.88">
            <text:p>12,88</text:p>
          </table:table-cell>
          <table:table-cell table:style-name="ce12N2" office:value-type="float" office:value="165.14">
            <text:p>165,14</text:p>
          </table:table-cell>
          <table:table-cell table:style-name="ce12N2" office:value-type="float" office:value="6.61">
            <text:p>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7023429000143550010003856661060559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84">
            <text:p>3079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0.1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4.09">
            <text:p>335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4.09">
            <text:p>3354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1872">
            <text:p>0,092</text:p>
          </table:table-cell>
          <table:table-cell table:style-name="ce12N2" office:value-type="float" office:value="3.9">
            <text:p>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54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4.09">
            <text:p>3354,09</text:p>
          </table:table-cell>
          <table:table-cell table:style-name="ce12N2" office:value-type="float" office:value="134.16">
            <text:p>13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012217143173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1">
            <text:p>3080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714994569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2">
            <text:p>30803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93.0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09">
            <text:p>140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0.27">
            <text:p>1320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383">
            <text:p>0,022</text:p>
          </table:table-cell>
          <table:table-cell table:style-name="ce12N2" office:value-type="float" office:value="8.4">
            <text:p>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85.82">
            <text:p>85,82</text:p>
          </table:table-cell>
          <table:table-cell table:style-name="ce12N2" office:value-type="float" office:value="1320.27">
            <text:p>1320,27</text:p>
          </table:table-cell>
          <table:table-cell table:style-name="ce12N2" office:value-type="float" office:value="52.81">
            <text:p>5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9309819510635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59">
            <text:p>308059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4.1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9.88">
            <text:p>3149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92.6">
            <text:p>2792,6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2995">
            <text:p>0,030</text:p>
          </table:table-cell>
          <table:table-cell table:style-name="ce12N2" office:value-type="float" office:value="27.4">
            <text:p>2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49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.62">
            <text:p>41,6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72.28">
            <text:p>272,28</text:p>
          </table:table-cell>
          <table:table-cell table:style-name="ce12N2" office:value-type="float" office:value="2877.6">
            <text:p>2877,60</text:p>
          </table:table-cell>
          <table:table-cell table:style-name="ce12N2" office:value-type="float" office:value="115.11">
            <text:p>115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41321753896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72">
            <text:p>308072</text:p>
          </table:table-cell>
          <table:table-cell table:style-name="ce0" table:number-columns-spanned="4" table:number-rows-spanned="1" office:value-type="string" calcext:value-type="string">
            <text:p>2.927 - MOHAWK REVESTIMENTOS COCAL DO SUL LTDA</text:p>
          </table:table-cell>
          <table:covered-table-cell table:number-columns-repeated="3"/>
          <table:table-cell table:style-name="ce0" office:value-type="string" calcext:value-type="string">
            <text:p>1.901.3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0.64">
            <text:p>1600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0.3">
            <text:p>1590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499.18">
            <text:p>499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00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0">
            <text:p>7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10.34">
            <text:p>10,34</text:p>
          </table:table-cell>
          <table:table-cell table:style-name="ce12N2" office:value-type="float" office:value="1590.3">
            <text:p>1590,30</text:p>
          </table:table-cell>
          <table:table-cell table:style-name="ce12N2" office:value-type="float" office:value="111.32">
            <text:p>11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65325380032695500100190134010017755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3">
            <text:p>3080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6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532">
            <text:p>0,024</text:p>
          </table:table-cell>
          <table:table-cell table:style-name="ce12N2" office:value-type="float" office:value="5.34">
            <text:p>5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8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737.1">
            <text:p>6737,10</text:p>
          </table:table-cell>
          <table:table-cell table:style-name="ce12N2" office:value-type="float" office:value="6.74">
            <text:p>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.63">
            <text:p>60,6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82.58">
            <text:p>7982,58</text:p>
          </table:table-cell>
          <table:table-cell table:style-name="ce12N2" office:value-type="float" office:value="558.78">
            <text:p>558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6041015211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9">
            <text:p>308089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5.8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3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5">
            <text:p>0,045</text:p>
          </table:table-cell>
          <table:table-cell table:style-name="ce12N2" office:value-type="float" office:value="2.55">
            <text:p>2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6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.75">
            <text:p>131,75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9">
            <text:p>1,19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.11">
            <text:p>156,11</text:p>
          </table:table-cell>
          <table:table-cell table:style-name="ce12N2" office:value-type="float" office:value="10.93">
            <text:p>1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583119611538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50">
            <text:p>308150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0.8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44.93">
            <text:p>2744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2703.31">
            <text:p>2703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3712">
            <text:p>0,144</text:p>
          </table:table-cell>
          <table:table-cell table:style-name="ce12N2" office:value-type="float" office:value="12.87">
            <text:p>12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44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41.62">
            <text:p>41,62</text:p>
          </table:table-cell>
          <table:table-cell table:style-name="ce12N2" office:value-type="float" office:value="2703.31">
            <text:p>2703,31</text:p>
          </table:table-cell>
          <table:table-cell table:style-name="ce12N2" office:value-type="float" office:value="161.45">
            <text:p>16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082916345435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92">
            <text:p>30819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3.1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94.49">
            <text:p>7894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678.21">
            <text:p>7678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419">
            <text:p>0,010</text:p>
          </table:table-cell>
          <table:table-cell table:style-name="ce12N2" office:value-type="float" office:value="2.82">
            <text:p>2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94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80.21">
            <text:p>6480,21</text:p>
          </table:table-cell>
          <table:table-cell table:style-name="ce12N2" office:value-type="float" office:value="6.48">
            <text:p>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.32">
            <text:p>58,3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216.28">
            <text:p>216,28</text:p>
          </table:table-cell>
          <table:table-cell table:style-name="ce12N2" office:value-type="float" office:value="7678.21">
            <text:p>7678,21</text:p>
          </table:table-cell>
          <table:table-cell table:style-name="ce12N2" office:value-type="float" office:value="537.47">
            <text:p>53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313316604285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03">
            <text:p>30820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3.65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4.99">
            <text:p>375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754.99">
            <text:p>3754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367">
            <text:p>0,009</text:p>
          </table:table-cell>
          <table:table-cell table:style-name="ce12N2" office:value-type="float" office:value="2.08">
            <text:p>2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54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72.04">
            <text:p>3172,04</text:p>
          </table:table-cell>
          <table:table-cell table:style-name="ce12N2" office:value-type="float" office:value="3.17">
            <text:p>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55">
            <text:p>28,5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54.99">
            <text:p>3754,99</text:p>
          </table:table-cell>
          <table:table-cell table:style-name="ce12N2" office:value-type="float" office:value="259.62">
            <text:p>25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365819609185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33">
            <text:p>308233</text:p>
          </table:table-cell>
          <table:table-cell table:style-name="ce0" table:number-columns-spanned="4" table:number-rows-spanned="1" office:value-type="string" calcext:value-type="string">
            <text:p>4.463 - SAMER - COMERCIO DE MATERIAL HIDRAULICO LTDA - EPP</text:p>
          </table:table-cell>
          <table:covered-table-cell table:number-columns-repeated="3"/>
          <table:table-cell table:style-name="ce0" office:value-type="string" calcext:value-type="string">
            <text:p>5.2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5.85">
            <text:p>48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5.85">
            <text:p>485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">
            <text:p>0,002</text:p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5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5.85">
            <text:p>485,85</text:p>
          </table:table-cell>
          <table:table-cell table:style-name="ce12N2" office:value-type="float" office:value="34.01">
            <text:p>3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2.12">
            <text:p>22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78.043</text:p>
          </table:table-cell>
          <table:table-cell table:style-name="ce0" office:value-type="string" calcext:value-type="string">
            <text:p>29.371 - ACCERT TRANSPORTES E LOGISTICAS LTDA</text:p>
          </table:table-cell>
          <table:table-cell table:style-name="ce0" office:value-type="string" calcext:value-type="string">
            <text:p>26/05/2026</text:p>
          </table:table-cell>
          <table:table-cell table:style-name="ce12" office:value-type="string" calcext:value-type="string">
            <text:p>22,12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35260513576045000150550010000052971001875670</text:p>
          </table:table-cell>
          <table:table-cell table:style-name="ce0" office:value-type="string" calcext:value-type="string">
            <text:p>35260505222092000763570020004780431006783286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44">
            <text:p>308244</text:p>
          </table:table-cell>
          <table:table-cell table:style-name="ce0" table:number-columns-spanned="4" table:number-rows-spanned="1" office:value-type="string" calcext:value-type="string">
            <text:p>32.049 - M T A INDUSTRIA E COMERCIO DE ARTEFATOS DE INOX LTDA</text:p>
          </table:table-cell>
          <table:covered-table-cell table:number-columns-repeated="3"/>
          <table:table-cell table:style-name="ce0" office:value-type="string" calcext:value-type="string">
            <text:p>144.6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49.31">
            <text:p>724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6806.86">
            <text:p>6806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49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3.17">
            <text:p>73,1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442.45">
            <text:p>442,45</text:p>
          </table:table-cell>
          <table:table-cell table:style-name="ce12N2" office:value-type="float" office:value="6806.86">
            <text:p>6806,86</text:p>
          </table:table-cell>
          <table:table-cell table:style-name="ce12N2" office:value-type="float" office:value="412.98">
            <text:p>41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854788570001745500100014463210029382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98">
            <text:p>308298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83.8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29.4">
            <text:p>1472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29.4">
            <text:p>1472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424">
            <text:p>0,084</text:p>
          </table:table-cell>
          <table:table-cell table:style-name="ce12N2" office:value-type="float" office:value="125.7">
            <text:p>125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72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8388716860993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99">
            <text:p>30829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86.8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458.52">
            <text:p>17458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17458.52">
            <text:p>17458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9403">
            <text:p>0,509</text:p>
          </table:table-cell>
          <table:table-cell table:style-name="ce12N2" office:value-type="float" office:value="227.97">
            <text:p>227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458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8685118142680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1">
            <text:p>30830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86.8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78.06">
            <text:p>17278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7278.06">
            <text:p>17278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6768">
            <text:p>0,147</text:p>
          </table:table-cell>
          <table:table-cell table:style-name="ce12N2" office:value-type="float" office:value="161.33">
            <text:p>161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278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8685319431096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9">
            <text:p>308309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3.38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39.06">
            <text:p>333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181">
            <text:p>318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">
            <text:p>0,006</text:p>
          </table:table-cell>
          <table:table-cell table:style-name="ce12N2" office:value-type="float" office:value="138">
            <text:p>13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39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4.29">
            <text:p>44,2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58.06">
            <text:p>158,06</text:p>
          </table:table-cell>
          <table:table-cell table:style-name="ce12N2" office:value-type="float" office:value="3181">
            <text:p>3181,00</text:p>
          </table:table-cell>
          <table:table-cell table:style-name="ce12N2" office:value-type="float" office:value="127.24">
            <text:p>12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338118819197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0">
            <text:p>308310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0.2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86.01">
            <text:p>478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336.39">
            <text:p>4336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86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449.62">
            <text:p>449,62</text:p>
          </table:table-cell>
          <table:table-cell table:style-name="ce12N2" office:value-type="float" office:value="4336.39">
            <text:p>4336,39</text:p>
          </table:table-cell>
          <table:table-cell table:style-name="ce12N2" office:value-type="float" office:value="173.46">
            <text:p>17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05870170002855500100004024111377110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7">
            <text:p>308317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9.8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76.61">
            <text:p>727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">
            <text:p>47,00</text:p>
          </table:table-cell>
          <table:table-cell table:style-name="ce12N2" office:value-type="float" office:value="7185.25">
            <text:p>7185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1963">
            <text:p>0,232</text:p>
          </table:table-cell>
          <table:table-cell table:style-name="ce12N2" office:value-type="float" office:value="32.52">
            <text:p>32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76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98.26">
            <text:p>6098,26</text:p>
          </table:table-cell>
          <table:table-cell table:style-name="ce12N2" office:value-type="float" office:value="6.06">
            <text:p>6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86">
            <text:p>54,86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91.36">
            <text:p>91,36</text:p>
          </table:table-cell>
          <table:table-cell table:style-name="ce12N2" office:value-type="float" office:value="7185.25">
            <text:p>7185,25</text:p>
          </table:table-cell>
          <table:table-cell table:style-name="ce12N2" office:value-type="float" office:value="465.38">
            <text:p>46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16048030001575500100086985017255504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29">
            <text:p>308329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53.425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38.95">
            <text:p>7438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7241.76">
            <text:p>7241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9335">
            <text:p>0,219</text:p>
          </table:table-cell>
          <table:table-cell table:style-name="ce12N2" office:value-type="float" office:value="47.95">
            <text:p>47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38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85.74">
            <text:p>6285,74</text:p>
          </table:table-cell>
          <table:table-cell table:style-name="ce12N2" office:value-type="float" office:value="6.28">
            <text:p>6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.58">
            <text:p>56,58</text:p>
          </table:table-cell>
          <table:table-cell table:style-name="ce12N2" office:value-type="float" office:value="75.5">
            <text:p>75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197.19">
            <text:p>197,19</text:p>
          </table:table-cell>
          <table:table-cell table:style-name="ce12N2" office:value-type="float" office:value="7241.76">
            <text:p>7241,76</text:p>
          </table:table-cell>
          <table:table-cell table:style-name="ce12N2" office:value-type="float" office:value="315.39">
            <text:p>315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23084560001495500500045342515510220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1">
            <text:p>308331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2.4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0.51">
            <text:p>110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93.98">
            <text:p>1093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374">
            <text:p>0,194</text:p>
          </table:table-cell>
          <table:table-cell table:style-name="ce12N2" office:value-type="float" office:value="9.16">
            <text:p>9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00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8.49">
            <text:p>938,49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6.53">
            <text:p>6,53</text:p>
          </table:table-cell>
          <table:table-cell table:style-name="ce12N2" office:value-type="float" office:value="1093.98">
            <text:p>1093,98</text:p>
          </table:table-cell>
          <table:table-cell table:style-name="ce12N2" office:value-type="float" office:value="59.82">
            <text:p>59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242012877018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2">
            <text:p>308332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2.4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4.12">
            <text:p>138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362.12">
            <text:p>1362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412">
            <text:p>0,080</text:p>
          </table:table-cell>
          <table:table-cell table:style-name="ce12N2" office:value-type="float" office:value="6.05">
            <text:p>6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8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53.47">
            <text:p>1153,47</text:p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38">
            <text:p>10,38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1362.12">
            <text:p>1362,12</text:p>
          </table:table-cell>
          <table:table-cell table:style-name="ce12N2" office:value-type="float" office:value="91.06">
            <text:p>9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241918177188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33">
            <text:p>308333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62.6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8.74">
            <text:p>838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36.56">
            <text:p>836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6602">
            <text:p>0,077</text:p>
          </table:table-cell>
          <table:table-cell table:style-name="ce12N2" office:value-type="float" office:value="2.89">
            <text:p>2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8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6.04">
            <text:p>706,04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35">
            <text:p>6,35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2.18">
            <text:p>2,18</text:p>
          </table:table-cell>
          <table:table-cell table:style-name="ce12N2" office:value-type="float" office:value="836.56">
            <text:p>836,56</text:p>
          </table:table-cell>
          <table:table-cell table:style-name="ce12N2" office:value-type="float" office:value="58.56">
            <text:p>58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6269815156048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29">
            <text:p>29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85">
            <text:p>8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934.52">
            <text:p>2934,52</text:p>
          </table:table-cell>
          <table:table-cell table:style-name="ce26N2" office:value-type="float" office:value="77513.7">
            <text:p>77513,70</text:p>
          </table:table-cell>
          <table:table-cell table:style-name="ce26N2" office:value-type="float" office:value="4476.43">
            <text:p>4476,4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2.12">
            <text:p>22,12</text:p>
          </table:table-cell>
          <table:table-cell table:style-name="ce26N2" office:value-type="float" office:value="129934.2">
            <text:p>129934,2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.946386">
            <text:p>1,946</text:p>
          </table:table-cell>
          <table:table-cell table:style-name="ce26N2" office:value-type="float" office:value="126914.68">
            <text:p>126914,68</text:p>
          </table:table-cell>
          <table:table-cell table:style-name="ce26N2" office:value-type="float" office:value="129934.2">
            <text:p>129934,2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1703.1">
            <text:p>31703,10</text:p>
          </table:table-cell>
          <table:table-cell table:style-name="ce26N2" office:value-type="float" office:value="31.66">
            <text:p>31,6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85.31">
            <text:p>285,31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333.94">
            <text:p>1333,9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2.1">
            <text:p>32,1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76" meta:object-count="0"/>
    <meta:generator>LibreOffice/4.3.0.4$Windows_x86 LibreOffice_project/62ad5818884a2fc2e5780dd45466868d41009ec0</meta:generator>
  </office:meta>
</office:document-meta>
</file>