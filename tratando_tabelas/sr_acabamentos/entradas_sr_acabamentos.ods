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7/07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7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1/07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>352607113895650002005700500040227210008870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9">
            <text:p>309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12">
            <text:p>1635,12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135.62">
            <text:p>13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03141597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0">
            <text:p>310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3.94">
            <text:p>49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29">
            <text:p>0,031</text:p>
          </table:table-cell>
          <table:table-cell table:style-name="ce12N2" office:value-type="float" office:value="6.13">
            <text:p>6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99">
            <text:p>4089,99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1">
            <text:p>3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7.84">
            <text:p>87,84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339.22">
            <text:p>33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71314958552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4">
            <text:p>3100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699.78">
            <text:p>3469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804">
            <text:p>0,199</text:p>
          </table:table-cell>
          <table:table-cell table:style-name="ce12N2" office:value-type="float" office:value="31.62">
            <text:p>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69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11.42">
            <text:p>28911,42</text:p>
          </table:table-cell>
          <table:table-cell table:style-name="ce12N2" office:value-type="float" office:value="28.9">
            <text:p>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22">
            <text:p>260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69.29">
            <text:p>469,29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2372.09">
            <text:p>23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611544103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0">
            <text:p>3100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8">
            <text:p>0,001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87">
            <text:p>273,87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22.72">
            <text:p>2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11146552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5">
            <text:p>3100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2.7">
            <text:p>17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04">
            <text:p>0,00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16">
            <text:p>1365,16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5.14">
            <text:p>105,14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113.23">
            <text:p>11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731738547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7">
            <text:p>3100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5.99">
            <text:p>15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247">
            <text:p>0,024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4.36">
            <text:p>1304,36</text:p>
          </table:table-cell>
          <table:table-cell table:style-name="ce12N2" office:value-type="float" office:value="1.31">
            <text:p>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108.17">
            <text:p>1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89171437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8">
            <text:p>31006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6">
            <text:p>0,002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45">
            <text:p>1033,45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47.45">
            <text:p>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691623336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9">
            <text:p>31006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74">
            <text:p>0,003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5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47.03">
            <text:p>4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21198929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5">
            <text:p>310175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.66">
            <text:p>5916,66</text:p>
          </table:table-cell>
          <table:table-cell table:style-name="ce12N2" office:value-type="float" office:value="1347.76">
            <text:p>1347,7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38.8">
            <text:p>67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8.63">
            <text:p>4978,63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525.62">
            <text:p>525,62</text:p>
          </table:table-cell>
          <table:table-cell table:style-name="ce12N2" office:value-type="float" office:value="5391.04">
            <text:p>5391,04</text:p>
          </table:table-cell>
          <table:table-cell table:style-name="ce12N2" office:value-type="float" office:value="215.64">
            <text:p>21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73.46">
            <text:p>9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.094.265</text:p>
          </table:table-cell>
          <table:table-cell table:style-name="ce0" office:value-type="string" calcext:value-type="string">
            <text:p>11.562 - RODONAVES TRANSP E ENCOMENDAS LTDA</text:p>
          </table:table-cell>
          <table:table-cell table:style-name="ce0" office:value-type="string" calcext:value-type="string">
            <text:p>02/07/2026</text:p>
          </table:table-cell>
          <table:table-cell table:style-name="ce12" office:value-type="string" calcext:value-type="string">
            <text:p>973,4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41260617781412000109550010000120921000337215</text:p>
          </table:table-cell>
          <table:table-cell table:style-name="ce0" office:value-type="string" calcext:value-type="string">
            <text:p>4126074491499200382057003004094265104094265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1">
            <text:p>31031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6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.11">
            <text:p>160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">
            <text:p>0,100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58">
            <text:p>1233,5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1">
            <text:p>11,1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5">
            <text:p>142,5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102.31">
            <text:p>1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5260610713221000160550020000106861000146380</text:p>
          </table:table-cell>
          <table:table-cell table:style-name="ce0" office:value-type="string" calcext:value-type="string">
            <text:p>3526061138956500020057005000402240100088669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9">
            <text:p>3103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2">
            <text:p>0,02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.96">
            <text:p>474,96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39.39">
            <text:p>3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4201022787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44">
            <text:p>31044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3.65">
            <text:p>3933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3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06.54">
            <text:p>3206,54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86">
            <text:p>28,86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61.5">
            <text:p>461,50</text:p>
          </table:table-cell>
          <table:table-cell table:style-name="ce12N2" office:value-type="float" office:value="3472.15">
            <text:p>3472,15</text:p>
          </table:table-cell>
          <table:table-cell table:style-name="ce12N2" office:value-type="float" office:value="138.88">
            <text:p>13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3111361121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2">
            <text:p>3104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8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0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0.84">
            <text:p>410,84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83016580191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53">
            <text:p>3104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9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55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98.18">
            <text:p>4098,18</text:p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8">
            <text:p>36,8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5.82">
            <text:p>4855,82</text:p>
          </table:table-cell>
          <table:table-cell table:style-name="ce12N2" office:value-type="float" office:value="339.91">
            <text:p>33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90011006198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5">
            <text:p>310475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47.67">
            <text:p>464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7.6">
            <text:p>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4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88.25">
            <text:p>3888,25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437.33">
            <text:p>437,33</text:p>
          </table:table-cell>
          <table:table-cell table:style-name="ce12N2" office:value-type="float" office:value="4210.34">
            <text:p>4210,34</text:p>
          </table:table-cell>
          <table:table-cell table:style-name="ce12N2" office:value-type="float" office:value="168.42">
            <text:p>16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0587017000285550010000412411202722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79">
            <text:p>310479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4.71">
            <text:p>165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4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57">
            <text:p>13,57</text:p>
          </table:table-cell>
          <table:table-cell table:style-name="ce12N2" office:value-type="float" office:value="43.67">
            <text:p>43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47">
            <text:p>147,00</text:p>
          </table:table-cell>
          <table:table-cell table:style-name="ce12N2" office:value-type="float" office:value="1507.71">
            <text:p>1507,71</text:p>
          </table:table-cell>
          <table:table-cell table:style-name="ce12N2" office:value-type="float" office:value="105.54">
            <text:p>10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719432541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0">
            <text:p>31048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10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.45">
            <text:p>8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7.95">
            <text:p>7,95</text:p>
          </table:table-cell>
          <table:table-cell table:style-name="ce12N2" office:value-type="float" office:value="81.5">
            <text:p>81,50</text:p>
          </table:table-cell>
          <table:table-cell table:style-name="ce12N2" office:value-type="float" office:value="5.7">
            <text:p>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302281320001365500100001034810135369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1">
            <text:p>310481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57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4.27">
            <text:p>10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384">
            <text:p>1,384</text:p>
          </table:table-cell>
          <table:table-cell table:style-name="ce12N2" office:value-type="float" office:value="1141.08">
            <text:p>11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4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73.73">
            <text:p>8473,73</text:p>
          </table:table-cell>
          <table:table-cell table:style-name="ce12N2" office:value-type="float" office:value="8.47">
            <text:p>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.26">
            <text:p>76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84.01">
            <text:p>84,01</text:p>
          </table:table-cell>
          <table:table-cell table:style-name="ce12N2" office:value-type="float" office:value="10040.26">
            <text:p>10040,26</text:p>
          </table:table-cell>
          <table:table-cell table:style-name="ce12N2" office:value-type="float" office:value="702.82">
            <text:p>70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6818670001305500100095779615205249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51">
            <text:p>51,00</text:p>
          </table:table-cell>
          <table:table-cell table:style-name="ce26N2" office:value-type="float" office:value="1347.76">
            <text:p>1347,76</text:p>
          </table:table-cell>
          <table:table-cell table:style-name="ce26N2" office:value-type="float" office:value="9006.36">
            <text:p>9006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95.19">
            <text:p>4395,19</text:p>
          </table:table-cell>
          <table:table-cell table:style-name="ce26N2" office:value-type="float" office:value="282921.21">
            <text:p>282921,21</text:p>
          </table:table-cell>
          <table:table-cell table:style-name="ce26N2" office:value-type="float" office:value="17833.21">
            <text:p>17833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52.9">
            <text:p>1152,90</text:p>
          </table:table-cell>
          <table:table-cell table:style-name="ce26N2" office:value-type="float" office:value="287336.4">
            <text:p>287336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6.102452">
            <text:p>266,102</text:p>
          </table:table-cell>
          <table:table-cell table:style-name="ce26N2" office:value-type="float" office:value="275282.61">
            <text:p>275282,61</text:p>
          </table:table-cell>
          <table:table-cell table:style-name="ce26N2" office:value-type="float" office:value="287336.4">
            <text:p>287336,4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7652.71">
            <text:p>237652,71</text:p>
          </table:table-cell>
          <table:table-cell table:style-name="ce26N2" office:value-type="float" office:value="237.65">
            <text:p>237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138.95">
            <text:p>2138,9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050.36">
            <text:p>10050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.3">
            <text:p>56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28" meta:object-count="0"/>
    <meta:generator>LibreOffice/4.3.0.4$Windows_x86 LibreOffice_project/62ad5818884a2fc2e5780dd45466868d41009ec0</meta:generator>
  </office:meta>
</office:document-meta>
</file>