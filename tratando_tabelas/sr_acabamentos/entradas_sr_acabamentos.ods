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6/05/2026 08:38:37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6">
            <text:p>3059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8111518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7">
            <text:p>3059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71809818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8">
            <text:p>3059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8171640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7">
            <text:p>305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2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7">
            <text:p>0,00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77.16">
            <text:p>7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2101918141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5">
            <text:p>3060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928">
            <text:p>0,009</text:p>
          </table:table-cell>
          <table:table-cell table:style-name="ce12N2" office:value-type="float" office:value="10.08">
            <text:p>1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971637984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8">
            <text:p>3060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6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9">
            <text:p>0,056</text:p>
          </table:table-cell>
          <table:table-cell table:style-name="ce12N2" office:value-type="float" office:value="14.66">
            <text:p>1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36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1495.86">
            <text:p>14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65441239051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4">
            <text:p>3061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2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6">
            <text:p>0,019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466.87">
            <text:p>4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2341190506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5">
            <text:p>306235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49.69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1.05">
            <text:p>66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7857">
            <text:p>0,238</text:p>
          </table:table-cell>
          <table:table-cell table:style-name="ce12N2" office:value-type="float" office:value="48.54">
            <text:p>4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9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19.59">
            <text:p>119,59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296.24">
            <text:p>29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3084560001495500500044969614323513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0">
            <text:p>30628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4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0.46">
            <text:p>145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678">
            <text:p>0,091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0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5.16">
            <text:p>45,16</text:p>
          </table:table-cell>
          <table:table-cell table:style-name="ce12N2" office:value-type="float" office:value="1405.3">
            <text:p>1405,30</text:p>
          </table:table-cell>
          <table:table-cell table:style-name="ce12N2" office:value-type="float" office:value="75.76">
            <text:p>7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4291458007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2">
            <text:p>306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.34">
            <text:p>191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156">
            <text:p>0,205</text:p>
          </table:table-cell>
          <table:table-cell table:style-name="ce12N2" office:value-type="float" office:value="3.22">
            <text:p>3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1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1.68">
            <text:p>11,68</text:p>
          </table:table-cell>
          <table:table-cell table:style-name="ce12N2" office:value-type="float" office:value="179.66">
            <text:p>179,66</text:p>
          </table:table-cell>
          <table:table-cell table:style-name="ce12N2" office:value-type="float" office:value="7.19">
            <text:p>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314184854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3">
            <text:p>306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">
            <text:p>0,001</text:p>
          </table:table-cell>
          <table:table-cell table:style-name="ce12N2" office:value-type="float" office:value="1.29">
            <text:p>1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42">
            <text:p>454,42</text:p>
          </table:table-cell>
          <table:table-cell table:style-name="ce12N2" office:value-type="float" office:value="31.81">
            <text:p>3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617014933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4">
            <text:p>306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.13">
            <text:p>33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20.45">
            <text:p>20,45</text:p>
          </table:table-cell>
          <table:table-cell table:style-name="ce12N2" office:value-type="float" office:value="314.68">
            <text:p>314,68</text:p>
          </table:table-cell>
          <table:table-cell table:style-name="ce12N2" office:value-type="float" office:value="22.03">
            <text:p>22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712018390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5">
            <text:p>306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28">
            <text:p>0,011</text:p>
          </table:table-cell>
          <table:table-cell table:style-name="ce12N2" office:value-type="float" office:value="1.04">
            <text:p>1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6">
            <text:p>716,00</text:p>
          </table:table-cell>
          <table:table-cell table:style-name="ce12N2" office:value-type="float" office:value="50.12">
            <text:p>5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81968152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6">
            <text:p>306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16">
            <text:p>0,002</text:p>
          </table:table-cell>
          <table:table-cell table:style-name="ce12N2" office:value-type="float" office:value="2.66">
            <text:p>2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8">
            <text:p>1187,80</text:p>
          </table:table-cell>
          <table:table-cell table:style-name="ce12N2" office:value-type="float" office:value="83.15">
            <text:p>8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91603431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7">
            <text:p>306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04">
            <text:p>0,001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02">
            <text:p>119,02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361224203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8">
            <text:p>306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4.23">
            <text:p>67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978">
            <text:p>0,016</text:p>
          </table:table-cell>
          <table:table-cell table:style-name="ce12N2" office:value-type="float" office:value="3.52">
            <text:p>3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633.08">
            <text:p>633,08</text:p>
          </table:table-cell>
          <table:table-cell table:style-name="ce12N2" office:value-type="float" office:value="25.32">
            <text:p>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81741057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89">
            <text:p>30628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6.07">
            <text:p>79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38">
            <text:p>0,015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6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8.59">
            <text:p>48,59</text:p>
          </table:table-cell>
          <table:table-cell table:style-name="ce12N2" office:value-type="float" office:value="747.48">
            <text:p>747,48</text:p>
          </table:table-cell>
          <table:table-cell table:style-name="ce12N2" office:value-type="float" office:value="52.32">
            <text:p>5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4919026442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0">
            <text:p>3062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16">
            <text:p>0,036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9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9.26">
            <text:p>2089,26</text:p>
          </table:table-cell>
          <table:table-cell table:style-name="ce12N2" office:value-type="float" office:value="102.14">
            <text:p>10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01861692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1">
            <text:p>3062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4884">
            <text:p>0,095</text:p>
          </table:table-cell>
          <table:table-cell table:style-name="ce12N2" office:value-type="float" office:value="23.66">
            <text:p>23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4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41.66">
            <text:p>8241,66</text:p>
          </table:table-cell>
          <table:table-cell table:style-name="ce12N2" office:value-type="float" office:value="573.68">
            <text:p>57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117949175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2">
            <text:p>3062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132">
            <text:p>0,057</text:p>
          </table:table-cell>
          <table:table-cell table:style-name="ce12N2" office:value-type="float" office:value="9.71">
            <text:p>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1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1.24">
            <text:p>3481,24</text:p>
          </table:table-cell>
          <table:table-cell table:style-name="ce12N2" office:value-type="float" office:value="243.69">
            <text:p>24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217457306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4">
            <text:p>306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01.06">
            <text:p>86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2508">
            <text:p>0,193</text:p>
          </table:table-cell>
          <table:table-cell table:style-name="ce12N2" office:value-type="float" office:value="27.22">
            <text:p>27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99.82">
            <text:p>99,82</text:p>
          </table:table-cell>
          <table:table-cell table:style-name="ce12N2" office:value-type="float" office:value="8501.24">
            <text:p>8501,24</text:p>
          </table:table-cell>
          <table:table-cell table:style-name="ce12N2" office:value-type="float" office:value="595.09">
            <text:p>595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41489041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5">
            <text:p>3062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148.98">
            <text:p>114148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8">
            <text:p>128,00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477">
            <text:p>4,995</text:p>
          </table:table-cell>
          <table:table-cell table:style-name="ce12N2" office:value-type="float" office:value="313.53">
            <text:p>31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4.148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000.74">
            <text:p>1000,74</text:p>
          </table:table-cell>
          <table:table-cell table:style-name="ce12N2" office:value-type="float" office:value="113148.24">
            <text:p>113148,24</text:p>
          </table:table-cell>
          <table:table-cell table:style-name="ce12N2" office:value-type="float" office:value="7362.41">
            <text:p>736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551991630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6">
            <text:p>306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3.1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">
            <text:p>0,002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7.7">
            <text:p>1817,7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316719994151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7">
            <text:p>306297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89.81">
            <text:p>321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2.805694">
            <text:p>12,806</text:p>
          </table:table-cell>
          <table:table-cell table:style-name="ce12N2" office:value-type="float" office:value="1682.52">
            <text:p>168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18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19.03">
            <text:p>19,03</text:p>
          </table:table-cell>
          <table:table-cell table:style-name="ce12N2" office:value-type="float" office:value="32170.78">
            <text:p>32170,78</text:p>
          </table:table-cell>
          <table:table-cell table:style-name="ce12N2" office:value-type="float" office:value="2239.23">
            <text:p>223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518511014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98">
            <text:p>30629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01284">
            <text:p>2,013</text:p>
          </table:table-cell>
          <table:table-cell table:style-name="ce12N2" office:value-type="float" office:value="74.93">
            <text:p>74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75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5.58">
            <text:p>1875,58</text:p>
          </table:table-cell>
          <table:table-cell table:style-name="ce12N2" office:value-type="float" office:value="131.29">
            <text:p>13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619750772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3">
            <text:p>30632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42">
            <text:p>0,00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.1">
            <text:p>362,10</text:p>
          </table:table-cell>
          <table:table-cell table:style-name="ce12N2" office:value-type="float" office:value="25.35">
            <text:p>2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71675258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24">
            <text:p>30632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7.5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32">
            <text:p>0,184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1.68">
            <text:p>661,68</text:p>
          </table:table-cell>
          <table:table-cell table:style-name="ce12N2" office:value-type="float" office:value="46.32">
            <text:p>4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755815785631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1">
            <text:p>30633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2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2491883070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2">
            <text:p>3063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32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5">
            <text:p>0,001</text:p>
          </table:table-cell>
          <table:table-cell table:style-name="ce12N2" office:value-type="float" office:value="1.86">
            <text:p>1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1.62">
            <text:p>801,62</text:p>
          </table:table-cell>
          <table:table-cell table:style-name="ce12N2" office:value-type="float" office:value="32.06">
            <text:p>3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3261570554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4">
            <text:p>3063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8.9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1249">
            <text:p>0,512</text:p>
          </table:table-cell>
          <table:table-cell table:style-name="ce12N2" office:value-type="float" office:value="176.94">
            <text:p>17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77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77.88">
            <text:p>5177,88</text:p>
          </table:table-cell>
          <table:table-cell table:style-name="ce12N2" office:value-type="float" office:value="207.12">
            <text:p>20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89241197642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36">
            <text:p>3063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9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477648">
            <text:p>2,478</text:p>
          </table:table-cell>
          <table:table-cell table:style-name="ce12N2" office:value-type="float" office:value="829.6">
            <text:p>82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9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97.33">
            <text:p>10197,33</text:p>
          </table:table-cell>
          <table:table-cell table:style-name="ce12N2" office:value-type="float" office:value="407.9">
            <text:p>40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9156119100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381">
            <text:p>306381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16.64">
            <text:p>5216,64</text:p>
          </table:table-cell>
          <table:table-cell table:style-name="ce12N2" office:value-type="float" office:value="838.8">
            <text:p>838,80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92">
            <text:p>559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1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4/2026</text:p>
          </table:table-cell>
          <table:table-cell table:style-name="ce12N2" office:value-type="float" office:value="463.44">
            <text:p>463,44</text:p>
          </table:table-cell>
          <table:table-cell table:style-name="ce12N2" office:value-type="float" office:value="4753.2">
            <text:p>4753,20</text:p>
          </table:table-cell>
          <table:table-cell table:style-name="ce12N2" office:value-type="float" office:value="190.13">
            <text:p>19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21000336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2">
            <text:p>30645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7.0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5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5.19">
            <text:p>555,19</text:p>
          </table:table-cell>
          <table:table-cell table:style-name="ce12N2" office:value-type="float" office:value="38.86">
            <text:p>38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709011025025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53">
            <text:p>30645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8.0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64">
            <text:p>0,081</text:p>
          </table:table-cell>
          <table:table-cell table:style-name="ce12N2" office:value-type="float" office:value="25.28">
            <text:p>2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4.56">
            <text:p>574,56</text:p>
          </table:table-cell>
          <table:table-cell table:style-name="ce12N2" office:value-type="float" office:value="40.22">
            <text:p>4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801313683515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2">
            <text:p>306482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91">
            <text:p>2,592</text:p>
          </table:table-cell>
          <table:table-cell table:style-name="ce12N2" office:value-type="float" office:value="1194.89">
            <text:p>1194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59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59.1">
            <text:p>15959,10</text:p>
          </table:table-cell>
          <table:table-cell table:style-name="ce12N2" office:value-type="float" office:value="766.71">
            <text:p>766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41890695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3">
            <text:p>30648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024">
            <text:p>0,170</text:p>
          </table:table-cell>
          <table:table-cell table:style-name="ce12N2" office:value-type="float" office:value="48.56">
            <text:p>4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52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2.98">
            <text:p>1352,98</text:p>
          </table:table-cell>
          <table:table-cell table:style-name="ce12N2" office:value-type="float" office:value="54.12">
            <text:p>5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51713167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4">
            <text:p>30648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4.1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5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56.6">
            <text:p>5456,60</text:p>
          </table:table-cell>
          <table:table-cell table:style-name="ce12N2" office:value-type="float" office:value="218.26">
            <text:p>21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4106188292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89">
            <text:p>306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8.2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4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.48">
            <text:p>424,48</text:p>
          </table:table-cell>
          <table:table-cell table:style-name="ce12N2" office:value-type="float" office:value="29.71">
            <text:p>29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82541648435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495">
            <text:p>3064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1.11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6.35">
            <text:p>391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372">
            <text:p>0,032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1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54.03">
            <text:p>154,03</text:p>
          </table:table-cell>
          <table:table-cell table:style-name="ce12N2" office:value-type="float" office:value="3762.32">
            <text:p>3762,32</text:p>
          </table:table-cell>
          <table:table-cell table:style-name="ce12N2" office:value-type="float" office:value="263.36">
            <text:p>26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3111516428682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59">
            <text:p>30655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83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1.49">
            <text:p>148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49.88">
            <text:p>1249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00">
            <text:p>100,00</text:p>
          </table:table-cell>
          <table:table-cell table:style-name="ce12" office:value-type="string" calcext:value-type="string">
            <text:p>1.481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31.61">
            <text:p>131,61</text:p>
          </table:table-cell>
          <table:table-cell table:style-name="ce12N2" office:value-type="float" office:value="1349.88">
            <text:p>1349,88</text:p>
          </table:table-cell>
          <table:table-cell table:style-name="ce12N2" office:value-type="float" office:value="84.33">
            <text:p>8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83211206100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75">
            <text:p>3065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1.19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68.88">
            <text:p>396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">
            <text:p>0,027</text:p>
          </table:table-cell>
          <table:table-cell table:style-name="ce12N2" office:value-type="float" office:value="21.28">
            <text:p>2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6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67">
            <text:p>5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188.28">
            <text:p>188,28</text:p>
          </table:table-cell>
          <table:table-cell table:style-name="ce12N2" office:value-type="float" office:value="3780.6">
            <text:p>3780,60</text:p>
          </table:table-cell>
          <table:table-cell table:style-name="ce12N2" office:value-type="float" office:value="151.22">
            <text:p>151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119615510529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580">
            <text:p>30658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3.71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73.85">
            <text:p>1247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09833">
            <text:p>3,010</text:p>
          </table:table-cell>
          <table:table-cell table:style-name="ce12N2" office:value-type="float" office:value="251.5">
            <text:p>25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7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5/2026</text:p>
          </table:table-cell>
          <table:table-cell table:style-name="ce12N2" office:value-type="float" office:value="290.78">
            <text:p>290,78</text:p>
          </table:table-cell>
          <table:table-cell table:style-name="ce12N2" office:value-type="float" office:value="12183.07">
            <text:p>12183,07</text:p>
          </table:table-cell>
          <table:table-cell table:style-name="ce12N2" office:value-type="float" office:value="704.43">
            <text:p>70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37191121562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05">
            <text:p>306605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81.0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57.42">
            <text:p>965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945.04">
            <text:p>894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5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3">
            <text:p>7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712.38">
            <text:p>712,38</text:p>
          </table:table-cell>
          <table:table-cell table:style-name="ce12N2" office:value-type="float" office:value="8945.04">
            <text:p>8945,04</text:p>
          </table:table-cell>
          <table:table-cell table:style-name="ce12N2" office:value-type="float" office:value="357.79">
            <text:p>357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70234290001435500100038107313437400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79">
            <text:p>3066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713961065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0">
            <text:p>3066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.46">
            <text:p>35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4">
            <text:p>0,000</text:p>
          </table:table-cell>
          <table:table-cell table:style-name="ce12N2" office:value-type="float" office:value="0.66">
            <text:p>0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334.7">
            <text:p>334,70</text:p>
          </table:table-cell>
          <table:table-cell table:style-name="ce12N2" office:value-type="float" office:value="23.43">
            <text:p>2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813667964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1">
            <text:p>3066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8">
            <text:p>0,010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75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5.84">
            <text:p>775,84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491770168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2">
            <text:p>3066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6.02">
            <text:p>73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44.92">
            <text:p>44,92</text:p>
          </table:table-cell>
          <table:table-cell table:style-name="ce12N2" office:value-type="float" office:value="691.1">
            <text:p>691,10</text:p>
          </table:table-cell>
          <table:table-cell table:style-name="ce12N2" office:value-type="float" office:value="48.38">
            <text:p>4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011184308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3">
            <text:p>3066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104">
            <text:p>0,01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1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1.68">
            <text:p>1401,68</text:p>
          </table:table-cell>
          <table:table-cell table:style-name="ce12N2" office:value-type="float" office:value="56.07">
            <text:p>56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11515410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4">
            <text:p>3066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216172472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5">
            <text:p>3066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5.65">
            <text:p>1005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5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1.37">
            <text:p>61,37</text:p>
          </table:table-cell>
          <table:table-cell table:style-name="ce12N2" office:value-type="float" office:value="944.28">
            <text:p>944,28</text:p>
          </table:table-cell>
          <table:table-cell table:style-name="ce12N2" office:value-type="float" office:value="66.1">
            <text:p>6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31356462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6">
            <text:p>3066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.59">
            <text:p>16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36">
            <text:p>0,0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8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.29">
            <text:p>10,29</text:p>
          </table:table-cell>
          <table:table-cell table:style-name="ce12N2" office:value-type="float" office:value="158.3">
            <text:p>158,30</text:p>
          </table:table-cell>
          <table:table-cell table:style-name="ce12N2" office:value-type="float" office:value="6.33">
            <text:p>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412810240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7">
            <text:p>3066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96">
            <text:p>0,013</text:p>
          </table:table-cell>
          <table:table-cell table:style-name="ce12N2" office:value-type="float" office:value="4.82">
            <text:p>4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8.88">
            <text:p>488,88</text:p>
          </table:table-cell>
          <table:table-cell table:style-name="ce12N2" office:value-type="float" office:value="19.56">
            <text:p>19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512016082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8">
            <text:p>3066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92">
            <text:p>3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2.96">
            <text:p>1312,96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614375485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89">
            <text:p>306689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3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895.71">
            <text:p>2489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89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5">
            <text:p>10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639.71">
            <text:p>2639,71</text:p>
          </table:table-cell>
          <table:table-cell table:style-name="ce12N2" office:value-type="float" office:value="22256">
            <text:p>22256,00</text:p>
          </table:table-cell>
          <table:table-cell table:style-name="ce12N2" office:value-type="float" office:value="890.23">
            <text:p>89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33214335151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0">
            <text:p>3066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4">
            <text:p>0,000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28">
            <text:p>181,2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71452555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1">
            <text:p>3066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6.3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7635814514302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698">
            <text:p>3066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3.1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904">
            <text:p>0,030</text:p>
          </table:table-cell>
          <table:table-cell table:style-name="ce12N2" office:value-type="float" office:value="6.84">
            <text:p>6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7.6">
            <text:p>4467,60</text:p>
          </table:table-cell>
          <table:table-cell table:style-name="ce12N2" office:value-type="float" office:value="312.73">
            <text:p>31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319710644366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0">
            <text:p>306700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8.0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6514">
            <text:p>0,277</text:p>
          </table:table-cell>
          <table:table-cell table:style-name="ce12N2" office:value-type="float" office:value="21.7">
            <text:p>21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7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71.63">
            <text:p>5471,63</text:p>
          </table:table-cell>
          <table:table-cell table:style-name="ce12N2" office:value-type="float" office:value="656.6">
            <text:p>65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0142240000120550010007080221947081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03">
            <text:p>30670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0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3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71.86">
            <text:p>2267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1745.65">
            <text:p>21745,65</text:p>
          </table:table-cell>
          <table:table-cell table:style-name="ce12N2" office:value-type="float" office:value="550">
            <text:p>550,00</text:p>
          </table:table-cell>
          <table:table-cell table:style-name="ce12N3" office:value-type="float" office:value="0.0177">
            <text:p>0,018</text:p>
          </table:table-cell>
          <table:table-cell table:style-name="ce12N2" office:value-type="float" office:value="24.4">
            <text:p>2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671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376.21">
            <text:p>376,21</text:p>
          </table:table-cell>
          <table:table-cell table:style-name="ce12N2" office:value-type="float" office:value="22295.65">
            <text:p>22295,65</text:p>
          </table:table-cell>
          <table:table-cell table:style-name="ce12N2" office:value-type="float" office:value="1560.7">
            <text:p>1560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570742000329550010000100791085820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2">
            <text:p>30671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4">
            <text:p>0,054</text:p>
          </table:table-cell>
          <table:table-cell table:style-name="ce12N2" office:value-type="float" office:value="18.6">
            <text:p>18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.41">
            <text:p>278,41</text:p>
          </table:table-cell>
          <table:table-cell table:style-name="ce12N2" office:value-type="float" office:value="19.49">
            <text:p>1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913934866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4">
            <text:p>30671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36">
            <text:p>0,081</text:p>
          </table:table-cell>
          <table:table-cell table:style-name="ce12N2" office:value-type="float" office:value="26.3">
            <text:p>26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7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.53">
            <text:p>567,53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81842296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5">
            <text:p>30671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2.0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656">
            <text:p>0,035</text:p>
          </table:table-cell>
          <table:table-cell table:style-name="ce12N2" office:value-type="float" office:value="16.14">
            <text:p>16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14.81">
            <text:p>814,81</text:p>
          </table:table-cell>
          <table:table-cell table:style-name="ce12N2" office:value-type="float" office:value="57.04">
            <text:p>57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20871369635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17">
            <text:p>30671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84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5984">
            <text:p>0,096</text:p>
          </table:table-cell>
          <table:table-cell table:style-name="ce12N2" office:value-type="float" office:value="41.84">
            <text:p>41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0.58">
            <text:p>1070,58</text:p>
          </table:table-cell>
          <table:table-cell table:style-name="ce12N2" office:value-type="float" office:value="74.94">
            <text:p>7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8461061418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4">
            <text:p>306734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69.90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3.17">
            <text:p>177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3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9">
            <text:p>4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108.23">
            <text:p>108,23</text:p>
          </table:table-cell>
          <table:table-cell table:style-name="ce12N2" office:value-type="float" office:value="1664.94">
            <text:p>1664,94</text:p>
          </table:table-cell>
          <table:table-cell table:style-name="ce12N2" office:value-type="float" office:value="116.54">
            <text:p>11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1522460000128550050007699031909928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735">
            <text:p>306735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2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4/05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6.87">
            <text:p>26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52.5">
            <text:p>2352,5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5513">
            <text:p>0,055</text:p>
          </table:table-cell>
          <table:table-cell table:style-name="ce12N2" office:value-type="float" office:value="6.5">
            <text:p>6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6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.55">
            <text:p>41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229.37">
            <text:p>229,37</text:p>
          </table:table-cell>
          <table:table-cell table:style-name="ce12N2" office:value-type="float" office:value="2437.5">
            <text:p>2437,50</text:p>
          </table:table-cell>
          <table:table-cell table:style-name="ce12N2" office:value-type="float" office:value="97.5">
            <text:p>9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239512942187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97">
            <text:p>97,00</text:p>
          </table:table-cell>
          <table:table-cell table:style-name="ce26N2" office:value-type="float" office:value="838.8">
            <text:p>838,80</text:p>
          </table:table-cell>
          <table:table-cell table:style-name="ce26N2" office:value-type="float" office:value="635">
            <text:p>635,00</text:p>
          </table:table-cell>
          <table:table-cell table:style-name="ce26N2" office:value-type="float" office:value="100">
            <text:p>100,00</text:p>
          </table:table-cell>
          <table:table-cell table:style-name="ce26N2" office:value-type="float" office:value="7415.49">
            <text:p>7415,49</text:p>
          </table:table-cell>
          <table:table-cell table:style-name="ce26N2" office:value-type="float" office:value="400705.34">
            <text:p>400705,34</text:p>
          </table:table-cell>
          <table:table-cell table:style-name="ce26N2" office:value-type="float" office:value="24415.52">
            <text:p>24415,5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8120.83">
            <text:p>408120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3.024979">
            <text:p>33,025</text:p>
          </table:table-cell>
          <table:table-cell table:style-name="ce26N2" office:value-type="float" office:value="400809.14">
            <text:p>400809,14</text:p>
          </table:table-cell>
          <table:table-cell table:style-name="ce26N2" office:value-type="float" office:value="408120.83">
            <text:p>408120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719.07">
            <text:p>5719,0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24">
            <text:p>40,2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64" meta:object-count="0"/>
    <meta:generator>LibreOffice/4.3.0.4$Windows_x86 LibreOffice_project/62ad5818884a2fc2e5780dd45466868d41009ec0</meta:generator>
  </office:meta>
</office:document-meta>
</file>