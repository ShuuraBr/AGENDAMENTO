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07/05/2026 05:30:39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5474">
            <text:p>30547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.35">
            <text:p>16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7.14">
            <text:p>157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804">
            <text:p>0,015</text:p>
          </table:table-cell>
          <table:table-cell table:style-name="ce12N2" office:value-type="float" office:value="2.51">
            <text:p>2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7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0.21">
            <text:p>10,21</text:p>
          </table:table-cell>
          <table:table-cell table:style-name="ce12N2" office:value-type="float" office:value="157.14">
            <text:p>157,14</text:p>
          </table:table-cell>
          <table:table-cell table:style-name="ce12N2" office:value-type="float" office:value="6.29">
            <text:p>6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010143711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5">
            <text:p>3054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111925584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6">
            <text:p>3054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213751415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5">
            <text:p>305715</text:p>
          </table:table-cell>
          <table:table-cell table:style-name="ce0" table:number-columns-spanned="4" table:number-rows-spanned="1" office:value-type="string" calcext:value-type="string">
            <text:p>736 - BEMFIXA INDUSTRIAL LTDA</text:p>
          </table:table-cell>
          <table:covered-table-cell table:number-columns-repeated="3"/>
          <table:table-cell table:style-name="ce0" office:value-type="string" calcext:value-type="string">
            <text:p>210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3.63">
            <text:p>1283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1217.81">
            <text:p>1217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5">
            <text:p>0,105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83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65.82">
            <text:p>65,82</text:p>
          </table:table-cell>
          <table:table-cell table:style-name="ce12N2" office:value-type="float" office:value="1217.81">
            <text:p>1217,81</text:p>
          </table:table-cell>
          <table:table-cell table:style-name="ce12N2" office:value-type="float" office:value="81.63">
            <text:p>8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8019730001145500100021029014674903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4">
            <text:p>30591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013542731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5">
            <text:p>30591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11938958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6">
            <text:p>3059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21872963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6">
            <text:p>30593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811151885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7">
            <text:p>30593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916497246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8">
            <text:p>3059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013038964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7">
            <text:p>3059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718098184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8">
            <text:p>3059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817164062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9">
            <text:p>3059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915901801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4">
            <text:p>30595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41905481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5">
            <text:p>30595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51839238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6">
            <text:p>30595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615717035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4">
            <text:p>30596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.16">
            <text:p>8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18">
            <text:p>0,001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118521164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2">
            <text:p>3059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5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.16">
            <text:p>8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18">
            <text:p>0,001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51919997552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97">
            <text:p>30599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21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2.32">
            <text:p>110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02.32">
            <text:p>110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7">
            <text:p>0,002</text:p>
          </table:table-cell>
          <table:table-cell table:style-name="ce12N2" office:value-type="float" office:value="0.24">
            <text:p>0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0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2.32">
            <text:p>1102,32</text:p>
          </table:table-cell>
          <table:table-cell table:style-name="ce12N2" office:value-type="float" office:value="77.16">
            <text:p>7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21019181410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35">
            <text:p>3060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9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94.56">
            <text:p>309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4.56">
            <text:p>309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928">
            <text:p>0,009</text:p>
          </table:table-cell>
          <table:table-cell table:style-name="ce12N2" office:value-type="float" office:value="10.08">
            <text:p>10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9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94.56">
            <text:p>3094,56</text:p>
          </table:table-cell>
          <table:table-cell table:style-name="ce12N2" office:value-type="float" office:value="216.62">
            <text:p>21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99716379843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38">
            <text:p>3060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6.54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369.19">
            <text:p>21369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1369.19">
            <text:p>21369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839">
            <text:p>0,056</text:p>
          </table:table-cell>
          <table:table-cell table:style-name="ce12N2" office:value-type="float" office:value="14.66">
            <text:p>14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369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369.19">
            <text:p>21369,19</text:p>
          </table:table-cell>
          <table:table-cell table:style-name="ce12N2" office:value-type="float" office:value="1495.86">
            <text:p>149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654412390518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24">
            <text:p>3061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7.2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9.54">
            <text:p>666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669.54">
            <text:p>6669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906">
            <text:p>0,019</text:p>
          </table:table-cell>
          <table:table-cell table:style-name="ce12N2" office:value-type="float" office:value="19.29">
            <text:p>1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69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69.54">
            <text:p>6669,54</text:p>
          </table:table-cell>
          <table:table-cell table:style-name="ce12N2" office:value-type="float" office:value="466.87">
            <text:p>466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723411905067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64">
            <text:p>30616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4.8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879">
            <text:p>0,019</text:p>
          </table:table-cell>
          <table:table-cell table:style-name="ce12N2" office:value-type="float" office:value="1.39">
            <text:p>1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49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108.47">
            <text:p>10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481415641846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65">
            <text:p>30616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4.8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68.41">
            <text:p>926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9121.79">
            <text:p>9121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20657">
            <text:p>0,521</text:p>
          </table:table-cell>
          <table:table-cell table:style-name="ce12N2" office:value-type="float" office:value="53.62">
            <text:p>53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68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">
            <text:p>1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46.62">
            <text:p>146,62</text:p>
          </table:table-cell>
          <table:table-cell table:style-name="ce12N2" office:value-type="float" office:value="9121.79">
            <text:p>9121,79</text:p>
          </table:table-cell>
          <table:table-cell table:style-name="ce12N2" office:value-type="float" office:value="552.41">
            <text:p>552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481515838203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81">
            <text:p>306181</text:p>
          </table:table-cell>
          <table:table-cell table:style-name="ce0" table:number-columns-spanned="4" table:number-rows-spanned="1" office:value-type="string" calcext:value-type="string">
            <text:p>9.680 - METALURGICA ITAMONTE LTDA</text:p>
          </table:table-cell>
          <table:covered-table-cell table:number-columns-repeated="3"/>
          <table:table-cell table:style-name="ce0" office:value-type="string" calcext:value-type="string">
            <text:p>25.5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28.69">
            <text:p>5328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5328.69">
            <text:p>5328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28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.33">
            <text:p>62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28.69">
            <text:p>5328,69</text:p>
          </table:table-cell>
          <table:table-cell table:style-name="ce12N2" office:value-type="float" office:value="161.46">
            <text:p>16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63394780001105500100002559417162213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82">
            <text:p>306182</text:p>
          </table:table-cell>
          <table:table-cell table:style-name="ce0" table:number-columns-spanned="4" table:number-rows-spanned="1" office:value-type="string" calcext:value-type="string">
            <text:p>9.680 - METALURGICA ITAMONTE LTDA</text:p>
          </table:table-cell>
          <table:covered-table-cell table:number-columns-repeated="3"/>
          <table:table-cell table:style-name="ce0" office:value-type="string" calcext:value-type="string">
            <text:p>25.5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5.7">
            <text:p>38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85.7">
            <text:p>385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5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5.7">
            <text:p>385,70</text:p>
          </table:table-cell>
          <table:table-cell table:style-name="ce12N2" office:value-type="float" office:value="11.69">
            <text:p>1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63394780001105500100002559510498400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34">
            <text:p>30623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5.0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12.45">
            <text:p>631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6283.33">
            <text:p>6283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8205">
            <text:p>0,298</text:p>
          </table:table-cell>
          <table:table-cell table:style-name="ce12N2" office:value-type="float" office:value="59.6">
            <text:p>5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12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29.12">
            <text:p>29,12</text:p>
          </table:table-cell>
          <table:table-cell table:style-name="ce12N2" office:value-type="float" office:value="6283.33">
            <text:p>6283,33</text:p>
          </table:table-cell>
          <table:table-cell table:style-name="ce12N2" office:value-type="float" office:value="408.48">
            <text:p>40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508910434505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0">
            <text:p>306280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4.4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0.46">
            <text:p>145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405.3">
            <text:p>140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0678">
            <text:p>0,091</text:p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0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5.16">
            <text:p>45,16</text:p>
          </table:table-cell>
          <table:table-cell table:style-name="ce12N2" office:value-type="float" office:value="1405.3">
            <text:p>1405,30</text:p>
          </table:table-cell>
          <table:table-cell table:style-name="ce12N2" office:value-type="float" office:value="75.76">
            <text:p>75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442914580076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2">
            <text:p>3062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.34">
            <text:p>19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9.66">
            <text:p>17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156">
            <text:p>0,205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1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1.68">
            <text:p>11,68</text:p>
          </table:table-cell>
          <table:table-cell table:style-name="ce12N2" office:value-type="float" office:value="179.66">
            <text:p>179,66</text:p>
          </table:table-cell>
          <table:table-cell table:style-name="ce12N2" office:value-type="float" office:value="7.19">
            <text:p>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314184854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3">
            <text:p>3062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">
            <text:p>0,001</text:p>
          </table:table-cell>
          <table:table-cell table:style-name="ce12N2" office:value-type="float" office:value="1.29">
            <text:p>1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4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31.81">
            <text:p>3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617014933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4">
            <text:p>3062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.13">
            <text:p>33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4.68">
            <text:p>314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556">
            <text:p>0,012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20.45">
            <text:p>20,45</text:p>
          </table:table-cell>
          <table:table-cell table:style-name="ce12N2" office:value-type="float" office:value="314.68">
            <text:p>314,68</text:p>
          </table:table-cell>
          <table:table-cell table:style-name="ce12N2" office:value-type="float" office:value="22.03">
            <text:p>2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712018390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5">
            <text:p>3062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6">
            <text:p>71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16">
            <text:p>71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28">
            <text:p>0,011</text:p>
          </table:table-cell>
          <table:table-cell table:style-name="ce12N2" office:value-type="float" office:value="1.04">
            <text:p>1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6">
            <text:p>716,00</text:p>
          </table:table-cell>
          <table:table-cell table:style-name="ce12N2" office:value-type="float" office:value="50.12">
            <text:p>5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81968152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6">
            <text:p>3062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7.8">
            <text:p>1187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7.8">
            <text:p>1187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16">
            <text:p>0,002</text:p>
          </table:table-cell>
          <table:table-cell table:style-name="ce12N2" office:value-type="float" office:value="2.66">
            <text:p>2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7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7.8">
            <text:p>1187,80</text:p>
          </table:table-cell>
          <table:table-cell table:style-name="ce12N2" office:value-type="float" office:value="83.15">
            <text:p>8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916034313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7">
            <text:p>3062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.02">
            <text:p>11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9.02">
            <text:p>11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04">
            <text:p>0,001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9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.02">
            <text:p>119,02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3612242039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8">
            <text:p>3062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4.23">
            <text:p>67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3.08">
            <text:p>633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978">
            <text:p>0,016</text:p>
          </table:table-cell>
          <table:table-cell table:style-name="ce12N2" office:value-type="float" office:value="3.52">
            <text:p>3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1.15">
            <text:p>41,15</text:p>
          </table:table-cell>
          <table:table-cell table:style-name="ce12N2" office:value-type="float" office:value="633.08">
            <text:p>633,08</text:p>
          </table:table-cell>
          <table:table-cell table:style-name="ce12N2" office:value-type="float" office:value="25.32">
            <text:p>25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4817410573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9">
            <text:p>3062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6.07">
            <text:p>79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7.48">
            <text:p>747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938">
            <text:p>0,015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6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8.59">
            <text:p>48,59</text:p>
          </table:table-cell>
          <table:table-cell table:style-name="ce12N2" office:value-type="float" office:value="747.48">
            <text:p>747,48</text:p>
          </table:table-cell>
          <table:table-cell table:style-name="ce12N2" office:value-type="float" office:value="52.32">
            <text:p>5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4919026442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0">
            <text:p>3062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9.26">
            <text:p>208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089.26">
            <text:p>2089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616">
            <text:p>0,036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89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9.26">
            <text:p>2089,26</text:p>
          </table:table-cell>
          <table:table-cell table:style-name="ce12N2" office:value-type="float" office:value="102.14">
            <text:p>10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018616929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1">
            <text:p>3062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41.66">
            <text:p>824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8241.66">
            <text:p>8241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4884">
            <text:p>0,095</text:p>
          </table:table-cell>
          <table:table-cell table:style-name="ce12N2" office:value-type="float" office:value="23.66">
            <text:p>23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41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41.66">
            <text:p>8241,66</text:p>
          </table:table-cell>
          <table:table-cell table:style-name="ce12N2" office:value-type="float" office:value="573.68">
            <text:p>57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117949175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2">
            <text:p>3062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81.24">
            <text:p>348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3481.24">
            <text:p>348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132">
            <text:p>0,057</text:p>
          </table:table-cell>
          <table:table-cell table:style-name="ce12N2" office:value-type="float" office:value="9.71">
            <text:p>9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81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81.24">
            <text:p>3481,24</text:p>
          </table:table-cell>
          <table:table-cell table:style-name="ce12N2" office:value-type="float" office:value="243.69">
            <text:p>243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21745730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4">
            <text:p>3062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01.06">
            <text:p>860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8501.24">
            <text:p>850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2508">
            <text:p>0,193</text:p>
          </table:table-cell>
          <table:table-cell table:style-name="ce12N2" office:value-type="float" office:value="27.22">
            <text:p>27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01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99.82">
            <text:p>99,82</text:p>
          </table:table-cell>
          <table:table-cell table:style-name="ce12N2" office:value-type="float" office:value="8501.24">
            <text:p>8501,24</text:p>
          </table:table-cell>
          <table:table-cell table:style-name="ce12N2" office:value-type="float" office:value="595.09">
            <text:p>595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41489041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5">
            <text:p>3062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48.98">
            <text:p>114148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8">
            <text:p>128,00</text:p>
          </table:table-cell>
          <table:table-cell table:style-name="ce12N2" office:value-type="float" office:value="113148.24">
            <text:p>113148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9477">
            <text:p>4,995</text:p>
          </table:table-cell>
          <table:table-cell table:style-name="ce12N2" office:value-type="float" office:value="313.53">
            <text:p>31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4.148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000.74">
            <text:p>1000,74</text:p>
          </table:table-cell>
          <table:table-cell table:style-name="ce12N2" office:value-type="float" office:value="113148.24">
            <text:p>113148,24</text:p>
          </table:table-cell>
          <table:table-cell table:style-name="ce12N2" office:value-type="float" office:value="7362.41">
            <text:p>7362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519916301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6">
            <text:p>3062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7.7">
            <text:p>181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17.7">
            <text:p>181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">
            <text:p>0,002</text:p>
          </table:table-cell>
          <table:table-cell table:style-name="ce12N2" office:value-type="float" office:value="2.58">
            <text:p>2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1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7.7">
            <text:p>1817,70</text:p>
          </table:table-cell>
          <table:table-cell table:style-name="ce12N2" office:value-type="float" office:value="127.24">
            <text:p>12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719994151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7">
            <text:p>30629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189.81">
            <text:p>3218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">
            <text:p>59,00</text:p>
          </table:table-cell>
          <table:table-cell table:style-name="ce12N2" office:value-type="float" office:value="32170.78">
            <text:p>32170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805694">
            <text:p>12,806</text:p>
          </table:table-cell>
          <table:table-cell table:style-name="ce12N2" office:value-type="float" office:value="1682.52">
            <text:p>1682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189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9.03">
            <text:p>19,03</text:p>
          </table:table-cell>
          <table:table-cell table:style-name="ce12N2" office:value-type="float" office:value="32170.78">
            <text:p>32170,78</text:p>
          </table:table-cell>
          <table:table-cell table:style-name="ce12N2" office:value-type="float" office:value="2239.23">
            <text:p>2239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5518511014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8">
            <text:p>306298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5.58">
            <text:p>1875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875.58">
            <text:p>1875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1284">
            <text:p>2,013</text:p>
          </table:table-cell>
          <table:table-cell table:style-name="ce12N2" office:value-type="float" office:value="74.93">
            <text:p>74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75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5.58">
            <text:p>1875,58</text:p>
          </table:table-cell>
          <table:table-cell table:style-name="ce12N2" office:value-type="float" office:value="131.29">
            <text:p>131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561975077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3">
            <text:p>306323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2.1">
            <text:p>36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2.1">
            <text:p>362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42">
            <text:p>0,005</text:p>
          </table:table-cell>
          <table:table-cell table:style-name="ce12N2" office:value-type="float" office:value="3.7">
            <text:p>3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2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2.1">
            <text:p>362,10</text:p>
          </table:table-cell>
          <table:table-cell table:style-name="ce12N2" office:value-type="float" office:value="25.35">
            <text:p>2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571675258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4">
            <text:p>30632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1.68">
            <text:p>66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1.68">
            <text:p>661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8432">
            <text:p>0,184</text:p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1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1.68">
            <text:p>661,68</text:p>
          </table:table-cell>
          <table:table-cell table:style-name="ce12N2" office:value-type="float" office:value="46.32">
            <text:p>4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5815785631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1">
            <text:p>30633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2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6.64">
            <text:p>227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76.64">
            <text:p>2276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104">
            <text:p>0,013</text:p>
          </table:table-cell>
          <table:table-cell table:style-name="ce12N2" office:value-type="float" office:value="2.82">
            <text:p>2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7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76.64">
            <text:p>2276,64</text:p>
          </table:table-cell>
          <table:table-cell table:style-name="ce12N2" office:value-type="float" office:value="159.36">
            <text:p>159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24918830701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2">
            <text:p>30633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32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1.62">
            <text:p>80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1.62">
            <text:p>801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5">
            <text:p>0,001</text:p>
          </table:table-cell>
          <table:table-cell table:style-name="ce12N2" office:value-type="float" office:value="1.86">
            <text:p>1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1.62">
            <text:p>801,62</text:p>
          </table:table-cell>
          <table:table-cell table:style-name="ce12N2" office:value-type="float" office:value="32.06">
            <text:p>3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32615705543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4">
            <text:p>30633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92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77.88">
            <text:p>5177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77.88">
            <text:p>5177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1249">
            <text:p>0,512</text:p>
          </table:table-cell>
          <table:table-cell table:style-name="ce12N2" office:value-type="float" office:value="176.94">
            <text:p>176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77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77.88">
            <text:p>5177,88</text:p>
          </table:table-cell>
          <table:table-cell table:style-name="ce12N2" office:value-type="float" office:value="207.12">
            <text:p>20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92411976423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6">
            <text:p>30633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9.1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97.33">
            <text:p>10197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10197.33">
            <text:p>1019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77648">
            <text:p>2,478</text:p>
          </table:table-cell>
          <table:table-cell table:style-name="ce12N2" office:value-type="float" office:value="829.6">
            <text:p>82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197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197.33">
            <text:p>10197,33</text:p>
          </table:table-cell>
          <table:table-cell table:style-name="ce12N2" office:value-type="float" office:value="407.9">
            <text:p>40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91561191005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81">
            <text:p>306381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16.64">
            <text:p>5216,64</text:p>
          </table:table-cell>
          <table:table-cell table:style-name="ce12N2" office:value-type="float" office:value="838.8">
            <text:p>838,80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92">
            <text:p>559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7.42">
            <text:p>7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1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">
            <text:p>10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63.44">
            <text:p>463,44</text:p>
          </table:table-cell>
          <table:table-cell table:style-name="ce12N2" office:value-type="float" office:value="4753.2">
            <text:p>4753,20</text:p>
          </table:table-cell>
          <table:table-cell table:style-name="ce12N2" office:value-type="float" office:value="190.13">
            <text:p>19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20321000336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52">
            <text:p>306452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7.09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5.19">
            <text:p>55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5.19">
            <text:p>555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136">
            <text:p>0,081</text:p>
          </table:table-cell>
          <table:table-cell table:style-name="ce12N2" office:value-type="float" office:value="26.3">
            <text:p>26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5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5.19">
            <text:p>555,19</text:p>
          </table:table-cell>
          <table:table-cell table:style-name="ce12N2" office:value-type="float" office:value="38.86">
            <text:p>3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4709011025025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53">
            <text:p>30645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8.01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4.56">
            <text:p>57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4.56">
            <text:p>57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64">
            <text:p>0,081</text:p>
          </table:table-cell>
          <table:table-cell table:style-name="ce12N2" office:value-type="float" office:value="25.28">
            <text:p>25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4.56">
            <text:p>574,56</text:p>
          </table:table-cell>
          <table:table-cell table:style-name="ce12N2" office:value-type="float" office:value="40.22">
            <text:p>4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4801313683515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2">
            <text:p>30648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1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59.1">
            <text:p>15959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15959.1">
            <text:p>15959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59191">
            <text:p>2,592</text:p>
          </table:table-cell>
          <table:table-cell table:style-name="ce12N2" office:value-type="float" office:value="1194.89">
            <text:p>1194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59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59.1">
            <text:p>15959,10</text:p>
          </table:table-cell>
          <table:table-cell table:style-name="ce12N2" office:value-type="float" office:value="766.71">
            <text:p>766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410418906957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3">
            <text:p>306483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1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52.98">
            <text:p>135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52.98">
            <text:p>1352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024">
            <text:p>0,170</text:p>
          </table:table-cell>
          <table:table-cell table:style-name="ce12N2" office:value-type="float" office:value="48.56">
            <text:p>48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52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2.98">
            <text:p>1352,98</text:p>
          </table:table-cell>
          <table:table-cell table:style-name="ce12N2" office:value-type="float" office:value="54.12">
            <text:p>5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410517131674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4">
            <text:p>30648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1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56.6">
            <text:p>545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56.6">
            <text:p>545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5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56.6">
            <text:p>5456,60</text:p>
          </table:table-cell>
          <table:table-cell table:style-name="ce12N2" office:value-type="float" office:value="218.26">
            <text:p>218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410618829234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9">
            <text:p>30648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8.2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4.48">
            <text:p>424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4.48">
            <text:p>424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2152">
            <text:p>0,152</text:p>
          </table:table-cell>
          <table:table-cell table:style-name="ce12N2" office:value-type="float" office:value="44.26">
            <text:p>44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4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4.48">
            <text:p>424,48</text:p>
          </table:table-cell>
          <table:table-cell table:style-name="ce12N2" office:value-type="float" office:value="29.71">
            <text:p>29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825416484359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5">
            <text:p>30649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11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16.35">
            <text:p>391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762.32">
            <text:p>376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372">
            <text:p>0,032</text:p>
          </table:table-cell>
          <table:table-cell table:style-name="ce12N2" office:value-type="float" office:value="8.6">
            <text:p>8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16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54.03">
            <text:p>154,03</text:p>
          </table:table-cell>
          <table:table-cell table:style-name="ce12N2" office:value-type="float" office:value="3762.32">
            <text:p>3762,32</text:p>
          </table:table-cell>
          <table:table-cell table:style-name="ce12N2" office:value-type="float" office:value="263.36">
            <text:p>26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111516428682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59">
            <text:p>306559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7.832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81.49">
            <text:p>148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249.88">
            <text:p>1249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0">
            <text:p>100,00</text:p>
          </table:table-cell>
          <table:table-cell table:style-name="ce12" office:value-type="string" calcext:value-type="string">
            <text:p>1.481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31.61">
            <text:p>131,61</text:p>
          </table:table-cell>
          <table:table-cell table:style-name="ce12N2" office:value-type="float" office:value="1349.88">
            <text:p>1349,88</text:p>
          </table:table-cell>
          <table:table-cell table:style-name="ce12N2" office:value-type="float" office:value="84.33">
            <text:p>84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45461650003935500400009783211206100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5">
            <text:p>306575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1.19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68.88">
            <text:p>396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780.6">
            <text:p>378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38">
            <text:p>0,027</text:p>
          </table:table-cell>
          <table:table-cell table:style-name="ce12N2" office:value-type="float" office:value="21.28">
            <text:p>21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6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.67">
            <text:p>54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88.28">
            <text:p>188,28</text:p>
          </table:table-cell>
          <table:table-cell table:style-name="ce12N2" office:value-type="float" office:value="3780.6">
            <text:p>3780,60</text:p>
          </table:table-cell>
          <table:table-cell table:style-name="ce12N2" office:value-type="float" office:value="151.22">
            <text:p>15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56353460001405500200011119615510529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80">
            <text:p>306580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3.71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73.85">
            <text:p>1247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12183.07">
            <text:p>12183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09833">
            <text:p>3,010</text:p>
          </table:table-cell>
          <table:table-cell table:style-name="ce12N2" office:value-type="float" office:value="251.5">
            <text:p>25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473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90.78">
            <text:p>290,78</text:p>
          </table:table-cell>
          <table:table-cell table:style-name="ce12N2" office:value-type="float" office:value="12183.07">
            <text:p>12183,07</text:p>
          </table:table-cell>
          <table:table-cell table:style-name="ce12N2" office:value-type="float" office:value="704.43">
            <text:p>70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8371911215628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79">
            <text:p>3066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6">
            <text:p>0,000</text:p>
          </table:table-cell>
          <table:table-cell table:style-name="ce12N2" office:value-type="float" office:value="1.95">
            <text:p>1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6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62.05">
            <text:p>6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4713961065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0">
            <text:p>3066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6.46">
            <text:p>35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4.7">
            <text:p>33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84">
            <text:p>0,000</text:p>
          </table:table-cell>
          <table:table-cell table:style-name="ce12N2" office:value-type="float" office:value="0.66">
            <text:p>0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6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21.76">
            <text:p>21,76</text:p>
          </table:table-cell>
          <table:table-cell table:style-name="ce12N2" office:value-type="float" office:value="334.7">
            <text:p>334,70</text:p>
          </table:table-cell>
          <table:table-cell table:style-name="ce12N2" office:value-type="float" office:value="23.43">
            <text:p>2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4813667964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1">
            <text:p>3066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5.84">
            <text:p>77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75.84">
            <text:p>775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08">
            <text:p>0,010</text:p>
          </table:table-cell>
          <table:table-cell table:style-name="ce12N2" office:value-type="float" office:value="7.42">
            <text:p>7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75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5.84">
            <text:p>775,84</text:p>
          </table:table-cell>
          <table:table-cell table:style-name="ce12N2" office:value-type="float" office:value="31.03">
            <text:p>3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4917701686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2">
            <text:p>3066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6.02">
            <text:p>736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91.1">
            <text:p>69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1">
            <text:p>0,002</text:p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36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44.92">
            <text:p>44,92</text:p>
          </table:table-cell>
          <table:table-cell table:style-name="ce12N2" office:value-type="float" office:value="691.1">
            <text:p>691,10</text:p>
          </table:table-cell>
          <table:table-cell table:style-name="ce12N2" office:value-type="float" office:value="48.38">
            <text:p>4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011184308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3">
            <text:p>3066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1.68">
            <text:p>140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01.68">
            <text:p>1401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104">
            <text:p>0,013</text:p>
          </table:table-cell>
          <table:table-cell table:style-name="ce12N2" office:value-type="float" office:value="5.82">
            <text:p>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1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1.68">
            <text:p>1401,68</text:p>
          </table:table-cell>
          <table:table-cell table:style-name="ce12N2" office:value-type="float" office:value="56.07">
            <text:p>5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11515410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4">
            <text:p>3066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896">
            <text:p>0,013</text:p>
          </table:table-cell>
          <table:table-cell table:style-name="ce12N2" office:value-type="float" office:value="4.82">
            <text:p>4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19.56">
            <text:p>1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216172472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5">
            <text:p>3066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5.65">
            <text:p>1005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44.28">
            <text:p>944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6">
            <text:p>0,011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05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1.37">
            <text:p>61,37</text:p>
          </table:table-cell>
          <table:table-cell table:style-name="ce12N2" office:value-type="float" office:value="944.28">
            <text:p>944,28</text:p>
          </table:table-cell>
          <table:table-cell table:style-name="ce12N2" office:value-type="float" office:value="66.1">
            <text:p>6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31356462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6">
            <text:p>3066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.59">
            <text:p>168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8.3">
            <text:p>158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36">
            <text:p>0,00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8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10.29">
            <text:p>10,29</text:p>
          </table:table-cell>
          <table:table-cell table:style-name="ce12N2" office:value-type="float" office:value="158.3">
            <text:p>158,30</text:p>
          </table:table-cell>
          <table:table-cell table:style-name="ce12N2" office:value-type="float" office:value="6.33">
            <text:p>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412810240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7">
            <text:p>3066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896">
            <text:p>0,013</text:p>
          </table:table-cell>
          <table:table-cell table:style-name="ce12N2" office:value-type="float" office:value="4.82">
            <text:p>4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19.56">
            <text:p>1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512016082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8">
            <text:p>3066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2.96">
            <text:p>1312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2.96">
            <text:p>131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76">
            <text:p>0,001</text:p>
          </table:table-cell>
          <table:table-cell table:style-name="ce12N2" office:value-type="float" office:value="3.92">
            <text:p>3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12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12.96">
            <text:p>1312,96</text:p>
          </table:table-cell>
          <table:table-cell table:style-name="ce12N2" office:value-type="float" office:value="91.91">
            <text:p>9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614375485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9">
            <text:p>306689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39.3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2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95.71">
            <text:p>2489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22256">
            <text:p>2225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90">
            <text:p>29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9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">
            <text:p>10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2639.71">
            <text:p>2639,71</text:p>
          </table:table-cell>
          <table:table-cell table:style-name="ce12N2" office:value-type="float" office:value="22256">
            <text:p>22256,00</text:p>
          </table:table-cell>
          <table:table-cell table:style-name="ce12N2" office:value-type="float" office:value="890.23">
            <text:p>89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05870170002855500100003933214335151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90">
            <text:p>3066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.28">
            <text:p>181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1.28">
            <text:p>181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44">
            <text:p>0,000</text:p>
          </table:table-cell>
          <table:table-cell table:style-name="ce12N2" office:value-type="float" office:value="0.84">
            <text:p>0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1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.28">
            <text:p>181,28</text:p>
          </table:table-cell>
          <table:table-cell table:style-name="ce12N2" office:value-type="float" office:value="12.69">
            <text:p>12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71452555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91">
            <text:p>3066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32">
            <text:p>0,000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2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124.1">
            <text:p>12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814514302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98">
            <text:p>30669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1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7.6">
            <text:p>44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67.6">
            <text:p>446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9904">
            <text:p>0,030</text:p>
          </table:table-cell>
          <table:table-cell table:style-name="ce12N2" office:value-type="float" office:value="6.84">
            <text:p>6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67.6">
            <text:p>4467,60</text:p>
          </table:table-cell>
          <table:table-cell table:style-name="ce12N2" office:value-type="float" office:value="312.73">
            <text:p>312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19710644366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00">
            <text:p>306700</text:p>
          </table:table-cell>
          <table:table-cell table:style-name="ce0" table:number-columns-spanned="4" table:number-rows-spanned="1" office:value-type="string" calcext:value-type="string">
            <text:p>19 - TRAMONTINA PLANALTO S/A</text:p>
          </table:table-cell>
          <table:covered-table-cell table:number-columns-repeated="3"/>
          <table:table-cell table:style-name="ce0" office:value-type="string" calcext:value-type="string">
            <text:p>708.0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71.63">
            <text:p>547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471.63">
            <text:p>5471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6514">
            <text:p>0,277</text:p>
          </table:table-cell>
          <table:table-cell table:style-name="ce12N2" office:value-type="float" office:value="21.7">
            <text:p>21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71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71.63">
            <text:p>5471,63</text:p>
          </table:table-cell>
          <table:table-cell table:style-name="ce12N2" office:value-type="float" office:value="656.6">
            <text:p>65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4001422400001205500100070802219470817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01">
            <text:p>306701</text:p>
          </table:table-cell>
          <table:table-cell table:style-name="ce0" table:number-columns-spanned="4" table:number-rows-spanned="1" office:value-type="string" calcext:value-type="string">
            <text:p>36.025 - FRESNOMAQ INDUSTRIA DE MAQUINAS S/A</text:p>
          </table:table-cell>
          <table:covered-table-cell table:number-columns-repeated="3"/>
          <table:table-cell table:style-name="ce0" office:value-type="string" calcext:value-type="string">
            <text:p>59.9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656">
            <text:p>0,200</text:p>
          </table:table-cell>
          <table:table-cell table:style-name="ce12N2" office:value-type="float" office:value="8.76">
            <text:p>8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">
            <text:p>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158.4">
            <text:p>15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4063372800011865500100005998918744180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03">
            <text:p>30670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0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3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671.86">
            <text:p>2267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1745.65">
            <text:p>21745,65</text:p>
          </table:table-cell>
          <table:table-cell table:style-name="ce12N2" office:value-type="float" office:value="550">
            <text:p>550,00</text:p>
          </table:table-cell>
          <table:table-cell table:style-name="ce12N3" office:value-type="float" office:value="0.0177">
            <text:p>0,018</text:p>
          </table:table-cell>
          <table:table-cell table:style-name="ce12N2" office:value-type="float" office:value="24.4">
            <text:p>2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671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376.21">
            <text:p>376,21</text:p>
          </table:table-cell>
          <table:table-cell table:style-name="ce12N2" office:value-type="float" office:value="22295.65">
            <text:p>22295,65</text:p>
          </table:table-cell>
          <table:table-cell table:style-name="ce12N2" office:value-type="float" office:value="1560.7">
            <text:p>156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4570742000329550010000100791085820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2">
            <text:p>306712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">
            <text:p>0,054</text:p>
          </table:table-cell>
          <table:table-cell table:style-name="ce12N2" office:value-type="float" office:value="18.6">
            <text:p>18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8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19.49">
            <text:p>19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91393486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4">
            <text:p>30671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7.53">
            <text:p>56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7.53">
            <text:p>567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136">
            <text:p>0,081</text:p>
          </table:table-cell>
          <table:table-cell table:style-name="ce12N2" office:value-type="float" office:value="26.3">
            <text:p>26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7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7.53">
            <text:p>567,53</text:p>
          </table:table-cell>
          <table:table-cell table:style-name="ce12N2" office:value-type="float" office:value="39.73">
            <text:p>39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81842296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5">
            <text:p>306715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656">
            <text:p>0,035</text:p>
          </table:table-cell>
          <table:table-cell table:style-name="ce12N2" office:value-type="float" office:value="16.14">
            <text:p>16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57.04">
            <text:p>5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71369635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7">
            <text:p>306717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3.84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5984">
            <text:p>0,096</text:p>
          </table:table-cell>
          <table:table-cell table:style-name="ce12N2" office:value-type="float" office:value="41.84">
            <text:p>41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0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74.94">
            <text:p>7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384610614180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34">
            <text:p>306734</text:p>
          </table:table-cell>
          <table:table-cell table:style-name="ce0" table:number-columns-spanned="4" table:number-rows-spanned="1" office:value-type="string" calcext:value-type="string">
            <text:p>4.003 - JAPI SA INDUSTRIA E COMERCIO</text:p>
          </table:table-cell>
          <table:covered-table-cell table:number-columns-repeated="3"/>
          <table:table-cell table:style-name="ce0" office:value-type="string" calcext:value-type="string">
            <text:p>769.903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3.17">
            <text:p>177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664.94">
            <text:p>1664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3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">
            <text:p>4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108.23">
            <text:p>108,23</text:p>
          </table:table-cell>
          <table:table-cell table:style-name="ce12N2" office:value-type="float" office:value="1664.94">
            <text:p>1664,94</text:p>
          </table:table-cell>
          <table:table-cell table:style-name="ce12N2" office:value-type="float" office:value="116.54">
            <text:p>11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1522460000128550050007699031909928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35">
            <text:p>306735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2.3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6.87">
            <text:p>2666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352.5">
            <text:p>2352,5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5513">
            <text:p>0,055</text:p>
          </table:table-cell>
          <table:table-cell table:style-name="ce12N2" office:value-type="float" office:value="6.5">
            <text:p>6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66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55">
            <text:p>41,5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229.37">
            <text:p>229,37</text:p>
          </table:table-cell>
          <table:table-cell table:style-name="ce12N2" office:value-type="float" office:value="2437.5">
            <text:p>2437,50</text:p>
          </table:table-cell>
          <table:table-cell table:style-name="ce12N2" office:value-type="float" office:value="97.5">
            <text:p>9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239512942187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73">
            <text:p>306773</text:p>
          </table:table-cell>
          <table:table-cell table:style-name="ce0" table:number-columns-spanned="4" table:number-rows-spanned="1" office:value-type="string" calcext:value-type="string">
            <text:p>16.628 - VFL IMPORTADORA E DISTRIBUIDORA LTDA</text:p>
          </table:table-cell>
          <table:covered-table-cell table:number-columns-repeated="3"/>
          <table:table-cell table:style-name="ce0" office:value-type="string" calcext:value-type="string">
            <text:p>4.6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23.54">
            <text:p>742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423.54">
            <text:p>7423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975">
            <text:p>0,007</text:p>
          </table:table-cell>
          <table:table-cell table:style-name="ce12N2" office:value-type="float" office:value="7.17">
            <text:p>7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2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.33">
            <text:p>61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23.54">
            <text:p>7423,54</text:p>
          </table:table-cell>
          <table:table-cell table:style-name="ce12N2" office:value-type="float" office:value="296.94">
            <text:p>296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051043590001225500100000465015751049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74">
            <text:p>306774</text:p>
          </table:table-cell>
          <table:table-cell table:style-name="ce0" table:number-columns-spanned="4" table:number-rows-spanned="1" office:value-type="string" calcext:value-type="string">
            <text:p>16.628 - VFL IMPORTADORA E DISTRIBUIDORA LTDA</text:p>
          </table:table-cell>
          <table:covered-table-cell table:number-columns-repeated="3"/>
          <table:table-cell table:style-name="ce0" office:value-type="string" calcext:value-type="string">
            <text:p>4.6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34.52">
            <text:p>963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9634.52">
            <text:p>9634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81">
            <text:p>0,007</text:p>
          </table:table-cell>
          <table:table-cell table:style-name="ce12N2" office:value-type="float" office:value="6.21">
            <text:p>6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634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2">
            <text:p>9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634.52">
            <text:p>9634,52</text:p>
          </table:table-cell>
          <table:table-cell table:style-name="ce12N2" office:value-type="float" office:value="385.38">
            <text:p>38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051043590001225500100000465218913264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3">
            <text:p>3067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5.92">
            <text:p>287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0.39">
            <text:p>2700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75.53">
            <text:p>175,53</text:p>
          </table:table-cell>
          <table:table-cell table:style-name="ce12N2" office:value-type="float" office:value="2700.39">
            <text:p>2700,39</text:p>
          </table:table-cell>
          <table:table-cell table:style-name="ce12N2" office:value-type="float" office:value="108.02">
            <text:p>108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91705951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5">
            <text:p>3067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5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">
            <text:p>0,001</text:p>
          </table:table-cell>
          <table:table-cell table:style-name="ce12N2" office:value-type="float" office:value="1.29">
            <text:p>1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4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31.81">
            <text:p>3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5991815162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6">
            <text:p>3067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9.86">
            <text:p>2789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743.42">
            <text:p>2743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9122">
            <text:p>0,029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89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6.44">
            <text:p>46,44</text:p>
          </table:table-cell>
          <table:table-cell table:style-name="ce12N2" office:value-type="float" office:value="2743.42">
            <text:p>2743,42</text:p>
          </table:table-cell>
          <table:table-cell table:style-name="ce12N2" office:value-type="float" office:value="192.04">
            <text:p>19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001278295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7">
            <text:p>3067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22.9">
            <text:p>182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822.9">
            <text:p>1822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65">
            <text:p>0,033</text:p>
          </table:table-cell>
          <table:table-cell table:style-name="ce12N2" office:value-type="float" office:value="2.72">
            <text:p>2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22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22.9">
            <text:p>1822,90</text:p>
          </table:table-cell>
          <table:table-cell table:style-name="ce12N2" office:value-type="float" office:value="127.6">
            <text:p>12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0115383035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8">
            <text:p>3067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7.81">
            <text:p>67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71.3">
            <text:p>671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1088">
            <text:p>0,031</text:p>
          </table:table-cell>
          <table:table-cell table:style-name="ce12N2" office:value-type="float" office:value="1.43">
            <text:p>1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7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6.51">
            <text:p>6,51</text:p>
          </table:table-cell>
          <table:table-cell table:style-name="ce12N2" office:value-type="float" office:value="671.3">
            <text:p>671,30</text:p>
          </table:table-cell>
          <table:table-cell table:style-name="ce12N2" office:value-type="float" office:value="47">
            <text:p>4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0213689959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90">
            <text:p>3067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.98">
            <text:p>4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.48">
            <text:p>38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1228">
            <text:p>0,031</text:p>
          </table:table-cell>
          <table:table-cell table:style-name="ce12N2" office:value-type="float" office:value="0.56">
            <text:p>0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38.48">
            <text:p>38,48</text:p>
          </table:table-cell>
          <table:table-cell table:style-name="ce12N2" office:value-type="float" office:value="1.54">
            <text:p>1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0317969228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04">
            <text:p>306804</text:p>
          </table:table-cell>
          <table:table-cell table:style-name="ce0" table:number-columns-spanned="4" table:number-rows-spanned="1" office:value-type="string" calcext:value-type="string">
            <text:p>17.338 - ELGIN DISTRIBUIDORA LTDA</text:p>
          </table:table-cell>
          <table:covered-table-cell table:number-columns-repeated="3"/>
          <table:table-cell table:style-name="ce0" office:value-type="string" calcext:value-type="string">
            <text:p>382.0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2.61">
            <text:p>632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94">
            <text:p>59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2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">
            <text:p>7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8.61">
            <text:p>38,61</text:p>
          </table:table-cell>
          <table:table-cell table:style-name="ce12N2" office:value-type="float" office:value="594">
            <text:p>594,00</text:p>
          </table:table-cell>
          <table:table-cell table:style-name="ce12N2" office:value-type="float" office:value="23.76">
            <text:p>2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70234290001435500100038201111277808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9">
            <text:p>306819</text:p>
          </table:table-cell>
          <table:table-cell table:style-name="ce0" table:number-columns-spanned="4" table:number-rows-spanned="1" office:value-type="string" calcext:value-type="string">
            <text:p>16.628 - VFL IMPORTADORA E DISTRIBUIDORA LTDA</text:p>
          </table:table-cell>
          <table:covered-table-cell table:number-columns-repeated="3"/>
          <table:table-cell table:style-name="ce0" office:value-type="string" calcext:value-type="string">
            <text:p>4.6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7.4">
            <text:p>160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07.4">
            <text:p>160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4">
            <text:p>0,001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0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7.4">
            <text:p>1607,40</text:p>
          </table:table-cell>
          <table:table-cell table:style-name="ce12N2" office:value-type="float" office:value="64.3">
            <text:p>6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051043590001225500100000465310462254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25">
            <text:p>306825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3.3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698.87">
            <text:p>7569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">
            <text:p>55,00</text:p>
          </table:table-cell>
          <table:table-cell table:style-name="ce12N2" office:value-type="float" office:value="71271.6">
            <text:p>7127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400605">
            <text:p>4,401</text:p>
          </table:table-cell>
          <table:table-cell table:style-name="ce12N2" office:value-type="float" office:value="623.56">
            <text:p>62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5.698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427.27">
            <text:p>4427,27</text:p>
          </table:table-cell>
          <table:table-cell table:style-name="ce12N2" office:value-type="float" office:value="71271.6">
            <text:p>71271,60</text:p>
          </table:table-cell>
          <table:table-cell table:style-name="ce12N2" office:value-type="float" office:value="3720.23">
            <text:p>372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331715317103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28">
            <text:p>306828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1.53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78.4">
            <text:p>367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3528.27">
            <text:p>3528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014848">
            <text:p>5,015</text:p>
          </table:table-cell>
          <table:table-cell table:style-name="ce12N2" office:value-type="float" office:value="23.7">
            <text:p>23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7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.78">
            <text:p>58,7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50.13">
            <text:p>150,13</text:p>
          </table:table-cell>
          <table:table-cell table:style-name="ce12N2" office:value-type="float" office:value="3528.27">
            <text:p>3528,27</text:p>
          </table:table-cell>
          <table:table-cell table:style-name="ce12N2" office:value-type="float" office:value="141.13">
            <text:p>141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153417938680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41">
            <text:p>306841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5.5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4.37">
            <text:p>88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5.8">
            <text:p>80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832">
            <text:p>0,006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4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78.57">
            <text:p>78,57</text:p>
          </table:table-cell>
          <table:table-cell table:style-name="ce12N2" office:value-type="float" office:value="805.8">
            <text:p>805,80</text:p>
          </table:table-cell>
          <table:table-cell table:style-name="ce12N2" office:value-type="float" office:value="56.41">
            <text:p>56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552316304135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42">
            <text:p>306842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4.8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16.2">
            <text:p>4716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4284.5">
            <text:p>428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0197">
            <text:p>0,070</text:p>
          </table:table-cell>
          <table:table-cell table:style-name="ce12N2" office:value-type="float" office:value="3.34">
            <text:p>3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16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.44">
            <text:p>53,4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31.7">
            <text:p>431,70</text:p>
          </table:table-cell>
          <table:table-cell table:style-name="ce12N2" office:value-type="float" office:value="4284.5">
            <text:p>4284,50</text:p>
          </table:table-cell>
          <table:table-cell table:style-name="ce12N2" office:value-type="float" office:value="195.58">
            <text:p>195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94164590001205500100081488710006807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51">
            <text:p>306851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7.87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4.96">
            <text:p>449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94.96">
            <text:p>4494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832">
            <text:p>0,015</text:p>
          </table:table-cell>
          <table:table-cell table:style-name="ce12N2" office:value-type="float" office:value="10.8">
            <text:p>1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94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4.96">
            <text:p>4494,96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13855500200001787417051299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52">
            <text:p>306852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2.6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24.29">
            <text:p>2824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2495.93">
            <text:p>2495,93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41538">
            <text:p>0,042</text:p>
          </table:table-cell>
          <table:table-cell table:style-name="ce12N2" office:value-type="float" office:value="8.15">
            <text:p>8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24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58">
            <text:p>41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243.36">
            <text:p>243,36</text:p>
          </table:table-cell>
          <table:table-cell table:style-name="ce12N2" office:value-type="float" office:value="2580.93">
            <text:p>2580,93</text:p>
          </table:table-cell>
          <table:table-cell table:style-name="ce12N2" office:value-type="float" office:value="103.23">
            <text:p>103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260112363773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55">
            <text:p>306855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00.4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68.19">
            <text:p>7368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7358.71">
            <text:p>7358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9575">
            <text:p>0,400</text:p>
          </table:table-cell>
          <table:table-cell table:style-name="ce12N2" office:value-type="float" office:value="186.98">
            <text:p>186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368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9.48">
            <text:p>9,48</text:p>
          </table:table-cell>
          <table:table-cell table:style-name="ce12N2" office:value-type="float" office:value="7358.71">
            <text:p>7358,71</text:p>
          </table:table-cell>
          <table:table-cell table:style-name="ce12N2" office:value-type="float" office:value="512.74">
            <text:p>51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0044015154941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101">
            <text:p>101,00</text:p>
          </table:table-cell>
          <table:table-cell table:style-name="ce26N2" office:value-type="float" office:value="838.8">
            <text:p>838,80</text:p>
          </table:table-cell>
          <table:table-cell table:style-name="ce26N2" office:value-type="float" office:value="720">
            <text:p>720,00</text:p>
          </table:table-cell>
          <table:table-cell table:style-name="ce26N2" office:value-type="float" office:value="100">
            <text:p>100,00</text:p>
          </table:table-cell>
          <table:table-cell table:style-name="ce26N2" office:value-type="float" office:value="12047.34">
            <text:p>12047,34</text:p>
          </table:table-cell>
          <table:table-cell table:style-name="ce26N2" office:value-type="float" office:value="499840.82">
            <text:p>499840,82</text:p>
          </table:table-cell>
          <table:table-cell table:style-name="ce26N2" office:value-type="float" office:value="29711.18">
            <text:p>29711,1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11888.16">
            <text:p>511888,1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42.045694">
            <text:p>42,046</text:p>
          </table:table-cell>
          <table:table-cell table:style-name="ce26N2" office:value-type="float" office:value="499859.62">
            <text:p>499859,62</text:p>
          </table:table-cell>
          <table:table-cell table:style-name="ce26N2" office:value-type="float" office:value="511888.16">
            <text:p>511888,1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6451.47">
            <text:p>6451,4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0.07">
            <text:p>40,0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SR ACABAMENT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412" meta:object-count="0"/>
    <meta:generator>LibreOffice/4.3.0.4$Windows_x86 LibreOffice_project/62ad5818884a2fc2e5780dd45466868d41009ec0</meta:generator>
  </office:meta>
</office:document-meta>
</file>