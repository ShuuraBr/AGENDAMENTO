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6/07/2026 07:40:56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99">
            <text:p>309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12">
            <text:p>1635,12</text:p>
          </table:table-cell>
          <table:table-cell table:style-name="ce12N2" office:value-type="float" office:value="1.64">
            <text:p>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7.4">
            <text:p>1937,40</text:p>
          </table:table-cell>
          <table:table-cell table:style-name="ce12N2" office:value-type="float" office:value="135.62">
            <text:p>135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03141597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0">
            <text:p>3100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3.94">
            <text:p>49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529">
            <text:p>0,031</text:p>
          </table:table-cell>
          <table:table-cell table:style-name="ce12N2" office:value-type="float" office:value="6.13">
            <text:p>6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89.99">
            <text:p>4089,99</text:p>
          </table:table-cell>
          <table:table-cell table:style-name="ce12N2" office:value-type="float" office:value="4.09">
            <text:p>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81">
            <text:p>36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87.84">
            <text:p>87,84</text:p>
          </table:table-cell>
          <table:table-cell table:style-name="ce12N2" office:value-type="float" office:value="4846.1">
            <text:p>4846,10</text:p>
          </table:table-cell>
          <table:table-cell table:style-name="ce12N2" office:value-type="float" office:value="339.22">
            <text:p>33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71314958552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4">
            <text:p>3100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699.78">
            <text:p>3469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804">
            <text:p>0,199</text:p>
          </table:table-cell>
          <table:table-cell table:style-name="ce12N2" office:value-type="float" office:value="31.62">
            <text:p>3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69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11.42">
            <text:p>28911,42</text:p>
          </table:table-cell>
          <table:table-cell table:style-name="ce12N2" office:value-type="float" office:value="28.9">
            <text:p>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22">
            <text:p>260,2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469.29">
            <text:p>469,29</text:p>
          </table:table-cell>
          <table:table-cell table:style-name="ce12N2" office:value-type="float" office:value="34230.49">
            <text:p>34230,49</text:p>
          </table:table-cell>
          <table:table-cell table:style-name="ce12N2" office:value-type="float" office:value="2372.09">
            <text:p>23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611544103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0">
            <text:p>3100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1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78">
            <text:p>0,001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4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3.87">
            <text:p>273,87</text:p>
          </table:table-cell>
          <table:table-cell table:style-name="ce12N2" office:value-type="float" office:value="0.27">
            <text:p>0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4.5">
            <text:p>324,50</text:p>
          </table:table-cell>
          <table:table-cell table:style-name="ce12N2" office:value-type="float" office:value="22.72">
            <text:p>2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1711146552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5">
            <text:p>3100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6.5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2.7">
            <text:p>172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04">
            <text:p>0,000</text:p>
          </table:table-cell>
          <table:table-cell table:style-name="ce12N2" office:value-type="float" office:value="0.17">
            <text:p>0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2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5.16">
            <text:p>1365,16</text:p>
          </table:table-cell>
          <table:table-cell table:style-name="ce12N2" office:value-type="float" office:value="1.37">
            <text:p>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.29">
            <text:p>12,2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5.14">
            <text:p>105,14</text:p>
          </table:table-cell>
          <table:table-cell table:style-name="ce12N2" office:value-type="float" office:value="1617.56">
            <text:p>1617,56</text:p>
          </table:table-cell>
          <table:table-cell table:style-name="ce12N2" office:value-type="float" office:value="113.23">
            <text:p>11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657317385473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7">
            <text:p>3100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5.99">
            <text:p>15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247">
            <text:p>0,024</text:p>
          </table:table-cell>
          <table:table-cell table:style-name="ce12N2" office:value-type="float" office:value="6.99">
            <text:p>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04.36">
            <text:p>1304,36</text:p>
          </table:table-cell>
          <table:table-cell table:style-name="ce12N2" office:value-type="float" office:value="1.31">
            <text:p>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74">
            <text:p>11,7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10.48">
            <text:p>10,48</text:p>
          </table:table-cell>
          <table:table-cell table:style-name="ce12N2" office:value-type="float" office:value="1545.51">
            <text:p>1545,51</text:p>
          </table:table-cell>
          <table:table-cell table:style-name="ce12N2" office:value-type="float" office:value="108.17">
            <text:p>108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389171437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5">
            <text:p>310065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6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5.37">
            <text:p>1139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0681.1">
            <text:p>10681,10</text:p>
          </table:table-cell>
          <table:table-cell table:style-name="ce12N2" office:value-type="float" office:value="494">
            <text:p>494,00</text:p>
          </table:table-cell>
          <table:table-cell table:style-name="ce12N3" office:value-type="float" office:value="0.00792">
            <text:p>0,008</text:p>
          </table:table-cell>
          <table:table-cell table:style-name="ce12N2" office:value-type="float" office:value="13.11">
            <text:p>13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5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20.94">
            <text:p>10020,94</text:p>
          </table:table-cell>
          <table:table-cell table:style-name="ce12N2" office:value-type="float" office:value="10.02">
            <text:p>1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19">
            <text:p>90,19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220.27">
            <text:p>220,27</text:p>
          </table:table-cell>
          <table:table-cell table:style-name="ce12N2" office:value-type="float" office:value="11175.1">
            <text:p>11175,10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4570742000329550010000106821048503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8">
            <text:p>31006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6">
            <text:p>0,002</text:p>
          </table:table-cell>
          <table:table-cell table:style-name="ce12N2" office:value-type="float" office:value="4.85">
            <text:p>4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3.45">
            <text:p>1033,45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6.24">
            <text:p>1186,24</text:p>
          </table:table-cell>
          <table:table-cell table:style-name="ce12N2" office:value-type="float" office:value="47.45">
            <text:p>4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691623336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9">
            <text:p>31006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7.9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74">
            <text:p>0,003</text:p>
          </table:table-cell>
          <table:table-cell table:style-name="ce12N2" office:value-type="float" office:value="7.28">
            <text:p>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5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5.67">
            <text:p>1175,67</text:p>
          </table:table-cell>
          <table:table-cell table:style-name="ce12N2" office:value-type="float" office:value="47.03">
            <text:p>4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79721198929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3">
            <text:p>3100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31158651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81">
            <text:p>310081</text:p>
          </table:table-cell>
          <table:table-cell table:style-name="ce0" table:number-columns-spanned="4" table:number-rows-spanned="1" office:value-type="string" calcext:value-type="string">
            <text:p>31.293 - DOCOL INDUSTRIA E COMERCIO LTDA</text:p>
          </table:table-cell>
          <table:covered-table-cell table:number-columns-repeated="3"/>
          <table:table-cell table:style-name="ce0" office:value-type="string" calcext:value-type="string">
            <text:p>8.12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.54">
            <text:p>277,54</text:p>
          </table:table-cell>
          <table:table-cell table:style-name="ce12N2" office:value-type="float" office:value="310.5">
            <text:p>310,50</text:p>
          </table:table-cell>
          <table:table-cell table:style-name="ce12N3" office:value-type="float" office:value="0.080869">
            <text:p>0,081</text:p>
          </table:table-cell>
          <table:table-cell table:style-name="ce12N2" office:value-type="float" office:value="28.1">
            <text:p>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8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4.24">
            <text:p>234,24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8.04">
            <text:p>588,04</text:p>
          </table:table-cell>
          <table:table-cell table:style-name="ce12N2" office:value-type="float" office:value="41.16">
            <text:p>4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753390510012025500200000812610385541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6">
            <text:p>310116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1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22.22">
            <text:p>1622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2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684.01">
            <text:p>13684,01</text:p>
          </table:table-cell>
          <table:table-cell table:style-name="ce12N2" office:value-type="float" office:value="13.67">
            <text:p>1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16">
            <text:p>123,16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397.93">
            <text:p>397,93</text:p>
          </table:table-cell>
          <table:table-cell table:style-name="ce12N2" office:value-type="float" office:value="15824.29">
            <text:p>15824,29</text:p>
          </table:table-cell>
          <table:table-cell table:style-name="ce12N2" office:value-type="float" office:value="745.5">
            <text:p>7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2308456000149550050004571091168026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22">
            <text:p>3101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1.46">
            <text:p>7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76">
            <text:p>0,275</text:p>
          </table:table-cell>
          <table:table-cell table:style-name="ce12N2" office:value-type="float" office:value="1241.08">
            <text:p>124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61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5.82">
            <text:p>6025,82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5">
            <text:p>54,2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101.8">
            <text:p>101,80</text:p>
          </table:table-cell>
          <table:table-cell table:style-name="ce12N2" office:value-type="float" office:value="7059.66">
            <text:p>7059,66</text:p>
          </table:table-cell>
          <table:table-cell table:style-name="ce12N2" office:value-type="float" office:value="419.66">
            <text:p>41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632110531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0">
            <text:p>3101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4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408">
            <text:p>0,037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8.26">
            <text:p>1218,26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6">
            <text:p>10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3.48">
            <text:p>1443,48</text:p>
          </table:table-cell>
          <table:table-cell table:style-name="ce12N2" office:value-type="float" office:value="101.04">
            <text:p>1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4881356718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3">
            <text:p>3101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5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6.76">
            <text:p>86,76</text:p>
          </table:table-cell>
          <table:table-cell table:style-name="ce12N2" office:value-type="float" office:value="0.09">
            <text:p>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.8">
            <text:p>102,80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586137303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35">
            <text:p>3101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8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84">
            <text:p>0,004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4.41">
            <text:p>614,41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53">
            <text:p>5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8">
            <text:p>728,00</text:p>
          </table:table-cell>
          <table:table-cell table:style-name="ce12N2" office:value-type="float" office:value="50.96">
            <text:p>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848197179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3">
            <text:p>3101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80.12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38">
            <text:p>0,021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.67">
            <text:p>63,67</text:p>
          </table:table-cell>
          <table:table-cell table:style-name="ce12N2" office:value-type="float" office:value="0.07">
            <text:p>0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57">
            <text:p>0,57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46">
            <text:p>68,46</text:p>
          </table:table-cell>
          <table:table-cell table:style-name="ce12N2" office:value-type="float" office:value="4.79">
            <text:p>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75801902000126550000013801251878133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75">
            <text:p>310175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16.66">
            <text:p>5916,66</text:p>
          </table:table-cell>
          <table:table-cell table:style-name="ce12N2" office:value-type="float" office:value="1347.76">
            <text:p>1347,7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38.8">
            <text:p>673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1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78.63">
            <text:p>4978,63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.8">
            <text:p>44,8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7/2026</text:p>
          </table:table-cell>
          <table:table-cell table:style-name="ce12N2" office:value-type="float" office:value="525.62">
            <text:p>525,62</text:p>
          </table:table-cell>
          <table:table-cell table:style-name="ce12N2" office:value-type="float" office:value="5391.04">
            <text:p>5391,04</text:p>
          </table:table-cell>
          <table:table-cell table:style-name="ce12N2" office:value-type="float" office:value="215.64">
            <text:p>21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17781412000109550010000120921000337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1">
            <text:p>3102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4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31.88">
            <text:p>831,88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9">
            <text:p>7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.88">
            <text:p>954,88</text:p>
          </table:table-cell>
          <table:table-cell table:style-name="ce12N2" office:value-type="float" office:value="38.2">
            <text:p>3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719741845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3">
            <text:p>31025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791072520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5">
            <text:p>31025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11234211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8">
            <text:p>310258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825">
            <text:p>0,398</text:p>
          </table:table-cell>
          <table:table-cell table:style-name="ce12N2" office:value-type="float" office:value="87.06">
            <text:p>8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7.92">
            <text:p>1357,92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416656991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9">
            <text:p>31025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9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95">
            <text:p>0,121</text:p>
          </table:table-cell>
          <table:table-cell table:style-name="ce12N2" office:value-type="float" office:value="28.13">
            <text:p>28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09">
            <text:p>569,09</text:p>
          </table:table-cell>
          <table:table-cell table:style-name="ce12N2" office:value-type="float" office:value="22.76">
            <text:p>22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9228185967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11">
            <text:p>31031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10.6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.11">
            <text:p>160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461.61">
            <text:p>146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">
            <text:p>0,100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3.58">
            <text:p>1233,58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1">
            <text:p>11,11</text:p>
          </table:table-cell>
          <table:table-cell table:style-name="ce12N2" office:value-type="float" office:value="31.5">
            <text:p>31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42.5">
            <text:p>142,50</text:p>
          </table:table-cell>
          <table:table-cell table:style-name="ce12N2" office:value-type="float" office:value="1461.61">
            <text:p>1461,61</text:p>
          </table:table-cell>
          <table:table-cell table:style-name="ce12N2" office:value-type="float" office:value="102.31">
            <text:p>10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2.24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30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5260610713221000160550020000106861000146380</text:p>
          </table:table-cell>
          <table:table-cell table:style-name="ce0" office:value-type="string" calcext:value-type="string">
            <text:p>35260611389565000200570050004022401000886695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1">
            <text:p>31032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5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61">
            <text:p>1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63">
            <text:p>0,033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6.95">
            <text:p>936,95</text:p>
          </table:table-cell>
          <table:table-cell table:style-name="ce12N2" office:value-type="float" office:value="0.94">
            <text:p>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3">
            <text:p>8,43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3.41">
            <text:p>53,41</text:p>
          </table:table-cell>
          <table:table-cell table:style-name="ce12N2" office:value-type="float" office:value="1076.2">
            <text:p>1076,20</text:p>
          </table:table-cell>
          <table:table-cell table:style-name="ce12N2" office:value-type="float" office:value="43.75">
            <text:p>4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59031418254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3">
            <text:p>310323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7.484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95.42">
            <text:p>1639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77638">
            <text:p>0,478</text:p>
          </table:table-cell>
          <table:table-cell table:style-name="ce12N2" office:value-type="float" office:value="94.65">
            <text:p>9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95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830.82">
            <text:p>13830,82</text:p>
          </table:table-cell>
          <table:table-cell table:style-name="ce12N2" office:value-type="float" office:value="13.82">
            <text:p>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.48">
            <text:p>124,48</text:p>
          </table:table-cell>
          <table:table-cell table:style-name="ce12N2" office:value-type="float" office:value="75.25">
            <text:p>75,2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01.13">
            <text:p>401,13</text:p>
          </table:table-cell>
          <table:table-cell table:style-name="ce12N2" office:value-type="float" office:value="15994.29">
            <text:p>15994,29</text:p>
          </table:table-cell>
          <table:table-cell table:style-name="ce12N2" office:value-type="float" office:value="753.72">
            <text:p>7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230845600014955005000457484103384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6">
            <text:p>310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02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3.53">
            <text:p>212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53">
            <text:p>0,033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7.17">
            <text:p>1757,17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81">
            <text:p>15,8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41.51">
            <text:p>41,51</text:p>
          </table:table-cell>
          <table:table-cell table:style-name="ce12N2" office:value-type="float" office:value="2082.02">
            <text:p>2082,02</text:p>
          </table:table-cell>
          <table:table-cell table:style-name="ce12N2" office:value-type="float" office:value="145.74">
            <text:p>145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0271306783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9">
            <text:p>310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1.8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52">
            <text:p>0,014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0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8.8">
            <text:p>2008,80</text:p>
          </table:table-cell>
          <table:table-cell table:style-name="ce12N2" office:value-type="float" office:value="2.01">
            <text:p>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0.17">
            <text:p>2380,17</text:p>
          </table:table-cell>
          <table:table-cell table:style-name="ce12N2" office:value-type="float" office:value="166.61">
            <text:p>16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18201693583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3">
            <text:p>310353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7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3715.75">
            <text:p>53715,75</text:p>
          </table:table-cell>
          <table:table-cell table:style-name="ce12N2" office:value-type="float" office:value="8695.86">
            <text:p>8695,86</text:p>
          </table:table-cell>
          <table:table-cell table:style-name="ce12N3" office:value-type="float" office:value="256.85672">
            <text:p>256,857</text:p>
          </table:table-cell>
          <table:table-cell table:style-name="ce12N2" office:value-type="float" office:value="6302.75">
            <text:p>6302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.41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673.87">
            <text:p>52673,87</text:p>
          </table:table-cell>
          <table:table-cell table:style-name="ce12N2" office:value-type="float" office:value="52.66">
            <text:p>5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.07">
            <text:p>474,0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11.61">
            <text:p>62411,61</text:p>
          </table:table-cell>
          <table:table-cell table:style-name="ce12N2" office:value-type="float" office:value="4368.8">
            <text:p>436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878748200013755001000107936122899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6">
            <text:p>310356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5">
            <text:p>0,081</text:p>
          </table:table-cell>
          <table:table-cell table:style-name="ce12N2" office:value-type="float" office:value="14.7">
            <text:p>1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1.16">
            <text:p>2861,16</text:p>
          </table:table-cell>
          <table:table-cell table:style-name="ce12N2" office:value-type="float" office:value="2.86">
            <text:p>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75">
            <text:p>25,75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0.1">
            <text:p>3390,10</text:p>
          </table:table-cell>
          <table:table-cell table:style-name="ce12N2" office:value-type="float" office:value="237.31">
            <text:p>23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011538132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7">
            <text:p>31035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36.7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73.58">
            <text:p>1067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291">
            <text:p>0,500</text:p>
          </table:table-cell>
          <table:table-cell table:style-name="ce12N2" office:value-type="float" office:value="78.64">
            <text:p>7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7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81.81">
            <text:p>8981,81</text:p>
          </table:table-cell>
          <table:table-cell table:style-name="ce12N2" office:value-type="float" office:value="8.99">
            <text:p>8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.86">
            <text:p>80,86</text:p>
          </table:table-cell>
          <table:table-cell table:style-name="ce12N2" office:value-type="float" office:value="62.92">
            <text:p>62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1.3">
            <text:p>31,30</text:p>
          </table:table-cell>
          <table:table-cell table:style-name="ce12N2" office:value-type="float" office:value="10642.28">
            <text:p>10642,28</text:p>
          </table:table-cell>
          <table:table-cell table:style-name="ce12N2" office:value-type="float" office:value="744.97">
            <text:p>74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36701173183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59">
            <text:p>31035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4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92">
            <text:p>0,02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2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4.96">
            <text:p>474,96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2.77">
            <text:p>562,77</text:p>
          </table:table-cell>
          <table:table-cell table:style-name="ce12N2" office:value-type="float" office:value="39.39">
            <text:p>3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44201022787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6">
            <text:p>3103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1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3.33">
            <text:p>3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0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57.7">
            <text:p>1257,70</text:p>
          </table:table-cell>
          <table:table-cell table:style-name="ce12N2" office:value-type="float" office:value="1.26">
            <text:p>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32">
            <text:p>11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0.22">
            <text:p>1490,22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1811887638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0">
            <text:p>3103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2.5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06.22">
            <text:p>4006,22</text:p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06">
            <text:p>36,0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6.86">
            <text:p>4746,86</text:p>
          </table:table-cell>
          <table:table-cell table:style-name="ce12N2" office:value-type="float" office:value="332.28">
            <text:p>33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25531244497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4">
            <text:p>31038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88">
            <text:p>24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48">
            <text:p>0,036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70.93">
            <text:p>2370,93</text:p>
          </table:table-cell>
          <table:table-cell table:style-name="ce12N2" office:value-type="float" office:value="2.37">
            <text:p>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34">
            <text:p>21,3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2469.72">
            <text:p>2469,72</text:p>
          </table:table-cell>
          <table:table-cell table:style-name="ce12N2" office:value-type="float" office:value="98.79">
            <text:p>9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71511201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85">
            <text:p>31038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6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73.46">
            <text:p>236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">
            <text:p>68,0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05906">
            <text:p>1,106</text:p>
          </table:table-cell>
          <table:table-cell table:style-name="ce12N2" office:value-type="float" office:value="147.79">
            <text:p>147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7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028.11">
            <text:p>20028,11</text:p>
          </table:table-cell>
          <table:table-cell table:style-name="ce12N2" office:value-type="float" office:value="20.06">
            <text:p>2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5">
            <text:p>180,25</text:p>
          </table:table-cell>
          <table:table-cell table:style-name="ce12N2" office:value-type="float" office:value="92">
            <text:p>9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247.1">
            <text:p>247,10</text:p>
          </table:table-cell>
          <table:table-cell table:style-name="ce12N2" office:value-type="float" office:value="23426.36">
            <text:p>23426,36</text:p>
          </table:table-cell>
          <table:table-cell table:style-name="ce12N2" office:value-type="float" office:value="1356.9">
            <text:p>135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1604803000157550010008763181168068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6">
            <text:p>310416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0.9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69.85">
            <text:p>2486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99791">
            <text:p>2,500</text:p>
          </table:table-cell>
          <table:table-cell table:style-name="ce12N2" office:value-type="float" office:value="147.92">
            <text:p>14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6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027.58">
            <text:p>21027,58</text:p>
          </table:table-cell>
          <table:table-cell table:style-name="ce12N2" office:value-type="float" office:value="21.02">
            <text:p>2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.24">
            <text:p>189,24</text:p>
          </table:table-cell>
          <table:table-cell table:style-name="ce12N2" office:value-type="float" office:value="91.33">
            <text:p>91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39.52">
            <text:p>39,52</text:p>
          </table:table-cell>
          <table:table-cell table:style-name="ce12N2" office:value-type="float" office:value="24830.33">
            <text:p>24830,33</text:p>
          </table:table-cell>
          <table:table-cell table:style-name="ce12N2" office:value-type="float" office:value="1659.45">
            <text:p>16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9641520000158550010007709961660531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0">
            <text:p>31042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6.9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50.28">
            <text:p>575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50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5.23">
            <text:p>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6">
            <text:p>47,16</text:p>
          </table:table-cell>
          <table:table-cell table:style-name="ce12N2" office:value-type="float" office:value="39.16">
            <text:p>39,1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0.84">
            <text:p>510,84</text:p>
          </table:table-cell>
          <table:table-cell table:style-name="ce12N2" office:value-type="float" office:value="5239.44">
            <text:p>5239,44</text:p>
          </table:table-cell>
          <table:table-cell table:style-name="ce12N2" office:value-type="float" office:value="366.76">
            <text:p>36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8329608000144550010002669121002669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4">
            <text:p>310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83.0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7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67.24">
            <text:p>2767,24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91">
            <text:p>24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78.82">
            <text:p>3278,82</text:p>
          </table:table-cell>
          <table:table-cell table:style-name="ce12N2" office:value-type="float" office:value="229.52">
            <text:p>22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830691956017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5">
            <text:p>45,00</text:p>
          </table:table-cell>
          <table:table-cell table:style-name="ce26N2" office:value-type="float" office:value="1347.76">
            <text:p>1347,76</text:p>
          </table:table-cell>
          <table:table-cell table:style-name="ce26N2" office:value-type="float" office:value="9500.36">
            <text:p>9500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477.67">
            <text:p>3477,67</text:p>
          </table:table-cell>
          <table:table-cell table:style-name="ce26N2" office:value-type="float" office:value="269517.69">
            <text:p>269517,69</text:p>
          </table:table-cell>
          <table:table-cell table:style-name="ce26N2" office:value-type="float" office:value="17089.44">
            <text:p>17089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9.72">
            <text:p>89,72</text:p>
          </table:table-cell>
          <table:table-cell table:style-name="ce26N2" office:value-type="float" office:value="273015.36">
            <text:p>273015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4.708733">
            <text:p>264,709</text:p>
          </table:table-cell>
          <table:table-cell table:style-name="ce26N2" office:value-type="float" office:value="261385.09">
            <text:p>261385,09</text:p>
          </table:table-cell>
          <table:table-cell table:style-name="ce26N2" office:value-type="float" office:value="273015.36">
            <text:p>273015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26152.5">
            <text:p>226152,50</text:p>
          </table:table-cell>
          <table:table-cell table:style-name="ce26N2" office:value-type="float" office:value="226.15">
            <text:p>226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035.45">
            <text:p>2035,45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8901.59">
            <text:p>8901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.6">
            <text:p>56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32" meta:object-count="0"/>
    <meta:generator>LibreOffice/4.3.0.4$Windows_x86 LibreOffice_project/62ad5818884a2fc2e5780dd45466868d41009ec0</meta:generator>
  </office:meta>
</office:document-meta>
</file>