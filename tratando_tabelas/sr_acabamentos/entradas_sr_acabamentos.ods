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7/05/2026 07:16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0">
            <text:p>3075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2128378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1">
            <text:p>307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31188671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3">
            <text:p>307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.07">
            <text:p>14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11577662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7">
            <text:p>307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21165316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1">
            <text:p>307591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42.74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4552">
            <text:p>0,255</text:p>
          </table:table-cell>
          <table:table-cell table:style-name="ce12N2" office:value-type="float" office:value="31.92">
            <text:p>3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180.78">
            <text:p>18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763720000171550050012427491309781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7">
            <text:p>3075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0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8.05">
            <text:p>256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64">
            <text:p>40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9.97">
            <text:p>249,97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162.27">
            <text:p>1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005141786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6">
            <text:p>30774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.44">
            <text:p>289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57.23">
            <text:p>257,23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184.68">
            <text:p>1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58,4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601890733055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8">
            <text:p>3077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12">
            <text:p>0,041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387.54">
            <text:p>38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461949034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9">
            <text:p>3077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356.26">
            <text:p>35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616748368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0">
            <text:p>30776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7.87">
            <text:p>252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">
            <text:p>0,700</text:p>
          </table:table-cell>
          <table:table-cell table:style-name="ce12N2" office:value-type="float" office:value="145.8">
            <text:p>1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2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77.68">
            <text:p>177,68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624251000151550010000465991000345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3">
            <text:p>30776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74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7.91">
            <text:p>433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64">
            <text:p>0,021</text:p>
          </table:table-cell>
          <table:table-cell table:style-name="ce12N2" office:value-type="float" office:value="25.08">
            <text:p>2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92">
            <text:p>58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56.79">
            <text:p>156,79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167.24">
            <text:p>16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7481664365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6">
            <text:p>30777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2">
            <text:p>0,00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4.62">
            <text:p>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71951809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9">
            <text:p>307949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3.18">
            <text:p>28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15">
            <text:p>3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0.28">
            <text:p>290,28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181.5">
            <text:p>1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821002630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87.85">
            <text:p>3587,85</text:p>
          </table:table-cell>
          <table:table-cell table:style-name="ce26N2" office:value-type="float" office:value="84235.45">
            <text:p>84235,45</text:p>
          </table:table-cell>
          <table:table-cell table:style-name="ce26N2" office:value-type="float" office:value="5283.8">
            <text:p>5283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1.02">
            <text:p>231,02</text:p>
          </table:table-cell>
          <table:table-cell table:style-name="ce26N2" office:value-type="float" office:value="87823.3">
            <text:p>87823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390712">
            <text:p>3,391</text:p>
          </table:table-cell>
          <table:table-cell table:style-name="ce26N2" office:value-type="float" office:value="84235.45">
            <text:p>84235,45</text:p>
          </table:table-cell>
          <table:table-cell table:style-name="ce26N2" office:value-type="float" office:value="87823.3">
            <text:p>87823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726.59">
            <text:p>5726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46">
            <text:p>46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