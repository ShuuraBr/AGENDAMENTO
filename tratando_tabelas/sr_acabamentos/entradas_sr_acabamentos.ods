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1/05/2026 05:30:34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701">
            <text:p>306701</text:p>
          </table:table-cell>
          <table:table-cell table:style-name="ce0" table:number-columns-spanned="4" table:number-rows-spanned="1" office:value-type="string" calcext:value-type="string">
            <text:p>36.025 - FRESNOMAQ INDUSTRIA DE MAQUINAS S/A</text:p>
          </table:table-cell>
          <table:covered-table-cell table:number-columns-repeated="3"/>
          <table:table-cell table:style-name="ce0" office:value-type="string" calcext:value-type="string">
            <text:p>59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656">
            <text:p>0,200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158.4">
            <text:p>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6337280001186550010000599891874418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2">
            <text:p>30671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">
            <text:p>0,054</text:p>
          </table:table-cell>
          <table:table-cell table:style-name="ce12N2" office:value-type="float" office:value="18.6">
            <text:p>1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19.49">
            <text:p>1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91393486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5">
            <text:p>30671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656">
            <text:p>0,035</text:p>
          </table:table-cell>
          <table:table-cell table:style-name="ce12N2" office:value-type="float" office:value="16.14">
            <text:p>16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57.04">
            <text:p>5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7136963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7">
            <text:p>30671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3.84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5984">
            <text:p>0,096</text:p>
          </table:table-cell>
          <table:table-cell table:style-name="ce12N2" office:value-type="float" office:value="41.84">
            <text:p>41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0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74.94">
            <text:p>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38461061418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49">
            <text:p>30704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006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.72">
            <text:p>1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.2">
            <text:p>15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15.52">
            <text:p>15,52</text:p>
          </table:table-cell>
          <table:table-cell table:style-name="ce12N2" office:value-type="float" office:value="159.2">
            <text:p>159,20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0061727013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1">
            <text:p>307051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00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13.56">
            <text:p>741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754.95">
            <text:p>6754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1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658.61">
            <text:p>658,61</text:p>
          </table:table-cell>
          <table:table-cell table:style-name="ce12N2" office:value-type="float" office:value="6754.95">
            <text:p>6754,95</text:p>
          </table:table-cell>
          <table:table-cell table:style-name="ce12N2" office:value-type="float" office:value="468.39">
            <text:p>46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00513146947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4">
            <text:p>3070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3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.66">
            <text:p>5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.32">
            <text:p>51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276">
            <text:p>0,134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51.32">
            <text:p>51,32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3981473767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5">
            <text:p>3070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4.8">
            <text:p>26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4.8">
            <text:p>26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7">
            <text:p>0,001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4.8">
            <text:p>264,80</text:p>
          </table:table-cell>
          <table:table-cell table:style-name="ce12N2" office:value-type="float" office:value="18.54">
            <text:p>1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3991044656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6">
            <text:p>3070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4.85">
            <text:p>4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01438231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1">
            <text:p>307121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1.26">
            <text:p>117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7.21">
            <text:p>1067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916">
            <text:p>0,0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04.05">
            <text:p>104,05</text:p>
          </table:table-cell>
          <table:table-cell table:style-name="ce12N2" office:value-type="float" office:value="1067.21">
            <text:p>1067,21</text:p>
          </table:table-cell>
          <table:table-cell table:style-name="ce12N2" office:value-type="float" office:value="74.7">
            <text:p>7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891773232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70">
            <text:p>3071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58">
            <text:p>0,001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4.81">
            <text:p>404,81</text:p>
          </table:table-cell>
          <table:table-cell table:style-name="ce12N2" office:value-type="float" office:value="16.19">
            <text:p>1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101599979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2">
            <text:p>30718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4.0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4.81">
            <text:p>153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90.26">
            <text:p>149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038">
            <text:p>0,108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3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4.55">
            <text:p>44,55</text:p>
          </table:table-cell>
          <table:table-cell table:style-name="ce12N2" office:value-type="float" office:value="1490.26">
            <text:p>1490,26</text:p>
          </table:table-cell>
          <table:table-cell table:style-name="ce12N2" office:value-type="float" office:value="104.32">
            <text:p>1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40721860830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1">
            <text:p>3072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8.28">
            <text:p>376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3598.38">
            <text:p>3598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6658">
            <text:p>0,537</text:p>
          </table:table-cell>
          <table:table-cell table:style-name="ce12N2" office:value-type="float" office:value="34.56">
            <text:p>34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68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69.9">
            <text:p>169,90</text:p>
          </table:table-cell>
          <table:table-cell table:style-name="ce12N2" office:value-type="float" office:value="3598.38">
            <text:p>3598,38</text:p>
          </table:table-cell>
          <table:table-cell table:style-name="ce12N2" office:value-type="float" office:value="143.94">
            <text:p>14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41322627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2">
            <text:p>3072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801584930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4">
            <text:p>3072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415339611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3">
            <text:p>307273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4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05.98">
            <text:p>770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908.35">
            <text:p>6908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38516">
            <text:p>0,439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0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797.63">
            <text:p>797,63</text:p>
          </table:table-cell>
          <table:table-cell table:style-name="ce12N2" office:value-type="float" office:value="6908.35">
            <text:p>6908,35</text:p>
          </table:table-cell>
          <table:table-cell table:style-name="ce12N2" office:value-type="float" office:value="358.82">
            <text:p>35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42661501852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6">
            <text:p>3072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97">
            <text:p>52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91.06">
            <text:p>491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568">
            <text:p>0,014</text:p>
          </table:table-cell>
          <table:table-cell table:style-name="ce12N2" office:value-type="float" office:value="3.04">
            <text:p>3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1.91">
            <text:p>31,91</text:p>
          </table:table-cell>
          <table:table-cell table:style-name="ce12N2" office:value-type="float" office:value="491.06">
            <text:p>491,06</text:p>
          </table:table-cell>
          <table:table-cell table:style-name="ce12N2" office:value-type="float" office:value="34.38">
            <text:p>3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610674017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7">
            <text:p>3072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14">
            <text:p>0,004</text:p>
          </table:table-cell>
          <table:table-cell table:style-name="ce12N2" office:value-type="float" office:value="4.85">
            <text:p>4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2.7">
            <text:p>1122,70</text:p>
          </table:table-cell>
          <table:table-cell table:style-name="ce12N2" office:value-type="float" office:value="44.91">
            <text:p>4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51121039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80">
            <text:p>307280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2.17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5.63">
            <text:p>238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14.84">
            <text:p>221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166476">
            <text:p>20,166</text:p>
          </table:table-cell>
          <table:table-cell table:style-name="ce12N2" office:value-type="float" office:value="23.3">
            <text:p>2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.93">
            <text:p>43,9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70.79">
            <text:p>170,79</text:p>
          </table:table-cell>
          <table:table-cell table:style-name="ce12N2" office:value-type="float" office:value="2214.84">
            <text:p>2214,84</text:p>
          </table:table-cell>
          <table:table-cell table:style-name="ce12N2" office:value-type="float" office:value="88.59">
            <text:p>8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217712791756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81">
            <text:p>30728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2.17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62.99">
            <text:p>476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546">
            <text:p>454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38">
            <text:p>0,027</text:p>
          </table:table-cell>
          <table:table-cell table:style-name="ce12N2" office:value-type="float" office:value="21.28">
            <text:p>2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62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.63">
            <text:p>58,6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16.99">
            <text:p>216,99</text:p>
          </table:table-cell>
          <table:table-cell table:style-name="ce12N2" office:value-type="float" office:value="4546">
            <text:p>4546,00</text:p>
          </table:table-cell>
          <table:table-cell table:style-name="ce12N2" office:value-type="float" office:value="181.84">
            <text:p>18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21781534580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6">
            <text:p>3072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4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19.25">
            <text:p>411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19.25">
            <text:p>4119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013">
            <text:p>0,550</text:p>
          </table:table-cell>
          <table:table-cell table:style-name="ce12N2" office:value-type="float" office:value="250">
            <text:p>2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19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19.25">
            <text:p>4119,25</text:p>
          </table:table-cell>
          <table:table-cell table:style-name="ce12N2" office:value-type="float" office:value="164.77">
            <text:p>16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4171502977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1">
            <text:p>30731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.07">
            <text:p>44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8.84">
            <text:p>41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454">
            <text:p>0,134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6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7.23">
            <text:p>27,23</text:p>
          </table:table-cell>
          <table:table-cell table:style-name="ce12N2" office:value-type="float" office:value="418.84">
            <text:p>418,84</text:p>
          </table:table-cell>
          <table:table-cell table:style-name="ce12N2" office:value-type="float" office:value="23.54">
            <text:p>2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812284640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2">
            <text:p>30731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.43">
            <text:p>27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6.74">
            <text:p>25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64">
            <text:p>0,1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6.69">
            <text:p>16,69</text:p>
          </table:table-cell>
          <table:table-cell table:style-name="ce12N2" office:value-type="float" office:value="256.74">
            <text:p>256,74</text:p>
          </table:table-cell>
          <table:table-cell table:style-name="ce12N2" office:value-type="float" office:value="10.27">
            <text:p>10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712067759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3">
            <text:p>3073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09.61">
            <text:p>420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952.68">
            <text:p>3952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1828">
            <text:p>0,472</text:p>
          </table:table-cell>
          <table:table-cell table:style-name="ce12N2" office:value-type="float" office:value="7.22">
            <text:p>7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0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56.93">
            <text:p>256,93</text:p>
          </table:table-cell>
          <table:table-cell table:style-name="ce12N2" office:value-type="float" office:value="3952.68">
            <text:p>3952,68</text:p>
          </table:table-cell>
          <table:table-cell table:style-name="ce12N2" office:value-type="float" office:value="158.11">
            <text:p>15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715962084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4">
            <text:p>3073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.26">
            <text:p>50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70.66">
            <text:p>470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3032">
            <text:p>0,123</text:p>
          </table:table-cell>
          <table:table-cell table:style-name="ce12N2" office:value-type="float" office:value="4.49">
            <text:p>4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0.6">
            <text:p>30,60</text:p>
          </table:table-cell>
          <table:table-cell table:style-name="ce12N2" office:value-type="float" office:value="470.66">
            <text:p>470,66</text:p>
          </table:table-cell>
          <table:table-cell table:style-name="ce12N2" office:value-type="float" office:value="18.82">
            <text:p>1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61221787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7">
            <text:p>307317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16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.12">
            <text:p>172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3.43">
            <text:p>153,43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110.16">
            <text:p>11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160196202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5">
            <text:p>3073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6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194.87">
            <text:p>19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69019081947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6">
            <text:p>3073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67.67">
            <text:p>296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6.54">
            <text:p>2786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67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81.13">
            <text:p>181,13</text:p>
          </table:table-cell>
          <table:table-cell table:style-name="ce12N2" office:value-type="float" office:value="2786.54">
            <text:p>2786,54</text:p>
          </table:table-cell>
          <table:table-cell table:style-name="ce12N2" office:value-type="float" office:value="195.06">
            <text:p>19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081888143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1">
            <text:p>30733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7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.4">
            <text:p>50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99.2">
            <text:p>49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832">
            <text:p>0,033</text:p>
          </table:table-cell>
          <table:table-cell table:style-name="ce12N2" office:value-type="float" office:value="5.78">
            <text:p>5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499.2">
            <text:p>499,20</text:p>
          </table:table-cell>
          <table:table-cell table:style-name="ce12N2" office:value-type="float" office:value="28.3">
            <text:p>2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78201370188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3">
            <text:p>3073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9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3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71.66">
            <text:p>7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9571193331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3">
            <text:p>307353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3.2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6.41">
            <text:p>220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942">
            <text:p>1942,0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004">
            <text:p>0,000</text:p>
          </table:table-cell>
          <table:table-cell table:style-name="ce12N2" office:value-type="float" office:value="5.8">
            <text:p>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6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79.41">
            <text:p>179,41</text:p>
          </table:table-cell>
          <table:table-cell table:style-name="ce12N2" office:value-type="float" office:value="2027">
            <text:p>2027,00</text:p>
          </table:table-cell>
          <table:table-cell table:style-name="ce12N2" office:value-type="float" office:value="81.07">
            <text:p>8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32181828516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0">
            <text:p>307370</text:p>
          </table:table-cell>
          <table:table-cell table:style-name="ce0" table:number-columns-spanned="4" table:number-rows-spanned="1" office:value-type="string" calcext:value-type="string">
            <text:p>21.329 - S &amp; L SOUZA E LIMA FABRICACAO E COMERCIO DE LUMINARIAS LTDA</text:p>
          </table:table-cell>
          <table:covered-table-cell table:number-columns-repeated="3"/>
          <table:table-cell table:style-name="ce0" office:value-type="string" calcext:value-type="string">
            <text:p>48.2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3.81">
            <text:p>683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3.06">
            <text:p>623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56">
            <text:p>0,0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3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60.75">
            <text:p>60,75</text:p>
          </table:table-cell>
          <table:table-cell table:style-name="ce12N2" office:value-type="float" office:value="623.06">
            <text:p>623,06</text:p>
          </table:table-cell>
          <table:table-cell table:style-name="ce12N2" office:value-type="float" office:value="43.61">
            <text:p>4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94416000195550010000482621000254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5">
            <text:p>307375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61.9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73.06">
            <text:p>887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890.92">
            <text:p>7890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">
            <text:p>0,006</text:p>
          </table:table-cell>
          <table:table-cell table:style-name="ce12N2" office:value-type="float" office:value="7.8">
            <text:p>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73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19">
            <text:p>44,1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982.14">
            <text:p>982,14</text:p>
          </table:table-cell>
          <table:table-cell table:style-name="ce12N2" office:value-type="float" office:value="7890.92">
            <text:p>7890,92</text:p>
          </table:table-cell>
          <table:table-cell table:style-name="ce12N2" office:value-type="float" office:value="552.36">
            <text:p>55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190610026190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8">
            <text:p>30737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9.96">
            <text:p>136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349.3">
            <text:p>134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2352">
            <text:p>0,122</text:p>
          </table:table-cell>
          <table:table-cell table:style-name="ce12N2" office:value-type="float" office:value="6.73">
            <text:p>6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9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1349.3">
            <text:p>1349,30</text:p>
          </table:table-cell>
          <table:table-cell table:style-name="ce12N2" office:value-type="float" office:value="94.45">
            <text:p>9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6021560856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1">
            <text:p>307391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8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8.36">
            <text:p>93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5">
            <text:p>8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8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83.36">
            <text:p>83,36</text:p>
          </table:table-cell>
          <table:table-cell table:style-name="ce12N2" office:value-type="float" office:value="855">
            <text:p>855,00</text:p>
          </table:table-cell>
          <table:table-cell table:style-name="ce12N2" office:value-type="float" office:value="59.85">
            <text:p>5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8.94">
            <text:p>1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18,9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851510571498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2">
            <text:p>307392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.13">
            <text:p>37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1.8">
            <text:p>34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33.33">
            <text:p>33,33</text:p>
          </table:table-cell>
          <table:table-cell table:style-name="ce12N2" office:value-type="float" office:value="341.8">
            <text:p>341,80</text:p>
          </table:table-cell>
          <table:table-cell table:style-name="ce12N2" office:value-type="float" office:value="23.93">
            <text:p>2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.57">
            <text:p>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7,57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861111696979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7">
            <text:p>3073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6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14.2">
            <text:p>1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481644529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2">
            <text:p>307402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40.49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872">
            <text:p>1,987</text:p>
          </table:table-cell>
          <table:table-cell table:style-name="ce12N2" office:value-type="float" office:value="5453.76">
            <text:p>545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50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1365.25">
            <text:p>136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40001404991623793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5">
            <text:p>307425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3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.5">
            <text:p>38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41.12">
            <text:p>4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160810000161550010000073791608989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6">
            <text:p>307426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">
            <text:p>0,024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.01">
            <text:p>46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53.49">
            <text:p>5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1608100001615500100000738013213497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3">
            <text:p>307463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6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5.43">
            <text:p>125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63.96">
            <text:p>116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91.47">
            <text:p>91,47</text:p>
          </table:table-cell>
          <table:table-cell table:style-name="ce12N2" office:value-type="float" office:value="1163.96">
            <text:p>1163,96</text:p>
          </table:table-cell>
          <table:table-cell table:style-name="ce12N2" office:value-type="float" office:value="81.47">
            <text:p>8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5.34">
            <text:p>2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25,3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621339755688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0">
            <text:p>307470</text:p>
          </table:table-cell>
          <table:table-cell table:style-name="ce0" table:number-columns-spanned="4" table:number-rows-spanned="1" office:value-type="string" calcext:value-type="string">
            <text:p>28.259 - IMD COMERCIO DE MOVEIS LTDA</text:p>
          </table:table-cell>
          <table:covered-table-cell table:number-columns-repeated="3"/>
          <table:table-cell table:style-name="ce0" office:value-type="string" calcext:value-type="string">
            <text:p>410.501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35.23">
            <text:p>253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10">
            <text:p>23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">
            <text:p>14,000</text:p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35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25.23">
            <text:p>225,23</text:p>
          </table:table-cell>
          <table:table-cell table:style-name="ce12N2" office:value-type="float" office:value="2310">
            <text:p>2310,00</text:p>
          </table:table-cell>
          <table:table-cell table:style-name="ce12N2" office:value-type="float" office:value="92.4">
            <text:p>9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3961151000447550060004105011217621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2">
            <text:p>30747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9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8.23">
            <text:p>242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410.9">
            <text:p>2410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4932">
            <text:p>0,245</text:p>
          </table:table-cell>
          <table:table-cell table:style-name="ce12N2" office:value-type="float" office:value="21.65">
            <text:p>2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28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">
            <text:p>1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7.33">
            <text:p>17,33</text:p>
          </table:table-cell>
          <table:table-cell table:style-name="ce12N2" office:value-type="float" office:value="2410.9">
            <text:p>2410,90</text:p>
          </table:table-cell>
          <table:table-cell table:style-name="ce12N2" office:value-type="float" office:value="164.1">
            <text:p>16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9831576786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5">
            <text:p>3074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85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1.6">
            <text:p>335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1.6">
            <text:p>335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36">
            <text:p>0,001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1.6">
            <text:p>3351,60</text:p>
          </table:table-cell>
          <table:table-cell table:style-name="ce12N2" office:value-type="float" office:value="234.61">
            <text:p>23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85115209129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01">
            <text:p>307501</text:p>
          </table:table-cell>
          <table:table-cell table:style-name="ce0" table:number-columns-spanned="4" table:number-rows-spanned="1" office:value-type="string" calcext:value-type="string">
            <text:p>38.599 - S&amp;L IMPORTS COMERCIO DE IMPORTACAO E EXPORTACAO DE PRODUTOS</text:p>
          </table:table-cell>
          <table:covered-table-cell table:number-columns-repeated="3"/>
          <table:table-cell table:style-name="ce0" office:value-type="string" calcext:value-type="string">
            <text:p>19.7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0.64">
            <text:p>96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5.3">
            <text:p>87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6">
            <text:p>0,0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0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85.34">
            <text:p>85,34</text:p>
          </table:table-cell>
          <table:table-cell table:style-name="ce12N2" office:value-type="float" office:value="875.3">
            <text:p>875,30</text:p>
          </table:table-cell>
          <table:table-cell table:style-name="ce12N2" office:value-type="float" office:value="35.01">
            <text:p>3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37653120001455500100001975010003290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06">
            <text:p>307506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6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80.14">
            <text:p>598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5541.97">
            <text:p>5541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80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438.17">
            <text:p>438,17</text:p>
          </table:table-cell>
          <table:table-cell table:style-name="ce12N2" office:value-type="float" office:value="5541.97">
            <text:p>5541,97</text:p>
          </table:table-cell>
          <table:table-cell table:style-name="ce12N2" office:value-type="float" office:value="387.94">
            <text:p>387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0.72">
            <text:p>12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120,72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611055606702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40">
            <text:p>307540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6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2.66">
            <text:p>441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412.66">
            <text:p>4412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01">
            <text:p>0,005</text:p>
          </table:table-cell>
          <table:table-cell table:style-name="ce12N2" office:value-type="float" office:value="5.95">
            <text:p>5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12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.33">
            <text:p>6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2.66">
            <text:p>4412,66</text:p>
          </table:table-cell>
          <table:table-cell table:style-name="ce12N2" office:value-type="float" office:value="176.5">
            <text:p>17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05104359000122550010000046901793546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0">
            <text:p>3075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212837875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1">
            <text:p>3075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311886719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3">
            <text:p>3075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1.07">
            <text:p>149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0.07">
            <text:p>1400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83">
            <text:p>0,022</text:p>
          </table:table-cell>
          <table:table-cell table:style-name="ce12N2" office:value-type="float" office:value="12.6">
            <text:p>1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1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91">
            <text:p>91,00</text:p>
          </table:table-cell>
          <table:table-cell table:style-name="ce12N2" office:value-type="float" office:value="1400.07">
            <text:p>1400,07</text:p>
          </table:table-cell>
          <table:table-cell table:style-name="ce12N2" office:value-type="float" office:value="56">
            <text:p>5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115776628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7">
            <text:p>3075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21165316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52">
            <text:p>52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200.31">
            <text:p>5200,31</text:p>
          </table:table-cell>
          <table:table-cell table:style-name="ce26N2" office:value-type="float" office:value="111493.56">
            <text:p>111493,56</text:p>
          </table:table-cell>
          <table:table-cell table:style-name="ce26N2" office:value-type="float" office:value="6562.71">
            <text:p>6562,7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72.57">
            <text:p>172,57</text:p>
          </table:table-cell>
          <table:table-cell table:style-name="ce26N2" office:value-type="float" office:value="116693.87">
            <text:p>116693,8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9.848973">
            <text:p>39,849</text:p>
          </table:table-cell>
          <table:table-cell table:style-name="ce26N2" office:value-type="float" office:value="111408.56">
            <text:p>111408,56</text:p>
          </table:table-cell>
          <table:table-cell table:style-name="ce26N2" office:value-type="float" office:value="116693.87">
            <text:p>116693,8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075.66">
            <text:p>6075,6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.38">
            <text:p>40,3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74" meta:object-count="0"/>
    <meta:generator>LibreOffice/4.3.0.4$Windows_x86 LibreOffice_project/62ad5818884a2fc2e5780dd45466868d41009ec0</meta:generator>
  </office:meta>
</office:document-meta>
</file>