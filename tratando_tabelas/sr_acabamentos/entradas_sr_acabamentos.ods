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2/06/2026 04:30:2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7">
            <text:p>307317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160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7.12">
            <text:p>172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73.69">
            <text:p>1573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2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53.43">
            <text:p>153,43</text:p>
          </table:table-cell>
          <table:table-cell table:style-name="ce12N2" office:value-type="float" office:value="1573.69">
            <text:p>1573,69</text:p>
          </table:table-cell>
          <table:table-cell table:style-name="ce12N2" office:value-type="float" office:value="110.16">
            <text:p>11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1601962020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53">
            <text:p>307753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7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77.49">
            <text:p>5277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08.64">
            <text:p>480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77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468.85">
            <text:p>468,85</text:p>
          </table:table-cell>
          <table:table-cell table:style-name="ce12N2" office:value-type="float" office:value="4808.64">
            <text:p>4808,64</text:p>
          </table:table-cell>
          <table:table-cell table:style-name="ce12N2" office:value-type="float" office:value="192.35">
            <text:p>192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77162630001025500100001076313972643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49">
            <text:p>307949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3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83.18">
            <text:p>288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592.9">
            <text:p>2592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8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1.15">
            <text:p>31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90.28">
            <text:p>290,28</text:p>
          </table:table-cell>
          <table:table-cell table:style-name="ce12N2" office:value-type="float" office:value="2592.9">
            <text:p>2592,90</text:p>
          </table:table-cell>
          <table:table-cell table:style-name="ce12N2" office:value-type="float" office:value="181.5">
            <text:p>18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296080001445500100026308210026308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60">
            <text:p>30796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0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9.44">
            <text:p>4249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49.44">
            <text:p>424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09">
            <text:p>0,009</text:p>
          </table:table-cell>
          <table:table-cell table:style-name="ce12N2" office:value-type="float" office:value="5.26">
            <text:p>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49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49.44">
            <text:p>4249,44</text:p>
          </table:table-cell>
          <table:table-cell table:style-name="ce12N2" office:value-type="float" office:value="297.46">
            <text:p>297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0991134288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1">
            <text:p>3080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71499456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2">
            <text:p>3080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09">
            <text:p>140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0.27">
            <text:p>1320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383">
            <text:p>0,022</text:p>
          </table:table-cell>
          <table:table-cell table:style-name="ce12N2" office:value-type="float" office:value="8.4">
            <text:p>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85.82">
            <text:p>85,82</text:p>
          </table:table-cell>
          <table:table-cell table:style-name="ce12N2" office:value-type="float" office:value="1320.27">
            <text:p>1320,27</text:p>
          </table:table-cell>
          <table:table-cell table:style-name="ce12N2" office:value-type="float" office:value="52.81">
            <text:p>5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819510635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9">
            <text:p>308059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4.1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9.88">
            <text:p>3149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92.6">
            <text:p>2792,6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2995">
            <text:p>0,030</text:p>
          </table:table-cell>
          <table:table-cell table:style-name="ce12N2" office:value-type="float" office:value="27.4">
            <text:p>2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49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62">
            <text:p>41,6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72.28">
            <text:p>272,28</text:p>
          </table:table-cell>
          <table:table-cell table:style-name="ce12N2" office:value-type="float" office:value="2877.6">
            <text:p>2877,60</text:p>
          </table:table-cell>
          <table:table-cell table:style-name="ce12N2" office:value-type="float" office:value="115.11">
            <text:p>115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41321753896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3">
            <text:p>3080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6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532">
            <text:p>0,024</text:p>
          </table:table-cell>
          <table:table-cell table:style-name="ce12N2" office:value-type="float" office:value="5.34">
            <text:p>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8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37.1">
            <text:p>6737,10</text:p>
          </table:table-cell>
          <table:table-cell table:style-name="ce12N2" office:value-type="float" office:value="6.74">
            <text:p>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63">
            <text:p>60,6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558.78">
            <text:p>558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6041015211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9">
            <text:p>308089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5.8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5">
            <text:p>0,045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6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.75">
            <text:p>131,75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9">
            <text:p>1,19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10.93">
            <text:p>1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583119611538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0">
            <text:p>308150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0.8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44.93">
            <text:p>2744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703.31">
            <text:p>2703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3712">
            <text:p>0,144</text:p>
          </table:table-cell>
          <table:table-cell table:style-name="ce12N2" office:value-type="float" office:value="12.87">
            <text:p>12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44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41.62">
            <text:p>41,62</text:p>
          </table:table-cell>
          <table:table-cell table:style-name="ce12N2" office:value-type="float" office:value="2703.31">
            <text:p>2703,31</text:p>
          </table:table-cell>
          <table:table-cell table:style-name="ce12N2" office:value-type="float" office:value="161.45">
            <text:p>16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082916345435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2">
            <text:p>30819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3.1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94.49">
            <text:p>7894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678.21">
            <text:p>7678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419">
            <text:p>0,010</text:p>
          </table:table-cell>
          <table:table-cell table:style-name="ce12N2" office:value-type="float" office:value="2.82">
            <text:p>2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94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80.21">
            <text:p>6480,21</text:p>
          </table:table-cell>
          <table:table-cell table:style-name="ce12N2" office:value-type="float" office:value="6.48">
            <text:p>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32">
            <text:p>58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216.28">
            <text:p>216,28</text:p>
          </table:table-cell>
          <table:table-cell table:style-name="ce12N2" office:value-type="float" office:value="7678.21">
            <text:p>7678,21</text:p>
          </table:table-cell>
          <table:table-cell table:style-name="ce12N2" office:value-type="float" office:value="537.47">
            <text:p>53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313316604285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03">
            <text:p>30820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3.65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4.99">
            <text:p>375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754.99">
            <text:p>3754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367">
            <text:p>0,009</text:p>
          </table:table-cell>
          <table:table-cell table:style-name="ce12N2" office:value-type="float" office:value="2.08">
            <text:p>2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54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72.04">
            <text:p>3172,04</text:p>
          </table:table-cell>
          <table:table-cell table:style-name="ce12N2" office:value-type="float" office:value="3.17">
            <text:p>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55">
            <text:p>28,5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54.99">
            <text:p>3754,99</text:p>
          </table:table-cell>
          <table:table-cell table:style-name="ce12N2" office:value-type="float" office:value="259.62">
            <text:p>25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36581960918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4">
            <text:p>308244</text:p>
          </table:table-cell>
          <table:table-cell table:style-name="ce0" table:number-columns-spanned="4" table:number-rows-spanned="1" office:value-type="string" calcext:value-type="string">
            <text:p>32.049 - M T A INDUSTRIA E COMERCIO DE ARTEFATOS DE INOX LTDA</text:p>
          </table:table-cell>
          <table:covered-table-cell table:number-columns-repeated="3"/>
          <table:table-cell table:style-name="ce0" office:value-type="string" calcext:value-type="string">
            <text:p>144.6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49.31">
            <text:p>724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6806.86">
            <text:p>6806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49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3.17">
            <text:p>73,1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442.45">
            <text:p>442,45</text:p>
          </table:table-cell>
          <table:table-cell table:style-name="ce12N2" office:value-type="float" office:value="6806.86">
            <text:p>6806,86</text:p>
          </table:table-cell>
          <table:table-cell table:style-name="ce12N2" office:value-type="float" office:value="412.98">
            <text:p>41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854788570001745500100014463210029382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98">
            <text:p>308298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83.8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29.4">
            <text:p>1472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29.4">
            <text:p>147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424">
            <text:p>0,084</text:p>
          </table:table-cell>
          <table:table-cell table:style-name="ce12N2" office:value-type="float" office:value="125.7">
            <text:p>125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2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8388716860993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99">
            <text:p>30829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86.8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58.52">
            <text:p>17458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7458.52">
            <text:p>17458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9403">
            <text:p>0,509</text:p>
          </table:table-cell>
          <table:table-cell table:style-name="ce12N2" office:value-type="float" office:value="227.97">
            <text:p>227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458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8685118142680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1">
            <text:p>30830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86.8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78.06">
            <text:p>17278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7278.06">
            <text:p>17278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6768">
            <text:p>0,147</text:p>
          </table:table-cell>
          <table:table-cell table:style-name="ce12N2" office:value-type="float" office:value="161.33">
            <text:p>161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278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8685319431096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9">
            <text:p>308309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3.38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39.06">
            <text:p>333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81">
            <text:p>318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">
            <text:p>0,006</text:p>
          </table:table-cell>
          <table:table-cell table:style-name="ce12N2" office:value-type="float" office:value="138">
            <text:p>1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39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4.29">
            <text:p>44,2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58.06">
            <text:p>158,06</text:p>
          </table:table-cell>
          <table:table-cell table:style-name="ce12N2" office:value-type="float" office:value="3181">
            <text:p>3181,00</text:p>
          </table:table-cell>
          <table:table-cell table:style-name="ce12N2" office:value-type="float" office:value="127.24">
            <text:p>12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338118819197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0">
            <text:p>308310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2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86.01">
            <text:p>478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336.39">
            <text:p>433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86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449.62">
            <text:p>449,62</text:p>
          </table:table-cell>
          <table:table-cell table:style-name="ce12N2" office:value-type="float" office:value="4336.39">
            <text:p>4336,39</text:p>
          </table:table-cell>
          <table:table-cell table:style-name="ce12N2" office:value-type="float" office:value="173.46">
            <text:p>17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587017000285550010000402411137711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7">
            <text:p>308317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9.8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76.61">
            <text:p>727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">
            <text:p>47,00</text:p>
          </table:table-cell>
          <table:table-cell table:style-name="ce12N2" office:value-type="float" office:value="7185.25">
            <text:p>718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1963">
            <text:p>0,232</text:p>
          </table:table-cell>
          <table:table-cell table:style-name="ce12N2" office:value-type="float" office:value="32.52">
            <text:p>32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76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98.26">
            <text:p>6098,26</text:p>
          </table:table-cell>
          <table:table-cell table:style-name="ce12N2" office:value-type="float" office:value="6.06">
            <text:p>6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86">
            <text:p>54,86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91.36">
            <text:p>91,36</text:p>
          </table:table-cell>
          <table:table-cell table:style-name="ce12N2" office:value-type="float" office:value="7185.25">
            <text:p>7185,25</text:p>
          </table:table-cell>
          <table:table-cell table:style-name="ce12N2" office:value-type="float" office:value="465.38">
            <text:p>46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6985017255504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29">
            <text:p>308329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3.425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38.95">
            <text:p>7438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7241.76">
            <text:p>7241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9335">
            <text:p>0,219</text:p>
          </table:table-cell>
          <table:table-cell table:style-name="ce12N2" office:value-type="float" office:value="47.95">
            <text:p>47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38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85.74">
            <text:p>6285,74</text:p>
          </table:table-cell>
          <table:table-cell table:style-name="ce12N2" office:value-type="float" office:value="6.28">
            <text:p>6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58">
            <text:p>56,58</text:p>
          </table:table-cell>
          <table:table-cell table:style-name="ce12N2" office:value-type="float" office:value="75.5">
            <text:p>75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97.19">
            <text:p>197,19</text:p>
          </table:table-cell>
          <table:table-cell table:style-name="ce12N2" office:value-type="float" office:value="7241.76">
            <text:p>7241,76</text:p>
          </table:table-cell>
          <table:table-cell table:style-name="ce12N2" office:value-type="float" office:value="315.39">
            <text:p>315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3084560001495500500045342515510220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1">
            <text:p>308331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2.4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0.51">
            <text:p>110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93.98">
            <text:p>1093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374">
            <text:p>0,194</text:p>
          </table:table-cell>
          <table:table-cell table:style-name="ce12N2" office:value-type="float" office:value="9.16">
            <text:p>9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0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8.49">
            <text:p>938,49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6.53">
            <text:p>6,53</text:p>
          </table:table-cell>
          <table:table-cell table:style-name="ce12N2" office:value-type="float" office:value="1093.98">
            <text:p>1093,98</text:p>
          </table:table-cell>
          <table:table-cell table:style-name="ce12N2" office:value-type="float" office:value="59.82">
            <text:p>59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242012877018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2">
            <text:p>30833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2.4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4.12">
            <text:p>138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362.12">
            <text:p>1362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412">
            <text:p>0,080</text:p>
          </table:table-cell>
          <table:table-cell table:style-name="ce12N2" office:value-type="float" office:value="6.05">
            <text:p>6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53.47">
            <text:p>1153,47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38">
            <text:p>10,38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1362.12">
            <text:p>1362,12</text:p>
          </table:table-cell>
          <table:table-cell table:style-name="ce12N2" office:value-type="float" office:value="91.06">
            <text:p>9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241918177188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3">
            <text:p>308333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2.6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8.74">
            <text:p>83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36.56">
            <text:p>836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6602">
            <text:p>0,077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8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6.04">
            <text:p>706,04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5">
            <text:p>6,35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.18">
            <text:p>2,18</text:p>
          </table:table-cell>
          <table:table-cell table:style-name="ce12N2" office:value-type="float" office:value="836.56">
            <text:p>836,56</text:p>
          </table:table-cell>
          <table:table-cell table:style-name="ce12N2" office:value-type="float" office:value="58.56">
            <text:p>58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269815156048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94">
            <text:p>3083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5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3.62">
            <text:p>354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27.34">
            <text:p>3327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43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08.18">
            <text:p>2808,18</text:p>
          </table:table-cell>
          <table:table-cell table:style-name="ce12N2" office:value-type="float" office:value="2.81">
            <text:p>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27">
            <text:p>25,2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16.28">
            <text:p>216,28</text:p>
          </table:table-cell>
          <table:table-cell table:style-name="ce12N2" office:value-type="float" office:value="3327.34">
            <text:p>3327,34</text:p>
          </table:table-cell>
          <table:table-cell table:style-name="ce12N2" office:value-type="float" office:value="232.91">
            <text:p>23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5501077625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3">
            <text:p>308423</text:p>
          </table:table-cell>
          <table:table-cell table:style-name="ce0" table:number-columns-spanned="4" table:number-rows-spanned="1" office:value-type="string" calcext:value-type="string">
            <text:p>709 - MAX EBERHARDT UTILIDADES DOMESTICAS IMPORTACAO E REPRES LTDA</text:p>
          </table:table-cell>
          <table:covered-table-cell table:number-columns-repeated="3"/>
          <table:table-cell table:style-name="ce0" office:value-type="string" calcext:value-type="string">
            <text:p>157.3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3.04">
            <text:p>2543,04</text:p>
          </table:table-cell>
          <table:table-cell table:style-name="ce12N2" office:value-type="float" office:value="196.45">
            <text:p>196,45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584.28">
            <text:p>2584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846">
            <text:p>0,128</text:p>
          </table:table-cell>
          <table:table-cell table:style-name="ce12N2" office:value-type="float" office:value="24.42">
            <text:p>2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43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55.21">
            <text:p>155,21</text:p>
          </table:table-cell>
          <table:table-cell table:style-name="ce12N2" office:value-type="float" office:value="2387.83">
            <text:p>2387,83</text:p>
          </table:table-cell>
          <table:table-cell table:style-name="ce12N2" office:value-type="float" office:value="167.15">
            <text:p>167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23.4">
            <text:p>12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0.316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9/05/2026</text:p>
          </table:table-cell>
          <table:table-cell table:style-name="ce12" office:value-type="string" calcext:value-type="string">
            <text:p>123,40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35260556991334000129550010001573961500448800</text:p>
          </table:table-cell>
          <table:table-cell table:style-name="ce0" office:value-type="string" calcext:value-type="string">
            <text:p>35260511389565000200570050004003161000865962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6">
            <text:p>308426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75.75">
            <text:p>717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6640.2">
            <text:p>6640,20</text:p>
          </table:table-cell>
          <table:table-cell table:style-name="ce12N2" office:value-type="float" office:value="468">
            <text:p>468,00</text:p>
          </table:table-cell>
          <table:table-cell table:style-name="ce12N3" office:value-type="float" office:value="0.0015">
            <text:p>0,002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75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51.17">
            <text:p>6351,17</text:p>
          </table:table-cell>
          <table:table-cell table:style-name="ce12N2" office:value-type="float" office:value="6.35">
            <text:p>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17">
            <text:p>57,17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67.55">
            <text:p>67,55</text:p>
          </table:table-cell>
          <table:table-cell table:style-name="ce12N2" office:value-type="float" office:value="7108.2">
            <text:p>7108,20</text:p>
          </table:table-cell>
          <table:table-cell table:style-name="ce12N2" office:value-type="float" office:value="497.57">
            <text:p>497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8318195992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7">
            <text:p>308437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61.8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86.4">
            <text:p>428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024.8">
            <text:p>402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41.66">
            <text:p>41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8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96.78">
            <text:p>3396,78</text:p>
          </table:table-cell>
          <table:table-cell table:style-name="ce12N2" office:value-type="float" office:value="3.4">
            <text:p>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56">
            <text:p>30,56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61.6">
            <text:p>261,60</text:p>
          </table:table-cell>
          <table:table-cell table:style-name="ce12N2" office:value-type="float" office:value="4024.8">
            <text:p>4024,80</text:p>
          </table:table-cell>
          <table:table-cell table:style-name="ce12N2" office:value-type="float" office:value="281.76">
            <text:p>28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50238000114550010013618121299841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55">
            <text:p>308455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3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5.63">
            <text:p>226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10.1">
            <text:p>201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9">
            <text:p>0,017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65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56.34">
            <text:p>1856,34</text:p>
          </table:table-cell>
          <table:table-cell table:style-name="ce12N2" office:value-type="float" office:value="1.86">
            <text:p>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71">
            <text:p>16,7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55.53">
            <text:p>255,53</text:p>
          </table:table-cell>
          <table:table-cell table:style-name="ce12N2" office:value-type="float" office:value="2010.1">
            <text:p>2010,10</text:p>
          </table:table-cell>
          <table:table-cell table:style-name="ce12N2" office:value-type="float" office:value="80.4">
            <text:p>8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5870170002855500100004033814265748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0">
            <text:p>308460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2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7.06">
            <text:p>364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633.78">
            <text:p>3633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4525">
            <text:p>0,105</text:p>
          </table:table-cell>
          <table:table-cell table:style-name="ce12N2" office:value-type="float" office:value="22.39">
            <text:p>22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7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94.11">
            <text:p>3094,11</text:p>
          </table:table-cell>
          <table:table-cell table:style-name="ce12N2" office:value-type="float" office:value="3.08">
            <text:p>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86">
            <text:p>27,86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3.28">
            <text:p>13,28</text:p>
          </table:table-cell>
          <table:table-cell table:style-name="ce12N2" office:value-type="float" office:value="3633.78">
            <text:p>3633,78</text:p>
          </table:table-cell>
          <table:table-cell table:style-name="ce12N2" office:value-type="float" office:value="224.27">
            <text:p>2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29917400163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4">
            <text:p>308464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2.5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91.2">
            <text:p>459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591.2">
            <text:p>459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46.88">
            <text:p>246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9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74.86">
            <text:p>3874,86</text:p>
          </table:table-cell>
          <table:table-cell table:style-name="ce12N2" office:value-type="float" office:value="3.87">
            <text:p>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88">
            <text:p>34,8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91.2">
            <text:p>4591,20</text:p>
          </table:table-cell>
          <table:table-cell table:style-name="ce12N2" office:value-type="float" office:value="321.38">
            <text:p>32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25531656758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73">
            <text:p>308473</text:p>
          </table:table-cell>
          <table:table-cell table:style-name="ce0" table:number-columns-spanned="4" table:number-rows-spanned="1" office:value-type="string" calcext:value-type="string">
            <text:p>35.983 - SUVINIL COATINGS S.A</text:p>
          </table:table-cell>
          <table:covered-table-cell table:number-columns-repeated="3"/>
          <table:table-cell table:style-name="ce0" office:value-type="string" calcext:value-type="string">
            <text:p>194.63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74.3">
            <text:p>457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74.3">
            <text:p>457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7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85.13">
            <text:p>3985,13</text:p>
          </table:table-cell>
          <table:table-cell table:style-name="ce12N2" office:value-type="float" office:value="3.99">
            <text:p>3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.87">
            <text:p>35,8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74.3">
            <text:p>4574,30</text:p>
          </table:table-cell>
          <table:table-cell table:style-name="ce12N2" office:value-type="float" office:value="182.97">
            <text:p>18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51322020001895500300019463413404095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74">
            <text:p>308474</text:p>
          </table:table-cell>
          <table:table-cell table:style-name="ce0" table:number-columns-spanned="4" table:number-rows-spanned="1" office:value-type="string" calcext:value-type="string">
            <text:p>35.983 - SUVINIL COATINGS S.A</text:p>
          </table:table-cell>
          <table:covered-table-cell table:number-columns-repeated="3"/>
          <table:table-cell table:style-name="ce0" office:value-type="string" calcext:value-type="string">
            <text:p>194.63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.56">
            <text:p>9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.56">
            <text:p>91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">
            <text:p>0,002</text:p>
          </table:table-cell>
          <table:table-cell table:style-name="ce12N2" office:value-type="float" office:value="3.31">
            <text:p>3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.28">
            <text:p>77,28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7">
            <text:p>0,70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.56">
            <text:p>91,56</text:p>
          </table:table-cell>
          <table:table-cell table:style-name="ce12N2" office:value-type="float" office:value="6.41">
            <text:p>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51322020001895500300019463219424153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75">
            <text:p>308475</text:p>
          </table:table-cell>
          <table:table-cell table:style-name="ce0" table:number-columns-spanned="4" table:number-rows-spanned="1" office:value-type="string" calcext:value-type="string">
            <text:p>35.983 - SUVINIL COATINGS S.A</text:p>
          </table:table-cell>
          <table:covered-table-cell table:number-columns-repeated="3"/>
          <table:table-cell table:style-name="ce0" office:value-type="string" calcext:value-type="string">
            <text:p>194.63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.01">
            <text:p>539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2.04">
            <text:p>52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9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0.59">
            <text:p>440,59</text:p>
          </table:table-cell>
          <table:table-cell table:style-name="ce12N2" office:value-type="float" office:value="0.44">
            <text:p>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97">
            <text:p>3,9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6.97">
            <text:p>16,97</text:p>
          </table:table-cell>
          <table:table-cell table:style-name="ce12N2" office:value-type="float" office:value="522.04">
            <text:p>522,04</text:p>
          </table:table-cell>
          <table:table-cell table:style-name="ce12N2" office:value-type="float" office:value="36.54">
            <text:p>3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51322020001895500300019463314946633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9">
            <text:p>30851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2.31">
            <text:p>315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2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98.1">
            <text:p>2498,10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48">
            <text:p>22,4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92.39">
            <text:p>192,39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207.19">
            <text:p>20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5510603853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5">
            <text:p>30852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1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58.7">
            <text:p>915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9035.9">
            <text:p>903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1734">
            <text:p>0,322</text:p>
          </table:table-cell>
          <table:table-cell table:style-name="ce12N2" office:value-type="float" office:value="38.36">
            <text:p>38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58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21.54">
            <text:p>7721,54</text:p>
          </table:table-cell>
          <table:table-cell table:style-name="ce12N2" office:value-type="float" office:value="7.75">
            <text:p>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5">
            <text:p>69,50</text:p>
          </table:table-cell>
          <table:table-cell table:style-name="ce12N2" office:value-type="float" office:value="64">
            <text:p>6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22.8">
            <text:p>122,80</text:p>
          </table:table-cell>
          <table:table-cell table:style-name="ce12N2" office:value-type="float" office:value="9035.9">
            <text:p>9035,90</text:p>
          </table:table-cell>
          <table:table-cell table:style-name="ce12N2" office:value-type="float" office:value="527.41">
            <text:p>52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111113861717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7">
            <text:p>37,00</text:p>
          </table:table-cell>
          <table:table-cell table:style-name="ce26N2" office:value-type="float" office:value="196.45">
            <text:p>196,45</text:p>
          </table:table-cell>
          <table:table-cell table:style-name="ce26N2" office:value-type="float" office:value="553">
            <text:p>553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212.91">
            <text:p>4212,91</text:p>
          </table:table-cell>
          <table:table-cell table:style-name="ce26N2" office:value-type="float" office:value="116185.29">
            <text:p>116185,29</text:p>
          </table:table-cell>
          <table:table-cell table:style-name="ce26N2" office:value-type="float" office:value="6956.29">
            <text:p>6956,2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23.4">
            <text:p>123,40</text:p>
          </table:table-cell>
          <table:table-cell table:style-name="ce26N2" office:value-type="float" office:value="169884.18">
            <text:p>169884,1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.462133">
            <text:p>2,462</text:p>
          </table:table-cell>
          <table:table-cell table:style-name="ce26N2" office:value-type="float" office:value="165314.72">
            <text:p>165314,72</text:p>
          </table:table-cell>
          <table:table-cell table:style-name="ce26N2" office:value-type="float" office:value="169884.18">
            <text:p>169884,1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7807.18">
            <text:p>67807,18</text:p>
          </table:table-cell>
          <table:table-cell table:style-name="ce26N2" office:value-type="float" office:value="67.79">
            <text:p>67,7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10.28">
            <text:p>610,28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214.52">
            <text:p>1214,5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4.73">
            <text:p>34,7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04" meta:object-count="0"/>
    <meta:generator>LibreOffice/4.3.0.4$Windows_x86 LibreOffice_project/62ad5818884a2fc2e5780dd45466868d41009ec0</meta:generator>
  </office:meta>
</office:document-meta>
</file>