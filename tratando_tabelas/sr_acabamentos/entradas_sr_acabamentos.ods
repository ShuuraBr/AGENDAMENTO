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9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2">
            <text:p>30902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42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5.86">
            <text:p>59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2.25">
            <text:p>4542,25</text:p>
          </table:table-cell>
          <table:table-cell table:style-name="ce12N2" office:value-type="float" office:value="4.54">
            <text:p>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88">
            <text:p>40,88</text:p>
          </table:table-cell>
          <table:table-cell table:style-name="ce12N2" office:value-type="float" office:value="43.04">
            <text:p>43,0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782.07">
            <text:p>782,07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208.55">
            <text:p>2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4251401028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4">
            <text:p>309214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9.12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7.06">
            <text:p>195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83.2">
            <text:p>16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95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4.23">
            <text:p>1514,23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3.86">
            <text:p>173,86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124.82">
            <text:p>1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4546165000393550040000991291328330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0">
            <text:p>3092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1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7.26">
            <text:p>1447,2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3">
            <text:p>13,0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120.04">
            <text:p>1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1791667693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7">
            <text:p>30924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4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2.03">
            <text:p>138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2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4.76">
            <text:p>1164,7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2.77">
            <text:p>122,77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50.37">
            <text:p>5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414118457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2">
            <text:p>30925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6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6.85">
            <text:p>11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374">
            <text:p>0,094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4.18">
            <text:p>984,18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7">
            <text:p>8,8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81.64">
            <text:p>8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6703157670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1">
            <text:p>309271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37">
            <text:p>0,001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70.48">
            <text:p>7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7711392687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7">
            <text:p>309277</text:p>
          </table:table-cell>
          <table:table-cell table:style-name="ce0" table:number-columns-spanned="4" table:number-rows-spanned="1" office:value-type="string" calcext:value-type="string">
            <text:p>35.552 - RIBAS D'AVILA COMERCIAL LTDA</text:p>
          </table:table-cell>
          <table:covered-table-cell table:number-columns-repeated="3"/>
          <table:table-cell table:style-name="ce0" office:value-type="string" calcext:value-type="string">
            <text:p>10.6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228.5">
            <text:p>22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45">
            <text:p>139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2.511.428</text:p>
          </table:table-cell>
          <table:table-cell table:style-name="ce0" office:value-type="string" calcext:value-type="string">
            <text:p>27.326 - JAMEF TRANSPORTES LTDA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1.396,45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35260600333748000106550010000106611272251282</text:p>
          </table:table-cell>
          <table:table-cell table:style-name="ce0" office:value-type="string" calcext:value-type="string">
            <text:p>3526062014761700200457001002511428153197077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6">
            <text:p>309306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2.86">
            <text:p>371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.55">
            <text:p>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2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6.7">
            <text:p>3056,7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1">
            <text:p>27,51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2.96">
            <text:p>402,96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132.4">
            <text:p>1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6991951497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9">
            <text:p>3093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39">
            <text:p>2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0.86">
            <text:p>180,86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401282664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5">
            <text:p>309315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1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11">
            <text:p>30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7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.25">
            <text:p>2501,25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51">
            <text:p>22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81.7">
            <text:p>281,7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195.4">
            <text:p>1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1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5260612077181000133550030002261731875139152</text:p>
          </table:table-cell>
          <table:table-cell table:style-name="ce0" office:value-type="string" calcext:value-type="string">
            <text:p>3526061138956500020057005000401311100087669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4">
            <text:p>30938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5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8.43">
            <text:p>350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0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6">
            <text:p>28,46</text:p>
          </table:table-cell>
          <table:table-cell table:style-name="ce12N2" office:value-type="float" office:value="34.31">
            <text:p>34,3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45.83">
            <text:p>345,83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221.39">
            <text:p>2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51061002651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9">
            <text:p>3093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8.61">
            <text:p>972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">
            <text:p>0,165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94.71">
            <text:p>7694,71</text:p>
          </table:table-cell>
          <table:table-cell table:style-name="ce12N2" office:value-type="float" office:value="7.71">
            <text:p>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26">
            <text:p>69,26</text:p>
          </table:table-cell>
          <table:table-cell table:style-name="ce12N2" office:value-type="float" office:value="66.13">
            <text:p>66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896.31">
            <text:p>896,31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353.29">
            <text:p>3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9951131047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6">
            <text:p>30942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784">
            <text:p>0,046</text:p>
          </table:table-cell>
          <table:table-cell table:style-name="ce12N2" office:value-type="float" office:value="19.15">
            <text:p>1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33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61.82">
            <text:p>6261,82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36">
            <text:p>56,3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3.14">
            <text:p>6733,14</text:p>
          </table:table-cell>
          <table:table-cell table:style-name="ce12N2" office:value-type="float" office:value="471.32">
            <text:p>4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351538163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4">
            <text:p>309434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7.2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1.57">
            <text:p>701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966.84">
            <text:p>69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595908">
            <text:p>8,596</text:p>
          </table:table-cell>
          <table:table-cell table:style-name="ce12N2" office:value-type="float" office:value="902.94">
            <text:p>90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1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34.7">
            <text:p>5834,70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9">
            <text:p>52,49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44.73">
            <text:p>44,73</text:p>
          </table:table-cell>
          <table:table-cell table:style-name="ce12N2" office:value-type="float" office:value="6966.84">
            <text:p>6966,84</text:p>
          </table:table-cell>
          <table:table-cell table:style-name="ce12N2" office:value-type="float" office:value="487.71">
            <text:p>48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4542238000178550010000972341000970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4">
            <text:p>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3107.17">
            <text:p>3107,17</text:p>
          </table:table-cell>
          <table:table-cell table:style-name="ce26N2" office:value-type="float" office:value="60294.82">
            <text:p>60294,82</text:p>
          </table:table-cell>
          <table:table-cell table:style-name="ce26N2" office:value-type="float" office:value="3359.99">
            <text:p>3359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86.17">
            <text:p>1486,17</text:p>
          </table:table-cell>
          <table:table-cell table:style-name="ce26N2" office:value-type="float" office:value="63549.49">
            <text:p>63549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.26478">
            <text:p>9,265</text:p>
          </table:table-cell>
          <table:table-cell table:style-name="ce26N2" office:value-type="float" office:value="60342.32">
            <text:p>60342,32</text:p>
          </table:table-cell>
          <table:table-cell table:style-name="ce26N2" office:value-type="float" office:value="63549.49">
            <text:p>63549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688.89">
            <text:p>46688,89</text:p>
          </table:table-cell>
          <table:table-cell table:style-name="ce26N2" office:value-type="float" office:value="46.68">
            <text:p>46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0.21">
            <text:p>420,2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64.19">
            <text:p>1264,1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81">
            <text:p>37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6" meta:object-count="0"/>
    <meta:generator>LibreOffice/4.3.0.4$Windows_x86 LibreOffice_project/62ad5818884a2fc2e5780dd45466868d41009ec0</meta:generator>
  </office:meta>
</office:document-meta>
</file>