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5/06/2026 04:30:2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60">
            <text:p>3079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09">
            <text:p>0,009</text:p>
          </table:table-cell>
          <table:table-cell table:style-name="ce12N2" office:value-type="float" office:value="5.26">
            <text:p>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297.46">
            <text:p>29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099113428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1">
            <text:p>3080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71499456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2">
            <text:p>3080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09">
            <text:p>140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5.82">
            <text:p>85,82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52.81">
            <text:p>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81951063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9">
            <text:p>308059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9.88">
            <text:p>314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92.6">
            <text:p>2792,6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95">
            <text:p>0,030</text:p>
          </table:table-cell>
          <table:table-cell table:style-name="ce12N2" office:value-type="float" office:value="27.4">
            <text:p>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49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62">
            <text:p>41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72.28">
            <text:p>272,28</text:p>
          </table:table-cell>
          <table:table-cell table:style-name="ce12N2" office:value-type="float" office:value="2877.6">
            <text:p>2877,6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1321753896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9">
            <text:p>308089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">
            <text:p>0,045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.75">
            <text:p>131,75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10.93">
            <text:p>1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11961153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0">
            <text:p>30815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0.8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44.93">
            <text:p>274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712">
            <text:p>0,144</text:p>
          </table:table-cell>
          <table:table-cell table:style-name="ce12N2" office:value-type="float" office:value="12.87">
            <text:p>1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4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41.62">
            <text:p>41,62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161.45">
            <text:p>16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0829163454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2">
            <text:p>3081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4.49">
            <text:p>789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19">
            <text:p>0,010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4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80.21">
            <text:p>6480,21</text:p>
          </table:table-cell>
          <table:table-cell table:style-name="ce12N2" office:value-type="float" office:value="6.48">
            <text:p>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32">
            <text:p>58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537.47">
            <text:p>5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331660428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3">
            <text:p>3082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65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367">
            <text:p>0,009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4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2.04">
            <text:p>3172,0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5">
            <text:p>28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259.62">
            <text:p>25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658196091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4">
            <text:p>308244</text:p>
          </table:table-cell>
          <table:table-cell table:style-name="ce0" table:number-columns-spanned="4" table:number-rows-spanned="1" office:value-type="string" calcext:value-type="string">
            <text:p>32.049 - M T A INDUSTRIA E COMERCIO DE ARTEFATOS DE INOX LTDA</text:p>
          </table:table-cell>
          <table:covered-table-cell table:number-columns-repeated="3"/>
          <table:table-cell table:style-name="ce0" office:value-type="string" calcext:value-type="string">
            <text:p>144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49.31">
            <text:p>724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4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3.17">
            <text:p>73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2.45">
            <text:p>442,45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412.98">
            <text:p>41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85478857000174550010001446321002938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8">
            <text:p>30829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3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24">
            <text:p>0,084</text:p>
          </table:table-cell>
          <table:table-cell table:style-name="ce12N2" office:value-type="float" office:value="125.7">
            <text:p>12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38871686099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9">
            <text:p>30829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403">
            <text:p>0,509</text:p>
          </table:table-cell>
          <table:table-cell table:style-name="ce12N2" office:value-type="float" office:value="227.97">
            <text:p>227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58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11814268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1">
            <text:p>3083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6768">
            <text:p>0,147</text:p>
          </table:table-cell>
          <table:table-cell table:style-name="ce12N2" office:value-type="float" office:value="161.33">
            <text:p>16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78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31943109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9">
            <text:p>30830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.06">
            <text:p>333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138">
            <text:p>1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3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.29">
            <text:p>44,2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8.06">
            <text:p>158,06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3811881919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0">
            <text:p>3083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6.01">
            <text:p>47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86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9.62">
            <text:p>449,62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24111377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7">
            <text:p>308317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9.8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61">
            <text:p>727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963">
            <text:p>0,232</text:p>
          </table:table-cell>
          <table:table-cell table:style-name="ce12N2" office:value-type="float" office:value="32.52">
            <text:p>3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8.26">
            <text:p>6098,26</text:p>
          </table:table-cell>
          <table:table-cell table:style-name="ce12N2" office:value-type="float" office:value="6.06">
            <text:p>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86">
            <text:p>54,86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465.38">
            <text:p>4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98501725550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29">
            <text:p>308329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42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8.95">
            <text:p>743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9335">
            <text:p>0,219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3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85.74">
            <text:p>6285,74</text:p>
          </table:table-cell>
          <table:table-cell table:style-name="ce12N2" office:value-type="float" office:value="6.28">
            <text:p>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58">
            <text:p>56,58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97.19">
            <text:p>197,19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315.39">
            <text:p>31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42515510220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1">
            <text:p>308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51">
            <text:p>1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374">
            <text:p>0,194</text:p>
          </table:table-cell>
          <table:table-cell table:style-name="ce12N2" office:value-type="float" office:value="9.16">
            <text:p>9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8.49">
            <text:p>938,49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201287701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2">
            <text:p>30833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12">
            <text:p>138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412">
            <text:p>0,08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.47">
            <text:p>1153,47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8">
            <text:p>10,38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191817718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3">
            <text:p>3083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.74">
            <text:p>83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602">
            <text:p>0,07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6.04">
            <text:p>706,04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58.56">
            <text:p>5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6981515604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94">
            <text:p>3083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5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62">
            <text:p>354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08.18">
            <text:p>2808,18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27">
            <text:p>25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232.91">
            <text:p>2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5501077625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3">
            <text:p>308423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7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3.04">
            <text:p>2543,04</text:p>
          </table:table-cell>
          <table:table-cell table:style-name="ce12N2" office:value-type="float" office:value="196.45">
            <text:p>196,45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84.28">
            <text:p>258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846">
            <text:p>0,128</text:p>
          </table:table-cell>
          <table:table-cell table:style-name="ce12N2" office:value-type="float" office:value="24.42">
            <text:p>2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55.21">
            <text:p>155,21</text:p>
          </table:table-cell>
          <table:table-cell table:style-name="ce12N2" office:value-type="float" office:value="2387.83">
            <text:p>2387,83</text:p>
          </table:table-cell>
          <table:table-cell table:style-name="ce12N2" office:value-type="float" office:value="167.15">
            <text:p>16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3.4">
            <text:p>12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31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9/05/2026</text:p>
          </table:table-cell>
          <table:table-cell table:style-name="ce12" office:value-type="string" calcext:value-type="string">
            <text:p>123,40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5260556991334000129550010001573961500448800</text:p>
          </table:table-cell>
          <table:table-cell table:style-name="ce0" office:value-type="string" calcext:value-type="string">
            <text:p>3526051138956500020057005000400316100086596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6">
            <text:p>308426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5.75">
            <text:p>717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6640.2">
            <text:p>6640,20</text:p>
          </table:table-cell>
          <table:table-cell table:style-name="ce12N2" office:value-type="float" office:value="468">
            <text:p>468,00</text:p>
          </table:table-cell>
          <table:table-cell table:style-name="ce12N3" office:value-type="float" office:value="0.0015">
            <text:p>0,0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5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51.17">
            <text:p>6351,17</text:p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17">
            <text:p>57,17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7.55">
            <text:p>67,55</text:p>
          </table:table-cell>
          <table:table-cell table:style-name="ce12N2" office:value-type="float" office:value="7108.2">
            <text:p>7108,20</text:p>
          </table:table-cell>
          <table:table-cell table:style-name="ce12N2" office:value-type="float" office:value="497.57">
            <text:p>49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831819599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7">
            <text:p>308437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61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6.4">
            <text:p>428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.66">
            <text:p>4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96.78">
            <text:p>3396,78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1.6">
            <text:p>261,6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281.76">
            <text:p>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618121299841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5">
            <text:p>30845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3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5.63">
            <text:p>22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9">
            <text:p>0,01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6.34">
            <text:p>1856,34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1">
            <text:p>16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55.53">
            <text:p>255,53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80.4">
            <text:p>8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3381426574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4">
            <text:p>30846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6.88">
            <text:p>246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4.86">
            <text:p>3874,86</text:p>
          </table:table-cell>
          <table:table-cell table:style-name="ce12N2" office:value-type="float" office:value="3.87">
            <text:p>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88">
            <text:p>34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321.38">
            <text:p>3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3165675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3">
            <text:p>308473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7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85.13">
            <text:p>3985,13</text:p>
          </table:table-cell>
          <table:table-cell table:style-name="ce12N2" office:value-type="float" office:value="3.99">
            <text:p>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87">
            <text:p>35,8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182.97">
            <text:p>18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41340409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4">
            <text:p>308474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.28">
            <text:p>77,28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6.41">
            <text:p>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21942415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5">
            <text:p>308475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.01">
            <text:p>539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.04">
            <text:p>52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9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0.59">
            <text:p>440,59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97">
            <text:p>3,9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6.97">
            <text:p>16,97</text:p>
          </table:table-cell>
          <table:table-cell table:style-name="ce12N2" office:value-type="float" office:value="522.04">
            <text:p>522,04</text:p>
          </table:table-cell>
          <table:table-cell table:style-name="ce12N2" office:value-type="float" office:value="36.54">
            <text:p>3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314946633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9">
            <text:p>3085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51060385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6">
            <text:p>308546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6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9.53">
            <text:p>367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52.65">
            <text:p>3352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4.96">
            <text:p>1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7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29.54">
            <text:p>2829,54</text:p>
          </table:table-cell>
          <table:table-cell table:style-name="ce12N2" office:value-type="float" office:value="2.83">
            <text:p>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46">
            <text:p>25,46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26.88">
            <text:p>326,88</text:p>
          </table:table-cell>
          <table:table-cell table:style-name="ce12N2" office:value-type="float" office:value="3352.65">
            <text:p>3352,65</text:p>
          </table:table-cell>
          <table:table-cell table:style-name="ce12N2" office:value-type="float" office:value="234.69">
            <text:p>23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6281753042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74">
            <text:p>30857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7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3.2">
            <text:p>921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8317.26">
            <text:p>8317,2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7412">
            <text:p>0,007</text:p>
          </table:table-cell>
          <table:table-cell table:style-name="ce12N2" office:value-type="float" office:value="13.2">
            <text:p>1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1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20.03">
            <text:p>7320,03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87">
            <text:p>65,87</text:p>
          </table:table-cell>
          <table:table-cell table:style-name="ce12N2" office:value-type="float" office:value="55.74">
            <text:p>55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810.94">
            <text:p>810,94</text:p>
          </table:table-cell>
          <table:table-cell table:style-name="ce12N2" office:value-type="float" office:value="8402.26">
            <text:p>8402,26</text:p>
          </table:table-cell>
          <table:table-cell table:style-name="ce12N2" office:value-type="float" office:value="336.11">
            <text:p>33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47541784828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1">
            <text:p>3085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.72">
            <text:p>1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.12">
            <text:p>90,12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7.47">
            <text:p>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51572235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4">
            <text:p>3085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5">
            <text:p>10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4">
            <text:p>84,40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4102026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1">
            <text:p>30862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7.86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.72">
            <text:p>1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.72">
            <text:p>1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.97">
            <text:p>9,97</text:p>
          </table:table-cell>
          <table:table-cell table:style-name="ce12N2" office:value-type="float" office:value="0.01">
            <text:p>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72">
            <text:p>10,72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78691718069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3">
            <text:p>30862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86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05">
            <text:p>0,067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.85">
            <text:p>305,85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75">
            <text:p>2,7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23.02">
            <text:p>2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86216029958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5">
            <text:p>308625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39.85">
            <text:p>573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3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5.23">
            <text:p>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07">
            <text:p>47,07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509.91">
            <text:p>509,91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366.1">
            <text:p>3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7721002637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6">
            <text:p>30862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5.5">
            <text:p>194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4002">
            <text:p>0,964</text:p>
          </table:table-cell>
          <table:table-cell table:style-name="ce12N2" office:value-type="float" office:value="94.1">
            <text:p>9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83.16">
            <text:p>16683,1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.17">
            <text:p>150,1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.8">
            <text:p>71,8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960.07">
            <text:p>9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51688803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2">
            <text:p>3086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.66">
            <text:p>19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.67">
            <text:p>152,67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12.66">
            <text:p>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115352056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7">
            <text:p>3086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01577498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70">
            <text:p>308670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5.13">
            <text:p>75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029.44">
            <text:p>7029,44</text:p>
          </table:table-cell>
          <table:table-cell table:style-name="ce12N2" office:value-type="float" office:value="421.77">
            <text:p>421,77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52">
            <text:p>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96.59">
            <text:p>6896,59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07">
            <text:p>62,07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3.92">
            <text:p>83,92</text:p>
          </table:table-cell>
          <table:table-cell table:style-name="ce12N2" office:value-type="float" office:value="7451.21">
            <text:p>7451,21</text:p>
          </table:table-cell>
          <table:table-cell table:style-name="ce12N2" office:value-type="float" office:value="298.05">
            <text:p>29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4855633000140550010000776971314203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6">
            <text:p>46,00</text:p>
          </table:table-cell>
          <table:table-cell table:style-name="ce26N2" office:value-type="float" office:value="196.45">
            <text:p>196,45</text:p>
          </table:table-cell>
          <table:table-cell table:style-name="ce26N2" office:value-type="float" office:value="1059.77">
            <text:p>1059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129">
            <text:p>5129,00</text:p>
          </table:table-cell>
          <table:table-cell table:style-name="ce26N2" office:value-type="float" office:value="152053.03">
            <text:p>152053,03</text:p>
          </table:table-cell>
          <table:table-cell table:style-name="ce26N2" office:value-type="float" office:value="8731.64">
            <text:p>8731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3.4">
            <text:p>123,40</text:p>
          </table:table-cell>
          <table:table-cell table:style-name="ce26N2" office:value-type="float" office:value="206795.51">
            <text:p>206795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516797">
            <text:p>3,517</text:p>
          </table:table-cell>
          <table:table-cell table:style-name="ce26N2" office:value-type="float" office:value="200803.19">
            <text:p>200803,19</text:p>
          </table:table-cell>
          <table:table-cell table:style-name="ce26N2" office:value-type="float" office:value="206795.51">
            <text:p>206795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7536.95">
            <text:p>107536,95</text:p>
          </table:table-cell>
          <table:table-cell table:style-name="ce26N2" office:value-type="float" office:value="107.57">
            <text:p>107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67.85">
            <text:p>967,8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418.36">
            <text:p>1418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.32">
            <text:p>38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98" meta:object-count="0"/>
    <meta:generator>LibreOffice/4.3.0.4$Windows_x86 LibreOffice_project/62ad5818884a2fc2e5780dd45466868d41009ec0</meta:generator>
  </office:meta>
</office:document-meta>
</file>