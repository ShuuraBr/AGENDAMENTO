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4/06/2026 07:16:26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3">
            <text:p>308313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6618541180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49">
            <text:p>30854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3">
            <text:p>0,015</text:p>
          </table:table-cell>
          <table:table-cell table:style-name="ce12N2" office:value-type="float" office:value="5.72">
            <text:p>5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7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1013948537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58">
            <text:p>30905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73.34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5.03">
            <text:p>555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5.03">
            <text:p>555,0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064">
            <text:p>0,081</text:p>
          </table:table-cell>
          <table:table-cell table:style-name="ce12N2" office:value-type="float" office:value="25.28">
            <text:p>25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5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6.18">
            <text:p>516,18</text:p>
          </table:table-cell>
          <table:table-cell table:style-name="ce12N2" office:value-type="float" office:value="0.52">
            <text:p>0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65">
            <text:p>4,65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5.03">
            <text:p>555,03</text:p>
          </table:table-cell>
          <table:table-cell table:style-name="ce12N2" office:value-type="float" office:value="38.85">
            <text:p>38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58019020001265500000137334919439262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50">
            <text:p>30915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5.21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86.16">
            <text:p>208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86.16">
            <text:p>2086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6196">
            <text:p>0,126</text:p>
          </table:table-cell>
          <table:table-cell table:style-name="ce12N2" office:value-type="float" office:value="48">
            <text:p>4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86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17.47">
            <text:p>1817,47</text:p>
          </table:table-cell>
          <table:table-cell table:style-name="ce12N2" office:value-type="float" office:value="1.82">
            <text:p>1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35">
            <text:p>16,3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86.16">
            <text:p>2086,16</text:p>
          </table:table-cell>
          <table:table-cell table:style-name="ce12N2" office:value-type="float" office:value="83.45">
            <text:p>83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521511148425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14">
            <text:p>309214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9.129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7.06">
            <text:p>1957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683.2">
            <text:p>168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0">
            <text:p>100,00</text:p>
          </table:table-cell>
          <table:table-cell table:style-name="ce12" office:value-type="string" calcext:value-type="string">
            <text:p>1.957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14.23">
            <text:p>1514,23</text:p>
          </table:table-cell>
          <table:table-cell table:style-name="ce12N2" office:value-type="float" office:value="1.51">
            <text:p>1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63">
            <text:p>13,6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73.86">
            <text:p>173,86</text:p>
          </table:table-cell>
          <table:table-cell table:style-name="ce12N2" office:value-type="float" office:value="1783.2">
            <text:p>1783,20</text:p>
          </table:table-cell>
          <table:table-cell table:style-name="ce12N2" office:value-type="float" office:value="124.82">
            <text:p>124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245461650003935500400009912913283303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30">
            <text:p>30923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6.17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14.81">
            <text:p>171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14.81">
            <text:p>171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73">
            <text:p>0,002</text:p>
          </table:table-cell>
          <table:table-cell table:style-name="ce12N2" office:value-type="float" office:value="0.77">
            <text:p>0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1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47.26">
            <text:p>1447,26</text:p>
          </table:table-cell>
          <table:table-cell table:style-name="ce12N2" office:value-type="float" office:value="1.45">
            <text:p>1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03">
            <text:p>13,0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14.81">
            <text:p>1714,81</text:p>
          </table:table-cell>
          <table:table-cell table:style-name="ce12N2" office:value-type="float" office:value="120.04">
            <text:p>120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617916676938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9">
            <text:p>30928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1.2">
            <text:p>70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8.4">
            <text:p>65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02">
            <text:p>0,000</text:p>
          </table:table-cell>
          <table:table-cell table:style-name="ce12N2" office:value-type="float" office:value="0.61">
            <text:p>0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1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5.67">
            <text:p>555,67</text:p>
          </table:table-cell>
          <table:table-cell table:style-name="ce12N2" office:value-type="float" office:value="0.56">
            <text:p>0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42.8">
            <text:p>42,80</text:p>
          </table:table-cell>
          <table:table-cell table:style-name="ce12N2" office:value-type="float" office:value="658.4">
            <text:p>658,40</text:p>
          </table:table-cell>
          <table:table-cell table:style-name="ce12N2" office:value-type="float" office:value="46.09">
            <text:p>46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113696295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16">
            <text:p>309316</text:p>
          </table:table-cell>
          <table:table-cell table:style-name="ce0" table:number-columns-spanned="4" table:number-rows-spanned="1" office:value-type="string" calcext:value-type="string">
            <text:p>38.731 - CLARAO INDUSTRIA E COMERCIO DE ILUMINACAO LTDA</text:p>
          </table:table-cell>
          <table:covered-table-cell table:number-columns-repeated="3"/>
          <table:table-cell table:style-name="ce0" office:value-type="string" calcext:value-type="string">
            <text:p>23.4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0">
            <text:p>206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60">
            <text:p>206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6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40.61">
            <text:p>1840,61</text:p>
          </table:table-cell>
          <table:table-cell table:style-name="ce12N2" office:value-type="float" office:value="1.84">
            <text:p>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57">
            <text:p>16,5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60">
            <text:p>2060,00</text:p>
          </table:table-cell>
          <table:table-cell table:style-name="ce12N2" office:value-type="float" office:value="144.2">
            <text:p>14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00">
            <text:p>20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100.725</text:p>
          </table:table-cell>
          <table:table-cell table:style-name="ce0" office:value-type="string" calcext:value-type="string">
            <text:p>2.123 - RG TRANSPORTES RODOVIARIOS LTDA</text:p>
          </table:table-cell>
          <table:table-cell table:style-name="ce0" office:value-type="string" calcext:value-type="string">
            <text:p>18/06/2026</text:p>
          </table:table-cell>
          <table:table-cell table:style-name="ce12" office:value-type="string" calcext:value-type="string">
            <text:p>200,00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35260667263012000180550010000234001327329443</text:p>
          </table:table-cell>
          <table:table-cell table:style-name="ce0" office:value-type="string" calcext:value-type="string">
            <text:p>35260602592421000184570020001007251903061584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99">
            <text:p>309399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7.9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28.61">
            <text:p>9728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8832.3">
            <text:p>8832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5">
            <text:p>0,165</text:p>
          </table:table-cell>
          <table:table-cell table:style-name="ce12N2" office:value-type="float" office:value="5.6">
            <text:p>5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728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94.71">
            <text:p>7694,71</text:p>
          </table:table-cell>
          <table:table-cell table:style-name="ce12N2" office:value-type="float" office:value="7.71">
            <text:p>7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26">
            <text:p>69,26</text:p>
          </table:table-cell>
          <table:table-cell table:style-name="ce12N2" office:value-type="float" office:value="66.13">
            <text:p>66,1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896.31">
            <text:p>896,31</text:p>
          </table:table-cell>
          <table:table-cell table:style-name="ce12N2" office:value-type="float" office:value="8832.3">
            <text:p>8832,30</text:p>
          </table:table-cell>
          <table:table-cell table:style-name="ce12N2" office:value-type="float" office:value="353.29">
            <text:p>353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799511310477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26">
            <text:p>309426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635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33.14">
            <text:p>6733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6733.14">
            <text:p>6733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5784">
            <text:p>0,046</text:p>
          </table:table-cell>
          <table:table-cell table:style-name="ce12N2" office:value-type="float" office:value="19.15">
            <text:p>19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733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61.82">
            <text:p>6261,82</text:p>
          </table:table-cell>
          <table:table-cell table:style-name="ce12N2" office:value-type="float" office:value="6.26">
            <text:p>6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.36">
            <text:p>56,3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33.14">
            <text:p>6733,14</text:p>
          </table:table-cell>
          <table:table-cell table:style-name="ce12N2" office:value-type="float" office:value="471.32">
            <text:p>47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92702150001055500600021963515381630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78">
            <text:p>30947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88">
            <text:p>0,000</text:p>
          </table:table-cell>
          <table:table-cell table:style-name="ce12N2" office:value-type="float" office:value="0.23">
            <text:p>0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6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8.14">
            <text:p>748,14</text:p>
          </table:table-cell>
          <table:table-cell table:style-name="ce12N2" office:value-type="float" office:value="0.75">
            <text:p>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73">
            <text:p>6,7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62.05">
            <text:p>6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0916899420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89">
            <text:p>30948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0.5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58.04">
            <text:p>175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58.04">
            <text:p>1758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466">
            <text:p>0,175</text:p>
          </table:table-cell>
          <table:table-cell table:style-name="ce12N2" office:value-type="float" office:value="75.42">
            <text:p>75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58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83.74">
            <text:p>1483,74</text:p>
          </table:table-cell>
          <table:table-cell table:style-name="ce12N2" office:value-type="float" office:value="1.48">
            <text:p>1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35">
            <text:p>13,3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58.04">
            <text:p>1758,04</text:p>
          </table:table-cell>
          <table:table-cell table:style-name="ce12N2" office:value-type="float" office:value="123.06">
            <text:p>123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052314476169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90">
            <text:p>309590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5.29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92.66">
            <text:p>609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610.96">
            <text:p>5610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702">
            <text:p>0,037</text:p>
          </table:table-cell>
          <table:table-cell table:style-name="ce12N2" office:value-type="float" office:value="35.6">
            <text:p>35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092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88.26">
            <text:p>4888,26</text:p>
          </table:table-cell>
          <table:table-cell table:style-name="ce12N2" office:value-type="float" office:value="4.89">
            <text:p>4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.99">
            <text:p>43,99</text:p>
          </table:table-cell>
          <table:table-cell table:style-name="ce12N2" office:value-type="float" office:value="53.79">
            <text:p>53,7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481.7">
            <text:p>481,70</text:p>
          </table:table-cell>
          <table:table-cell table:style-name="ce12N2" office:value-type="float" office:value="5610.96">
            <text:p>5610,96</text:p>
          </table:table-cell>
          <table:table-cell table:style-name="ce12N2" office:value-type="float" office:value="224.44">
            <text:p>224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5635346000140550020001152961238127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92">
            <text:p>30959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0.5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51.61">
            <text:p>1851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51.61">
            <text:p>1851,6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4749">
            <text:p>0,035</text:p>
          </table:table-cell>
          <table:table-cell table:style-name="ce12N2" office:value-type="float" office:value="18.75">
            <text:p>18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51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62.72">
            <text:p>1562,72</text:p>
          </table:table-cell>
          <table:table-cell table:style-name="ce12N2" office:value-type="float" office:value="1.56">
            <text:p>1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06">
            <text:p>14,0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51.61">
            <text:p>1851,61</text:p>
          </table:table-cell>
          <table:table-cell table:style-name="ce12N2" office:value-type="float" office:value="129.61">
            <text:p>12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053718453758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93">
            <text:p>309593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8.2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1.53">
            <text:p>118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62.15">
            <text:p>1062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1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80.9">
            <text:p>980,90</text:p>
          </table:table-cell>
          <table:table-cell table:style-name="ce12N2" office:value-type="float" office:value="0.98">
            <text:p>0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83">
            <text:p>8,83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119.38">
            <text:p>119,38</text:p>
          </table:table-cell>
          <table:table-cell table:style-name="ce12N2" office:value-type="float" office:value="1062.15">
            <text:p>1062,15</text:p>
          </table:table-cell>
          <table:table-cell table:style-name="ce12N2" office:value-type="float" office:value="42.49">
            <text:p>42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248556330001405500100007825516811995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95">
            <text:p>309595</text:p>
          </table:table-cell>
          <table:table-cell table:style-name="ce0" table:number-columns-spanned="4" table:number-rows-spanned="1" office:value-type="string" calcext:value-type="string">
            <text:p>30.850 - DEXCO S.A</text:p>
          </table:table-cell>
          <table:covered-table-cell table:number-columns-repeated="3"/>
          <table:table-cell table:style-name="ce0" office:value-type="string" calcext:value-type="string">
            <text:p>172.9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59.35">
            <text:p>2659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642.18">
            <text:p>2642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2057">
            <text:p>0,162</text:p>
          </table:table-cell>
          <table:table-cell table:style-name="ce12N2" office:value-type="float" office:value="576.36">
            <text:p>576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59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29.94">
            <text:p>2229,94</text:p>
          </table:table-cell>
          <table:table-cell table:style-name="ce12N2" office:value-type="float" office:value="2.23">
            <text:p>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07">
            <text:p>20,0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17.17">
            <text:p>17,17</text:p>
          </table:table-cell>
          <table:table-cell table:style-name="ce12N2" office:value-type="float" office:value="2642.18">
            <text:p>2642,18</text:p>
          </table:table-cell>
          <table:table-cell table:style-name="ce12N2" office:value-type="float" office:value="184.95">
            <text:p>184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978371810053785500100017299016990577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96">
            <text:p>30959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0.95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522.59">
            <text:p>31522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">
            <text:p>80,00</text:p>
          </table:table-cell>
          <table:table-cell table:style-name="ce12N2" office:value-type="float" office:value="31325.19">
            <text:p>31325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6187">
            <text:p>0,366</text:p>
          </table:table-cell>
          <table:table-cell table:style-name="ce12N2" office:value-type="float" office:value="61.87">
            <text:p>61,8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.522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437.53">
            <text:p>26437,53</text:p>
          </table:table-cell>
          <table:table-cell table:style-name="ce12N2" office:value-type="float" office:value="26.41">
            <text:p>26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7.89">
            <text:p>237,8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197.4">
            <text:p>197,40</text:p>
          </table:table-cell>
          <table:table-cell table:style-name="ce12N2" office:value-type="float" office:value="31325.19">
            <text:p>31325,19</text:p>
          </table:table-cell>
          <table:table-cell table:style-name="ce12N2" office:value-type="float" office:value="2192.78">
            <text:p>2192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095419593060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10">
            <text:p>309610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0.8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13.54">
            <text:p>631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715.08">
            <text:p>5715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2.8">
            <text:p>3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13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77.87">
            <text:p>5277,87</text:p>
          </table:table-cell>
          <table:table-cell table:style-name="ce12N2" office:value-type="float" office:value="5.29">
            <text:p>5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5">
            <text:p>47,50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598.46">
            <text:p>598,46</text:p>
          </table:table-cell>
          <table:table-cell table:style-name="ce12N2" office:value-type="float" office:value="5715.08">
            <text:p>5715,08</text:p>
          </table:table-cell>
          <table:table-cell table:style-name="ce12N2" office:value-type="float" office:value="228.6">
            <text:p>22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205870170002855500100004088514451487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38">
            <text:p>30963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76">
            <text:p>0,001</text:p>
          </table:table-cell>
          <table:table-cell table:style-name="ce12N2" office:value-type="float" office:value="3.6">
            <text:p>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72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96.27">
            <text:p>1496,27</text:p>
          </table:table-cell>
          <table:table-cell table:style-name="ce12N2" office:value-type="float" office:value="1.5">
            <text:p>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47">
            <text:p>13,4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124.1">
            <text:p>124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310668984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39">
            <text:p>30963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7.78">
            <text:p>577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42.52">
            <text:p>542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1">
            <text:p>0,002</text:p>
          </table:table-cell>
          <table:table-cell table:style-name="ce12N2" office:value-type="float" office:value="4.3">
            <text:p>4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77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7.87">
            <text:p>457,87</text:p>
          </table:table-cell>
          <table:table-cell table:style-name="ce12N2" office:value-type="float" office:value="0.46">
            <text:p>0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12">
            <text:p>4,1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35.26">
            <text:p>35,26</text:p>
          </table:table-cell>
          <table:table-cell table:style-name="ce12N2" office:value-type="float" office:value="542.52">
            <text:p>542,52</text:p>
          </table:table-cell>
          <table:table-cell table:style-name="ce12N2" office:value-type="float" office:value="37.98">
            <text:p>37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413334154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52">
            <text:p>309652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4.1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9.46">
            <text:p>393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3891.51">
            <text:p>3891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9953">
            <text:p>0,080</text:p>
          </table:table-cell>
          <table:table-cell table:style-name="ce12N2" office:value-type="float" office:value="21.69">
            <text:p>21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9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44.3">
            <text:p>3344,30</text:p>
          </table:table-cell>
          <table:table-cell table:style-name="ce12N2" office:value-type="float" office:value="3.34">
            <text:p>3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11">
            <text:p>30,11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47.95">
            <text:p>47,95</text:p>
          </table:table-cell>
          <table:table-cell table:style-name="ce12N2" office:value-type="float" office:value="3891.51">
            <text:p>3891,51</text:p>
          </table:table-cell>
          <table:table-cell table:style-name="ce12N2" office:value-type="float" office:value="206.36">
            <text:p>20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415815408244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68">
            <text:p>30966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35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38.64">
            <text:p>2738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38.64">
            <text:p>2738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315">
            <text:p>0,033</text:p>
          </table:table-cell>
          <table:table-cell table:style-name="ce12N2" office:value-type="float" office:value="8.7">
            <text:p>8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38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11.32">
            <text:p>2311,32</text:p>
          </table:table-cell>
          <table:table-cell table:style-name="ce12N2" office:value-type="float" office:value="2.31">
            <text:p>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8">
            <text:p>20,8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38.64">
            <text:p>2738,64</text:p>
          </table:table-cell>
          <table:table-cell table:style-name="ce12N2" office:value-type="float" office:value="191.7">
            <text:p>19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35214429655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76">
            <text:p>30967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85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5.9">
            <text:p>2065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65.9">
            <text:p>2065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714">
            <text:p>0,002</text:p>
          </table:table-cell>
          <table:table-cell table:style-name="ce12N2" office:value-type="float" office:value="1.82">
            <text:p>1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65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43.56">
            <text:p>1743,56</text:p>
          </table:table-cell>
          <table:table-cell table:style-name="ce12N2" office:value-type="float" office:value="1.74">
            <text:p>1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69">
            <text:p>15,6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65.9">
            <text:p>2065,90</text:p>
          </table:table-cell>
          <table:table-cell table:style-name="ce12N2" office:value-type="float" office:value="144.61">
            <text:p>144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85015215662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06">
            <text:p>309706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6.3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90.39">
            <text:p>2490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191.7">
            <text:p>2191,7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2941">
            <text:p>0,029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90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83.46">
            <text:p>1983,46</text:p>
          </table:table-cell>
          <table:table-cell table:style-name="ce12N2" office:value-type="float" office:value="1.99">
            <text:p>1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86">
            <text:p>17,8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213.69">
            <text:p>213,69</text:p>
          </table:table-cell>
          <table:table-cell table:style-name="ce12N2" office:value-type="float" office:value="2276.7">
            <text:p>2276,70</text:p>
          </table:table-cell>
          <table:table-cell table:style-name="ce12N2" office:value-type="float" office:value="91.07">
            <text:p>91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106911580003705500100029635119423400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08">
            <text:p>30970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3.12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267.03">
            <text:p>40267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">
            <text:p>76,00</text:p>
          </table:table-cell>
          <table:table-cell table:style-name="ce12N2" office:value-type="float" office:value="38959.41">
            <text:p>38959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10546">
            <text:p>0,411</text:p>
          </table:table-cell>
          <table:table-cell table:style-name="ce12N2" office:value-type="float" office:value="145.11">
            <text:p>145,1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.267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891.03">
            <text:p>32891,03</text:p>
          </table:table-cell>
          <table:table-cell table:style-name="ce12N2" office:value-type="float" office:value="32.91">
            <text:p>3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6.05">
            <text:p>296,0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307.62">
            <text:p>1307,62</text:p>
          </table:table-cell>
          <table:table-cell table:style-name="ce12N2" office:value-type="float" office:value="38959.41">
            <text:p>38959,41</text:p>
          </table:table-cell>
          <table:table-cell table:style-name="ce12N2" office:value-type="float" office:value="2715.91">
            <text:p>2715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312116719130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13">
            <text:p>309713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02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6.85">
            <text:p>86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39.56">
            <text:p>839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308">
            <text:p>0,000</text:p>
          </table:table-cell>
          <table:table-cell table:style-name="ce12N2" office:value-type="float" office:value="0.16">
            <text:p>0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6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8.57">
            <text:p>708,57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38">
            <text:p>6,3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27.29">
            <text:p>27,29</text:p>
          </table:table-cell>
          <table:table-cell table:style-name="ce12N2" office:value-type="float" office:value="839.56">
            <text:p>839,56</text:p>
          </table:table-cell>
          <table:table-cell table:style-name="ce12N2" office:value-type="float" office:value="58.77">
            <text:p>58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02618842300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27">
            <text:p>27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85">
            <text:p>85,00</text:p>
          </table:table-cell>
          <table:table-cell table:style-name="ce26N2" office:value-type="float" office:value="100">
            <text:p>100,00</text:p>
          </table:table-cell>
          <table:table-cell table:style-name="ce26N2" office:value-type="float" office:value="4164.51">
            <text:p>4164,51</text:p>
          </table:table-cell>
          <table:table-cell table:style-name="ce26N2" office:value-type="float" office:value="128419.5">
            <text:p>128419,50</text:p>
          </table:table-cell>
          <table:table-cell table:style-name="ce26N2" office:value-type="float" office:value="8144.58">
            <text:p>8144,5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00">
            <text:p>200,00</text:p>
          </table:table-cell>
          <table:table-cell table:style-name="ce26N2" office:value-type="float" office:value="132731.51">
            <text:p>132731,5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.777491">
            <text:p>1,777</text:p>
          </table:table-cell>
          <table:table-cell table:style-name="ce26N2" office:value-type="float" office:value="128382">
            <text:p>128382,00</text:p>
          </table:table-cell>
          <table:table-cell table:style-name="ce26N2" office:value-type="float" office:value="132731.51">
            <text:p>132731,5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10320.93">
            <text:p>110320,93</text:p>
          </table:table-cell>
          <table:table-cell table:style-name="ce26N2" office:value-type="float" office:value="110.35">
            <text:p>110,3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992.9">
            <text:p>992,90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101.52">
            <text:p>1101,5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4.07">
            <text:p>34,0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SR ACABAMENT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44" meta:object-count="0"/>
    <meta:generator>LibreOffice/4.3.0.4$Windows_x86 LibreOffice_project/62ad5818884a2fc2e5780dd45466868d41009ec0</meta:generator>
  </office:meta>
</office:document-meta>
</file>