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9/05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5">
            <text:p>30760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1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0.85">
            <text:p>18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07">
            <text:p>0,02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0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08.53">
            <text:p>108,53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108.42">
            <text:p>1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1981980819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3">
            <text:p>307753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77.49">
            <text:p>527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7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8.85">
            <text:p>468,85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192.35">
            <text:p>19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631397264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6">
            <text:p>30777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62">
            <text:p>0,004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4.62">
            <text:p>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9571951809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9">
            <text:p>307949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3.18">
            <text:p>288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92.9">
            <text:p>259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15">
            <text:p>31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0.28">
            <text:p>290,28</text:p>
          </table:table-cell>
          <table:table-cell table:style-name="ce12N2" office:value-type="float" office:value="2592.9">
            <text:p>2592,90</text:p>
          </table:table-cell>
          <table:table-cell table:style-name="ce12N2" office:value-type="float" office:value="181.5">
            <text:p>18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08210026308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60">
            <text:p>3079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09">
            <text:p>0,009</text:p>
          </table:table-cell>
          <table:table-cell table:style-name="ce12N2" office:value-type="float" office:value="5.26">
            <text:p>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297.46">
            <text:p>29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099113428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79">
            <text:p>30797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4.13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5.9">
            <text:p>59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5.9">
            <text:p>59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5.9">
            <text:p>595,90</text:p>
          </table:table-cell>
          <table:table-cell table:style-name="ce12N2" office:value-type="float" office:value="41.71">
            <text:p>4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413312729072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2">
            <text:p>307982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85.6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.02">
            <text:p>17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.14">
            <text:p>165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2.88">
            <text:p>12,88</text:p>
          </table:table-cell>
          <table:table-cell table:style-name="ce12N2" office:value-type="float" office:value="165.14">
            <text:p>165,14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7023429000143550010003856661060559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4">
            <text:p>307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4.09">
            <text:p>335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4.09">
            <text:p>3354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872">
            <text:p>0,092</text:p>
          </table:table-cell>
          <table:table-cell table:style-name="ce12N2" office:value-type="float" office:value="3.9">
            <text:p>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4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4.09">
            <text:p>3354,09</text:p>
          </table:table-cell>
          <table:table-cell table:style-name="ce12N2" office:value-type="float" office:value="134.16">
            <text:p>1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217143173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1">
            <text:p>3080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71499456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2">
            <text:p>3080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09">
            <text:p>140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5.82">
            <text:p>85,82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52.81">
            <text:p>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81951063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9">
            <text:p>308059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9.88">
            <text:p>314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92.6">
            <text:p>2792,6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95">
            <text:p>0,030</text:p>
          </table:table-cell>
          <table:table-cell table:style-name="ce12N2" office:value-type="float" office:value="27.4">
            <text:p>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49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62">
            <text:p>41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72.28">
            <text:p>272,28</text:p>
          </table:table-cell>
          <table:table-cell table:style-name="ce12N2" office:value-type="float" office:value="2877.6">
            <text:p>2877,6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1321753896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2">
            <text:p>308072</text:p>
          </table:table-cell>
          <table:table-cell table:style-name="ce0" table:number-columns-spanned="4" table:number-rows-spanned="1" office:value-type="string" calcext:value-type="string">
            <text:p>2.927 - MOHAWK REVESTIMENTOS COCAL DO SUL LTDA</text:p>
          </table:table-cell>
          <table:covered-table-cell table:number-columns-repeated="3"/>
          <table:table-cell table:style-name="ce0" office:value-type="string" calcext:value-type="string">
            <text:p>1.901.3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.64">
            <text:p>160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0.3">
            <text:p>159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99.18">
            <text:p>49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.34">
            <text:p>10,34</text:p>
          </table:table-cell>
          <table:table-cell table:style-name="ce12N2" office:value-type="float" office:value="1590.3">
            <text:p>1590,30</text:p>
          </table:table-cell>
          <table:table-cell table:style-name="ce12N2" office:value-type="float" office:value="111.32">
            <text:p>11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6532538003269550010019013401001775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9">
            <text:p>308089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">
            <text:p>0,045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.75">
            <text:p>131,75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10.93">
            <text:p>1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11961153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0">
            <text:p>30815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0.8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44.93">
            <text:p>274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712">
            <text:p>0,144</text:p>
          </table:table-cell>
          <table:table-cell table:style-name="ce12N2" office:value-type="float" office:value="12.87">
            <text:p>1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4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41.62">
            <text:p>41,62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161.45">
            <text:p>16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0829163454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2">
            <text:p>3081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4.49">
            <text:p>789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19">
            <text:p>0,010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4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80.21">
            <text:p>6480,21</text:p>
          </table:table-cell>
          <table:table-cell table:style-name="ce12N2" office:value-type="float" office:value="6.48">
            <text:p>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32">
            <text:p>58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537.47">
            <text:p>5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331660428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3">
            <text:p>3082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65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367">
            <text:p>0,009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4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2.04">
            <text:p>3172,0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5">
            <text:p>28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259.62">
            <text:p>25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658196091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9">
            <text:p>1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73.66">
            <text:p>1673,66</text:p>
          </table:table-cell>
          <table:table-cell table:style-name="ce26N2" office:value-type="float" office:value="47418.11">
            <text:p>47418,11</text:p>
          </table:table-cell>
          <table:table-cell table:style-name="ce26N2" office:value-type="float" office:value="2893.28">
            <text:p>2893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9091.77">
            <text:p>49091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508752">
            <text:p>0,509</text:p>
          </table:table-cell>
          <table:table-cell table:style-name="ce26N2" office:value-type="float" office:value="47333.11">
            <text:p>47333,11</text:p>
          </table:table-cell>
          <table:table-cell table:style-name="ce26N2" office:value-type="float" office:value="49091.77">
            <text:p>49091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6521.1">
            <text:p>16521,10</text:p>
          </table:table-cell>
          <table:table-cell table:style-name="ce26N2" office:value-type="float" office:value="16.52">
            <text:p>16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48.69">
            <text:p>148,6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03.92">
            <text:p>603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59">
            <text:p>39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16" meta:object-count="0"/>
    <meta:generator>LibreOffice/4.3.0.4$Windows_x86 LibreOffice_project/62ad5818884a2fc2e5780dd45466868d41009ec0</meta:generator>
  </office:meta>
</office:document-meta>
</file>