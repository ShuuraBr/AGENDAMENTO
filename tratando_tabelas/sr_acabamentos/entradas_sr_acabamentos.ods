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2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4">
            <text:p>3070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.66">
            <text:p>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276">
            <text:p>0,134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81473767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1">
            <text:p>3071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.26">
            <text:p>117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916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4.05">
            <text:p>104,05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74.7">
            <text:p>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89177323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0">
            <text:p>3071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01599979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1">
            <text:p>307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28">
            <text:p>376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6658">
            <text:p>0,537</text:p>
          </table:table-cell>
          <table:table-cell table:style-name="ce12N2" office:value-type="float" office:value="34.56">
            <text:p>3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69.9">
            <text:p>169,9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413226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4">
            <text:p>307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41533961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6">
            <text:p>3072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97">
            <text:p>52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68">
            <text:p>0,0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.91">
            <text:p>31,91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34.38">
            <text:p>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6106740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7">
            <text:p>3072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14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51121039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0">
            <text:p>30728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5.63">
            <text:p>238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6476">
            <text:p>20,166</text:p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.93">
            <text:p>43,9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79">
            <text:p>170,79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88.59">
            <text:p>8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71279175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1">
            <text:p>30728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2.99">
            <text:p>476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2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63">
            <text:p>58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16.99">
            <text:p>216,99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181.84">
            <text:p>18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8153458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6">
            <text:p>3072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013">
            <text:p>0,550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1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417150297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1">
            <text:p>3073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454">
            <text:p>0,134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7.23">
            <text:p>27,23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81228464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2">
            <text:p>3073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.43">
            <text:p>2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64">
            <text:p>0,1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6.69">
            <text:p>16,69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10.27">
            <text:p>1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71206775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3">
            <text:p>3073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9.61">
            <text:p>420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1828">
            <text:p>0,472</text:p>
          </table:table-cell>
          <table:table-cell table:style-name="ce12N2" office:value-type="float" office:value="7.22">
            <text:p>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0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56.93">
            <text:p>256,93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158.11">
            <text:p>15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71596208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4">
            <text:p>3073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.26">
            <text:p>5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032">
            <text:p>0,123</text:p>
          </table:table-cell>
          <table:table-cell table:style-name="ce12N2" office:value-type="float" office:value="4.49">
            <text:p>4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61221787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3">
            <text:p>30735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3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6.41">
            <text:p>220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42">
            <text:p>1942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79.41">
            <text:p>179,41</text:p>
          </table:table-cell>
          <table:table-cell table:style-name="ce12N2" office:value-type="float" office:value="2027">
            <text:p>2027,00</text:p>
          </table:table-cell>
          <table:table-cell table:style-name="ce12N2" office:value-type="float" office:value="81.07">
            <text:p>8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3218182851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0">
            <text:p>307370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.81">
            <text:p>6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56">
            <text:p>0,0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3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60.75">
            <text:p>60,75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94416000195550010000482621000254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8">
            <text:p>30737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.96">
            <text:p>136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352">
            <text:p>0,122</text:p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94.45">
            <text:p>9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6021560856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5">
            <text:p>30742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.5">
            <text:p>3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41.12">
            <text:p>4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791608989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6">
            <text:p>307426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">
            <text:p>0,024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.01">
            <text:p>46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53.49">
            <text:p>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801321349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3">
            <text:p>30746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5.43">
            <text:p>125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91.47">
            <text:p>91,47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.34">
            <text:p>2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25,3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2133975568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0">
            <text:p>307470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10.50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5.23">
            <text:p>253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">
            <text:p>14,00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25.23">
            <text:p>225,23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92.4">
            <text:p>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105011217621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2">
            <text:p>30747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23">
            <text:p>24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932">
            <text:p>0,245</text:p>
          </table:table-cell>
          <table:table-cell table:style-name="ce12N2" office:value-type="float" office:value="21.65">
            <text:p>2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">
            <text:p>1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.33">
            <text:p>17,33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164.1">
            <text:p>16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9831576786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5">
            <text:p>3074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8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36">
            <text:p>0,001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234.61">
            <text:p>23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85115209129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1">
            <text:p>307501</text:p>
          </table:table-cell>
          <table:table-cell table:style-name="ce0" table:number-columns-spanned="4" table:number-rows-spanned="1" office:value-type="string" calcext:value-type="string">
            <text:p>38.599 - S&amp;L IMPORTS COMERCIO DE IMPORTACAO E EXPORTACAO DE PRODUTOS</text:p>
          </table:table-cell>
          <table:covered-table-cell table:number-columns-repeated="3"/>
          <table:table-cell table:style-name="ce0" office:value-type="string" calcext:value-type="string">
            <text:p>19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.64">
            <text:p>96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6">
            <text:p>0,0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85.34">
            <text:p>85,34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35.01">
            <text:p>3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3765312000145550010000197501000329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6">
            <text:p>30750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0.14">
            <text:p>598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80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438.17">
            <text:p>438,17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387.94">
            <text:p>38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0.72">
            <text:p>1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20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11055606702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40">
            <text:p>307540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01">
            <text:p>0,005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33">
            <text:p>6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90179354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0">
            <text:p>3075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212837875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1">
            <text:p>307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31188671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3">
            <text:p>307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.07">
            <text:p>14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115776628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7">
            <text:p>307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21165316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1">
            <text:p>307591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42.74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4552">
            <text:p>0,255</text:p>
          </table:table-cell>
          <table:table-cell table:style-name="ce12N2" office:value-type="float" office:value="31.92">
            <text:p>3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1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180.78">
            <text:p>18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763720000171550050012427491309781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7">
            <text:p>3075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0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8.05">
            <text:p>256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64">
            <text:p>40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49.97">
            <text:p>249,97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162.27">
            <text:p>1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005141786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5">
            <text:p>307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0.85">
            <text:p>18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07">
            <text:p>0,02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8.53">
            <text:p>108,53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108.42">
            <text:p>1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98198081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10">
            <text:p>3077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3">
            <text:p>5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00.2">
            <text:p>4900,20</text:p>
          </table:table-cell>
          <table:table-cell table:style-name="ce26N2" office:value-type="float" office:value="112415.53">
            <text:p>112415,53</text:p>
          </table:table-cell>
          <table:table-cell table:style-name="ce26N2" office:value-type="float" office:value="6514.15">
            <text:p>6514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2.57">
            <text:p>172,57</text:p>
          </table:table-cell>
          <table:table-cell table:style-name="ce26N2" office:value-type="float" office:value="117315.73">
            <text:p>117315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0.130762">
            <text:p>40,131</text:p>
          </table:table-cell>
          <table:table-cell table:style-name="ce26N2" office:value-type="float" office:value="112330.53">
            <text:p>112330,53</text:p>
          </table:table-cell>
          <table:table-cell table:style-name="ce26N2" office:value-type="float" office:value="117315.73">
            <text:p>117315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108.32">
            <text:p>610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56">
            <text:p>40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36" meta:object-count="0"/>
    <meta:generator>LibreOffice/4.3.0.4$Windows_x86 LibreOffice_project/62ad5818884a2fc2e5780dd45466868d41009ec0</meta:generator>
  </office:meta>
</office:document-meta>
</file>