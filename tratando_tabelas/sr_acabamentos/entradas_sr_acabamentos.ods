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07:39:20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7">
            <text:p>306567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2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12.79">
            <text:p>3181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52322">
            <text:p>2,652</text:p>
          </table:table-cell>
          <table:table-cell table:style-name="ce12N2" office:value-type="float" office:value="12352.88">
            <text:p>1235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12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0.88">
            <text:p>200,88</text:p>
          </table:table-cell>
          <table:table-cell table:style-name="ce12N2" office:value-type="float" office:value="31611.91">
            <text:p>31611,91</text:p>
          </table:table-cell>
          <table:table-cell table:style-name="ce12N2" office:value-type="float" office:value="3793.41">
            <text:p>3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3005123000103550010005528801581503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4">
            <text:p>74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3412.13">
            <text:p>3412,13</text:p>
          </table:table-cell>
          <table:table-cell table:style-name="ce26N2" office:value-type="float" office:value="351290.34">
            <text:p>351290,34</text:p>
          </table:table-cell>
          <table:table-cell table:style-name="ce26N2" office:value-type="float" office:value="23306.03">
            <text:p>23306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4702.47">
            <text:p>354702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4.766963">
            <text:p>34,767</text:p>
          </table:table-cell>
          <table:table-cell table:style-name="ce26N2" office:value-type="float" office:value="352029.14">
            <text:p>352029,14</text:p>
          </table:table-cell>
          <table:table-cell table:style-name="ce26N2" office:value-type="float" office:value="354702.47">
            <text:p>354702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567.93">
            <text:p>17567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02">
            <text:p>39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38" meta:object-count="0"/>
    <meta:generator>LibreOffice/4.3.0.4$Windows_x86 LibreOffice_project/62ad5818884a2fc2e5780dd45466868d41009ec0</meta:generator>
  </office:meta>
</office:document-meta>
</file>