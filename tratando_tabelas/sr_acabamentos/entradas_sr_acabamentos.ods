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2/05/2026 07:50:0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2">
            <text:p>306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.34">
            <text:p>19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156">
            <text:p>0,205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1.68">
            <text:p>11,68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7.19">
            <text:p>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314184854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3">
            <text:p>306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61701493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4">
            <text:p>306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45">
            <text:p>20,45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22.03">
            <text:p>2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71201839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5">
            <text:p>306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28">
            <text:p>0,011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50.12">
            <text:p>5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81968152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6">
            <text:p>306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83.15">
            <text:p>8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91603431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5">
            <text:p>306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8.98">
            <text:p>11414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">
            <text:p>128,00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477">
            <text:p>4,995</text:p>
          </table:table-cell>
          <table:table-cell table:style-name="ce12N2" office:value-type="float" office:value="313.53">
            <text:p>3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48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000.74">
            <text:p>1000,74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7362.41">
            <text:p>73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5199163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7">
            <text:p>30629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89.81">
            <text:p>321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05694">
            <text:p>12,806</text:p>
          </table:table-cell>
          <table:table-cell table:style-name="ce12N2" office:value-type="float" office:value="1682.52">
            <text:p>168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1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9.03">
            <text:p>19,03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2239.23">
            <text:p>22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518511014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8">
            <text:p>30629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1284">
            <text:p>2,013</text:p>
          </table:table-cell>
          <table:table-cell table:style-name="ce12N2" office:value-type="float" office:value="74.93">
            <text:p>74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5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131.29">
            <text:p>13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6197507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3">
            <text:p>30632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2">
            <text:p>0,00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25.35">
            <text:p>2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71675258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4">
            <text:p>30632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32">
            <text:p>0,184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46.32">
            <text:p>4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815785631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2">
            <text:p>30645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7.0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70901102502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3">
            <text:p>3064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8.0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40.22">
            <text:p>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80131368351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2">
            <text:p>30648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91">
            <text:p>2,592</text:p>
          </table:table-cell>
          <table:table-cell table:style-name="ce12N2" office:value-type="float" office:value="1194.89">
            <text:p>1194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5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766.71">
            <text:p>76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41890695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3">
            <text:p>30648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024">
            <text:p>0,170</text:p>
          </table:table-cell>
          <table:table-cell table:style-name="ce12N2" office:value-type="float" office:value="48.56">
            <text:p>4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54.12">
            <text:p>5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51713167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4">
            <text:p>3064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5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218.26">
            <text:p>21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6188292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9">
            <text:p>306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4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29.71">
            <text:p>2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41648435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5">
            <text:p>3064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6.35">
            <text:p>391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72">
            <text:p>0,03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54.03">
            <text:p>154,03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263.36">
            <text:p>2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1151642868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0">
            <text:p>3065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3.71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73.85">
            <text:p>1247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9833">
            <text:p>3,010</text:p>
          </table:table-cell>
          <table:table-cell table:style-name="ce12N2" office:value-type="float" office:value="251.5">
            <text:p>25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7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90.78">
            <text:p>290,78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704.43">
            <text:p>70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37191121562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9">
            <text:p>3066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71396106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0">
            <text:p>3066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46">
            <text:p>35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4">
            <text:p>0,000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23.43">
            <text:p>2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81366796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1">
            <text:p>3066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5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91770168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2">
            <text:p>306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.02">
            <text:p>7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44.92">
            <text:p>44,92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01118430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3">
            <text:p>3066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56.07">
            <text:p>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1151541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4">
            <text:p>306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216172472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5">
            <text:p>306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5.65">
            <text:p>100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1.37">
            <text:p>61,37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66.1">
            <text:p>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3135646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6">
            <text:p>3066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.59">
            <text:p>1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36">
            <text:p>0,0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.29">
            <text:p>10,29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41281024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7">
            <text:p>3066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512016082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8">
            <text:p>3066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61437548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9">
            <text:p>30668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95.71">
            <text:p>2489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9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639.71">
            <text:p>2639,71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890.23">
            <text:p>89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3321433515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0">
            <text:p>3066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4">
            <text:p>0,000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71452555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1">
            <text:p>3066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814514302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8">
            <text:p>3066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1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312.73">
            <text:p>31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1971064436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0">
            <text:p>306700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8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514">
            <text:p>0,277</text:p>
          </table:table-cell>
          <table:table-cell table:style-name="ce12N2" office:value-type="float" office:value="21.7">
            <text:p>2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7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656.6">
            <text:p>6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0142240000120550010007080221947081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3">
            <text:p>30670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71.86">
            <text:p>2267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1745.65">
            <text:p>21745,65</text:p>
          </table:table-cell>
          <table:table-cell table:style-name="ce12N2" office:value-type="float" office:value="550">
            <text:p>550,00</text:p>
          </table:table-cell>
          <table:table-cell table:style-name="ce12N3" office:value-type="float" office:value="0.0177">
            <text:p>0,018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67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22295.65">
            <text:p>22295,65</text:p>
          </table:table-cell>
          <table:table-cell table:style-name="ce12N2" office:value-type="float" office:value="1560.7">
            <text:p>15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57074200032955001000010079108582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4">
            <text:p>306734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69.90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3.17">
            <text:p>177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3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8.23">
            <text:p>108,23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116.54">
            <text:p>11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1522460000128550050007699031909928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5">
            <text:p>30673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6.87">
            <text:p>26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52.5">
            <text:p>2352,5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5513">
            <text:p>0,055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55">
            <text:p>41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29.37">
            <text:p>229,37</text:p>
          </table:table-cell>
          <table:table-cell table:style-name="ce12N2" office:value-type="float" office:value="2437.5">
            <text:p>2437,50</text:p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3951294218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5">
            <text:p>306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5991815162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6">
            <text:p>306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9.86">
            <text:p>278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122">
            <text:p>0,029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6.44">
            <text:p>46,44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192.04">
            <text:p>19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01278295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7">
            <text:p>3067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5">
            <text:p>0,033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11538303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8">
            <text:p>306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7.81">
            <text:p>67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88">
            <text:p>0,03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21368995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0">
            <text:p>306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.98">
            <text:p>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228">
            <text:p>0,031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1.54">
            <text:p>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31796922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5">
            <text:p>306825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698.87">
            <text:p>756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">
            <text:p>55,00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00605">
            <text:p>4,401</text:p>
          </table:table-cell>
          <table:table-cell table:style-name="ce12N2" office:value-type="float" office:value="623.56">
            <text:p>62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69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27.27">
            <text:p>4427,27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3720.23">
            <text:p>372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33171531710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8">
            <text:p>306828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53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8.4">
            <text:p>367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528.27">
            <text:p>3528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14848">
            <text:p>5,015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78">
            <text:p>58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50.13">
            <text:p>150,13</text:p>
          </table:table-cell>
          <table:table-cell table:style-name="ce12N2" office:value-type="float" office:value="3528.27">
            <text:p>3528,27</text:p>
          </table:table-cell>
          <table:table-cell table:style-name="ce12N2" office:value-type="float" office:value="141.13">
            <text:p>14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1534179386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1">
            <text:p>30684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5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.37">
            <text:p>88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5.8">
            <text:p>8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832">
            <text:p>0,006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8.57">
            <text:p>78,57</text:p>
          </table:table-cell>
          <table:table-cell table:style-name="ce12N2" office:value-type="float" office:value="805.8">
            <text:p>805,80</text:p>
          </table:table-cell>
          <table:table-cell table:style-name="ce12N2" office:value-type="float" office:value="56.41">
            <text:p>5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55231630413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2">
            <text:p>30684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4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16.2">
            <text:p>471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284.5">
            <text:p>42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197">
            <text:p>0,07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1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44">
            <text:p>53,4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31.7">
            <text:p>431,70</text:p>
          </table:table-cell>
          <table:table-cell table:style-name="ce12N2" office:value-type="float" office:value="4284.5">
            <text:p>4284,50</text:p>
          </table:table-cell>
          <table:table-cell table:style-name="ce12N2" office:value-type="float" office:value="195.58">
            <text:p>19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48871000680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1">
            <text:p>306851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7.87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2">
            <text:p>0,015</text:p>
          </table:table-cell>
          <table:table-cell table:style-name="ce12N2" office:value-type="float" office:value="10.8">
            <text:p>1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787417051299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2">
            <text:p>306852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29">
            <text:p>282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2495.93">
            <text:p>2495,93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1538">
            <text:p>0,042</text:p>
          </table:table-cell>
          <table:table-cell table:style-name="ce12N2" office:value-type="float" office:value="8.15">
            <text:p>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58">
            <text:p>4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243.36">
            <text:p>243,36</text:p>
          </table:table-cell>
          <table:table-cell table:style-name="ce12N2" office:value-type="float" office:value="2580.93">
            <text:p>2580,93</text:p>
          </table:table-cell>
          <table:table-cell table:style-name="ce12N2" office:value-type="float" office:value="103.23">
            <text:p>10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6011236377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5">
            <text:p>306855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0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8.19">
            <text:p>736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9575">
            <text:p>0,400</text:p>
          </table:table-cell>
          <table:table-cell table:style-name="ce12N2" office:value-type="float" office:value="186.98">
            <text:p>186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6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512.74">
            <text:p>51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04401515494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8">
            <text:p>306878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8.6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5.13">
            <text:p>7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75.13">
            <text:p>77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016">
            <text:p>0,037</text:p>
          </table:table-cell>
          <table:table-cell table:style-name="ce12N2" office:value-type="float" office:value="3.44">
            <text:p>3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5.13">
            <text:p>775,13</text:p>
          </table:table-cell>
          <table:table-cell table:style-name="ce12N2" office:value-type="float" office:value="93.02">
            <text:p>9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01422400001205500100070863012580693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0">
            <text:p>306890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1.54">
            <text:p>539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12.56">
            <text:p>491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478.98">
            <text:p>478,98</text:p>
          </table:table-cell>
          <table:table-cell table:style-name="ce12N2" office:value-type="float" office:value="4912.56">
            <text:p>4912,56</text:p>
          </table:table-cell>
          <table:table-cell table:style-name="ce12N2" office:value-type="float" office:value="196.51">
            <text:p>19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6871393781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9">
            <text:p>3069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71.24">
            <text:p>5271,24</text:p>
          </table:table-cell>
          <table:table-cell table:style-name="ce12N2" office:value-type="float" office:value="368.99">
            <text:p>36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1151680457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2">
            <text:p>3069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3.8">
            <text:p>2233,80</text:p>
          </table:table-cell>
          <table:table-cell table:style-name="ce12N2" office:value-type="float" office:value="156.37">
            <text:p>15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28174546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0">
            <text:p>306960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0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60.25">
            <text:p>1556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177.9">
            <text:p>1417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56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1382.35">
            <text:p>1382,35</text:p>
          </table:table-cell>
          <table:table-cell table:style-name="ce12N2" office:value-type="float" office:value="14177.9">
            <text:p>14177,90</text:p>
          </table:table-cell>
          <table:table-cell table:style-name="ce12N2" office:value-type="float" office:value="992.45">
            <text:p>99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4.11">
            <text:p>31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75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7/05/2026</text:p>
          </table:table-cell>
          <table:table-cell table:style-name="ce12" office:value-type="string" calcext:value-type="string">
            <text:p>314,1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35260558329608000144550010002609171002609187</text:p>
          </table:table-cell>
          <table:table-cell table:style-name="ce0" office:value-type="string" calcext:value-type="string">
            <text:p>3526051138956500020057005000398751100085001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1">
            <text:p>30697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6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1.94">
            <text:p>976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9686.39">
            <text:p>968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854">
            <text:p>0,341</text:p>
          </table:table-cell>
          <table:table-cell table:style-name="ce12N2" office:value-type="float" office:value="55.47">
            <text:p>55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1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75.55">
            <text:p>75,55</text:p>
          </table:table-cell>
          <table:table-cell table:style-name="ce12N2" office:value-type="float" office:value="9686.39">
            <text:p>9686,39</text:p>
          </table:table-cell>
          <table:table-cell table:style-name="ce12N2" office:value-type="float" office:value="633.74">
            <text:p>6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62611177625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3">
            <text:p>306973</text:p>
          </table:table-cell>
          <table:table-cell table:style-name="ce0" table:number-columns-spanned="4" table:number-rows-spanned="1" office:value-type="string" calcext:value-type="string">
            <text:p>38.510 - MAC FER INDUSTRIA E COMERCIO LTDA</text:p>
          </table:table-cell>
          <table:covered-table-cell table:number-columns-repeated="3"/>
          <table:table-cell table:style-name="ce0" office:value-type="string" calcext:value-type="string">
            <text:p>43.81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69.63">
            <text:p>2186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12N2" office:value-type="float" office:value="20979.06">
            <text:p>20979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69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39">
            <text:p>74,3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890.57">
            <text:p>890,57</text:p>
          </table:table-cell>
          <table:table-cell table:style-name="ce12N2" office:value-type="float" office:value="20979.06">
            <text:p>20979,06</text:p>
          </table:table-cell>
          <table:table-cell table:style-name="ce12N2" office:value-type="float" office:value="839.13">
            <text:p>83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1.48">
            <text:p>4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57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5/05/2026</text:p>
          </table:table-cell>
          <table:table-cell table:style-name="ce12" office:value-type="string" calcext:value-type="string">
            <text:p>441,4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42260401145165000386550000000438191704493561</text:p>
          </table:table-cell>
          <table:table-cell table:style-name="ce0" office:value-type="string" calcext:value-type="string">
            <text:p>3526051138956500020057005000398574100084820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38">
            <text:p>30703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1.28">
            <text:p>421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799.7">
            <text:p>3799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92">
            <text:p>0,127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63">
            <text:p>40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411.58">
            <text:p>411,58</text:p>
          </table:table-cell>
          <table:table-cell table:style-name="ce12N2" office:value-type="float" office:value="3799.7">
            <text:p>3799,70</text:p>
          </table:table-cell>
          <table:table-cell table:style-name="ce12N2" office:value-type="float" office:value="151.98">
            <text:p>15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386166632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39">
            <text:p>307039</text:p>
          </table:table-cell>
          <table:table-cell table:style-name="ce0" table:number-columns-spanned="4" table:number-rows-spanned="1" office:value-type="string" calcext:value-type="string">
            <text:p>38.510 - MAC FER INDUSTRIA E COMERCIO LTDA</text:p>
          </table:table-cell>
          <table:covered-table-cell table:number-columns-repeated="3"/>
          <table:table-cell table:style-name="ce0" office:value-type="string" calcext:value-type="string">
            <text:p>43.82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49.4">
            <text:p>604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5888.64">
            <text:p>588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4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60.76">
            <text:p>160,76</text:p>
          </table:table-cell>
          <table:table-cell table:style-name="ce12N2" office:value-type="float" office:value="5888.64">
            <text:p>5888,64</text:p>
          </table:table-cell>
          <table:table-cell table:style-name="ce12N2" office:value-type="float" office:value="235.55">
            <text:p>2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2.12">
            <text:p>1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57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5/05/2026</text:p>
          </table:table-cell>
          <table:table-cell table:style-name="ce12" office:value-type="string" calcext:value-type="string">
            <text:p>122,1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42260401145165000386550000000438201758251036</text:p>
          </table:table-cell>
          <table:table-cell table:style-name="ce0" office:value-type="string" calcext:value-type="string">
            <text:p>3526051138956500020057005000398574100084820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9">
            <text:p>30704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.72">
            <text:p>1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5.52">
            <text:p>15,52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61727013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1">
            <text:p>307051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13.56">
            <text:p>741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1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658.61">
            <text:p>658,61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468.39">
            <text:p>46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51314694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5">
            <text:p>307055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0.9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2.07">
            <text:p>253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024">
            <text:p>0,076</text:p>
          </table:table-cell>
          <table:table-cell table:style-name="ce12N2" office:value-type="float" office:value="11.04">
            <text:p>1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24.95">
            <text:p>224,95</text:p>
          </table:table-cell>
          <table:table-cell table:style-name="ce12N2" office:value-type="float" office:value="2307.12">
            <text:p>2307,12</text:p>
          </table:table-cell>
          <table:table-cell table:style-name="ce12N2" office:value-type="float" office:value="161.49">
            <text:p>16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3068580001535500100007092612378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7">
            <text:p>307057</text:p>
          </table:table-cell>
          <table:table-cell table:style-name="ce0" table:number-columns-spanned="4" table:number-rows-spanned="1" office:value-type="string" calcext:value-type="string">
            <text:p>38.511 - MAC FER INDUSTRIA E COMERCIO LTDA</text:p>
          </table:table-cell>
          <table:covered-table-cell table:number-columns-repeated="3"/>
          <table:table-cell table:style-name="ce0" office:value-type="string" calcext:value-type="string">
            <text:p>83.28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5.24">
            <text:p>79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05">
            <text:p>74,0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50.4">
            <text:p>50,40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52.15">
            <text:p>5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8.59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5/05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35260401145165000114550000000832801502031827</text:p>
          </table:table-cell>
          <table:table-cell table:style-name="ce0" office:value-type="string" calcext:value-type="string">
            <text:p>35260511389565000200570050003985911000848377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97">
            <text:p>9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20">
            <text:p>720,00</text:p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15608.1">
            <text:p>15608,10</text:p>
          </table:table-cell>
          <table:table-cell table:style-name="ce26N2" office:value-type="float" office:value="512203.05">
            <text:p>512203,05</text:p>
          </table:table-cell>
          <table:table-cell table:style-name="ce26N2" office:value-type="float" office:value="30404.03">
            <text:p>30404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67.43">
            <text:p>967,43</text:p>
          </table:table-cell>
          <table:table-cell table:style-name="ce26N2" office:value-type="float" office:value="527811.15">
            <text:p>527811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2.368432">
            <text:p>42,368</text:p>
          </table:table-cell>
          <table:table-cell table:style-name="ce26N2" office:value-type="float" office:value="511383.05">
            <text:p>511383,05</text:p>
          </table:table-cell>
          <table:table-cell table:style-name="ce26N2" office:value-type="float" office:value="527811.15">
            <text:p>527811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432.09">
            <text:p>6432,0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92">
            <text:p>40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64" meta:object-count="0"/>
    <meta:generator>LibreOffice/4.3.0.4$Windows_x86 LibreOffice_project/62ad5818884a2fc2e5780dd45466868d41009ec0</meta:generator>
  </office:meta>
</office:document-meta>
</file>