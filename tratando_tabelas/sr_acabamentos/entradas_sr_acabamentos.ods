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2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00.725</text:p>
          </table:table-cell>
          <table:table-cell table:style-name="ce0" office:value-type="string" calcext:value-type="string">
            <text:p>2.123 - RG TRANSPORTES RODOVIARIOS LTDA</text:p>
          </table:table-cell>
          <table:table-cell table:style-name="ce0" office:value-type="string" calcext:value-type="string">
            <text:p>18/06/2026</text:p>
          </table:table-cell>
          <table:table-cell table:style-name="ce12" office:value-type="string" calcext:value-type="string">
            <text:p>200,00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>352606025924210001845700200010072519030615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6">
            <text:p>3095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2.59">
            <text:p>315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">
            <text:p>80,0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187">
            <text:p>0,366</text:p>
          </table:table-cell>
          <table:table-cell table:style-name="ce12N2" office:value-type="float" office:value="61.87">
            <text:p>6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2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37.53">
            <text:p>26437,53</text:p>
          </table:table-cell>
          <table:table-cell table:style-name="ce12N2" office:value-type="float" office:value="26.41">
            <text:p>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97.4">
            <text:p>197,4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2192.78">
            <text:p>219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9541959306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10">
            <text:p>3096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3.54">
            <text:p>631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7.87">
            <text:p>5277,87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8.46">
            <text:p>598,46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228.6">
            <text:p>2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8851445148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8">
            <text:p>3096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32">
            <text:p>2311,32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21442965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6">
            <text:p>309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4">
            <text:p>0,002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3.56">
            <text:p>1743,56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144.61">
            <text:p>14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501521566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6">
            <text:p>30970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0.39">
            <text:p>249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91.7">
            <text:p>2191,7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41">
            <text:p>0,029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3.46">
            <text:p>1983,46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6">
            <text:p>17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13.69">
            <text:p>213,69</text:p>
          </table:table-cell>
          <table:table-cell table:style-name="ce12N2" office:value-type="float" office:value="2276.7">
            <text:p>2276,70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3511942340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8">
            <text:p>3097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67.03">
            <text:p>402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0546">
            <text:p>0,411</text:p>
          </table:table-cell>
          <table:table-cell table:style-name="ce12N2" office:value-type="float" office:value="145.11">
            <text:p>145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6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91.03">
            <text:p>32891,03</text:p>
          </table:table-cell>
          <table:table-cell table:style-name="ce12N2" office:value-type="float" office:value="32.91">
            <text:p>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.05">
            <text:p>296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07.62">
            <text:p>1307,62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2715.91">
            <text:p>271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211671913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3">
            <text:p>30976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4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6.39">
            <text:p>396,39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7">
            <text:p>3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32.88">
            <text:p>3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4781448006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2">
            <text:p>309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2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3.69">
            <text:p>1840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18370.73">
            <text:p>183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0165">
            <text:p>0,220</text:p>
          </table:table-cell>
          <table:table-cell table:style-name="ce12N2" office:value-type="float" office:value="55.98">
            <text:p>5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03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05.86">
            <text:p>15505,86</text:p>
          </table:table-cell>
          <table:table-cell table:style-name="ce12N2" office:value-type="float" office:value="15.54">
            <text:p>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56">
            <text:p>139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32.96">
            <text:p>32,96</text:p>
          </table:table-cell>
          <table:table-cell table:style-name="ce12N2" office:value-type="float" office:value="18370.73">
            <text:p>18370,73</text:p>
          </table:table-cell>
          <table:table-cell table:style-name="ce12N2" office:value-type="float" office:value="1284.37">
            <text:p>128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2621277311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7">
            <text:p>3098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4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8.43">
            <text:p>52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8.43">
            <text:p>528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948">
            <text:p>0,025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5.98">
            <text:p>445,9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43">
            <text:p>528,43</text:p>
          </table:table-cell>
          <table:table-cell table:style-name="ce12N2" office:value-type="float" office:value="36.99">
            <text:p>3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47515332883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9">
            <text:p>309869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39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.36">
            <text:p>2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.36">
            <text:p>64,36</text:p>
          </table:table-cell>
          <table:table-cell table:style-name="ce12N2" office:value-type="float" office:value="161">
            <text:p>161,00</text:p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0.05">
            <text:p>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.36">
            <text:p>225,36</text:p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3991156444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5">
            <text:p>309875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9.2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0.96">
            <text:p>81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7.52">
            <text:p>76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672">
            <text:p>0,028</text:p>
          </table:table-cell>
          <table:table-cell table:style-name="ce12N2" office:value-type="float" office:value="1.73">
            <text:p>1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9.9">
            <text:p>659,90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94">
            <text:p>5,9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43.44">
            <text:p>43,44</text:p>
          </table:table-cell>
          <table:table-cell table:style-name="ce12N2" office:value-type="float" office:value="767.52">
            <text:p>767,52</text:p>
          </table:table-cell>
          <table:table-cell table:style-name="ce12N2" office:value-type="float" office:value="40.36">
            <text:p>4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92121844864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9">
            <text:p>309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5.12">
            <text:p>1635,12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72">
            <text:p>14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135.62">
            <text:p>13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03141597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0">
            <text:p>3100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3.94">
            <text:p>493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529">
            <text:p>0,031</text:p>
          </table:table-cell>
          <table:table-cell table:style-name="ce12N2" office:value-type="float" office:value="6.13">
            <text:p>6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3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99">
            <text:p>4089,99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1">
            <text:p>3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7.84">
            <text:p>87,84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339.22">
            <text:p>33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71314958552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4">
            <text:p>3100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699.78">
            <text:p>3469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804">
            <text:p>0,199</text:p>
          </table:table-cell>
          <table:table-cell table:style-name="ce12N2" office:value-type="float" office:value="31.62">
            <text:p>3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69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11.42">
            <text:p>28911,42</text:p>
          </table:table-cell>
          <table:table-cell table:style-name="ce12N2" office:value-type="float" office:value="28.9">
            <text:p>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22">
            <text:p>260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469.29">
            <text:p>469,29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2372.09">
            <text:p>237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611544103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0">
            <text:p>3100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8">
            <text:p>0,001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.87">
            <text:p>273,87</text:p>
          </table:table-cell>
          <table:table-cell table:style-name="ce12N2" office:value-type="float" office:value="0.27">
            <text:p>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22.72">
            <text:p>2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11146552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5">
            <text:p>3100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2.7">
            <text:p>17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04">
            <text:p>0,00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16">
            <text:p>1365,16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5.14">
            <text:p>105,14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113.23">
            <text:p>11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731738547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7">
            <text:p>3100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5.99">
            <text:p>15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247">
            <text:p>0,024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4.36">
            <text:p>1304,36</text:p>
          </table:table-cell>
          <table:table-cell table:style-name="ce12N2" office:value-type="float" office:value="1.31">
            <text:p>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4">
            <text:p>11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108.17">
            <text:p>1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89171437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5">
            <text:p>310065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6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5.37">
            <text:p>1139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681.1">
            <text:p>10681,10</text:p>
          </table:table-cell>
          <table:table-cell table:style-name="ce12N2" office:value-type="float" office:value="494">
            <text:p>494,00</text:p>
          </table:table-cell>
          <table:table-cell table:style-name="ce12N3" office:value-type="float" office:value="0.00792">
            <text:p>0,008</text:p>
          </table:table-cell>
          <table:table-cell table:style-name="ce12N2" office:value-type="float" office:value="13.11">
            <text:p>13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20.94">
            <text:p>10020,94</text:p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19">
            <text:p>90,19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220.27">
            <text:p>220,27</text:p>
          </table:table-cell>
          <table:table-cell table:style-name="ce12N2" office:value-type="float" office:value="11175.1">
            <text:p>11175,10</text:p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4570742000329550010000106821048503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8">
            <text:p>31006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6">
            <text:p>0,002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3.45">
            <text:p>1033,45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47.45">
            <text:p>4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691623336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9">
            <text:p>31006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74">
            <text:p>0,003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5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47.03">
            <text:p>4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721198929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6">
            <text:p>31011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1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22.22">
            <text:p>1622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2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84.01">
            <text:p>13684,01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16">
            <text:p>123,16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97.93">
            <text:p>397,93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745.5">
            <text:p>74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308456000149550050004571091168026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0">
            <text:p>3101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4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08">
            <text:p>0,037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8.26">
            <text:p>1218,26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6">
            <text:p>1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101.04">
            <text:p>1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4881356718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3">
            <text:p>3101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5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">
            <text:p>0,000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.76">
            <text:p>86,76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586137303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5">
            <text:p>3101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84">
            <text:p>0,004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.41">
            <text:p>614,41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53">
            <text:p>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50.96">
            <text:p>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48197179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5">
            <text:p>310175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16.66">
            <text:p>5916,66</text:p>
          </table:table-cell>
          <table:table-cell table:style-name="ce12N2" office:value-type="float" office:value="1347.76">
            <text:p>1347,7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38.8">
            <text:p>67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1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78.63">
            <text:p>4978,63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8">
            <text:p>44,8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525.62">
            <text:p>525,62</text:p>
          </table:table-cell>
          <table:table-cell table:style-name="ce12N2" office:value-type="float" office:value="5391.04">
            <text:p>5391,04</text:p>
          </table:table-cell>
          <table:table-cell table:style-name="ce12N2" office:value-type="float" office:value="215.64">
            <text:p>21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7781412000109550010000120921000337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7">
            <text:p>37,00</text:p>
          </table:table-cell>
          <table:table-cell table:style-name="ce26N2" office:value-type="float" office:value="1347.76">
            <text:p>1347,76</text:p>
          </table:table-cell>
          <table:table-cell table:style-name="ce26N2" office:value-type="float" office:value="1050.5">
            <text:p>1050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400.77">
            <text:p>4400,77</text:p>
          </table:table-cell>
          <table:table-cell table:style-name="ce26N2" office:value-type="float" office:value="205297.71">
            <text:p>205297,71</text:p>
          </table:table-cell>
          <table:table-cell table:style-name="ce26N2" office:value-type="float" office:value="13288.47">
            <text:p>13288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0">
            <text:p>200,00</text:p>
          </table:table-cell>
          <table:table-cell table:style-name="ce26N2" office:value-type="float" office:value="209845.98">
            <text:p>209845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.720899">
            <text:p>2,721</text:p>
          </table:table-cell>
          <table:table-cell table:style-name="ce26N2" office:value-type="float" office:value="205742.47">
            <text:p>205742,47</text:p>
          </table:table-cell>
          <table:table-cell table:style-name="ce26N2" office:value-type="float" office:value="209845.98">
            <text:p>209845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3539.61">
            <text:p>173539,61</text:p>
          </table:table-cell>
          <table:table-cell table:style-name="ce26N2" office:value-type="float" office:value="173.57">
            <text:p>173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61.9">
            <text:p>1561,9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100.28">
            <text:p>2100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6.62">
            <text:p>36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04" meta:object-count="0"/>
    <meta:generator>LibreOffice/4.3.0.4$Windows_x86 LibreOffice_project/62ad5818884a2fc2e5780dd45466868d41009ec0</meta:generator>
  </office:meta>
</office:document-meta>
</file>