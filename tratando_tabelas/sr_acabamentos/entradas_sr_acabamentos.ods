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4/05/2026 07:42:43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8">
            <text:p>3043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3">
            <text:p>0,023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62.27">
            <text:p>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31048927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9">
            <text:p>3043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8">
            <text:p>0,019</text:p>
          </table:table-cell>
          <table:table-cell table:style-name="ce12N2" office:value-type="float" office:value="10.69">
            <text:p>1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19.37">
            <text:p>1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51618096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0">
            <text:p>30440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15.63">
            <text:p>1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418739337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1">
            <text:p>30440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88">
            <text:p>0,051</text:p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2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21.9">
            <text:p>2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21976241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3">
            <text:p>30545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.05">
            <text:p>83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944">
            <text:p>0,211</text:p>
          </table:table-cell>
          <table:table-cell table:style-name="ce12N2" office:value-type="float" office:value="9.12">
            <text:p>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1.06">
            <text:p>31,06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32.25">
            <text:p>3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218516198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4">
            <text:p>3054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3.32">
            <text:p>2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764">
            <text:p>0,2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3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91.78">
            <text:p>9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318648237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5">
            <text:p>3054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.16">
            <text:p>80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309">
            <text:p>0,205</text:p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30.86">
            <text:p>3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4150579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4">
            <text:p>3054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11652042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5">
            <text:p>3054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21082142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6">
            <text:p>3054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31260967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4">
            <text:p>3054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.35">
            <text:p>16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04">
            <text:p>0,015</text:p>
          </table:table-cell>
          <table:table-cell table:style-name="ce12N2" office:value-type="float" office:value="2.51">
            <text:p>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010143711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5">
            <text:p>305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11192558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6">
            <text:p>305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21375141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9">
            <text:p>3055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4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17">
            <text:p>0,008</text:p>
          </table:table-cell>
          <table:table-cell table:style-name="ce12N2" office:value-type="float" office:value="2.02">
            <text:p>2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31.8">
            <text:p>3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4651995060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3">
            <text:p>30561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1.3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2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13531420684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5">
            <text:p>30561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3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19.5">
            <text:p>341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400.4">
            <text:p>340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208">
            <text:p>0,068</text:p>
          </table:table-cell>
          <table:table-cell table:style-name="ce12N2" office:value-type="float" office:value="15.85">
            <text:p>15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1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9.1">
            <text:p>19,10</text:p>
          </table:table-cell>
          <table:table-cell table:style-name="ce12N2" office:value-type="float" office:value="3400.4">
            <text:p>3400,40</text:p>
          </table:table-cell>
          <table:table-cell table:style-name="ce12N2" office:value-type="float" office:value="199.84">
            <text:p>19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380113235015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5">
            <text:p>3056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1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508">
            <text:p>0,038</text:p>
          </table:table-cell>
          <table:table-cell table:style-name="ce12N2" office:value-type="float" office:value="13.58">
            <text:p>13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8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474.81">
            <text:p>47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11213201142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1">
            <text:p>3057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02">
            <text:p>0,013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61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438.33">
            <text:p>43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121916909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5">
            <text:p>305715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3.63">
            <text:p>128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">
            <text:p>0,105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82">
            <text:p>65,82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81.63">
            <text:p>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901467490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6">
            <text:p>3057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3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208">
            <text:p>0,026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3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163.25">
            <text:p>16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30019301968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6">
            <text:p>305786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47.6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65.87">
            <text:p>436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095.24">
            <text:p>4095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1246">
            <text:p>0,161</text:p>
          </table:table-cell>
          <table:table-cell table:style-name="ce12N2" office:value-type="float" office:value="17.08">
            <text:p>1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65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70.63">
            <text:p>270,63</text:p>
          </table:table-cell>
          <table:table-cell table:style-name="ce12N2" office:value-type="float" office:value="4095.24">
            <text:p>4095,24</text:p>
          </table:table-cell>
          <table:table-cell table:style-name="ce12N2" office:value-type="float" office:value="286.65">
            <text:p>28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00502380001145500100134767512164528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71">
            <text:p>30587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4.1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6.85">
            <text:p>9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99.9">
            <text:p>89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928">
            <text:p>0,105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6.95">
            <text:p>16,95</text:p>
          </table:table-cell>
          <table:table-cell table:style-name="ce12N2" office:value-type="float" office:value="899.9">
            <text:p>899,90</text:p>
          </table:table-cell>
          <table:table-cell table:style-name="ce12N2" office:value-type="float" office:value="43.07">
            <text:p>4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41551062741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4">
            <text:p>3059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01354273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5">
            <text:p>3059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11938958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6">
            <text:p>305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21872963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6">
            <text:p>3059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8111518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7">
            <text:p>3059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91649724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8">
            <text:p>3059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01303896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7">
            <text:p>3059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718098184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8">
            <text:p>3059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817164062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9">
            <text:p>3059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91590180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4">
            <text:p>3059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41905481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5">
            <text:p>3059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51839238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6">
            <text:p>3059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61571703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4">
            <text:p>3059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11852116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2">
            <text:p>3059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91999755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7">
            <text:p>3059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2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7">
            <text:p>0,002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77.16">
            <text:p>7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2101918141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5">
            <text:p>3060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928">
            <text:p>0,009</text:p>
          </table:table-cell>
          <table:table-cell table:style-name="ce12N2" office:value-type="float" office:value="10.08">
            <text:p>1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216.62">
            <text:p>21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9716379843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8">
            <text:p>3060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6.5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39">
            <text:p>0,056</text:p>
          </table:table-cell>
          <table:table-cell table:style-name="ce12N2" office:value-type="float" office:value="14.66">
            <text:p>14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369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1495.86">
            <text:p>14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654412390518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4">
            <text:p>3061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2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06">
            <text:p>0,019</text:p>
          </table:table-cell>
          <table:table-cell table:style-name="ce12N2" office:value-type="float" office:value="19.29">
            <text:p>1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466.87">
            <text:p>46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2341190506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4">
            <text:p>30616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879">
            <text:p>0,019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108.47">
            <text:p>1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4156418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5">
            <text:p>30616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68.41">
            <text:p>92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0657">
            <text:p>0,521</text:p>
          </table:table-cell>
          <table:table-cell table:style-name="ce12N2" office:value-type="float" office:value="53.62">
            <text:p>5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6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">
            <text:p>1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46.62">
            <text:p>146,62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552.41">
            <text:p>55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51583820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8">
            <text:p>306178</text:p>
          </table:table-cell>
          <table:table-cell table:style-name="ce0" table:number-columns-spanned="4" table:number-rows-spanned="1" office:value-type="string" calcext:value-type="string">
            <text:p>21.329 - S &amp; L SOUZA E LIMA FABRICACAO E COMERCIO DE LUMINARIAS LTDA</text:p>
          </table:table-cell>
          <table:covered-table-cell table:number-columns-repeated="3"/>
          <table:table-cell table:style-name="ce0" office:value-type="string" calcext:value-type="string">
            <text:p>47.8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4.21">
            <text:p>9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3">
            <text:p>83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66">
            <text:p>0,0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4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1.21">
            <text:p>81,21</text:p>
          </table:table-cell>
          <table:table-cell table:style-name="ce12N2" office:value-type="float" office:value="833">
            <text:p>833,00</text:p>
          </table:table-cell>
          <table:table-cell table:style-name="ce12N2" office:value-type="float" office:value="58.31">
            <text:p>58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3944160001955500100004784810002512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1">
            <text:p>306181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28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.33">
            <text:p>62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161.46">
            <text:p>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41716221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2">
            <text:p>306182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11.69">
            <text:p>1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510498400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4">
            <text:p>30623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5.0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2.45">
            <text:p>631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8205">
            <text:p>0,298</text:p>
          </table:table-cell>
          <table:table-cell table:style-name="ce12N2" office:value-type="float" office:value="59.6">
            <text:p>5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29.12">
            <text:p>29,12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408.48">
            <text:p>40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508910434505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5">
            <text:p>306235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49.69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91.05">
            <text:p>66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6571.46">
            <text:p>6571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7857">
            <text:p>0,238</text:p>
          </table:table-cell>
          <table:table-cell table:style-name="ce12N2" office:value-type="float" office:value="48.54">
            <text:p>48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91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5">
            <text:p>75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119.59">
            <text:p>119,59</text:p>
          </table:table-cell>
          <table:table-cell table:style-name="ce12N2" office:value-type="float" office:value="6571.46">
            <text:p>6571,46</text:p>
          </table:table-cell>
          <table:table-cell table:style-name="ce12N2" office:value-type="float" office:value="296.24">
            <text:p>29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23084560001495500500044969614323513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0">
            <text:p>30628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4.4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0.46">
            <text:p>145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405.3">
            <text:p>140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678">
            <text:p>0,091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0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5.16">
            <text:p>45,16</text:p>
          </table:table-cell>
          <table:table-cell table:style-name="ce12N2" office:value-type="float" office:value="1405.3">
            <text:p>1405,30</text:p>
          </table:table-cell>
          <table:table-cell table:style-name="ce12N2" office:value-type="float" office:value="75.76">
            <text:p>7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44291458007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2">
            <text:p>3062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.34">
            <text:p>19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9.66">
            <text:p>17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156">
            <text:p>0,205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1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1.68">
            <text:p>11,68</text:p>
          </table:table-cell>
          <table:table-cell table:style-name="ce12N2" office:value-type="float" office:value="179.66">
            <text:p>179,66</text:p>
          </table:table-cell>
          <table:table-cell table:style-name="ce12N2" office:value-type="float" office:value="7.19">
            <text:p>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314184854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3">
            <text:p>3062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31.81">
            <text:p>3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61701493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4">
            <text:p>3062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13">
            <text:p>33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4.68">
            <text:p>3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.45">
            <text:p>20,45</text:p>
          </table:table-cell>
          <table:table-cell table:style-name="ce12N2" office:value-type="float" office:value="314.68">
            <text:p>314,68</text:p>
          </table:table-cell>
          <table:table-cell table:style-name="ce12N2" office:value-type="float" office:value="22.03">
            <text:p>2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71201839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5">
            <text:p>3062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28">
            <text:p>0,011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50.12">
            <text:p>5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81968152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6">
            <text:p>3062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6">
            <text:p>0,002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7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83.15">
            <text:p>8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916034313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7">
            <text:p>3062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4">
            <text:p>0,00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361224203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8">
            <text:p>3062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.23">
            <text:p>67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978">
            <text:p>0,016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25.32">
            <text:p>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81741057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9">
            <text:p>306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.07">
            <text:p>79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38">
            <text:p>0,015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8.59">
            <text:p>48,59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52.32">
            <text:p>5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919026442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0">
            <text:p>306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616">
            <text:p>0,036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9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102.14">
            <text:p>10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018616929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1">
            <text:p>306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884">
            <text:p>0,095</text:p>
          </table:table-cell>
          <table:table-cell table:style-name="ce12N2" office:value-type="float" office:value="23.66">
            <text:p>2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4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573.68">
            <text:p>5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117949175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2">
            <text:p>306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132">
            <text:p>0,057</text:p>
          </table:table-cell>
          <table:table-cell table:style-name="ce12N2" office:value-type="float" office:value="9.71">
            <text:p>9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8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243.69">
            <text:p>24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21745730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4">
            <text:p>306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01.06">
            <text:p>86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2508">
            <text:p>0,193</text:p>
          </table:table-cell>
          <table:table-cell table:style-name="ce12N2" office:value-type="float" office:value="27.22">
            <text:p>2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0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99.82">
            <text:p>99,82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595.09">
            <text:p>59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41489041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5">
            <text:p>306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48.98">
            <text:p>114148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">
            <text:p>128,00</text:p>
          </table:table-cell>
          <table:table-cell table:style-name="ce12N2" office:value-type="float" office:value="113148.24">
            <text:p>11314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477">
            <text:p>4,995</text:p>
          </table:table-cell>
          <table:table-cell table:style-name="ce12N2" office:value-type="float" office:value="313.53">
            <text:p>31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48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000.74">
            <text:p>1000,74</text:p>
          </table:table-cell>
          <table:table-cell table:style-name="ce12N2" office:value-type="float" office:value="113148.24">
            <text:p>113148,24</text:p>
          </table:table-cell>
          <table:table-cell table:style-name="ce12N2" office:value-type="float" office:value="7362.41">
            <text:p>736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51991630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6">
            <text:p>306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">
            <text:p>0,002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127.24">
            <text:p>12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71999415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7">
            <text:p>30629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189.81">
            <text:p>3218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12N2" office:value-type="float" office:value="32170.78">
            <text:p>321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805694">
            <text:p>12,806</text:p>
          </table:table-cell>
          <table:table-cell table:style-name="ce12N2" office:value-type="float" office:value="1682.52">
            <text:p>168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18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9.03">
            <text:p>19,03</text:p>
          </table:table-cell>
          <table:table-cell table:style-name="ce12N2" office:value-type="float" office:value="32170.78">
            <text:p>32170,78</text:p>
          </table:table-cell>
          <table:table-cell table:style-name="ce12N2" office:value-type="float" office:value="2239.23">
            <text:p>223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518511014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8">
            <text:p>30629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1284">
            <text:p>2,013</text:p>
          </table:table-cell>
          <table:table-cell table:style-name="ce12N2" office:value-type="float" office:value="74.93">
            <text:p>74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5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131.29">
            <text:p>13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61975077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3">
            <text:p>30632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2">
            <text:p>0,005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25.35">
            <text:p>2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71675258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4">
            <text:p>30632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432">
            <text:p>0,184</text:p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46.32">
            <text:p>4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815785631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1">
            <text:p>30633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2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2.82">
            <text:p>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159.36">
            <text:p>15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2491883070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2">
            <text:p>3063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3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5">
            <text:p>0,001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32.06">
            <text:p>3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3261570554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4">
            <text:p>306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9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249">
            <text:p>0,512</text:p>
          </table:table-cell>
          <table:table-cell table:style-name="ce12N2" office:value-type="float" office:value="176.94">
            <text:p>176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7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207.12">
            <text:p>20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9241197642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6">
            <text:p>3063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1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77648">
            <text:p>2,478</text:p>
          </table:table-cell>
          <table:table-cell table:style-name="ce12N2" office:value-type="float" office:value="829.6">
            <text:p>82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97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407.9">
            <text:p>40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156119100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1">
            <text:p>306381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16.64">
            <text:p>5216,64</text:p>
          </table:table-cell>
          <table:table-cell table:style-name="ce12N2" office:value-type="float" office:value="838.8">
            <text:p>838,8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2">
            <text:p>55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1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63.44">
            <text:p>463,44</text:p>
          </table:table-cell>
          <table:table-cell table:style-name="ce12N2" office:value-type="float" office:value="4753.2">
            <text:p>4753,20</text:p>
          </table:table-cell>
          <table:table-cell table:style-name="ce12N2" office:value-type="float" office:value="190.13">
            <text:p>19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21000336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71">
            <text:p>71,00</text:p>
          </table:table-cell>
          <table:table-cell table:style-name="ce26N2" office:value-type="float" office:value="838.8">
            <text:p>838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834.44">
            <text:p>2834,44</text:p>
          </table:table-cell>
          <table:table-cell table:style-name="ce26N2" office:value-type="float" office:value="299339.55">
            <text:p>299339,55</text:p>
          </table:table-cell>
          <table:table-cell table:style-name="ce26N2" office:value-type="float" office:value="18857.46">
            <text:p>18857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02173.99">
            <text:p>302173,9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6.388855">
            <text:p>26,389</text:p>
          </table:table-cell>
          <table:table-cell table:style-name="ce26N2" office:value-type="float" office:value="300178.35">
            <text:p>300178,35</text:p>
          </table:table-cell>
          <table:table-cell table:style-name="ce26N2" office:value-type="float" office:value="302173.99">
            <text:p>302173,9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658.03">
            <text:p>3658,0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5.8">
            <text:p>35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52" meta:object-count="0"/>
    <meta:generator>LibreOffice/4.3.0.4$Windows_x86 LibreOffice_project/62ad5818884a2fc2e5780dd45466868d41009ec0</meta:generator>
  </office:meta>
</office:document-meta>
</file>