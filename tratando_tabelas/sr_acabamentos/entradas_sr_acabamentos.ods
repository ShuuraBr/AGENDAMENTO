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15/05/2026 07:59:54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5715">
            <text:p>305715</text:p>
          </table:table-cell>
          <table:table-cell table:style-name="ce0" table:number-columns-spanned="4" table:number-rows-spanned="1" office:value-type="string" calcext:value-type="string">
            <text:p>736 - BEMFIXA INDUSTRIAL LTDA</text:p>
          </table:table-cell>
          <table:covered-table-cell table:number-columns-repeated="3"/>
          <table:table-cell table:style-name="ce0" office:value-type="string" calcext:value-type="string">
            <text:p>210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83.63">
            <text:p>1283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1217.81">
            <text:p>1217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5">
            <text:p>0,105</text:p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83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65.82">
            <text:p>65,82</text:p>
          </table:table-cell>
          <table:table-cell table:style-name="ce12N2" office:value-type="float" office:value="1217.81">
            <text:p>1217,81</text:p>
          </table:table-cell>
          <table:table-cell table:style-name="ce12N2" office:value-type="float" office:value="81.63">
            <text:p>8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8019730001145500100021029014674903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72">
            <text:p>3059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5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.16">
            <text:p>8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.02">
            <text:p>7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918">
            <text:p>0,001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5.14">
            <text:p>5,14</text:p>
          </table:table-cell>
          <table:table-cell table:style-name="ce12N2" office:value-type="float" office:value="79.02">
            <text:p>79,02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51919997552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64">
            <text:p>306164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4.8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9.53">
            <text:p>1549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549.53">
            <text:p>1549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879">
            <text:p>0,019</text:p>
          </table:table-cell>
          <table:table-cell table:style-name="ce12N2" office:value-type="float" office:value="1.39">
            <text:p>1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49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9.53">
            <text:p>1549,53</text:p>
          </table:table-cell>
          <table:table-cell table:style-name="ce12N2" office:value-type="float" office:value="108.47">
            <text:p>10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481415641846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65">
            <text:p>306165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4.8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68.41">
            <text:p>926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">
            <text:p>44,00</text:p>
          </table:table-cell>
          <table:table-cell table:style-name="ce12N2" office:value-type="float" office:value="9121.79">
            <text:p>9121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20657">
            <text:p>0,521</text:p>
          </table:table-cell>
          <table:table-cell table:style-name="ce12N2" office:value-type="float" office:value="53.62">
            <text:p>53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268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1">
            <text:p>1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146.62">
            <text:p>146,62</text:p>
          </table:table-cell>
          <table:table-cell table:style-name="ce12N2" office:value-type="float" office:value="9121.79">
            <text:p>9121,79</text:p>
          </table:table-cell>
          <table:table-cell table:style-name="ce12N2" office:value-type="float" office:value="552.41">
            <text:p>552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481515838203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34">
            <text:p>306234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5.0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12.45">
            <text:p>631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">
            <text:p>33,00</text:p>
          </table:table-cell>
          <table:table-cell table:style-name="ce12N2" office:value-type="float" office:value="6283.33">
            <text:p>6283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8205">
            <text:p>0,298</text:p>
          </table:table-cell>
          <table:table-cell table:style-name="ce12N2" office:value-type="float" office:value="59.6">
            <text:p>59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12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29.12">
            <text:p>29,12</text:p>
          </table:table-cell>
          <table:table-cell table:style-name="ce12N2" office:value-type="float" office:value="6283.33">
            <text:p>6283,33</text:p>
          </table:table-cell>
          <table:table-cell table:style-name="ce12N2" office:value-type="float" office:value="408.48">
            <text:p>40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508910434505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7">
            <text:p>3062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9.02">
            <text:p>119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9.02">
            <text:p>11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04">
            <text:p>0,001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9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9.02">
            <text:p>119,02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3612242039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8">
            <text:p>3062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4.23">
            <text:p>67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3.08">
            <text:p>633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978">
            <text:p>0,016</text:p>
          </table:table-cell>
          <table:table-cell table:style-name="ce12N2" office:value-type="float" office:value="3.52">
            <text:p>3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4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41.15">
            <text:p>41,15</text:p>
          </table:table-cell>
          <table:table-cell table:style-name="ce12N2" office:value-type="float" office:value="633.08">
            <text:p>633,08</text:p>
          </table:table-cell>
          <table:table-cell table:style-name="ce12N2" office:value-type="float" office:value="25.32">
            <text:p>25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4817410573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9">
            <text:p>30628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6.07">
            <text:p>796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47.48">
            <text:p>747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938">
            <text:p>0,015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96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48.59">
            <text:p>48,59</text:p>
          </table:table-cell>
          <table:table-cell table:style-name="ce12N2" office:value-type="float" office:value="747.48">
            <text:p>747,48</text:p>
          </table:table-cell>
          <table:table-cell table:style-name="ce12N2" office:value-type="float" office:value="52.32">
            <text:p>5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4919026442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0">
            <text:p>3062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89.26">
            <text:p>2089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089.26">
            <text:p>2089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5616">
            <text:p>0,036</text:p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89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89.26">
            <text:p>2089,26</text:p>
          </table:table-cell>
          <table:table-cell table:style-name="ce12N2" office:value-type="float" office:value="102.14">
            <text:p>10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018616929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1">
            <text:p>3062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41.66">
            <text:p>824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8241.66">
            <text:p>8241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4884">
            <text:p>0,095</text:p>
          </table:table-cell>
          <table:table-cell table:style-name="ce12N2" office:value-type="float" office:value="23.66">
            <text:p>23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241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41.66">
            <text:p>8241,66</text:p>
          </table:table-cell>
          <table:table-cell table:style-name="ce12N2" office:value-type="float" office:value="573.68">
            <text:p>573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117949175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2">
            <text:p>3062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81.24">
            <text:p>348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3481.24">
            <text:p>3481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7132">
            <text:p>0,057</text:p>
          </table:table-cell>
          <table:table-cell table:style-name="ce12N2" office:value-type="float" office:value="9.71">
            <text:p>9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81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81.24">
            <text:p>3481,24</text:p>
          </table:table-cell>
          <table:table-cell table:style-name="ce12N2" office:value-type="float" office:value="243.69">
            <text:p>243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217457306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4">
            <text:p>30629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01.06">
            <text:p>860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8501.24">
            <text:p>8501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2508">
            <text:p>0,193</text:p>
          </table:table-cell>
          <table:table-cell table:style-name="ce12N2" office:value-type="float" office:value="27.22">
            <text:p>27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601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99.82">
            <text:p>99,82</text:p>
          </table:table-cell>
          <table:table-cell table:style-name="ce12N2" office:value-type="float" office:value="8501.24">
            <text:p>8501,24</text:p>
          </table:table-cell>
          <table:table-cell table:style-name="ce12N2" office:value-type="float" office:value="595.09">
            <text:p>595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414890416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6">
            <text:p>30629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7.7">
            <text:p>1817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17.7">
            <text:p>1817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">
            <text:p>0,002</text:p>
          </table:table-cell>
          <table:table-cell table:style-name="ce12N2" office:value-type="float" office:value="2.58">
            <text:p>2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17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7.7">
            <text:p>1817,70</text:p>
          </table:table-cell>
          <table:table-cell table:style-name="ce12N2" office:value-type="float" office:value="127.24">
            <text:p>12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6719994151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4">
            <text:p>30633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92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77.88">
            <text:p>5177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77.88">
            <text:p>5177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1249">
            <text:p>0,512</text:p>
          </table:table-cell>
          <table:table-cell table:style-name="ce12N2" office:value-type="float" office:value="176.94">
            <text:p>176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77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77.88">
            <text:p>5177,88</text:p>
          </table:table-cell>
          <table:table-cell table:style-name="ce12N2" office:value-type="float" office:value="207.12">
            <text:p>20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92411976423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6">
            <text:p>30633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9.15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197.33">
            <text:p>10197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10197.33">
            <text:p>10197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477648">
            <text:p>2,478</text:p>
          </table:table-cell>
          <table:table-cell table:style-name="ce12N2" office:value-type="float" office:value="829.6">
            <text:p>829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197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197.33">
            <text:p>10197,33</text:p>
          </table:table-cell>
          <table:table-cell table:style-name="ce12N2" office:value-type="float" office:value="407.9">
            <text:p>40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91561191005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89">
            <text:p>30648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8.2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4.48">
            <text:p>424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4.48">
            <text:p>424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2152">
            <text:p>0,152</text:p>
          </table:table-cell>
          <table:table-cell table:style-name="ce12N2" office:value-type="float" office:value="44.26">
            <text:p>44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4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4.48">
            <text:p>424,48</text:p>
          </table:table-cell>
          <table:table-cell table:style-name="ce12N2" office:value-type="float" office:value="29.71">
            <text:p>29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825416484359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5">
            <text:p>30649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11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16.35">
            <text:p>3916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762.32">
            <text:p>3762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372">
            <text:p>0,032</text:p>
          </table:table-cell>
          <table:table-cell table:style-name="ce12N2" office:value-type="float" office:value="8.6">
            <text:p>8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16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54.03">
            <text:p>154,03</text:p>
          </table:table-cell>
          <table:table-cell table:style-name="ce12N2" office:value-type="float" office:value="3762.32">
            <text:p>3762,32</text:p>
          </table:table-cell>
          <table:table-cell table:style-name="ce12N2" office:value-type="float" office:value="263.36">
            <text:p>26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3111516428682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59">
            <text:p>306559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7.832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81.49">
            <text:p>1481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249.88">
            <text:p>1249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0">
            <text:p>100,00</text:p>
          </table:table-cell>
          <table:table-cell table:style-name="ce12" office:value-type="string" calcext:value-type="string">
            <text:p>1.481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31.61">
            <text:p>131,61</text:p>
          </table:table-cell>
          <table:table-cell table:style-name="ce12N2" office:value-type="float" office:value="1349.88">
            <text:p>1349,88</text:p>
          </table:table-cell>
          <table:table-cell table:style-name="ce12N2" office:value-type="float" office:value="84.33">
            <text:p>84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245461650003935500400009783211206100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79">
            <text:p>30667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16">
            <text:p>0,000</text:p>
          </table:table-cell>
          <table:table-cell table:style-name="ce12N2" office:value-type="float" office:value="1.95">
            <text:p>1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6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62.05">
            <text:p>6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4713961065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0">
            <text:p>30668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6.46">
            <text:p>356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4.7">
            <text:p>334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84">
            <text:p>0,000</text:p>
          </table:table-cell>
          <table:table-cell table:style-name="ce12N2" office:value-type="float" office:value="0.66">
            <text:p>0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6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21.76">
            <text:p>21,76</text:p>
          </table:table-cell>
          <table:table-cell table:style-name="ce12N2" office:value-type="float" office:value="334.7">
            <text:p>334,70</text:p>
          </table:table-cell>
          <table:table-cell table:style-name="ce12N2" office:value-type="float" office:value="23.43">
            <text:p>23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4813667964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1">
            <text:p>30668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5.84">
            <text:p>775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75.84">
            <text:p>775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08">
            <text:p>0,010</text:p>
          </table:table-cell>
          <table:table-cell table:style-name="ce12N2" office:value-type="float" office:value="7.42">
            <text:p>7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75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5.84">
            <text:p>775,84</text:p>
          </table:table-cell>
          <table:table-cell table:style-name="ce12N2" office:value-type="float" office:value="31.03">
            <text:p>3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4917701686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2">
            <text:p>3066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36.02">
            <text:p>736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91.1">
            <text:p>691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1">
            <text:p>0,002</text:p>
          </table:table-cell>
          <table:table-cell table:style-name="ce12N2" office:value-type="float" office:value="4.3">
            <text:p>4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36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44.92">
            <text:p>44,92</text:p>
          </table:table-cell>
          <table:table-cell table:style-name="ce12N2" office:value-type="float" office:value="691.1">
            <text:p>691,10</text:p>
          </table:table-cell>
          <table:table-cell table:style-name="ce12N2" office:value-type="float" office:value="48.38">
            <text:p>4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011184308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3">
            <text:p>3066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1.68">
            <text:p>1401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401.68">
            <text:p>1401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104">
            <text:p>0,013</text:p>
          </table:table-cell>
          <table:table-cell table:style-name="ce12N2" office:value-type="float" office:value="5.82">
            <text:p>5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1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1.68">
            <text:p>1401,68</text:p>
          </table:table-cell>
          <table:table-cell table:style-name="ce12N2" office:value-type="float" office:value="56.07">
            <text:p>56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115154101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4">
            <text:p>3066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8.88">
            <text:p>48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8.88">
            <text:p>488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896">
            <text:p>0,013</text:p>
          </table:table-cell>
          <table:table-cell table:style-name="ce12N2" office:value-type="float" office:value="4.82">
            <text:p>4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8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8.88">
            <text:p>488,88</text:p>
          </table:table-cell>
          <table:table-cell table:style-name="ce12N2" office:value-type="float" office:value="19.56">
            <text:p>1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216172472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5">
            <text:p>3066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5.65">
            <text:p>1005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44.28">
            <text:p>944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6">
            <text:p>0,011</text:p>
          </table:table-cell>
          <table:table-cell table:style-name="ce12N2" office:value-type="float" office:value="1.22">
            <text:p>1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05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61.37">
            <text:p>61,37</text:p>
          </table:table-cell>
          <table:table-cell table:style-name="ce12N2" office:value-type="float" office:value="944.28">
            <text:p>944,28</text:p>
          </table:table-cell>
          <table:table-cell table:style-name="ce12N2" office:value-type="float" office:value="66.1">
            <text:p>6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31356462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6">
            <text:p>3066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.59">
            <text:p>168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8.3">
            <text:p>158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836">
            <text:p>0,002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8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10.29">
            <text:p>10,29</text:p>
          </table:table-cell>
          <table:table-cell table:style-name="ce12N2" office:value-type="float" office:value="158.3">
            <text:p>158,30</text:p>
          </table:table-cell>
          <table:table-cell table:style-name="ce12N2" office:value-type="float" office:value="6.33">
            <text:p>6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412810240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7">
            <text:p>3066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8.88">
            <text:p>48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8.88">
            <text:p>488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896">
            <text:p>0,013</text:p>
          </table:table-cell>
          <table:table-cell table:style-name="ce12N2" office:value-type="float" office:value="4.82">
            <text:p>4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8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8.88">
            <text:p>488,88</text:p>
          </table:table-cell>
          <table:table-cell table:style-name="ce12N2" office:value-type="float" office:value="19.56">
            <text:p>1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512016082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8">
            <text:p>3066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12.96">
            <text:p>1312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2.96">
            <text:p>1312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76">
            <text:p>0,001</text:p>
          </table:table-cell>
          <table:table-cell table:style-name="ce12N2" office:value-type="float" office:value="3.92">
            <text:p>3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12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12.96">
            <text:p>1312,96</text:p>
          </table:table-cell>
          <table:table-cell table:style-name="ce12N2" office:value-type="float" office:value="91.91">
            <text:p>91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614375485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9">
            <text:p>306689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39.3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2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95.71">
            <text:p>24895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">
            <text:p>27,00</text:p>
          </table:table-cell>
          <table:table-cell table:style-name="ce12N2" office:value-type="float" office:value="22256">
            <text:p>2225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90">
            <text:p>29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95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">
            <text:p>10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2639.71">
            <text:p>2639,71</text:p>
          </table:table-cell>
          <table:table-cell table:style-name="ce12N2" office:value-type="float" office:value="22256">
            <text:p>22256,00</text:p>
          </table:table-cell>
          <table:table-cell table:style-name="ce12N2" office:value-type="float" office:value="890.23">
            <text:p>89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205870170002855500100003933214335151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90">
            <text:p>3066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.28">
            <text:p>181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1.28">
            <text:p>181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44">
            <text:p>0,000</text:p>
          </table:table-cell>
          <table:table-cell table:style-name="ce12N2" office:value-type="float" office:value="0.84">
            <text:p>0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1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.28">
            <text:p>181,28</text:p>
          </table:table-cell>
          <table:table-cell table:style-name="ce12N2" office:value-type="float" office:value="12.69">
            <text:p>12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714525557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91">
            <text:p>3066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32">
            <text:p>0,000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72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124.1">
            <text:p>124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814514302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98">
            <text:p>30669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3.19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67.6">
            <text:p>446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67.6">
            <text:p>446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9904">
            <text:p>0,030</text:p>
          </table:table-cell>
          <table:table-cell table:style-name="ce12N2" office:value-type="float" office:value="6.84">
            <text:p>6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6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67.6">
            <text:p>4467,60</text:p>
          </table:table-cell>
          <table:table-cell table:style-name="ce12N2" office:value-type="float" office:value="312.73">
            <text:p>312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319710644366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01">
            <text:p>306701</text:p>
          </table:table-cell>
          <table:table-cell table:style-name="ce0" table:number-columns-spanned="4" table:number-rows-spanned="1" office:value-type="string" calcext:value-type="string">
            <text:p>36.025 - FRESNOMAQ INDUSTRIA DE MAQUINAS S/A</text:p>
          </table:table-cell>
          <table:covered-table-cell table:number-columns-repeated="3"/>
          <table:table-cell table:style-name="ce0" office:value-type="string" calcext:value-type="string">
            <text:p>59.9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0">
            <text:p>13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0">
            <text:p>13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656">
            <text:p>0,200</text:p>
          </table:table-cell>
          <table:table-cell table:style-name="ce12N2" office:value-type="float" office:value="8.76">
            <text:p>8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">
            <text:p>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0">
            <text:p>1320,00</text:p>
          </table:table-cell>
          <table:table-cell table:style-name="ce12N2" office:value-type="float" office:value="158.4">
            <text:p>15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22604063372800011865500100005998918744180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2">
            <text:p>306712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2.08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.41">
            <text:p>27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8.41">
            <text:p>278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4">
            <text:p>0,054</text:p>
          </table:table-cell>
          <table:table-cell table:style-name="ce12N2" office:value-type="float" office:value="18.6">
            <text:p>18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8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8.41">
            <text:p>278,41</text:p>
          </table:table-cell>
          <table:table-cell table:style-name="ce12N2" office:value-type="float" office:value="19.49">
            <text:p>19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208913934866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4">
            <text:p>306714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2.088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7.53">
            <text:p>56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7.53">
            <text:p>567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136">
            <text:p>0,081</text:p>
          </table:table-cell>
          <table:table-cell table:style-name="ce12N2" office:value-type="float" office:value="26.3">
            <text:p>26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7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7.53">
            <text:p>567,53</text:p>
          </table:table-cell>
          <table:table-cell table:style-name="ce12N2" office:value-type="float" office:value="39.73">
            <text:p>39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20881842296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5">
            <text:p>306715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2.08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4.81">
            <text:p>81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4.81">
            <text:p>81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4656">
            <text:p>0,035</text:p>
          </table:table-cell>
          <table:table-cell table:style-name="ce12N2" office:value-type="float" office:value="16.14">
            <text:p>16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4.81">
            <text:p>814,81</text:p>
          </table:table-cell>
          <table:table-cell table:style-name="ce12N2" office:value-type="float" office:value="57.04">
            <text:p>5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20871369635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7">
            <text:p>306717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3.84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0.58">
            <text:p>1070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70.58">
            <text:p>1070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5984">
            <text:p>0,096</text:p>
          </table:table-cell>
          <table:table-cell table:style-name="ce12N2" office:value-type="float" office:value="41.84">
            <text:p>41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70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0.58">
            <text:p>1070,58</text:p>
          </table:table-cell>
          <table:table-cell table:style-name="ce12N2" office:value-type="float" office:value="74.94">
            <text:p>74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384610614180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50">
            <text:p>30675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93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83.38">
            <text:p>538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5383.38">
            <text:p>5383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19438">
            <text:p>0,519</text:p>
          </table:table-cell>
          <table:table-cell table:style-name="ce12N2" office:value-type="float" office:value="183.76">
            <text:p>183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83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83.38">
            <text:p>5383,38</text:p>
          </table:table-cell>
          <table:table-cell table:style-name="ce12N2" office:value-type="float" office:value="215.33">
            <text:p>215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93710611828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83">
            <text:p>3067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75.92">
            <text:p>287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00.39">
            <text:p>2700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75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75.53">
            <text:p>175,53</text:p>
          </table:table-cell>
          <table:table-cell table:style-name="ce12N2" office:value-type="float" office:value="2700.39">
            <text:p>2700,39</text:p>
          </table:table-cell>
          <table:table-cell table:style-name="ce12N2" office:value-type="float" office:value="108.02">
            <text:p>108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91705951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85">
            <text:p>3067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7.5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4.42">
            <text:p>454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4.42">
            <text:p>454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">
            <text:p>0,001</text:p>
          </table:table-cell>
          <table:table-cell table:style-name="ce12N2" office:value-type="float" office:value="1.29">
            <text:p>1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4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4.42">
            <text:p>454,42</text:p>
          </table:table-cell>
          <table:table-cell table:style-name="ce12N2" office:value-type="float" office:value="31.81">
            <text:p>3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75991815162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86">
            <text:p>3067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7.6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9.86">
            <text:p>2789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743.42">
            <text:p>2743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9122">
            <text:p>0,029</text:p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89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46.44">
            <text:p>46,44</text:p>
          </table:table-cell>
          <table:table-cell table:style-name="ce12N2" office:value-type="float" office:value="2743.42">
            <text:p>2743,42</text:p>
          </table:table-cell>
          <table:table-cell table:style-name="ce12N2" office:value-type="float" office:value="192.04">
            <text:p>192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760012782951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87">
            <text:p>3067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7.6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22.9">
            <text:p>1822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822.9">
            <text:p>1822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65">
            <text:p>0,033</text:p>
          </table:table-cell>
          <table:table-cell table:style-name="ce12N2" office:value-type="float" office:value="2.72">
            <text:p>2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22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22.9">
            <text:p>1822,90</text:p>
          </table:table-cell>
          <table:table-cell table:style-name="ce12N2" office:value-type="float" office:value="127.6">
            <text:p>12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760115383035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88">
            <text:p>3067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7.6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7.81">
            <text:p>677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671.3">
            <text:p>671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1088">
            <text:p>0,031</text:p>
          </table:table-cell>
          <table:table-cell table:style-name="ce12N2" office:value-type="float" office:value="1.43">
            <text:p>1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7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6.51">
            <text:p>6,51</text:p>
          </table:table-cell>
          <table:table-cell table:style-name="ce12N2" office:value-type="float" office:value="671.3">
            <text:p>671,30</text:p>
          </table:table-cell>
          <table:table-cell table:style-name="ce12N2" office:value-type="float" office:value="47">
            <text:p>4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760213689959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90">
            <text:p>3067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7.6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.98">
            <text:p>4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8.48">
            <text:p>38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1228">
            <text:p>0,031</text:p>
          </table:table-cell>
          <table:table-cell table:style-name="ce12N2" office:value-type="float" office:value="0.56">
            <text:p>0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2.5">
            <text:p>2,50</text:p>
          </table:table-cell>
          <table:table-cell table:style-name="ce12N2" office:value-type="float" office:value="38.48">
            <text:p>38,48</text:p>
          </table:table-cell>
          <table:table-cell table:style-name="ce12N2" office:value-type="float" office:value="1.54">
            <text:p>1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760317969228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25">
            <text:p>306825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3.3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698.87">
            <text:p>75698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">
            <text:p>55,00</text:p>
          </table:table-cell>
          <table:table-cell table:style-name="ce12N2" office:value-type="float" office:value="71271.6">
            <text:p>7127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400605">
            <text:p>4,401</text:p>
          </table:table-cell>
          <table:table-cell table:style-name="ce12N2" office:value-type="float" office:value="623.56">
            <text:p>623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5.698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4427.27">
            <text:p>4427,27</text:p>
          </table:table-cell>
          <table:table-cell table:style-name="ce12N2" office:value-type="float" office:value="71271.6">
            <text:p>71271,60</text:p>
          </table:table-cell>
          <table:table-cell table:style-name="ce12N2" office:value-type="float" office:value="3720.23">
            <text:p>372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331715317103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51">
            <text:p>306851</text:p>
          </table:table-cell>
          <table:table-cell table:style-name="ce0" table:number-columns-spanned="4" table:number-rows-spanned="1" office:value-type="string" calcext:value-type="string">
            <text:p>27.570 - DOCOL INDUSTRIA E COMERCIO LTDA</text:p>
          </table:table-cell>
          <table:covered-table-cell table:number-columns-repeated="3"/>
          <table:table-cell table:style-name="ce0" office:value-type="string" calcext:value-type="string">
            <text:p>17.87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94.96">
            <text:p>4494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94.96">
            <text:p>4494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832">
            <text:p>0,015</text:p>
          </table:table-cell>
          <table:table-cell table:style-name="ce12N2" office:value-type="float" office:value="10.8">
            <text:p>1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94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4.96">
            <text:p>4494,96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13855500200001787417051299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55">
            <text:p>306855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00.4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368.19">
            <text:p>7368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7358.71">
            <text:p>7358,7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99575">
            <text:p>0,400</text:p>
          </table:table-cell>
          <table:table-cell table:style-name="ce12N2" office:value-type="float" office:value="186.98">
            <text:p>186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368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9.48">
            <text:p>9,48</text:p>
          </table:table-cell>
          <table:table-cell table:style-name="ce12N2" office:value-type="float" office:value="7358.71">
            <text:p>7358,71</text:p>
          </table:table-cell>
          <table:table-cell table:style-name="ce12N2" office:value-type="float" office:value="512.74">
            <text:p>512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09495280012325500100230044015154941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29">
            <text:p>3069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5.11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71.24">
            <text:p>527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71.24">
            <text:p>5271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892">
            <text:p>0,010</text:p>
          </table:table-cell>
          <table:table-cell table:style-name="ce12N2" office:value-type="float" office:value="3.06">
            <text:p>3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71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71.24">
            <text:p>5271,24</text:p>
          </table:table-cell>
          <table:table-cell table:style-name="ce12N2" office:value-type="float" office:value="368.99">
            <text:p>368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511516804572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42">
            <text:p>30694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5.92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3.8">
            <text:p>2233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33.8">
            <text:p>223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104">
            <text:p>0,013</text:p>
          </table:table-cell>
          <table:table-cell table:style-name="ce12N2" office:value-type="float" office:value="3.36">
            <text:p>3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33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33.8">
            <text:p>2233,80</text:p>
          </table:table-cell>
          <table:table-cell table:style-name="ce12N2" office:value-type="float" office:value="156.37">
            <text:p>156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592817454621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71">
            <text:p>306971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6.2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61.94">
            <text:p>9761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">
            <text:p>34,00</text:p>
          </table:table-cell>
          <table:table-cell table:style-name="ce12N2" office:value-type="float" office:value="9686.39">
            <text:p>9686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40854">
            <text:p>0,341</text:p>
          </table:table-cell>
          <table:table-cell table:style-name="ce12N2" office:value-type="float" office:value="55.47">
            <text:p>55,4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761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75.55">
            <text:p>75,55</text:p>
          </table:table-cell>
          <table:table-cell table:style-name="ce12N2" office:value-type="float" office:value="9686.39">
            <text:p>9686,39</text:p>
          </table:table-cell>
          <table:table-cell table:style-name="ce12N2" office:value-type="float" office:value="633.74">
            <text:p>633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662611177625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38">
            <text:p>307038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6.3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11.28">
            <text:p>4211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3799.7">
            <text:p>3799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692">
            <text:p>0,127</text:p>
          </table:table-cell>
          <table:table-cell table:style-name="ce12N2" office:value-type="float" office:value="11.4">
            <text:p>1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11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.63">
            <text:p>40,6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411.58">
            <text:p>411,58</text:p>
          </table:table-cell>
          <table:table-cell table:style-name="ce12N2" office:value-type="float" office:value="3799.7">
            <text:p>3799,70</text:p>
          </table:table-cell>
          <table:table-cell table:style-name="ce12N2" office:value-type="float" office:value="151.98">
            <text:p>151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94164590001205500100081638616663245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49">
            <text:p>307049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8.006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4.72">
            <text:p>17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9.2">
            <text:p>159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15.52">
            <text:p>15,52</text:p>
          </table:table-cell>
          <table:table-cell table:style-name="ce12N2" office:value-type="float" office:value="159.2">
            <text:p>159,20</text:p>
          </table:table-cell>
          <table:table-cell table:style-name="ce12N2" office:value-type="float" office:value="11.14">
            <text:p>1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45461650003935500400009800617270139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51">
            <text:p>307051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8.005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13.56">
            <text:p>7413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6754.95">
            <text:p>6754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13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658.61">
            <text:p>658,61</text:p>
          </table:table-cell>
          <table:table-cell table:style-name="ce12N2" office:value-type="float" office:value="6754.95">
            <text:p>6754,95</text:p>
          </table:table-cell>
          <table:table-cell table:style-name="ce12N2" office:value-type="float" office:value="468.39">
            <text:p>468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45461650003935500400009800513146947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55">
            <text:p>307055</text:p>
          </table:table-cell>
          <table:table-cell table:style-name="ce0" table:number-columns-spanned="4" table:number-rows-spanned="1" office:value-type="string" calcext:value-type="string">
            <text:p>13.893 - REVOLUZ INDUSTRIA E COMERCIO LTDA</text:p>
          </table:table-cell>
          <table:covered-table-cell table:number-columns-repeated="3"/>
          <table:table-cell table:style-name="ce0" office:value-type="string" calcext:value-type="string">
            <text:p>70.9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32.07">
            <text:p>2532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307.12">
            <text:p>2307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6024">
            <text:p>0,076</text:p>
          </table:table-cell>
          <table:table-cell table:style-name="ce12N2" office:value-type="float" office:value="11.04">
            <text:p>11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32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224.95">
            <text:p>224,95</text:p>
          </table:table-cell>
          <table:table-cell table:style-name="ce12N2" office:value-type="float" office:value="2307.12">
            <text:p>2307,12</text:p>
          </table:table-cell>
          <table:table-cell table:style-name="ce12N2" office:value-type="float" office:value="161.49">
            <text:p>161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93068580001535500100007092612378899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83">
            <text:p>307083</text:p>
          </table:table-cell>
          <table:table-cell table:style-name="ce0" table:number-columns-spanned="4" table:number-rows-spanned="1" office:value-type="string" calcext:value-type="string">
            <text:p>6.891 - STUDIOLUCE ILUMINACAO IMPORTACAO E EXPORTACAO LTDA</text:p>
          </table:table-cell>
          <table:covered-table-cell table:number-columns-repeated="3"/>
          <table:table-cell table:style-name="ce0" office:value-type="string" calcext:value-type="string">
            <text:p>104.47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93.88">
            <text:p>119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87.82">
            <text:p>1087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93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06.06">
            <text:p>106,06</text:p>
          </table:table-cell>
          <table:table-cell table:style-name="ce12N2" office:value-type="float" office:value="1087.82">
            <text:p>1087,82</text:p>
          </table:table-cell>
          <table:table-cell table:style-name="ce12N2" office:value-type="float" office:value="43.51">
            <text:p>43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9.72">
            <text:p>8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8.950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1/05/2026</text:p>
          </table:table-cell>
          <table:table-cell table:style-name="ce12" office:value-type="string" calcext:value-type="string">
            <text:p>89,72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35260510599342000123550020001044791920149108</text:p>
          </table:table-cell>
          <table:table-cell table:style-name="ce0" office:value-type="string" calcext:value-type="string">
            <text:p>35260511389565000200570050003989501000852039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84">
            <text:p>3070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3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.66">
            <text:p>5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.32">
            <text:p>51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4276">
            <text:p>0,134</text:p>
          </table:table-cell>
          <table:table-cell table:style-name="ce12N2" office:value-type="float" office:value="0.43">
            <text:p>0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3.34">
            <text:p>3,34</text:p>
          </table:table-cell>
          <table:table-cell table:style-name="ce12N2" office:value-type="float" office:value="51.32">
            <text:p>51,32</text:p>
          </table:table-cell>
          <table:table-cell table:style-name="ce12N2" office:value-type="float" office:value="2.05">
            <text:p>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39814737677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85">
            <text:p>3070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3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4.8">
            <text:p>26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4.8">
            <text:p>26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7">
            <text:p>0,001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4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4.8">
            <text:p>264,80</text:p>
          </table:table-cell>
          <table:table-cell table:style-name="ce12N2" office:value-type="float" office:value="18.54">
            <text:p>18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39910446566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86">
            <text:p>3070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2.7">
            <text:p>1122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22.7">
            <text:p>1122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6">
            <text:p>0,004</text:p>
          </table:table-cell>
          <table:table-cell table:style-name="ce12N2" office:value-type="float" office:value="4.85">
            <text:p>4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2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2.7">
            <text:p>1122,70</text:p>
          </table:table-cell>
          <table:table-cell table:style-name="ce12N2" office:value-type="float" office:value="44.91">
            <text:p>44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014382311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00">
            <text:p>307100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40.310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8.3">
            <text:p>376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68.3">
            <text:p>3768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6">
            <text:p>0,216</text:p>
          </table:table-cell>
          <table:table-cell table:style-name="ce12N2" office:value-type="float" office:value="91.2">
            <text:p>9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68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68.3">
            <text:p>3768,30</text:p>
          </table:table-cell>
          <table:table-cell table:style-name="ce12N2" office:value-type="float" office:value="263.78">
            <text:p>263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8215460001025500400014031011309826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21">
            <text:p>307121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71.26">
            <text:p>117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67.21">
            <text:p>1067,2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6916">
            <text:p>0,0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71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04.05">
            <text:p>104,05</text:p>
          </table:table-cell>
          <table:table-cell table:style-name="ce12N2" office:value-type="float" office:value="1067.21">
            <text:p>1067,21</text:p>
          </table:table-cell>
          <table:table-cell table:style-name="ce12N2" office:value-type="float" office:value="74.7">
            <text:p>7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8917732324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70">
            <text:p>30717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58">
            <text:p>0,001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16.19">
            <text:p>1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1015999792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2">
            <text:p>307182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04.0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34.81">
            <text:p>153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490.26">
            <text:p>1490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8038">
            <text:p>0,108</text:p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3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44.55">
            <text:p>44,55</text:p>
          </table:table-cell>
          <table:table-cell table:style-name="ce12N2" office:value-type="float" office:value="1490.26">
            <text:p>1490,26</text:p>
          </table:table-cell>
          <table:table-cell table:style-name="ce12N2" office:value-type="float" office:value="104.32">
            <text:p>10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09495280012325500100230407218608309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06">
            <text:p>307206</text:p>
          </table:table-cell>
          <table:table-cell table:style-name="ce0" table:number-columns-spanned="4" table:number-rows-spanned="1" office:value-type="string" calcext:value-type="string">
            <text:p>10.343 - INTERLIGHT SISTEMAS DE ILUMINACAO LTDA</text:p>
          </table:table-cell>
          <table:covered-table-cell table:number-columns-repeated="3"/>
          <table:table-cell table:style-name="ce0" office:value-type="string" calcext:value-type="string">
            <text:p>261.1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391.61">
            <text:p>15391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4024.25">
            <text:p>14024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391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.33">
            <text:p>57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367.36">
            <text:p>1367,36</text:p>
          </table:table-cell>
          <table:table-cell table:style-name="ce12N2" office:value-type="float" office:value="14024.25">
            <text:p>14024,25</text:p>
          </table:table-cell>
          <table:table-cell table:style-name="ce12N2" office:value-type="float" office:value="981.71">
            <text:p>981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83296080001445500100026117010026117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09">
            <text:p>307209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39.7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67.78">
            <text:p>1867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685.3">
            <text:p>1685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7.5">
            <text:p>7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67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82.48">
            <text:p>182,48</text:p>
          </table:table-cell>
          <table:table-cell table:style-name="ce12N2" office:value-type="float" office:value="1685.3">
            <text:p>1685,30</text:p>
          </table:table-cell>
          <table:table-cell table:style-name="ce12N2" office:value-type="float" office:value="67.41">
            <text:p>67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05870170002855500100003974118512744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1">
            <text:p>30722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8.28">
            <text:p>3768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3598.38">
            <text:p>3598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36658">
            <text:p>0,537</text:p>
          </table:table-cell>
          <table:table-cell table:style-name="ce12N2" office:value-type="float" office:value="34.56">
            <text:p>34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68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69.9">
            <text:p>169,90</text:p>
          </table:table-cell>
          <table:table-cell table:style-name="ce12N2" office:value-type="float" office:value="3598.38">
            <text:p>3598,38</text:p>
          </table:table-cell>
          <table:table-cell table:style-name="ce12N2" office:value-type="float" office:value="143.94">
            <text:p>143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413226279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2">
            <text:p>30722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3.0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57">
            <text:p>0,002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1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18.48">
            <text:p>1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308015849306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4">
            <text:p>30722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4">
            <text:p>0,002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6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62.05">
            <text:p>6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7415339611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69">
            <text:p>307269</text:p>
          </table:table-cell>
          <table:table-cell table:style-name="ce0" table:number-columns-spanned="4" table:number-rows-spanned="1" office:value-type="string" calcext:value-type="string">
            <text:p>28.259 - IMD COMERCIO DE MOVEIS LTDA</text:p>
          </table:table-cell>
          <table:covered-table-cell table:number-columns-repeated="3"/>
          <table:table-cell table:style-name="ce0" office:value-type="string" calcext:value-type="string">
            <text:p>409.529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6">
            <text:p>327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120">
            <text:p>31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8.05">
            <text:p>18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7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.33">
            <text:p>41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56">
            <text:p>156,00</text:p>
          </table:table-cell>
          <table:table-cell table:style-name="ce12N2" office:value-type="float" office:value="3120">
            <text:p>3120,00</text:p>
          </table:table-cell>
          <table:table-cell table:style-name="ce12N2" office:value-type="float" office:value="124.8">
            <text:p>12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39611510004475500600040952919085944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3">
            <text:p>307273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4.2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05.98">
            <text:p>7705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6908.35">
            <text:p>6908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38516">
            <text:p>0,439</text:p>
          </table:table-cell>
          <table:table-cell table:style-name="ce12N2" office:value-type="float" office:value="71.6">
            <text:p>7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705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797.63">
            <text:p>797,63</text:p>
          </table:table-cell>
          <table:table-cell table:style-name="ce12N2" office:value-type="float" office:value="6908.35">
            <text:p>6908,35</text:p>
          </table:table-cell>
          <table:table-cell table:style-name="ce12N2" office:value-type="float" office:value="358.82">
            <text:p>35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426615018523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6">
            <text:p>30727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2.97">
            <text:p>52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91.06">
            <text:p>491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568">
            <text:p>0,014</text:p>
          </table:table-cell>
          <table:table-cell table:style-name="ce12N2" office:value-type="float" office:value="3.04">
            <text:p>3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2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31.91">
            <text:p>31,91</text:p>
          </table:table-cell>
          <table:table-cell table:style-name="ce12N2" office:value-type="float" office:value="491.06">
            <text:p>491,06</text:p>
          </table:table-cell>
          <table:table-cell table:style-name="ce12N2" office:value-type="float" office:value="34.38">
            <text:p>34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7610674017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7">
            <text:p>30727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2.7">
            <text:p>1122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22.7">
            <text:p>1122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114">
            <text:p>0,004</text:p>
          </table:table-cell>
          <table:table-cell table:style-name="ce12N2" office:value-type="float" office:value="4.85">
            <text:p>4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2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2.7">
            <text:p>1122,70</text:p>
          </table:table-cell>
          <table:table-cell table:style-name="ce12N2" office:value-type="float" office:value="44.91">
            <text:p>44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7511210393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80">
            <text:p>307280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2.17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85.63">
            <text:p>238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214.84">
            <text:p>2214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.166476">
            <text:p>20,166</text:p>
          </table:table-cell>
          <table:table-cell table:style-name="ce12N2" office:value-type="float" office:value="23.3">
            <text:p>23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85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.93">
            <text:p>43,9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70.79">
            <text:p>170,79</text:p>
          </table:table-cell>
          <table:table-cell table:style-name="ce12N2" office:value-type="float" office:value="2214.84">
            <text:p>2214,84</text:p>
          </table:table-cell>
          <table:table-cell table:style-name="ce12N2" office:value-type="float" office:value="88.59">
            <text:p>88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56353460001405500200011217712791756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81">
            <text:p>307281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2.17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62.99">
            <text:p>4762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4546">
            <text:p>454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38">
            <text:p>0,027</text:p>
          </table:table-cell>
          <table:table-cell table:style-name="ce12N2" office:value-type="float" office:value="21.28">
            <text:p>21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62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.63">
            <text:p>58,6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216.99">
            <text:p>216,99</text:p>
          </table:table-cell>
          <table:table-cell table:style-name="ce12N2" office:value-type="float" office:value="4546">
            <text:p>4546,00</text:p>
          </table:table-cell>
          <table:table-cell table:style-name="ce12N2" office:value-type="float" office:value="181.84">
            <text:p>18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5635346000140550020001121781534580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96">
            <text:p>30729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41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19.25">
            <text:p>4119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19.25">
            <text:p>4119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5013">
            <text:p>0,550</text:p>
          </table:table-cell>
          <table:table-cell table:style-name="ce12N2" office:value-type="float" office:value="250">
            <text:p>2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19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19.25">
            <text:p>4119,25</text:p>
          </table:table-cell>
          <table:table-cell table:style-name="ce12N2" office:value-type="float" office:value="164.77">
            <text:p>164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41715029772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09">
            <text:p>307309</text:p>
          </table:table-cell>
          <table:table-cell table:style-name="ce0" table:number-columns-spanned="4" table:number-rows-spanned="1" office:value-type="string" calcext:value-type="string">
            <text:p>30.850 - DEXCO S.A</text:p>
          </table:table-cell>
          <table:covered-table-cell table:number-columns-repeated="3"/>
          <table:table-cell table:style-name="ce0" office:value-type="string" calcext:value-type="string">
            <text:p>162.3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20.43">
            <text:p>1720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20.43">
            <text:p>1720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0.21">
            <text:p>10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20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20.43">
            <text:p>1720,43</text:p>
          </table:table-cell>
          <table:table-cell table:style-name="ce12N2" office:value-type="float" office:value="120.43">
            <text:p>120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978371810053785500100016232012004868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11">
            <text:p>30731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6.07">
            <text:p>446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18.84">
            <text:p>418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4454">
            <text:p>0,134</text:p>
          </table:table-cell>
          <table:table-cell table:style-name="ce12N2" office:value-type="float" office:value="0.92">
            <text:p>0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6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27.23">
            <text:p>27,23</text:p>
          </table:table-cell>
          <table:table-cell table:style-name="ce12N2" office:value-type="float" office:value="418.84">
            <text:p>418,84</text:p>
          </table:table-cell>
          <table:table-cell table:style-name="ce12N2" office:value-type="float" office:value="23.54">
            <text:p>2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7812284640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12">
            <text:p>30731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3.43">
            <text:p>273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6.74">
            <text:p>256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364">
            <text:p>0,1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3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6.69">
            <text:p>16,69</text:p>
          </table:table-cell>
          <table:table-cell table:style-name="ce12N2" office:value-type="float" office:value="256.74">
            <text:p>256,74</text:p>
          </table:table-cell>
          <table:table-cell table:style-name="ce12N2" office:value-type="float" office:value="10.27">
            <text:p>10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7712067759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13">
            <text:p>30731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09.61">
            <text:p>420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952.68">
            <text:p>3952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71828">
            <text:p>0,472</text:p>
          </table:table-cell>
          <table:table-cell table:style-name="ce12N2" office:value-type="float" office:value="7.22">
            <text:p>7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09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256.93">
            <text:p>256,93</text:p>
          </table:table-cell>
          <table:table-cell table:style-name="ce12N2" office:value-type="float" office:value="3952.68">
            <text:p>3952,68</text:p>
          </table:table-cell>
          <table:table-cell table:style-name="ce12N2" office:value-type="float" office:value="158.11">
            <text:p>158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715962084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14">
            <text:p>30731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3.0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1.26">
            <text:p>50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70.66">
            <text:p>470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3032">
            <text:p>0,123</text:p>
          </table:table-cell>
          <table:table-cell table:style-name="ce12N2" office:value-type="float" office:value="4.49">
            <text:p>4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1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30.6">
            <text:p>30,60</text:p>
          </table:table-cell>
          <table:table-cell table:style-name="ce12N2" office:value-type="float" office:value="470.66">
            <text:p>470,66</text:p>
          </table:table-cell>
          <table:table-cell table:style-name="ce12N2" office:value-type="float" office:value="18.82">
            <text:p>1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307612217876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17">
            <text:p>307317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8.160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27.12">
            <text:p>172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73.69">
            <text:p>1573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27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53.43">
            <text:p>153,43</text:p>
          </table:table-cell>
          <table:table-cell table:style-name="ce12N2" office:value-type="float" office:value="1573.69">
            <text:p>1573,69</text:p>
          </table:table-cell>
          <table:table-cell table:style-name="ce12N2" office:value-type="float" office:value="110.16">
            <text:p>110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45461650003935500400009816019620208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25">
            <text:p>30732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69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3.92">
            <text:p>2783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83.92">
            <text:p>2783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8">
            <text:p>0,006</text:p>
          </table:table-cell>
          <table:table-cell table:style-name="ce12N2" office:value-type="float" office:value="0.98">
            <text:p>0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83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83.92">
            <text:p>2783,92</text:p>
          </table:table-cell>
          <table:table-cell table:style-name="ce12N2" office:value-type="float" office:value="194.87">
            <text:p>194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69019081947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26">
            <text:p>30732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70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67.67">
            <text:p>2967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86.54">
            <text:p>2786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908">
            <text:p>0,028</text:p>
          </table:table-cell>
          <table:table-cell table:style-name="ce12N2" office:value-type="float" office:value="3.56">
            <text:p>3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67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81.13">
            <text:p>181,13</text:p>
          </table:table-cell>
          <table:table-cell table:style-name="ce12N2" office:value-type="float" office:value="2786.54">
            <text:p>2786,54</text:p>
          </table:table-cell>
          <table:table-cell table:style-name="ce12N2" office:value-type="float" office:value="195.06">
            <text:p>195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70818881438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28">
            <text:p>307328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7.9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57.37">
            <text:p>2957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94.64">
            <text:p>2694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0236">
            <text:p>0,080</text:p>
          </table:table-cell>
          <table:table-cell table:style-name="ce12N2" office:value-type="float" office:value="24.96">
            <text:p>24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57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.76">
            <text:p>40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262.73">
            <text:p>262,73</text:p>
          </table:table-cell>
          <table:table-cell table:style-name="ce12N2" office:value-type="float" office:value="2694.64">
            <text:p>2694,64</text:p>
          </table:table-cell>
          <table:table-cell table:style-name="ce12N2" office:value-type="float" office:value="107.79">
            <text:p>107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94164590001205500100081798018238551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1">
            <text:p>307331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7.8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6.4">
            <text:p>506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99.2">
            <text:p>499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832">
            <text:p>0,033</text:p>
          </table:table-cell>
          <table:table-cell table:style-name="ce12N2" office:value-type="float" office:value="5.78">
            <text:p>5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6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7.2">
            <text:p>7,20</text:p>
          </table:table-cell>
          <table:table-cell table:style-name="ce12N2" office:value-type="float" office:value="499.2">
            <text:p>499,20</text:p>
          </table:table-cell>
          <table:table-cell table:style-name="ce12N2" office:value-type="float" office:value="28.3">
            <text:p>2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578201370188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3">
            <text:p>30733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95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3.78">
            <text:p>1023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23.78">
            <text:p>1023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2.14">
            <text:p>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23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3.78">
            <text:p>1023,78</text:p>
          </table:table-cell>
          <table:table-cell table:style-name="ce12N2" office:value-type="float" office:value="71.66">
            <text:p>7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95711933317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53">
            <text:p>307353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3.2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06.41">
            <text:p>2206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942">
            <text:p>1942,0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004">
            <text:p>0,000</text:p>
          </table:table-cell>
          <table:table-cell table:style-name="ce12N2" office:value-type="float" office:value="5.8">
            <text:p>5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06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79.41">
            <text:p>179,41</text:p>
          </table:table-cell>
          <table:table-cell table:style-name="ce12N2" office:value-type="float" office:value="2027">
            <text:p>2027,00</text:p>
          </table:table-cell>
          <table:table-cell table:style-name="ce12N2" office:value-type="float" office:value="81.07">
            <text:p>81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06911580003705500100029321818285165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87">
            <text:p>87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85">
            <text:p>85,00</text:p>
          </table:table-cell>
          <table:table-cell table:style-name="ce26N2" office:value-type="float" office:value="100">
            <text:p>100,00</text:p>
          </table:table-cell>
          <table:table-cell table:style-name="ce26N2" office:value-type="float" office:value="14025.92">
            <text:p>14025,92</text:p>
          </table:table-cell>
          <table:table-cell table:style-name="ce26N2" office:value-type="float" office:value="304859.72">
            <text:p>304859,72</text:p>
          </table:table-cell>
          <table:table-cell table:style-name="ce26N2" office:value-type="float" office:value="17171.46">
            <text:p>17171,4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89.72">
            <text:p>89,72</text:p>
          </table:table-cell>
          <table:table-cell table:style-name="ce26N2" office:value-type="float" office:value="318885.64">
            <text:p>318885,6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34.41994">
            <text:p>34,420</text:p>
          </table:table-cell>
          <table:table-cell table:style-name="ce26N2" office:value-type="float" office:value="304674.72">
            <text:p>304674,72</text:p>
          </table:table-cell>
          <table:table-cell table:style-name="ce26N2" office:value-type="float" office:value="318885.64">
            <text:p>318885,6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3423.43">
            <text:p>3423,4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3.12">
            <text:p>43,1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SR ACABAMENT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544" meta:object-count="0"/>
    <meta:generator>LibreOffice/4.3.0.4$Windows_x86 LibreOffice_project/62ad5818884a2fc2e5780dd45466868d41009ec0</meta:generator>
  </office:meta>
</office:document-meta>
</file>