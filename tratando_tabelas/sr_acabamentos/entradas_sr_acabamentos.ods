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5/05/2026 10:35:14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8">
            <text:p>3043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3">
            <text:p>0,023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62.27">
            <text:p>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31048927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9">
            <text:p>30439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8">
            <text:p>0,019</text:p>
          </table:table-cell>
          <table:table-cell table:style-name="ce12N2" office:value-type="float" office:value="10.69">
            <text:p>1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19.37">
            <text:p>1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51618096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0">
            <text:p>30440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15.63">
            <text:p>1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418739337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1">
            <text:p>30440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88">
            <text:p>0,051</text:p>
          </table:table-cell>
          <table:table-cell table:style-name="ce12N2" office:value-type="float" office:value="23.14">
            <text:p>2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2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21.9">
            <text:p>2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219762417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3">
            <text:p>30545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.05">
            <text:p>83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944">
            <text:p>0,211</text:p>
          </table:table-cell>
          <table:table-cell table:style-name="ce12N2" office:value-type="float" office:value="9.12">
            <text:p>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1.06">
            <text:p>31,06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32.25">
            <text:p>3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218516198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4">
            <text:p>3054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3.32">
            <text:p>232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3764">
            <text:p>0,234</text:p>
          </table:table-cell>
          <table:table-cell table:style-name="ce12N2" office:value-type="float" office:value="12.22">
            <text:p>1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3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91.78">
            <text:p>9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318648237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5">
            <text:p>3054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.16">
            <text:p>80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309">
            <text:p>0,205</text:p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30.86">
            <text:p>3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41505799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4">
            <text:p>3054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116520420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5">
            <text:p>3054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210821423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6">
            <text:p>3054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31260967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4">
            <text:p>3054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.35">
            <text:p>16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04">
            <text:p>0,015</text:p>
          </table:table-cell>
          <table:table-cell table:style-name="ce12N2" office:value-type="float" office:value="2.51">
            <text:p>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6.29">
            <text:p>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010143711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5">
            <text:p>305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111925584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6">
            <text:p>305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21375141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3">
            <text:p>30561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1.35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86">
            <text:p>0,011</text:p>
          </table:table-cell>
          <table:table-cell table:style-name="ce12N2" office:value-type="float" office:value="9.93">
            <text:p>9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2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13531420684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5">
            <text:p>305715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3.63">
            <text:p>128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">
            <text:p>0,105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83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82">
            <text:p>65,82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81.63">
            <text:p>8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901467490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4">
            <text:p>3059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013542731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5">
            <text:p>30591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11938958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6">
            <text:p>305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21872963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6">
            <text:p>3059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81115188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7">
            <text:p>3059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91649724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8">
            <text:p>3059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01303896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7">
            <text:p>3059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718098184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8">
            <text:p>3059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817164062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9">
            <text:p>3059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91590180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4">
            <text:p>3059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41905481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5">
            <text:p>3059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51839238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6">
            <text:p>3059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61571703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4">
            <text:p>3059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118521164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2">
            <text:p>3059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919997552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7">
            <text:p>3059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2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7">
            <text:p>0,002</text:p>
          </table:table-cell>
          <table:table-cell table:style-name="ce12N2" office:value-type="float" office:value="0.24">
            <text:p>0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77.16">
            <text:p>7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2101918141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35">
            <text:p>3060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9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928">
            <text:p>0,009</text:p>
          </table:table-cell>
          <table:table-cell table:style-name="ce12N2" office:value-type="float" office:value="10.08">
            <text:p>1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9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216.62">
            <text:p>21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99716379843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38">
            <text:p>3060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6.5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39">
            <text:p>0,056</text:p>
          </table:table-cell>
          <table:table-cell table:style-name="ce12N2" office:value-type="float" office:value="14.66">
            <text:p>14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369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1495.86">
            <text:p>14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654412390518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4">
            <text:p>3061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7.2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06">
            <text:p>0,019</text:p>
          </table:table-cell>
          <table:table-cell table:style-name="ce12N2" office:value-type="float" office:value="19.29">
            <text:p>1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466.87">
            <text:p>46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72341190506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4">
            <text:p>30616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879">
            <text:p>0,019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108.47">
            <text:p>1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41564184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5">
            <text:p>30616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68.41">
            <text:p>92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0657">
            <text:p>0,521</text:p>
          </table:table-cell>
          <table:table-cell table:style-name="ce12N2" office:value-type="float" office:value="53.62">
            <text:p>5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6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">
            <text:p>1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46.62">
            <text:p>146,62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552.41">
            <text:p>55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51583820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1">
            <text:p>306181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28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.33">
            <text:p>62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161.46">
            <text:p>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41716221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2">
            <text:p>306182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11.69">
            <text:p>1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510498400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34">
            <text:p>30623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5.0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2.45">
            <text:p>631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8205">
            <text:p>0,298</text:p>
          </table:table-cell>
          <table:table-cell table:style-name="ce12N2" office:value-type="float" office:value="59.6">
            <text:p>5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29.12">
            <text:p>29,12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408.48">
            <text:p>40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508910434505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35">
            <text:p>306235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49.69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91.05">
            <text:p>669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6571.46">
            <text:p>6571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7857">
            <text:p>0,238</text:p>
          </table:table-cell>
          <table:table-cell table:style-name="ce12N2" office:value-type="float" office:value="48.54">
            <text:p>48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91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5">
            <text:p>75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119.59">
            <text:p>119,59</text:p>
          </table:table-cell>
          <table:table-cell table:style-name="ce12N2" office:value-type="float" office:value="6571.46">
            <text:p>6571,46</text:p>
          </table:table-cell>
          <table:table-cell table:style-name="ce12N2" office:value-type="float" office:value="296.24">
            <text:p>29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23084560001495500500044969614323513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0">
            <text:p>30628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4.4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0.46">
            <text:p>145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405.3">
            <text:p>140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678">
            <text:p>0,091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0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5.16">
            <text:p>45,16</text:p>
          </table:table-cell>
          <table:table-cell table:style-name="ce12N2" office:value-type="float" office:value="1405.3">
            <text:p>1405,30</text:p>
          </table:table-cell>
          <table:table-cell table:style-name="ce12N2" office:value-type="float" office:value="75.76">
            <text:p>7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442914580076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2">
            <text:p>3062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.34">
            <text:p>19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9.66">
            <text:p>17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156">
            <text:p>0,205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1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1.68">
            <text:p>11,68</text:p>
          </table:table-cell>
          <table:table-cell table:style-name="ce12N2" office:value-type="float" office:value="179.66">
            <text:p>179,66</text:p>
          </table:table-cell>
          <table:table-cell table:style-name="ce12N2" office:value-type="float" office:value="7.19">
            <text:p>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314184854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3">
            <text:p>3062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31.81">
            <text:p>3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61701493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4">
            <text:p>3062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13">
            <text:p>33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4.68">
            <text:p>31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56">
            <text:p>0,012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0.45">
            <text:p>20,45</text:p>
          </table:table-cell>
          <table:table-cell table:style-name="ce12N2" office:value-type="float" office:value="314.68">
            <text:p>314,68</text:p>
          </table:table-cell>
          <table:table-cell table:style-name="ce12N2" office:value-type="float" office:value="22.03">
            <text:p>2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712018390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5">
            <text:p>3062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28">
            <text:p>0,011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50.12">
            <text:p>5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81968152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6">
            <text:p>3062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6">
            <text:p>0,002</text:p>
          </table:table-cell>
          <table:table-cell table:style-name="ce12N2" office:value-type="float" office:value="2.66">
            <text:p>2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7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83.15">
            <text:p>8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916034313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7">
            <text:p>3062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4">
            <text:p>0,001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361224203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8">
            <text:p>3062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.23">
            <text:p>67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978">
            <text:p>0,016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1.15">
            <text:p>41,15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25.32">
            <text:p>2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81741057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9">
            <text:p>3062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.07">
            <text:p>79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38">
            <text:p>0,015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6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8.59">
            <text:p>48,59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52.32">
            <text:p>5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919026442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0">
            <text:p>3062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616">
            <text:p>0,036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9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102.14">
            <text:p>10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018616929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1">
            <text:p>3062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884">
            <text:p>0,095</text:p>
          </table:table-cell>
          <table:table-cell table:style-name="ce12N2" office:value-type="float" office:value="23.66">
            <text:p>2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4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573.68">
            <text:p>57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117949175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2">
            <text:p>3062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132">
            <text:p>0,057</text:p>
          </table:table-cell>
          <table:table-cell table:style-name="ce12N2" office:value-type="float" office:value="9.71">
            <text:p>9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8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243.69">
            <text:p>24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21745730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4">
            <text:p>306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01.06">
            <text:p>860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2508">
            <text:p>0,193</text:p>
          </table:table-cell>
          <table:table-cell table:style-name="ce12N2" office:value-type="float" office:value="27.22">
            <text:p>27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01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99.82">
            <text:p>99,82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595.09">
            <text:p>59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41489041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5">
            <text:p>306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48.98">
            <text:p>114148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">
            <text:p>128,00</text:p>
          </table:table-cell>
          <table:table-cell table:style-name="ce12N2" office:value-type="float" office:value="113148.24">
            <text:p>11314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477">
            <text:p>4,995</text:p>
          </table:table-cell>
          <table:table-cell table:style-name="ce12N2" office:value-type="float" office:value="313.53">
            <text:p>31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48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000.74">
            <text:p>1000,74</text:p>
          </table:table-cell>
          <table:table-cell table:style-name="ce12N2" office:value-type="float" office:value="113148.24">
            <text:p>113148,24</text:p>
          </table:table-cell>
          <table:table-cell table:style-name="ce12N2" office:value-type="float" office:value="7362.41">
            <text:p>736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51991630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6">
            <text:p>306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">
            <text:p>0,002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127.24">
            <text:p>12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71999415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7">
            <text:p>30629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189.81">
            <text:p>3218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">
            <text:p>59,00</text:p>
          </table:table-cell>
          <table:table-cell table:style-name="ce12N2" office:value-type="float" office:value="32170.78">
            <text:p>3217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805694">
            <text:p>12,806</text:p>
          </table:table-cell>
          <table:table-cell table:style-name="ce12N2" office:value-type="float" office:value="1682.52">
            <text:p>168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18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9.03">
            <text:p>19,03</text:p>
          </table:table-cell>
          <table:table-cell table:style-name="ce12N2" office:value-type="float" office:value="32170.78">
            <text:p>32170,78</text:p>
          </table:table-cell>
          <table:table-cell table:style-name="ce12N2" office:value-type="float" office:value="2239.23">
            <text:p>223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518511014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8">
            <text:p>30629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1284">
            <text:p>2,013</text:p>
          </table:table-cell>
          <table:table-cell table:style-name="ce12N2" office:value-type="float" office:value="74.93">
            <text:p>74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5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131.29">
            <text:p>13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61975077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3">
            <text:p>30632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42">
            <text:p>0,005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25.35">
            <text:p>2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71675258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4">
            <text:p>30632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432">
            <text:p>0,184</text:p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46.32">
            <text:p>4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815785631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1">
            <text:p>30633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2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2.82">
            <text:p>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159.36">
            <text:p>15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2491883070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2">
            <text:p>3063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32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5">
            <text:p>0,001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32.06">
            <text:p>3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32615705543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4">
            <text:p>3063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9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249">
            <text:p>0,512</text:p>
          </table:table-cell>
          <table:table-cell table:style-name="ce12N2" office:value-type="float" office:value="176.94">
            <text:p>176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77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207.12">
            <text:p>20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9241197642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6">
            <text:p>3063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9.1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77648">
            <text:p>2,478</text:p>
          </table:table-cell>
          <table:table-cell table:style-name="ce12N2" office:value-type="float" office:value="829.6">
            <text:p>82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97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407.9">
            <text:p>40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9156119100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1">
            <text:p>306381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16.64">
            <text:p>5216,64</text:p>
          </table:table-cell>
          <table:table-cell table:style-name="ce12N2" office:value-type="float" office:value="838.8">
            <text:p>838,8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2">
            <text:p>559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7.42">
            <text:p>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1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63.44">
            <text:p>463,44</text:p>
          </table:table-cell>
          <table:table-cell table:style-name="ce12N2" office:value-type="float" office:value="4753.2">
            <text:p>4753,20</text:p>
          </table:table-cell>
          <table:table-cell table:style-name="ce12N2" office:value-type="float" office:value="190.13">
            <text:p>19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21000336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2">
            <text:p>30645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7.09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36">
            <text:p>0,081</text:p>
          </table:table-cell>
          <table:table-cell table:style-name="ce12N2" office:value-type="float" office:value="26.3">
            <text:p>2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38.86">
            <text:p>3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4709011025025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3">
            <text:p>30645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8.0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64">
            <text:p>0,081</text:p>
          </table:table-cell>
          <table:table-cell table:style-name="ce12N2" office:value-type="float" office:value="25.28">
            <text:p>2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40.22">
            <text:p>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4801313683515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2">
            <text:p>30648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9191">
            <text:p>2,592</text:p>
          </table:table-cell>
          <table:table-cell table:style-name="ce12N2" office:value-type="float" office:value="1194.89">
            <text:p>1194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5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766.71">
            <text:p>76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418906957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3">
            <text:p>30648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024">
            <text:p>0,170</text:p>
          </table:table-cell>
          <table:table-cell table:style-name="ce12N2" office:value-type="float" office:value="48.56">
            <text:p>48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2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54.12">
            <text:p>5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51713167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4">
            <text:p>30648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5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218.26">
            <text:p>21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6188292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9">
            <text:p>3064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8.2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152">
            <text:p>0,152</text:p>
          </table:table-cell>
          <table:table-cell table:style-name="ce12N2" office:value-type="float" office:value="44.26">
            <text:p>4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4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29.71">
            <text:p>2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82541648435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5">
            <text:p>3064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1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16.35">
            <text:p>391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62.32">
            <text:p>376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372">
            <text:p>0,032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1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54.03">
            <text:p>154,03</text:p>
          </table:table-cell>
          <table:table-cell table:style-name="ce12N2" office:value-type="float" office:value="3762.32">
            <text:p>3762,32</text:p>
          </table:table-cell>
          <table:table-cell table:style-name="ce12N2" office:value-type="float" office:value="263.36">
            <text:p>26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11516428682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9">
            <text:p>30655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7.83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1.49">
            <text:p>148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49.88">
            <text:p>1249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0">
            <text:p>100,00</text:p>
          </table:table-cell>
          <table:table-cell table:style-name="ce12" office:value-type="string" calcext:value-type="string">
            <text:p>1.48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31.61">
            <text:p>131,61</text:p>
          </table:table-cell>
          <table:table-cell table:style-name="ce12N2" office:value-type="float" office:value="1349.88">
            <text:p>1349,88</text:p>
          </table:table-cell>
          <table:table-cell table:style-name="ce12N2" office:value-type="float" office:value="84.33">
            <text:p>8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45461650003935500400009783211206100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7">
            <text:p>306567</text:p>
          </table:table-cell>
          <table:table-cell table:style-name="ce0" table:number-columns-spanned="4" table:number-rows-spanned="1" office:value-type="string" calcext:value-type="string">
            <text:p>11.247 - NOVA ROCHA INDUSTRIA DE TINTAS LTDA.</text:p>
          </table:table-cell>
          <table:covered-table-cell table:number-columns-repeated="3"/>
          <table:table-cell table:style-name="ce0" office:value-type="string" calcext:value-type="string">
            <text:p>552.8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812.79">
            <text:p>31812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1611.91">
            <text:p>31611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52322">
            <text:p>2,652</text:p>
          </table:table-cell>
          <table:table-cell table:style-name="ce12N2" office:value-type="float" office:value="12352.88">
            <text:p>12352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812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00.88">
            <text:p>200,88</text:p>
          </table:table-cell>
          <table:table-cell table:style-name="ce12N2" office:value-type="float" office:value="31611.91">
            <text:p>31611,91</text:p>
          </table:table-cell>
          <table:table-cell table:style-name="ce12N2" office:value-type="float" office:value="3793.41">
            <text:p>37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030051230001035500100055288015815033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5">
            <text:p>306575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19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68.88">
            <text:p>396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80.6">
            <text:p>378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38">
            <text:p>0,027</text:p>
          </table:table-cell>
          <table:table-cell table:style-name="ce12N2" office:value-type="float" office:value="21.28">
            <text:p>2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6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67">
            <text:p>54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88.28">
            <text:p>188,28</text:p>
          </table:table-cell>
          <table:table-cell table:style-name="ce12N2" office:value-type="float" office:value="3780.6">
            <text:p>3780,60</text:p>
          </table:table-cell>
          <table:table-cell table:style-name="ce12N2" office:value-type="float" office:value="151.22">
            <text:p>15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11961551052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0">
            <text:p>30658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3.71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73.85">
            <text:p>1247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12183.07">
            <text:p>12183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09833">
            <text:p>3,010</text:p>
          </table:table-cell>
          <table:table-cell table:style-name="ce12N2" office:value-type="float" office:value="251.5">
            <text:p>25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7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90.78">
            <text:p>290,78</text:p>
          </table:table-cell>
          <table:table-cell table:style-name="ce12N2" office:value-type="float" office:value="12183.07">
            <text:p>12183,07</text:p>
          </table:table-cell>
          <table:table-cell table:style-name="ce12N2" office:value-type="float" office:value="704.43">
            <text:p>70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37191121562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74">
            <text:p>74,00</text:p>
          </table:table-cell>
          <table:table-cell table:style-name="ce26N2" office:value-type="float" office:value="838.8">
            <text:p>838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0">
            <text:p>100,00</text:p>
          </table:table-cell>
          <table:table-cell table:style-name="ce26N2" office:value-type="float" office:value="3412.13">
            <text:p>3412,13</text:p>
          </table:table-cell>
          <table:table-cell table:style-name="ce26N2" office:value-type="float" office:value="351290.34">
            <text:p>351290,34</text:p>
          </table:table-cell>
          <table:table-cell table:style-name="ce26N2" office:value-type="float" office:value="23306.03">
            <text:p>23306,0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54702.47">
            <text:p>354702,4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4.766963">
            <text:p>34,767</text:p>
          </table:table-cell>
          <table:table-cell table:style-name="ce26N2" office:value-type="float" office:value="352029.14">
            <text:p>352029,14</text:p>
          </table:table-cell>
          <table:table-cell table:style-name="ce26N2" office:value-type="float" office:value="354702.47">
            <text:p>354702,4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7567.93">
            <text:p>17567,9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9.02">
            <text:p>39,0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38" meta:object-count="0"/>
    <meta:generator>LibreOffice/4.3.0.4$Windows_x86 LibreOffice_project/62ad5818884a2fc2e5780dd45466868d41009ec0</meta:generator>
  </office:meta>
</office:document-meta>
</file>