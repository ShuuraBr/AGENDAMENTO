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0/06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3">
            <text:p>3080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6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532">
            <text:p>0,024</text:p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37.1">
            <text:p>6737,10</text:p>
          </table:table-cell>
          <table:table-cell table:style-name="ce12N2" office:value-type="float" office:value="6.74">
            <text:p>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63">
            <text:p>60,6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558.78">
            <text:p>55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6041015211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9">
            <text:p>308089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8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">
            <text:p>0,045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6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.75">
            <text:p>131,75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10.93">
            <text:p>1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83119611538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99">
            <text:p>30829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6.8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58.52">
            <text:p>17458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7458.52">
            <text:p>17458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9403">
            <text:p>0,509</text:p>
          </table:table-cell>
          <table:table-cell table:style-name="ce12N2" office:value-type="float" office:value="227.97">
            <text:p>227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458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68511814268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1">
            <text:p>30830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6.8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8.06">
            <text:p>17278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7278.06">
            <text:p>17278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6768">
            <text:p>0,147</text:p>
          </table:table-cell>
          <table:table-cell table:style-name="ce12N2" office:value-type="float" office:value="161.33">
            <text:p>161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278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685319431096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0">
            <text:p>308310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2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6.01">
            <text:p>478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336.39">
            <text:p>433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86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449.62">
            <text:p>449,62</text:p>
          </table:table-cell>
          <table:table-cell table:style-name="ce12N2" office:value-type="float" office:value="4336.39">
            <text:p>4336,39</text:p>
          </table:table-cell>
          <table:table-cell table:style-name="ce12N2" office:value-type="float" office:value="173.46">
            <text:p>1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402411137711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7">
            <text:p>308317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9.8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6.61">
            <text:p>727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">
            <text:p>47,00</text:p>
          </table:table-cell>
          <table:table-cell table:style-name="ce12N2" office:value-type="float" office:value="7185.25">
            <text:p>718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963">
            <text:p>0,232</text:p>
          </table:table-cell>
          <table:table-cell table:style-name="ce12N2" office:value-type="float" office:value="32.52">
            <text:p>3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76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98.26">
            <text:p>6098,26</text:p>
          </table:table-cell>
          <table:table-cell table:style-name="ce12N2" office:value-type="float" office:value="6.06">
            <text:p>6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86">
            <text:p>54,86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91.36">
            <text:p>91,36</text:p>
          </table:table-cell>
          <table:table-cell table:style-name="ce12N2" office:value-type="float" office:value="7185.25">
            <text:p>7185,25</text:p>
          </table:table-cell>
          <table:table-cell table:style-name="ce12N2" office:value-type="float" office:value="465.38">
            <text:p>46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985017255504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1">
            <text:p>308331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4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0.51">
            <text:p>11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93.98">
            <text:p>1093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374">
            <text:p>0,194</text:p>
          </table:table-cell>
          <table:table-cell table:style-name="ce12N2" office:value-type="float" office:value="9.16">
            <text:p>9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0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8.49">
            <text:p>938,49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6.53">
            <text:p>6,53</text:p>
          </table:table-cell>
          <table:table-cell table:style-name="ce12N2" office:value-type="float" office:value="1093.98">
            <text:p>1093,98</text:p>
          </table:table-cell>
          <table:table-cell table:style-name="ce12N2" office:value-type="float" office:value="59.82">
            <text:p>59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42012877018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2">
            <text:p>30833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4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4.12">
            <text:p>138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362.12">
            <text:p>1362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412">
            <text:p>0,080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3.47">
            <text:p>1153,47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38">
            <text:p>10,38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1362.12">
            <text:p>1362,12</text:p>
          </table:table-cell>
          <table:table-cell table:style-name="ce12N2" office:value-type="float" office:value="91.06">
            <text:p>9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41918177188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3">
            <text:p>30833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6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.74">
            <text:p>83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36.56">
            <text:p>836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602">
            <text:p>0,077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8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6.04">
            <text:p>706,04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5">
            <text:p>6,3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836.56">
            <text:p>836,56</text:p>
          </table:table-cell>
          <table:table-cell table:style-name="ce12N2" office:value-type="float" office:value="58.56">
            <text:p>5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69815156048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94">
            <text:p>3083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5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3.62">
            <text:p>354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43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08.18">
            <text:p>2808,18</text:p>
          </table:table-cell>
          <table:table-cell table:style-name="ce12N2" office:value-type="float" office:value="2.81">
            <text:p>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27">
            <text:p>25,2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6.28">
            <text:p>216,28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232.91">
            <text:p>23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5501077625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7">
            <text:p>308437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61.8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86.4">
            <text:p>428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024.8">
            <text:p>402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1.66">
            <text:p>41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8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96.78">
            <text:p>3396,78</text:p>
          </table:table-cell>
          <table:table-cell table:style-name="ce12N2" office:value-type="float" office:value="3.4">
            <text:p>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56">
            <text:p>30,56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61.6">
            <text:p>261,60</text:p>
          </table:table-cell>
          <table:table-cell table:style-name="ce12N2" office:value-type="float" office:value="4024.8">
            <text:p>4024,80</text:p>
          </table:table-cell>
          <table:table-cell table:style-name="ce12N2" office:value-type="float" office:value="281.76">
            <text:p>2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618121299841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5">
            <text:p>308455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3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5.63">
            <text:p>226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10.1">
            <text:p>201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9">
            <text:p>0,017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56.34">
            <text:p>1856,34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71">
            <text:p>16,7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55.53">
            <text:p>255,53</text:p>
          </table:table-cell>
          <table:table-cell table:style-name="ce12N2" office:value-type="float" office:value="2010.1">
            <text:p>2010,10</text:p>
          </table:table-cell>
          <table:table-cell table:style-name="ce12N2" office:value-type="float" office:value="80.4">
            <text:p>8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403381426574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0">
            <text:p>30846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2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7.06">
            <text:p>364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525">
            <text:p>0,105</text:p>
          </table:table-cell>
          <table:table-cell table:style-name="ce12N2" office:value-type="float" office:value="22.39">
            <text:p>22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7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94.11">
            <text:p>3094,11</text:p>
          </table:table-cell>
          <table:table-cell table:style-name="ce12N2" office:value-type="float" office:value="3.08">
            <text:p>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86">
            <text:p>27,86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3.28">
            <text:p>13,28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224.27">
            <text:p>2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29917400163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4">
            <text:p>308464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2.5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46.88">
            <text:p>246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9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74.86">
            <text:p>3874,86</text:p>
          </table:table-cell>
          <table:table-cell table:style-name="ce12N2" office:value-type="float" office:value="3.87">
            <text:p>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88">
            <text:p>34,8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321.38">
            <text:p>3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25531656758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9">
            <text:p>3085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2.31">
            <text:p>315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2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8.1">
            <text:p>2498,10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8">
            <text:p>22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92.39">
            <text:p>192,39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207.19">
            <text:p>20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5510603853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5">
            <text:p>30852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1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58.7">
            <text:p>915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1734">
            <text:p>0,322</text:p>
          </table:table-cell>
          <table:table-cell table:style-name="ce12N2" office:value-type="float" office:value="38.36">
            <text:p>38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58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1.54">
            <text:p>7721,54</text:p>
          </table:table-cell>
          <table:table-cell table:style-name="ce12N2" office:value-type="float" office:value="7.75">
            <text:p>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">
            <text:p>69,50</text:p>
          </table:table-cell>
          <table:table-cell table:style-name="ce12N2" office:value-type="float" office:value="64">
            <text:p>6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22.8">
            <text:p>122,8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527.41">
            <text:p>52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111113861717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9">
            <text:p>30854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">
            <text:p>0,015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101394853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74">
            <text:p>308574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7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13.2">
            <text:p>921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8317.26">
            <text:p>8317,26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07412">
            <text:p>0,007</text:p>
          </table:table-cell>
          <table:table-cell table:style-name="ce12N2" office:value-type="float" office:value="13.2">
            <text:p>1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1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20.03">
            <text:p>7320,03</text:p>
          </table:table-cell>
          <table:table-cell table:style-name="ce12N2" office:value-type="float" office:value="7.33">
            <text:p>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87">
            <text:p>65,87</text:p>
          </table:table-cell>
          <table:table-cell table:style-name="ce12N2" office:value-type="float" office:value="55.74">
            <text:p>55,7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810.94">
            <text:p>810,94</text:p>
          </table:table-cell>
          <table:table-cell table:style-name="ce12N2" office:value-type="float" office:value="8402.26">
            <text:p>8402,26</text:p>
          </table:table-cell>
          <table:table-cell table:style-name="ce12N2" office:value-type="float" office:value="336.11">
            <text:p>33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47541784828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1">
            <text:p>3085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.72">
            <text:p>11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.78">
            <text:p>106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2">
            <text:p>0,00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3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.12">
            <text:p>90,12</text:p>
          </table:table-cell>
          <table:table-cell table:style-name="ce12N2" office:value-type="float" office:value="0.09">
            <text:p>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6.94">
            <text:p>6,94</text:p>
          </table:table-cell>
          <table:table-cell table:style-name="ce12N2" office:value-type="float" office:value="106.78">
            <text:p>106,78</text:p>
          </table:table-cell>
          <table:table-cell table:style-name="ce12N2" office:value-type="float" office:value="7.47">
            <text:p>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515722357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4">
            <text:p>3085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.5">
            <text:p>10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2">
            <text:p>0,00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.4">
            <text:p>84,40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6">
            <text:p>0,7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410202608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3">
            <text:p>30862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8.86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.87">
            <text:p>32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.87">
            <text:p>328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905">
            <text:p>0,067</text:p>
          </table:table-cell>
          <table:table-cell table:style-name="ce12N2" office:value-type="float" office:value="20.06">
            <text:p>20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5.85">
            <text:p>305,85</text:p>
          </table:table-cell>
          <table:table-cell table:style-name="ce12N2" office:value-type="float" office:value="0.31">
            <text:p>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75">
            <text:p>2,7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87">
            <text:p>328,87</text:p>
          </table:table-cell>
          <table:table-cell table:style-name="ce12N2" office:value-type="float" office:value="23.02">
            <text:p>2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886216029958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5">
            <text:p>308625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3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39.85">
            <text:p>573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29.94">
            <text:p>5229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3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29.94">
            <text:p>5229,94</text:p>
          </table:table-cell>
          <table:table-cell table:style-name="ce12N2" office:value-type="float" office:value="5.23">
            <text:p>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07">
            <text:p>47,07</text:p>
          </table:table-cell>
          <table:table-cell table:style-name="ce12N2" office:value-type="float" office:value="39.16">
            <text:p>39,1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509.91">
            <text:p>509,91</text:p>
          </table:table-cell>
          <table:table-cell table:style-name="ce12N2" office:value-type="float" office:value="5229.94">
            <text:p>5229,94</text:p>
          </table:table-cell>
          <table:table-cell table:style-name="ce12N2" office:value-type="float" office:value="366.1">
            <text:p>36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377210026377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6">
            <text:p>308626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7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5.5">
            <text:p>1941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9343.7">
            <text:p>1934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64002">
            <text:p>0,964</text:p>
          </table:table-cell>
          <table:table-cell table:style-name="ce12N2" office:value-type="float" office:value="94.1">
            <text:p>9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1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83.16">
            <text:p>16683,16</text:p>
          </table:table-cell>
          <table:table-cell table:style-name="ce12N2" office:value-type="float" office:value="16.72">
            <text:p>1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.17">
            <text:p>150,17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71.8">
            <text:p>71,80</text:p>
          </table:table-cell>
          <table:table-cell table:style-name="ce12N2" office:value-type="float" office:value="19343.7">
            <text:p>19343,70</text:p>
          </table:table-cell>
          <table:table-cell table:style-name="ce12N2" office:value-type="float" office:value="960.07">
            <text:p>96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7951688803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2">
            <text:p>3086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2.66">
            <text:p>19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.9">
            <text:p>180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2">
            <text:p>0,00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2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2.67">
            <text:p>152,67</text:p>
          </table:table-cell>
          <table:table-cell table:style-name="ce12N2" office:value-type="float" office:value="0.15">
            <text:p>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1.76">
            <text:p>11,76</text:p>
          </table:table-cell>
          <table:table-cell table:style-name="ce12N2" office:value-type="float" office:value="180.9">
            <text:p>180,90</text:p>
          </table:table-cell>
          <table:table-cell table:style-name="ce12N2" office:value-type="float" office:value="12.66">
            <text:p>1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115352056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7">
            <text:p>3086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201577498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70">
            <text:p>308670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7.6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35.13">
            <text:p>753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029.44">
            <text:p>7029,44</text:p>
          </table:table-cell>
          <table:table-cell table:style-name="ce12N2" office:value-type="float" office:value="421.77">
            <text:p>421,77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52">
            <text:p>5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3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96.59">
            <text:p>6896,59</text:p>
          </table:table-cell>
          <table:table-cell table:style-name="ce12N2" office:value-type="float" office:value="6.9">
            <text:p>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07">
            <text:p>62,07</text:p>
          </table:table-cell>
          <table:table-cell table:style-name="ce12N2" office:value-type="float" office:value="74">
            <text:p>7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83.92">
            <text:p>83,92</text:p>
          </table:table-cell>
          <table:table-cell table:style-name="ce12N2" office:value-type="float" office:value="7451.21">
            <text:p>7451,21</text:p>
          </table:table-cell>
          <table:table-cell table:style-name="ce12N2" office:value-type="float" office:value="298.05">
            <text:p>29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24855633000140550010000776971314203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3">
            <text:p>308713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3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99.43">
            <text:p>419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753.36">
            <text:p>375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4">
            <text:p>0,057</text:p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99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28.38">
            <text:p>3228,38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05">
            <text:p>29,05</text:p>
          </table:table-cell>
          <table:table-cell table:style-name="ce12N2" office:value-type="float" office:value="40.51">
            <text:p>40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446.07">
            <text:p>446,07</text:p>
          </table:table-cell>
          <table:table-cell table:style-name="ce12N2" office:value-type="float" office:value="3753.36">
            <text:p>3753,36</text:p>
          </table:table-cell>
          <table:table-cell table:style-name="ce12N2" office:value-type="float" office:value="195.91">
            <text:p>19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322113308556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4">
            <text:p>30872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4.1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78.92">
            <text:p>3978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6">
            <text:p>0,003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78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63">
            <text:p>32,63</text:p>
          </table:table-cell>
          <table:table-cell table:style-name="ce12N2" office:value-type="float" office:value="34.38">
            <text:p>34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53.48">
            <text:p>353,48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253.78">
            <text:p>25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41211002641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0">
            <text:p>30873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1.5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11.2">
            <text:p>231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1.2">
            <text:p>231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5">
            <text:p>0,009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1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50.59">
            <text:p>1950,59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56">
            <text:p>17,56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11.2">
            <text:p>2311,20</text:p>
          </table:table-cell>
          <table:table-cell table:style-name="ce12N2" office:value-type="float" office:value="161.78">
            <text:p>16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151110717113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45">
            <text:p>30874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0.43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83.12">
            <text:p>268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83.12">
            <text:p>268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668">
            <text:p>0,011</text:p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8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64.48">
            <text:p>2264,48</text:p>
          </table:table-cell>
          <table:table-cell table:style-name="ce12N2" office:value-type="float" office:value="2.26">
            <text:p>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38">
            <text:p>20,3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83.12">
            <text:p>2683,12</text:p>
          </table:table-cell>
          <table:table-cell table:style-name="ce12N2" office:value-type="float" office:value="187.82">
            <text:p>187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043811817633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75">
            <text:p>308775</text:p>
          </table:table-cell>
          <table:table-cell table:style-name="ce0" table:number-columns-spanned="4" table:number-rows-spanned="1" office:value-type="string" calcext:value-type="string">
            <text:p>10.562 - RENATO MARTINS CIOFFOLETTI ILUM. EPP</text:p>
          </table:table-cell>
          <table:covered-table-cell table:number-columns-repeated="3"/>
          <table:table-cell table:style-name="ce0" office:value-type="string" calcext:value-type="string">
            <text:p>18.8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41.48">
            <text:p>4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373734000120550010000188121106787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84">
            <text:p>308784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7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0.23">
            <text:p>195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776.97">
            <text:p>1776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776">
            <text:p>0,054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50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76.97">
            <text:p>1776,97</text:p>
          </table:table-cell>
          <table:table-cell table:style-name="ce12N2" office:value-type="float" office:value="1.77">
            <text:p>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98">
            <text:p>15,98</text:p>
          </table:table-cell>
          <table:table-cell table:style-name="ce12N2" office:value-type="float" office:value="43.67">
            <text:p>43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173.26">
            <text:p>173,26</text:p>
          </table:table-cell>
          <table:table-cell table:style-name="ce12N2" office:value-type="float" office:value="1776.97">
            <text:p>1776,97</text:p>
          </table:table-cell>
          <table:table-cell table:style-name="ce12N2" office:value-type="float" office:value="124.39">
            <text:p>12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30228132000136550010000097491280346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4">
            <text:p>308834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89.27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2.89">
            <text:p>100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">
            <text:p>71,00</text:p>
          </table:table-cell>
          <table:table-cell table:style-name="ce12N2" office:value-type="float" office:value="1002.89">
            <text:p>1002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02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300018927810018221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6">
            <text:p>308836</text:p>
          </table:table-cell>
          <table:table-cell table:style-name="ce0" table:number-columns-spanned="4" table:number-rows-spanned="1" office:value-type="string" calcext:value-type="string">
            <text:p>13.893 - REVOLUZ INDUSTRIA E COMERCIO LTDA</text:p>
          </table:table-cell>
          <table:covered-table-cell table:number-columns-repeated="3"/>
          <table:table-cell table:style-name="ce0" office:value-type="string" calcext:value-type="string">
            <text:p>71.1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7.44">
            <text:p>2937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676.48">
            <text:p>2676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1856">
            <text:p>0,102</text:p>
          </table:table-cell>
          <table:table-cell table:style-name="ce12N2" office:value-type="float" office:value="11.04">
            <text:p>11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37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76.48">
            <text:p>2676,48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9">
            <text:p>24,0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260.96">
            <text:p>260,96</text:p>
          </table:table-cell>
          <table:table-cell table:style-name="ce12N2" office:value-type="float" office:value="2676.48">
            <text:p>2676,48</text:p>
          </table:table-cell>
          <table:table-cell table:style-name="ce12N2" office:value-type="float" office:value="187.35">
            <text:p>18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0.706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3/06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35260609306858000153550010000711251499070848</text:p>
          </table:table-cell>
          <table:table-cell table:style-name="ce0" office:value-type="string" calcext:value-type="string">
            <text:p>35260611389565000200570050004007061000870043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9">
            <text:p>308839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20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8.32">
            <text:p>584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412.32">
            <text:p>541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.010704">
            <text:p>30,011</text:p>
          </table:table-cell>
          <table:table-cell table:style-name="ce12N2" office:value-type="float" office:value="43.2">
            <text:p>4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48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5.22">
            <text:p>4715,22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53.91">
            <text:p>53,9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436">
            <text:p>436,00</text:p>
          </table:table-cell>
          <table:table-cell table:style-name="ce12N2" office:value-type="float" office:value="5412.32">
            <text:p>5412,32</text:p>
          </table:table-cell>
          <table:table-cell table:style-name="ce12N2" office:value-type="float" office:value="216.49">
            <text:p>216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20311369945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1">
            <text:p>308851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2.21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844">
            <text:p>0,118</text:p>
          </table:table-cell>
          <table:table-cell table:style-name="ce12N2" office:value-type="float" office:value="236.84">
            <text:p>23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0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7.52">
            <text:p>3317,52</text:p>
          </table:table-cell>
          <table:table-cell table:style-name="ce12N2" office:value-type="float" office:value="3.31">
            <text:p>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5">
            <text:p>29,85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275.16">
            <text:p>27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00000022171469860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3">
            <text:p>308853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92.34">
            <text:p>7892,34</text:p>
          </table:table-cell>
          <table:table-cell table:style-name="ce12N2" office:value-type="float" office:value="1797.8">
            <text:p>1797,8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89">
            <text:p>898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92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41.07">
            <text:p>6641,07</text:p>
          </table:table-cell>
          <table:table-cell table:style-name="ce12N2" office:value-type="float" office:value="6.64">
            <text:p>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77">
            <text:p>59,7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701.14">
            <text:p>701,14</text:p>
          </table:table-cell>
          <table:table-cell table:style-name="ce12N2" office:value-type="float" office:value="7191.2">
            <text:p>7191,20</text:p>
          </table:table-cell>
          <table:table-cell table:style-name="ce12N2" office:value-type="float" office:value="287.65">
            <text:p>287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177814120001095500100001207910003370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8">
            <text:p>308858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8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90.76">
            <text:p>369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62.88">
            <text:p>336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9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10.53">
            <text:p>3110,53</text:p>
          </table:table-cell>
          <table:table-cell table:style-name="ce12N2" office:value-type="float" office:value="3.11">
            <text:p>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327.88">
            <text:p>327,88</text:p>
          </table:table-cell>
          <table:table-cell table:style-name="ce12N2" office:value-type="float" office:value="3362.88">
            <text:p>3362,88</text:p>
          </table:table-cell>
          <table:table-cell table:style-name="ce12N2" office:value-type="float" office:value="134.52">
            <text:p>13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7716263000102550010000108271401105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7">
            <text:p>308867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4.2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07.4">
            <text:p>530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35.9">
            <text:p>483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0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35.9">
            <text:p>4835,90</text:p>
          </table:table-cell>
          <table:table-cell table:style-name="ce12N2" office:value-type="float" office:value="4.84">
            <text:p>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52">
            <text:p>43,52</text:p>
          </table:table-cell>
          <table:table-cell table:style-name="ce12N2" office:value-type="float" office:value="39.16">
            <text:p>39,1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471.5">
            <text:p>471,50</text:p>
          </table:table-cell>
          <table:table-cell table:style-name="ce12N2" office:value-type="float" office:value="4835.9">
            <text:p>4835,90</text:p>
          </table:table-cell>
          <table:table-cell table:style-name="ce12N2" office:value-type="float" office:value="338.52">
            <text:p>338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42131002642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1">
            <text:p>41,00</text:p>
          </table:table-cell>
          <table:table-cell table:style-name="ce26N2" office:value-type="float" office:value="1797.8">
            <text:p>1797,80</text:p>
          </table:table-cell>
          <table:table-cell table:style-name="ce26N2" office:value-type="float" office:value="506.77">
            <text:p>506,7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311.25">
            <text:p>6311,25</text:p>
          </table:table-cell>
          <table:table-cell table:style-name="ce26N2" office:value-type="float" office:value="137029.52">
            <text:p>137029,52</text:p>
          </table:table-cell>
          <table:table-cell table:style-name="ce26N2" office:value-type="float" office:value="7726.12">
            <text:p>7726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9.72">
            <text:p>89,72</text:p>
          </table:table-cell>
          <table:table-cell table:style-name="ce26N2" office:value-type="float" office:value="179227.74">
            <text:p>179227,7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3.213882">
            <text:p>33,214</text:p>
          </table:table-cell>
          <table:table-cell table:style-name="ce26N2" office:value-type="float" office:value="174207.52">
            <text:p>174207,52</text:p>
          </table:table-cell>
          <table:table-cell table:style-name="ce26N2" office:value-type="float" office:value="179227.74">
            <text:p>179227,7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16047.86">
            <text:p>116047,86</text:p>
          </table:table-cell>
          <table:table-cell table:style-name="ce26N2" office:value-type="float" office:value="116.05">
            <text:p>116,0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44.41">
            <text:p>1044,41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328.61">
            <text:p>1328,6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3.28">
            <text:p>43,2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68" meta:object-count="0"/>
    <meta:generator>LibreOffice/4.3.0.4$Windows_x86 LibreOffice_project/62ad5818884a2fc2e5780dd45466868d41009ec0</meta:generator>
  </office:meta>
</office:document-meta>
</file>