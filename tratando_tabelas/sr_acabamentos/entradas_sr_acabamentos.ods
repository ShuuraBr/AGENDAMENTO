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4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2">
            <text:p>31079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1.6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1.75">
            <text:p>273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2726">
            <text:p>0,2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2.96">
            <text:p>2232,96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">
            <text:p>20,10</text:p>
          </table:table-cell>
          <table:table-cell table:style-name="ce12N2" office:value-type="float" office:value="62.12">
            <text:p>62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5.99">
            <text:p>85,99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185.2">
            <text:p>1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16951264566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2">
            <text:p>310862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6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7">
            <text:p>15,17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50.92">
            <text:p>5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39477000186550010000006111000000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7">
            <text:p>310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8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2.72">
            <text:p>347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777">
            <text:p>0,013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9.17">
            <text:p>2889,1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9.39">
            <text:p>49,39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239.63">
            <text:p>23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8621137012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2">
            <text:p>310872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3.45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55.42">
            <text:p>745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7467">
            <text:p>1,237</text:p>
          </table:table-cell>
          <table:table-cell table:style-name="ce12N2" office:value-type="float" office:value="407.63">
            <text:p>4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5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70.03">
            <text:p>6170,03</text:p>
          </table:table-cell>
          <table:table-cell table:style-name="ce12N2" office:value-type="float" office:value="6.16">
            <text:p>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54">
            <text:p>55,5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06.04">
            <text:p>206,04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450.46">
            <text:p>45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34551431301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8">
            <text:p>31091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6.35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52">
            <text:p>0,030</text:p>
          </table:table-cell>
          <table:table-cell table:style-name="ce12N2" office:value-type="float" office:value="12.48">
            <text:p>12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.97">
            <text:p>103,97</text:p>
          </table:table-cell>
          <table:table-cell table:style-name="ce12N2" office:value-type="float" office:value="0.11">
            <text:p>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7.83">
            <text:p>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63571882694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6">
            <text:p>31095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3.25">
            <text:p>261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366">
            <text:p>0,224</text:p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1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8.19">
            <text:p>2098,19</text:p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89">
            <text:p>18,89</text:p>
          </table:table-cell>
          <table:table-cell table:style-name="ce12N2" office:value-type="float" office:value="40.98">
            <text:p>40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05">
            <text:p>190,05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111.15">
            <text:p>11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75810546203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5">
            <text:p>3109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6.35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.32">
            <text:p>71,32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5.37">
            <text:p>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63561117916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1">
            <text:p>311001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6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15">
            <text:p>0,037</text:p>
          </table:table-cell>
          <table:table-cell table:style-name="ce12N2" office:value-type="float" office:value="28.12">
            <text:p>28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7.28">
            <text:p>2087,28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78">
            <text:p>18,7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173.12">
            <text:p>17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61144150000678550010012865941545236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3">
            <text:p>311003</text:p>
          </table:table-cell>
          <table:table-cell table:style-name="ce0" table:number-columns-spanned="4" table:number-rows-spanned="1" office:value-type="string" calcext:value-type="string">
            <text:p>5.023 - TARKETT BRASIL REVESTIMENTOS LTDA</text:p>
          </table:table-cell>
          <table:covered-table-cell table:number-columns-repeated="3"/>
          <table:table-cell table:style-name="ce0" office:value-type="string" calcext:value-type="string">
            <text:p>486.5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7.75">
            <text:p>383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37.75">
            <text:p>3837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37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38.97">
            <text:p>3238,97</text:p>
          </table:table-cell>
          <table:table-cell table:style-name="ce12N2" office:value-type="float" office:value="3.24">
            <text:p>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15">
            <text:p>29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37.75">
            <text:p>3837,75</text:p>
          </table:table-cell>
          <table:table-cell table:style-name="ce12N2" office:value-type="float" office:value="268.64">
            <text:p>26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94.46">
            <text:p>29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270.973</text:p>
          </table:table-cell>
          <table:table-cell table:style-name="ce0" office:value-type="string" calcext:value-type="string">
            <text:p>12.068 - ABM LOGISTICA LTDA</text:p>
          </table:table-cell>
          <table:table-cell table:style-name="ce0" office:value-type="string" calcext:value-type="string">
            <text:p>16/07/2026</text:p>
          </table:table-cell>
          <table:table-cell table:style-name="ce12" office:value-type="string" calcext:value-type="string">
            <text:p>294,46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35260761452199000345550010004865771624378045</text:p>
          </table:table-cell>
          <table:table-cell table:style-name="ce0" office:value-type="string" calcext:value-type="string">
            <text:p>3526071791090900026057002000270973100036520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68">
            <text:p>31106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4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734">
            <text:p>0,019</text:p>
          </table:table-cell>
          <table:table-cell table:style-name="ce12N2" office:value-type="float" office:value="10.35">
            <text:p>1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49">
            <text:p>75,49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5.68">
            <text:p>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43514321270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7">
            <text:p>311167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.107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1.09">
            <text:p>347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471.09">
            <text:p>3471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04">
            <text:p>0,140</text:p>
          </table:table-cell>
          <table:table-cell table:style-name="ce12N2" office:value-type="float" office:value="369">
            <text:p>3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1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9.52">
            <text:p>2929,52</text:p>
          </table:table-cell>
          <table:table-cell table:style-name="ce12N2" office:value-type="float" office:value="2.94">
            <text:p>2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37">
            <text:p>26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71.09">
            <text:p>3471,09</text:p>
          </table:table-cell>
          <table:table-cell table:style-name="ce12N2" office:value-type="float" office:value="242.98">
            <text:p>24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110717678035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8">
            <text:p>311178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8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4.85">
            <text:p>1139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11283.98">
            <text:p>1128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3484">
            <text:p>0,443</text:p>
          </table:table-cell>
          <table:table-cell table:style-name="ce12N2" office:value-type="float" office:value="47.56">
            <text:p>47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9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01.87">
            <text:p>9601,87</text:p>
          </table:table-cell>
          <table:table-cell table:style-name="ce12N2" office:value-type="float" office:value="9.61">
            <text:p>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42">
            <text:p>86,42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10.87">
            <text:p>110,87</text:p>
          </table:table-cell>
          <table:table-cell table:style-name="ce12N2" office:value-type="float" office:value="11283.98">
            <text:p>11283,98</text:p>
          </table:table-cell>
          <table:table-cell table:style-name="ce12N2" office:value-type="float" office:value="703.42">
            <text:p>70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805818230304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3">
            <text:p>3111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9.31">
            <text:p>83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08">
            <text:p>78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84">
            <text:p>0,017</text:p>
          </table:table-cell>
          <table:table-cell table:style-name="ce12N2" office:value-type="float" office:value="5.91">
            <text:p>5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5.12">
            <text:p>665,12</text:p>
          </table:table-cell>
          <table:table-cell table:style-name="ce12N2" office:value-type="float" office:value="0.67">
            <text:p>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99">
            <text:p>5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1.23">
            <text:p>51,23</text:p>
          </table:table-cell>
          <table:table-cell table:style-name="ce12N2" office:value-type="float" office:value="788.08">
            <text:p>788,08</text:p>
          </table:table-cell>
          <table:table-cell table:style-name="ce12N2" office:value-type="float" office:value="55.17">
            <text:p>55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11468737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4">
            <text:p>3111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3.18">
            <text:p>72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9.04">
            <text:p>67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6">
            <text:p>0,005</text:p>
          </table:table-cell>
          <table:table-cell table:style-name="ce12N2" office:value-type="float" office:value="2.25">
            <text:p>2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3.1">
            <text:p>573,10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6">
            <text:p>5,1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44.14">
            <text:p>44,14</text:p>
          </table:table-cell>
          <table:table-cell table:style-name="ce12N2" office:value-type="float" office:value="679.04">
            <text:p>679,04</text:p>
          </table:table-cell>
          <table:table-cell table:style-name="ce12N2" office:value-type="float" office:value="47.53">
            <text:p>4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21530067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2">
            <text:p>31123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76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1.05">
            <text:p>497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725.64">
            <text:p>4725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08">
            <text:p>0,020</text:p>
          </table:table-cell>
          <table:table-cell table:style-name="ce12N2" office:value-type="float" office:value="5.02">
            <text:p>5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1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6.98">
            <text:p>4116,98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05">
            <text:p>37,05</text:p>
          </table:table-cell>
          <table:table-cell table:style-name="ce12N2" office:value-type="float" office:value="54.62">
            <text:p>54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45.41">
            <text:p>245,41</text:p>
          </table:table-cell>
          <table:table-cell table:style-name="ce12N2" office:value-type="float" office:value="4725.64">
            <text:p>4725,64</text:p>
          </table:table-cell>
          <table:table-cell table:style-name="ce12N2" office:value-type="float" office:value="189.03">
            <text:p>18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7621352432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2">
            <text:p>311262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79.20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4.78">
            <text:p>131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80.84">
            <text:p>128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1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8.81">
            <text:p>1188,81</text:p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7">
            <text:p>10,7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3.94">
            <text:p>33,94</text:p>
          </table:table-cell>
          <table:table-cell table:style-name="ce12N2" office:value-type="float" office:value="1314.78">
            <text:p>1314,78</text:p>
          </table:table-cell>
          <table:table-cell table:style-name="ce12N2" office:value-type="float" office:value="92.03">
            <text:p>9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15224600001285500500077920912186519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7">
            <text:p>31127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4.23">
            <text:p>433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97.8">
            <text:p>419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3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42.83">
            <text:p>3542,83</text:p>
          </table:table-cell>
          <table:table-cell table:style-name="ce12N2" office:value-type="float" office:value="3.54">
            <text:p>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89">
            <text:p>31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36.43">
            <text:p>136,43</text:p>
          </table:table-cell>
          <table:table-cell table:style-name="ce12N2" office:value-type="float" office:value="4197.8">
            <text:p>4197,80</text:p>
          </table:table-cell>
          <table:table-cell table:style-name="ce12N2" office:value-type="float" office:value="293.85">
            <text:p>29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61690243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07">
            <text:p>31130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27.2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.56">
            <text:p>24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44.56">
            <text:p>24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.56">
            <text:p>244,56</text:p>
          </table:table-cell>
          <table:table-cell table:style-name="ce12N2" office:value-type="float" office:value="17.12">
            <text:p>1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80003272541391234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16">
            <text:p>31131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9.1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4.69">
            <text:p>173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80.58">
            <text:p>158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04">
            <text:p>0,047</text:p>
          </table:table-cell>
          <table:table-cell table:style-name="ce12N2" office:value-type="float" office:value="5.05">
            <text:p>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34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9.67">
            <text:p>1459,67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4">
            <text:p>13,14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54.11">
            <text:p>154,11</text:p>
          </table:table-cell>
          <table:table-cell table:style-name="ce12N2" office:value-type="float" office:value="1580.58">
            <text:p>1580,58</text:p>
          </table:table-cell>
          <table:table-cell table:style-name="ce12N2" office:value-type="float" office:value="63.22">
            <text:p>6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248556330001405500100007911016882363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92">
            <text:p>311392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7.5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20.81">
            <text:p>192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61.88">
            <text:p>17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.8">
            <text:p>1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20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8.74">
            <text:p>1578,74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2">
            <text:p>14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158.93">
            <text:p>158,93</text:p>
          </table:table-cell>
          <table:table-cell table:style-name="ce12N2" office:value-type="float" office:value="1761.88">
            <text:p>1761,88</text:p>
          </table:table-cell>
          <table:table-cell table:style-name="ce12N2" office:value-type="float" office:value="123.33">
            <text:p>12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5.28">
            <text:p>8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3.57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1/07/2026</text:p>
          </table:table-cell>
          <table:table-cell table:style-name="ce12" office:value-type="string" calcext:value-type="string">
            <text:p>85,28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35260712077181000133550030002275521274029328</text:p>
          </table:table-cell>
          <table:table-cell table:style-name="ce0" office:value-type="string" calcext:value-type="string">
            <text:p>3526071138956500020057005000403572100090072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93">
            <text:p>311393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7.55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.95">
            <text:p>99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.07">
            <text:p>9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.61">
            <text:p>81,61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3">
            <text:p>0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8.88">
            <text:p>8,88</text:p>
          </table:table-cell>
          <table:table-cell table:style-name="ce12N2" office:value-type="float" office:value="91.07">
            <text:p>91,07</text:p>
          </table:table-cell>
          <table:table-cell table:style-name="ce12N2" office:value-type="float" office:value="6.37">
            <text:p>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3.57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1/07/2026</text:p>
          </table:table-cell>
          <table:table-cell table:style-name="ce12" office:value-type="string" calcext:value-type="string">
            <text:p>4,44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35260712077181000133550030002275511792351556</text:p>
          </table:table-cell>
          <table:table-cell table:style-name="ce0" office:value-type="string" calcext:value-type="string">
            <text:p>3526071138956500020057005000403572100090072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95">
            <text:p>31139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50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7.37">
            <text:p>410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">
            <text:p>107,00</text:p>
          </table:table-cell>
          <table:table-cell table:style-name="ce12N2" office:value-type="float" office:value="3875.3">
            <text:p>387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29545">
            <text:p>1,330</text:p>
          </table:table-cell>
          <table:table-cell table:style-name="ce12N2" office:value-type="float" office:value="10.45">
            <text:p>1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0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7.81">
            <text:p>3657,81</text:p>
          </table:table-cell>
          <table:table-cell table:style-name="ce12N2" office:value-type="float" office:value="3.64">
            <text:p>3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86">
            <text:p>32,8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232.07">
            <text:p>232,07</text:p>
          </table:table-cell>
          <table:table-cell table:style-name="ce12N2" office:value-type="float" office:value="4107.37">
            <text:p>4107,37</text:p>
          </table:table-cell>
          <table:table-cell table:style-name="ce12N2" office:value-type="float" office:value="217.49">
            <text:p>21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50214087630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08">
            <text:p>311408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93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5.27">
            <text:p>1485,27</text:p>
          </table:table-cell>
          <table:table-cell table:style-name="ce12N2" office:value-type="float" office:value="1.49">
            <text:p>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123.19">
            <text:p>12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70373920001805500300001093012970726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91">
            <text:p>3114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6.28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6.66">
            <text:p>151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16.66">
            <text:p>1516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5">
            <text:p>0,009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1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0.02">
            <text:p>1280,02</text:p>
          </table:table-cell>
          <table:table-cell table:style-name="ce12N2" office:value-type="float" office:value="1.28">
            <text:p>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52">
            <text:p>11,5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16.66">
            <text:p>1516,66</text:p>
          </table:table-cell>
          <table:table-cell table:style-name="ce12N2" office:value-type="float" office:value="106.17">
            <text:p>10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62881480035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6">
            <text:p>2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713.1">
            <text:p>1713,10</text:p>
          </table:table-cell>
          <table:table-cell table:style-name="ce26N2" office:value-type="float" office:value="61588.36">
            <text:p>61588,36</text:p>
          </table:table-cell>
          <table:table-cell table:style-name="ce26N2" office:value-type="float" office:value="3782.94">
            <text:p>3782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84.18">
            <text:p>384,18</text:p>
          </table:table-cell>
          <table:table-cell table:style-name="ce26N2" office:value-type="float" office:value="63055.45">
            <text:p>63055,4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.829831">
            <text:p>3,830</text:p>
          </table:table-cell>
          <table:table-cell table:style-name="ce26N2" office:value-type="float" office:value="61342.35">
            <text:p>61342,35</text:p>
          </table:table-cell>
          <table:table-cell table:style-name="ce26N2" office:value-type="float" office:value="63055.45">
            <text:p>63055,4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2814.78">
            <text:p>52814,78</text:p>
          </table:table-cell>
          <table:table-cell table:style-name="ce26N2" office:value-type="float" office:value="52.83">
            <text:p>52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75.29">
            <text:p>475,2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001.92">
            <text:p>1001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.69">
            <text:p>41,6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78" meta:object-count="0"/>
    <meta:generator>LibreOffice/4.3.0.4$Windows_x86 LibreOffice_project/62ad5818884a2fc2e5780dd45466868d41009ec0</meta:generator>
  </office:meta>
</office:document-meta>
</file>