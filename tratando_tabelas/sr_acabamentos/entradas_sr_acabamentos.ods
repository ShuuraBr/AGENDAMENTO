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4/05/2026 07:28:1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9">
            <text:p>306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4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29.71">
            <text:p>2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41648435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5">
            <text:p>3064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6.35">
            <text:p>391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72">
            <text:p>0,03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54.03">
            <text:p>154,03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263.36">
            <text:p>2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1151642868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9">
            <text:p>3066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71396106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0">
            <text:p>3066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46">
            <text:p>35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4">
            <text:p>0,000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23.43">
            <text:p>2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81366796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1">
            <text:p>3066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5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91770168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2">
            <text:p>306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.02">
            <text:p>7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44.92">
            <text:p>44,92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01118430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3">
            <text:p>3066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56.07">
            <text:p>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1151541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4">
            <text:p>306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216172472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5">
            <text:p>306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5.65">
            <text:p>100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1.37">
            <text:p>61,37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66.1">
            <text:p>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3135646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6">
            <text:p>3066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.59">
            <text:p>1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36">
            <text:p>0,0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.29">
            <text:p>10,29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41281024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7">
            <text:p>3066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512016082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8">
            <text:p>3066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61437548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9">
            <text:p>30668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95.71">
            <text:p>2489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9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639.71">
            <text:p>2639,71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890.23">
            <text:p>89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3321433515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0">
            <text:p>3066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4">
            <text:p>0,000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71452555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1">
            <text:p>3066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814514302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8">
            <text:p>3066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1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312.73">
            <text:p>31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1971064436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50">
            <text:p>3067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3.38">
            <text:p>53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383.38">
            <text:p>538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9438">
            <text:p>0,519</text:p>
          </table:table-cell>
          <table:table-cell table:style-name="ce12N2" office:value-type="float" office:value="183.76">
            <text:p>18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83.38">
            <text:p>5383,38</text:p>
          </table:table-cell>
          <table:table-cell table:style-name="ce12N2" office:value-type="float" office:value="215.33">
            <text:p>21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371061182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5">
            <text:p>306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5991815162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6">
            <text:p>306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9.86">
            <text:p>278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122">
            <text:p>0,029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6.44">
            <text:p>46,44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192.04">
            <text:p>19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01278295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7">
            <text:p>3067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5">
            <text:p>0,033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11538303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8">
            <text:p>306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7.81">
            <text:p>67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88">
            <text:p>0,03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21368995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0">
            <text:p>306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.98">
            <text:p>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228">
            <text:p>0,031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1.54">
            <text:p>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31796922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5">
            <text:p>306825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698.87">
            <text:p>756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">
            <text:p>55,00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00605">
            <text:p>4,401</text:p>
          </table:table-cell>
          <table:table-cell table:style-name="ce12N2" office:value-type="float" office:value="623.56">
            <text:p>62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69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27.27">
            <text:p>4427,27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3720.23">
            <text:p>372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33171531710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1">
            <text:p>306851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7.87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2">
            <text:p>0,015</text:p>
          </table:table-cell>
          <table:table-cell table:style-name="ce12N2" office:value-type="float" office:value="10.8">
            <text:p>1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787417051299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5">
            <text:p>306855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0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8.19">
            <text:p>736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9575">
            <text:p>0,400</text:p>
          </table:table-cell>
          <table:table-cell table:style-name="ce12N2" office:value-type="float" office:value="186.98">
            <text:p>186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6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512.74">
            <text:p>51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04401515494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9">
            <text:p>3069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368.99">
            <text:p>36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1151680457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2">
            <text:p>3069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156.37">
            <text:p>15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28174546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1">
            <text:p>30697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6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1.94">
            <text:p>976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9686.39">
            <text:p>968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854">
            <text:p>0,341</text:p>
          </table:table-cell>
          <table:table-cell table:style-name="ce12N2" office:value-type="float" office:value="55.47">
            <text:p>55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1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75.55">
            <text:p>75,55</text:p>
          </table:table-cell>
          <table:table-cell table:style-name="ce12N2" office:value-type="float" office:value="9686.39">
            <text:p>9686,39</text:p>
          </table:table-cell>
          <table:table-cell table:style-name="ce12N2" office:value-type="float" office:value="633.74">
            <text:p>6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62611177625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38">
            <text:p>30703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1.28">
            <text:p>421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799.7">
            <text:p>3799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92">
            <text:p>0,127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63">
            <text:p>40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411.58">
            <text:p>411,58</text:p>
          </table:table-cell>
          <table:table-cell table:style-name="ce12N2" office:value-type="float" office:value="3799.7">
            <text:p>3799,70</text:p>
          </table:table-cell>
          <table:table-cell table:style-name="ce12N2" office:value-type="float" office:value="151.98">
            <text:p>15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386166632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9">
            <text:p>30704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.72">
            <text:p>1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5.52">
            <text:p>15,52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61727013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1">
            <text:p>307051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13.56">
            <text:p>741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1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658.61">
            <text:p>658,61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468.39">
            <text:p>46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51314694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5">
            <text:p>307055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0.9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2.07">
            <text:p>253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024">
            <text:p>0,076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24.95">
            <text:p>224,95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161.49">
            <text:p>16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3068580001535500100007092612378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3">
            <text:p>307083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4.47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3.88">
            <text:p>11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6.06">
            <text:p>106,06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43.51">
            <text:p>4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95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5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35260510599342000123550020001044791920149108</text:p>
          </table:table-cell>
          <table:table-cell table:style-name="ce0" office:value-type="string" calcext:value-type="string">
            <text:p>3526051138956500020057005000398950100085203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4">
            <text:p>3070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.66">
            <text:p>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276">
            <text:p>0,134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81473767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5">
            <text:p>3070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18.54">
            <text:p>1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91044656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6">
            <text:p>3070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01438231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00">
            <text:p>30710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31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">
            <text:p>0,216</text:p>
          </table:table-cell>
          <table:table-cell table:style-name="ce12N2" office:value-type="float" office:value="91.2">
            <text:p>9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263.78">
            <text:p>26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3101130982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1">
            <text:p>3071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1.26">
            <text:p>117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916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4.05">
            <text:p>104,05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74.7">
            <text:p>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89177323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0">
            <text:p>3071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01599979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2">
            <text:p>30718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.81">
            <text:p>153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038">
            <text:p>0,108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4.55">
            <text:p>44,55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21860830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6">
            <text:p>307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91.61">
            <text:p>1539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9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367.36">
            <text:p>1367,36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981.71">
            <text:p>9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17010026117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9">
            <text:p>30720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7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7.78">
            <text:p>186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85.3">
            <text:p>16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5">
            <text:p>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82.48">
            <text:p>182,48</text:p>
          </table:table-cell>
          <table:table-cell table:style-name="ce12N2" office:value-type="float" office:value="1685.3">
            <text:p>1685,30</text:p>
          </table:table-cell>
          <table:table-cell table:style-name="ce12N2" office:value-type="float" office:value="67.41">
            <text:p>6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3974118512744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1">
            <text:p>307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28">
            <text:p>376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6658">
            <text:p>0,537</text:p>
          </table:table-cell>
          <table:table-cell table:style-name="ce12N2" office:value-type="float" office:value="34.56">
            <text:p>3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69.9">
            <text:p>169,9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143.94">
            <text:p>14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413226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2">
            <text:p>307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01584930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4">
            <text:p>307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41533961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9">
            <text:p>307269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09.52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">
            <text:p>32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8.05">
            <text:p>1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56">
            <text:p>156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09529190859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3">
            <text:p>30727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05.98">
            <text:p>770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8516">
            <text:p>0,439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0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797.63">
            <text:p>797,63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358.82">
            <text:p>3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266150185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6">
            <text:p>3072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97">
            <text:p>52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68">
            <text:p>0,01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.91">
            <text:p>31,91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34.38">
            <text:p>3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6106740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7">
            <text:p>3072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14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51121039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0">
            <text:p>30728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5.63">
            <text:p>238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166476">
            <text:p>20,166</text:p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.93">
            <text:p>43,9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79">
            <text:p>170,79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88.59">
            <text:p>8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712791756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1">
            <text:p>30728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62.99">
            <text:p>476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62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63">
            <text:p>58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16.99">
            <text:p>216,99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181.84">
            <text:p>18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8153458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74">
            <text:p>7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12910.57">
            <text:p>12910,57</text:p>
          </table:table-cell>
          <table:table-cell table:style-name="ce26N2" office:value-type="float" office:value="280532.35">
            <text:p>280532,35</text:p>
          </table:table-cell>
          <table:table-cell table:style-name="ce26N2" office:value-type="float" office:value="15886.61">
            <text:p>15886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293442.92">
            <text:p>293442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2.83966">
            <text:p>32,840</text:p>
          </table:table-cell>
          <table:table-cell table:style-name="ce26N2" office:value-type="float" office:value="280432.35">
            <text:p>280432,35</text:p>
          </table:table-cell>
          <table:table-cell table:style-name="ce26N2" office:value-type="float" office:value="293442.92">
            <text:p>293442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107.36">
            <text:p>3107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.12">
            <text:p>45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38" meta:object-count="0"/>
    <meta:generator>LibreOffice/4.3.0.4$Windows_x86 LibreOffice_project/62ad5818884a2fc2e5780dd45466868d41009ec0</meta:generator>
  </office:meta>
</office:document-meta>
</file>