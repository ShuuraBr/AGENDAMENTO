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5/05/2026 07:37:3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2">
            <text:p>3072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57">
            <text:p>0,002</text:p>
          </table:table-cell>
          <table:table-cell table:style-name="ce12N2" office:value-type="float" office:value="2.43">
            <text:p>2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1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1.96">
            <text:p>461,96</text:p>
          </table:table-cell>
          <table:table-cell table:style-name="ce12N2" office:value-type="float" office:value="18.48">
            <text:p>1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01584930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1">
            <text:p>30731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.07">
            <text:p>44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4454">
            <text:p>0,134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7.23">
            <text:p>27,23</text:p>
          </table:table-cell>
          <table:table-cell table:style-name="ce12N2" office:value-type="float" office:value="418.84">
            <text:p>418,84</text:p>
          </table:table-cell>
          <table:table-cell table:style-name="ce12N2" office:value-type="float" office:value="23.54">
            <text:p>2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812284640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2">
            <text:p>3073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.43">
            <text:p>27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64">
            <text:p>0,1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6.69">
            <text:p>16,69</text:p>
          </table:table-cell>
          <table:table-cell table:style-name="ce12N2" office:value-type="float" office:value="256.74">
            <text:p>256,74</text:p>
          </table:table-cell>
          <table:table-cell table:style-name="ce12N2" office:value-type="float" office:value="10.27">
            <text:p>1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71206775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3">
            <text:p>3073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09.61">
            <text:p>420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1828">
            <text:p>0,472</text:p>
          </table:table-cell>
          <table:table-cell table:style-name="ce12N2" office:value-type="float" office:value="7.22">
            <text:p>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0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56.93">
            <text:p>256,93</text:p>
          </table:table-cell>
          <table:table-cell table:style-name="ce12N2" office:value-type="float" office:value="3952.68">
            <text:p>3952,68</text:p>
          </table:table-cell>
          <table:table-cell table:style-name="ce12N2" office:value-type="float" office:value="158.11">
            <text:p>15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71596208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4">
            <text:p>3073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.26">
            <text:p>50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3032">
            <text:p>0,123</text:p>
          </table:table-cell>
          <table:table-cell table:style-name="ce12N2" office:value-type="float" office:value="4.49">
            <text:p>4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0.6">
            <text:p>30,60</text:p>
          </table:table-cell>
          <table:table-cell table:style-name="ce12N2" office:value-type="float" office:value="470.66">
            <text:p>470,66</text:p>
          </table:table-cell>
          <table:table-cell table:style-name="ce12N2" office:value-type="float" office:value="18.82">
            <text:p>1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61221787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5">
            <text:p>3073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194.87">
            <text:p>1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901908194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6">
            <text:p>307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7.67">
            <text:p>296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81.13">
            <text:p>181,13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195.06">
            <text:p>1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81888143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1">
            <text:p>307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.4">
            <text:p>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32">
            <text:p>0,033</text:p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28.3">
            <text:p>2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8201370188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3">
            <text:p>307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71.66">
            <text:p>7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957119333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3">
            <text:p>30735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3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6.41">
            <text:p>220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42">
            <text:p>1942,0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6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79.41">
            <text:p>179,41</text:p>
          </table:table-cell>
          <table:table-cell table:style-name="ce12N2" office:value-type="float" office:value="2027">
            <text:p>2027,00</text:p>
          </table:table-cell>
          <table:table-cell table:style-name="ce12N2" office:value-type="float" office:value="81.07">
            <text:p>8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32181828516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0">
            <text:p>307370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8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.81">
            <text:p>683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56">
            <text:p>0,0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3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60.75">
            <text:p>60,75</text:p>
          </table:table-cell>
          <table:table-cell table:style-name="ce12N2" office:value-type="float" office:value="623.06">
            <text:p>623,06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94416000195550010000482621000254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5">
            <text:p>307375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1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06">
            <text:p>887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19">
            <text:p>44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982.14">
            <text:p>982,14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9061002619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8">
            <text:p>30737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9.96">
            <text:p>136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352">
            <text:p>0,122</text:p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0.66">
            <text:p>20,66</text:p>
          </table:table-cell>
          <table:table-cell table:style-name="ce12N2" office:value-type="float" office:value="1349.3">
            <text:p>1349,30</text:p>
          </table:table-cell>
          <table:table-cell table:style-name="ce12N2" office:value-type="float" office:value="94.45">
            <text:p>9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60215608568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1">
            <text:p>307391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.36">
            <text:p>93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83.36">
            <text:p>83,36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59.85">
            <text:p>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.94">
            <text:p>1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8,9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5151057149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2">
            <text:p>307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13">
            <text:p>3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33.33">
            <text:p>33,33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23.93">
            <text:p>2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7,57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61111696979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7">
            <text:p>3073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8164452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2">
            <text:p>307402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49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72">
            <text:p>1,987</text:p>
          </table:table-cell>
          <table:table-cell table:style-name="ce12N2" office:value-type="float" office:value="5453.76">
            <text:p>545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0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1365.25">
            <text:p>136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4991623793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5">
            <text:p>30742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.5">
            <text:p>3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41.12">
            <text:p>4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791608989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6">
            <text:p>307426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">
            <text:p>0,024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.01">
            <text:p>46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53.49">
            <text:p>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801321349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3">
            <text:p>30746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5.43">
            <text:p>125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91.47">
            <text:p>91,47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81.47">
            <text:p>8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.34">
            <text:p>2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25,3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2133975568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0">
            <text:p>307470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10.50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5.23">
            <text:p>253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">
            <text:p>14,00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25.23">
            <text:p>225,23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92.4">
            <text:p>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105011217621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2">
            <text:p>30747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8.23">
            <text:p>24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4932">
            <text:p>0,245</text:p>
          </table:table-cell>
          <table:table-cell table:style-name="ce12N2" office:value-type="float" office:value="21.65">
            <text:p>2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">
            <text:p>1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.33">
            <text:p>17,33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164.1">
            <text:p>16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9831576786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5">
            <text:p>3074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8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36">
            <text:p>0,001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234.61">
            <text:p>23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85115209129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1">
            <text:p>307501</text:p>
          </table:table-cell>
          <table:table-cell table:style-name="ce0" table:number-columns-spanned="4" table:number-rows-spanned="1" office:value-type="string" calcext:value-type="string">
            <text:p>38.599 - S&amp;L IMPORTS COMERCIO DE IMPORTACAO E EXPORTACAO DE PRODUTOS</text:p>
          </table:table-cell>
          <table:covered-table-cell table:number-columns-repeated="3"/>
          <table:table-cell table:style-name="ce0" office:value-type="string" calcext:value-type="string">
            <text:p>19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.64">
            <text:p>96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5.3">
            <text:p>87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6">
            <text:p>0,0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85.34">
            <text:p>85,34</text:p>
          </table:table-cell>
          <table:table-cell table:style-name="ce12N2" office:value-type="float" office:value="875.3">
            <text:p>875,30</text:p>
          </table:table-cell>
          <table:table-cell table:style-name="ce12N2" office:value-type="float" office:value="35.01">
            <text:p>3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3765312000145550010000197501000329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6">
            <text:p>30750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0.14">
            <text:p>598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80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438.17">
            <text:p>438,17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387.94">
            <text:p>38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0.72">
            <text:p>1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20,72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11055606702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40">
            <text:p>307540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6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01">
            <text:p>0,005</text:p>
          </table:table-cell>
          <table:table-cell table:style-name="ce12N2" office:value-type="float" office:value="5.95">
            <text:p>5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33">
            <text:p>6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66">
            <text:p>4412,66</text:p>
          </table:table-cell>
          <table:table-cell table:style-name="ce12N2" office:value-type="float" office:value="176.5">
            <text:p>1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05104359000122550010000046901793546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0">
            <text:p>3075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212837875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1">
            <text:p>3075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31188671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3">
            <text:p>3075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.07">
            <text:p>14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12.6">
            <text:p>1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115776628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7">
            <text:p>3075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21165316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1">
            <text:p>307591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42.74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4552">
            <text:p>0,255</text:p>
          </table:table-cell>
          <table:table-cell table:style-name="ce12N2" office:value-type="float" office:value="31.92">
            <text:p>3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1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180.78">
            <text:p>18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763720000171550050012427491309781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7">
            <text:p>3075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0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8.05">
            <text:p>256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8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64">
            <text:p>40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49.97">
            <text:p>249,97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162.27">
            <text:p>1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005141786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5">
            <text:p>307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1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0.85">
            <text:p>18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07">
            <text:p>0,02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8.53">
            <text:p>108,53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108.42">
            <text:p>1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1981980819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6">
            <text:p>30774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1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5.44">
            <text:p>289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638.21">
            <text:p>263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57.23">
            <text:p>257,23</text:p>
          </table:table-cell>
          <table:table-cell table:style-name="ce12N2" office:value-type="float" office:value="2638.21">
            <text:p>2638,21</text:p>
          </table:table-cell>
          <table:table-cell table:style-name="ce12N2" office:value-type="float" office:value="184.68">
            <text:p>18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.45">
            <text:p>5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65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5/2026</text:p>
          </table:table-cell>
          <table:table-cell table:style-name="ce12" office:value-type="string" calcext:value-type="string">
            <text:p>58,45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5260512077181000133550030002251601890733055</text:p>
          </table:table-cell>
          <table:table-cell table:style-name="ce0" office:value-type="string" calcext:value-type="string">
            <text:p>3526051138956500020057005000399655100085923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0">
            <text:p>307750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5.6">
            <text:p>237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75.6">
            <text:p>237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96">
            <text:p>0,160</text:p>
          </table:table-cell>
          <table:table-cell table:style-name="ce12N2" office:value-type="float" office:value="47.6">
            <text:p>4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5.6">
            <text:p>2375,60</text:p>
          </table:table-cell>
          <table:table-cell table:style-name="ce12N2" office:value-type="float" office:value="166.29">
            <text:p>16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31622272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1">
            <text:p>307751</text:p>
          </table:table-cell>
          <table:table-cell table:style-name="ce0" table:number-columns-spanned="4" table:number-rows-spanned="1" office:value-type="string" calcext:value-type="string">
            <text:p>28.765 - PLENA INDUSTRIA E COMERCIO DE ESQUADRIAS DE ALUMINIO LTDA</text:p>
          </table:table-cell>
          <table:covered-table-cell table:number-columns-repeated="3"/>
          <table:table-cell table:style-name="ce0" office:value-type="string" calcext:value-type="string">
            <text:p>46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6.47">
            <text:p>2546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6.47">
            <text:p>25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6">
            <text:p>0,232</text:p>
          </table:table-cell>
          <table:table-cell table:style-name="ce12N2" office:value-type="float" office:value="53.6">
            <text:p>5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6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6.47">
            <text:p>2546,47</text:p>
          </table:table-cell>
          <table:table-cell table:style-name="ce12N2" office:value-type="float" office:value="178.25">
            <text:p>17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0365014000162550010000461641450033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3">
            <text:p>307753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7.49">
            <text:p>527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8.85">
            <text:p>468,85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192.35">
            <text:p>19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631397264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8">
            <text:p>3077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12">
            <text:p>0,041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387.54">
            <text:p>38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4619490345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9">
            <text:p>3077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356.26">
            <text:p>35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1616748368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0">
            <text:p>30776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7.87">
            <text:p>252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350.19">
            <text:p>235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">
            <text:p>0,700</text:p>
          </table:table-cell>
          <table:table-cell table:style-name="ce12N2" office:value-type="float" office:value="145.8">
            <text:p>1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2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77.68">
            <text:p>177,68</text:p>
          </table:table-cell>
          <table:table-cell table:style-name="ce12N2" office:value-type="float" office:value="2350.19">
            <text:p>2350,19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6242510001515500100004659910003456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3">
            <text:p>307763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74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7.91">
            <text:p>433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81.12">
            <text:p>418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64">
            <text:p>0,021</text:p>
          </table:table-cell>
          <table:table-cell table:style-name="ce12N2" office:value-type="float" office:value="25.08">
            <text:p>2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7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92">
            <text:p>58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56.79">
            <text:p>156,79</text:p>
          </table:table-cell>
          <table:table-cell table:style-name="ce12N2" office:value-type="float" office:value="4181.12">
            <text:p>4181,12</text:p>
          </table:table-cell>
          <table:table-cell table:style-name="ce12N2" office:value-type="float" office:value="167.24">
            <text:p>16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7481664365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6">
            <text:p>30777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2">
            <text:p>0,00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4.62">
            <text:p>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71951809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0">
            <text:p>5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248.25">
            <text:p>5248,25</text:p>
          </table:table-cell>
          <table:table-cell table:style-name="ce26N2" office:value-type="float" office:value="122891.73">
            <text:p>122891,73</text:p>
          </table:table-cell>
          <table:table-cell table:style-name="ce26N2" office:value-type="float" office:value="7404.85">
            <text:p>7404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1.02">
            <text:p>231,02</text:p>
          </table:table-cell>
          <table:table-cell table:style-name="ce26N2" office:value-type="float" office:value="128139.98">
            <text:p>128139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9.842124">
            <text:p>19,842</text:p>
          </table:table-cell>
          <table:table-cell table:style-name="ce26N2" office:value-type="float" office:value="122806.73">
            <text:p>122806,73</text:p>
          </table:table-cell>
          <table:table-cell table:style-name="ce26N2" office:value-type="float" office:value="128139.98">
            <text:p>128139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048.99">
            <text:p>6048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.76">
            <text:p>44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50" meta:object-count="0"/>
    <meta:generator>LibreOffice/4.3.0.4$Windows_x86 LibreOffice_project/62ad5818884a2fc2e5780dd45466868d41009ec0</meta:generator>
  </office:meta>
</office:document-meta>
</file>