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3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00.725</text:p>
          </table:table-cell>
          <table:table-cell table:style-name="ce0" office:value-type="string" calcext:value-type="string">
            <text:p>2.123 - RG TRANSPORTES RODOVIARIOS LTDA</text:p>
          </table:table-cell>
          <table:table-cell table:style-name="ce0" office:value-type="string" calcext:value-type="string">
            <text:p>18/06/2026</text:p>
          </table:table-cell>
          <table:table-cell table:style-name="ce12" office:value-type="string" calcext:value-type="string">
            <text:p>200,00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>352606025924210001845700200010072519030615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9">
            <text:p>309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6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72">
            <text:p>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3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5.12">
            <text:p>1635,12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72">
            <text:p>14,7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135.62">
            <text:p>13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603141597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0">
            <text:p>3100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3.94">
            <text:p>493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46.1">
            <text:p>484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529">
            <text:p>0,031</text:p>
          </table:table-cell>
          <table:table-cell table:style-name="ce12N2" office:value-type="float" office:value="6.13">
            <text:p>6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3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99">
            <text:p>4089,99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1">
            <text:p>3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7.84">
            <text:p>87,84</text:p>
          </table:table-cell>
          <table:table-cell table:style-name="ce12N2" office:value-type="float" office:value="4846.1">
            <text:p>4846,10</text:p>
          </table:table-cell>
          <table:table-cell table:style-name="ce12N2" office:value-type="float" office:value="339.22">
            <text:p>33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71314958552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4">
            <text:p>3100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699.78">
            <text:p>3469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4230.49">
            <text:p>34230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804">
            <text:p>0,199</text:p>
          </table:table-cell>
          <table:table-cell table:style-name="ce12N2" office:value-type="float" office:value="31.62">
            <text:p>3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69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11.42">
            <text:p>28911,42</text:p>
          </table:table-cell>
          <table:table-cell table:style-name="ce12N2" office:value-type="float" office:value="28.9">
            <text:p>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22">
            <text:p>260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469.29">
            <text:p>469,29</text:p>
          </table:table-cell>
          <table:table-cell table:style-name="ce12N2" office:value-type="float" office:value="34230.49">
            <text:p>34230,49</text:p>
          </table:table-cell>
          <table:table-cell table:style-name="ce12N2" office:value-type="float" office:value="2372.09">
            <text:p>237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611544103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0">
            <text:p>3100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8">
            <text:p>0,001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.87">
            <text:p>273,87</text:p>
          </table:table-cell>
          <table:table-cell table:style-name="ce12N2" office:value-type="float" office:value="0.27">
            <text:p>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22.72">
            <text:p>2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711146552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5">
            <text:p>3100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2.7">
            <text:p>17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7.56">
            <text:p>161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04">
            <text:p>0,00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16">
            <text:p>1365,16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05.14">
            <text:p>105,14</text:p>
          </table:table-cell>
          <table:table-cell table:style-name="ce12N2" office:value-type="float" office:value="1617.56">
            <text:p>1617,56</text:p>
          </table:table-cell>
          <table:table-cell table:style-name="ce12N2" office:value-type="float" office:value="113.23">
            <text:p>11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731738547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7">
            <text:p>3100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5.99">
            <text:p>15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545.51">
            <text:p>1545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247">
            <text:p>0,024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4.36">
            <text:p>1304,36</text:p>
          </table:table-cell>
          <table:table-cell table:style-name="ce12N2" office:value-type="float" office:value="1.31">
            <text:p>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4">
            <text:p>11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0.48">
            <text:p>10,48</text:p>
          </table:table-cell>
          <table:table-cell table:style-name="ce12N2" office:value-type="float" office:value="1545.51">
            <text:p>1545,51</text:p>
          </table:table-cell>
          <table:table-cell table:style-name="ce12N2" office:value-type="float" office:value="108.17">
            <text:p>1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389171437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5">
            <text:p>310065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6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5.37">
            <text:p>1139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681.1">
            <text:p>10681,10</text:p>
          </table:table-cell>
          <table:table-cell table:style-name="ce12N2" office:value-type="float" office:value="494">
            <text:p>494,00</text:p>
          </table:table-cell>
          <table:table-cell table:style-name="ce12N3" office:value-type="float" office:value="0.00792">
            <text:p>0,008</text:p>
          </table:table-cell>
          <table:table-cell table:style-name="ce12N2" office:value-type="float" office:value="13.11">
            <text:p>13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5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20.94">
            <text:p>10020,94</text:p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19">
            <text:p>90,19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220.27">
            <text:p>220,27</text:p>
          </table:table-cell>
          <table:table-cell table:style-name="ce12N2" office:value-type="float" office:value="11175.1">
            <text:p>11175,10</text:p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4570742000329550010000106821048503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8">
            <text:p>31006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716">
            <text:p>0,002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3.45">
            <text:p>1033,45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47.45">
            <text:p>4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691623336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9">
            <text:p>31006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74">
            <text:p>0,003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5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47.03">
            <text:p>4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721198929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6">
            <text:p>31011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1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22.22">
            <text:p>1622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2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84.01">
            <text:p>13684,01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16">
            <text:p>123,16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97.93">
            <text:p>397,93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745.5">
            <text:p>74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308456000149550050004571091168026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0">
            <text:p>3101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4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08">
            <text:p>0,037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8.26">
            <text:p>1218,26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6">
            <text:p>1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101.04">
            <text:p>1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4881356718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3">
            <text:p>3101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5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">
            <text:p>0,000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.76">
            <text:p>86,76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586137303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5">
            <text:p>3101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84">
            <text:p>0,004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.41">
            <text:p>614,41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53">
            <text:p>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50.96">
            <text:p>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48197179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3">
            <text:p>3101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0.12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8">
            <text:p>0,021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4.79">
            <text:p>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01251878133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5">
            <text:p>310175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16.66">
            <text:p>5916,66</text:p>
          </table:table-cell>
          <table:table-cell table:style-name="ce12N2" office:value-type="float" office:value="1347.76">
            <text:p>1347,7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38.8">
            <text:p>67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1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78.63">
            <text:p>4978,63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8">
            <text:p>44,8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525.62">
            <text:p>525,62</text:p>
          </table:table-cell>
          <table:table-cell table:style-name="ce12N2" office:value-type="float" office:value="5391.04">
            <text:p>5391,04</text:p>
          </table:table-cell>
          <table:table-cell table:style-name="ce12N2" office:value-type="float" office:value="215.64">
            <text:p>21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7781412000109550010000120921000337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1">
            <text:p>3102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1.88">
            <text:p>831,88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49">
            <text:p>7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38.2">
            <text:p>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719741845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3">
            <text:p>31025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91072520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5">
            <text:p>31025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11234211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8">
            <text:p>31025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54.32">
            <text:p>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41665699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9">
            <text:p>31025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9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95">
            <text:p>0,121</text:p>
          </table:table-cell>
          <table:table-cell table:style-name="ce12N2" office:value-type="float" office:value="28.13">
            <text:p>28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22.76">
            <text:p>2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92281859672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1">
            <text:p>310311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10.6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.11">
            <text:p>160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461.61">
            <text:p>146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">
            <text:p>0,100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58">
            <text:p>1233,5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1">
            <text:p>11,11</text:p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2.5">
            <text:p>142,50</text:p>
          </table:table-cell>
          <table:table-cell table:style-name="ce12N2" office:value-type="float" office:value="1461.61">
            <text:p>1461,61</text:p>
          </table:table-cell>
          <table:table-cell table:style-name="ce12N2" office:value-type="float" office:value="102.31">
            <text:p>10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4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30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5260610713221000160550020000106861000146380</text:p>
          </table:table-cell>
          <table:table-cell table:style-name="ce0" office:value-type="string" calcext:value-type="string">
            <text:p>3526061138956500020057005000402240100088669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3">
            <text:p>310323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48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95.42">
            <text:p>163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30.82">
            <text:p>13830,82</text:p>
          </table:table-cell>
          <table:table-cell table:style-name="ce12N2" office:value-type="float" office:value="13.82">
            <text:p>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48">
            <text:p>124,48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1.13">
            <text:p>401,13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753.72">
            <text:p>75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308456000149550050004574841033848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6">
            <text:p>310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0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3.53">
            <text:p>21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53">
            <text:p>0,033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7.17">
            <text:p>1757,17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81">
            <text:p>15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145.74">
            <text:p>14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0271306783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9">
            <text:p>310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452">
            <text:p>0,014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8.8">
            <text:p>2008,80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08">
            <text:p>18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166.61">
            <text:p>16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820169358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6">
            <text:p>36,00</text:p>
          </table:table-cell>
          <table:table-cell table:style-name="ce26N2" office:value-type="float" office:value="1347.76">
            <text:p>1347,76</text:p>
          </table:table-cell>
          <table:table-cell table:style-name="ce26N2" office:value-type="float" office:value="804.5">
            <text:p>804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45.75">
            <text:p>2645,75</text:p>
          </table:table-cell>
          <table:table-cell table:style-name="ce26N2" office:value-type="float" office:value="129089.18">
            <text:p>129089,18</text:p>
          </table:table-cell>
          <table:table-cell table:style-name="ce26N2" office:value-type="float" office:value="7695.15">
            <text:p>7695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89.72">
            <text:p>289,72</text:p>
          </table:table-cell>
          <table:table-cell table:style-name="ce26N2" office:value-type="float" office:value="131882.43">
            <text:p>131882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56916">
            <text:p>3,569</text:p>
          </table:table-cell>
          <table:table-cell table:style-name="ce26N2" office:value-type="float" office:value="129779.94">
            <text:p>129779,94</text:p>
          </table:table-cell>
          <table:table-cell table:style-name="ce26N2" office:value-type="float" office:value="131882.43">
            <text:p>131882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6431.59">
            <text:p>106431,59</text:p>
          </table:table-cell>
          <table:table-cell table:style-name="ce26N2" office:value-type="float" office:value="106.42">
            <text:p>106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57.94">
            <text:p>957,9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184.96">
            <text:p>2184,9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.79">
            <text:p>44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38" meta:object-count="0"/>
    <meta:generator>LibreOffice/4.3.0.4$Windows_x86 LibreOffice_project/62ad5818884a2fc2e5780dd45466868d41009ec0</meta:generator>
  </office:meta>
</office:document-meta>
</file>