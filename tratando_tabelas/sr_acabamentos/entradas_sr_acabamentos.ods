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6/05/2026 04:30:3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01">
            <text:p>306701</text:p>
          </table:table-cell>
          <table:table-cell table:style-name="ce0" table:number-columns-spanned="4" table:number-rows-spanned="1" office:value-type="string" calcext:value-type="string">
            <text:p>36.025 - FRESNOMAQ INDUSTRIA DE MAQUINAS S/A</text:p>
          </table:table-cell>
          <table:covered-table-cell table:number-columns-repeated="3"/>
          <table:table-cell table:style-name="ce0" office:value-type="string" calcext:value-type="string">
            <text:p>59.9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656">
            <text:p>0,200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">
            <text:p>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0">
            <text:p>1320,00</text:p>
          </table:table-cell>
          <table:table-cell table:style-name="ce12N2" office:value-type="float" office:value="158.4">
            <text:p>1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6337280001186550010000599891874418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182">
            <text:p>30718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04.0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34.81">
            <text:p>153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038">
            <text:p>0,108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3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44.55">
            <text:p>44,55</text:p>
          </table:table-cell>
          <table:table-cell table:style-name="ce12N2" office:value-type="float" office:value="1490.26">
            <text:p>1490,26</text:p>
          </table:table-cell>
          <table:table-cell table:style-name="ce12N2" office:value-type="float" office:value="104.32">
            <text:p>1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0949528001232550010023040721860830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273">
            <text:p>307273</text:p>
          </table:table-cell>
          <table:table-cell table:style-name="ce0" table:number-columns-spanned="4" table:number-rows-spanned="1" office:value-type="string" calcext:value-type="string">
            <text:p>90 - TRAMONTINA TEEC S.A</text:p>
          </table:table-cell>
          <table:covered-table-cell table:number-columns-repeated="3"/>
          <table:table-cell table:style-name="ce0" office:value-type="string" calcext:value-type="string">
            <text:p>68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705.98">
            <text:p>770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38516">
            <text:p>0,439</text:p>
          </table:table-cell>
          <table:table-cell table:style-name="ce12N2" office:value-type="float" office:value="71.6">
            <text:p>7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70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5/2026</text:p>
          </table:table-cell>
          <table:table-cell table:style-name="ce12N2" office:value-type="float" office:value="797.63">
            <text:p>797,63</text:p>
          </table:table-cell>
          <table:table-cell table:style-name="ce12N2" office:value-type="float" office:value="6908.35">
            <text:p>6908,35</text:p>
          </table:table-cell>
          <table:table-cell table:style-name="ce12N2" office:value-type="float" office:value="358.82">
            <text:p>35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01554846000136550010006842661501852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17">
            <text:p>307317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8.16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27.12">
            <text:p>172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2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53.43">
            <text:p>153,43</text:p>
          </table:table-cell>
          <table:table-cell table:style-name="ce12N2" office:value-type="float" office:value="1573.69">
            <text:p>1573,69</text:p>
          </table:table-cell>
          <table:table-cell table:style-name="ce12N2" office:value-type="float" office:value="110.16">
            <text:p>11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24546165000393550040000981601962020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5">
            <text:p>3073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6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0.98">
            <text:p>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83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83.92">
            <text:p>2783,92</text:p>
          </table:table-cell>
          <table:table-cell table:style-name="ce12N2" office:value-type="float" office:value="194.87">
            <text:p>1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6901908194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26">
            <text:p>3073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7.67">
            <text:p>2967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7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181.13">
            <text:p>181,13</text:p>
          </table:table-cell>
          <table:table-cell table:style-name="ce12N2" office:value-type="float" office:value="2786.54">
            <text:p>2786,54</text:p>
          </table:table-cell>
          <table:table-cell table:style-name="ce12N2" office:value-type="float" office:value="195.06">
            <text:p>1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70818881438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1">
            <text:p>30733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7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6.4">
            <text:p>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832">
            <text:p>0,033</text:p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7.2">
            <text:p>7,20</text:p>
          </table:table-cell>
          <table:table-cell table:style-name="ce12N2" office:value-type="float" office:value="499.2">
            <text:p>499,20</text:p>
          </table:table-cell>
          <table:table-cell table:style-name="ce12N2" office:value-type="float" office:value="28.3">
            <text:p>2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78201370188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33">
            <text:p>3073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39.9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3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3.78">
            <text:p>1023,78</text:p>
          </table:table-cell>
          <table:table-cell table:style-name="ce12N2" office:value-type="float" office:value="71.66">
            <text:p>7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39957119333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75">
            <text:p>307375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1.9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73.06">
            <text:p>887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36">
            <text:p>0,006</text:p>
          </table:table-cell>
          <table:table-cell table:style-name="ce12N2" office:value-type="float" office:value="7.8">
            <text:p>7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7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19">
            <text:p>44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982.14">
            <text:p>982,14</text:p>
          </table:table-cell>
          <table:table-cell table:style-name="ce12N2" office:value-type="float" office:value="7890.92">
            <text:p>7890,92</text:p>
          </table:table-cell>
          <table:table-cell table:style-name="ce12N2" office:value-type="float" office:value="552.36">
            <text:p>55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83296080001445500100026190610026190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1">
            <text:p>307391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8.36">
            <text:p>93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83.36">
            <text:p>83,36</text:p>
          </table:table-cell>
          <table:table-cell table:style-name="ce12N2" office:value-type="float" office:value="855">
            <text:p>855,00</text:p>
          </table:table-cell>
          <table:table-cell table:style-name="ce12N2" office:value-type="float" office:value="59.85">
            <text:p>5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.94">
            <text:p>18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8,9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5151057149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2">
            <text:p>30739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5.13">
            <text:p>37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33.33">
            <text:p>33,33</text:p>
          </table:table-cell>
          <table:table-cell table:style-name="ce12N2" office:value-type="float" office:value="341.8">
            <text:p>341,80</text:p>
          </table:table-cell>
          <table:table-cell table:style-name="ce12N2" office:value-type="float" office:value="23.93">
            <text:p>2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7.57">
            <text:p>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7,57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861111696979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397">
            <text:p>3073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63">
            <text:p>0,010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2.92">
            <text:p>202,92</text:p>
          </table:table-cell>
          <table:table-cell table:style-name="ce12N2" office:value-type="float" office:value="14.2">
            <text:p>1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48164452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02">
            <text:p>307402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40.49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872">
            <text:p>1,987</text:p>
          </table:table-cell>
          <table:table-cell table:style-name="ce12N2" office:value-type="float" office:value="5453.76">
            <text:p>5453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0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03.54">
            <text:p>19503,54</text:p>
          </table:table-cell>
          <table:table-cell table:style-name="ce12N2" office:value-type="float" office:value="1365.25">
            <text:p>1365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400014049916237934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5">
            <text:p>307425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9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.5">
            <text:p>38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9.3">
            <text:p>1389,30</text:p>
          </table:table-cell>
          <table:table-cell table:style-name="ce12N2" office:value-type="float" office:value="41.12">
            <text:p>4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791608989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26">
            <text:p>307426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">
            <text:p>0,024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6.01">
            <text:p>46,0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7.1">
            <text:p>1807,10</text:p>
          </table:table-cell>
          <table:table-cell table:style-name="ce12N2" office:value-type="float" office:value="53.49">
            <text:p>5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1608100001615500100000738013213497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63">
            <text:p>307463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5.43">
            <text:p>125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5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91.47">
            <text:p>91,47</text:p>
          </table:table-cell>
          <table:table-cell table:style-name="ce12N2" office:value-type="float" office:value="1163.96">
            <text:p>1163,96</text:p>
          </table:table-cell>
          <table:table-cell table:style-name="ce12N2" office:value-type="float" office:value="81.47">
            <text:p>8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5.34">
            <text:p>2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25,34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21339755688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0">
            <text:p>307470</text:p>
          </table:table-cell>
          <table:table-cell table:style-name="ce0" table:number-columns-spanned="4" table:number-rows-spanned="1" office:value-type="string" calcext:value-type="string">
            <text:p>28.259 - IMD COMERCIO DE MOVEIS LTDA</text:p>
          </table:table-cell>
          <table:covered-table-cell table:number-columns-repeated="3"/>
          <table:table-cell table:style-name="ce0" office:value-type="string" calcext:value-type="string">
            <text:p>410.501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35.23">
            <text:p>253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">
            <text:p>14,00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35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76">
            <text:p>40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225.23">
            <text:p>225,23</text:p>
          </table:table-cell>
          <table:table-cell table:style-name="ce12N2" office:value-type="float" office:value="2310">
            <text:p>2310,00</text:p>
          </table:table-cell>
          <table:table-cell table:style-name="ce12N2" office:value-type="float" office:value="92.4">
            <text:p>9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3961151000447550060004105011217621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2">
            <text:p>30747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8.9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5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8.23">
            <text:p>24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4932">
            <text:p>0,245</text:p>
          </table:table-cell>
          <table:table-cell table:style-name="ce12N2" office:value-type="float" office:value="21.65">
            <text:p>2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3">
            <text:p>12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2410.9">
            <text:p>2410,90</text:p>
          </table:table-cell>
          <table:table-cell table:style-name="ce12N2" office:value-type="float" office:value="164.1">
            <text:p>16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9641520000158550010007589831576786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475">
            <text:p>3074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2.8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36">
            <text:p>0,001</text:p>
          </table:table-cell>
          <table:table-cell table:style-name="ce12N2" office:value-type="float" office:value="2.14">
            <text:p>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5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1.6">
            <text:p>3351,60</text:p>
          </table:table-cell>
          <table:table-cell table:style-name="ce12N2" office:value-type="float" office:value="234.61">
            <text:p>23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285115209129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06">
            <text:p>30750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96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5/2026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80.14">
            <text:p>5980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80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5/2026</text:p>
          </table:table-cell>
          <table:table-cell table:style-name="ce12N2" office:value-type="float" office:value="438.17">
            <text:p>438,17</text:p>
          </table:table-cell>
          <table:table-cell table:style-name="ce12N2" office:value-type="float" office:value="5541.97">
            <text:p>5541,97</text:p>
          </table:table-cell>
          <table:table-cell table:style-name="ce12N2" office:value-type="float" office:value="387.94">
            <text:p>3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20.72">
            <text:p>12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3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5/2026</text:p>
          </table:table-cell>
          <table:table-cell table:style-name="ce12" office:value-type="string" calcext:value-type="string">
            <text:p>120,72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35260512077181000133550030002249611055606702</text:p>
          </table:table-cell>
          <table:table-cell table:style-name="ce0" office:value-type="string" calcext:value-type="string">
            <text:p>3526051138956500020057005000399348100085616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0">
            <text:p>3075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212837875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1">
            <text:p>307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31188671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3">
            <text:p>307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5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1.07">
            <text:p>14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91">
            <text:p>91,00</text:p>
          </table:table-cell>
          <table:table-cell table:style-name="ce12N2" office:value-type="float" office:value="1400.07">
            <text:p>1400,07</text:p>
          </table:table-cell>
          <table:table-cell table:style-name="ce12N2" office:value-type="float" office:value="56">
            <text:p>5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57115776628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77">
            <text:p>307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85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5/2026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9">
            <text:p>0,008</text:p>
          </table:table-cell>
          <table:table-cell table:style-name="ce12N2" office:value-type="float" office:value="2.17">
            <text:p>2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5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5.13">
            <text:p>355,13</text:p>
          </table:table-cell>
          <table:table-cell table:style-name="ce12N2" office:value-type="float" office:value="14.21">
            <text:p>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190550010050856521165316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1">
            <text:p>307591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42.74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4552">
            <text:p>0,255</text:p>
          </table:table-cell>
          <table:table-cell table:style-name="ce12N2" office:value-type="float" office:value="31.92">
            <text:p>3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.67">
            <text:p>6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19.6">
            <text:p>4519,60</text:p>
          </table:table-cell>
          <table:table-cell table:style-name="ce12N2" office:value-type="float" office:value="180.78">
            <text:p>180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763720000171550050012427491309781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597">
            <text:p>307597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9.0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8.05">
            <text:p>2568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">
            <text:p>0,0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8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.64">
            <text:p>40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249.97">
            <text:p>249,97</text:p>
          </table:table-cell>
          <table:table-cell table:style-name="ce12N2" office:value-type="float" office:value="2318.08">
            <text:p>2318,08</text:p>
          </table:table-cell>
          <table:table-cell table:style-name="ce12N2" office:value-type="float" office:value="162.27">
            <text:p>1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941645900012055001000819005141786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605">
            <text:p>307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1.19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0.85">
            <text:p>18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807">
            <text:p>0,027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0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5/2026</text:p>
          </table:table-cell>
          <table:table-cell table:style-name="ce12N2" office:value-type="float" office:value="108.53">
            <text:p>108,53</text:p>
          </table:table-cell>
          <table:table-cell table:style-name="ce12N2" office:value-type="float" office:value="1772.32">
            <text:p>1772,32</text:p>
          </table:table-cell>
          <table:table-cell table:style-name="ce12N2" office:value-type="float" office:value="108.42">
            <text:p>10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5261813900281755003000871198198081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46">
            <text:p>307746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1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5.44">
            <text:p>289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257.23">
            <text:p>257,23</text:p>
          </table:table-cell>
          <table:table-cell table:style-name="ce12N2" office:value-type="float" office:value="2638.21">
            <text:p>2638,21</text:p>
          </table:table-cell>
          <table:table-cell table:style-name="ce12N2" office:value-type="float" office:value="184.68">
            <text:p>1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.45">
            <text:p>58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9.65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5/2026</text:p>
          </table:table-cell>
          <table:table-cell table:style-name="ce12" office:value-type="string" calcext:value-type="string">
            <text:p>58,45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35260512077181000133550030002251601890733055</text:p>
          </table:table-cell>
          <table:table-cell table:style-name="ce0" office:value-type="string" calcext:value-type="string">
            <text:p>3526051138956500020057005000399655100085923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3">
            <text:p>307753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77.49">
            <text:p>5277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77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468.85">
            <text:p>468,85</text:p>
          </table:table-cell>
          <table:table-cell table:style-name="ce12N2" office:value-type="float" office:value="4808.64">
            <text:p>4808,64</text:p>
          </table:table-cell>
          <table:table-cell table:style-name="ce12N2" office:value-type="float" office:value="192.35">
            <text:p>19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6313972643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8">
            <text:p>3077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412">
            <text:p>0,041</text:p>
          </table:table-cell>
          <table:table-cell table:style-name="ce12N2" office:value-type="float" office:value="2.6">
            <text:p>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53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36.28">
            <text:p>5536,28</text:p>
          </table:table-cell>
          <table:table-cell table:style-name="ce12N2" office:value-type="float" office:value="387.54">
            <text:p>38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461949034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59">
            <text:p>3077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5.2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9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9.36">
            <text:p>5089,36</text:p>
          </table:table-cell>
          <table:table-cell table:style-name="ce12N2" office:value-type="float" office:value="356.26">
            <text:p>35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521616748368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0">
            <text:p>30776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5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7.87">
            <text:p>252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">
            <text:p>0,700</text:p>
          </table:table-cell>
          <table:table-cell table:style-name="ce12N2" office:value-type="float" office:value="145.8">
            <text:p>14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2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77.68">
            <text:p>177,68</text:p>
          </table:table-cell>
          <table:table-cell table:style-name="ce12N2" office:value-type="float" office:value="2350.19">
            <text:p>2350,19</text:p>
          </table:table-cell>
          <table:table-cell table:style-name="ce12N2" office:value-type="float" office:value="109.84">
            <text:p>10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624251000151550010000465991000345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63">
            <text:p>30776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2.74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0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37.91">
            <text:p>4337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064">
            <text:p>0,021</text:p>
          </table:table-cell>
          <table:table-cell table:style-name="ce12N2" office:value-type="float" office:value="25.08">
            <text:p>2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37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.92">
            <text:p>58,9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156.79">
            <text:p>156,79</text:p>
          </table:table-cell>
          <table:table-cell table:style-name="ce12N2" office:value-type="float" office:value="4181.12">
            <text:p>4181,12</text:p>
          </table:table-cell>
          <table:table-cell table:style-name="ce12N2" office:value-type="float" office:value="167.24">
            <text:p>167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35635346000140550020001127481664365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776">
            <text:p>30777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52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2">
            <text:p>0,004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96">
            <text:p>65,96</text:p>
          </table:table-cell>
          <table:table-cell table:style-name="ce12N2" office:value-type="float" office:value="4.62">
            <text:p>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97837181002271550010021529571951809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70.64">
            <text:p>4570,64</text:p>
          </table:table-cell>
          <table:table-cell table:style-name="ce26N2" office:value-type="float" office:value="100957.66">
            <text:p>100957,66</text:p>
          </table:table-cell>
          <table:table-cell table:style-name="ce26N2" office:value-type="float" office:value="6248.98">
            <text:p>6248,9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31.02">
            <text:p>231,02</text:p>
          </table:table-cell>
          <table:table-cell table:style-name="ce26N2" office:value-type="float" office:value="105528.3">
            <text:p>10552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8.250904">
            <text:p>18,251</text:p>
          </table:table-cell>
          <table:table-cell table:style-name="ce26N2" office:value-type="float" office:value="100957.66">
            <text:p>100957,66</text:p>
          </table:table-cell>
          <table:table-cell table:style-name="ce26N2" office:value-type="float" office:value="105528.3">
            <text:p>105528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837.69">
            <text:p>5837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32">
            <text:p>4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0" meta:object-count="0"/>
    <meta:generator>LibreOffice/4.3.0.4$Windows_x86 LibreOffice_project/62ad5818884a2fc2e5780dd45466868d41009ec0</meta:generator>
  </office:meta>
</office:document-meta>
</file>