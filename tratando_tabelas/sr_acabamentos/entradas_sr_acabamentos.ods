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8/06/2026 07:17:5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0">
            <text:p>30846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2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7.06">
            <text:p>364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525">
            <text:p>0,105</text:p>
          </table:table-cell>
          <table:table-cell table:style-name="ce12N2" office:value-type="float" office:value="22.39">
            <text:p>22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4.11">
            <text:p>3094,11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86">
            <text:p>27,86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224.27">
            <text:p>2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2991740016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5">
            <text:p>30852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8.7">
            <text:p>915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34">
            <text:p>0,322</text:p>
          </table:table-cell>
          <table:table-cell table:style-name="ce12N2" office:value-type="float" office:value="38.36">
            <text:p>38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5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1.54">
            <text:p>7721,54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64">
            <text:p>6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22.8">
            <text:p>122,8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527.41">
            <text:p>52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111113861717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6">
            <text:p>308626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5.5">
            <text:p>1941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4002">
            <text:p>0,964</text:p>
          </table:table-cell>
          <table:table-cell table:style-name="ce12N2" office:value-type="float" office:value="94.1">
            <text:p>9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83.16">
            <text:p>16683,16</text:p>
          </table:table-cell>
          <table:table-cell table:style-name="ce12N2" office:value-type="float" office:value="16.72">
            <text:p>1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.17">
            <text:p>150,1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1.8">
            <text:p>71,80</text:p>
          </table:table-cell>
          <table:table-cell table:style-name="ce12N2" office:value-type="float" office:value="19343.7">
            <text:p>19343,70</text:p>
          </table:table-cell>
          <table:table-cell table:style-name="ce12N2" office:value-type="float" office:value="960.07">
            <text:p>9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51688803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1">
            <text:p>308851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2.21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844">
            <text:p>0,118</text:p>
          </table:table-cell>
          <table:table-cell table:style-name="ce12N2" office:value-type="float" office:value="236.84">
            <text:p>23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7.52">
            <text:p>3317,5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5">
            <text:p>29,85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0.83">
            <text:p>3930,83</text:p>
          </table:table-cell>
          <table:table-cell table:style-name="ce12N2" office:value-type="float" office:value="275.16">
            <text:p>27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00000022171469860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19">
            <text:p>309019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8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4.54">
            <text:p>578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3">
            <text:p>0,048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43">
            <text:p>47,43</text:p>
          </table:table-cell>
          <table:table-cell table:style-name="ce12N2" office:value-type="float" office:value="44.06">
            <text:p>44,0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13.89">
            <text:p>513,89</text:p>
          </table:table-cell>
          <table:table-cell table:style-name="ce12N2" office:value-type="float" office:value="5270.65">
            <text:p>5270,65</text:p>
          </table:table-cell>
          <table:table-cell table:style-name="ce12N2" office:value-type="float" office:value="368.94">
            <text:p>36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6.77">
            <text:p>11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06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1/06/2026</text:p>
          </table:table-cell>
          <table:table-cell table:style-name="ce12" office:value-type="string" calcext:value-type="string">
            <text:p>116,77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35260630228132000136550010000098901217910610</text:p>
          </table:table-cell>
          <table:table-cell table:style-name="ce0" office:value-type="string" calcext:value-type="string">
            <text:p>3526061138956500020057005000401063100087377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2">
            <text:p>309022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42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95.86">
            <text:p>59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13.79">
            <text:p>5213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42.25">
            <text:p>4542,25</text:p>
          </table:table-cell>
          <table:table-cell table:style-name="ce12N2" office:value-type="float" office:value="4.54">
            <text:p>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88">
            <text:p>40,88</text:p>
          </table:table-cell>
          <table:table-cell table:style-name="ce12N2" office:value-type="float" office:value="43.04">
            <text:p>43,0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782.07">
            <text:p>782,07</text:p>
          </table:table-cell>
          <table:table-cell table:style-name="ce12N2" office:value-type="float" office:value="5213.79">
            <text:p>5213,79</text:p>
          </table:table-cell>
          <table:table-cell table:style-name="ce12N2" office:value-type="float" office:value="208.55">
            <text:p>20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42514010284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2">
            <text:p>30903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52">
            <text:p>0,00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4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.66">
            <text:p>130,66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.82">
            <text:p>154,8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01721119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4">
            <text:p>3090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52">
            <text:p>0,00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98">
            <text:p>44,98</text:p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9471789578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8">
            <text:p>30905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3.34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6.18">
            <text:p>516,18</text:p>
          </table:table-cell>
          <table:table-cell table:style-name="ce12N2" office:value-type="float" office:value="0.52">
            <text:p>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5">
            <text:p>4,6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03">
            <text:p>555,03</text:p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334919439262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50">
            <text:p>3091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5.2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196">
            <text:p>0,126</text:p>
          </table:table-cell>
          <table:table-cell table:style-name="ce12N2" office:value-type="float" office:value="48">
            <text:p>4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17.47">
            <text:p>1817,47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35">
            <text:p>16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6.16">
            <text:p>2086,16</text:p>
          </table:table-cell>
          <table:table-cell table:style-name="ce12N2" office:value-type="float" office:value="83.45">
            <text:p>8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52151114842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4">
            <text:p>309214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9.12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7.06">
            <text:p>195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683.2">
            <text:p>16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95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4.23">
            <text:p>1514,23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63">
            <text:p>13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73.86">
            <text:p>173,86</text:p>
          </table:table-cell>
          <table:table-cell table:style-name="ce12N2" office:value-type="float" office:value="1783.2">
            <text:p>1783,20</text:p>
          </table:table-cell>
          <table:table-cell table:style-name="ce12N2" office:value-type="float" office:value="124.82">
            <text:p>1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4546165000393550040000991291328330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0">
            <text:p>3092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1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7.26">
            <text:p>1447,26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03">
            <text:p>13,0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14.81">
            <text:p>1714,81</text:p>
          </table:table-cell>
          <table:table-cell table:style-name="ce12N2" office:value-type="float" office:value="120.04">
            <text:p>12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1791667693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7">
            <text:p>309247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5.41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2.03">
            <text:p>138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59.26">
            <text:p>125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2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4.76">
            <text:p>1164,76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9">
            <text:p>10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2.77">
            <text:p>122,77</text:p>
          </table:table-cell>
          <table:table-cell table:style-name="ce12N2" office:value-type="float" office:value="1259.26">
            <text:p>1259,26</text:p>
          </table:table-cell>
          <table:table-cell table:style-name="ce12N2" office:value-type="float" office:value="50.37">
            <text:p>5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99342000123550020001054141184571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2">
            <text:p>30925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6.7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6.85">
            <text:p>116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66.12">
            <text:p>116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374">
            <text:p>0,094</text:p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6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4.18">
            <text:p>984,18</text:p>
          </table:table-cell>
          <table:table-cell table:style-name="ce12N2" office:value-type="float" office:value="0.99">
            <text:p>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7">
            <text:p>8,87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1166.12">
            <text:p>1166,12</text:p>
          </table:table-cell>
          <table:table-cell table:style-name="ce12N2" office:value-type="float" office:value="81.64">
            <text:p>8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67031576707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1">
            <text:p>309271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7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1.97">
            <text:p>176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1.97">
            <text:p>1761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37">
            <text:p>0,001</text:p>
          </table:table-cell>
          <table:table-cell table:style-name="ce12N2" office:value-type="float" office:value="1.64">
            <text:p>1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61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61.97">
            <text:p>1761,97</text:p>
          </table:table-cell>
          <table:table-cell table:style-name="ce12N2" office:value-type="float" office:value="70.48">
            <text:p>7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05104359000122550010000047711392687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5">
            <text:p>309275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4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.2">
            <text:p>81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19.2">
            <text:p>81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9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9.2">
            <text:p>819,20</text:p>
          </table:table-cell>
          <table:table-cell table:style-name="ce12N2" office:value-type="float" office:value="24.09">
            <text:p>2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271608100001615500100000744711418117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77">
            <text:p>309277</text:p>
          </table:table-cell>
          <table:table-cell table:style-name="ce0" table:number-columns-spanned="4" table:number-rows-spanned="1" office:value-type="string" calcext:value-type="string">
            <text:p>35.552 - RIBAS D'AVILA COMERCIAL LTDA</text:p>
          </table:table-cell>
          <table:covered-table-cell table:number-columns-repeated="3"/>
          <table:table-cell table:style-name="ce0" office:value-type="string" calcext:value-type="string">
            <text:p>10.6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3.97">
            <text:p>584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843.97">
            <text:p>584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43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43.97">
            <text:p>5843,97</text:p>
          </table:table-cell>
          <table:table-cell table:style-name="ce12N2" office:value-type="float" office:value="228.5">
            <text:p>22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396.45">
            <text:p>139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2.511.428</text:p>
          </table:table-cell>
          <table:table-cell table:style-name="ce0" office:value-type="string" calcext:value-type="string">
            <text:p>27.326 - JAMEF TRANSPORTES LTDA</text:p>
          </table:table-cell>
          <table:table-cell table:style-name="ce0" office:value-type="string" calcext:value-type="string">
            <text:p>12/06/2026</text:p>
          </table:table-cell>
          <table:table-cell table:style-name="ce12" office:value-type="string" calcext:value-type="string">
            <text:p>1.396,45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35260600333748000106550010000106611272251282</text:p>
          </table:table-cell>
          <table:table-cell table:style-name="ce0" office:value-type="string" calcext:value-type="string">
            <text:p>3526062014761700200457001002511428153197077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9">
            <text:p>309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2">
            <text:p>70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.4">
            <text:p>6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02">
            <text:p>0,000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5.67">
            <text:p>555,67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2.8">
            <text:p>42,80</text:p>
          </table:table-cell>
          <table:table-cell table:style-name="ce12N2" office:value-type="float" office:value="658.4">
            <text:p>658,40</text:p>
          </table:table-cell>
          <table:table-cell table:style-name="ce12N2" office:value-type="float" office:value="46.09">
            <text:p>4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1136962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6">
            <text:p>309306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12.86">
            <text:p>371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09.9">
            <text:p>330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5.55">
            <text:p>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12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56.7">
            <text:p>3056,70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51">
            <text:p>27,51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02.96">
            <text:p>402,96</text:p>
          </table:table-cell>
          <table:table-cell table:style-name="ce12N2" office:value-type="float" office:value="3309.9">
            <text:p>3309,90</text:p>
          </table:table-cell>
          <table:table-cell table:style-name="ce12N2" office:value-type="float" office:value="132.4">
            <text:p>13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05870170002855500100004069919514970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9">
            <text:p>30930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.39">
            <text:p>21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.6">
            <text:p>20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">
            <text:p>0,006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5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0.86">
            <text:p>180,86</text:p>
          </table:table-cell>
          <table:table-cell table:style-name="ce12N2" office:value-type="float" office:value="0.18">
            <text:p>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7.79">
            <text:p>7,79</text:p>
          </table:table-cell>
          <table:table-cell table:style-name="ce12N2" office:value-type="float" office:value="207.6">
            <text:p>207,60</text:p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5401282664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5">
            <text:p>309315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6.1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3.11">
            <text:p>307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791.41">
            <text:p>279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76">
            <text:p>0,0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01.25">
            <text:p>2501,25</text:p>
          </table:table-cell>
          <table:table-cell table:style-name="ce12N2" office:value-type="float" office:value="2.49">
            <text:p>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51">
            <text:p>22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81.7">
            <text:p>281,70</text:p>
          </table:table-cell>
          <table:table-cell table:style-name="ce12N2" office:value-type="float" office:value="2791.41">
            <text:p>2791,41</text:p>
          </table:table-cell>
          <table:table-cell table:style-name="ce12N2" office:value-type="float" office:value="195.4">
            <text:p>19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311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6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5260612077181000133550030002261731875139152</text:p>
          </table:table-cell>
          <table:table-cell table:style-name="ce0" office:value-type="string" calcext:value-type="string">
            <text:p>3526061138956500020057005000401311100087669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6">
            <text:p>309316</text:p>
          </table:table-cell>
          <table:table-cell table:style-name="ce0" table:number-columns-spanned="4" table:number-rows-spanned="1" office:value-type="string" calcext:value-type="string">
            <text:p>38.731 - CLARAO INDUSTRIA E COMERCIO DE ILUMINACAO LTDA</text:p>
          </table:table-cell>
          <table:covered-table-cell table:number-columns-repeated="3"/>
          <table:table-cell table:style-name="ce0" office:value-type="string" calcext:value-type="string">
            <text:p>23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0.61">
            <text:p>1840,6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144.2">
            <text:p>1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7263012000180550010000234001327329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84">
            <text:p>30938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5.1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08.43">
            <text:p>350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162.6">
            <text:p>316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08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2.6">
            <text:p>3162,60</text:p>
          </table:table-cell>
          <table:table-cell table:style-name="ce12N2" office:value-type="float" office:value="3.15">
            <text:p>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6">
            <text:p>28,46</text:p>
          </table:table-cell>
          <table:table-cell table:style-name="ce12N2" office:value-type="float" office:value="34.31">
            <text:p>34,3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345.83">
            <text:p>345,83</text:p>
          </table:table-cell>
          <table:table-cell table:style-name="ce12N2" office:value-type="float" office:value="3162.6">
            <text:p>3162,60</text:p>
          </table:table-cell>
          <table:table-cell table:style-name="ce12N2" office:value-type="float" office:value="221.39">
            <text:p>22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51061002651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9">
            <text:p>30939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9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8.61">
            <text:p>972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832.3">
            <text:p>8832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">
            <text:p>0,165</text:p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28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94.71">
            <text:p>7694,71</text:p>
          </table:table-cell>
          <table:table-cell table:style-name="ce12N2" office:value-type="float" office:value="7.71">
            <text:p>7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26">
            <text:p>69,26</text:p>
          </table:table-cell>
          <table:table-cell table:style-name="ce12N2" office:value-type="float" office:value="66.13">
            <text:p>66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896.31">
            <text:p>896,31</text:p>
          </table:table-cell>
          <table:table-cell table:style-name="ce12N2" office:value-type="float" office:value="8832.3">
            <text:p>8832,30</text:p>
          </table:table-cell>
          <table:table-cell table:style-name="ce12N2" office:value-type="float" office:value="353.29">
            <text:p>3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9951131047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8">
            <text:p>2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3784.21">
            <text:p>3784,21</text:p>
          </table:table-cell>
          <table:table-cell table:style-name="ce26N2" office:value-type="float" office:value="92680.65">
            <text:p>92680,65</text:p>
          </table:table-cell>
          <table:table-cell table:style-name="ce26N2" office:value-type="float" office:value="5064.52">
            <text:p>5064,5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602.94">
            <text:p>1602,94</text:p>
          </table:table-cell>
          <table:table-cell table:style-name="ce26N2" office:value-type="float" office:value="96612.36">
            <text:p>96612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.085181">
            <text:p>2,085</text:p>
          </table:table-cell>
          <table:table-cell table:style-name="ce26N2" office:value-type="float" office:value="92728.15">
            <text:p>92728,15</text:p>
          </table:table-cell>
          <table:table-cell table:style-name="ce26N2" office:value-type="float" office:value="96612.36">
            <text:p>96612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4098.93">
            <text:p>74098,93</text:p>
          </table:table-cell>
          <table:table-cell table:style-name="ce26N2" office:value-type="float" office:value="74.15">
            <text:p>74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66.95">
            <text:p>666,9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06.28">
            <text:p>506,2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.91">
            <text:p>50,9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10" meta:object-count="0"/>
    <meta:generator>LibreOffice/4.3.0.4$Windows_x86 LibreOffice_project/62ad5818884a2fc2e5780dd45466868d41009ec0</meta:generator>
  </office:meta>
</office:document-meta>
</file>