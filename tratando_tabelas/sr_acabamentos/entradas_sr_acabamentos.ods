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1/05/2026 07:42:26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904">
            <text:p>30490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0.71">
            <text:p>321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43">
            <text:p>0,275</text:p>
          </table:table-cell>
          <table:table-cell table:style-name="ce12N2" office:value-type="float" office:value="19.52">
            <text:p>1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10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59.91">
            <text:p>59,91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178.1">
            <text:p>17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382121356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5">
            <text:p>3065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1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8.88">
            <text:p>396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67">
            <text:p>5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88.28">
            <text:p>188,28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151.22">
            <text:p>15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196155105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0">
            <text:p>30670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514">
            <text:p>0,277</text:p>
          </table:table-cell>
          <table:table-cell table:style-name="ce12N2" office:value-type="float" office:value="21.7">
            <text:p>2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7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656.6">
            <text:p>6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80221947081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3">
            <text:p>30670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71.86">
            <text:p>2267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745.65">
            <text:p>21745,65</text:p>
          </table:table-cell>
          <table:table-cell table:style-name="ce12N2" office:value-type="float" office:value="550">
            <text:p>550,00</text:p>
          </table:table-cell>
          <table:table-cell table:style-name="ce12N3" office:value-type="float" office:value="0.0177">
            <text:p>0,018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67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22295.65">
            <text:p>22295,65</text:p>
          </table:table-cell>
          <table:table-cell table:style-name="ce12N2" office:value-type="float" office:value="1560.7">
            <text:p>15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10079108582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4">
            <text:p>30673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69.90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3.17">
            <text:p>177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8.23">
            <text:p>108,23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116.54">
            <text:p>11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1522460000128550050007699031909928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5">
            <text:p>30673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.87">
            <text:p>26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52.5">
            <text:p>2352,5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5513">
            <text:p>0,055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5">
            <text:p>41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29.37">
            <text:p>229,37</text:p>
          </table:table-cell>
          <table:table-cell table:style-name="ce12N2" office:value-type="float" office:value="2437.5">
            <text:p>2437,50</text:p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3951294218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5">
            <text:p>306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5991815162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6">
            <text:p>306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9.86">
            <text:p>278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122">
            <text:p>0,029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6.44">
            <text:p>46,44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192.04">
            <text:p>19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01278295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7">
            <text:p>3067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5">
            <text:p>0,033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11538303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8">
            <text:p>306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7.81">
            <text:p>6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88">
            <text:p>0,03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21368995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0">
            <text:p>306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.98">
            <text:p>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28">
            <text:p>0,031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31796922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4">
            <text:p>306804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2.0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2.61">
            <text:p>63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">
            <text:p>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8.61">
            <text:p>38,61</text:p>
          </table:table-cell>
          <table:table-cell table:style-name="ce12N2" office:value-type="float" office:value="594">
            <text:p>594,00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702342900014355001000382011112778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5">
            <text:p>306825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98.87">
            <text:p>756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00605">
            <text:p>4,401</text:p>
          </table:table-cell>
          <table:table-cell table:style-name="ce12N2" office:value-type="float" office:value="623.56">
            <text:p>62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69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27.27">
            <text:p>4427,27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3720.23">
            <text:p>37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33171531710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8">
            <text:p>30682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53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8.4">
            <text:p>367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28.27">
            <text:p>3528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14848">
            <text:p>5,015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78">
            <text:p>58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50.13">
            <text:p>150,13</text:p>
          </table:table-cell>
          <table:table-cell table:style-name="ce12N2" office:value-type="float" office:value="3528.27">
            <text:p>3528,27</text:p>
          </table:table-cell>
          <table:table-cell table:style-name="ce12N2" office:value-type="float" office:value="141.13">
            <text:p>14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534179386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1">
            <text:p>30684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.37">
            <text:p>8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5.8">
            <text:p>8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32">
            <text:p>0,006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8.57">
            <text:p>78,57</text:p>
          </table:table-cell>
          <table:table-cell table:style-name="ce12N2" office:value-type="float" office:value="805.8">
            <text:p>805,80</text:p>
          </table:table-cell>
          <table:table-cell table:style-name="ce12N2" office:value-type="float" office:value="56.41">
            <text:p>5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55231630413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2">
            <text:p>30684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4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16.2">
            <text:p>471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284.5">
            <text:p>42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197">
            <text:p>0,07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1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44">
            <text:p>53,4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31.7">
            <text:p>431,70</text:p>
          </table:table-cell>
          <table:table-cell table:style-name="ce12N2" office:value-type="float" office:value="4284.5">
            <text:p>4284,50</text:p>
          </table:table-cell>
          <table:table-cell table:style-name="ce12N2" office:value-type="float" office:value="195.58">
            <text:p>19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48871000680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1">
            <text:p>306851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7.87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2">
            <text:p>0,015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78741705129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2">
            <text:p>306852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29">
            <text:p>282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495.93">
            <text:p>2495,9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1538">
            <text:p>0,042</text:p>
          </table:table-cell>
          <table:table-cell table:style-name="ce12N2" office:value-type="float" office:value="8.15">
            <text:p>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8">
            <text:p>4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43.36">
            <text:p>243,36</text:p>
          </table:table-cell>
          <table:table-cell table:style-name="ce12N2" office:value-type="float" office:value="2580.93">
            <text:p>2580,93</text:p>
          </table:table-cell>
          <table:table-cell table:style-name="ce12N2" office:value-type="float" office:value="103.23">
            <text:p>10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6011236377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5">
            <text:p>30685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0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8.19">
            <text:p>736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9575">
            <text:p>0,400</text:p>
          </table:table-cell>
          <table:table-cell table:style-name="ce12N2" office:value-type="float" office:value="186.98">
            <text:p>18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6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512.74">
            <text:p>51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04401515494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8">
            <text:p>306878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13">
            <text:p>7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75.13">
            <text:p>77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016">
            <text:p>0,037</text:p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13">
            <text:p>775,13</text:p>
          </table:table-cell>
          <table:table-cell table:style-name="ce12N2" office:value-type="float" office:value="93.02">
            <text:p>9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014224000012055001000708630125806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0">
            <text:p>306890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1.54">
            <text:p>539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12.56">
            <text:p>491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478.98">
            <text:p>478,98</text:p>
          </table:table-cell>
          <table:table-cell table:style-name="ce12N2" office:value-type="float" office:value="4912.56">
            <text:p>4912,56</text:p>
          </table:table-cell>
          <table:table-cell table:style-name="ce12N2" office:value-type="float" office:value="196.51">
            <text:p>19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6871393781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9">
            <text:p>3069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368.99">
            <text:p>36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151680457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2">
            <text:p>3069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156.37">
            <text:p>15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8174546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0">
            <text:p>306960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60.25">
            <text:p>1556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177.9">
            <text:p>1417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56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382.35">
            <text:p>1382,35</text:p>
          </table:table-cell>
          <table:table-cell table:style-name="ce12N2" office:value-type="float" office:value="14177.9">
            <text:p>14177,90</text:p>
          </table:table-cell>
          <table:table-cell table:style-name="ce12N2" office:value-type="float" office:value="992.45">
            <text:p>9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4.11">
            <text:p>31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75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7/05/2026</text:p>
          </table:table-cell>
          <table:table-cell table:style-name="ce12" office:value-type="string" calcext:value-type="string">
            <text:p>314,1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35260558329608000144550010002609171002609187</text:p>
          </table:table-cell>
          <table:table-cell table:style-name="ce0" office:value-type="string" calcext:value-type="string">
            <text:p>3526051138956500020057005000398751100085001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1">
            <text:p>30697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6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1.94">
            <text:p>976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854">
            <text:p>0,341</text:p>
          </table:table-cell>
          <table:table-cell table:style-name="ce12N2" office:value-type="float" office:value="55.47">
            <text:p>5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75.55">
            <text:p>75,55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633.74">
            <text:p>6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62611177625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3">
            <text:p>306973</text:p>
          </table:table-cell>
          <table:table-cell table:style-name="ce0" table:number-columns-spanned="4" table:number-rows-spanned="1" office:value-type="string" calcext:value-type="string">
            <text:p>38.510 - MAC FER INDUSTRIA E COMERCIO LTDA</text:p>
          </table:table-cell>
          <table:covered-table-cell table:number-columns-repeated="3"/>
          <table:table-cell table:style-name="ce0" office:value-type="string" calcext:value-type="string">
            <text:p>43.8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69.63">
            <text:p>2186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12N2" office:value-type="float" office:value="20979.06">
            <text:p>209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69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39">
            <text:p>74,3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890.57">
            <text:p>890,57</text:p>
          </table:table-cell>
          <table:table-cell table:style-name="ce12N2" office:value-type="float" office:value="20979.06">
            <text:p>20979,06</text:p>
          </table:table-cell>
          <table:table-cell table:style-name="ce12N2" office:value-type="float" office:value="839.13">
            <text:p>83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1.48">
            <text:p>4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57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5/05/2026</text:p>
          </table:table-cell>
          <table:table-cell table:style-name="ce12" office:value-type="string" calcext:value-type="string">
            <text:p>441,4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42260401145165000386550000000438191704493561</text:p>
          </table:table-cell>
          <table:table-cell table:style-name="ce0" office:value-type="string" calcext:value-type="string">
            <text:p>3526051138956500020057005000398574100084820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02">
            <text:p>102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720">
            <text:p>720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14846.73">
            <text:p>14846,73</text:p>
          </table:table-cell>
          <table:table-cell table:style-name="ce26N2" office:value-type="float" office:value="540298.21">
            <text:p>540298,21</text:p>
          </table:table-cell>
          <table:table-cell table:style-name="ce26N2" office:value-type="float" office:value="32320.76">
            <text:p>32320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55.59">
            <text:p>755,59</text:p>
          </table:table-cell>
          <table:table-cell table:style-name="ce26N2" office:value-type="float" office:value="555144.94">
            <text:p>555144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2.583312">
            <text:p>42,583</text:p>
          </table:table-cell>
          <table:table-cell table:style-name="ce26N2" office:value-type="float" office:value="540317.01">
            <text:p>540317,01</text:p>
          </table:table-cell>
          <table:table-cell table:style-name="ce26N2" office:value-type="float" office:value="555144.94">
            <text:p>555144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509.33">
            <text:p>6509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29">
            <text:p>41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74" meta:object-count="0"/>
    <meta:generator>LibreOffice/4.3.0.4$Windows_x86 LibreOffice_project/62ad5818884a2fc2e5780dd45466868d41009ec0</meta:generator>
  </office:meta>
</office:document-meta>
</file>