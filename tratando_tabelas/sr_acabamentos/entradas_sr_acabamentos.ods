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7/06/2026 04:30:30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3">
            <text:p>30808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60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532">
            <text:p>0,024</text:p>
          </table:table-cell>
          <table:table-cell table:style-name="ce12N2" office:value-type="float" office:value="5.34">
            <text:p>5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82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37.1">
            <text:p>6737,10</text:p>
          </table:table-cell>
          <table:table-cell table:style-name="ce12N2" office:value-type="float" office:value="6.74">
            <text:p>6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63">
            <text:p>60,6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558.78">
            <text:p>558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60410152112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3">
            <text:p>308313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6618541180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60">
            <text:p>308460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0.2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47.06">
            <text:p>3647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3633.78">
            <text:p>3633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4525">
            <text:p>0,105</text:p>
          </table:table-cell>
          <table:table-cell table:style-name="ce12N2" office:value-type="float" office:value="22.39">
            <text:p>22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47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94.11">
            <text:p>3094,11</text:p>
          </table:table-cell>
          <table:table-cell table:style-name="ce12N2" office:value-type="float" office:value="3.08">
            <text:p>3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86">
            <text:p>27,86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3.28">
            <text:p>13,28</text:p>
          </table:table-cell>
          <table:table-cell table:style-name="ce12N2" office:value-type="float" office:value="3633.78">
            <text:p>3633,78</text:p>
          </table:table-cell>
          <table:table-cell table:style-name="ce12N2" office:value-type="float" office:value="224.27">
            <text:p>22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7029917400163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5">
            <text:p>30852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1.1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58.7">
            <text:p>9158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">
            <text:p>45,00</text:p>
          </table:table-cell>
          <table:table-cell table:style-name="ce12N2" office:value-type="float" office:value="9035.9">
            <text:p>903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21734">
            <text:p>0,322</text:p>
          </table:table-cell>
          <table:table-cell table:style-name="ce12N2" office:value-type="float" office:value="38.36">
            <text:p>38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158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21.54">
            <text:p>7721,54</text:p>
          </table:table-cell>
          <table:table-cell table:style-name="ce12N2" office:value-type="float" office:value="7.75">
            <text:p>7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5">
            <text:p>69,50</text:p>
          </table:table-cell>
          <table:table-cell table:style-name="ce12N2" office:value-type="float" office:value="64">
            <text:p>6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22.8">
            <text:p>122,80</text:p>
          </table:table-cell>
          <table:table-cell table:style-name="ce12N2" office:value-type="float" office:value="9035.9">
            <text:p>9035,90</text:p>
          </table:table-cell>
          <table:table-cell table:style-name="ce12N2" office:value-type="float" office:value="527.41">
            <text:p>527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7111113861717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49">
            <text:p>30854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3">
            <text:p>0,015</text:p>
          </table:table-cell>
          <table:table-cell table:style-name="ce12N2" office:value-type="float" office:value="5.72">
            <text:p>5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7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1013948537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26">
            <text:p>308626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0.7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15.5">
            <text:p>19415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19343.7">
            <text:p>19343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64002">
            <text:p>0,964</text:p>
          </table:table-cell>
          <table:table-cell table:style-name="ce12N2" office:value-type="float" office:value="94.1">
            <text:p>94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415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683.16">
            <text:p>16683,16</text:p>
          </table:table-cell>
          <table:table-cell table:style-name="ce12N2" office:value-type="float" office:value="16.72">
            <text:p>16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0.17">
            <text:p>150,17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71.8">
            <text:p>71,80</text:p>
          </table:table-cell>
          <table:table-cell table:style-name="ce12N2" office:value-type="float" office:value="19343.7">
            <text:p>19343,70</text:p>
          </table:table-cell>
          <table:table-cell table:style-name="ce12N2" office:value-type="float" office:value="960.07">
            <text:p>960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707951688803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4">
            <text:p>308724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4.1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78.92">
            <text:p>3978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625.44">
            <text:p>3625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86">
            <text:p>0,003</text:p>
          </table:table-cell>
          <table:table-cell table:style-name="ce12N2" office:value-type="float" office:value="2.8">
            <text:p>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78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25.44">
            <text:p>3625,44</text:p>
          </table:table-cell>
          <table:table-cell table:style-name="ce12N2" office:value-type="float" office:value="3.62">
            <text:p>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.63">
            <text:p>32,63</text:p>
          </table:table-cell>
          <table:table-cell table:style-name="ce12N2" office:value-type="float" office:value="34.38">
            <text:p>34,3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353.48">
            <text:p>353,48</text:p>
          </table:table-cell>
          <table:table-cell table:style-name="ce12N2" office:value-type="float" office:value="3625.44">
            <text:p>3625,44</text:p>
          </table:table-cell>
          <table:table-cell table:style-name="ce12N2" office:value-type="float" office:value="253.78">
            <text:p>253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3296080001445500100026412110026412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75">
            <text:p>308775</text:p>
          </table:table-cell>
          <table:table-cell table:style-name="ce0" table:number-columns-spanned="4" table:number-rows-spanned="1" office:value-type="string" calcext:value-type="string">
            <text:p>10.562 - RENATO MARTINS CIOFFOLETTI ILUM. EPP</text:p>
          </table:table-cell>
          <table:covered-table-cell table:number-columns-repeated="3"/>
          <table:table-cell table:style-name="ce0" office:value-type="string" calcext:value-type="string">
            <text:p>18.8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6.5">
            <text:p>139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396.5">
            <text:p>1396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96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6.5">
            <text:p>1396,50</text:p>
          </table:table-cell>
          <table:table-cell table:style-name="ce12N2" office:value-type="float" office:value="41.48">
            <text:p>41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43737340001205500100001881211067877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1">
            <text:p>308851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2.217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0.83">
            <text:p>393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930.83">
            <text:p>3930,8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844">
            <text:p>0,118</text:p>
          </table:table-cell>
          <table:table-cell table:style-name="ce12N2" office:value-type="float" office:value="236.84">
            <text:p>236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0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17.52">
            <text:p>3317,52</text:p>
          </table:table-cell>
          <table:table-cell table:style-name="ce12N2" office:value-type="float" office:value="3.31">
            <text:p>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85">
            <text:p>29,85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30.83">
            <text:p>3930,83</text:p>
          </table:table-cell>
          <table:table-cell table:style-name="ce12N2" office:value-type="float" office:value="275.16">
            <text:p>275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8215460001025501000000221714698605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3">
            <text:p>308853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2.0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92.34">
            <text:p>7892,34</text:p>
          </table:table-cell>
          <table:table-cell table:style-name="ce12N2" office:value-type="float" office:value="1797.8">
            <text:p>1797,80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989">
            <text:p>898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92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41.07">
            <text:p>6641,07</text:p>
          </table:table-cell>
          <table:table-cell table:style-name="ce12N2" office:value-type="float" office:value="6.64">
            <text:p>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.77">
            <text:p>59,77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701.14">
            <text:p>701,14</text:p>
          </table:table-cell>
          <table:table-cell table:style-name="ce12N2" office:value-type="float" office:value="7191.2">
            <text:p>7191,20</text:p>
          </table:table-cell>
          <table:table-cell table:style-name="ce12N2" office:value-type="float" office:value="287.65">
            <text:p>287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177814120001095500100001207910003370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67">
            <text:p>308867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4.2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07.4">
            <text:p>530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835.9">
            <text:p>483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07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35.9">
            <text:p>4835,90</text:p>
          </table:table-cell>
          <table:table-cell table:style-name="ce12N2" office:value-type="float" office:value="4.84">
            <text:p>4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.52">
            <text:p>43,52</text:p>
          </table:table-cell>
          <table:table-cell table:style-name="ce12N2" office:value-type="float" office:value="39.16">
            <text:p>39,1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471.5">
            <text:p>471,50</text:p>
          </table:table-cell>
          <table:table-cell table:style-name="ce12N2" office:value-type="float" office:value="4835.9">
            <text:p>4835,90</text:p>
          </table:table-cell>
          <table:table-cell table:style-name="ce12N2" office:value-type="float" office:value="338.52">
            <text:p>338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329608000144550010002642131002642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19">
            <text:p>309019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8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84.54">
            <text:p>5784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270.65">
            <text:p>5270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83">
            <text:p>0,048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84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70.65">
            <text:p>5270,65</text:p>
          </table:table-cell>
          <table:table-cell table:style-name="ce12N2" office:value-type="float" office:value="5.27">
            <text:p>5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43">
            <text:p>47,43</text:p>
          </table:table-cell>
          <table:table-cell table:style-name="ce12N2" office:value-type="float" office:value="44.06">
            <text:p>44,0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513.89">
            <text:p>513,89</text:p>
          </table:table-cell>
          <table:table-cell table:style-name="ce12N2" office:value-type="float" office:value="5270.65">
            <text:p>5270,65</text:p>
          </table:table-cell>
          <table:table-cell table:style-name="ce12N2" office:value-type="float" office:value="368.94">
            <text:p>368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16.77">
            <text:p>116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1.063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1/06/2026</text:p>
          </table:table-cell>
          <table:table-cell table:style-name="ce12" office:value-type="string" calcext:value-type="string">
            <text:p>116,77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35260630228132000136550010000098901217910610</text:p>
          </table:table-cell>
          <table:table-cell table:style-name="ce0" office:value-type="string" calcext:value-type="string">
            <text:p>3526061138956500020057005000401063100087377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22">
            <text:p>309022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4.42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95.86">
            <text:p>599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213.79">
            <text:p>5213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995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42.25">
            <text:p>4542,25</text:p>
          </table:table-cell>
          <table:table-cell table:style-name="ce12N2" office:value-type="float" office:value="4.54">
            <text:p>4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.88">
            <text:p>40,88</text:p>
          </table:table-cell>
          <table:table-cell table:style-name="ce12N2" office:value-type="float" office:value="43.04">
            <text:p>43,0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782.07">
            <text:p>782,07</text:p>
          </table:table-cell>
          <table:table-cell table:style-name="ce12N2" office:value-type="float" office:value="5213.79">
            <text:p>5213,79</text:p>
          </table:table-cell>
          <table:table-cell table:style-name="ce12N2" office:value-type="float" office:value="208.55">
            <text:p>208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56353460001405500200011442514010284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0">
            <text:p>309030</text:p>
          </table:table-cell>
          <table:table-cell table:style-name="ce0" table:number-columns-spanned="4" table:number-rows-spanned="1" office:value-type="string" calcext:value-type="string">
            <text:p>9.974 - USINA DESIGN IND E COMERCIO DE ILUMINACAO LTDA-ME</text:p>
          </table:table-cell>
          <table:covered-table-cell table:number-columns-repeated="3"/>
          <table:table-cell table:style-name="ce0" office:value-type="string" calcext:value-type="string">
            <text:p>9.88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12.09">
            <text:p>151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77.76">
            <text:p>1377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12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1.5">
            <text:p>31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134.33">
            <text:p>134,33</text:p>
          </table:table-cell>
          <table:table-cell table:style-name="ce12N2" office:value-type="float" office:value="1377.76">
            <text:p>1377,76</text:p>
          </table:table-cell>
          <table:table-cell table:style-name="ce12N2" office:value-type="float" office:value="96.44">
            <text:p>96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7.01">
            <text:p>47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1.013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0/06/2026</text:p>
          </table:table-cell>
          <table:table-cell table:style-name="ce12" office:value-type="string" calcext:value-type="string">
            <text:p>47,0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35260610713221000160550020000098871000132474</text:p>
          </table:table-cell>
          <table:table-cell table:style-name="ce0" office:value-type="string" calcext:value-type="string">
            <text:p>35260611389565000200570050004010131000873264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2">
            <text:p>30903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7.7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.82">
            <text:p>15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4.82">
            <text:p>154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52">
            <text:p>0,000</text:p>
          </table:table-cell>
          <table:table-cell table:style-name="ce12N2" office:value-type="float" office:value="0.4">
            <text:p>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4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0.66">
            <text:p>130,66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8">
            <text:p>1,1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.82">
            <text:p>154,82</text:p>
          </table:table-cell>
          <table:table-cell table:style-name="ce12N2" office:value-type="float" office:value="10.84">
            <text:p>1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770017211191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4">
            <text:p>30905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7.9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.98">
            <text:p>44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.98">
            <text:p>44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52">
            <text:p>0,000</text:p>
          </table:table-cell>
          <table:table-cell table:style-name="ce12N2" office:value-type="float" office:value="0.4">
            <text:p>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.96">
            <text:p>37,96</text:p>
          </table:table-cell>
          <table:table-cell table:style-name="ce12N2" office:value-type="float" office:value="0.04">
            <text:p>0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34">
            <text:p>0,3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.98">
            <text:p>44,98</text:p>
          </table:table-cell>
          <table:table-cell table:style-name="ce12N2" office:value-type="float" office:value="3.15">
            <text:p>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794717895784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8">
            <text:p>30905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73.34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5.03">
            <text:p>555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5.03">
            <text:p>555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064">
            <text:p>0,081</text:p>
          </table:table-cell>
          <table:table-cell table:style-name="ce12N2" office:value-type="float" office:value="25.28">
            <text:p>25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5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6.18">
            <text:p>516,18</text:p>
          </table:table-cell>
          <table:table-cell table:style-name="ce12N2" office:value-type="float" office:value="0.52">
            <text:p>0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65">
            <text:p>4,65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5.03">
            <text:p>555,03</text:p>
          </table:table-cell>
          <table:table-cell table:style-name="ce12N2" office:value-type="float" office:value="38.85">
            <text:p>3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58019020001265500000137334919439262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50">
            <text:p>30915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5.21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86.16">
            <text:p>208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86.16">
            <text:p>2086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6196">
            <text:p>0,126</text:p>
          </table:table-cell>
          <table:table-cell table:style-name="ce12N2" office:value-type="float" office:value="48">
            <text:p>4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86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17.47">
            <text:p>1817,47</text:p>
          </table:table-cell>
          <table:table-cell table:style-name="ce12N2" office:value-type="float" office:value="1.82">
            <text:p>1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35">
            <text:p>16,3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86.16">
            <text:p>2086,16</text:p>
          </table:table-cell>
          <table:table-cell table:style-name="ce12N2" office:value-type="float" office:value="83.45">
            <text:p>83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521511148425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89">
            <text:p>309189</text:p>
          </table:table-cell>
          <table:table-cell table:style-name="ce0" table:number-columns-spanned="4" table:number-rows-spanned="1" office:value-type="string" calcext:value-type="string">
            <text:p>9.974 - USINA DESIGN IND E COMERCIO DE ILUMINACAO LTDA-ME</text:p>
          </table:table-cell>
          <table:covered-table-cell table:number-columns-repeated="3"/>
          <table:table-cell table:style-name="ce0" office:value-type="string" calcext:value-type="string">
            <text:p>9.86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3.7">
            <text:p>1373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51.66">
            <text:p>1251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5">
            <text:p>0,175</text:p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73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1.5">
            <text:p>31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22.04">
            <text:p>122,04</text:p>
          </table:table-cell>
          <table:table-cell table:style-name="ce12N2" office:value-type="float" office:value="1251.66">
            <text:p>1251,66</text:p>
          </table:table-cell>
          <table:table-cell table:style-name="ce12N2" office:value-type="float" office:value="87.62">
            <text:p>87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.71">
            <text:p>4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1.013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0/06/2026</text:p>
          </table:table-cell>
          <table:table-cell table:style-name="ce12" office:value-type="string" calcext:value-type="string">
            <text:p>42,7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35260610713221000160550020000098651000132019</text:p>
          </table:table-cell>
          <table:table-cell table:style-name="ce0" office:value-type="string" calcext:value-type="string">
            <text:p>35260611389565000200570050004010131000873264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14">
            <text:p>309214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9.129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7.06">
            <text:p>1957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683.2">
            <text:p>168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0">
            <text:p>100,00</text:p>
          </table:table-cell>
          <table:table-cell table:style-name="ce12" office:value-type="string" calcext:value-type="string">
            <text:p>1.957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14.23">
            <text:p>1514,23</text:p>
          </table:table-cell>
          <table:table-cell table:style-name="ce12N2" office:value-type="float" office:value="1.51">
            <text:p>1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63">
            <text:p>13,6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73.86">
            <text:p>173,86</text:p>
          </table:table-cell>
          <table:table-cell table:style-name="ce12N2" office:value-type="float" office:value="1783.2">
            <text:p>1783,20</text:p>
          </table:table-cell>
          <table:table-cell table:style-name="ce12N2" office:value-type="float" office:value="124.82">
            <text:p>12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45461650003935500400009912913283303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30">
            <text:p>30923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6.17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14.81">
            <text:p>171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14.81">
            <text:p>171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3">
            <text:p>0,002</text:p>
          </table:table-cell>
          <table:table-cell table:style-name="ce12N2" office:value-type="float" office:value="0.77">
            <text:p>0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1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47.26">
            <text:p>1447,26</text:p>
          </table:table-cell>
          <table:table-cell table:style-name="ce12N2" office:value-type="float" office:value="1.45">
            <text:p>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03">
            <text:p>13,0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14.81">
            <text:p>1714,81</text:p>
          </table:table-cell>
          <table:table-cell table:style-name="ce12N2" office:value-type="float" office:value="120.04">
            <text:p>120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617916676938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7">
            <text:p>309247</text:p>
          </table:table-cell>
          <table:table-cell table:style-name="ce0" table:number-columns-spanned="4" table:number-rows-spanned="1" office:value-type="string" calcext:value-type="string">
            <text:p>6.891 - STUDIOLUCE ILUMINACAO IMPORTACAO E EXPORTACAO LTDA</text:p>
          </table:table-cell>
          <table:covered-table-cell table:number-columns-repeated="3"/>
          <table:table-cell table:style-name="ce0" office:value-type="string" calcext:value-type="string">
            <text:p>105.41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2.03">
            <text:p>1382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59.26">
            <text:p>1259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82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64.76">
            <text:p>1164,76</text:p>
          </table:table-cell>
          <table:table-cell table:style-name="ce12N2" office:value-type="float" office:value="1.16">
            <text:p>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49">
            <text:p>10,4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22.77">
            <text:p>122,77</text:p>
          </table:table-cell>
          <table:table-cell table:style-name="ce12N2" office:value-type="float" office:value="1259.26">
            <text:p>1259,26</text:p>
          </table:table-cell>
          <table:table-cell table:style-name="ce12N2" office:value-type="float" office:value="50.37">
            <text:p>50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05993420001235500200010541411845710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52">
            <text:p>309252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6.7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66.85">
            <text:p>116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166.12">
            <text:p>1166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4374">
            <text:p>0,094</text:p>
          </table:table-cell>
          <table:table-cell table:style-name="ce12N2" office:value-type="float" office:value="7.69">
            <text:p>7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6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84.18">
            <text:p>984,18</text:p>
          </table:table-cell>
          <table:table-cell table:style-name="ce12N2" office:value-type="float" office:value="0.99">
            <text:p>0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87">
            <text:p>8,87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0.73">
            <text:p>0,73</text:p>
          </table:table-cell>
          <table:table-cell table:style-name="ce12N2" office:value-type="float" office:value="1166.12">
            <text:p>1166,12</text:p>
          </table:table-cell>
          <table:table-cell table:style-name="ce12N2" office:value-type="float" office:value="81.64">
            <text:p>81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6670315767077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71">
            <text:p>309271</text:p>
          </table:table-cell>
          <table:table-cell table:style-name="ce0" table:number-columns-spanned="4" table:number-rows-spanned="1" office:value-type="string" calcext:value-type="string">
            <text:p>16.628 - VFL IMPORTADORA E DISTRIBUIDORA LTDA</text:p>
          </table:table-cell>
          <table:covered-table-cell table:number-columns-repeated="3"/>
          <table:table-cell table:style-name="ce0" office:value-type="string" calcext:value-type="string">
            <text:p>4.7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61.97">
            <text:p>1761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761.97">
            <text:p>1761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37">
            <text:p>0,001</text:p>
          </table:table-cell>
          <table:table-cell table:style-name="ce12N2" office:value-type="float" office:value="1.64">
            <text:p>1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61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61.97">
            <text:p>1761,97</text:p>
          </table:table-cell>
          <table:table-cell table:style-name="ce12N2" office:value-type="float" office:value="70.48">
            <text:p>70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051043590001225500100000477113926872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75">
            <text:p>309275</text:p>
          </table:table-cell>
          <table:table-cell table:style-name="ce0" table:number-columns-spanned="4" table:number-rows-spanned="1" office:value-type="string" calcext:value-type="string">
            <text:p>17.288 - ITAMONTE ILUM EIRELI</text:p>
          </table:table-cell>
          <table:covered-table-cell table:number-columns-repeated="3"/>
          <table:table-cell table:style-name="ce0" office:value-type="string" calcext:value-type="string">
            <text:p>7.4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9.2">
            <text:p>81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19.2">
            <text:p>819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9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9.2">
            <text:p>819,20</text:p>
          </table:table-cell>
          <table:table-cell table:style-name="ce12N2" office:value-type="float" office:value="24.09">
            <text:p>2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271608100001615500100000744711418117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77">
            <text:p>309277</text:p>
          </table:table-cell>
          <table:table-cell table:style-name="ce0" table:number-columns-spanned="4" table:number-rows-spanned="1" office:value-type="string" calcext:value-type="string">
            <text:p>35.552 - RIBAS D'AVILA COMERCIAL LTDA</text:p>
          </table:table-cell>
          <table:covered-table-cell table:number-columns-repeated="3"/>
          <table:table-cell table:style-name="ce0" office:value-type="string" calcext:value-type="string">
            <text:p>10.6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43.97">
            <text:p>5843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843.97">
            <text:p>5843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43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43.97">
            <text:p>5843,97</text:p>
          </table:table-cell>
          <table:table-cell table:style-name="ce12N2" office:value-type="float" office:value="228.5">
            <text:p>22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396.45">
            <text:p>1396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2.511.428</text:p>
          </table:table-cell>
          <table:table-cell table:style-name="ce0" office:value-type="string" calcext:value-type="string">
            <text:p>27.326 - JAMEF TRANSPORTES LTDA</text:p>
          </table:table-cell>
          <table:table-cell table:style-name="ce0" office:value-type="string" calcext:value-type="string">
            <text:p>12/06/2026</text:p>
          </table:table-cell>
          <table:table-cell table:style-name="ce12" office:value-type="string" calcext:value-type="string">
            <text:p>1.396,45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35260600333748000106550010000106611272251282</text:p>
          </table:table-cell>
          <table:table-cell table:style-name="ce0" office:value-type="string" calcext:value-type="string">
            <text:p>35260620147617002004570010025114281531970776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9">
            <text:p>3092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.2">
            <text:p>70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8.4">
            <text:p>65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02">
            <text:p>0,000</text:p>
          </table:table-cell>
          <table:table-cell table:style-name="ce12N2" office:value-type="float" office:value="0.61">
            <text:p>0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5.67">
            <text:p>555,67</text:p>
          </table:table-cell>
          <table:table-cell table:style-name="ce12N2" office:value-type="float" office:value="0.56">
            <text:p>0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42.8">
            <text:p>42,80</text:p>
          </table:table-cell>
          <table:table-cell table:style-name="ce12N2" office:value-type="float" office:value="658.4">
            <text:p>658,40</text:p>
          </table:table-cell>
          <table:table-cell table:style-name="ce12N2" office:value-type="float" office:value="46.09">
            <text:p>4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113696295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06">
            <text:p>309306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0.6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12.86">
            <text:p>371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309.9">
            <text:p>3309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5.55">
            <text:p>5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12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56.7">
            <text:p>3056,70</text:p>
          </table:table-cell>
          <table:table-cell table:style-name="ce12N2" office:value-type="float" office:value="3.06">
            <text:p>3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51">
            <text:p>27,51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402.96">
            <text:p>402,96</text:p>
          </table:table-cell>
          <table:table-cell table:style-name="ce12N2" office:value-type="float" office:value="3309.9">
            <text:p>3309,90</text:p>
          </table:table-cell>
          <table:table-cell table:style-name="ce12N2" office:value-type="float" office:value="132.4">
            <text:p>13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05870170002855500100004069919514970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09">
            <text:p>309309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7.5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5.39">
            <text:p>215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7.6">
            <text:p>20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">
            <text:p>0,006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5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0.86">
            <text:p>180,86</text:p>
          </table:table-cell>
          <table:table-cell table:style-name="ce12N2" office:value-type="float" office:value="0.18">
            <text:p>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63">
            <text:p>1,6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7.79">
            <text:p>7,79</text:p>
          </table:table-cell>
          <table:table-cell table:style-name="ce12N2" office:value-type="float" office:value="207.6">
            <text:p>207,60</text:p>
          </table:table-cell>
          <table:table-cell table:style-name="ce12N2" office:value-type="float" office:value="8.3">
            <text:p>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754012826644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15">
            <text:p>309315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6.17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73.11">
            <text:p>307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791.41">
            <text:p>2791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76">
            <text:p>0,0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73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01.25">
            <text:p>2501,25</text:p>
          </table:table-cell>
          <table:table-cell table:style-name="ce12N2" office:value-type="float" office:value="2.49">
            <text:p>2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51">
            <text:p>22,5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281.7">
            <text:p>281,70</text:p>
          </table:table-cell>
          <table:table-cell table:style-name="ce12N2" office:value-type="float" office:value="2791.41">
            <text:p>2791,41</text:p>
          </table:table-cell>
          <table:table-cell table:style-name="ce12N2" office:value-type="float" office:value="195.4">
            <text:p>19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9.72">
            <text:p>8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1.311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6/06/2026</text:p>
          </table:table-cell>
          <table:table-cell table:style-name="ce12" office:value-type="string" calcext:value-type="string">
            <text:p>89,72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35260612077181000133550030002261731875139152</text:p>
          </table:table-cell>
          <table:table-cell table:style-name="ce0" office:value-type="string" calcext:value-type="string">
            <text:p>35260611389565000200570050004013111000876699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16">
            <text:p>309316</text:p>
          </table:table-cell>
          <table:table-cell table:style-name="ce0" table:number-columns-spanned="4" table:number-rows-spanned="1" office:value-type="string" calcext:value-type="string">
            <text:p>38.731 - CLARAO INDUSTRIA E COMERCIO DE ILUMINACAO LTDA</text:p>
          </table:table-cell>
          <table:covered-table-cell table:number-columns-repeated="3"/>
          <table:table-cell table:style-name="ce0" office:value-type="string" calcext:value-type="string">
            <text:p>23.4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0">
            <text:p>206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60">
            <text:p>206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6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40.61">
            <text:p>1840,61</text:p>
          </table:table-cell>
          <table:table-cell table:style-name="ce12N2" office:value-type="float" office:value="1.84">
            <text:p>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57">
            <text:p>16,5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60">
            <text:p>2060,00</text:p>
          </table:table-cell>
          <table:table-cell table:style-name="ce12N2" office:value-type="float" office:value="144.2">
            <text:p>14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72630120001805500100002340013273294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32">
            <text:p>32,00</text:p>
          </table:table-cell>
          <table:table-cell table:style-name="ce26N2" office:value-type="float" office:value="1797.8">
            <text:p>1797,8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00">
            <text:p>100,00</text:p>
          </table:table-cell>
          <table:table-cell table:style-name="ce26N2" office:value-type="float" office:value="4324.56">
            <text:p>4324,56</text:p>
          </table:table-cell>
          <table:table-cell table:style-name="ce26N2" office:value-type="float" office:value="100364.21">
            <text:p>100364,21</text:p>
          </table:table-cell>
          <table:table-cell table:style-name="ce26N2" office:value-type="float" office:value="5595.33">
            <text:p>5595,3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692.66">
            <text:p>1692,66</text:p>
          </table:table-cell>
          <table:table-cell table:style-name="ce26N2" office:value-type="float" office:value="104836.27">
            <text:p>104836,2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2.095181">
            <text:p>2,095</text:p>
          </table:table-cell>
          <table:table-cell table:style-name="ce26N2" office:value-type="float" office:value="102209.51">
            <text:p>102209,51</text:p>
          </table:table-cell>
          <table:table-cell table:style-name="ce26N2" office:value-type="float" office:value="104836.27">
            <text:p>104836,2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8344.03">
            <text:p>78344,03</text:p>
          </table:table-cell>
          <table:table-cell table:style-name="ce26N2" office:value-type="float" office:value="78.39">
            <text:p>78,3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705.15">
            <text:p>705,15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523.68">
            <text:p>523,6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9.83">
            <text:p>49,8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SR ACABAMENT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74" meta:object-count="0"/>
    <meta:generator>LibreOffice/4.3.0.4$Windows_x86 LibreOffice_project/62ad5818884a2fc2e5780dd45466868d41009ec0</meta:generator>
  </office:meta>
</office:document-meta>
</file>