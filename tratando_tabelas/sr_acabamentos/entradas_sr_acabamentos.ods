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0/07/2026 07:41:12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81">
            <text:p>310081</text:p>
          </table:table-cell>
          <table:table-cell table:style-name="ce0" table:number-columns-spanned="4" table:number-rows-spanned="1" office:value-type="string" calcext:value-type="string">
            <text:p>31.293 - DOCOL INDUSTRIA E COMERCIO LTDA</text:p>
          </table:table-cell>
          <table:covered-table-cell table:number-columns-repeated="3"/>
          <table:table-cell table:style-name="ce0" office:value-type="string" calcext:value-type="string">
            <text:p>8.12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8.04">
            <text:p>58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77.54">
            <text:p>277,54</text:p>
          </table:table-cell>
          <table:table-cell table:style-name="ce12N2" office:value-type="float" office:value="310.5">
            <text:p>310,50</text:p>
          </table:table-cell>
          <table:table-cell table:style-name="ce12N3" office:value-type="float" office:value="0.080869">
            <text:p>0,081</text:p>
          </table:table-cell>
          <table:table-cell table:style-name="ce12N2" office:value-type="float" office:value="28.1">
            <text:p>28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4.24">
            <text:p>234,24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8.04">
            <text:p>588,04</text:p>
          </table:table-cell>
          <table:table-cell table:style-name="ce12N2" office:value-type="float" office:value="41.16">
            <text:p>4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3390510012025500200000812610385541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0">
            <text:p>310480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10.3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.45">
            <text:p>8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.5">
            <text:p>8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7.95">
            <text:p>7,95</text:p>
          </table:table-cell>
          <table:table-cell table:style-name="ce12N2" office:value-type="float" office:value="81.5">
            <text:p>81,50</text:p>
          </table:table-cell>
          <table:table-cell table:style-name="ce12N2" office:value-type="float" office:value="5.7">
            <text:p>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302281320001365500100001034810135369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86">
            <text:p>310786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876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02.26">
            <text:p>3802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802.26">
            <text:p>3802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1496">
            <text:p>0,251</text:p>
          </table:table-cell>
          <table:table-cell table:style-name="ce12N2" office:value-type="float" office:value="507.54">
            <text:p>507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02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09.01">
            <text:p>3209,01</text:p>
          </table:table-cell>
          <table:table-cell table:style-name="ce12N2" office:value-type="float" office:value="3.21">
            <text:p>3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88">
            <text:p>28,88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02.26">
            <text:p>3802,26</text:p>
          </table:table-cell>
          <table:table-cell table:style-name="ce12N2" office:value-type="float" office:value="266.17">
            <text:p>266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8215460001025501200000087612008698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2">
            <text:p>310792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41.6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31.75">
            <text:p>273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45.76">
            <text:p>2645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2726">
            <text:p>0,2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31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32.96">
            <text:p>2232,96</text:p>
          </table:table-cell>
          <table:table-cell table:style-name="ce12N2" office:value-type="float" office:value="2.23">
            <text:p>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1">
            <text:p>20,10</text:p>
          </table:table-cell>
          <table:table-cell table:style-name="ce12N2" office:value-type="float" office:value="62.12">
            <text:p>62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85.99">
            <text:p>85,99</text:p>
          </table:table-cell>
          <table:table-cell table:style-name="ce12N2" office:value-type="float" office:value="2645.76">
            <text:p>2645,76</text:p>
          </table:table-cell>
          <table:table-cell table:style-name="ce12N2" office:value-type="float" office:value="185.2">
            <text:p>18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4169512645660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3">
            <text:p>31079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7.3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02">
            <text:p>830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302">
            <text:p>830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5116">
            <text:p>0,065</text:p>
          </table:table-cell>
          <table:table-cell table:style-name="ce12N2" office:value-type="float" office:value="5.99">
            <text:p>5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0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06.68">
            <text:p>7006,68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.06">
            <text:p>63,0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02">
            <text:p>8302,00</text:p>
          </table:table-cell>
          <table:table-cell table:style-name="ce12N2" office:value-type="float" office:value="581.14">
            <text:p>58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733011447304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6">
            <text:p>310806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7.4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8.84">
            <text:p>181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18.84">
            <text:p>1718,84</text:p>
          </table:table-cell>
          <table:table-cell table:style-name="ce12N2" office:value-type="float" office:value="100">
            <text:p>1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1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29.78">
            <text:p>1629,78</text:p>
          </table:table-cell>
          <table:table-cell table:style-name="ce12N2" office:value-type="float" office:value="1.63">
            <text:p>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67">
            <text:p>14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8.84">
            <text:p>1818,84</text:p>
          </table:table-cell>
          <table:table-cell table:style-name="ce12N2" office:value-type="float" office:value="127.32">
            <text:p>127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080286760001035500100005744210044901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11">
            <text:p>31081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25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64.32">
            <text:p>706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64.32">
            <text:p>706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2324">
            <text:p>0,052</text:p>
          </table:table-cell>
          <table:table-cell table:style-name="ce12N2" office:value-type="float" office:value="12.98">
            <text:p>12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6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48.4">
            <text:p>6048,40</text:p>
          </table:table-cell>
          <table:table-cell table:style-name="ce12N2" office:value-type="float" office:value="6.05">
            <text:p>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43">
            <text:p>54,4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64.32">
            <text:p>7064,32</text:p>
          </table:table-cell>
          <table:table-cell table:style-name="ce12N2" office:value-type="float" office:value="399.41">
            <text:p>399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25912130919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0">
            <text:p>310830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8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5.57">
            <text:p>635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5.57">
            <text:p>635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56">
            <text:p>0,076</text:p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5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9.51">
            <text:p>569,51</text:p>
          </table:table-cell>
          <table:table-cell table:style-name="ce12N2" office:value-type="float" office:value="0.57">
            <text:p>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13">
            <text:p>5,1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5.57">
            <text:p>635,57</text:p>
          </table:table-cell>
          <table:table-cell table:style-name="ce12N2" office:value-type="float" office:value="44.49">
            <text:p>44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03650140001625500100004682015028445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43">
            <text:p>31084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92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96">
            <text:p>0,001</text:p>
          </table:table-cell>
          <table:table-cell table:style-name="ce12N2" office:value-type="float" office:value="2.22">
            <text:p>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90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27.25">
            <text:p>4127,25</text:p>
          </table:table-cell>
          <table:table-cell table:style-name="ce12N2" office:value-type="float" office:value="4.13">
            <text:p>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15">
            <text:p>37,1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342.32">
            <text:p>34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92018828105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0">
            <text:p>310860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7.9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72.14">
            <text:p>497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50.2">
            <text:p>4350,2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15294">
            <text:p>0,153</text:p>
          </table:table-cell>
          <table:table-cell table:style-name="ce12N2" office:value-type="float" office:value="2.36">
            <text:p>2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72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63.95">
            <text:p>3863,95</text:p>
          </table:table-cell>
          <table:table-cell table:style-name="ce12N2" office:value-type="float" office:value="3.86">
            <text:p>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78">
            <text:p>34,78</text:p>
          </table:table-cell>
          <table:table-cell table:style-name="ce12N2" office:value-type="float" office:value="42.25">
            <text:p>42,2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536.94">
            <text:p>536,94</text:p>
          </table:table-cell>
          <table:table-cell table:style-name="ce12N2" office:value-type="float" office:value="4435.2">
            <text:p>4435,20</text:p>
          </table:table-cell>
          <table:table-cell table:style-name="ce12N2" office:value-type="float" office:value="177.41">
            <text:p>177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106911580003705500100029791013807532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2">
            <text:p>310862</text:p>
          </table:table-cell>
          <table:table-cell table:style-name="ce0" table:number-columns-spanned="4" table:number-rows-spanned="1" office:value-type="string" calcext:value-type="string">
            <text:p>33.829 - STUDIO LAMPLUZ COMERCIO E SERVICOS LTDA</text:p>
          </table:table-cell>
          <table:covered-table-cell table:number-columns-repeated="3"/>
          <table:table-cell table:style-name="ce0" office:value-type="string" calcext:value-type="string">
            <text:p>6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6.05">
            <text:p>168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86.05">
            <text:p>1686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86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6.05">
            <text:p>1686,05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17">
            <text:p>15,17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86.05">
            <text:p>1686,05</text:p>
          </table:table-cell>
          <table:table-cell table:style-name="ce12N2" office:value-type="float" office:value="50.92">
            <text:p>50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83394770001865500100000061110000006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7">
            <text:p>3108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86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72.72">
            <text:p>347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423.33">
            <text:p>3423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777">
            <text:p>0,013</text:p>
          </table:table-cell>
          <table:table-cell table:style-name="ce12N2" office:value-type="float" office:value="4.81">
            <text:p>4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72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89.17">
            <text:p>2889,17</text:p>
          </table:table-cell>
          <table:table-cell table:style-name="ce12N2" office:value-type="float" office:value="2.89">
            <text:p>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49.39">
            <text:p>49,39</text:p>
          </table:table-cell>
          <table:table-cell table:style-name="ce12N2" office:value-type="float" office:value="3423.33">
            <text:p>3423,33</text:p>
          </table:table-cell>
          <table:table-cell table:style-name="ce12N2" office:value-type="float" office:value="239.63">
            <text:p>239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86211370120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72">
            <text:p>310872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703.45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55.42">
            <text:p>745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7249.38">
            <text:p>7249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7467">
            <text:p>1,237</text:p>
          </table:table-cell>
          <table:table-cell table:style-name="ce12N2" office:value-type="float" office:value="407.63">
            <text:p>407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55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70.03">
            <text:p>6170,03</text:p>
          </table:table-cell>
          <table:table-cell table:style-name="ce12N2" office:value-type="float" office:value="6.16">
            <text:p>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.54">
            <text:p>55,54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06.04">
            <text:p>206,04</text:p>
          </table:table-cell>
          <table:table-cell table:style-name="ce12N2" office:value-type="float" office:value="7249.38">
            <text:p>7249,38</text:p>
          </table:table-cell>
          <table:table-cell table:style-name="ce12N2" office:value-type="float" office:value="450.46">
            <text:p>45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7238370001725500000070345514313014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18">
            <text:p>31091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6.35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.8">
            <text:p>11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.8">
            <text:p>11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952">
            <text:p>0,030</text:p>
          </table:table-cell>
          <table:table-cell table:style-name="ce12N2" office:value-type="float" office:value="12.48">
            <text:p>12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1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.97">
            <text:p>103,97</text:p>
          </table:table-cell>
          <table:table-cell table:style-name="ce12N2" office:value-type="float" office:value="0.11">
            <text:p>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94">
            <text:p>0,9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8">
            <text:p>111,80</text:p>
          </table:table-cell>
          <table:table-cell table:style-name="ce12N2" office:value-type="float" office:value="7.83">
            <text:p>7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635718826942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24">
            <text:p>3109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9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75.35">
            <text:p>767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7622.27">
            <text:p>7622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911">
            <text:p>0,038</text:p>
          </table:table-cell>
          <table:table-cell table:style-name="ce12N2" office:value-type="float" office:value="11.4">
            <text:p>1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675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32.99">
            <text:p>6432,99</text:p>
          </table:table-cell>
          <table:table-cell table:style-name="ce12N2" office:value-type="float" office:value="6.43">
            <text:p>6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89">
            <text:p>57,8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53.08">
            <text:p>53,08</text:p>
          </table:table-cell>
          <table:table-cell table:style-name="ce12N2" office:value-type="float" office:value="7622.27">
            <text:p>7622,27</text:p>
          </table:table-cell>
          <table:table-cell table:style-name="ce12N2" office:value-type="float" office:value="533.56">
            <text:p>53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94918790966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6">
            <text:p>310956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5.7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13.25">
            <text:p>2613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423.2">
            <text:p>242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366">
            <text:p>0,224</text:p>
          </table:table-cell>
          <table:table-cell table:style-name="ce12N2" office:value-type="float" office:value="71">
            <text:p>7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13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98.19">
            <text:p>2098,19</text:p>
          </table:table-cell>
          <table:table-cell table:style-name="ce12N2" office:value-type="float" office:value="2.09">
            <text:p>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89">
            <text:p>18,89</text:p>
          </table:table-cell>
          <table:table-cell table:style-name="ce12N2" office:value-type="float" office:value="40.98">
            <text:p>40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90.05">
            <text:p>190,05</text:p>
          </table:table-cell>
          <table:table-cell table:style-name="ce12N2" office:value-type="float" office:value="2423.2">
            <text:p>2423,20</text:p>
          </table:table-cell>
          <table:table-cell table:style-name="ce12N2" office:value-type="float" office:value="111.15">
            <text:p>11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575810546203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95">
            <text:p>310995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6.35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.69">
            <text:p>7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.69">
            <text:p>76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685">
            <text:p>0,025</text:p>
          </table:table-cell>
          <table:table-cell table:style-name="ce12N2" office:value-type="float" office:value="12.5">
            <text:p>1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.32">
            <text:p>71,32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64">
            <text:p>0,6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.69">
            <text:p>76,69</text:p>
          </table:table-cell>
          <table:table-cell table:style-name="ce12N2" office:value-type="float" office:value="5.37">
            <text:p>5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63561117916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99">
            <text:p>31099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5.4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8.82">
            <text:p>678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6177.49">
            <text:p>6177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99">
            <text:p>0,037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788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76.03">
            <text:p>5376,03</text:p>
          </table:table-cell>
          <table:table-cell table:style-name="ce12N2" office:value-type="float" office:value="5.38">
            <text:p>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.38">
            <text:p>48,38</text:p>
          </table:table-cell>
          <table:table-cell table:style-name="ce12N2" office:value-type="float" office:value="54.48">
            <text:p>54,4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611.33">
            <text:p>611,33</text:p>
          </table:table-cell>
          <table:table-cell table:style-name="ce12N2" office:value-type="float" office:value="6177.49">
            <text:p>6177,49</text:p>
          </table:table-cell>
          <table:table-cell table:style-name="ce12N2" office:value-type="float" office:value="253.49">
            <text:p>253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546012322666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1">
            <text:p>311001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86.5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3.15">
            <text:p>247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473.15">
            <text:p>2473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415">
            <text:p>0,037</text:p>
          </table:table-cell>
          <table:table-cell table:style-name="ce12N2" office:value-type="float" office:value="28.12">
            <text:p>28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3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87.28">
            <text:p>2087,28</text:p>
          </table:table-cell>
          <table:table-cell table:style-name="ce12N2" office:value-type="float" office:value="2.08">
            <text:p>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78">
            <text:p>18,78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73.15">
            <text:p>2473,15</text:p>
          </table:table-cell>
          <table:table-cell table:style-name="ce12N2" office:value-type="float" office:value="173.12">
            <text:p>17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611441500006785500100128659415452363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19">
            <text:p>31101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10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83.82">
            <text:p>148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93.26">
            <text:p>1393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954">
            <text:p>0,014</text:p>
          </table:table-cell>
          <table:table-cell table:style-name="ce12N2" office:value-type="float" office:value="1.78">
            <text:p>1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83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75.88">
            <text:p>1175,88</text:p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58">
            <text:p>10,5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90.56">
            <text:p>90,56</text:p>
          </table:table-cell>
          <table:table-cell table:style-name="ce12N2" office:value-type="float" office:value="1393.26">
            <text:p>1393,26</text:p>
          </table:table-cell>
          <table:table-cell table:style-name="ce12N2" office:value-type="float" office:value="97.53">
            <text:p>9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10818262639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27">
            <text:p>311027</text:p>
          </table:table-cell>
          <table:table-cell table:style-name="ce0" table:number-columns-spanned="4" table:number-rows-spanned="1" office:value-type="string" calcext:value-type="string">
            <text:p>691 - CARDAL ELETRO METALURGICA LTDA</text:p>
          </table:table-cell>
          <table:covered-table-cell table:number-columns-repeated="3"/>
          <table:table-cell table:style-name="ce0" office:value-type="string" calcext:value-type="string">
            <text:p>169.6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88.43">
            <text:p>14088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2473.14">
            <text:p>12473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76">
            <text:p>0,026</text:p>
          </table:table-cell>
          <table:table-cell table:style-name="ce12N2" office:value-type="float" office:value="13.34">
            <text:p>13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088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27.02">
            <text:p>10527,02</text:p>
          </table:table-cell>
          <table:table-cell table:style-name="ce12N2" office:value-type="float" office:value="10.55">
            <text:p>10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4.75">
            <text:p>94,75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615.29">
            <text:p>1615,29</text:p>
          </table:table-cell>
          <table:table-cell table:style-name="ce12N2" office:value-type="float" office:value="12473.14">
            <text:p>12473,14</text:p>
          </table:table-cell>
          <table:table-cell table:style-name="ce12N2" office:value-type="float" office:value="873.13">
            <text:p>87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35628590001055500100016968019916968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68">
            <text:p>31106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7.43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.17">
            <text:p>8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.17">
            <text:p>8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734">
            <text:p>0,019</text:p>
          </table:table-cell>
          <table:table-cell table:style-name="ce12N2" office:value-type="float" office:value="10.35">
            <text:p>10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.49">
            <text:p>75,49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68">
            <text:p>0,68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.17">
            <text:p>81,17</text:p>
          </table:table-cell>
          <table:table-cell table:style-name="ce12N2" office:value-type="float" office:value="5.68">
            <text:p>5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743514321270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69">
            <text:p>311069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8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122.77">
            <text:p>14122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3304.87">
            <text:p>13304,87</text:p>
          </table:table-cell>
          <table:table-cell table:style-name="ce12N2" office:value-type="float" office:value="510">
            <text:p>510,00</text:p>
          </table:table-cell>
          <table:table-cell table:style-name="ce12N3" office:value-type="float" office:value="0.01188">
            <text:p>0,012</text:p>
          </table:table-cell>
          <table:table-cell table:style-name="ce12N2" office:value-type="float" office:value="17.73">
            <text:p>17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122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43.57">
            <text:p>12343,57</text:p>
          </table:table-cell>
          <table:table-cell table:style-name="ce12N2" office:value-type="float" office:value="12.36">
            <text:p>1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08">
            <text:p>111,08</text:p>
          </table:table-cell>
          <table:table-cell table:style-name="ce12N2" office:value-type="float" office:value="40">
            <text:p>4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307.9">
            <text:p>307,90</text:p>
          </table:table-cell>
          <table:table-cell table:style-name="ce12N2" office:value-type="float" office:value="13814.87">
            <text:p>13814,87</text:p>
          </table:table-cell>
          <table:table-cell table:style-name="ce12N2" office:value-type="float" office:value="967.04">
            <text:p>96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145707420003295500100001083611320102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4">
            <text:p>31111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69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3.27">
            <text:p>403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3.27">
            <text:p>403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36">
            <text:p>0,002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3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0.35">
            <text:p>340,35</text:p>
          </table:table-cell>
          <table:table-cell table:style-name="ce12N2" office:value-type="float" office:value="0.34">
            <text:p>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06">
            <text:p>3,0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3.27">
            <text:p>403,27</text:p>
          </table:table-cell>
          <table:table-cell table:style-name="ce12N2" office:value-type="float" office:value="28.23">
            <text:p>28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69815217140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9">
            <text:p>31111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96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9.16">
            <text:p>1379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79.16">
            <text:p>1379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0.78">
            <text:p>0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79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63.98">
            <text:p>1163,98</text:p>
          </table:table-cell>
          <table:table-cell table:style-name="ce12N2" office:value-type="float" office:value="1.16">
            <text:p>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48">
            <text:p>10,4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79.16">
            <text:p>1379,16</text:p>
          </table:table-cell>
          <table:table-cell table:style-name="ce12N2" office:value-type="float" office:value="96.54">
            <text:p>9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96217614855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47">
            <text:p>311147</text:p>
          </table:table-cell>
          <table:table-cell table:style-name="ce0" table:number-columns-spanned="4" table:number-rows-spanned="1" office:value-type="string" calcext:value-type="string">
            <text:p>16.628 - VFL IMPORTADORA E DISTRIBUIDORA LTDA</text:p>
          </table:table-cell>
          <table:covered-table-cell table:number-columns-repeated="3"/>
          <table:table-cell table:style-name="ce0" office:value-type="string" calcext:value-type="string">
            <text:p>4.8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1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81.5">
            <text:p>548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481.5">
            <text:p>548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9">
            <text:p>0,003</text:p>
          </table:table-cell>
          <table:table-cell table:style-name="ce12N2" office:value-type="float" office:value="2.05">
            <text:p>2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81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1.67">
            <text:p>61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81.5">
            <text:p>5481,50</text:p>
          </table:table-cell>
          <table:table-cell table:style-name="ce12N2" office:value-type="float" office:value="219.26">
            <text:p>21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051043590001225500100000485418323075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28">
            <text:p>28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005.5">
            <text:p>1005,5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760.14">
            <text:p>3760,14</text:p>
          </table:table-cell>
          <table:table-cell table:style-name="ce26N2" office:value-type="float" office:value="100591.15">
            <text:p>100591,15</text:p>
          </table:table-cell>
          <table:table-cell table:style-name="ce26N2" office:value-type="float" office:value="6287.3">
            <text:p>6287,3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04371.29">
            <text:p>104371,2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.629405">
            <text:p>2,629</text:p>
          </table:table-cell>
          <table:table-cell table:style-name="ce26N2" office:value-type="float" office:value="99605.65">
            <text:p>99605,65</text:p>
          </table:table-cell>
          <table:table-cell table:style-name="ce26N2" office:value-type="float" office:value="104371.29">
            <text:p>104371,2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1463.1">
            <text:p>81463,10</text:p>
          </table:table-cell>
          <table:table-cell table:style-name="ce26N2" office:value-type="float" office:value="81.49">
            <text:p>81,4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33.16">
            <text:p>733,16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181.88">
            <text:p>1181,8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3.13">
            <text:p>43,1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10" meta:object-count="0"/>
    <meta:generator>LibreOffice/4.3.0.4$Windows_x86 LibreOffice_project/62ad5818884a2fc2e5780dd45466868d41009ec0</meta:generator>
  </office:meta>
</office:document-meta>
</file>