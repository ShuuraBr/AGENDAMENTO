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8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7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>352607113895650002005700500040227210008870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6">
            <text:p>31011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1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22.22">
            <text:p>1622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2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84.01">
            <text:p>13684,01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16">
            <text:p>123,16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97.93">
            <text:p>397,93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745.5">
            <text:p>74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308456000149550050004571091168026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0">
            <text:p>3101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4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08">
            <text:p>0,037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8.26">
            <text:p>1218,26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6">
            <text:p>1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101.04">
            <text:p>1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4881356718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3">
            <text:p>3101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5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">
            <text:p>0,000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.76">
            <text:p>86,76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586137303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5">
            <text:p>3101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84">
            <text:p>0,004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.41">
            <text:p>614,41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53">
            <text:p>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50.96">
            <text:p>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48197179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5">
            <text:p>310175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16.66">
            <text:p>5916,66</text:p>
          </table:table-cell>
          <table:table-cell table:style-name="ce12N2" office:value-type="float" office:value="1347.76">
            <text:p>1347,7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38.8">
            <text:p>67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1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78.63">
            <text:p>4978,63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8">
            <text:p>44,8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525.62">
            <text:p>525,62</text:p>
          </table:table-cell>
          <table:table-cell table:style-name="ce12N2" office:value-type="float" office:value="5391.04">
            <text:p>5391,04</text:p>
          </table:table-cell>
          <table:table-cell table:style-name="ce12N2" office:value-type="float" office:value="215.64">
            <text:p>21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73.46">
            <text:p>9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094.265</text:p>
          </table:table-cell>
          <table:table-cell table:style-name="ce0" office:value-type="string" calcext:value-type="string">
            <text:p>11.562 - RODONAVES TRANSP E ENCOMENDAS LTDA</text:p>
          </table:table-cell>
          <table:table-cell table:style-name="ce0" office:value-type="string" calcext:value-type="string">
            <text:p>02/07/2026</text:p>
          </table:table-cell>
          <table:table-cell table:style-name="ce12" office:value-type="string" calcext:value-type="string">
            <text:p>973,4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41260617781412000109550010000120921000337215</text:p>
          </table:table-cell>
          <table:table-cell table:style-name="ce0" office:value-type="string" calcext:value-type="string">
            <text:p>4126074491499200382057003004094265104094265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1">
            <text:p>3102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1.88">
            <text:p>831,88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38.2">
            <text:p>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719741845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3">
            <text:p>31025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9107252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5">
            <text:p>31025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11234211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8">
            <text:p>31025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41665699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9">
            <text:p>31025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9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95">
            <text:p>0,121</text:p>
          </table:table-cell>
          <table:table-cell table:style-name="ce12N2" office:value-type="float" office:value="28.13">
            <text:p>28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92281859672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3">
            <text:p>310323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48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.42">
            <text:p>163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30.82">
            <text:p>13830,82</text:p>
          </table:table-cell>
          <table:table-cell table:style-name="ce12N2" office:value-type="float" office:value="13.82">
            <text:p>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48">
            <text:p>124,48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1.13">
            <text:p>401,13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753.72">
            <text:p>75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30845600014955005000457484103384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6">
            <text:p>310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0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3.53">
            <text:p>21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53">
            <text:p>0,033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7.17">
            <text:p>1757,17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81">
            <text:p>15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145.74">
            <text:p>14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0271306783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9">
            <text:p>310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452">
            <text:p>0,014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8.8">
            <text:p>2008,80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166.61">
            <text:p>16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820169358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3">
            <text:p>310353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3715.75">
            <text:p>53715,75</text:p>
          </table:table-cell>
          <table:table-cell table:style-name="ce12N2" office:value-type="float" office:value="8695.86">
            <text:p>8695,86</text:p>
          </table:table-cell>
          <table:table-cell table:style-name="ce12N3" office:value-type="float" office:value="256.85672">
            <text:p>256,857</text:p>
          </table:table-cell>
          <table:table-cell table:style-name="ce12N2" office:value-type="float" office:value="6302.75">
            <text:p>630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41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73.87">
            <text:p>52673,87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.07">
            <text:p>474,0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4368.8">
            <text:p>43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748200013755001000107936122899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6">
            <text:p>310356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5">
            <text:p>0,081</text:p>
          </table:table-cell>
          <table:table-cell table:style-name="ce12N2" office:value-type="float" office:value="14.7">
            <text:p>1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1.16">
            <text:p>2861,16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5">
            <text:p>25,7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0115381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7">
            <text:p>31035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73.58">
            <text:p>106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1">
            <text:p>0,500</text:p>
          </table:table-cell>
          <table:table-cell table:style-name="ce12N2" office:value-type="float" office:value="78.64">
            <text:p>7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81.81">
            <text:p>8981,81</text:p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86">
            <text:p>80,86</text:p>
          </table:table-cell>
          <table:table-cell table:style-name="ce12N2" office:value-type="float" office:value="62.92">
            <text:p>62,9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1.3">
            <text:p>31,3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744.97">
            <text:p>74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1173183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9">
            <text:p>31035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4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92">
            <text:p>0,022</text:p>
          </table:table-cell>
          <table:table-cell table:style-name="ce12N2" office:value-type="float" office:value="10.2">
            <text:p>1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2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.96">
            <text:p>474,96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39.39">
            <text:p>3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44201022787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6">
            <text:p>3103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1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7.7">
            <text:p>1257,70</text:p>
          </table:table-cell>
          <table:table-cell table:style-name="ce12N2" office:value-type="float" office:value="1.26">
            <text:p>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2">
            <text:p>1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1811887638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0">
            <text:p>3103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5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22">
            <text:p>4006,22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332.28">
            <text:p>33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5531244497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5">
            <text:p>31038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73.46">
            <text:p>236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">
            <text:p>68,0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5906">
            <text:p>1,106</text:p>
          </table:table-cell>
          <table:table-cell table:style-name="ce12N2" office:value-type="float" office:value="147.79">
            <text:p>14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67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28.11">
            <text:p>20028,11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25">
            <text:p>180,25</text:p>
          </table:table-cell>
          <table:table-cell table:style-name="ce12N2" office:value-type="float" office:value="92">
            <text:p>9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247.1">
            <text:p>247,1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1356.9">
            <text:p>135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81168068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0">
            <text:p>31042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50.28">
            <text:p>57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5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6">
            <text:p>47,16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0.84">
            <text:p>510,84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366.76">
            <text:p>36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29608000144550010002669121002669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4">
            <text:p>310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0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67.24">
            <text:p>2767,24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91">
            <text:p>24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229.52">
            <text:p>22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0691956017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4">
            <text:p>310444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3.65">
            <text:p>393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3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6.54">
            <text:p>3206,54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6">
            <text:p>28,86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61.5">
            <text:p>461,5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138.88">
            <text:p>13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111361121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2">
            <text:p>3104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8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.74">
            <text:p>346,74</text:p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8301658019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3">
            <text:p>3104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55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98.18">
            <text:p>4098,18</text:p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8">
            <text:p>36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339.91">
            <text:p>33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0011006198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5">
            <text:p>31047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47.67">
            <text:p>464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7.6">
            <text:p>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4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8.25">
            <text:p>3888,25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37.33">
            <text:p>437,33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168.42">
            <text:p>1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11202722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9">
            <text:p>31047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4.71">
            <text:p>165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7">
            <text:p>13,57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47">
            <text:p>147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05.54">
            <text:p>10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71943254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1">
            <text:p>31048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7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4.27">
            <text:p>10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384">
            <text:p>1,384</text:p>
          </table:table-cell>
          <table:table-cell table:style-name="ce12N2" office:value-type="float" office:value="1141.08">
            <text:p>11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4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3.73">
            <text:p>8473,73</text:p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26">
            <text:p>76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84.01">
            <text:p>84,01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702.82">
            <text:p>70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681867000130550010009577961520524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3">
            <text:p>310533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94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79.36">
            <text:p>487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638.62">
            <text:p>463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7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.14">
            <text:p>4041,14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73">
            <text:p>7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40.74">
            <text:p>240,74</text:p>
          </table:table-cell>
          <table:table-cell table:style-name="ce12N2" office:value-type="float" office:value="4638.62">
            <text:p>4638,62</text:p>
          </table:table-cell>
          <table:table-cell table:style-name="ce12N2" office:value-type="float" office:value="185.55">
            <text:p>1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023429000143550010003942241750641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7">
            <text:p>310547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66">
            <text:p>2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75.35">
            <text:p>1875,35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7">
            <text:p>16,8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90.96">
            <text:p>290,96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81.23">
            <text:p>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641597311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5">
            <text:p>310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8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8">
            <text:p>0,01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0.78">
            <text:p>3180,78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3">
            <text:p>28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263.82">
            <text:p>2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8061373101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8">
            <text:p>310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9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5">
            <text:p>0,001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1.47">
            <text:p>1681,47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3">
            <text:p>15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9051672752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6">
            <text:p>46,00</text:p>
          </table:table-cell>
          <table:table-cell table:style-name="ce26N2" office:value-type="float" office:value="1347.76">
            <text:p>1347,76</text:p>
          </table:table-cell>
          <table:table-cell table:style-name="ce26N2" office:value-type="float" office:value="9006.36">
            <text:p>9006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111.64">
            <text:p>4111,64</text:p>
          </table:table-cell>
          <table:table-cell table:style-name="ce26N2" office:value-type="float" office:value="247026.61">
            <text:p>247026,61</text:p>
          </table:table-cell>
          <table:table-cell table:style-name="ce26N2" office:value-type="float" office:value="15215.43">
            <text:p>15215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63.18">
            <text:p>1063,18</text:p>
          </table:table-cell>
          <table:table-cell table:style-name="ce26N2" office:value-type="float" office:value="251158.25">
            <text:p>251158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65.708847">
            <text:p>265,709</text:p>
          </table:table-cell>
          <table:table-cell table:style-name="ce26N2" office:value-type="float" office:value="239388.01">
            <text:p>239388,01</text:p>
          </table:table-cell>
          <table:table-cell table:style-name="ce26N2" office:value-type="float" office:value="251158.25">
            <text:p>251158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8584.5">
            <text:p>208584,50</text:p>
          </table:table-cell>
          <table:table-cell table:style-name="ce26N2" office:value-type="float" office:value="208.58">
            <text:p>20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877.31">
            <text:p>1877,3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984.85">
            <text:p>9984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1.79">
            <text:p>61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98" meta:object-count="0"/>
    <meta:generator>LibreOffice/4.3.0.4$Windows_x86 LibreOffice_project/62ad5818884a2fc2e5780dd45466868d41009ec0</meta:generator>
  </office:meta>
</office:document-meta>
</file>