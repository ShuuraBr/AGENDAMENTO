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1/06/2026 04:30:33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9">
            <text:p>30829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403">
            <text:p>0,509</text:p>
          </table:table-cell>
          <table:table-cell table:style-name="ce12N2" office:value-type="float" office:value="227.97">
            <text:p>227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58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11814268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1">
            <text:p>3083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768">
            <text:p>0,147</text:p>
          </table:table-cell>
          <table:table-cell table:style-name="ce12N2" office:value-type="float" office:value="161.33">
            <text:p>16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7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31943109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0">
            <text:p>3083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6.01">
            <text:p>47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86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9.62">
            <text:p>449,62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24111377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7">
            <text:p>308317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9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61">
            <text:p>727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963">
            <text:p>0,232</text:p>
          </table:table-cell>
          <table:table-cell table:style-name="ce12N2" office:value-type="float" office:value="32.52">
            <text:p>3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8.26">
            <text:p>6098,26</text:p>
          </table:table-cell>
          <table:table-cell table:style-name="ce12N2" office:value-type="float" office:value="6.06">
            <text:p>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86">
            <text:p>54,86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465.38">
            <text:p>4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98501725550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1">
            <text:p>308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51">
            <text:p>1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374">
            <text:p>0,194</text:p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8.49">
            <text:p>938,49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201287701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2">
            <text:p>30833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12">
            <text:p>138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412">
            <text:p>0,08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.47">
            <text:p>1153,47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8">
            <text:p>10,38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191817718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3">
            <text:p>3083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.74">
            <text:p>83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602">
            <text:p>0,07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6.04">
            <text:p>706,04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58.56">
            <text:p>5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6981515604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94">
            <text:p>3083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5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08.18">
            <text:p>2808,18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27">
            <text:p>25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5501077625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7">
            <text:p>308437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61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6.4">
            <text:p>428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.66">
            <text:p>4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96.78">
            <text:p>3396,78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1.6">
            <text:p>261,6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281.76">
            <text:p>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618121299841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5">
            <text:p>30845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5.63">
            <text:p>22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9">
            <text:p>0,01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6.34">
            <text:p>1856,34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1">
            <text:p>16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55.53">
            <text:p>255,53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80.4">
            <text:p>8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3381426574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4">
            <text:p>30846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6.88">
            <text:p>24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4.86">
            <text:p>3874,86</text:p>
          </table:table-cell>
          <table:table-cell table:style-name="ce12N2" office:value-type="float" office:value="3.87">
            <text:p>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88">
            <text:p>34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321.38">
            <text:p>3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3165675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9">
            <text:p>3085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51060385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74">
            <text:p>30857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7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3.2">
            <text:p>921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8317.26">
            <text:p>8317,2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7412">
            <text:p>0,007</text:p>
          </table:table-cell>
          <table:table-cell table:style-name="ce12N2" office:value-type="float" office:value="13.2">
            <text:p>1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20.03">
            <text:p>7320,03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87">
            <text:p>65,87</text:p>
          </table:table-cell>
          <table:table-cell table:style-name="ce12N2" office:value-type="float" office:value="55.74">
            <text:p>55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810.94">
            <text:p>810,94</text:p>
          </table:table-cell>
          <table:table-cell table:style-name="ce12N2" office:value-type="float" office:value="8402.26">
            <text:p>8402,26</text:p>
          </table:table-cell>
          <table:table-cell table:style-name="ce12N2" office:value-type="float" office:value="336.11">
            <text:p>33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47541784828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1">
            <text:p>3085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.72">
            <text:p>1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.12">
            <text:p>90,12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7.47">
            <text:p>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51572235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4">
            <text:p>3085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5">
            <text:p>10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4">
            <text:p>84,40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4102026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3">
            <text:p>30862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86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05">
            <text:p>0,067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.85">
            <text:p>305,85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75">
            <text:p>2,7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23.02">
            <text:p>2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86216029958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5">
            <text:p>308625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39.85">
            <text:p>573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3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07">
            <text:p>47,07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509.91">
            <text:p>509,91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366.1">
            <text:p>3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7721002637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6">
            <text:p>30862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5.5">
            <text:p>194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4002">
            <text:p>0,964</text:p>
          </table:table-cell>
          <table:table-cell table:style-name="ce12N2" office:value-type="float" office:value="94.1">
            <text:p>9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83.16">
            <text:p>16683,1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.17">
            <text:p>150,1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.8">
            <text:p>71,8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960.07">
            <text:p>9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51688803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2">
            <text:p>3086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.66">
            <text:p>19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.67">
            <text:p>152,67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115352056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7">
            <text:p>3086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01577498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70">
            <text:p>308670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5.13">
            <text:p>75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029.44">
            <text:p>7029,44</text:p>
          </table:table-cell>
          <table:table-cell table:style-name="ce12N2" office:value-type="float" office:value="421.77">
            <text:p>421,77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96.59">
            <text:p>6896,59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07">
            <text:p>62,07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3.92">
            <text:p>83,92</text:p>
          </table:table-cell>
          <table:table-cell table:style-name="ce12N2" office:value-type="float" office:value="7451.21">
            <text:p>7451,21</text:p>
          </table:table-cell>
          <table:table-cell table:style-name="ce12N2" office:value-type="float" office:value="298.05">
            <text:p>29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4855633000140550010000776971314203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3">
            <text:p>30871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3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9.43">
            <text:p>419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53.36">
            <text:p>375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4">
            <text:p>0,057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9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28.38">
            <text:p>3228,38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05">
            <text:p>29,05</text:p>
          </table:table-cell>
          <table:table-cell table:style-name="ce12N2" office:value-type="float" office:value="40.51">
            <text:p>40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3753.36">
            <text:p>3753,36</text:p>
          </table:table-cell>
          <table:table-cell table:style-name="ce12N2" office:value-type="float" office:value="195.91">
            <text:p>19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322113308556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4">
            <text:p>30872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8.92">
            <text:p>397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78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63">
            <text:p>32,63</text:p>
          </table:table-cell>
          <table:table-cell table:style-name="ce12N2" office:value-type="float" office:value="34.38">
            <text:p>34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53.48">
            <text:p>353,48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253.78">
            <text:p>25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1211002641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0">
            <text:p>30873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5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5">
            <text:p>0,009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0.59">
            <text:p>1950,59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56">
            <text:p>17,56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161.78">
            <text:p>16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151110717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5">
            <text:p>3087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4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68">
            <text:p>0,011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8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64.48">
            <text:p>2264,48</text:p>
          </table:table-cell>
          <table:table-cell table:style-name="ce12N2" office:value-type="float" office:value="2.26">
            <text:p>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187.82">
            <text:p>18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4381181763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5">
            <text:p>308775</text:p>
          </table:table-cell>
          <table:table-cell table:style-name="ce0" table:number-columns-spanned="4" table:number-rows-spanned="1" office:value-type="string" calcext:value-type="string">
            <text:p>10.562 - RENATO MARTINS CIOFFOLETTI ILUM. EPP</text:p>
          </table:table-cell>
          <table:covered-table-cell table:number-columns-repeated="3"/>
          <table:table-cell table:style-name="ce0" office:value-type="string" calcext:value-type="string">
            <text:p>18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41.48">
            <text:p>4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373734000120550010000188121106787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4">
            <text:p>308784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7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23">
            <text:p>195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776">
            <text:p>0,054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1.77">
            <text:p>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98">
            <text:p>15,98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73.26">
            <text:p>173,26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124.39">
            <text:p>12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0228132000136550010000097491280346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4">
            <text:p>30883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2.89">
            <text:p>100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1002.89">
            <text:p>1002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2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781001822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6">
            <text:p>308836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1.1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7.44">
            <text:p>293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76.48">
            <text:p>267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1856">
            <text:p>0,102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7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6.48">
            <text:p>2676,48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9">
            <text:p>24,0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60.96">
            <text:p>260,96</text:p>
          </table:table-cell>
          <table:table-cell table:style-name="ce12N2" office:value-type="float" office:value="2676.48">
            <text:p>2676,48</text:p>
          </table:table-cell>
          <table:table-cell table:style-name="ce12N2" office:value-type="float" office:value="187.35">
            <text:p>18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70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3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35260609306858000153550010000711251499070848</text:p>
          </table:table-cell>
          <table:table-cell table:style-name="ce0" office:value-type="string" calcext:value-type="string">
            <text:p>3526061138956500020057005000400706100087004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9">
            <text:p>30883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20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8.32">
            <text:p>584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412.32">
            <text:p>541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010704">
            <text:p>30,011</text:p>
          </table:table-cell>
          <table:table-cell table:style-name="ce12N2" office:value-type="float" office:value="43.2">
            <text:p>4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4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5.22">
            <text:p>4715,22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53.91">
            <text:p>53,9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36">
            <text:p>436,00</text:p>
          </table:table-cell>
          <table:table-cell table:style-name="ce12N2" office:value-type="float" office:value="5412.32">
            <text:p>5412,32</text:p>
          </table:table-cell>
          <table:table-cell table:style-name="ce12N2" office:value-type="float" office:value="216.49">
            <text:p>216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20311369945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1">
            <text:p>308851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844">
            <text:p>0,118</text:p>
          </table:table-cell>
          <table:table-cell table:style-name="ce12N2" office:value-type="float" office:value="236.84">
            <text:p>23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52">
            <text:p>3317,5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275.16">
            <text:p>2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171469860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3">
            <text:p>30885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2.34">
            <text:p>7892,34</text:p>
          </table:table-cell>
          <table:table-cell table:style-name="ce12N2" office:value-type="float" office:value="1797.8">
            <text:p>1797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89">
            <text:p>89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41.07">
            <text:p>6641,07</text:p>
          </table:table-cell>
          <table:table-cell table:style-name="ce12N2" office:value-type="float" office:value="6.64">
            <text:p>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77">
            <text:p>59,7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01.14">
            <text:p>701,14</text:p>
          </table:table-cell>
          <table:table-cell table:style-name="ce12N2" office:value-type="float" office:value="7191.2">
            <text:p>7191,20</text:p>
          </table:table-cell>
          <table:table-cell table:style-name="ce12N2" office:value-type="float" office:value="287.65">
            <text:p>28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77814120001095500100001207910003370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8">
            <text:p>308858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0.76">
            <text:p>369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2.88">
            <text:p>336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0.53">
            <text:p>3110,53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27.88">
            <text:p>327,88</text:p>
          </table:table-cell>
          <table:table-cell table:style-name="ce12N2" office:value-type="float" office:value="3362.88">
            <text:p>3362,88</text:p>
          </table:table-cell>
          <table:table-cell table:style-name="ce12N2" office:value-type="float" office:value="134.52">
            <text:p>13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771626300010255001000010827140110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7">
            <text:p>30886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7.4">
            <text:p>530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0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4.84">
            <text:p>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52">
            <text:p>43,52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71.5">
            <text:p>471,5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338.52">
            <text:p>33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2131002642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1">
            <text:p>41,00</text:p>
          </table:table-cell>
          <table:table-cell table:style-name="ce26N2" office:value-type="float" office:value="1797.8">
            <text:p>1797,80</text:p>
          </table:table-cell>
          <table:table-cell table:style-name="ce26N2" office:value-type="float" office:value="506.77">
            <text:p>506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311.25">
            <text:p>6311,25</text:p>
          </table:table-cell>
          <table:table-cell table:style-name="ce26N2" office:value-type="float" office:value="137029.52">
            <text:p>137029,52</text:p>
          </table:table-cell>
          <table:table-cell table:style-name="ce26N2" office:value-type="float" office:value="7726.12">
            <text:p>7726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179227.74">
            <text:p>179227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3.213882">
            <text:p>33,214</text:p>
          </table:table-cell>
          <table:table-cell table:style-name="ce26N2" office:value-type="float" office:value="174207.52">
            <text:p>174207,52</text:p>
          </table:table-cell>
          <table:table-cell table:style-name="ce26N2" office:value-type="float" office:value="179227.74">
            <text:p>179227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6047.86">
            <text:p>116047,86</text:p>
          </table:table-cell>
          <table:table-cell table:style-name="ce26N2" office:value-type="float" office:value="116.05">
            <text:p>116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44.41">
            <text:p>1044,4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328.61">
            <text:p>1328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.28">
            <text:p>43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68" meta:object-count="0"/>
    <meta:generator>LibreOffice/4.3.0.4$Windows_x86 LibreOffice_project/62ad5818884a2fc2e5780dd45466868d41009ec0</meta:generator>
  </office:meta>
</office:document-meta>
</file>