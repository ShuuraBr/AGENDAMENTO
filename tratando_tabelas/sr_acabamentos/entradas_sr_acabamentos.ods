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6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4">
            <text:p>30872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8.92">
            <text:p>397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78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63">
            <text:p>32,63</text:p>
          </table:table-cell>
          <table:table-cell table:style-name="ce12N2" office:value-type="float" office:value="34.38">
            <text:p>34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53.48">
            <text:p>353,48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253.78">
            <text:p>25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1211002641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5">
            <text:p>308775</text:p>
          </table:table-cell>
          <table:table-cell table:style-name="ce0" table:number-columns-spanned="4" table:number-rows-spanned="1" office:value-type="string" calcext:value-type="string">
            <text:p>10.562 - RENATO MARTINS CIOFFOLETTI ILUM. EPP</text:p>
          </table:table-cell>
          <table:covered-table-cell table:number-columns-repeated="3"/>
          <table:table-cell table:style-name="ce0" office:value-type="string" calcext:value-type="string">
            <text:p>18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41.48">
            <text:p>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373734000120550010000188121106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3">
            <text:p>30885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2.34">
            <text:p>7892,34</text:p>
          </table:table-cell>
          <table:table-cell table:style-name="ce12N2" office:value-type="float" office:value="1797.8">
            <text:p>1797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89">
            <text:p>89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41.07">
            <text:p>6641,07</text:p>
          </table:table-cell>
          <table:table-cell table:style-name="ce12N2" office:value-type="float" office:value="6.64">
            <text:p>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77">
            <text:p>59,7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01.14">
            <text:p>701,14</text:p>
          </table:table-cell>
          <table:table-cell table:style-name="ce12N2" office:value-type="float" office:value="7191.2">
            <text:p>7191,20</text:p>
          </table:table-cell>
          <table:table-cell table:style-name="ce12N2" office:value-type="float" office:value="287.65">
            <text:p>28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77814120001095500100001207910003370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8">
            <text:p>308858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0.76">
            <text:p>369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0.53">
            <text:p>3110,53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27.88">
            <text:p>327,88</text:p>
          </table:table-cell>
          <table:table-cell table:style-name="ce12N2" office:value-type="float" office:value="3362.88">
            <text:p>3362,88</text:p>
          </table:table-cell>
          <table:table-cell table:style-name="ce12N2" office:value-type="float" office:value="134.52">
            <text:p>13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771626300010255001000010827140110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7">
            <text:p>30886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7.4">
            <text:p>53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4.84">
            <text:p>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52">
            <text:p>43,52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71.5">
            <text:p>471,5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338.52">
            <text:p>33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2131002642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9">
            <text:p>30901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8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4.54">
            <text:p>578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3">
            <text:p>0,048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43">
            <text:p>47,43</text:p>
          </table:table-cell>
          <table:table-cell table:style-name="ce12N2" office:value-type="float" office:value="44.06">
            <text:p>44,0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13.89">
            <text:p>513,89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368.94">
            <text:p>36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6.77">
            <text:p>11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6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6/2026</text:p>
          </table:table-cell>
          <table:table-cell table:style-name="ce12" office:value-type="string" calcext:value-type="string">
            <text:p>116,77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30228132000136550010000098901217910610</text:p>
          </table:table-cell>
          <table:table-cell table:style-name="ce0" office:value-type="string" calcext:value-type="string">
            <text:p>352606113895650002005700500040106310008737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2">
            <text:p>30902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42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5.86">
            <text:p>59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2.25">
            <text:p>4542,25</text:p>
          </table:table-cell>
          <table:table-cell table:style-name="ce12N2" office:value-type="float" office:value="4.54">
            <text:p>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88">
            <text:p>40,88</text:p>
          </table:table-cell>
          <table:table-cell table:style-name="ce12N2" office:value-type="float" office:value="43.04">
            <text:p>43,0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782.07">
            <text:p>782,07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208.55">
            <text:p>20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4251401028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0">
            <text:p>309030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9.8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2.09">
            <text:p>15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.76">
            <text:p>137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34.33">
            <text:p>134,33</text:p>
          </table:table-cell>
          <table:table-cell table:style-name="ce12N2" office:value-type="float" office:value="1377.76">
            <text:p>1377,76</text:p>
          </table:table-cell>
          <table:table-cell table:style-name="ce12N2" office:value-type="float" office:value="96.44">
            <text:p>9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7.01">
            <text:p>4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1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0/06/2026</text:p>
          </table:table-cell>
          <table:table-cell table:style-name="ce12" office:value-type="string" calcext:value-type="string">
            <text:p>47,0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10713221000160550020000098871000132474</text:p>
          </table:table-cell>
          <table:table-cell table:style-name="ce0" office:value-type="string" calcext:value-type="string">
            <text:p>3526061138956500020057005000401013100087326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2">
            <text:p>3090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.66">
            <text:p>130,66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01721119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4">
            <text:p>3090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9471789578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6">
            <text:p>309146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6">
            <text:p>0,076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.51">
            <text:p>569,51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3">
            <text:p>5,13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5.57">
            <text:p>635,57</text:p>
          </table:table-cell>
          <table:table-cell table:style-name="ce12N2" office:value-type="float" office:value="44.49">
            <text:p>4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3650140001625500100004649915253176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0">
            <text:p>3091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196">
            <text:p>0,126</text:p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7.47">
            <text:p>1817,47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35">
            <text:p>16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83.45">
            <text:p>8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2151114842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1">
            <text:p>21,00</text:p>
          </table:table-cell>
          <table:table-cell table:style-name="ce26N2" office:value-type="float" office:value="1797.8">
            <text:p>1797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97.79">
            <text:p>3497,79</text:p>
          </table:table-cell>
          <table:table-cell table:style-name="ce26N2" office:value-type="float" office:value="79735.16">
            <text:p>79735,16</text:p>
          </table:table-cell>
          <table:table-cell table:style-name="ce26N2" office:value-type="float" office:value="4460.39">
            <text:p>4460,3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3.78">
            <text:p>163,78</text:p>
          </table:table-cell>
          <table:table-cell table:style-name="ce26N2" office:value-type="float" office:value="83380.45">
            <text:p>83380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891119">
            <text:p>1,891</text:p>
          </table:table-cell>
          <table:table-cell table:style-name="ce26N2" office:value-type="float" office:value="81680.46">
            <text:p>81680,46</text:p>
          </table:table-cell>
          <table:table-cell table:style-name="ce26N2" office:value-type="float" office:value="83380.45">
            <text:p>83380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8778.55">
            <text:p>68778,55</text:p>
          </table:table-cell>
          <table:table-cell table:style-name="ce26N2" office:value-type="float" office:value="68.83">
            <text:p>68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9.04">
            <text:p>619,0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02.63">
            <text:p>502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3.14">
            <text:p>53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48" meta:object-count="0"/>
    <meta:generator>LibreOffice/4.3.0.4$Windows_x86 LibreOffice_project/62ad5818884a2fc2e5780dd45466868d41009ec0</meta:generator>
  </office:meta>
</office:document-meta>
</file>