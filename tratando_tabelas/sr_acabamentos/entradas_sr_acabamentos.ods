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28/05/2026 07:42:19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122">
            <text:p>307122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.31">
            <text:p>6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86">
            <text:p>0,0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5.62">
            <text:p>5,62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4.04">
            <text:p>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2901435141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17">
            <text:p>307317</text:p>
          </table:table-cell>
          <table:table-cell table:style-name="ce0" table:number-columns-spanned="4" table:number-rows-spanned="1" office:value-type="string" calcext:value-type="string">
            <text:p>17.596 - LIGHT ENGINE ILUMINACAO</text:p>
          </table:table-cell>
          <table:covered-table-cell table:number-columns-repeated="3"/>
          <table:table-cell table:style-name="ce0" office:value-type="string" calcext:value-type="string">
            <text:p>98.160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27.12">
            <text:p>172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73.69">
            <text:p>1573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27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153.43">
            <text:p>153,43</text:p>
          </table:table-cell>
          <table:table-cell table:style-name="ce12N2" office:value-type="float" office:value="1573.69">
            <text:p>1573,69</text:p>
          </table:table-cell>
          <table:table-cell table:style-name="ce12N2" office:value-type="float" office:value="110.16">
            <text:p>110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45461650003935500400009816019620208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97">
            <text:p>307597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19.0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68.05">
            <text:p>2568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318.08">
            <text:p>2318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">
            <text:p>0,0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68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0.64">
            <text:p>40,6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249.97">
            <text:p>249,97</text:p>
          </table:table-cell>
          <table:table-cell table:style-name="ce12N2" office:value-type="float" office:value="2318.08">
            <text:p>2318,08</text:p>
          </table:table-cell>
          <table:table-cell table:style-name="ce12N2" office:value-type="float" office:value="162.27">
            <text:p>16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94164590001205500100081900514178620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05">
            <text:p>30760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1.19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80.85">
            <text:p>1880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772.32">
            <text:p>1772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6807">
            <text:p>0,027</text:p>
          </table:table-cell>
          <table:table-cell table:style-name="ce12N2" office:value-type="float" office:value="5.24">
            <text:p>5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80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108.53">
            <text:p>108,53</text:p>
          </table:table-cell>
          <table:table-cell table:style-name="ce12N2" office:value-type="float" office:value="1772.32">
            <text:p>1772,32</text:p>
          </table:table-cell>
          <table:table-cell table:style-name="ce12N2" office:value-type="float" office:value="108.42">
            <text:p>108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119819808191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53">
            <text:p>307753</text:p>
          </table:table-cell>
          <table:table-cell table:style-name="ce0" table:number-columns-spanned="4" table:number-rows-spanned="1" office:value-type="string" calcext:value-type="string">
            <text:p>14.934 - MUNDIAL IMP. E EXP. COMERCIAL LTDA</text:p>
          </table:table-cell>
          <table:covered-table-cell table:number-columns-repeated="3"/>
          <table:table-cell table:style-name="ce0" office:value-type="string" calcext:value-type="string">
            <text:p>10.7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77.49">
            <text:p>5277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808.64">
            <text:p>4808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77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468.85">
            <text:p>468,85</text:p>
          </table:table-cell>
          <table:table-cell table:style-name="ce12N2" office:value-type="float" office:value="4808.64">
            <text:p>4808,64</text:p>
          </table:table-cell>
          <table:table-cell table:style-name="ce12N2" office:value-type="float" office:value="192.35">
            <text:p>192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177162630001025500100001076313972643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60">
            <text:p>307760</text:p>
          </table:table-cell>
          <table:table-cell table:style-name="ce0" table:number-columns-spanned="4" table:number-rows-spanned="1" office:value-type="string" calcext:value-type="string">
            <text:p>20.116 - MS DISTRIBUIDORA LTDA</text:p>
          </table:table-cell>
          <table:covered-table-cell table:number-columns-repeated="3"/>
          <table:table-cell table:style-name="ce0" office:value-type="string" calcext:value-type="string">
            <text:p>46.5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27.87">
            <text:p>252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350.19">
            <text:p>2350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">
            <text:p>0,700</text:p>
          </table:table-cell>
          <table:table-cell table:style-name="ce12N2" office:value-type="float" office:value="145.8">
            <text:p>145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27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177.68">
            <text:p>177,68</text:p>
          </table:table-cell>
          <table:table-cell table:style-name="ce12N2" office:value-type="float" office:value="2350.19">
            <text:p>2350,19</text:p>
          </table:table-cell>
          <table:table-cell table:style-name="ce12N2" office:value-type="float" office:value="109.84">
            <text:p>109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6242510001515500100004659910003456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76">
            <text:p>307776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2.9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.96">
            <text:p>65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5.96">
            <text:p>65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262">
            <text:p>0,004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5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.96">
            <text:p>65,96</text:p>
          </table:table-cell>
          <table:table-cell table:style-name="ce12N2" office:value-type="float" office:value="4.62">
            <text:p>4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5295719518099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49">
            <text:p>307949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3.0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83.18">
            <text:p>288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592.9">
            <text:p>2592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83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1.15">
            <text:p>31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290.28">
            <text:p>290,28</text:p>
          </table:table-cell>
          <table:table-cell table:style-name="ce12N2" office:value-type="float" office:value="2592.9">
            <text:p>2592,90</text:p>
          </table:table-cell>
          <table:table-cell table:style-name="ce12N2" office:value-type="float" office:value="181.5">
            <text:p>181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83296080001445500100026308210026308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60">
            <text:p>30796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1.09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49.44">
            <text:p>4249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249.44">
            <text:p>424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09">
            <text:p>0,009</text:p>
          </table:table-cell>
          <table:table-cell table:style-name="ce12N2" office:value-type="float" office:value="5.26">
            <text:p>5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49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49.44">
            <text:p>4249,44</text:p>
          </table:table-cell>
          <table:table-cell table:style-name="ce12N2" office:value-type="float" office:value="297.46">
            <text:p>297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109911342889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79">
            <text:p>307979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4.13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5.9">
            <text:p>595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95.9">
            <text:p>595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136">
            <text:p>0,081</text:p>
          </table:table-cell>
          <table:table-cell table:style-name="ce12N2" office:value-type="float" office:value="26.3">
            <text:p>26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95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5.9">
            <text:p>595,90</text:p>
          </table:table-cell>
          <table:table-cell table:style-name="ce12N2" office:value-type="float" office:value="41.71">
            <text:p>41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413312729072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82">
            <text:p>307982</text:p>
          </table:table-cell>
          <table:table-cell table:style-name="ce0" table:number-columns-spanned="4" table:number-rows-spanned="1" office:value-type="string" calcext:value-type="string">
            <text:p>17.338 - ELGIN DISTRIBUIDORA LTDA</text:p>
          </table:table-cell>
          <table:covered-table-cell table:number-columns-repeated="3"/>
          <table:table-cell table:style-name="ce0" office:value-type="string" calcext:value-type="string">
            <text:p>385.6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8.02">
            <text:p>178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5.14">
            <text:p>165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8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2.88">
            <text:p>12,88</text:p>
          </table:table-cell>
          <table:table-cell table:style-name="ce12N2" office:value-type="float" office:value="165.14">
            <text:p>165,14</text:p>
          </table:table-cell>
          <table:table-cell table:style-name="ce12N2" office:value-type="float" office:value="6.61">
            <text:p>6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70234290001435500100038566610605592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84">
            <text:p>3079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54.09">
            <text:p>3354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54.09">
            <text:p>3354,0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1872">
            <text:p>0,092</text:p>
          </table:table-cell>
          <table:table-cell table:style-name="ce12N2" office:value-type="float" office:value="3.9">
            <text:p>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54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54.09">
            <text:p>3354,09</text:p>
          </table:table-cell>
          <table:table-cell table:style-name="ce12N2" office:value-type="float" office:value="134.16">
            <text:p>13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2217143173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31">
            <text:p>30803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3.0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309714994569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32">
            <text:p>30803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3.0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6.09">
            <text:p>1406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20.27">
            <text:p>1320,2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383">
            <text:p>0,022</text:p>
          </table:table-cell>
          <table:table-cell table:style-name="ce12N2" office:value-type="float" office:value="8.4">
            <text:p>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6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85.82">
            <text:p>85,82</text:p>
          </table:table-cell>
          <table:table-cell table:style-name="ce12N2" office:value-type="float" office:value="1320.27">
            <text:p>1320,27</text:p>
          </table:table-cell>
          <table:table-cell table:style-name="ce12N2" office:value-type="float" office:value="52.81">
            <text:p>52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309819510635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59">
            <text:p>308059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4.1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9.88">
            <text:p>3149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92.6">
            <text:p>2792,60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2995">
            <text:p>0,030</text:p>
          </table:table-cell>
          <table:table-cell table:style-name="ce12N2" office:value-type="float" office:value="27.4">
            <text:p>27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49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1.62">
            <text:p>41,6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272.28">
            <text:p>272,28</text:p>
          </table:table-cell>
          <table:table-cell table:style-name="ce12N2" office:value-type="float" office:value="2877.6">
            <text:p>2877,60</text:p>
          </table:table-cell>
          <table:table-cell table:style-name="ce12N2" office:value-type="float" office:value="115.11">
            <text:p>115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106911580003705500100029413217538961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72">
            <text:p>308072</text:p>
          </table:table-cell>
          <table:table-cell table:style-name="ce0" table:number-columns-spanned="4" table:number-rows-spanned="1" office:value-type="string" calcext:value-type="string">
            <text:p>2.927 - MOHAWK REVESTIMENTOS COCAL DO SUL LTDA</text:p>
          </table:table-cell>
          <table:covered-table-cell table:number-columns-repeated="3"/>
          <table:table-cell table:style-name="ce0" office:value-type="string" calcext:value-type="string">
            <text:p>1.901.3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00.64">
            <text:p>1600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90.3">
            <text:p>1590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499.18">
            <text:p>499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00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0">
            <text:p>7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0.34">
            <text:p>10,34</text:p>
          </table:table-cell>
          <table:table-cell table:style-name="ce12N2" office:value-type="float" office:value="1590.3">
            <text:p>1590,30</text:p>
          </table:table-cell>
          <table:table-cell table:style-name="ce12N2" office:value-type="float" office:value="111.32">
            <text:p>11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65325380032695500100190134010017755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83">
            <text:p>30808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1.60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82.58">
            <text:p>7982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82.58">
            <text:p>7982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532">
            <text:p>0,024</text:p>
          </table:table-cell>
          <table:table-cell table:style-name="ce12N2" office:value-type="float" office:value="5.34">
            <text:p>5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82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737.1">
            <text:p>6737,10</text:p>
          </table:table-cell>
          <table:table-cell table:style-name="ce12N2" office:value-type="float" office:value="6.74">
            <text:p>6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.63">
            <text:p>60,63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82.58">
            <text:p>7982,58</text:p>
          </table:table-cell>
          <table:table-cell table:style-name="ce12N2" office:value-type="float" office:value="558.78">
            <text:p>558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160410152112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89">
            <text:p>308089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5.8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6.11">
            <text:p>156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6.11">
            <text:p>156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5">
            <text:p>0,045</text:p>
          </table:table-cell>
          <table:table-cell table:style-name="ce12N2" office:value-type="float" office:value="2.55">
            <text:p>2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6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1.75">
            <text:p>131,75</text:p>
          </table:table-cell>
          <table:table-cell table:style-name="ce12N2" office:value-type="float" office:value="0.13">
            <text:p>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19">
            <text:p>1,19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6.11">
            <text:p>156,11</text:p>
          </table:table-cell>
          <table:table-cell table:style-name="ce12N2" office:value-type="float" office:value="10.93">
            <text:p>1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015548460001365500100068583119611538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18">
            <text:p>18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85">
            <text:p>85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843.41">
            <text:p>1843,41</text:p>
          </table:table-cell>
          <table:table-cell table:style-name="ce26N2" office:value-type="float" office:value="37949.87">
            <text:p>37949,87</text:p>
          </table:table-cell>
          <table:table-cell table:style-name="ce26N2" office:value-type="float" office:value="2206.85">
            <text:p>2206,8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9793.28">
            <text:p>39793,2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.049154">
            <text:p>1,049</text:p>
          </table:table-cell>
          <table:table-cell table:style-name="ce26N2" office:value-type="float" office:value="37864.87">
            <text:p>37864,87</text:p>
          </table:table-cell>
          <table:table-cell table:style-name="ce26N2" office:value-type="float" office:value="39793.28">
            <text:p>39793,2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868.85">
            <text:p>6868,85</text:p>
          </table:table-cell>
          <table:table-cell table:style-name="ce26N2" office:value-type="float" office:value="6.87">
            <text:p>6,8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61.82">
            <text:p>61,82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731.95">
            <text:p>731,9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1.21">
            <text:p>41,2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SR ACABAMENT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50" meta:object-count="0"/>
    <meta:generator>LibreOffice/4.3.0.4$Windows_x86 LibreOffice_project/62ad5818884a2fc2e5780dd45466868d41009ec0</meta:generator>
  </office:meta>
</office:document-meta>
</file>