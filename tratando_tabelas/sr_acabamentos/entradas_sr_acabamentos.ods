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1">
            <text:p>3102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1.88">
            <text:p>831,88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719741845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3">
            <text:p>31025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9107252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5">
            <text:p>31025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1123421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8">
            <text:p>31025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41665699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9">
            <text:p>31025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9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95">
            <text:p>0,121</text:p>
          </table:table-cell>
          <table:table-cell table:style-name="ce12N2" office:value-type="float" office:value="28.13">
            <text:p>28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9228185967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3">
            <text:p>310323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48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.42">
            <text:p>163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30.82">
            <text:p>13830,82</text:p>
          </table:table-cell>
          <table:table-cell table:style-name="ce12N2" office:value-type="float" office:value="13.82">
            <text:p>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48">
            <text:p>124,48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1.13">
            <text:p>401,13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753.72">
            <text:p>7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30845600014955005000457484103384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6">
            <text:p>310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0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3.53">
            <text:p>21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53">
            <text:p>0,033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.17">
            <text:p>1757,17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81">
            <text:p>15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145.74">
            <text:p>14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0271306783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9">
            <text:p>310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52">
            <text:p>0,014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8.8">
            <text:p>2008,80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166.61">
            <text:p>16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820169358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3">
            <text:p>310353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3715.75">
            <text:p>53715,75</text:p>
          </table:table-cell>
          <table:table-cell table:style-name="ce12N2" office:value-type="float" office:value="8695.86">
            <text:p>8695,86</text:p>
          </table:table-cell>
          <table:table-cell table:style-name="ce12N3" office:value-type="float" office:value="256.85672">
            <text:p>256,857</text:p>
          </table:table-cell>
          <table:table-cell table:style-name="ce12N2" office:value-type="float" office:value="6302.75">
            <text:p>630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1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73.87">
            <text:p>52673,87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.07">
            <text:p>474,0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4368.8">
            <text:p>43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748200013755001000107936122899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6">
            <text:p>310356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5">
            <text:p>0,081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1.16">
            <text:p>2861,16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5">
            <text:p>25,7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0115381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7">
            <text:p>31035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73.58">
            <text:p>106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1">
            <text:p>0,500</text:p>
          </table:table-cell>
          <table:table-cell table:style-name="ce12N2" office:value-type="float" office:value="78.64">
            <text:p>7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81.81">
            <text:p>8981,81</text:p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86">
            <text:p>80,86</text:p>
          </table:table-cell>
          <table:table-cell table:style-name="ce12N2" office:value-type="float" office:value="62.92">
            <text:p>62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1.3">
            <text:p>31,3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744.97">
            <text:p>74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1173183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6">
            <text:p>3103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1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7.7">
            <text:p>1257,70</text:p>
          </table:table-cell>
          <table:table-cell table:style-name="ce12N2" office:value-type="float" office:value="1.26">
            <text:p>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2">
            <text:p>1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1811887638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0">
            <text:p>3103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5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22">
            <text:p>4006,22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332.28">
            <text:p>33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5531244497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5">
            <text:p>31038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73.46">
            <text:p>236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">
            <text:p>68,0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5906">
            <text:p>1,106</text:p>
          </table:table-cell>
          <table:table-cell table:style-name="ce12N2" office:value-type="float" office:value="147.79">
            <text:p>14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6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28.11">
            <text:p>20028,11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5">
            <text:p>180,25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247.1">
            <text:p>247,1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1356.9">
            <text:p>135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81168068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0">
            <text:p>31042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50.28">
            <text:p>57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5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6">
            <text:p>47,16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0.84">
            <text:p>510,84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366.76">
            <text:p>3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69121002669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4">
            <text:p>310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0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67.24">
            <text:p>2767,24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91">
            <text:p>24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229.52">
            <text:p>22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0691956017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4">
            <text:p>310444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3.65">
            <text:p>393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6.54">
            <text:p>3206,54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6">
            <text:p>28,86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61.5">
            <text:p>461,5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138.88">
            <text:p>13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111361121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2">
            <text:p>3104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8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8301658019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3">
            <text:p>3104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55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98.18">
            <text:p>4098,18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8">
            <text:p>36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339.91">
            <text:p>33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0011006198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5">
            <text:p>31047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7.67">
            <text:p>46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7.6">
            <text:p>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.25">
            <text:p>3888,25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37.33">
            <text:p>437,33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168.42">
            <text:p>1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11202722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3">
            <text:p>310533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94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.36">
            <text:p>487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7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.14">
            <text:p>4041,14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40.74">
            <text:p>240,74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185.55">
            <text:p>1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023429000143550010003942241750641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7">
            <text:p>310547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6">
            <text:p>2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75.35">
            <text:p>1875,35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7">
            <text:p>16,8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90.96">
            <text:p>290,96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81.23">
            <text:p>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6415973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8">
            <text:p>310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9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5">
            <text:p>0,001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1.47">
            <text:p>1681,47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3">
            <text:p>15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9051672752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91">
            <text:p>310591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9.95">
            <text:p>378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89.95">
            <text:p>378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8">
            <text:p>0,006</text:p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8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89.95">
            <text:p>3789,95</text:p>
          </table:table-cell>
          <table:table-cell table:style-name="ce12N2" office:value-type="float" office:value="151.6">
            <text:p>1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5104359000122550010000048181870606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0">
            <text:p>310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4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">
            <text:p>0,002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2">
            <text:p>1027,2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4">
            <text:p>9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4301622675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2">
            <text:p>31067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9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62.49">
            <text:p>856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24">
            <text:p>0,050</text:p>
          </table:table-cell>
          <table:table-cell table:style-name="ce12N2" office:value-type="float" office:value="45.5">
            <text:p>4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6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2.21">
            <text:p>6962,21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6">
            <text:p>62,66</text:p>
          </table:table-cell>
          <table:table-cell table:style-name="ce12N2" office:value-type="float" office:value="54.13">
            <text:p>54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570.97">
            <text:p>570,97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319.66">
            <text:p>3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9221345408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4">
            <text:p>310694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154.05">
            <text:p>15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41643007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7">
            <text:p>310697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23.53">
            <text:p>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319629673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2">
            <text:p>4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006.36">
            <text:p>900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75.85">
            <text:p>3675,85</text:p>
          </table:table-cell>
          <table:table-cell table:style-name="ce26N2" office:value-type="float" office:value="232302.72">
            <text:p>232302,72</text:p>
          </table:table-cell>
          <table:table-cell table:style-name="ce26N2" office:value-type="float" office:value="14421.3">
            <text:p>14421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235998.57">
            <text:p>235998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5.142792">
            <text:p>265,143</text:p>
          </table:table-cell>
          <table:table-cell table:style-name="ce26N2" office:value-type="float" office:value="223316.36">
            <text:p>223316,36</text:p>
          </table:table-cell>
          <table:table-cell table:style-name="ce26N2" office:value-type="float" office:value="235998.57">
            <text:p>235998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92755.27">
            <text:p>192755,27</text:p>
          </table:table-cell>
          <table:table-cell table:style-name="ce26N2" office:value-type="float" office:value="192.72">
            <text:p>192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34.79">
            <text:p>1734,7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896.94">
            <text:p>9896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0.88">
            <text:p>60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34" meta:object-count="0"/>
    <meta:generator>LibreOffice/4.3.0.4$Windows_x86 LibreOffice_project/62ad5818884a2fc2e5780dd45466868d41009ec0</meta:generator>
  </office:meta>
</office:document-meta>
</file>