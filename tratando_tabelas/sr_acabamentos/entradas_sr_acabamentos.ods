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7">
            <text:p>30924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4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2.03">
            <text:p>138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4.76">
            <text:p>1164,7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77">
            <text:p>122,77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50.37">
            <text:p>5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414118457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2">
            <text:p>30925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6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6.85">
            <text:p>11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374">
            <text:p>0,094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4.18">
            <text:p>984,18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7">
            <text:p>8,8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81.64">
            <text:p>8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6703157670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6">
            <text:p>309306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2.86">
            <text:p>371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55">
            <text:p>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2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6.7">
            <text:p>3056,7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1">
            <text:p>27,51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2.96">
            <text:p>402,96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132.4">
            <text:p>1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6991951497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9">
            <text:p>3093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39">
            <text:p>2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0.86">
            <text:p>180,86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401282664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5">
            <text:p>309315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1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11">
            <text:p>30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.25">
            <text:p>2501,25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51">
            <text:p>22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81.7">
            <text:p>281,7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195.4">
            <text:p>1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2077181000133550030002261731875139152</text:p>
          </table:table-cell>
          <table:table-cell table:style-name="ce0" office:value-type="string" calcext:value-type="string">
            <text:p>3526061138956500020057005000401311100087669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4">
            <text:p>30938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5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8.43">
            <text:p>350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0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6">
            <text:p>28,46</text:p>
          </table:table-cell>
          <table:table-cell table:style-name="ce12N2" office:value-type="float" office:value="34.31">
            <text:p>34,3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45.83">
            <text:p>345,83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221.39">
            <text:p>2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51061002651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6">
            <text:p>30942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784">
            <text:p>0,046</text:p>
          </table:table-cell>
          <table:table-cell table:style-name="ce12N2" office:value-type="float" office:value="19.15">
            <text:p>1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3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61.82">
            <text:p>6261,82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36">
            <text:p>56,3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471.32">
            <text:p>4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351538163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4">
            <text:p>30943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2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1.57">
            <text:p>701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595908">
            <text:p>8,596</text:p>
          </table:table-cell>
          <table:table-cell table:style-name="ce12N2" office:value-type="float" office:value="902.94">
            <text:p>90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1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34.7">
            <text:p>5834,70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9">
            <text:p>52,49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44.73">
            <text:p>44,73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487.71">
            <text:p>48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4542238000178550010000972341000970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3">
            <text:p>2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2325.1">
            <text:p>2325,10</text:p>
          </table:table-cell>
          <table:table-cell table:style-name="ce26N2" office:value-type="float" office:value="50119.57">
            <text:p>50119,57</text:p>
          </table:table-cell>
          <table:table-cell table:style-name="ce26N2" office:value-type="float" office:value="3037.57">
            <text:p>3037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52592.17">
            <text:p>52592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.438891">
            <text:p>9,439</text:p>
          </table:table-cell>
          <table:table-cell table:style-name="ce26N2" office:value-type="float" office:value="50167.07">
            <text:p>50167,07</text:p>
          </table:table-cell>
          <table:table-cell table:style-name="ce26N2" office:value-type="float" office:value="52592.17">
            <text:p>52592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378.52">
            <text:p>44378,52</text:p>
          </table:table-cell>
          <table:table-cell table:style-name="ce26N2" office:value-type="float" office:value="44.37">
            <text:p>44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9.41">
            <text:p>399,4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38.19">
            <text:p>1338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.26">
            <text:p>36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0" meta:object-count="0"/>
    <meta:generator>LibreOffice/4.3.0.4$Windows_x86 LibreOffice_project/62ad5818884a2fc2e5780dd45466868d41009ec0</meta:generator>
  </office:meta>
</office:document-meta>
</file>