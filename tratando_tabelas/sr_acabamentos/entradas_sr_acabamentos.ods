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29/06/2026 07:40:39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7122">
            <text:p>307122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9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5/2026</text:p>
          </table:table-cell>
          <table:table-cell table:style-name="ce0" office:value-type="string" calcext:value-type="string">
            <text:p>12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486">
            <text:p>0,0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5/2026</text:p>
          </table:table-cell>
          <table:table-cell table:style-name="ce12N2" office:value-type="float" office:value="5.62">
            <text:p>5,62</text:p>
          </table:table-cell>
          <table:table-cell table:style-name="ce12N2" office:value-type="float" office:value="57.69">
            <text:p>57,69</text:p>
          </table:table-cell>
          <table:table-cell table:style-name="ce12N2" office:value-type="float" office:value="4.04">
            <text:p>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302281320001365500100000929014351419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313">
            <text:p>308313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10.3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5/2026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5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1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5145707420003295500100001036618541180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8549">
            <text:p>30854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92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9/05/2026</text:p>
          </table:table-cell>
          <table:table-cell table:style-name="ce0" office:value-type="string" calcext:value-type="string">
            <text:p>02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3">
            <text:p>0,015</text:p>
          </table:table-cell>
          <table:table-cell table:style-name="ce12N2" office:value-type="float" office:value="5.72">
            <text:p>5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7.5">
            <text:p>127,50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5614132820001435500100299281013948537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316">
            <text:p>309316</text:p>
          </table:table-cell>
          <table:table-cell table:style-name="ce0" table:number-columns-spanned="4" table:number-rows-spanned="1" office:value-type="string" calcext:value-type="string">
            <text:p>38.731 - CLARAO INDUSTRIA E COMERCIO DE ILUMINACAO LTDA</text:p>
          </table:table-cell>
          <table:covered-table-cell table:number-columns-repeated="3"/>
          <table:table-cell table:style-name="ce0" office:value-type="string" calcext:value-type="string">
            <text:p>23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6/2026</text:p>
          </table:table-cell>
          <table:table-cell table:style-name="ce0" office:value-type="string" calcext:value-type="string">
            <text:p>16/06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40.61">
            <text:p>1840,61</text:p>
          </table:table-cell>
          <table:table-cell table:style-name="ce12N2" office:value-type="float" office:value="1.84">
            <text:p>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.57">
            <text:p>16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0">
            <text:p>2060,00</text:p>
          </table:table-cell>
          <table:table-cell table:style-name="ce12N2" office:value-type="float" office:value="144.2">
            <text:p>144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00">
            <text:p>2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00.725</text:p>
          </table:table-cell>
          <table:table-cell table:style-name="ce0" office:value-type="string" calcext:value-type="string">
            <text:p>2.123 - RG TRANSPORTES RODOVIARIOS LTDA</text:p>
          </table:table-cell>
          <table:table-cell table:style-name="ce0" office:value-type="string" calcext:value-type="string">
            <text:p>18/06/2026</text:p>
          </table:table-cell>
          <table:table-cell table:style-name="ce12" office:value-type="string" calcext:value-type="string">
            <text:p>200,00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35260667263012000180550010000234001327329443</text:p>
          </table:table-cell>
          <table:table-cell table:style-name="ce0" office:value-type="string" calcext:value-type="string">
            <text:p>35260602592421000184570020001007251903061584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78">
            <text:p>309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88">
            <text:p>0,000</text:p>
          </table:table-cell>
          <table:table-cell table:style-name="ce12N2" office:value-type="float" office:value="0.23">
            <text:p>0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8.14">
            <text:p>748,14</text:p>
          </table:table-cell>
          <table:table-cell table:style-name="ce12N2" office:value-type="float" office:value="0.75">
            <text:p>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73">
            <text:p>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6.44">
            <text:p>886,44</text:p>
          </table:table-cell>
          <table:table-cell table:style-name="ce12N2" office:value-type="float" office:value="62.05">
            <text:p>6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090916899420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489">
            <text:p>3094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19/06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466">
            <text:p>0,175</text:p>
          </table:table-cell>
          <table:table-cell table:style-name="ce12N2" office:value-type="float" office:value="75.42">
            <text:p>7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83.74">
            <text:p>1483,74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35">
            <text:p>13,3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58.04">
            <text:p>1758,04</text:p>
          </table:table-cell>
          <table:table-cell table:style-name="ce12N2" office:value-type="float" office:value="123.06">
            <text:p>12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2314476169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2">
            <text:p>3095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60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749">
            <text:p>0,035</text:p>
          </table:table-cell>
          <table:table-cell table:style-name="ce12N2" office:value-type="float" office:value="18.75">
            <text:p>1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51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62.72">
            <text:p>1562,72</text:p>
          </table:table-cell>
          <table:table-cell table:style-name="ce12N2" office:value-type="float" office:value="1.56">
            <text:p>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06">
            <text:p>14,06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51.61">
            <text:p>1851,61</text:p>
          </table:table-cell>
          <table:table-cell table:style-name="ce12N2" office:value-type="float" office:value="129.61">
            <text:p>12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271550010021605371845375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596">
            <text:p>3095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0.9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1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22.59">
            <text:p>315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">
            <text:p>80,0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6187">
            <text:p>0,366</text:p>
          </table:table-cell>
          <table:table-cell table:style-name="ce12N2" office:value-type="float" office:value="61.87">
            <text:p>61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522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437.53">
            <text:p>26437,53</text:p>
          </table:table-cell>
          <table:table-cell table:style-name="ce12N2" office:value-type="float" office:value="26.41">
            <text:p>26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7.89">
            <text:p>237,8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197.4">
            <text:p>197,40</text:p>
          </table:table-cell>
          <table:table-cell table:style-name="ce12N2" office:value-type="float" office:value="31325.19">
            <text:p>31325,19</text:p>
          </table:table-cell>
          <table:table-cell table:style-name="ce12N2" office:value-type="float" office:value="2192.78">
            <text:p>219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0954195930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10">
            <text:p>309610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40.8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3.54">
            <text:p>631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2.8">
            <text:p>3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3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77.87">
            <text:p>5277,87</text:p>
          </table:table-cell>
          <table:table-cell table:style-name="ce12N2" office:value-type="float" office:value="5.29">
            <text:p>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.5">
            <text:p>47,50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6/2026</text:p>
          </table:table-cell>
          <table:table-cell table:style-name="ce12N2" office:value-type="float" office:value="598.46">
            <text:p>598,46</text:p>
          </table:table-cell>
          <table:table-cell table:style-name="ce12N2" office:value-type="float" office:value="5715.08">
            <text:p>5715,08</text:p>
          </table:table-cell>
          <table:table-cell table:style-name="ce12N2" office:value-type="float" office:value="228.6">
            <text:p>22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20587017000285550010000408851445148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8">
            <text:p>3096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76">
            <text:p>0,001</text:p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2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96.27">
            <text:p>1496,27</text:p>
          </table:table-cell>
          <table:table-cell table:style-name="ce12N2" office:value-type="float" office:value="1.5">
            <text:p>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.47">
            <text:p>13,4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2.88">
            <text:p>1772,88</text:p>
          </table:table-cell>
          <table:table-cell table:style-name="ce12N2" office:value-type="float" office:value="124.1">
            <text:p>124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310668984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39">
            <text:p>3096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2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7.78">
            <text:p>577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7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7.87">
            <text:p>457,87</text:p>
          </table:table-cell>
          <table:table-cell table:style-name="ce12N2" office:value-type="float" office:value="0.46">
            <text:p>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12">
            <text:p>4,1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35.26">
            <text:p>35,26</text:p>
          </table:table-cell>
          <table:table-cell table:style-name="ce12N2" office:value-type="float" office:value="542.52">
            <text:p>542,52</text:p>
          </table:table-cell>
          <table:table-cell table:style-name="ce12N2" office:value-type="float" office:value="37.98">
            <text:p>3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281413334154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52">
            <text:p>30965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74.1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9.46">
            <text:p>393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953">
            <text:p>0,080</text:p>
          </table:table-cell>
          <table:table-cell table:style-name="ce12N2" office:value-type="float" office:value="21.69">
            <text:p>21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9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44.3">
            <text:p>3344,30</text:p>
          </table:table-cell>
          <table:table-cell table:style-name="ce12N2" office:value-type="float" office:value="3.34">
            <text:p>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11">
            <text:p>30,11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47.95">
            <text:p>47,95</text:p>
          </table:table-cell>
          <table:table-cell table:style-name="ce12N2" office:value-type="float" office:value="3891.51">
            <text:p>3891,51</text:p>
          </table:table-cell>
          <table:table-cell table:style-name="ce12N2" office:value-type="float" office:value="206.36">
            <text:p>20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81604803000157550010008741581540824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68">
            <text:p>3096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35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15">
            <text:p>0,033</text:p>
          </table:table-cell>
          <table:table-cell table:style-name="ce12N2" office:value-type="float" office:value="8.7">
            <text:p>8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311.32">
            <text:p>2311,32</text:p>
          </table:table-cell>
          <table:table-cell table:style-name="ce12N2" office:value-type="float" office:value="2.31">
            <text:p>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.8">
            <text:p>20,80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38.64">
            <text:p>2738,64</text:p>
          </table:table-cell>
          <table:table-cell table:style-name="ce12N2" office:value-type="float" office:value="191.7">
            <text:p>19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3521442965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676">
            <text:p>3096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2.8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714">
            <text:p>0,002</text:p>
          </table:table-cell>
          <table:table-cell table:style-name="ce12N2" office:value-type="float" office:value="1.82">
            <text:p>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6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43.56">
            <text:p>1743,56</text:p>
          </table:table-cell>
          <table:table-cell table:style-name="ce12N2" office:value-type="float" office:value="1.74">
            <text:p>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.69">
            <text:p>15,6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65.9">
            <text:p>2065,90</text:p>
          </table:table-cell>
          <table:table-cell table:style-name="ce12N2" office:value-type="float" office:value="144.61">
            <text:p>144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28501521566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6">
            <text:p>30970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90.39">
            <text:p>249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191.7">
            <text:p>219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941">
            <text:p>0,029</text:p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9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983.46">
            <text:p>1983,46</text:p>
          </table:table-cell>
          <table:table-cell table:style-name="ce12N2" office:value-type="float" office:value="1.99">
            <text:p>1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.86">
            <text:p>17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13.69">
            <text:p>213,69</text:p>
          </table:table-cell>
          <table:table-cell table:style-name="ce12N2" office:value-type="float" office:value="2276.7">
            <text:p>2276,70</text:p>
          </table:table-cell>
          <table:table-cell table:style-name="ce12N2" office:value-type="float" office:value="91.07">
            <text:p>9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35119423400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08">
            <text:p>30970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1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267.03">
            <text:p>40267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6">
            <text:p>76,00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0546">
            <text:p>0,411</text:p>
          </table:table-cell>
          <table:table-cell table:style-name="ce12N2" office:value-type="float" office:value="145.11">
            <text:p>145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267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2891.03">
            <text:p>32891,03</text:p>
          </table:table-cell>
          <table:table-cell table:style-name="ce12N2" office:value-type="float" office:value="32.91">
            <text:p>3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.05">
            <text:p>296,05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1307.62">
            <text:p>1307,62</text:p>
          </table:table-cell>
          <table:table-cell table:style-name="ce12N2" office:value-type="float" office:value="38959.41">
            <text:p>38959,41</text:p>
          </table:table-cell>
          <table:table-cell table:style-name="ce12N2" office:value-type="float" office:value="2715.91">
            <text:p>271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12116719130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13">
            <text:p>30971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77.02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85">
            <text:p>86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08">
            <text:p>0,000</text:p>
          </table:table-cell>
          <table:table-cell table:style-name="ce12N2" office:value-type="float" office:value="0.16">
            <text:p>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8.57">
            <text:p>708,57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.38">
            <text:p>6,3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6/2026</text:p>
          </table:table-cell>
          <table:table-cell table:style-name="ce12N2" office:value-type="float" office:value="27.29">
            <text:p>27,29</text:p>
          </table:table-cell>
          <table:table-cell table:style-name="ce12N2" office:value-type="float" office:value="839.56">
            <text:p>839,56</text:p>
          </table:table-cell>
          <table:table-cell table:style-name="ce12N2" office:value-type="float" office:value="58.77">
            <text:p>5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2618139002817550030008770261884230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763">
            <text:p>3097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3.4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6/2026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353">
            <text:p>0,01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6.39">
            <text:p>396,39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.57">
            <text:p>3,57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9.67">
            <text:p>469,67</text:p>
          </table:table-cell>
          <table:table-cell table:style-name="ce12N2" office:value-type="float" office:value="32.88">
            <text:p>32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34781448006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12">
            <text:p>30981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403.69">
            <text:p>18403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20165">
            <text:p>0,220</text:p>
          </table:table-cell>
          <table:table-cell table:style-name="ce12N2" office:value-type="float" office:value="55.98">
            <text:p>55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403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505.86">
            <text:p>15505,86</text:p>
          </table:table-cell>
          <table:table-cell table:style-name="ce12N2" office:value-type="float" office:value="15.54">
            <text:p>15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.56">
            <text:p>139,5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6/2026</text:p>
          </table:table-cell>
          <table:table-cell table:style-name="ce12N2" office:value-type="float" office:value="32.96">
            <text:p>32,96</text:p>
          </table:table-cell>
          <table:table-cell table:style-name="ce12N2" office:value-type="float" office:value="18370.73">
            <text:p>18370,73</text:p>
          </table:table-cell>
          <table:table-cell table:style-name="ce12N2" office:value-type="float" office:value="1284.37">
            <text:p>128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2621277311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6">
            <text:p>30984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5.68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80.77">
            <text:p>1980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768.04">
            <text:p>1768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80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35.36">
            <text:p>1635,36</text:p>
          </table:table-cell>
          <table:table-cell table:style-name="ce12N2" office:value-type="float" office:value="1.63">
            <text:p>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.72">
            <text:p>14,7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212.73">
            <text:p>212,73</text:p>
          </table:table-cell>
          <table:table-cell table:style-name="ce12N2" office:value-type="float" office:value="1768.04">
            <text:p>1768,04</text:p>
          </table:table-cell>
          <table:table-cell table:style-name="ce12N2" office:value-type="float" office:value="70.72">
            <text:p>7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401.944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5/06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35260610599342000123550020001056881965417797</text:p>
          </table:table-cell>
          <table:table-cell table:style-name="ce0" office:value-type="string" calcext:value-type="string">
            <text:p>3526061138956500020057005000401944100088341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47">
            <text:p>3098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4.4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8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5.98">
            <text:p>445,9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.01">
            <text:p>4,01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8.43">
            <text:p>528,43</text:p>
          </table:table-cell>
          <table:table-cell table:style-name="ce12N2" office:value-type="float" office:value="36.99">
            <text:p>3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447515332883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69">
            <text:p>309869</text:p>
          </table:table-cell>
          <table:table-cell table:style-name="ce0" table:number-columns-spanned="4" table:number-rows-spanned="1" office:value-type="string" calcext:value-type="string">
            <text:p>27.570 - DOCOL INDUSTRIA E COMERCIO LTDA</text:p>
          </table:table-cell>
          <table:covered-table-cell table:number-columns-repeated="3"/>
          <table:table-cell table:style-name="ce0" office:value-type="string" calcext:value-type="string">
            <text:p>19.39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.36">
            <text:p>64,36</text:p>
          </table:table-cell>
          <table:table-cell table:style-name="ce12N2" office:value-type="float" office:value="161">
            <text:p>161,00</text:p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3">
            <text:p>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5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32">
            <text:p>54,32</text:p>
          </table:table-cell>
          <table:table-cell table:style-name="ce12N2" office:value-type="float" office:value="0.05">
            <text:p>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.36">
            <text:p>225,36</text:p>
          </table:table-cell>
          <table:table-cell table:style-name="ce12N2" office:value-type="float" office:value="15.78">
            <text:p>1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1385550020000193991156444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875">
            <text:p>309875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99.2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4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0.96">
            <text:p>81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72">
            <text:p>0,028</text:p>
          </table:table-cell>
          <table:table-cell table:style-name="ce12N2" office:value-type="float" office:value="1.73">
            <text:p>1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0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9.9">
            <text:p>659,90</text:p>
          </table:table-cell>
          <table:table-cell table:style-name="ce12N2" office:value-type="float" office:value="0.65">
            <text:p>0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.94">
            <text:p>5,94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43.44">
            <text:p>43,44</text:p>
          </table:table-cell>
          <table:table-cell table:style-name="ce12N2" office:value-type="float" office:value="767.52">
            <text:p>767,52</text:p>
          </table:table-cell>
          <table:table-cell table:style-name="ce12N2" office:value-type="float" office:value="40.36">
            <text:p>4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97238370001725500000069921218448646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3">
            <text:p>30992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7.1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12.89">
            <text:p>4112,89</text:p>
          </table:table-cell>
          <table:table-cell table:style-name="ce12N2" office:value-type="float" office:value="4.11">
            <text:p>4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.02">
            <text:p>37,02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90">
            <text:p>4590,00</text:p>
          </table:table-cell>
          <table:table-cell table:style-name="ce12N2" office:value-type="float" office:value="321.3">
            <text:p>32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608028676000103550010000571661004474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4">
            <text:p>309924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585</text:p>
          </table:table-cell>
          <table:table-cell table:style-name="ce9" office:value-type="string" calcext:value-type="string">
            <text:p>12</text:p>
          </table:table-cell>
          <table:table-cell table:style-name="ce0" office:value-type="string" calcext:value-type="string">
            <text:p>25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144">
            <text:p>0,271</text:p>
          </table:table-cell>
          <table:table-cell table:style-name="ce12N2" office:value-type="float" office:value="292.14">
            <text:p>292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25.73">
            <text:p>3025,73</text:p>
          </table:table-cell>
          <table:table-cell table:style-name="ce12N2" office:value-type="float" office:value="3.03">
            <text:p>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.24">
            <text:p>27,24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1">
            <text:p>3585,10</text:p>
          </table:table-cell>
          <table:table-cell table:style-name="ce12N2" office:value-type="float" office:value="250.96">
            <text:p>250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821546000102550120000005851703995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9926">
            <text:p>309926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18.1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E-6">
            <text:p>0,000</text:p>
          </table:table-cell>
          <table:table-cell table:style-name="ce12N2" office:value-type="float" office:value="12.89">
            <text:p>1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74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55.4">
            <text:p>2455,40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.1">
            <text:p>22,10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74.63">
            <text:p>3074,63</text:p>
          </table:table-cell>
          <table:table-cell table:style-name="ce12N2" office:value-type="float" office:value="368.96">
            <text:p>36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6001422400001205500100071814719472633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26">
            <text:p>2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46">
            <text:p>24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722.42">
            <text:p>2722,42</text:p>
          </table:table-cell>
          <table:table-cell table:style-name="ce26N2" office:value-type="float" office:value="130120.65">
            <text:p>130120,65</text:p>
          </table:table-cell>
          <table:table-cell table:style-name="ce26N2" office:value-type="float" office:value="8877.16">
            <text:p>8877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89.72">
            <text:p>289,72</text:p>
          </table:table-cell>
          <table:table-cell table:style-name="ce26N2" office:value-type="float" office:value="132990.57">
            <text:p>132990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13435">
            <text:p>1,713</text:p>
          </table:table-cell>
          <table:table-cell table:style-name="ce26N2" office:value-type="float" office:value="130022.15">
            <text:p>130022,15</text:p>
          </table:table-cell>
          <table:table-cell table:style-name="ce26N2" office:value-type="float" office:value="132990.57">
            <text:p>132990,5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0706.32">
            <text:p>110706,32</text:p>
          </table:table-cell>
          <table:table-cell table:style-name="ce26N2" office:value-type="float" office:value="110.74">
            <text:p>110,7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96.38">
            <text:p>996,38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54.58">
            <text:p>754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2.93">
            <text:p>32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SR ACABAMENT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8" meta:object-count="0"/>
    <meta:generator>LibreOffice/4.3.0.4$Windows_x86 LibreOffice_project/62ad5818884a2fc2e5780dd45466868d41009ec0</meta:generator>
  </office:meta>
</office:document-meta>
</file>