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6/2026 04:30:3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98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>352606113895650002005700500040098110008729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4">
            <text:p>309214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9.12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7.06">
            <text:p>195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83.2">
            <text:p>16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95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4.23">
            <text:p>1514,23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3.86">
            <text:p>173,86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124.82">
            <text:p>1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4546165000393550040000991291328330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0">
            <text:p>3092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1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7.26">
            <text:p>1447,2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3">
            <text:p>13,0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120.04">
            <text:p>1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1791667693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7">
            <text:p>30924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4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2.03">
            <text:p>138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2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4.76">
            <text:p>1164,7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2.77">
            <text:p>122,77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50.37">
            <text:p>5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1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5260610599342000123550020001054141184571071</text:p>
          </table:table-cell>
          <table:table-cell table:style-name="ce0" office:value-type="string" calcext:value-type="string">
            <text:p>3526061138956500020057005000401312100087670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2">
            <text:p>30925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6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6.85">
            <text:p>11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374">
            <text:p>0,094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4.18">
            <text:p>984,18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7">
            <text:p>8,8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81.64">
            <text:p>8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6703157670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6">
            <text:p>309306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2.86">
            <text:p>371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.55">
            <text:p>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2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6.7">
            <text:p>3056,7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1">
            <text:p>27,51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2.96">
            <text:p>402,96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132.4">
            <text:p>1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6991951497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9">
            <text:p>3093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39">
            <text:p>2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0.86">
            <text:p>180,86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401282664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5">
            <text:p>309315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1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11">
            <text:p>30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7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.25">
            <text:p>2501,25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51">
            <text:p>22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81.7">
            <text:p>281,7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195.4">
            <text:p>1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1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5260612077181000133550030002261731875139152</text:p>
          </table:table-cell>
          <table:table-cell table:style-name="ce0" office:value-type="string" calcext:value-type="string">
            <text:p>3526061138956500020057005000401311100087669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4">
            <text:p>30938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5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8.43">
            <text:p>350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0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6">
            <text:p>28,46</text:p>
          </table:table-cell>
          <table:table-cell table:style-name="ce12N2" office:value-type="float" office:value="34.31">
            <text:p>34,3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45.83">
            <text:p>345,83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221.39">
            <text:p>2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499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58329608000144550010002651061002651077</text:p>
          </table:table-cell>
          <table:table-cell table:style-name="ce0" office:value-type="string" calcext:value-type="string">
            <text:p>35260611389565000200570050004014991000878777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9">
            <text:p>3093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8.61">
            <text:p>972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">
            <text:p>0,165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94.71">
            <text:p>7694,71</text:p>
          </table:table-cell>
          <table:table-cell table:style-name="ce12N2" office:value-type="float" office:value="7.71">
            <text:p>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26">
            <text:p>69,26</text:p>
          </table:table-cell>
          <table:table-cell table:style-name="ce12N2" office:value-type="float" office:value="66.13">
            <text:p>66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896.31">
            <text:p>896,31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353.29">
            <text:p>3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9951131047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6">
            <text:p>30942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784">
            <text:p>0,046</text:p>
          </table:table-cell>
          <table:table-cell table:style-name="ce12N2" office:value-type="float" office:value="19.15">
            <text:p>1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33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61.82">
            <text:p>6261,82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36">
            <text:p>56,3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471.32">
            <text:p>4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351538163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4">
            <text:p>309434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2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1.57">
            <text:p>701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966.84">
            <text:p>69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595908">
            <text:p>8,596</text:p>
          </table:table-cell>
          <table:table-cell table:style-name="ce12N2" office:value-type="float" office:value="902.94">
            <text:p>90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1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34.7">
            <text:p>5834,70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9">
            <text:p>52,49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44.73">
            <text:p>44,73</text:p>
          </table:table-cell>
          <table:table-cell table:style-name="ce12N2" office:value-type="float" office:value="6966.84">
            <text:p>6966,84</text:p>
          </table:table-cell>
          <table:table-cell table:style-name="ce12N2" office:value-type="float" office:value="487.71">
            <text:p>48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9.42">
            <text:p>57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7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579,4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54542238000178550010000972341000970375</text:p>
          </table:table-cell>
          <table:table-cell table:style-name="ce0" office:value-type="string" calcext:value-type="string">
            <text:p>3526061138956500020057005000401375100087739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8">
            <text:p>309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.14">
            <text:p>748,14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09168994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0">
            <text:p>3095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2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2.66">
            <text:p>60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702">
            <text:p>0,037</text:p>
          </table:table-cell>
          <table:table-cell table:style-name="ce12N2" office:value-type="float" office:value="35.6">
            <text:p>3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8.26">
            <text:p>4888,26</text:p>
          </table:table-cell>
          <table:table-cell table:style-name="ce12N2" office:value-type="float" office:value="4.89">
            <text:p>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9">
            <text:p>43,99</text:p>
          </table:table-cell>
          <table:table-cell table:style-name="ce12N2" office:value-type="float" office:value="53.79">
            <text:p>53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81.7">
            <text:p>481,7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296123812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2">
            <text:p>3095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749">
            <text:p>0,035</text:p>
          </table:table-cell>
          <table:table-cell table:style-name="ce12N2" office:value-type="float" office:value="18.75">
            <text:p>1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2.72">
            <text:p>1562,72</text:p>
          </table:table-cell>
          <table:table-cell table:style-name="ce12N2" office:value-type="float" office:value="1.56">
            <text:p>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06">
            <text:p>14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129.61">
            <text:p>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371845375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3">
            <text:p>30959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53">
            <text:p>118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2.15">
            <text:p>106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.9">
            <text:p>980,90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38">
            <text:p>119,38</text:p>
          </table:table-cell>
          <table:table-cell table:style-name="ce12N2" office:value-type="float" office:value="1062.15">
            <text:p>1062,15</text:p>
          </table:table-cell>
          <table:table-cell table:style-name="ce12N2" office:value-type="float" office:value="42.49">
            <text:p>4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82551681199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5">
            <text:p>309595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7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59.35">
            <text:p>265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42.18">
            <text:p>2642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2057">
            <text:p>0,162</text:p>
          </table:table-cell>
          <table:table-cell table:style-name="ce12N2" office:value-type="float" office:value="576.36">
            <text:p>57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59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9.94">
            <text:p>2229,94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7">
            <text:p>2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7.17">
            <text:p>17,17</text:p>
          </table:table-cell>
          <table:table-cell table:style-name="ce12N2" office:value-type="float" office:value="2642.18">
            <text:p>2642,18</text:p>
          </table:table-cell>
          <table:table-cell table:style-name="ce12N2" office:value-type="float" office:value="184.95">
            <text:p>18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97837181005378550010001729901699057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7">
            <text:p>2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3739.21">
            <text:p>3739,21</text:p>
          </table:table-cell>
          <table:table-cell table:style-name="ce26N2" office:value-type="float" office:value="98126.94">
            <text:p>98126,94</text:p>
          </table:table-cell>
          <table:table-cell table:style-name="ce26N2" office:value-type="float" office:value="6026.45">
            <text:p>6026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38.3">
            <text:p>1138,30</text:p>
          </table:table-cell>
          <table:table-cell table:style-name="ce26N2" office:value-type="float" office:value="102013.65">
            <text:p>102013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0.038082">
            <text:p>10,038</text:p>
          </table:table-cell>
          <table:table-cell table:style-name="ce26N2" office:value-type="float" office:value="98174.44">
            <text:p>98174,44</text:p>
          </table:table-cell>
          <table:table-cell table:style-name="ce26N2" office:value-type="float" office:value="102013.65">
            <text:p>102013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5587.12">
            <text:p>85587,12</text:p>
          </table:table-cell>
          <table:table-cell table:style-name="ce26N2" office:value-type="float" office:value="85.56">
            <text:p>85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70.23">
            <text:p>770,2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062.76">
            <text:p>2062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23">
            <text:p>37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4" meta:object-count="0"/>
    <meta:generator>LibreOffice/4.3.0.4$Windows_x86 LibreOffice_project/62ad5818884a2fc2e5780dd45466868d41009ec0</meta:generator>
  </office:meta>
</office:document-meta>
</file>