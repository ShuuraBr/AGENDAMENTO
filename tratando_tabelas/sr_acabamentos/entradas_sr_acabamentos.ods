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6/05/2026 07:54:5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5">
            <text:p>306235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9.69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1.05">
            <text:p>66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7857">
            <text:p>0,238</text:p>
          </table:table-cell>
          <table:table-cell table:style-name="ce12N2" office:value-type="float" office:value="48.54">
            <text:p>4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9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19.59">
            <text:p>119,59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296.24">
            <text:p>29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96961432351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0">
            <text:p>3062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.46">
            <text:p>1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678">
            <text:p>0,091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0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75.76">
            <text:p>7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4291458007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2">
            <text:p>306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.34">
            <text:p>19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156">
            <text:p>0,205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1.68">
            <text:p>11,68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7.19">
            <text:p>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314184854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3">
            <text:p>306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4">
            <text:p>306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45">
            <text:p>20,45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22.03">
            <text:p>2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71201839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5">
            <text:p>306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28">
            <text:p>0,011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50.12">
            <text:p>5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81968152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6">
            <text:p>306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83.15">
            <text:p>8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9160343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5">
            <text:p>306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8.98">
            <text:p>11414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">
            <text:p>128,00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477">
            <text:p>4,995</text:p>
          </table:table-cell>
          <table:table-cell table:style-name="ce12N2" office:value-type="float" office:value="313.53">
            <text:p>3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48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000.74">
            <text:p>1000,74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7362.41">
            <text:p>73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5199163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7">
            <text:p>30629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89.81">
            <text:p>321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05694">
            <text:p>12,806</text:p>
          </table:table-cell>
          <table:table-cell table:style-name="ce12N2" office:value-type="float" office:value="1682.52">
            <text:p>168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1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9.03">
            <text:p>19,03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2239.23">
            <text:p>22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518511014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8">
            <text:p>30629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1284">
            <text:p>2,013</text:p>
          </table:table-cell>
          <table:table-cell table:style-name="ce12N2" office:value-type="float" office:value="74.93">
            <text:p>74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131.29">
            <text:p>13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6197507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3">
            <text:p>30632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2">
            <text:p>0,00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25.35">
            <text:p>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71675258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4">
            <text:p>30632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32">
            <text:p>0,184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46.32">
            <text:p>4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815785631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1">
            <text:p>3063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491883070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2">
            <text:p>306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5">
            <text:p>0,001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32.06">
            <text:p>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3261570554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1">
            <text:p>306381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6.64">
            <text:p>5216,64</text:p>
          </table:table-cell>
          <table:table-cell table:style-name="ce12N2" office:value-type="float" office:value="838.8">
            <text:p>838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2">
            <text:p>5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1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63.44">
            <text:p>463,44</text:p>
          </table:table-cell>
          <table:table-cell table:style-name="ce12N2" office:value-type="float" office:value="4753.2">
            <text:p>4753,20</text:p>
          </table:table-cell>
          <table:table-cell table:style-name="ce12N2" office:value-type="float" office:value="190.13">
            <text:p>19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2100033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2">
            <text:p>30645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7.0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70901102502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3">
            <text:p>3064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8.0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40.22">
            <text:p>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80131368351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2">
            <text:p>30648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91">
            <text:p>2,592</text:p>
          </table:table-cell>
          <table:table-cell table:style-name="ce12N2" office:value-type="float" office:value="1194.89">
            <text:p>1194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5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766.71">
            <text:p>76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41890695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3">
            <text:p>30648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024">
            <text:p>0,170</text:p>
          </table:table-cell>
          <table:table-cell table:style-name="ce12N2" office:value-type="float" office:value="48.56">
            <text:p>4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54.12">
            <text:p>5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51713167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4">
            <text:p>3064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5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218.26">
            <text:p>2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6188292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7">
            <text:p>306567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52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12.79">
            <text:p>3181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1611.91">
            <text:p>31611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52322">
            <text:p>2,652</text:p>
          </table:table-cell>
          <table:table-cell table:style-name="ce12N2" office:value-type="float" office:value="12352.88">
            <text:p>1235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812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00.88">
            <text:p>200,88</text:p>
          </table:table-cell>
          <table:table-cell table:style-name="ce12N2" office:value-type="float" office:value="31611.91">
            <text:p>31611,91</text:p>
          </table:table-cell>
          <table:table-cell table:style-name="ce12N2" office:value-type="float" office:value="3793.41">
            <text:p>37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3005123000103550010005528801581503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5">
            <text:p>3065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1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8.88">
            <text:p>396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67">
            <text:p>5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88.28">
            <text:p>188,28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151.22">
            <text:p>15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196155105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0">
            <text:p>3065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3.7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73.85">
            <text:p>1247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9833">
            <text:p>3,010</text:p>
          </table:table-cell>
          <table:table-cell table:style-name="ce12N2" office:value-type="float" office:value="251.5">
            <text:p>25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7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90.78">
            <text:p>290,78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704.43">
            <text:p>70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37191121562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05">
            <text:p>306605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1.0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7.42">
            <text:p>965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945.04">
            <text:p>894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5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">
            <text:p>7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712.38">
            <text:p>712,38</text:p>
          </table:table-cell>
          <table:table-cell table:style-name="ce12N2" office:value-type="float" office:value="8945.04">
            <text:p>8945,04</text:p>
          </table:table-cell>
          <table:table-cell table:style-name="ce12N2" office:value-type="float" office:value="357.79">
            <text:p>35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7023429000143550010003810731343740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9">
            <text:p>3066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71396106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0">
            <text:p>3066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46">
            <text:p>35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4">
            <text:p>0,000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23.43">
            <text:p>2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81366796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1">
            <text:p>3066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91770168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2">
            <text:p>306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.02">
            <text:p>7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44.92">
            <text:p>44,92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01118430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3">
            <text:p>3066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56.07">
            <text:p>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1151541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4">
            <text:p>306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216172472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5">
            <text:p>306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5.65">
            <text:p>100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1.37">
            <text:p>61,37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3135646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6">
            <text:p>3066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.59">
            <text:p>1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36">
            <text:p>0,0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.29">
            <text:p>10,29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41281024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7">
            <text:p>3066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512016082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8">
            <text:p>3066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61437548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9">
            <text:p>30668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95.71">
            <text:p>2489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9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639.71">
            <text:p>2639,71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890.23">
            <text:p>89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3321433515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0">
            <text:p>3066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4">
            <text:p>0,000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71452555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1">
            <text:p>3066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814514302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8">
            <text:p>306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1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312.73">
            <text:p>31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197106443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0">
            <text:p>30670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8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514">
            <text:p>0,277</text:p>
          </table:table-cell>
          <table:table-cell table:style-name="ce12N2" office:value-type="float" office:value="21.7">
            <text:p>2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7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656.6">
            <text:p>6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80221947081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3">
            <text:p>30670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71.86">
            <text:p>2267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1745.65">
            <text:p>21745,65</text:p>
          </table:table-cell>
          <table:table-cell table:style-name="ce12N2" office:value-type="float" office:value="550">
            <text:p>550,00</text:p>
          </table:table-cell>
          <table:table-cell table:style-name="ce12N3" office:value-type="float" office:value="0.0177">
            <text:p>0,018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67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22295.65">
            <text:p>22295,65</text:p>
          </table:table-cell>
          <table:table-cell table:style-name="ce12N2" office:value-type="float" office:value="1560.7">
            <text:p>15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57074200032955001000010079108582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4">
            <text:p>30673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69.90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3.17">
            <text:p>177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3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8.23">
            <text:p>108,23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116.54">
            <text:p>11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1522460000128550050007699031909928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5">
            <text:p>30673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6.87">
            <text:p>26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52.5">
            <text:p>2352,5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5513">
            <text:p>0,055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55">
            <text:p>41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29.37">
            <text:p>229,37</text:p>
          </table:table-cell>
          <table:table-cell table:style-name="ce12N2" office:value-type="float" office:value="2437.5">
            <text:p>2437,50</text:p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3951294218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98">
            <text:p>98,00</text:p>
          </table:table-cell>
          <table:table-cell table:style-name="ce26N2" office:value-type="float" office:value="838.8">
            <text:p>838,80</text:p>
          </table:table-cell>
          <table:table-cell table:style-name="ce26N2" office:value-type="float" office:value="635">
            <text:p>635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7616.37">
            <text:p>7616,37</text:p>
          </table:table-cell>
          <table:table-cell table:style-name="ce26N2" office:value-type="float" office:value="432317.25">
            <text:p>432317,25</text:p>
          </table:table-cell>
          <table:table-cell table:style-name="ce26N2" office:value-type="float" office:value="28208.93">
            <text:p>28208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9933.62">
            <text:p>439933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5.677301">
            <text:p>35,677</text:p>
          </table:table-cell>
          <table:table-cell table:style-name="ce26N2" office:value-type="float" office:value="432421.05">
            <text:p>432421,05</text:p>
          </table:table-cell>
          <table:table-cell table:style-name="ce26N2" office:value-type="float" office:value="439933.62">
            <text:p>439933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8071.95">
            <text:p>18071,9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.75">
            <text:p>42,7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26" meta:object-count="0"/>
    <meta:generator>LibreOffice/4.3.0.4$Windows_x86 LibreOffice_project/62ad5818884a2fc2e5780dd45466868d41009ec0</meta:generator>
  </office:meta>
</office:document-meta>
</file>