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9/06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60">
            <text:p>30796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0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49.44">
            <text:p>4249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49.44">
            <text:p>424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09">
            <text:p>0,009</text:p>
          </table:table-cell>
          <table:table-cell table:style-name="ce12N2" office:value-type="float" office:value="5.26">
            <text:p>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49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49.44">
            <text:p>4249,44</text:p>
          </table:table-cell>
          <table:table-cell table:style-name="ce12N2" office:value-type="float" office:value="297.46">
            <text:p>297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09911342889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1">
            <text:p>3080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714994569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2">
            <text:p>30803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09">
            <text:p>140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0.27">
            <text:p>1320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383">
            <text:p>0,022</text:p>
          </table:table-cell>
          <table:table-cell table:style-name="ce12N2" office:value-type="float" office:value="8.4">
            <text:p>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85.82">
            <text:p>85,82</text:p>
          </table:table-cell>
          <table:table-cell table:style-name="ce12N2" office:value-type="float" office:value="1320.27">
            <text:p>1320,27</text:p>
          </table:table-cell>
          <table:table-cell table:style-name="ce12N2" office:value-type="float" office:value="52.81">
            <text:p>5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819510635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59">
            <text:p>308059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4.1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9.88">
            <text:p>3149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92.6">
            <text:p>2792,6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2995">
            <text:p>0,030</text:p>
          </table:table-cell>
          <table:table-cell table:style-name="ce12N2" office:value-type="float" office:value="27.4">
            <text:p>2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49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.62">
            <text:p>41,6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72.28">
            <text:p>272,28</text:p>
          </table:table-cell>
          <table:table-cell table:style-name="ce12N2" office:value-type="float" office:value="2877.6">
            <text:p>2877,60</text:p>
          </table:table-cell>
          <table:table-cell table:style-name="ce12N2" office:value-type="float" office:value="115.11">
            <text:p>115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41321753896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3">
            <text:p>3080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6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532">
            <text:p>0,024</text:p>
          </table:table-cell>
          <table:table-cell table:style-name="ce12N2" office:value-type="float" office:value="5.34">
            <text:p>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8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37.1">
            <text:p>6737,10</text:p>
          </table:table-cell>
          <table:table-cell table:style-name="ce12N2" office:value-type="float" office:value="6.74">
            <text:p>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63">
            <text:p>60,6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558.78">
            <text:p>558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6041015211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9">
            <text:p>308089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5.8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5">
            <text:p>0,045</text:p>
          </table:table-cell>
          <table:table-cell table:style-name="ce12N2" office:value-type="float" office:value="2.55">
            <text:p>2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6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.75">
            <text:p>131,75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9">
            <text:p>1,19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10.93">
            <text:p>1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583119611538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50">
            <text:p>308150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0.8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44.93">
            <text:p>2744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2703.31">
            <text:p>2703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3712">
            <text:p>0,144</text:p>
          </table:table-cell>
          <table:table-cell table:style-name="ce12N2" office:value-type="float" office:value="12.87">
            <text:p>12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44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41.62">
            <text:p>41,62</text:p>
          </table:table-cell>
          <table:table-cell table:style-name="ce12N2" office:value-type="float" office:value="2703.31">
            <text:p>2703,31</text:p>
          </table:table-cell>
          <table:table-cell table:style-name="ce12N2" office:value-type="float" office:value="161.45">
            <text:p>16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082916345435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2">
            <text:p>30819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3.1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94.49">
            <text:p>7894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678.21">
            <text:p>7678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419">
            <text:p>0,010</text:p>
          </table:table-cell>
          <table:table-cell table:style-name="ce12N2" office:value-type="float" office:value="2.82">
            <text:p>2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94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80.21">
            <text:p>6480,21</text:p>
          </table:table-cell>
          <table:table-cell table:style-name="ce12N2" office:value-type="float" office:value="6.48">
            <text:p>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32">
            <text:p>58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216.28">
            <text:p>216,28</text:p>
          </table:table-cell>
          <table:table-cell table:style-name="ce12N2" office:value-type="float" office:value="7678.21">
            <text:p>7678,21</text:p>
          </table:table-cell>
          <table:table-cell table:style-name="ce12N2" office:value-type="float" office:value="537.47">
            <text:p>53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313316604285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03">
            <text:p>30820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3.65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4.99">
            <text:p>375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754.99">
            <text:p>3754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367">
            <text:p>0,009</text:p>
          </table:table-cell>
          <table:table-cell table:style-name="ce12N2" office:value-type="float" office:value="2.08">
            <text:p>2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54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72.04">
            <text:p>3172,04</text:p>
          </table:table-cell>
          <table:table-cell table:style-name="ce12N2" office:value-type="float" office:value="3.17">
            <text:p>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55">
            <text:p>28,5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54.99">
            <text:p>3754,99</text:p>
          </table:table-cell>
          <table:table-cell table:style-name="ce12N2" office:value-type="float" office:value="259.62">
            <text:p>25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36581960918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44">
            <text:p>308244</text:p>
          </table:table-cell>
          <table:table-cell table:style-name="ce0" table:number-columns-spanned="4" table:number-rows-spanned="1" office:value-type="string" calcext:value-type="string">
            <text:p>32.049 - M T A INDUSTRIA E COMERCIO DE ARTEFATOS DE INOX LTDA</text:p>
          </table:table-cell>
          <table:covered-table-cell table:number-columns-repeated="3"/>
          <table:table-cell table:style-name="ce0" office:value-type="string" calcext:value-type="string">
            <text:p>144.6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49.31">
            <text:p>724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6806.86">
            <text:p>6806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49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3.17">
            <text:p>73,1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442.45">
            <text:p>442,45</text:p>
          </table:table-cell>
          <table:table-cell table:style-name="ce12N2" office:value-type="float" office:value="6806.86">
            <text:p>6806,86</text:p>
          </table:table-cell>
          <table:table-cell table:style-name="ce12N2" office:value-type="float" office:value="412.98">
            <text:p>41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854788570001745500100014463210029382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98">
            <text:p>308298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83.8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29.4">
            <text:p>1472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29.4">
            <text:p>1472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424">
            <text:p>0,084</text:p>
          </table:table-cell>
          <table:table-cell table:style-name="ce12N2" office:value-type="float" office:value="125.7">
            <text:p>125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72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8388716860993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99">
            <text:p>30829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86.8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458.52">
            <text:p>17458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17458.52">
            <text:p>17458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9403">
            <text:p>0,509</text:p>
          </table:table-cell>
          <table:table-cell table:style-name="ce12N2" office:value-type="float" office:value="227.97">
            <text:p>227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458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8685118142680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1">
            <text:p>30830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86.8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78.06">
            <text:p>17278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7278.06">
            <text:p>17278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6768">
            <text:p>0,147</text:p>
          </table:table-cell>
          <table:table-cell table:style-name="ce12N2" office:value-type="float" office:value="161.33">
            <text:p>161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278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8685319431096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9">
            <text:p>308309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3.38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39.06">
            <text:p>333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181">
            <text:p>318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">
            <text:p>0,006</text:p>
          </table:table-cell>
          <table:table-cell table:style-name="ce12N2" office:value-type="float" office:value="138">
            <text:p>13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39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4.29">
            <text:p>44,2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58.06">
            <text:p>158,06</text:p>
          </table:table-cell>
          <table:table-cell table:style-name="ce12N2" office:value-type="float" office:value="3181">
            <text:p>3181,00</text:p>
          </table:table-cell>
          <table:table-cell table:style-name="ce12N2" office:value-type="float" office:value="127.24">
            <text:p>12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338118819197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0">
            <text:p>308310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0.2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86.01">
            <text:p>478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336.39">
            <text:p>4336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86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449.62">
            <text:p>449,62</text:p>
          </table:table-cell>
          <table:table-cell table:style-name="ce12N2" office:value-type="float" office:value="4336.39">
            <text:p>4336,39</text:p>
          </table:table-cell>
          <table:table-cell table:style-name="ce12N2" office:value-type="float" office:value="173.46">
            <text:p>17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5870170002855500100004024111377110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7">
            <text:p>308317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9.8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76.61">
            <text:p>727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">
            <text:p>47,00</text:p>
          </table:table-cell>
          <table:table-cell table:style-name="ce12N2" office:value-type="float" office:value="7185.25">
            <text:p>7185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1963">
            <text:p>0,232</text:p>
          </table:table-cell>
          <table:table-cell table:style-name="ce12N2" office:value-type="float" office:value="32.52">
            <text:p>32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76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98.26">
            <text:p>6098,26</text:p>
          </table:table-cell>
          <table:table-cell table:style-name="ce12N2" office:value-type="float" office:value="6.06">
            <text:p>6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86">
            <text:p>54,86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91.36">
            <text:p>91,36</text:p>
          </table:table-cell>
          <table:table-cell table:style-name="ce12N2" office:value-type="float" office:value="7185.25">
            <text:p>7185,25</text:p>
          </table:table-cell>
          <table:table-cell table:style-name="ce12N2" office:value-type="float" office:value="465.38">
            <text:p>46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6985017255504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29">
            <text:p>308329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53.425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38.95">
            <text:p>7438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7241.76">
            <text:p>7241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9335">
            <text:p>0,219</text:p>
          </table:table-cell>
          <table:table-cell table:style-name="ce12N2" office:value-type="float" office:value="47.95">
            <text:p>47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38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85.74">
            <text:p>6285,74</text:p>
          </table:table-cell>
          <table:table-cell table:style-name="ce12N2" office:value-type="float" office:value="6.28">
            <text:p>6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58">
            <text:p>56,58</text:p>
          </table:table-cell>
          <table:table-cell table:style-name="ce12N2" office:value-type="float" office:value="75.5">
            <text:p>75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97.19">
            <text:p>197,19</text:p>
          </table:table-cell>
          <table:table-cell table:style-name="ce12N2" office:value-type="float" office:value="7241.76">
            <text:p>7241,76</text:p>
          </table:table-cell>
          <table:table-cell table:style-name="ce12N2" office:value-type="float" office:value="315.39">
            <text:p>315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3084560001495500500045342515510220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1">
            <text:p>308331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2.4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0.51">
            <text:p>110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93.98">
            <text:p>1093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374">
            <text:p>0,194</text:p>
          </table:table-cell>
          <table:table-cell table:style-name="ce12N2" office:value-type="float" office:value="9.16">
            <text:p>9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00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8.49">
            <text:p>938,49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6.53">
            <text:p>6,53</text:p>
          </table:table-cell>
          <table:table-cell table:style-name="ce12N2" office:value-type="float" office:value="1093.98">
            <text:p>1093,98</text:p>
          </table:table-cell>
          <table:table-cell table:style-name="ce12N2" office:value-type="float" office:value="59.82">
            <text:p>59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242012877018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2">
            <text:p>308332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2.4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4.12">
            <text:p>138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362.12">
            <text:p>1362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412">
            <text:p>0,080</text:p>
          </table:table-cell>
          <table:table-cell table:style-name="ce12N2" office:value-type="float" office:value="6.05">
            <text:p>6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8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53.47">
            <text:p>1153,47</text:p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38">
            <text:p>10,38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1362.12">
            <text:p>1362,12</text:p>
          </table:table-cell>
          <table:table-cell table:style-name="ce12N2" office:value-type="float" office:value="91.06">
            <text:p>9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241918177188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3">
            <text:p>308333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2.6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8.74">
            <text:p>838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36.56">
            <text:p>836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6602">
            <text:p>0,077</text:p>
          </table:table-cell>
          <table:table-cell table:style-name="ce12N2" office:value-type="float" office:value="2.89">
            <text:p>2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8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6.04">
            <text:p>706,04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35">
            <text:p>6,35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.18">
            <text:p>2,18</text:p>
          </table:table-cell>
          <table:table-cell table:style-name="ce12N2" office:value-type="float" office:value="836.56">
            <text:p>836,56</text:p>
          </table:table-cell>
          <table:table-cell table:style-name="ce12N2" office:value-type="float" office:value="58.56">
            <text:p>58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269815156048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94">
            <text:p>3083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5.5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43.62">
            <text:p>354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27.34">
            <text:p>3327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43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08.18">
            <text:p>2808,18</text:p>
          </table:table-cell>
          <table:table-cell table:style-name="ce12N2" office:value-type="float" office:value="2.81">
            <text:p>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27">
            <text:p>25,2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16.28">
            <text:p>216,28</text:p>
          </table:table-cell>
          <table:table-cell table:style-name="ce12N2" office:value-type="float" office:value="3327.34">
            <text:p>3327,34</text:p>
          </table:table-cell>
          <table:table-cell table:style-name="ce12N2" office:value-type="float" office:value="232.91">
            <text:p>23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55501077625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3">
            <text:p>308423</text:p>
          </table:table-cell>
          <table:table-cell table:style-name="ce0" table:number-columns-spanned="4" table:number-rows-spanned="1" office:value-type="string" calcext:value-type="string">
            <text:p>709 - MAX EBERHARDT UTILIDADES DOMESTICAS IMPORTACAO E REPRES LTDA</text:p>
          </table:table-cell>
          <table:covered-table-cell table:number-columns-repeated="3"/>
          <table:table-cell table:style-name="ce0" office:value-type="string" calcext:value-type="string">
            <text:p>157.3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43.04">
            <text:p>2543,04</text:p>
          </table:table-cell>
          <table:table-cell table:style-name="ce12N2" office:value-type="float" office:value="196.45">
            <text:p>196,45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584.28">
            <text:p>2584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846">
            <text:p>0,128</text:p>
          </table:table-cell>
          <table:table-cell table:style-name="ce12N2" office:value-type="float" office:value="24.42">
            <text:p>24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43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55.21">
            <text:p>155,21</text:p>
          </table:table-cell>
          <table:table-cell table:style-name="ce12N2" office:value-type="float" office:value="2387.83">
            <text:p>2387,83</text:p>
          </table:table-cell>
          <table:table-cell table:style-name="ce12N2" office:value-type="float" office:value="167.15">
            <text:p>167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23.4">
            <text:p>12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0.316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9/05/2026</text:p>
          </table:table-cell>
          <table:table-cell table:style-name="ce12" office:value-type="string" calcext:value-type="string">
            <text:p>123,40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35260556991334000129550010001573961500448800</text:p>
          </table:table-cell>
          <table:table-cell table:style-name="ce0" office:value-type="string" calcext:value-type="string">
            <text:p>35260511389565000200570050004003161000865962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6">
            <text:p>308426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75.75">
            <text:p>7175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6640.2">
            <text:p>6640,20</text:p>
          </table:table-cell>
          <table:table-cell table:style-name="ce12N2" office:value-type="float" office:value="468">
            <text:p>468,00</text:p>
          </table:table-cell>
          <table:table-cell table:style-name="ce12N3" office:value-type="float" office:value="0.0015">
            <text:p>0,002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75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51.17">
            <text:p>6351,17</text:p>
          </table:table-cell>
          <table:table-cell table:style-name="ce12N2" office:value-type="float" office:value="6.35">
            <text:p>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17">
            <text:p>57,17</text:p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67.55">
            <text:p>67,55</text:p>
          </table:table-cell>
          <table:table-cell table:style-name="ce12N2" office:value-type="float" office:value="7108.2">
            <text:p>7108,20</text:p>
          </table:table-cell>
          <table:table-cell table:style-name="ce12N2" office:value-type="float" office:value="497.57">
            <text:p>497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8318195992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7">
            <text:p>308437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61.8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86.4">
            <text:p>428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024.8">
            <text:p>402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41.66">
            <text:p>41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8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96.78">
            <text:p>3396,78</text:p>
          </table:table-cell>
          <table:table-cell table:style-name="ce12N2" office:value-type="float" office:value="3.4">
            <text:p>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56">
            <text:p>30,56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61.6">
            <text:p>261,60</text:p>
          </table:table-cell>
          <table:table-cell table:style-name="ce12N2" office:value-type="float" office:value="4024.8">
            <text:p>4024,80</text:p>
          </table:table-cell>
          <table:table-cell table:style-name="ce12N2" office:value-type="float" office:value="281.76">
            <text:p>28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502380001145500100136181212998413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55">
            <text:p>308455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0.3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5.63">
            <text:p>226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010.1">
            <text:p>201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9">
            <text:p>0,017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65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56.34">
            <text:p>1856,34</text:p>
          </table:table-cell>
          <table:table-cell table:style-name="ce12N2" office:value-type="float" office:value="1.86">
            <text:p>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71">
            <text:p>16,71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55.53">
            <text:p>255,53</text:p>
          </table:table-cell>
          <table:table-cell table:style-name="ce12N2" office:value-type="float" office:value="2010.1">
            <text:p>2010,10</text:p>
          </table:table-cell>
          <table:table-cell table:style-name="ce12N2" office:value-type="float" office:value="80.4">
            <text:p>8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5870170002855500100004033814265748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0">
            <text:p>308460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0.2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7.06">
            <text:p>3647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633.78">
            <text:p>3633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4525">
            <text:p>0,105</text:p>
          </table:table-cell>
          <table:table-cell table:style-name="ce12N2" office:value-type="float" office:value="22.39">
            <text:p>22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7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94.11">
            <text:p>3094,11</text:p>
          </table:table-cell>
          <table:table-cell table:style-name="ce12N2" office:value-type="float" office:value="3.08">
            <text:p>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86">
            <text:p>27,86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3.28">
            <text:p>13,28</text:p>
          </table:table-cell>
          <table:table-cell table:style-name="ce12N2" office:value-type="float" office:value="3633.78">
            <text:p>3633,78</text:p>
          </table:table-cell>
          <table:table-cell table:style-name="ce12N2" office:value-type="float" office:value="224.27">
            <text:p>2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029917400163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4">
            <text:p>308464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2.5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91.2">
            <text:p>459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591.2">
            <text:p>459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46.88">
            <text:p>246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9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74.86">
            <text:p>3874,86</text:p>
          </table:table-cell>
          <table:table-cell table:style-name="ce12N2" office:value-type="float" office:value="3.87">
            <text:p>3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88">
            <text:p>34,88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91.2">
            <text:p>4591,20</text:p>
          </table:table-cell>
          <table:table-cell table:style-name="ce12N2" office:value-type="float" office:value="321.38">
            <text:p>32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255316567585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73">
            <text:p>308473</text:p>
          </table:table-cell>
          <table:table-cell table:style-name="ce0" table:number-columns-spanned="4" table:number-rows-spanned="1" office:value-type="string" calcext:value-type="string">
            <text:p>35.983 - SUVINIL COATINGS S.A</text:p>
          </table:table-cell>
          <table:covered-table-cell table:number-columns-repeated="3"/>
          <table:table-cell table:style-name="ce0" office:value-type="string" calcext:value-type="string">
            <text:p>194.63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74.3">
            <text:p>457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74.3">
            <text:p>4574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74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85.13">
            <text:p>3985,13</text:p>
          </table:table-cell>
          <table:table-cell table:style-name="ce12N2" office:value-type="float" office:value="3.99">
            <text:p>3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.87">
            <text:p>35,8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74.3">
            <text:p>4574,30</text:p>
          </table:table-cell>
          <table:table-cell table:style-name="ce12N2" office:value-type="float" office:value="182.97">
            <text:p>18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51322020001895500300019463413404095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74">
            <text:p>308474</text:p>
          </table:table-cell>
          <table:table-cell table:style-name="ce0" table:number-columns-spanned="4" table:number-rows-spanned="1" office:value-type="string" calcext:value-type="string">
            <text:p>35.983 - SUVINIL COATINGS S.A</text:p>
          </table:table-cell>
          <table:covered-table-cell table:number-columns-repeated="3"/>
          <table:table-cell table:style-name="ce0" office:value-type="string" calcext:value-type="string">
            <text:p>194.63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.56">
            <text:p>91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1.56">
            <text:p>91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">
            <text:p>0,002</text:p>
          </table:table-cell>
          <table:table-cell table:style-name="ce12N2" office:value-type="float" office:value="3.31">
            <text:p>3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.28">
            <text:p>77,28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7">
            <text:p>0,70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.56">
            <text:p>91,56</text:p>
          </table:table-cell>
          <table:table-cell table:style-name="ce12N2" office:value-type="float" office:value="6.41">
            <text:p>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51322020001895500300019463219424153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75">
            <text:p>308475</text:p>
          </table:table-cell>
          <table:table-cell table:style-name="ce0" table:number-columns-spanned="4" table:number-rows-spanned="1" office:value-type="string" calcext:value-type="string">
            <text:p>35.983 - SUVINIL COATINGS S.A</text:p>
          </table:table-cell>
          <table:covered-table-cell table:number-columns-repeated="3"/>
          <table:table-cell table:style-name="ce0" office:value-type="string" calcext:value-type="string">
            <text:p>194.63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9.01">
            <text:p>539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2.04">
            <text:p>522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9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0.59">
            <text:p>440,59</text:p>
          </table:table-cell>
          <table:table-cell table:style-name="ce12N2" office:value-type="float" office:value="0.44">
            <text:p>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97">
            <text:p>3,9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6.97">
            <text:p>16,97</text:p>
          </table:table-cell>
          <table:table-cell table:style-name="ce12N2" office:value-type="float" office:value="522.04">
            <text:p>522,04</text:p>
          </table:table-cell>
          <table:table-cell table:style-name="ce12N2" office:value-type="float" office:value="36.54">
            <text:p>3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51322020001895500300019463314946633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9">
            <text:p>30851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2.31">
            <text:p>315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59.92">
            <text:p>2959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52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98.1">
            <text:p>2498,10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48">
            <text:p>22,4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92.39">
            <text:p>192,39</text:p>
          </table:table-cell>
          <table:table-cell table:style-name="ce12N2" office:value-type="float" office:value="2959.92">
            <text:p>2959,92</text:p>
          </table:table-cell>
          <table:table-cell table:style-name="ce12N2" office:value-type="float" office:value="207.19">
            <text:p>20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5510603853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5">
            <text:p>30852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1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58.7">
            <text:p>915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12N2" office:value-type="float" office:value="9035.9">
            <text:p>903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21734">
            <text:p>0,322</text:p>
          </table:table-cell>
          <table:table-cell table:style-name="ce12N2" office:value-type="float" office:value="38.36">
            <text:p>38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58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21.54">
            <text:p>7721,54</text:p>
          </table:table-cell>
          <table:table-cell table:style-name="ce12N2" office:value-type="float" office:value="7.75">
            <text:p>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5">
            <text:p>69,50</text:p>
          </table:table-cell>
          <table:table-cell table:style-name="ce12N2" office:value-type="float" office:value="64">
            <text:p>6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22.8">
            <text:p>122,80</text:p>
          </table:table-cell>
          <table:table-cell table:style-name="ce12N2" office:value-type="float" office:value="9035.9">
            <text:p>9035,90</text:p>
          </table:table-cell>
          <table:table-cell table:style-name="ce12N2" office:value-type="float" office:value="527.41">
            <text:p>52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111113861717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6">
            <text:p>308546</text:p>
          </table:table-cell>
          <table:table-cell table:style-name="ce0" table:number-columns-spanned="4" table:number-rows-spanned="1" office:value-type="string" calcext:value-type="string">
            <text:p>32.615 - MADELUSTRE INDUSTRIAL LTDA</text:p>
          </table:table-cell>
          <table:covered-table-cell table:number-columns-repeated="3"/>
          <table:table-cell table:style-name="ce0" office:value-type="string" calcext:value-type="string">
            <text:p>71.62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79.53">
            <text:p>3679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352.65">
            <text:p>3352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E-6">
            <text:p>0,000</text:p>
          </table:table-cell>
          <table:table-cell table:style-name="ce12N2" office:value-type="float" office:value="14.96">
            <text:p>14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79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29.54">
            <text:p>2829,54</text:p>
          </table:table-cell>
          <table:table-cell table:style-name="ce12N2" office:value-type="float" office:value="2.83">
            <text:p>2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46">
            <text:p>25,46</text:p>
          </table:table-cell>
          <table:table-cell table:style-name="ce12N2" office:value-type="float" office:value="40.75">
            <text:p>40,7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326.88">
            <text:p>326,88</text:p>
          </table:table-cell>
          <table:table-cell table:style-name="ce12N2" office:value-type="float" office:value="3352.65">
            <text:p>3352,65</text:p>
          </table:table-cell>
          <table:table-cell table:style-name="ce12N2" office:value-type="float" office:value="234.69">
            <text:p>234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6164600001525500200007162817530420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9">
            <text:p>30854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3">
            <text:p>0,015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101394853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74">
            <text:p>308574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4.7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13.2">
            <text:p>921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8317.26">
            <text:p>8317,26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07412">
            <text:p>0,007</text:p>
          </table:table-cell>
          <table:table-cell table:style-name="ce12N2" office:value-type="float" office:value="13.2">
            <text:p>1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1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20.03">
            <text:p>7320,03</text:p>
          </table:table-cell>
          <table:table-cell table:style-name="ce12N2" office:value-type="float" office:value="7.33">
            <text:p>7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87">
            <text:p>65,87</text:p>
          </table:table-cell>
          <table:table-cell table:style-name="ce12N2" office:value-type="float" office:value="55.74">
            <text:p>55,7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810.94">
            <text:p>810,94</text:p>
          </table:table-cell>
          <table:table-cell table:style-name="ce12N2" office:value-type="float" office:value="8402.26">
            <text:p>8402,26</text:p>
          </table:table-cell>
          <table:table-cell table:style-name="ce12N2" office:value-type="float" office:value="336.11">
            <text:p>33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10691158000370550010002947541784828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91">
            <text:p>3085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.72">
            <text:p>113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6.78">
            <text:p>106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2">
            <text:p>0,000</text:p>
          </table:table-cell>
          <table:table-cell table:style-name="ce12N2" office:value-type="float" office:value="0.39">
            <text:p>0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3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.12">
            <text:p>90,12</text:p>
          </table:table-cell>
          <table:table-cell table:style-name="ce12N2" office:value-type="float" office:value="0.09">
            <text:p>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81">
            <text:p>0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6.94">
            <text:p>6,94</text:p>
          </table:table-cell>
          <table:table-cell table:style-name="ce12N2" office:value-type="float" office:value="106.78">
            <text:p>106,78</text:p>
          </table:table-cell>
          <table:table-cell table:style-name="ce12N2" office:value-type="float" office:value="7.47">
            <text:p>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0515722357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94">
            <text:p>3085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.5">
            <text:p>10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">
            <text:p>1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2">
            <text:p>0,000</text:p>
          </table:table-cell>
          <table:table-cell table:style-name="ce12N2" office:value-type="float" office:value="0.39">
            <text:p>0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.4">
            <text:p>84,40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76">
            <text:p>0,7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6.5">
            <text:p>6,50</text:p>
          </table:table-cell>
          <table:table-cell table:style-name="ce12N2" office:value-type="float" office:value="100">
            <text:p>100,00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0410202608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1">
            <text:p>308621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7.86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.72">
            <text:p>1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.72">
            <text:p>10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.97">
            <text:p>9,97</text:p>
          </table:table-cell>
          <table:table-cell table:style-name="ce12N2" office:value-type="float" office:value="0.01">
            <text:p>0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09">
            <text:p>0,09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72">
            <text:p>10,72</text:p>
          </table:table-cell>
          <table:table-cell table:style-name="ce12N2" office:value-type="float" office:value="0.75">
            <text:p>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786917180693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3">
            <text:p>30862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8.86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.87">
            <text:p>32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8.87">
            <text:p>328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905">
            <text:p>0,067</text:p>
          </table:table-cell>
          <table:table-cell table:style-name="ce12N2" office:value-type="float" office:value="20.06">
            <text:p>20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8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5.85">
            <text:p>305,85</text:p>
          </table:table-cell>
          <table:table-cell table:style-name="ce12N2" office:value-type="float" office:value="0.31">
            <text:p>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75">
            <text:p>2,7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.87">
            <text:p>328,87</text:p>
          </table:table-cell>
          <table:table-cell table:style-name="ce12N2" office:value-type="float" office:value="23.02">
            <text:p>23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886216029958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5">
            <text:p>308625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3.7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39.85">
            <text:p>573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29.94">
            <text:p>5229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3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29.94">
            <text:p>5229,94</text:p>
          </table:table-cell>
          <table:table-cell table:style-name="ce12N2" office:value-type="float" office:value="5.23">
            <text:p>5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07">
            <text:p>47,07</text:p>
          </table:table-cell>
          <table:table-cell table:style-name="ce12N2" office:value-type="float" office:value="39.16">
            <text:p>39,1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509.91">
            <text:p>509,91</text:p>
          </table:table-cell>
          <table:table-cell table:style-name="ce12N2" office:value-type="float" office:value="5229.94">
            <text:p>5229,94</text:p>
          </table:table-cell>
          <table:table-cell table:style-name="ce12N2" office:value-type="float" office:value="366.1">
            <text:p>36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3296080001445500100026377210026377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6">
            <text:p>308626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0.7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15.5">
            <text:p>1941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9343.7">
            <text:p>19343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64002">
            <text:p>0,964</text:p>
          </table:table-cell>
          <table:table-cell table:style-name="ce12N2" office:value-type="float" office:value="94.1">
            <text:p>94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415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683.16">
            <text:p>16683,16</text:p>
          </table:table-cell>
          <table:table-cell table:style-name="ce12N2" office:value-type="float" office:value="16.72">
            <text:p>16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.17">
            <text:p>150,17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71.8">
            <text:p>71,80</text:p>
          </table:table-cell>
          <table:table-cell table:style-name="ce12N2" office:value-type="float" office:value="19343.7">
            <text:p>19343,70</text:p>
          </table:table-cell>
          <table:table-cell table:style-name="ce12N2" office:value-type="float" office:value="960.07">
            <text:p>960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07951688803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2">
            <text:p>30863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2.66">
            <text:p>19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.9">
            <text:p>180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2">
            <text:p>0,000</text:p>
          </table:table-cell>
          <table:table-cell table:style-name="ce12N2" office:value-type="float" office:value="0.39">
            <text:p>0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2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2.67">
            <text:p>152,67</text:p>
          </table:table-cell>
          <table:table-cell table:style-name="ce12N2" office:value-type="float" office:value="0.15">
            <text:p>0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37">
            <text:p>1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11.76">
            <text:p>11,76</text:p>
          </table:table-cell>
          <table:table-cell table:style-name="ce12N2" office:value-type="float" office:value="180.9">
            <text:p>180,90</text:p>
          </table:table-cell>
          <table:table-cell table:style-name="ce12N2" office:value-type="float" office:value="12.66">
            <text:p>1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115352056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7">
            <text:p>30863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8">
            <text:p>0,000</text:p>
          </table:table-cell>
          <table:table-cell table:style-name="ce12N2" office:value-type="float" office:value="2.64">
            <text:p>2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5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13.44">
            <text:p>1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2015774985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70">
            <text:p>308670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7.6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35.13">
            <text:p>753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029.44">
            <text:p>7029,44</text:p>
          </table:table-cell>
          <table:table-cell table:style-name="ce12N2" office:value-type="float" office:value="421.77">
            <text:p>421,77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52">
            <text:p>5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3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96.59">
            <text:p>6896,59</text:p>
          </table:table-cell>
          <table:table-cell table:style-name="ce12N2" office:value-type="float" office:value="6.9">
            <text:p>6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07">
            <text:p>62,07</text:p>
          </table:table-cell>
          <table:table-cell table:style-name="ce12N2" office:value-type="float" office:value="74">
            <text:p>7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83.92">
            <text:p>83,92</text:p>
          </table:table-cell>
          <table:table-cell table:style-name="ce12N2" office:value-type="float" office:value="7451.21">
            <text:p>7451,21</text:p>
          </table:table-cell>
          <table:table-cell table:style-name="ce12N2" office:value-type="float" office:value="298.05">
            <text:p>29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248556330001405500100007769713142036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13">
            <text:p>308713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3.2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99.43">
            <text:p>419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753.36">
            <text:p>3753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4">
            <text:p>0,057</text:p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99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28.38">
            <text:p>3228,38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05">
            <text:p>29,05</text:p>
          </table:table-cell>
          <table:table-cell table:style-name="ce12N2" office:value-type="float" office:value="40.51">
            <text:p>40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446.07">
            <text:p>446,07</text:p>
          </table:table-cell>
          <table:table-cell table:style-name="ce12N2" office:value-type="float" office:value="3753.36">
            <text:p>3753,36</text:p>
          </table:table-cell>
          <table:table-cell table:style-name="ce12N2" office:value-type="float" office:value="195.91">
            <text:p>195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322113308556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14">
            <text:p>308714</text:p>
          </table:table-cell>
          <table:table-cell table:style-name="ce0" table:number-columns-spanned="4" table:number-rows-spanned="1" office:value-type="string" calcext:value-type="string">
            <text:p>21.329 - S &amp; L SOUZA E LIMA FABRICACAO E COMERCIO DE LUMINARIAS LTDA</text:p>
          </table:table-cell>
          <table:covered-table-cell table:number-columns-repeated="3"/>
          <table:table-cell table:style-name="ce0" office:value-type="string" calcext:value-type="string">
            <text:p>48.7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6.13">
            <text:p>1366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222.34">
            <text:p>1222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9">
            <text:p>0,001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66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143.79">
            <text:p>143,79</text:p>
          </table:table-cell>
          <table:table-cell table:style-name="ce12N2" office:value-type="float" office:value="1222.34">
            <text:p>1222,34</text:p>
          </table:table-cell>
          <table:table-cell table:style-name="ce12N2" office:value-type="float" office:value="85.57">
            <text:p>85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03944160001955500100004871810002596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4">
            <text:p>308724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4.1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78.92">
            <text:p>3978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625.44">
            <text:p>3625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86">
            <text:p>0,003</text:p>
          </table:table-cell>
          <table:table-cell table:style-name="ce12N2" office:value-type="float" office:value="2.8">
            <text:p>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78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25.44">
            <text:p>3625,44</text:p>
          </table:table-cell>
          <table:table-cell table:style-name="ce12N2" office:value-type="float" office:value="3.62">
            <text:p>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63">
            <text:p>32,63</text:p>
          </table:table-cell>
          <table:table-cell table:style-name="ce12N2" office:value-type="float" office:value="34.38">
            <text:p>34,3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353.48">
            <text:p>353,48</text:p>
          </table:table-cell>
          <table:table-cell table:style-name="ce12N2" office:value-type="float" office:value="3625.44">
            <text:p>3625,44</text:p>
          </table:table-cell>
          <table:table-cell table:style-name="ce12N2" office:value-type="float" office:value="253.78">
            <text:p>253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412110026412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0">
            <text:p>308730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1.5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11.2">
            <text:p>231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11.2">
            <text:p>231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5">
            <text:p>0,009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1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50.59">
            <text:p>1950,59</text:p>
          </table:table-cell>
          <table:table-cell table:style-name="ce12N2" office:value-type="float" office:value="1.95">
            <text:p>1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56">
            <text:p>17,56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11.2">
            <text:p>2311,20</text:p>
          </table:table-cell>
          <table:table-cell table:style-name="ce12N2" office:value-type="float" office:value="161.78">
            <text:p>161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151110717113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45">
            <text:p>30874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0.43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83.12">
            <text:p>268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83.12">
            <text:p>268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668">
            <text:p>0,011</text:p>
          </table:table-cell>
          <table:table-cell table:style-name="ce12N2" office:value-type="float" office:value="4.12">
            <text:p>4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8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64.48">
            <text:p>2264,48</text:p>
          </table:table-cell>
          <table:table-cell table:style-name="ce12N2" office:value-type="float" office:value="2.26">
            <text:p>2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38">
            <text:p>20,3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83.12">
            <text:p>2683,12</text:p>
          </table:table-cell>
          <table:table-cell table:style-name="ce12N2" office:value-type="float" office:value="187.82">
            <text:p>187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043811817633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75">
            <text:p>308775</text:p>
          </table:table-cell>
          <table:table-cell table:style-name="ce0" table:number-columns-spanned="4" table:number-rows-spanned="1" office:value-type="string" calcext:value-type="string">
            <text:p>10.562 - RENATO MARTINS CIOFFOLETTI ILUM. EPP</text:p>
          </table:table-cell>
          <table:covered-table-cell table:number-columns-repeated="3"/>
          <table:table-cell table:style-name="ce0" office:value-type="string" calcext:value-type="string">
            <text:p>18.8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6.5">
            <text:p>139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396.5">
            <text:p>139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6.5">
            <text:p>1396,50</text:p>
          </table:table-cell>
          <table:table-cell table:style-name="ce12N2" office:value-type="float" office:value="41.48">
            <text:p>41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373734000120550010000188121106787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84">
            <text:p>308784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7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0.23">
            <text:p>195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776.97">
            <text:p>1776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3776">
            <text:p>0,054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50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76.97">
            <text:p>1776,97</text:p>
          </table:table-cell>
          <table:table-cell table:style-name="ce12N2" office:value-type="float" office:value="1.77">
            <text:p>1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98">
            <text:p>15,98</text:p>
          </table:table-cell>
          <table:table-cell table:style-name="ce12N2" office:value-type="float" office:value="43.67">
            <text:p>43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173.26">
            <text:p>173,26</text:p>
          </table:table-cell>
          <table:table-cell table:style-name="ce12N2" office:value-type="float" office:value="1776.97">
            <text:p>1776,97</text:p>
          </table:table-cell>
          <table:table-cell table:style-name="ce12N2" office:value-type="float" office:value="124.39">
            <text:p>12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30228132000136550010000097491280346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53">
            <text:p>53,00</text:p>
          </table:table-cell>
          <table:table-cell table:style-name="ce26N2" office:value-type="float" office:value="196.45">
            <text:p>196,45</text:p>
          </table:table-cell>
          <table:table-cell table:style-name="ce26N2" office:value-type="float" office:value="1059.77">
            <text:p>1059,7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245.6">
            <text:p>6245,60</text:p>
          </table:table-cell>
          <table:table-cell table:style-name="ce26N2" office:value-type="float" office:value="168821.96">
            <text:p>168821,96</text:p>
          </table:table-cell>
          <table:table-cell table:style-name="ce26N2" office:value-type="float" office:value="9782.37">
            <text:p>9782,3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23.4">
            <text:p>123,40</text:p>
          </table:table-cell>
          <table:table-cell table:style-name="ce26N2" office:value-type="float" office:value="224681.04">
            <text:p>224681,0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.651641">
            <text:p>3,652</text:p>
          </table:table-cell>
          <table:table-cell table:style-name="ce26N2" office:value-type="float" office:value="217572.12">
            <text:p>217572,12</text:p>
          </table:table-cell>
          <table:table-cell table:style-name="ce26N2" office:value-type="float" office:value="224681.04">
            <text:p>224681,0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20382.81">
            <text:p>120382,81</text:p>
          </table:table-cell>
          <table:table-cell table:style-name="ce26N2" office:value-type="float" office:value="120.39">
            <text:p>120,3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083.45">
            <text:p>1083,45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458.98">
            <text:p>1458,9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8.34">
            <text:p>38,3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660" meta:object-count="0"/>
    <meta:generator>LibreOffice/4.3.0.4$Windows_x86 LibreOffice_project/62ad5818884a2fc2e5780dd45466868d41009ec0</meta:generator>
  </office:meta>
</office:document-meta>
</file>