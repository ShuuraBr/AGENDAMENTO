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2">
            <text:p>31067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9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62.49">
            <text:p>856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24">
            <text:p>0,050</text:p>
          </table:table-cell>
          <table:table-cell table:style-name="ce12N2" office:value-type="float" office:value="45.5">
            <text:p>4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6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2.21">
            <text:p>6962,21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6">
            <text:p>62,66</text:p>
          </table:table-cell>
          <table:table-cell table:style-name="ce12N2" office:value-type="float" office:value="54.13">
            <text:p>54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570.97">
            <text:p>570,97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319.66">
            <text:p>3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9221345408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6">
            <text:p>3107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87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1496">
            <text:p>0,251</text:p>
          </table:table-cell>
          <table:table-cell table:style-name="ce12N2" office:value-type="float" office:value="507.54">
            <text:p>50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9.01">
            <text:p>3209,01</text:p>
          </table:table-cell>
          <table:table-cell table:style-name="ce12N2" office:value-type="float" office:value="3.21">
            <text:p>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8">
            <text:p>28,88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266.17">
            <text:p>26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8761200869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3">
            <text:p>3107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3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116">
            <text:p>0,065</text:p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06.68">
            <text:p>7006,6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06">
            <text:p>6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581.14">
            <text:p>5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3301144730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9">
            <text:p>31079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1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3.29">
            <text:p>706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0259">
            <text:p>30,003</text:p>
          </table:table-cell>
          <table:table-cell table:style-name="ce12N2" office:value-type="float" office:value="161.1">
            <text:p>16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3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85.73">
            <text:p>5785,73</text:p>
          </table:table-cell>
          <table:table-cell table:style-name="ce12N2" office:value-type="float" office:value="5.79">
            <text:p>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58.21">
            <text:p>58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2.18">
            <text:p>422,18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265.64">
            <text:p>2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129126910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3">
            <text:p>31080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5">
            <text:p>0,000</text:p>
          </table:table-cell>
          <table:table-cell table:style-name="ce12N2" office:value-type="float" office:value="37.88">
            <text:p>37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.56">
            <text:p>202,56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16.8">
            <text:p>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51832890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6">
            <text:p>31080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8.84">
            <text:p>1718,84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9.78">
            <text:p>1629,78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7">
            <text:p>14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127.32">
            <text:p>12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028676000103550010000574421004490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1">
            <text:p>310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324">
            <text:p>0,052</text:p>
          </table:table-cell>
          <table:table-cell table:style-name="ce12N2" office:value-type="float" office:value="12.98">
            <text:p>1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8.4">
            <text:p>6048,4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43">
            <text:p>54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399.41">
            <text:p>39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591213091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0">
            <text:p>310830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6">
            <text:p>0,076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.51">
            <text:p>569,51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44.49">
            <text:p>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01502844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4">
            <text:p>310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75.35">
            <text:p>76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911">
            <text:p>0,038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2.99">
            <text:p>6432,99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9">
            <text:p>5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3.08">
            <text:p>53,08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533.56">
            <text:p>53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491879096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5">
            <text:p>3109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32">
            <text:p>71,32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6111791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9">
            <text:p>3109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8.82">
            <text:p>678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9">
            <text:p>0,03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76.03">
            <text:p>5376,03</text:p>
          </table:table-cell>
          <table:table-cell table:style-name="ce12N2" office:value-type="float" office:value="5.38">
            <text:p>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54.48">
            <text:p>54,4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11.33">
            <text:p>611,33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253.49">
            <text:p>2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601232266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1">
            <text:p>311001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15">
            <text:p>0,037</text:p>
          </table:table-cell>
          <table:table-cell table:style-name="ce12N2" office:value-type="float" office:value="28.12">
            <text:p>28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7.28">
            <text:p>2087,28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173.12">
            <text:p>1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6114415000067855001001286594154523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9">
            <text:p>311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1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3.82">
            <text:p>148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88">
            <text:p>1175,8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0.56">
            <text:p>90,56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97.53">
            <text:p>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1081826263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7">
            <text:p>31102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9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8.43">
            <text:p>1408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6">
            <text:p>0,026</text:p>
          </table:table-cell>
          <table:table-cell table:style-name="ce12N2" office:value-type="float" office:value="13.34">
            <text:p>1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8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27.02">
            <text:p>10527,02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75">
            <text:p>94,7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15.29">
            <text:p>1615,29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873.13">
            <text:p>87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3562859000105550010001696801991696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8">
            <text:p>31106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734">
            <text:p>0,019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5.68">
            <text:p>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43514321270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9">
            <text:p>311069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22.77">
            <text:p>1412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3304.87">
            <text:p>13304,87</text:p>
          </table:table-cell>
          <table:table-cell table:style-name="ce12N2" office:value-type="float" office:value="510">
            <text:p>510,00</text:p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7.73">
            <text:p>17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2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43.57">
            <text:p>12343,57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08">
            <text:p>111,08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07.9">
            <text:p>307,90</text:p>
          </table:table-cell>
          <table:table-cell table:style-name="ce12N2" office:value-type="float" office:value="13814.87">
            <text:p>13814,87</text:p>
          </table:table-cell>
          <table:table-cell table:style-name="ce12N2" office:value-type="float" office:value="967.04">
            <text:p>96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570742000329550010000108361132010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4">
            <text:p>31111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69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36">
            <text:p>0,00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3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.35">
            <text:p>340,35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28.23">
            <text:p>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6981521714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9">
            <text:p>3111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98">
            <text:p>1163,98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96.54">
            <text:p>9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621761485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4">
            <text:p>3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5.5">
            <text:p>1005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51.18">
            <text:p>4951,18</text:p>
          </table:table-cell>
          <table:table-cell table:style-name="ce26N2" office:value-type="float" office:value="145418.19">
            <text:p>145418,19</text:p>
          </table:table-cell>
          <table:table-cell table:style-name="ce26N2" office:value-type="float" office:value="8891.79">
            <text:p>8891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50389.37">
            <text:p>150389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5.523416">
            <text:p>35,523</text:p>
          </table:table-cell>
          <table:table-cell table:style-name="ce26N2" office:value-type="float" office:value="144432.69">
            <text:p>144432,69</text:p>
          </table:table-cell>
          <table:table-cell table:style-name="ce26N2" office:value-type="float" office:value="150389.37">
            <text:p>150389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4774.88">
            <text:p>124774,88</text:p>
          </table:table-cell>
          <table:table-cell table:style-name="ce26N2" office:value-type="float" office:value="124.8">
            <text:p>124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22.97">
            <text:p>1122,9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824.39">
            <text:p>2824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.12">
            <text:p>52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06" meta:object-count="0"/>
    <meta:generator>LibreOffice/4.3.0.4$Windows_x86 LibreOffice_project/62ad5818884a2fc2e5780dd45466868d41009ec0</meta:generator>
  </office:meta>
</office:document-meta>
</file>