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3/07/2026 07:42:1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7">
            <text:p>310547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6">
            <text:p>2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75.35">
            <text:p>1875,35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7">
            <text:p>16,8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290.96">
            <text:p>290,96</text:p>
          </table:table-cell>
          <table:table-cell table:style-name="ce12N2" office:value-type="float" office:value="2030.7">
            <text:p>2030,70</text:p>
          </table:table-cell>
          <table:table-cell table:style-name="ce12N2" office:value-type="float" office:value="81.23">
            <text:p>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6415973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8">
            <text:p>310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9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5">
            <text:p>0,001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1.47">
            <text:p>1681,47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3">
            <text:p>15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2.32">
            <text:p>1992,32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9051672752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4">
            <text:p>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04.4">
            <text:p>1304,40</text:p>
          </table:table-cell>
          <table:table-cell table:style-name="ce26N2" office:value-type="float" office:value="142560.11">
            <text:p>142560,11</text:p>
          </table:table-cell>
          <table:table-cell table:style-name="ce26N2" office:value-type="float" office:value="9398.64">
            <text:p>9398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143884.51">
            <text:p>143884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1.585001">
            <text:p>261,585</text:p>
          </table:table-cell>
          <table:table-cell table:style-name="ce26N2" office:value-type="float" office:value="133573.75">
            <text:p>133573,75</text:p>
          </table:table-cell>
          <table:table-cell table:style-name="ce26N2" office:value-type="float" office:value="143884.51">
            <text:p>143884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816.23">
            <text:p>120816,23</text:p>
          </table:table-cell>
          <table:table-cell table:style-name="ce26N2" office:value-type="float" office:value="120.76">
            <text:p>120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7.29">
            <text:p>1087,2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233.95">
            <text:p>9233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.58">
            <text:p>57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6" meta:object-count="0"/>
    <meta:generator>LibreOffice/4.3.0.4$Windows_x86 LibreOffice_project/62ad5818884a2fc2e5780dd45466868d41009ec0</meta:generator>
  </office:meta>
</office:document-meta>
</file>