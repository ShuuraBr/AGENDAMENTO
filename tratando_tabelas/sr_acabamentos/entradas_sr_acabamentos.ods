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18/05/2026 07:30:58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6559">
            <text:p>306559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7.83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81.49">
            <text:p>148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249.88">
            <text:p>1249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0">
            <text:p>100,00</text:p>
          </table:table-cell>
          <table:table-cell table:style-name="ce12" office:value-type="string" calcext:value-type="string">
            <text:p>1.481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31.61">
            <text:p>131,61</text:p>
          </table:table-cell>
          <table:table-cell table:style-name="ce12N2" office:value-type="float" office:value="1349.88">
            <text:p>1349,88</text:p>
          </table:table-cell>
          <table:table-cell table:style-name="ce12N2" office:value-type="float" office:value="84.33">
            <text:p>84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45461650003935500400009783211206100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01">
            <text:p>306701</text:p>
          </table:table-cell>
          <table:table-cell table:style-name="ce0" table:number-columns-spanned="4" table:number-rows-spanned="1" office:value-type="string" calcext:value-type="string">
            <text:p>36.025 - FRESNOMAQ INDUSTRIA DE MAQUINAS S/A</text:p>
          </table:table-cell>
          <table:covered-table-cell table:number-columns-repeated="3"/>
          <table:table-cell table:style-name="ce0" office:value-type="string" calcext:value-type="string">
            <text:p>59.9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656">
            <text:p>0,200</text:p>
          </table:table-cell>
          <table:table-cell table:style-name="ce12N2" office:value-type="float" office:value="8.76">
            <text:p>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">
            <text:p>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158.4">
            <text:p>15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4063372800011865500100005998918744180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2">
            <text:p>306712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">
            <text:p>0,054</text:p>
          </table:table-cell>
          <table:table-cell table:style-name="ce12N2" office:value-type="float" office:value="18.6">
            <text:p>18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8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19.49">
            <text:p>19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91393486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4">
            <text:p>30671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7.53">
            <text:p>56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7.53">
            <text:p>567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136">
            <text:p>0,081</text:p>
          </table:table-cell>
          <table:table-cell table:style-name="ce12N2" office:value-type="float" office:value="26.3">
            <text:p>2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7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7.53">
            <text:p>567,53</text:p>
          </table:table-cell>
          <table:table-cell table:style-name="ce12N2" office:value-type="float" office:value="39.73">
            <text:p>39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81842296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5">
            <text:p>306715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656">
            <text:p>0,035</text:p>
          </table:table-cell>
          <table:table-cell table:style-name="ce12N2" office:value-type="float" office:value="16.14">
            <text:p>16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57.04">
            <text:p>5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71369635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7">
            <text:p>306717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3.84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5984">
            <text:p>0,096</text:p>
          </table:table-cell>
          <table:table-cell table:style-name="ce12N2" office:value-type="float" office:value="41.84">
            <text:p>41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0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74.94">
            <text:p>7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384610614180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25">
            <text:p>306825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3.3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698.87">
            <text:p>7569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">
            <text:p>55,00</text:p>
          </table:table-cell>
          <table:table-cell table:style-name="ce12N2" office:value-type="float" office:value="71271.6">
            <text:p>7127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400605">
            <text:p>4,401</text:p>
          </table:table-cell>
          <table:table-cell table:style-name="ce12N2" office:value-type="float" office:value="623.56">
            <text:p>62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.698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427.27">
            <text:p>4427,27</text:p>
          </table:table-cell>
          <table:table-cell table:style-name="ce12N2" office:value-type="float" office:value="71271.6">
            <text:p>71271,60</text:p>
          </table:table-cell>
          <table:table-cell table:style-name="ce12N2" office:value-type="float" office:value="3720.23">
            <text:p>372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331715317103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42">
            <text:p>30694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5.92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3.8">
            <text:p>223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33.8">
            <text:p>223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104">
            <text:p>0,013</text:p>
          </table:table-cell>
          <table:table-cell table:style-name="ce12N2" office:value-type="float" office:value="3.36">
            <text:p>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3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33.8">
            <text:p>2233,80</text:p>
          </table:table-cell>
          <table:table-cell table:style-name="ce12N2" office:value-type="float" office:value="156.37">
            <text:p>156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59281745462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9">
            <text:p>307049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8.006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4.72">
            <text:p>17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.2">
            <text:p>15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15.52">
            <text:p>15,52</text:p>
          </table:table-cell>
          <table:table-cell table:style-name="ce12N2" office:value-type="float" office:value="159.2">
            <text:p>159,20</text:p>
          </table:table-cell>
          <table:table-cell table:style-name="ce12N2" office:value-type="float" office:value="11.14">
            <text:p>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45461650003935500400009800617270139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51">
            <text:p>307051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8.005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13.56">
            <text:p>741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6754.95">
            <text:p>6754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1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658.61">
            <text:p>658,61</text:p>
          </table:table-cell>
          <table:table-cell table:style-name="ce12N2" office:value-type="float" office:value="6754.95">
            <text:p>6754,95</text:p>
          </table:table-cell>
          <table:table-cell table:style-name="ce12N2" office:value-type="float" office:value="468.39">
            <text:p>468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45461650003935500400009800513146947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55">
            <text:p>307055</text:p>
          </table:table-cell>
          <table:table-cell table:style-name="ce0" table:number-columns-spanned="4" table:number-rows-spanned="1" office:value-type="string" calcext:value-type="string">
            <text:p>13.893 - REVOLUZ INDUSTRIA E COMERCIO LTDA</text:p>
          </table:table-cell>
          <table:covered-table-cell table:number-columns-repeated="3"/>
          <table:table-cell table:style-name="ce0" office:value-type="string" calcext:value-type="string">
            <text:p>70.9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32.07">
            <text:p>2532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307.12">
            <text:p>2307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6024">
            <text:p>0,076</text:p>
          </table:table-cell>
          <table:table-cell table:style-name="ce12N2" office:value-type="float" office:value="11.04">
            <text:p>11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32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224.95">
            <text:p>224,95</text:p>
          </table:table-cell>
          <table:table-cell table:style-name="ce12N2" office:value-type="float" office:value="2307.12">
            <text:p>2307,12</text:p>
          </table:table-cell>
          <table:table-cell table:style-name="ce12N2" office:value-type="float" office:value="161.49">
            <text:p>16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3068580001535500100007092612378899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3">
            <text:p>307083</text:p>
          </table:table-cell>
          <table:table-cell table:style-name="ce0" table:number-columns-spanned="4" table:number-rows-spanned="1" office:value-type="string" calcext:value-type="string">
            <text:p>6.891 - STUDIOLUCE ILUMINACAO IMPORTACAO E EXPORTACAO LTDA</text:p>
          </table:table-cell>
          <table:covered-table-cell table:number-columns-repeated="3"/>
          <table:table-cell table:style-name="ce0" office:value-type="string" calcext:value-type="string">
            <text:p>104.47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3.88">
            <text:p>119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7.82">
            <text:p>1087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93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06.06">
            <text:p>106,06</text:p>
          </table:table-cell>
          <table:table-cell table:style-name="ce12N2" office:value-type="float" office:value="1087.82">
            <text:p>1087,82</text:p>
          </table:table-cell>
          <table:table-cell table:style-name="ce12N2" office:value-type="float" office:value="43.51">
            <text:p>4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8.950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1/05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35260510599342000123550020001044791920149108</text:p>
          </table:table-cell>
          <table:table-cell table:style-name="ce0" office:value-type="string" calcext:value-type="string">
            <text:p>35260511389565000200570050003989501000852039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4">
            <text:p>3070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3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.66">
            <text:p>5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.32">
            <text:p>51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4276">
            <text:p>0,134</text:p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3.34">
            <text:p>3,34</text:p>
          </table:table-cell>
          <table:table-cell table:style-name="ce12N2" office:value-type="float" office:value="51.32">
            <text:p>51,32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39814737677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5">
            <text:p>3070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3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4.8">
            <text:p>26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4.8">
            <text:p>26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7">
            <text:p>0,001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4.8">
            <text:p>264,80</text:p>
          </table:table-cell>
          <table:table-cell table:style-name="ce12N2" office:value-type="float" office:value="18.54">
            <text:p>1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39910446566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6">
            <text:p>3070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">
            <text:p>0,004</text:p>
          </table:table-cell>
          <table:table-cell table:style-name="ce12N2" office:value-type="float" office:value="4.85">
            <text:p>4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2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44.91">
            <text:p>4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014382311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00">
            <text:p>307100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40.310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8.3">
            <text:p>376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68.3">
            <text:p>3768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6">
            <text:p>0,216</text:p>
          </table:table-cell>
          <table:table-cell table:style-name="ce12N2" office:value-type="float" office:value="91.2">
            <text:p>9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8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68.3">
            <text:p>3768,30</text:p>
          </table:table-cell>
          <table:table-cell table:style-name="ce12N2" office:value-type="float" office:value="263.78">
            <text:p>263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400014031011309826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21">
            <text:p>307121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1.26">
            <text:p>117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67.21">
            <text:p>1067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6916">
            <text:p>0,0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7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04.05">
            <text:p>104,05</text:p>
          </table:table-cell>
          <table:table-cell table:style-name="ce12N2" office:value-type="float" office:value="1067.21">
            <text:p>1067,21</text:p>
          </table:table-cell>
          <table:table-cell table:style-name="ce12N2" office:value-type="float" office:value="74.7">
            <text:p>7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891773232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0">
            <text:p>3071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1015999792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2">
            <text:p>307182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04.0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34.81">
            <text:p>153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90.26">
            <text:p>149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8038">
            <text:p>0,108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3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44.55">
            <text:p>44,55</text:p>
          </table:table-cell>
          <table:table-cell table:style-name="ce12N2" office:value-type="float" office:value="1490.26">
            <text:p>1490,26</text:p>
          </table:table-cell>
          <table:table-cell table:style-name="ce12N2" office:value-type="float" office:value="104.32">
            <text:p>10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0407218608309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06">
            <text:p>307206</text:p>
          </table:table-cell>
          <table:table-cell table:style-name="ce0" table:number-columns-spanned="4" table:number-rows-spanned="1" office:value-type="string" calcext:value-type="string">
            <text:p>10.343 - INTERLIGHT SISTEMAS DE ILUMINACAO LTDA</text:p>
          </table:table-cell>
          <table:covered-table-cell table:number-columns-repeated="3"/>
          <table:table-cell table:style-name="ce0" office:value-type="string" calcext:value-type="string">
            <text:p>261.1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391.61">
            <text:p>15391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4024.25">
            <text:p>14024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391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367.36">
            <text:p>1367,36</text:p>
          </table:table-cell>
          <table:table-cell table:style-name="ce12N2" office:value-type="float" office:value="14024.25">
            <text:p>14024,25</text:p>
          </table:table-cell>
          <table:table-cell table:style-name="ce12N2" office:value-type="float" office:value="981.71">
            <text:p>98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3296080001445500100026117010026117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09">
            <text:p>307209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39.7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67.78">
            <text:p>186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685.3">
            <text:p>168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7.5">
            <text:p>7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67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82.48">
            <text:p>182,48</text:p>
          </table:table-cell>
          <table:table-cell table:style-name="ce12N2" office:value-type="float" office:value="1685.3">
            <text:p>1685,30</text:p>
          </table:table-cell>
          <table:table-cell table:style-name="ce12N2" office:value-type="float" office:value="67.41">
            <text:p>6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5870170002855500100003974118512744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1">
            <text:p>30722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8.28">
            <text:p>3768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3598.38">
            <text:p>3598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36658">
            <text:p>0,537</text:p>
          </table:table-cell>
          <table:table-cell table:style-name="ce12N2" office:value-type="float" office:value="34.56">
            <text:p>34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8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69.9">
            <text:p>169,90</text:p>
          </table:table-cell>
          <table:table-cell table:style-name="ce12N2" office:value-type="float" office:value="3598.38">
            <text:p>3598,38</text:p>
          </table:table-cell>
          <table:table-cell table:style-name="ce12N2" office:value-type="float" office:value="143.94">
            <text:p>143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41322627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2">
            <text:p>30722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57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1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18.48">
            <text:p>1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8015849306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4">
            <text:p>30722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4">
            <text:p>0,002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6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62.05">
            <text:p>6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415339611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69">
            <text:p>307269</text:p>
          </table:table-cell>
          <table:table-cell table:style-name="ce0" table:number-columns-spanned="4" table:number-rows-spanned="1" office:value-type="string" calcext:value-type="string">
            <text:p>28.259 - IMD COMERCIO DE MOVEIS LTDA</text:p>
          </table:table-cell>
          <table:covered-table-cell table:number-columns-repeated="3"/>
          <table:table-cell table:style-name="ce0" office:value-type="string" calcext:value-type="string">
            <text:p>409.529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6">
            <text:p>327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120">
            <text:p>31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8.05">
            <text:p>18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7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33">
            <text:p>41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56">
            <text:p>156,00</text:p>
          </table:table-cell>
          <table:table-cell table:style-name="ce12N2" office:value-type="float" office:value="3120">
            <text:p>3120,00</text:p>
          </table:table-cell>
          <table:table-cell table:style-name="ce12N2" office:value-type="float" office:value="124.8">
            <text:p>12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39611510004475500600040952919085944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3">
            <text:p>307273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4.2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05.98">
            <text:p>770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6908.35">
            <text:p>6908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38516">
            <text:p>0,439</text:p>
          </table:table-cell>
          <table:table-cell table:style-name="ce12N2" office:value-type="float" office:value="71.6">
            <text:p>7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05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797.63">
            <text:p>797,63</text:p>
          </table:table-cell>
          <table:table-cell table:style-name="ce12N2" office:value-type="float" office:value="6908.35">
            <text:p>6908,35</text:p>
          </table:table-cell>
          <table:table-cell table:style-name="ce12N2" office:value-type="float" office:value="358.82">
            <text:p>35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426615018523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6">
            <text:p>3072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97">
            <text:p>52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91.06">
            <text:p>491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568">
            <text:p>0,014</text:p>
          </table:table-cell>
          <table:table-cell table:style-name="ce12N2" office:value-type="float" office:value="3.04">
            <text:p>3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31.91">
            <text:p>31,91</text:p>
          </table:table-cell>
          <table:table-cell table:style-name="ce12N2" office:value-type="float" office:value="491.06">
            <text:p>491,06</text:p>
          </table:table-cell>
          <table:table-cell table:style-name="ce12N2" office:value-type="float" office:value="34.38">
            <text:p>34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610674017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7">
            <text:p>3072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114">
            <text:p>0,004</text:p>
          </table:table-cell>
          <table:table-cell table:style-name="ce12N2" office:value-type="float" office:value="4.85">
            <text:p>4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2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44.91">
            <text:p>4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511210393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80">
            <text:p>307280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2.17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85.63">
            <text:p>238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214.84">
            <text:p>221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.166476">
            <text:p>20,166</text:p>
          </table:table-cell>
          <table:table-cell table:style-name="ce12N2" office:value-type="float" office:value="23.3">
            <text:p>2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85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.93">
            <text:p>43,9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70.79">
            <text:p>170,79</text:p>
          </table:table-cell>
          <table:table-cell table:style-name="ce12N2" office:value-type="float" office:value="2214.84">
            <text:p>2214,84</text:p>
          </table:table-cell>
          <table:table-cell table:style-name="ce12N2" office:value-type="float" office:value="88.59">
            <text:p>88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217712791756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81">
            <text:p>307281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2.17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62.99">
            <text:p>4762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546">
            <text:p>454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38">
            <text:p>0,027</text:p>
          </table:table-cell>
          <table:table-cell table:style-name="ce12N2" office:value-type="float" office:value="21.28">
            <text:p>21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62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.63">
            <text:p>58,6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216.99">
            <text:p>216,99</text:p>
          </table:table-cell>
          <table:table-cell table:style-name="ce12N2" office:value-type="float" office:value="4546">
            <text:p>4546,00</text:p>
          </table:table-cell>
          <table:table-cell table:style-name="ce12N2" office:value-type="float" office:value="181.84">
            <text:p>18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21781534580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6">
            <text:p>3072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4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19.25">
            <text:p>4119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19.25">
            <text:p>4119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5013">
            <text:p>0,550</text:p>
          </table:table-cell>
          <table:table-cell table:style-name="ce12N2" office:value-type="float" office:value="250">
            <text:p>2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19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19.25">
            <text:p>4119,25</text:p>
          </table:table-cell>
          <table:table-cell table:style-name="ce12N2" office:value-type="float" office:value="164.77">
            <text:p>16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41715029772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09">
            <text:p>307309</text:p>
          </table:table-cell>
          <table:table-cell table:style-name="ce0" table:number-columns-spanned="4" table:number-rows-spanned="1" office:value-type="string" calcext:value-type="string">
            <text:p>30.850 - DEXCO S.A</text:p>
          </table:table-cell>
          <table:covered-table-cell table:number-columns-repeated="3"/>
          <table:table-cell table:style-name="ce0" office:value-type="string" calcext:value-type="string">
            <text:p>162.3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0.43">
            <text:p>172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20.43">
            <text:p>1720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0.21">
            <text:p>10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20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20.43">
            <text:p>1720,43</text:p>
          </table:table-cell>
          <table:table-cell table:style-name="ce12N2" office:value-type="float" office:value="120.43">
            <text:p>12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978371810053785500100016232012004868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1">
            <text:p>30731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.07">
            <text:p>44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8.84">
            <text:p>418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4454">
            <text:p>0,134</text:p>
          </table:table-cell>
          <table:table-cell table:style-name="ce12N2" office:value-type="float" office:value="0.92">
            <text:p>0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6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7.23">
            <text:p>27,23</text:p>
          </table:table-cell>
          <table:table-cell table:style-name="ce12N2" office:value-type="float" office:value="418.84">
            <text:p>418,84</text:p>
          </table:table-cell>
          <table:table-cell table:style-name="ce12N2" office:value-type="float" office:value="23.54">
            <text:p>2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812284640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2">
            <text:p>30731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3.43">
            <text:p>27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6.74">
            <text:p>256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364">
            <text:p>0,1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3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6.69">
            <text:p>16,69</text:p>
          </table:table-cell>
          <table:table-cell table:style-name="ce12N2" office:value-type="float" office:value="256.74">
            <text:p>256,74</text:p>
          </table:table-cell>
          <table:table-cell table:style-name="ce12N2" office:value-type="float" office:value="10.27">
            <text:p>10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712067759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3">
            <text:p>30731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09.61">
            <text:p>420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952.68">
            <text:p>3952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71828">
            <text:p>0,472</text:p>
          </table:table-cell>
          <table:table-cell table:style-name="ce12N2" office:value-type="float" office:value="7.22">
            <text:p>7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09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56.93">
            <text:p>256,93</text:p>
          </table:table-cell>
          <table:table-cell table:style-name="ce12N2" office:value-type="float" office:value="3952.68">
            <text:p>3952,68</text:p>
          </table:table-cell>
          <table:table-cell table:style-name="ce12N2" office:value-type="float" office:value="158.11">
            <text:p>158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715962084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4">
            <text:p>30731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1.26">
            <text:p>50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70.66">
            <text:p>470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3032">
            <text:p>0,123</text:p>
          </table:table-cell>
          <table:table-cell table:style-name="ce12N2" office:value-type="float" office:value="4.49">
            <text:p>4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30.6">
            <text:p>30,60</text:p>
          </table:table-cell>
          <table:table-cell table:style-name="ce12N2" office:value-type="float" office:value="470.66">
            <text:p>470,66</text:p>
          </table:table-cell>
          <table:table-cell table:style-name="ce12N2" office:value-type="float" office:value="18.82">
            <text:p>1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761221787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7">
            <text:p>307317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8.160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7.12">
            <text:p>172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73.69">
            <text:p>1573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2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53.43">
            <text:p>153,43</text:p>
          </table:table-cell>
          <table:table-cell table:style-name="ce12N2" office:value-type="float" office:value="1573.69">
            <text:p>1573,69</text:p>
          </table:table-cell>
          <table:table-cell table:style-name="ce12N2" office:value-type="float" office:value="110.16">
            <text:p>11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4546165000393550040000981601962020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5">
            <text:p>30732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69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3.92">
            <text:p>278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3.92">
            <text:p>2783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83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3.92">
            <text:p>2783,92</text:p>
          </table:table-cell>
          <table:table-cell table:style-name="ce12N2" office:value-type="float" office:value="194.87">
            <text:p>194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69019081947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6">
            <text:p>3073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70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67.67">
            <text:p>2967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6.54">
            <text:p>2786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67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81.13">
            <text:p>181,13</text:p>
          </table:table-cell>
          <table:table-cell table:style-name="ce12N2" office:value-type="float" office:value="2786.54">
            <text:p>2786,54</text:p>
          </table:table-cell>
          <table:table-cell table:style-name="ce12N2" office:value-type="float" office:value="195.06">
            <text:p>19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70818881438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8">
            <text:p>307328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7.9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57.37">
            <text:p>2957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94.64">
            <text:p>269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236">
            <text:p>0,080</text:p>
          </table:table-cell>
          <table:table-cell table:style-name="ce12N2" office:value-type="float" office:value="24.96">
            <text:p>24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57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.76">
            <text:p>40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62.73">
            <text:p>262,73</text:p>
          </table:table-cell>
          <table:table-cell table:style-name="ce12N2" office:value-type="float" office:value="2694.64">
            <text:p>2694,64</text:p>
          </table:table-cell>
          <table:table-cell table:style-name="ce12N2" office:value-type="float" office:value="107.79">
            <text:p>107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798018238551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1">
            <text:p>307331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7.8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6.4">
            <text:p>50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99.2">
            <text:p>49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832">
            <text:p>0,033</text:p>
          </table:table-cell>
          <table:table-cell table:style-name="ce12N2" office:value-type="float" office:value="5.78">
            <text:p>5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7.2">
            <text:p>7,20</text:p>
          </table:table-cell>
          <table:table-cell table:style-name="ce12N2" office:value-type="float" office:value="499.2">
            <text:p>499,20</text:p>
          </table:table-cell>
          <table:table-cell table:style-name="ce12N2" office:value-type="float" office:value="28.3">
            <text:p>2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78201370188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3">
            <text:p>3073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95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3.78">
            <text:p>1023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3.78">
            <text:p>1023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23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3.78">
            <text:p>1023,78</text:p>
          </table:table-cell>
          <table:table-cell table:style-name="ce12N2" office:value-type="float" office:value="71.66">
            <text:p>7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9571193331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3">
            <text:p>307353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3.2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6.41">
            <text:p>220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942">
            <text:p>1942,0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004">
            <text:p>0,000</text:p>
          </table:table-cell>
          <table:table-cell table:style-name="ce12N2" office:value-type="float" office:value="5.8">
            <text:p>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06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79.41">
            <text:p>179,41</text:p>
          </table:table-cell>
          <table:table-cell table:style-name="ce12N2" office:value-type="float" office:value="2027">
            <text:p>2027,00</text:p>
          </table:table-cell>
          <table:table-cell table:style-name="ce12N2" office:value-type="float" office:value="81.07">
            <text:p>8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321818285165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0">
            <text:p>307370</text:p>
          </table:table-cell>
          <table:table-cell table:style-name="ce0" table:number-columns-spanned="4" table:number-rows-spanned="1" office:value-type="string" calcext:value-type="string">
            <text:p>21.329 - S &amp; L SOUZA E LIMA FABRICACAO E COMERCIO DE LUMINARIAS LTDA</text:p>
          </table:table-cell>
          <table:covered-table-cell table:number-columns-repeated="3"/>
          <table:table-cell table:style-name="ce0" office:value-type="string" calcext:value-type="string">
            <text:p>48.2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3.81">
            <text:p>683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3.06">
            <text:p>623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56">
            <text:p>0,0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3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60.75">
            <text:p>60,75</text:p>
          </table:table-cell>
          <table:table-cell table:style-name="ce12N2" office:value-type="float" office:value="623.06">
            <text:p>623,06</text:p>
          </table:table-cell>
          <table:table-cell table:style-name="ce12N2" office:value-type="float" office:value="43.61">
            <text:p>4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03944160001955500100004826210002548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5">
            <text:p>307375</text:p>
          </table:table-cell>
          <table:table-cell table:style-name="ce0" table:number-columns-spanned="4" table:number-rows-spanned="1" office:value-type="string" calcext:value-type="string">
            <text:p>10.343 - INTERLIGHT SISTEMAS DE ILUMINACAO LTDA</text:p>
          </table:table-cell>
          <table:covered-table-cell table:number-columns-repeated="3"/>
          <table:table-cell table:style-name="ce0" office:value-type="string" calcext:value-type="string">
            <text:p>261.9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73.06">
            <text:p>887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890.92">
            <text:p>7890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36">
            <text:p>0,006</text:p>
          </table:table-cell>
          <table:table-cell table:style-name="ce12N2" office:value-type="float" office:value="7.8">
            <text:p>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73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19">
            <text:p>44,1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982.14">
            <text:p>982,14</text:p>
          </table:table-cell>
          <table:table-cell table:style-name="ce12N2" office:value-type="float" office:value="7890.92">
            <text:p>7890,92</text:p>
          </table:table-cell>
          <table:table-cell table:style-name="ce12N2" office:value-type="float" office:value="552.36">
            <text:p>55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3296080001445500100026190610026190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8">
            <text:p>307378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8.6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9.96">
            <text:p>1369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349.3">
            <text:p>1349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2352">
            <text:p>0,122</text:p>
          </table:table-cell>
          <table:table-cell table:style-name="ce12N2" office:value-type="float" office:value="6.73">
            <text:p>6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69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20.66">
            <text:p>20,66</text:p>
          </table:table-cell>
          <table:table-cell table:style-name="ce12N2" office:value-type="float" office:value="1349.3">
            <text:p>1349,30</text:p>
          </table:table-cell>
          <table:table-cell table:style-name="ce12N2" office:value-type="float" office:value="94.45">
            <text:p>9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860215608568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1">
            <text:p>307391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98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8.36">
            <text:p>93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55">
            <text:p>85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8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83.36">
            <text:p>83,36</text:p>
          </table:table-cell>
          <table:table-cell table:style-name="ce12N2" office:value-type="float" office:value="855">
            <text:p>855,00</text:p>
          </table:table-cell>
          <table:table-cell table:style-name="ce12N2" office:value-type="float" office:value="59.85">
            <text:p>5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8.94">
            <text:p>18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34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5/2026</text:p>
          </table:table-cell>
          <table:table-cell table:style-name="ce12" office:value-type="string" calcext:value-type="string">
            <text:p>18,94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5260512077181000133550030002249851510571498</text:p>
          </table:table-cell>
          <table:table-cell table:style-name="ce0" office:value-type="string" calcext:value-type="string">
            <text:p>352605113895650002005700500039934810008561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2">
            <text:p>307392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98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.13">
            <text:p>37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1.8">
            <text:p>34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33.33">
            <text:p>33,33</text:p>
          </table:table-cell>
          <table:table-cell table:style-name="ce12N2" office:value-type="float" office:value="341.8">
            <text:p>341,80</text:p>
          </table:table-cell>
          <table:table-cell table:style-name="ce12N2" office:value-type="float" office:value="23.93">
            <text:p>23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.57">
            <text:p>7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34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5/2026</text:p>
          </table:table-cell>
          <table:table-cell table:style-name="ce12" office:value-type="string" calcext:value-type="string">
            <text:p>7,57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5260512077181000133550030002249861111696979</text:p>
          </table:table-cell>
          <table:table-cell table:style-name="ce0" office:value-type="string" calcext:value-type="string">
            <text:p>352605113895650002005700500039934810008561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7">
            <text:p>30739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.92">
            <text:p>20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2.92">
            <text:p>20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63">
            <text:p>0,010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2.92">
            <text:p>202,92</text:p>
          </table:table-cell>
          <table:table-cell table:style-name="ce12N2" office:value-type="float" office:value="14.2">
            <text:p>1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4816445292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02">
            <text:p>307402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40.499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03.54">
            <text:p>1950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503.54">
            <text:p>19503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872">
            <text:p>1,987</text:p>
          </table:table-cell>
          <table:table-cell table:style-name="ce12N2" office:value-type="float" office:value="5453.76">
            <text:p>5453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50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503.54">
            <text:p>19503,54</text:p>
          </table:table-cell>
          <table:table-cell table:style-name="ce12N2" office:value-type="float" office:value="1365.25">
            <text:p>136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400014049916237934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51">
            <text:p>51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85">
            <text:p>85,00</text:p>
          </table:table-cell>
          <table:table-cell table:style-name="ce26N2" office:value-type="float" office:value="100">
            <text:p>100,00</text:p>
          </table:table-cell>
          <table:table-cell table:style-name="ce26N2" office:value-type="float" office:value="11110.23">
            <text:p>11110,23</text:p>
          </table:table-cell>
          <table:table-cell table:style-name="ce26N2" office:value-type="float" office:value="191595.98">
            <text:p>191595,98</text:p>
          </table:table-cell>
          <table:table-cell table:style-name="ce26N2" office:value-type="float" office:value="11069.02">
            <text:p>11069,0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16.23">
            <text:p>116,23</text:p>
          </table:table-cell>
          <table:table-cell table:style-name="ce26N2" office:value-type="float" office:value="202706.21">
            <text:p>202706,2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0.38832">
            <text:p>30,388</text:p>
          </table:table-cell>
          <table:table-cell table:style-name="ce26N2" office:value-type="float" office:value="191410.98">
            <text:p>191410,98</text:p>
          </table:table-cell>
          <table:table-cell table:style-name="ce26N2" office:value-type="float" office:value="202706.21">
            <text:p>202706,2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6827.88">
            <text:p>6827,8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7.79">
            <text:p>37,7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SR ACABAMENT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12" meta:object-count="0"/>
    <meta:generator>LibreOffice/4.3.0.4$Windows_x86 LibreOffice_project/62ad5818884a2fc2e5780dd45466868d41009ec0</meta:generator>
  </office:meta>
</office:document-meta>
</file>