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5/07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4">
            <text:p>309924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585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144">
            <text:p>0,271</text:p>
          </table:table-cell>
          <table:table-cell table:style-name="ce12N2" office:value-type="float" office:value="292.14">
            <text:p>29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85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5.73">
            <text:p>3025,7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24">
            <text:p>27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250.96">
            <text:p>25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272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1/07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42260675821546000102550120000005851703995593</text:p>
          </table:table-cell>
          <table:table-cell table:style-name="ce0" office:value-type="string" calcext:value-type="string">
            <text:p>3526071138956500020057005000402272100088701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3">
            <text:p>3100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31158651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81">
            <text:p>310081</text:p>
          </table:table-cell>
          <table:table-cell table:style-name="ce0" table:number-columns-spanned="4" table:number-rows-spanned="1" office:value-type="string" calcext:value-type="string">
            <text:p>31.293 - DOCOL INDUSTRIA E COMERCIO LTDA</text:p>
          </table:table-cell>
          <table:covered-table-cell table:number-columns-repeated="3"/>
          <table:table-cell table:style-name="ce0" office:value-type="string" calcext:value-type="string">
            <text:p>8.1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7.54">
            <text:p>277,54</text:p>
          </table:table-cell>
          <table:table-cell table:style-name="ce12N2" office:value-type="float" office:value="310.5">
            <text:p>310,50</text:p>
          </table:table-cell>
          <table:table-cell table:style-name="ce12N3" office:value-type="float" office:value="0.080869">
            <text:p>0,081</text:p>
          </table:table-cell>
          <table:table-cell table:style-name="ce12N2" office:value-type="float" office:value="28.1">
            <text:p>2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4.24">
            <text:p>234,24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41.16">
            <text:p>4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339051001202550020000081261038554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2">
            <text:p>31012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1.46">
            <text:p>7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476">
            <text:p>0,275</text:p>
          </table:table-cell>
          <table:table-cell table:style-name="ce12N2" office:value-type="float" office:value="1241.08">
            <text:p>124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61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25.82">
            <text:p>6025,82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5">
            <text:p>54,25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1.8">
            <text:p>101,8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419.66">
            <text:p>41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6321105316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1">
            <text:p>31032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9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.61">
            <text:p>11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63">
            <text:p>0,033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6.95">
            <text:p>936,95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3">
            <text:p>8,43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3.41">
            <text:p>53,41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43.75">
            <text:p>4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9031418254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4">
            <text:p>31038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6.3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88">
            <text:p>24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48">
            <text:p>0,03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70.93">
            <text:p>2370,93</text:p>
          </table:table-cell>
          <table:table-cell table:style-name="ce12N2" office:value-type="float" office:value="2.37">
            <text:p>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34">
            <text:p>21,3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98.79">
            <text:p>9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63171511201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6">
            <text:p>31041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9.85">
            <text:p>2486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99791">
            <text:p>2,500</text:p>
          </table:table-cell>
          <table:table-cell table:style-name="ce12N2" office:value-type="float" office:value="147.92">
            <text:p>147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27.58">
            <text:p>21027,58</text:p>
          </table:table-cell>
          <table:table-cell table:style-name="ce12N2" office:value-type="float" office:value="21.02">
            <text:p>2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24">
            <text:p>189,24</text:p>
          </table:table-cell>
          <table:table-cell table:style-name="ce12N2" office:value-type="float" office:value="91.33">
            <text:p>9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9.52">
            <text:p>39,52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1659.45">
            <text:p>165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9616605312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9">
            <text:p>310479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10.3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4.71">
            <text:p>1654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54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1.51">
            <text:p>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57">
            <text:p>13,57</text:p>
          </table:table-cell>
          <table:table-cell table:style-name="ce12N2" office:value-type="float" office:value="43.67">
            <text:p>43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47">
            <text:p>147,00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105.54">
            <text:p>10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02281320001365500100001034719432541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0">
            <text:p>310480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10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.45">
            <text:p>8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7.95">
            <text:p>7,95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5.7">
            <text:p>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0228132000136550010000103481013536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1">
            <text:p>310481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7.7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24.27">
            <text:p>101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040.26">
            <text:p>1004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8384">
            <text:p>1,384</text:p>
          </table:table-cell>
          <table:table-cell table:style-name="ce12N2" office:value-type="float" office:value="1141.08">
            <text:p>114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24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73.73">
            <text:p>8473,73</text:p>
          </table:table-cell>
          <table:table-cell table:style-name="ce12N2" office:value-type="float" office:value="8.47">
            <text:p>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26">
            <text:p>76,2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84.01">
            <text:p>84,01</text:p>
          </table:table-cell>
          <table:table-cell table:style-name="ce12N2" office:value-type="float" office:value="10040.26">
            <text:p>10040,26</text:p>
          </table:table-cell>
          <table:table-cell table:style-name="ce12N2" office:value-type="float" office:value="702.82">
            <text:p>70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6818670001305500100095779615205249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7">
            <text:p>310547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3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1.66">
            <text:p>232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30.7">
            <text:p>203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1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75.35">
            <text:p>1875,35</text:p>
          </table:table-cell>
          <table:table-cell table:style-name="ce12N2" office:value-type="float" office:value="1.87">
            <text:p>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87">
            <text:p>16,8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290.96">
            <text:p>290,96</text:p>
          </table:table-cell>
          <table:table-cell table:style-name="ce12N2" office:value-type="float" office:value="2030.7">
            <text:p>2030,70</text:p>
          </table:table-cell>
          <table:table-cell table:style-name="ce12N2" office:value-type="float" office:value="81.23">
            <text:p>8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36415973117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5">
            <text:p>3105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80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38">
            <text:p>0,015</text:p>
          </table:table-cell>
          <table:table-cell table:style-name="ce12N2" office:value-type="float" office:value="3.45">
            <text:p>3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80.78">
            <text:p>3180,78</text:p>
          </table:table-cell>
          <table:table-cell table:style-name="ce12N2" office:value-type="float" office:value="3.18">
            <text:p>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63">
            <text:p>28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263.82">
            <text:p>26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80613731017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8">
            <text:p>3105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90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92.32">
            <text:p>199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92.32">
            <text:p>199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05">
            <text:p>0,001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9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1.47">
            <text:p>1681,47</text:p>
          </table:table-cell>
          <table:table-cell table:style-name="ce12N2" office:value-type="float" office:value="1.68">
            <text:p>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3">
            <text:p>15,1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92.32">
            <text:p>1992,32</text:p>
          </table:table-cell>
          <table:table-cell table:style-name="ce12N2" office:value-type="float" office:value="139.46">
            <text:p>1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90516727529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0">
            <text:p>31067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5.4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">
            <text:p>0,002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27.2">
            <text:p>1027,20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4">
            <text:p>9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85.2">
            <text:p>8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543016226754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2">
            <text:p>310672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6.92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62.49">
            <text:p>856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991.52">
            <text:p>799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24">
            <text:p>0,050</text:p>
          </table:table-cell>
          <table:table-cell table:style-name="ce12N2" office:value-type="float" office:value="45.5">
            <text:p>45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562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62.21">
            <text:p>6962,21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66">
            <text:p>62,66</text:p>
          </table:table-cell>
          <table:table-cell table:style-name="ce12N2" office:value-type="float" office:value="54.13">
            <text:p>54,1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570.97">
            <text:p>570,97</text:p>
          </table:table-cell>
          <table:table-cell table:style-name="ce12N2" office:value-type="float" office:value="7991.52">
            <text:p>7991,52</text:p>
          </table:table-cell>
          <table:table-cell table:style-name="ce12N2" office:value-type="float" office:value="319.66">
            <text:p>31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692213454081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4">
            <text:p>310694</text:p>
          </table:table-cell>
          <table:table-cell table:style-name="ce0" table:number-columns-spanned="4" table:number-rows-spanned="1" office:value-type="string" calcext:value-type="string">
            <text:p>4.784 - SEKAPISO METALURGICA LTDA</text:p>
          </table:table-cell>
          <table:covered-table-cell table:number-columns-repeated="3"/>
          <table:table-cell table:style-name="ce0" office:value-type="string" calcext:value-type="string">
            <text:p>52.9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6">
            <text:p>19,7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154.05">
            <text:p>15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2256040001685500300005292416430071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7">
            <text:p>310697</text:p>
          </table:table-cell>
          <table:table-cell table:style-name="ce0" table:number-columns-spanned="4" table:number-rows-spanned="1" office:value-type="string" calcext:value-type="string">
            <text:p>4.784 - SEKAPISO METALURGICA LTDA</text:p>
          </table:table-cell>
          <table:covered-table-cell table:number-columns-repeated="3"/>
          <table:table-cell table:style-name="ce0" office:value-type="string" calcext:value-type="string">
            <text:p>52.92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6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0.33">
            <text:p>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23.53">
            <text:p>2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2256040001685500300005292319629673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2">
            <text:p>310782</text:p>
          </table:table-cell>
          <table:table-cell table:style-name="ce0" table:number-columns-spanned="4" table:number-rows-spanned="1" office:value-type="string" calcext:value-type="string">
            <text:p>38.510 - MAC FER INDUSTRIA E COMERCIO LTDA</text:p>
          </table:table-cell>
          <table:covered-table-cell table:number-columns-repeated="3"/>
          <table:table-cell table:style-name="ce0" office:value-type="string" calcext:value-type="string">
            <text:p>45.43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0.9">
            <text:p>481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4617.48">
            <text:p>4617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10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22.75">
            <text:p>4022,75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2">
            <text:p>36,20</text:p>
          </table:table-cell>
          <table:table-cell table:style-name="ce12N2" office:value-type="float" office:value="74.4">
            <text:p>74,4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93.42">
            <text:p>193,42</text:p>
          </table:table-cell>
          <table:table-cell table:style-name="ce12N2" office:value-type="float" office:value="4617.48">
            <text:p>4617,48</text:p>
          </table:table-cell>
          <table:table-cell table:style-name="ce12N2" office:value-type="float" office:value="184.72">
            <text:p>18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7.12">
            <text:p>9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874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0/07/2026</text:p>
          </table:table-cell>
          <table:table-cell table:style-name="ce12" office:value-type="string" calcext:value-type="string">
            <text:p>97,1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42260701145165000386550000000454351561561609</text:p>
          </table:table-cell>
          <table:table-cell table:style-name="ce0" office:value-type="string" calcext:value-type="string">
            <text:p>352607113895650002005700500040287410008933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6">
            <text:p>310786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876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2.26">
            <text:p>380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802.26">
            <text:p>3802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1496">
            <text:p>0,251</text:p>
          </table:table-cell>
          <table:table-cell table:style-name="ce12N2" office:value-type="float" office:value="507.54">
            <text:p>50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02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09.01">
            <text:p>3209,01</text:p>
          </table:table-cell>
          <table:table-cell table:style-name="ce12N2" office:value-type="float" office:value="3.21">
            <text:p>3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88">
            <text:p>28,88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02.26">
            <text:p>3802,26</text:p>
          </table:table-cell>
          <table:table-cell table:style-name="ce12N2" office:value-type="float" office:value="266.17">
            <text:p>266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087612008698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2">
            <text:p>31079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1.6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1.75">
            <text:p>273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5.76">
            <text:p>2645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2726">
            <text:p>0,2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32.96">
            <text:p>2232,96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">
            <text:p>20,10</text:p>
          </table:table-cell>
          <table:table-cell table:style-name="ce12N2" office:value-type="float" office:value="62.12">
            <text:p>62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85.99">
            <text:p>85,99</text:p>
          </table:table-cell>
          <table:table-cell table:style-name="ce12N2" office:value-type="float" office:value="2645.76">
            <text:p>2645,76</text:p>
          </table:table-cell>
          <table:table-cell table:style-name="ce12N2" office:value-type="float" office:value="185.2">
            <text:p>18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16951264566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3">
            <text:p>3107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7.3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02">
            <text:p>830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02">
            <text:p>830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5116">
            <text:p>0,065</text:p>
          </table:table-cell>
          <table:table-cell table:style-name="ce12N2" office:value-type="float" office:value="5.99">
            <text:p>5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0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06.68">
            <text:p>7006,68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06">
            <text:p>63,0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02">
            <text:p>8302,00</text:p>
          </table:table-cell>
          <table:table-cell table:style-name="ce12N2" office:value-type="float" office:value="581.14">
            <text:p>58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733011447304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5">
            <text:p>31079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4.91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6.87">
            <text:p>157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576.87">
            <text:p>1576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76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6.85">
            <text:p>1366,85</text:p>
          </table:table-cell>
          <table:table-cell table:style-name="ce12N2" office:value-type="float" office:value="1.39">
            <text:p>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76.87">
            <text:p>1576,87</text:p>
          </table:table-cell>
          <table:table-cell table:style-name="ce12N2" office:value-type="float" office:value="70.7">
            <text:p>7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491215486177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9">
            <text:p>310799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7.12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63.29">
            <text:p>706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6641.11">
            <text:p>6641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.00259">
            <text:p>30,003</text:p>
          </table:table-cell>
          <table:table-cell table:style-name="ce12N2" office:value-type="float" office:value="161.1">
            <text:p>161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63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85.73">
            <text:p>5785,73</text:p>
          </table:table-cell>
          <table:table-cell table:style-name="ce12N2" office:value-type="float" office:value="5.79">
            <text:p>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07">
            <text:p>52,07</text:p>
          </table:table-cell>
          <table:table-cell table:style-name="ce12N2" office:value-type="float" office:value="58.21">
            <text:p>58,2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422.18">
            <text:p>422,18</text:p>
          </table:table-cell>
          <table:table-cell table:style-name="ce12N2" office:value-type="float" office:value="6641.11">
            <text:p>6641,11</text:p>
          </table:table-cell>
          <table:table-cell table:style-name="ce12N2" office:value-type="float" office:value="265.64">
            <text:p>26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712912691028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3">
            <text:p>31080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6.4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">
            <text:p>2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0">
            <text:p>2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E-5">
            <text:p>0,000</text:p>
          </table:table-cell>
          <table:table-cell table:style-name="ce12N2" office:value-type="float" office:value="37.88">
            <text:p>37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2.56">
            <text:p>202,56</text:p>
          </table:table-cell>
          <table:table-cell table:style-name="ce12N2" office:value-type="float" office:value="0.2">
            <text:p>0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82">
            <text:p>1,8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0">
            <text:p>240,00</text:p>
          </table:table-cell>
          <table:table-cell table:style-name="ce12N2" office:value-type="float" office:value="16.8">
            <text:p>1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646518328901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6">
            <text:p>310806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7.4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8.84">
            <text:p>181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18.84">
            <text:p>1718,84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29.78">
            <text:p>1629,78</text:p>
          </table:table-cell>
          <table:table-cell table:style-name="ce12N2" office:value-type="float" office:value="1.63">
            <text:p>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67">
            <text:p>14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8.84">
            <text:p>1818,84</text:p>
          </table:table-cell>
          <table:table-cell table:style-name="ce12N2" office:value-type="float" office:value="127.32">
            <text:p>12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80286760001035500100005744210044901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1">
            <text:p>31081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2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64.32">
            <text:p>706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64.32">
            <text:p>706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2324">
            <text:p>0,052</text:p>
          </table:table-cell>
          <table:table-cell table:style-name="ce12N2" office:value-type="float" office:value="12.98">
            <text:p>12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6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48.4">
            <text:p>6048,40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43">
            <text:p>54,4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64.32">
            <text:p>7064,32</text:p>
          </table:table-cell>
          <table:table-cell table:style-name="ce12N2" office:value-type="float" office:value="399.41">
            <text:p>399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2591213091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0">
            <text:p>310830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5.57">
            <text:p>63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5.57">
            <text:p>635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56">
            <text:p>0,076</text:p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5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9.51">
            <text:p>569,51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13">
            <text:p>5,1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5.57">
            <text:p>635,57</text:p>
          </table:table-cell>
          <table:table-cell table:style-name="ce12N2" office:value-type="float" office:value="44.49">
            <text:p>4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201502844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3">
            <text:p>3108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9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96">
            <text:p>0,001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90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27.25">
            <text:p>4127,25</text:p>
          </table:table-cell>
          <table:table-cell table:style-name="ce12N2" office:value-type="float" office:value="4.13">
            <text:p>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15">
            <text:p>37,1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342.32">
            <text:p>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92018828105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0">
            <text:p>310860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9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2.14">
            <text:p>497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50.2">
            <text:p>4350,2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15294">
            <text:p>0,153</text:p>
          </table:table-cell>
          <table:table-cell table:style-name="ce12N2" office:value-type="float" office:value="2.36">
            <text:p>2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2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63.95">
            <text:p>3863,95</text:p>
          </table:table-cell>
          <table:table-cell table:style-name="ce12N2" office:value-type="float" office:value="3.86">
            <text:p>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78">
            <text:p>34,78</text:p>
          </table:table-cell>
          <table:table-cell table:style-name="ce12N2" office:value-type="float" office:value="42.25">
            <text:p>42,2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536.94">
            <text:p>536,94</text:p>
          </table:table-cell>
          <table:table-cell table:style-name="ce12N2" office:value-type="float" office:value="4435.2">
            <text:p>4435,20</text:p>
          </table:table-cell>
          <table:table-cell table:style-name="ce12N2" office:value-type="float" office:value="177.41">
            <text:p>17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91013807532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2">
            <text:p>310862</text:p>
          </table:table-cell>
          <table:table-cell table:style-name="ce0" table:number-columns-spanned="4" table:number-rows-spanned="1" office:value-type="string" calcext:value-type="string">
            <text:p>33.829 - STUDIO LAMPLUZ COMERCIO E SERVICOS LTDA</text:p>
          </table:table-cell>
          <table:covered-table-cell table:number-columns-repeated="3"/>
          <table:table-cell table:style-name="ce0" office:value-type="string" calcext:value-type="string">
            <text:p>6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6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7">
            <text:p>15,17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50.92">
            <text:p>5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3394770001865500100000061110000006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7">
            <text:p>3108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8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72.72">
            <text:p>347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23.33">
            <text:p>342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777">
            <text:p>0,013</text:p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72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89.17">
            <text:p>2889,17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9.39">
            <text:p>49,39</text:p>
          </table:table-cell>
          <table:table-cell table:style-name="ce12N2" office:value-type="float" office:value="3423.33">
            <text:p>3423,33</text:p>
          </table:table-cell>
          <table:table-cell table:style-name="ce12N2" office:value-type="float" office:value="239.63">
            <text:p>23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86211370120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2">
            <text:p>310872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3.45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55.42">
            <text:p>745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7249.38">
            <text:p>7249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7467">
            <text:p>1,237</text:p>
          </table:table-cell>
          <table:table-cell table:style-name="ce12N2" office:value-type="float" office:value="407.63">
            <text:p>407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5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70.03">
            <text:p>6170,03</text:p>
          </table:table-cell>
          <table:table-cell table:style-name="ce12N2" office:value-type="float" office:value="6.16">
            <text:p>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.54">
            <text:p>55,5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06.04">
            <text:p>206,04</text:p>
          </table:table-cell>
          <table:table-cell table:style-name="ce12N2" office:value-type="float" office:value="7249.38">
            <text:p>7249,38</text:p>
          </table:table-cell>
          <table:table-cell table:style-name="ce12N2" office:value-type="float" office:value="450.46">
            <text:p>45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345514313014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8">
            <text:p>31091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6.35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52">
            <text:p>0,030</text:p>
          </table:table-cell>
          <table:table-cell table:style-name="ce12N2" office:value-type="float" office:value="12.48">
            <text:p>12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.97">
            <text:p>103,97</text:p>
          </table:table-cell>
          <table:table-cell table:style-name="ce12N2" office:value-type="float" office:value="0.11">
            <text:p>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7.83">
            <text:p>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635718826942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4">
            <text:p>3109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9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75.35">
            <text:p>767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7622.27">
            <text:p>7622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911">
            <text:p>0,038</text:p>
          </table:table-cell>
          <table:table-cell table:style-name="ce12N2" office:value-type="float" office:value="11.4">
            <text:p>1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75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32.99">
            <text:p>6432,99</text:p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89">
            <text:p>57,8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3.08">
            <text:p>53,08</text:p>
          </table:table-cell>
          <table:table-cell table:style-name="ce12N2" office:value-type="float" office:value="7622.27">
            <text:p>7622,27</text:p>
          </table:table-cell>
          <table:table-cell table:style-name="ce12N2" office:value-type="float" office:value="533.56">
            <text:p>53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9491879096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6">
            <text:p>31095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5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3.25">
            <text:p>261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423.2">
            <text:p>242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366">
            <text:p>0,224</text:p>
          </table:table-cell>
          <table:table-cell table:style-name="ce12N2" office:value-type="float" office:value="71">
            <text:p>7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13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98.19">
            <text:p>2098,19</text:p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89">
            <text:p>18,89</text:p>
          </table:table-cell>
          <table:table-cell table:style-name="ce12N2" office:value-type="float" office:value="40.98">
            <text:p>40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0.05">
            <text:p>190,05</text:p>
          </table:table-cell>
          <table:table-cell table:style-name="ce12N2" office:value-type="float" office:value="2423.2">
            <text:p>2423,20</text:p>
          </table:table-cell>
          <table:table-cell table:style-name="ce12N2" office:value-type="float" office:value="111.15">
            <text:p>11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575810546203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7">
            <text:p>37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95.5">
            <text:p>495,5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041.49">
            <text:p>3041,49</text:p>
          </table:table-cell>
          <table:table-cell table:style-name="ce26N2" office:value-type="float" office:value="140720.24">
            <text:p>140720,24</text:p>
          </table:table-cell>
          <table:table-cell table:style-name="ce26N2" office:value-type="float" office:value="8481.73">
            <text:p>8481,7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86.84">
            <text:p>186,84</text:p>
          </table:table-cell>
          <table:table-cell table:style-name="ce26N2" office:value-type="float" office:value="143781.73">
            <text:p>143781,7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7.026938">
            <text:p>37,027</text:p>
          </table:table-cell>
          <table:table-cell table:style-name="ce26N2" office:value-type="float" office:value="140244.74">
            <text:p>140244,74</text:p>
          </table:table-cell>
          <table:table-cell table:style-name="ce26N2" office:value-type="float" office:value="143781.73">
            <text:p>143781,7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20312.36">
            <text:p>120312,36</text:p>
          </table:table-cell>
          <table:table-cell table:style-name="ce26N2" office:value-type="float" office:value="120.28">
            <text:p>120,2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82.76">
            <text:p>1082,76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179.93">
            <text:p>4179,9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0.9">
            <text:p>50,9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04" meta:object-count="0"/>
    <meta:generator>LibreOffice/4.3.0.4$Windows_x86 LibreOffice_project/62ad5818884a2fc2e5780dd45466868d41009ec0</meta:generator>
  </office:meta>
</office:document-meta>
</file>