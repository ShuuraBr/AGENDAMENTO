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9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2">
            <text:p>3069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156.37">
            <text:p>15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8174546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5">
            <text:p>30705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9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2.07">
            <text:p>253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024">
            <text:p>0,076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24.95">
            <text:p>224,95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161.49">
            <text:p>16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3068580001535500100007092612378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3">
            <text:p>30708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47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3.88">
            <text:p>11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6.06">
            <text:p>106,06</text:p>
          </table:table-cell>
          <table:table-cell table:style-name="ce12N2" office:value-type="float" office:value="1087.82">
            <text:p>1087,82</text:p>
          </table:table-cell>
          <table:table-cell table:style-name="ce12N2" office:value-type="float" office:value="43.51">
            <text:p>4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95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35260510599342000123550020001044791920149108</text:p>
          </table:table-cell>
          <table:table-cell table:style-name="ce0" office:value-type="string" calcext:value-type="string">
            <text:p>352605113895650002005700500039895010008520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5">
            <text:p>3070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18.54">
            <text:p>1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91044656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6">
            <text:p>3070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01438231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00">
            <text:p>30710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31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6">
            <text:p>0,216</text:p>
          </table:table-cell>
          <table:table-cell table:style-name="ce12N2" office:value-type="float" office:value="91.2">
            <text:p>9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8.3">
            <text:p>3768,30</text:p>
          </table:table-cell>
          <table:table-cell table:style-name="ce12N2" office:value-type="float" office:value="263.78">
            <text:p>26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3101130982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6">
            <text:p>307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91.61">
            <text:p>1539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9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367.36">
            <text:p>1367,36</text:p>
          </table:table-cell>
          <table:table-cell table:style-name="ce12N2" office:value-type="float" office:value="14024.25">
            <text:p>14024,25</text:p>
          </table:table-cell>
          <table:table-cell table:style-name="ce12N2" office:value-type="float" office:value="981.71">
            <text:p>9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1701002611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9">
            <text:p>30720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7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7.78">
            <text:p>186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5">
            <text:p>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82.48">
            <text:p>182,48</text:p>
          </table:table-cell>
          <table:table-cell table:style-name="ce12N2" office:value-type="float" office:value="1685.3">
            <text:p>1685,30</text:p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3974118512744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9">
            <text:p>307269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09.52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">
            <text:p>32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8.05">
            <text:p>1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">
            <text:p>156,00</text:p>
          </table:table-cell>
          <table:table-cell table:style-name="ce12N2" office:value-type="float" office:value="3120">
            <text:p>3120,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09529190859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6">
            <text:p>3072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013">
            <text:p>0,550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1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417150297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09">
            <text:p>307309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0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.43">
            <text:p>1720,43</text:p>
          </table:table-cell>
          <table:table-cell table:style-name="ce12N2" office:value-type="float" office:value="120.43">
            <text:p>12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32012004868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8">
            <text:p>3073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7.37">
            <text:p>295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236">
            <text:p>0,080</text:p>
          </table:table-cell>
          <table:table-cell table:style-name="ce12N2" office:value-type="float" office:value="24.96">
            <text:p>2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62.73">
            <text:p>262,73</text:p>
          </table:table-cell>
          <table:table-cell table:style-name="ce12N2" office:value-type="float" office:value="2694.64">
            <text:p>2694,64</text:p>
          </table:table-cell>
          <table:table-cell table:style-name="ce12N2" office:value-type="float" office:value="107.79">
            <text:p>1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980182385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0">
            <text:p>307370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.81">
            <text:p>6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56">
            <text:p>0,0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60.75">
            <text:p>60,75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94416000195550010000482621000254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8">
            <text:p>30737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.96">
            <text:p>136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352">
            <text:p>0,122</text:p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94.45">
            <text:p>9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6021560856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4">
            <text:p>307464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2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6.24">
            <text:p>1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90.43">
            <text:p>1290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5.81">
            <text:p>125,81</text:p>
          </table:table-cell>
          <table:table-cell table:style-name="ce12N2" office:value-type="float" office:value="1290.43">
            <text:p>1290,43</text:p>
          </table:table-cell>
          <table:table-cell table:style-name="ce12N2" office:value-type="float" office:value="90.33">
            <text:p>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9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56365423000160550010000120471129493398</text:p>
          </table:table-cell>
          <table:table-cell table:style-name="ce0" office:value-type="string" calcext:value-type="string">
            <text:p>3526051138956500020057005000399349100085617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0">
            <text:p>307470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10.5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5.23">
            <text:p>253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">
            <text:p>14,00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25.23">
            <text:p>225,23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92.4">
            <text:p>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105011217621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2">
            <text:p>30747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23">
            <text:p>24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932">
            <text:p>0,245</text:p>
          </table:table-cell>
          <table:table-cell table:style-name="ce12N2" office:value-type="float" office:value="21.65">
            <text:p>2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">
            <text:p>1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164.1">
            <text:p>16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9831576786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5">
            <text:p>3074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8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36">
            <text:p>0,001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234.61">
            <text:p>23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8511520912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7">
            <text:p>5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7142.8">
            <text:p>7142,80</text:p>
          </table:table-cell>
          <table:table-cell table:style-name="ce26N2" office:value-type="float" office:value="134047.67">
            <text:p>134047,67</text:p>
          </table:table-cell>
          <table:table-cell table:style-name="ce26N2" office:value-type="float" office:value="8106.31">
            <text:p>8106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1.29">
            <text:p>231,29</text:p>
          </table:table-cell>
          <table:table-cell table:style-name="ce26N2" office:value-type="float" office:value="141190.47">
            <text:p>141190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0.257883">
            <text:p>40,258</text:p>
          </table:table-cell>
          <table:table-cell table:style-name="ce26N2" office:value-type="float" office:value="133862.67">
            <text:p>133862,67</text:p>
          </table:table-cell>
          <table:table-cell table:style-name="ce26N2" office:value-type="float" office:value="141190.47">
            <text:p>141190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239.61">
            <text:p>6239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37">
            <text:p>41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84" meta:object-count="0"/>
    <meta:generator>LibreOffice/4.3.0.4$Windows_x86 LibreOffice_project/62ad5818884a2fc2e5780dd45466868d41009ec0</meta:generator>
  </office:meta>
</office:document-meta>
</file>