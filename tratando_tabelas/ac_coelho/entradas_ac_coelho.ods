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30/06/2026 04:30:28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9">
            <text:p>30870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03.12">
            <text:p>1960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8224">
            <text:p>1,698</text:p>
          </table:table-cell>
          <table:table-cell table:style-name="ce12N2" office:value-type="float" office:value="3298.68">
            <text:p>329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6.00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394.92">
            <text:p>165394,9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56">
            <text:p>1488,5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1.76">
            <text:p>31,76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13717.99">
            <text:p>137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81761658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7">
            <text:p>309397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7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27">
            <text:p>0,087</text:p>
          </table:table-cell>
          <table:table-cell table:style-name="ce12N2" office:value-type="float" office:value="33.1">
            <text:p>3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5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500.85">
            <text:p>50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2296669000169550030000017881782303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5">
            <text:p>309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5.0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476.94">
            <text:p>149476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49322.78">
            <text:p>149322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345977">
            <text:p>4,346</text:p>
          </table:table-cell>
          <table:table-cell table:style-name="ce12N2" office:value-type="float" office:value="1306.75">
            <text:p>1306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9.476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046.33">
            <text:p>126046,33</text:p>
          </table:table-cell>
          <table:table-cell table:style-name="ce12N2" office:value-type="float" office:value="126.05">
            <text:p>12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4.42">
            <text:p>1134,42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54.16">
            <text:p>154,16</text:p>
          </table:table-cell>
          <table:table-cell table:style-name="ce12N2" office:value-type="float" office:value="148981.94">
            <text:p>148981,94</text:p>
          </table:table-cell>
          <table:table-cell table:style-name="ce12N2" office:value-type="float" office:value="10428.74">
            <text:p>1042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50191131332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6">
            <text:p>309536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6025">
            <text:p>0,326</text:p>
          </table:table-cell>
          <table:table-cell table:style-name="ce12N2" office:value-type="float" office:value="25.81">
            <text:p>25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6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2">
            <text:p>3322,00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9">
            <text:p>29,9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275.53">
            <text:p>27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417550746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7">
            <text:p>309537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00872">
            <text:p>7,009</text:p>
          </table:table-cell>
          <table:table-cell table:style-name="ce12N2" office:value-type="float" office:value="117.6">
            <text:p>11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32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57.59">
            <text:p>17157,59</text:p>
          </table:table-cell>
          <table:table-cell table:style-name="ce12N2" office:value-type="float" office:value="17.16">
            <text:p>1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.42">
            <text:p>154,4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1423.07">
            <text:p>142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61561216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51">
            <text:p>3095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9.1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0.26">
            <text:p>374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40.26">
            <text:p>374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54">
            <text:p>0,015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0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56.68">
            <text:p>3156,68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41">
            <text:p>28,4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40.26">
            <text:p>3740,26</text:p>
          </table:table-cell>
          <table:table-cell table:style-name="ce12N2" office:value-type="float" office:value="261.82">
            <text:p>26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913618038852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3">
            <text:p>30956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7.43">
            <text:p>277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77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0.29">
            <text:p>2270,29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43">
            <text:p>20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87.43">
            <text:p>87,43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188.3">
            <text:p>18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21370152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4">
            <text:p>30956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0.87">
            <text:p>1520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3">
            <text:p>147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52">
            <text:p>0,004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0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3.18">
            <text:p>1243,18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9">
            <text:p>11,19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47.87">
            <text:p>47,87</text:p>
          </table:table-cell>
          <table:table-cell table:style-name="ce12N2" office:value-type="float" office:value="1473">
            <text:p>1473,00</text:p>
          </table:table-cell>
          <table:table-cell table:style-name="ce12N2" office:value-type="float" office:value="103.11">
            <text:p>10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41904117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6">
            <text:p>30956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7.43">
            <text:p>277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77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0.29">
            <text:p>2270,29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43">
            <text:p>20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87.43">
            <text:p>87,43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188.3">
            <text:p>18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318195877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7">
            <text:p>3095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1.5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37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20.32">
            <text:p>4420,32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78">
            <text:p>39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366.63">
            <text:p>366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152214368079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8">
            <text:p>30956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0.71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2.62">
            <text:p>2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5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85.61">
            <text:p>3785,61</text:p>
          </table:table-cell>
          <table:table-cell table:style-name="ce12N2" office:value-type="float" office:value="3.79">
            <text:p>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07">
            <text:p>34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313.98">
            <text:p>31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07131778819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4">
            <text:p>309594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64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64.62">
            <text:p>2164,62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48">
            <text:p>19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179.54">
            <text:p>17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518864121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7">
            <text:p>30960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6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73.09">
            <text:p>307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00.08">
            <text:p>2800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896">
            <text:p>0,049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73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3.19">
            <text:p>2363,19</text:p>
          </table:table-cell>
          <table:table-cell table:style-name="ce12N2" office:value-type="float" office:value="2.36">
            <text:p>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27">
            <text:p>21,27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273.01">
            <text:p>273,01</text:p>
          </table:table-cell>
          <table:table-cell table:style-name="ce12N2" office:value-type="float" office:value="2800.08">
            <text:p>2800,08</text:p>
          </table:table-cell>
          <table:table-cell table:style-name="ce12N2" office:value-type="float" office:value="196.01">
            <text:p>19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681318324982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8">
            <text:p>309608</text:p>
          </table:table-cell>
          <table:table-cell table:style-name="ce0" table:number-columns-spanned="4" table:number-rows-spanned="1" office:value-type="string" calcext:value-type="string">
            <text:p>26 - TECNOPERFIL PLASTICOS LTDA</text:p>
          </table:table-cell>
          <table:covered-table-cell table:number-columns-repeated="3"/>
          <table:table-cell table:style-name="ce0" office:value-type="string" calcext:value-type="string">
            <text:p>18.0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0.87">
            <text:p>1950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31.8">
            <text:p>18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498">
            <text:p>0,155</text:p>
          </table:table-cell>
          <table:table-cell table:style-name="ce12N2" office:value-type="float" office:value="32.94">
            <text:p>32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50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5.99">
            <text:p>1545,99</text:p>
          </table:table-cell>
          <table:table-cell table:style-name="ce12N2" office:value-type="float" office:value="1.55">
            <text:p>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91">
            <text:p>13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19.07">
            <text:p>119,07</text:p>
          </table:table-cell>
          <table:table-cell table:style-name="ce12N2" office:value-type="float" office:value="1831.8">
            <text:p>1831,80</text:p>
          </table:table-cell>
          <table:table-cell table:style-name="ce12N2" office:value-type="float" office:value="128.23">
            <text:p>12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0341857000175550030000180381303298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9">
            <text:p>30960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9.1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43.24">
            <text:p>864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875.4">
            <text:p>7875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07004">
            <text:p>0,707</text:p>
          </table:table-cell>
          <table:table-cell table:style-name="ce12N2" office:value-type="float" office:value="52.22">
            <text:p>5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4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37.13">
            <text:p>6837,13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53">
            <text:p>61,53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767.84">
            <text:p>767,84</text:p>
          </table:table-cell>
          <table:table-cell table:style-name="ce12N2" office:value-type="float" office:value="7875.4">
            <text:p>7875,40</text:p>
          </table:table-cell>
          <table:table-cell table:style-name="ce12N2" office:value-type="float" office:value="341.36">
            <text:p>34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91951453167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9">
            <text:p>3096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1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4.93">
            <text:p>211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3.93">
            <text:p>1953,93</text:p>
          </table:table-cell>
          <table:table-cell table:style-name="ce12N2" office:value-type="float" office:value="161">
            <text:p>161,00</text:p>
          </table:table-cell>
          <table:table-cell table:style-name="ce12N3" office:value-type="float" office:value="0.162623">
            <text:p>0,163</text:p>
          </table:table-cell>
          <table:table-cell table:style-name="ce12N2" office:value-type="float" office:value="43.61">
            <text:p>4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4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2.26">
            <text:p>1702,26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33">
            <text:p>15,3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14.93">
            <text:p>2114,93</text:p>
          </table:table-cell>
          <table:table-cell table:style-name="ce12N2" office:value-type="float" office:value="84.58">
            <text:p>8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10714647909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7">
            <text:p>30968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0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1.59">
            <text:p>240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26">
            <text:p>23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6">
            <text:p>0,001</text:p>
          </table:table-cell>
          <table:table-cell table:style-name="ce12N2" office:value-type="float" office:value="1.92">
            <text:p>1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0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63.09">
            <text:p>1963,09</text:p>
          </table:table-cell>
          <table:table-cell table:style-name="ce12N2" office:value-type="float" office:value="1.96">
            <text:p>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67">
            <text:p>17,6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75.59">
            <text:p>75,59</text:p>
          </table:table-cell>
          <table:table-cell table:style-name="ce12N2" office:value-type="float" office:value="2326">
            <text:p>2326,00</text:p>
          </table:table-cell>
          <table:table-cell table:style-name="ce12N2" office:value-type="float" office:value="162.82">
            <text:p>16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0714033457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9">
            <text:p>30968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96.35">
            <text:p>369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80">
            <text:p>35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8">
            <text:p>0,002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9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1.43">
            <text:p>3021,43</text:p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19">
            <text:p>27,1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16.35">
            <text:p>116,35</text:p>
          </table:table-cell>
          <table:table-cell table:style-name="ce12N2" office:value-type="float" office:value="3580">
            <text:p>3580,00</text:p>
          </table:table-cell>
          <table:table-cell table:style-name="ce12N2" office:value-type="float" office:value="250.6">
            <text:p>25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1713929349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1">
            <text:p>309701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5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9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5.27">
            <text:p>1485,27</text:p>
          </table:table-cell>
          <table:table-cell table:style-name="ce12N2" office:value-type="float" office:value="1.49">
            <text:p>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37">
            <text:p>13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123.19">
            <text:p>12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5361736246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7">
            <text:p>30970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1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072.59">
            <text:p>3507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">
            <text:p>61,00</text:p>
          </table:table-cell>
          <table:table-cell table:style-name="ce12N2" office:value-type="float" office:value="34601.07">
            <text:p>34601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7491">
            <text:p>0,317</text:p>
          </table:table-cell>
          <table:table-cell table:style-name="ce12N2" office:value-type="float" office:value="72.8">
            <text:p>7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07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202.37">
            <text:p>29202,37</text:p>
          </table:table-cell>
          <table:table-cell table:style-name="ce12N2" office:value-type="float" office:value="29.2">
            <text:p>2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2.83">
            <text:p>262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71.52">
            <text:p>471,52</text:p>
          </table:table-cell>
          <table:table-cell table:style-name="ce12N2" office:value-type="float" office:value="34601.07">
            <text:p>34601,07</text:p>
          </table:table-cell>
          <table:table-cell table:style-name="ce12N2" office:value-type="float" office:value="2422.05">
            <text:p>242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1071268184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7">
            <text:p>309727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6.51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86.26">
            <text:p>658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988.24">
            <text:p>598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86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65.79">
            <text:p>5365,79</text:p>
          </table:table-cell>
          <table:table-cell table:style-name="ce12N2" office:value-type="float" office:value="5.37">
            <text:p>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28">
            <text:p>48,2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98.02">
            <text:p>598,02</text:p>
          </table:table-cell>
          <table:table-cell table:style-name="ce12N2" office:value-type="float" office:value="5988.24">
            <text:p>5988,24</text:p>
          </table:table-cell>
          <table:table-cell table:style-name="ce12N2" office:value-type="float" office:value="419.19">
            <text:p>41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651218293040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9">
            <text:p>309729</text:p>
          </table:table-cell>
          <table:table-cell table:style-name="ce0" table:number-columns-spanned="4" table:number-rows-spanned="1" office:value-type="string" calcext:value-type="string">
            <text:p>790 - JACKWAL S/A</text:p>
          </table:table-cell>
          <table:covered-table-cell table:number-columns-repeated="3"/>
          <table:table-cell table:style-name="ce0" office:value-type="string" calcext:value-type="string">
            <text:p>276.2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2.32">
            <text:p>482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654.06">
            <text:p>4654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316">
            <text:p>0,005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86.44">
            <text:p>3486,44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37">
            <text:p>31,3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68.26">
            <text:p>168,26</text:p>
          </table:table-cell>
          <table:table-cell table:style-name="ce12N2" office:value-type="float" office:value="4654.06">
            <text:p>4654,06</text:p>
          </table:table-cell>
          <table:table-cell table:style-name="ce12N2" office:value-type="float" office:value="310.09">
            <text:p>31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2782366000188550030002762861870235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8">
            <text:p>3097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63">
            <text:p>0,096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5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5.03">
            <text:p>3425,03</text:p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3">
            <text:p>30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284.07">
            <text:p>28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81122833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4">
            <text:p>309754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91.34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7.47">
            <text:p>292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90.68">
            <text:p>259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6.47">
            <text:p>2186,47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68">
            <text:p>19,68</text:p>
          </table:table-cell>
          <table:table-cell table:style-name="ce12N2" office:value-type="float" office:value="52.78">
            <text:p>52,7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336.79">
            <text:p>336,79</text:p>
          </table:table-cell>
          <table:table-cell table:style-name="ce12N2" office:value-type="float" office:value="2590.68">
            <text:p>2590,68</text:p>
          </table:table-cell>
          <table:table-cell table:style-name="ce12N2" office:value-type="float" office:value="181.35">
            <text:p>18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9134115728012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5">
            <text:p>30975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4.3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52.53">
            <text:p>2295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22669.44">
            <text:p>2266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5356">
            <text:p>0,365</text:p>
          </table:table-cell>
          <table:table-cell table:style-name="ce12N2" office:value-type="float" office:value="89.26">
            <text:p>89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95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296.67">
            <text:p>19296,67</text:p>
          </table:table-cell>
          <table:table-cell table:style-name="ce12N2" office:value-type="float" office:value="19.3">
            <text:p>1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3.67">
            <text:p>173,67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283.09">
            <text:p>283,09</text:p>
          </table:table-cell>
          <table:table-cell table:style-name="ce12N2" office:value-type="float" office:value="22669.44">
            <text:p>22669,44</text:p>
          </table:table-cell>
          <table:table-cell table:style-name="ce12N2" office:value-type="float" office:value="1405.91">
            <text:p>140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43011788581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4">
            <text:p>30976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43.52">
            <text:p>714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43.52">
            <text:p>714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2824">
            <text:p>0,083</text:p>
          </table:table-cell>
          <table:table-cell table:style-name="ce12N2" office:value-type="float" office:value="5.2">
            <text:p>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43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28.96">
            <text:p>6028,96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6">
            <text:p>54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43.52">
            <text:p>7143,52</text:p>
          </table:table-cell>
          <table:table-cell table:style-name="ce12N2" office:value-type="float" office:value="500.05">
            <text:p>50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1614774098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5">
            <text:p>30976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2.31">
            <text:p>14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448.04">
            <text:p>1448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45">
            <text:p>0,008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2.12">
            <text:p>1222,12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8">
            <text:p>10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4.27">
            <text:p>4,27</text:p>
          </table:table-cell>
          <table:table-cell table:style-name="ce12N2" office:value-type="float" office:value="1448.04">
            <text:p>1448,04</text:p>
          </table:table-cell>
          <table:table-cell table:style-name="ce12N2" office:value-type="float" office:value="101.38">
            <text:p>10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2817893431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7">
            <text:p>3097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4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8.09">
            <text:p>136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25.92">
            <text:p>132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205">
            <text:p>0,027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9.04">
            <text:p>1119,04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7">
            <text:p>10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42.17">
            <text:p>42,17</text:p>
          </table:table-cell>
          <table:table-cell table:style-name="ce12N2" office:value-type="float" office:value="1325.92">
            <text:p>1325,92</text:p>
          </table:table-cell>
          <table:table-cell table:style-name="ce12N2" office:value-type="float" office:value="92.81">
            <text:p>9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471531125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9">
            <text:p>309849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9.0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30.35">
            <text:p>443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348.58">
            <text:p>434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7744">
            <text:p>0,268</text:p>
          </table:table-cell>
          <table:table-cell table:style-name="ce12N2" office:value-type="float" office:value="39.12">
            <text:p>3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3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70.07">
            <text:p>3670,07</text:p>
          </table:table-cell>
          <table:table-cell table:style-name="ce12N2" office:value-type="float" office:value="3.66">
            <text:p>3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04">
            <text:p>33,04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81.77">
            <text:p>81,77</text:p>
          </table:table-cell>
          <table:table-cell table:style-name="ce12N2" office:value-type="float" office:value="4348.58">
            <text:p>4348,58</text:p>
          </table:table-cell>
          <table:table-cell table:style-name="ce12N2" office:value-type="float" office:value="304.41">
            <text:p>30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90181836222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51">
            <text:p>30985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41.22">
            <text:p>1084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94">
            <text:p>959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912">
            <text:p>0,055</text:p>
          </table:table-cell>
          <table:table-cell table:style-name="ce12N2" office:value-type="float" office:value="37.34">
            <text:p>3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841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097.1">
            <text:p>8097,10</text:p>
          </table:table-cell>
          <table:table-cell table:style-name="ce12N2" office:value-type="float" office:value="8.1">
            <text:p>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.87">
            <text:p>72,87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247.22">
            <text:p>1247,22</text:p>
          </table:table-cell>
          <table:table-cell table:style-name="ce12N2" office:value-type="float" office:value="9594">
            <text:p>9594,00</text:p>
          </table:table-cell>
          <table:table-cell table:style-name="ce12N2" office:value-type="float" office:value="671.58">
            <text:p>67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78418596887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64">
            <text:p>309864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7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2.8">
            <text:p>119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92.8">
            <text:p>119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903">
            <text:p>0,099</text:p>
          </table:table-cell>
          <table:table-cell table:style-name="ce12N2" office:value-type="float" office:value="420">
            <text:p>4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8.97">
            <text:p>998,97</text:p>
          </table:table-cell>
          <table:table-cell table:style-name="ce12N2" office:value-type="float" office:value="0.99">
            <text:p>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99">
            <text:p>8,99</text:p>
          </table:table-cell>
          <table:table-cell table:style-name="ce12N2" office:value-type="float" office:value="1">
            <text:p>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2.8">
            <text:p>1192,80</text:p>
          </table:table-cell>
          <table:table-cell table:style-name="ce12N2" office:value-type="float" office:value="83.49">
            <text:p>8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37.4">
            <text:p>23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981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5/06/2026</text:p>
          </table:table-cell>
          <table:table-cell table:style-name="ce12" office:value-type="string" calcext:value-type="string">
            <text:p>237,40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5260654542238000178550010000973861000971896</text:p>
          </table:table-cell>
          <table:table-cell table:style-name="ce0" office:value-type="string" calcext:value-type="string">
            <text:p>3526061138956500020057005000401981100088384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66">
            <text:p>3098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5.23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3.93">
            <text:p>2663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01.34">
            <text:p>2501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56">
            <text:p>0,000</text:p>
          </table:table-cell>
          <table:table-cell table:style-name="ce12N2" office:value-type="float" office:value="0.25">
            <text:p>0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3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1.04">
            <text:p>2111,04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62.59">
            <text:p>162,59</text:p>
          </table:table-cell>
          <table:table-cell table:style-name="ce12N2" office:value-type="float" office:value="2501.34">
            <text:p>2501,34</text:p>
          </table:table-cell>
          <table:table-cell table:style-name="ce12N2" office:value-type="float" office:value="175.09">
            <text:p>17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523114403532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68">
            <text:p>309868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39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0.52">
            <text:p>358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580.52">
            <text:p>358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80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1.87">
            <text:p>3021,87</text:p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2">
            <text:p>27,2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0.52">
            <text:p>3580,52</text:p>
          </table:table-cell>
          <table:table-cell table:style-name="ce12N2" office:value-type="float" office:value="250.63">
            <text:p>250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1385550020000193961348149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0">
            <text:p>309870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40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7.22">
            <text:p>143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37.22">
            <text:p>1437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7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2.98">
            <text:p>1212,98</text:p>
          </table:table-cell>
          <table:table-cell table:style-name="ce12N2" office:value-type="float" office:value="1.21">
            <text:p>1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2">
            <text:p>10,9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37.22">
            <text:p>1437,22</text:p>
          </table:table-cell>
          <table:table-cell table:style-name="ce12N2" office:value-type="float" office:value="100.61">
            <text:p>10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13855500200001940419549678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2">
            <text:p>309872</text:p>
          </table:table-cell>
          <table:table-cell table:style-name="ce0" table:number-columns-spanned="4" table:number-rows-spanned="1" office:value-type="string" calcext:value-type="string">
            <text:p>31.410 - SAN HO COMERCIO IMPORTACAO E EXPORTACAO LTDA</text:p>
          </table:table-cell>
          <table:covered-table-cell table:number-columns-repeated="3"/>
          <table:table-cell table:style-name="ce0" office:value-type="string" calcext:value-type="string">
            <text:p>87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85.15">
            <text:p>498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976.7">
            <text:p>497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85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03.25">
            <text:p>4603,25</text:p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43">
            <text:p>41,43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4976.7">
            <text:p>4976,70</text:p>
          </table:table-cell>
          <table:table-cell table:style-name="ce12N2" office:value-type="float" office:value="199.07">
            <text:p>19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7.68">
            <text:p>107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96.176</text:p>
          </table:table-cell>
          <table:table-cell table:style-name="ce0" office:value-type="string" calcext:value-type="string">
            <text:p>30.965 - RTL ENCOMENDAS E CARGAS LTDA</text:p>
          </table:table-cell>
          <table:table-cell table:style-name="ce0" office:value-type="string" calcext:value-type="string">
            <text:p>25/06/2026</text:p>
          </table:table-cell>
          <table:table-cell table:style-name="ce12" office:value-type="string" calcext:value-type="string">
            <text:p>107,6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52260617328359000195550010000871581285502109</text:p>
          </table:table-cell>
          <table:table-cell table:style-name="ce0" office:value-type="string" calcext:value-type="string">
            <text:p>5226063160759800010557001000096176100070630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6">
            <text:p>30987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9.1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25">
            <text:p>0,212</text:p>
          </table:table-cell>
          <table:table-cell table:style-name="ce12N2" office:value-type="float" office:value="0.42">
            <text:p>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3.18">
            <text:p>1233,18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">
            <text:p>11,1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92.82">
            <text:p>9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91131026826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7">
            <text:p>309877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83.2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02.51">
            <text:p>510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102.51">
            <text:p>5102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245">
            <text:p>0,053</text:p>
          </table:table-cell>
          <table:table-cell table:style-name="ce12N2" office:value-type="float" office:value="28.76">
            <text:p>2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0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40.53">
            <text:p>4340,53</text:p>
          </table:table-cell>
          <table:table-cell table:style-name="ce12N2" office:value-type="float" office:value="4.34">
            <text:p>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07">
            <text:p>39,0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02.51">
            <text:p>5102,51</text:p>
          </table:table-cell>
          <table:table-cell table:style-name="ce12N2" office:value-type="float" office:value="319.56">
            <text:p>3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832301087585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9">
            <text:p>3098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0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.48">
            <text:p>10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.98">
            <text:p>99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8E-5">
            <text:p>0,000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.38">
            <text:p>84,38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99.98">
            <text:p>99,98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04913746976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0">
            <text:p>309880</text:p>
          </table:table-cell>
          <table:table-cell table:style-name="ce0" table:number-columns-spanned="4" table:number-rows-spanned="1" office:value-type="string" calcext:value-type="string">
            <text:p>38.379 - ASSA ABLOY BRASIL INDUSTRIA E COMERCIO LTDA</text:p>
          </table:table-cell>
          <table:covered-table-cell table:number-columns-repeated="3"/>
          <table:table-cell table:style-name="ce0" office:value-type="string" calcext:value-type="string">
            <text:p>222.30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51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5.43">
            <text:p>2135,43</text:p>
          </table:table-cell>
          <table:table-cell table:style-name="ce12N2" office:value-type="float" office:value="2.13">
            <text:p>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22">
            <text:p>19,2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98.04">
            <text:p>9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5260602214604000328550030002223051811771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1">
            <text:p>309881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8.1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381.71">
            <text:p>2538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23771.99">
            <text:p>23771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8469">
            <text:p>1,185</text:p>
          </table:table-cell>
          <table:table-cell table:style-name="ce12N2" office:value-type="float" office:value="132.14">
            <text:p>13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381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077.31">
            <text:p>20077,31</text:p>
          </table:table-cell>
          <table:table-cell table:style-name="ce12N2" office:value-type="float" office:value="20.09">
            <text:p>2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.66">
            <text:p>180,66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609.72">
            <text:p>1609,72</text:p>
          </table:table-cell>
          <table:table-cell table:style-name="ce12N2" office:value-type="float" office:value="23545.24">
            <text:p>23545,24</text:p>
          </table:table-cell>
          <table:table-cell table:style-name="ce12N2" office:value-type="float" office:value="1648.19">
            <text:p>164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07159430000361550010000881351597797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93">
            <text:p>3098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2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1.48">
            <text:p>125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1.48">
            <text:p>1251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1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6.22">
            <text:p>1056,22</text:p>
          </table:table-cell>
          <table:table-cell table:style-name="ce12N2" office:value-type="float" office:value="1.06">
            <text:p>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1">
            <text:p>9,5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1.48">
            <text:p>1251,48</text:p>
          </table:table-cell>
          <table:table-cell table:style-name="ce12N2" office:value-type="float" office:value="87.6">
            <text:p>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28616446177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3">
            <text:p>309953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4.7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26.66">
            <text:p>1032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0185.74">
            <text:p>10185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9678">
            <text:p>0,370</text:p>
          </table:table-cell>
          <table:table-cell table:style-name="ce12N2" office:value-type="float" office:value="54.21">
            <text:p>54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2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96.48">
            <text:p>8596,48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38">
            <text:p>77,38</text:p>
          </table:table-cell>
          <table:table-cell table:style-name="ce12N2" office:value-type="float" office:value="62.62">
            <text:p>62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40.92">
            <text:p>140,92</text:p>
          </table:table-cell>
          <table:table-cell table:style-name="ce12N2" office:value-type="float" office:value="10185.74">
            <text:p>10185,74</text:p>
          </table:table-cell>
          <table:table-cell table:style-name="ce12N2" office:value-type="float" office:value="713.01">
            <text:p>7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347281645483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75">
            <text:p>3099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3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6.32">
            <text:p>148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6.32">
            <text:p>148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8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54.42">
            <text:p>1254,42</text:p>
          </table:table-cell>
          <table:table-cell table:style-name="ce12N2" office:value-type="float" office:value="1.25">
            <text:p>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29">
            <text:p>11,2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6.32">
            <text:p>1486,32</text:p>
          </table:table-cell>
          <table:table-cell table:style-name="ce12N2" office:value-type="float" office:value="104.04">
            <text:p>10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35012568101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5">
            <text:p>31000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0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2.55">
            <text:p>92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2.55">
            <text:p>922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2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8.61">
            <text:p>778,61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01">
            <text:p>7,0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2.55">
            <text:p>922,55</text:p>
          </table:table-cell>
          <table:table-cell table:style-name="ce12N2" office:value-type="float" office:value="64.58">
            <text:p>6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09016987877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7">
            <text:p>31000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0.28">
            <text:p>272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0.28">
            <text:p>272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4">
            <text:p>0,015</text:p>
          </table:table-cell>
          <table:table-cell table:style-name="ce12N2" office:value-type="float" office:value="9.64">
            <text:p>9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95.96">
            <text:p>2295,96</text:p>
          </table:table-cell>
          <table:table-cell table:style-name="ce12N2" office:value-type="float" office:value="2.29">
            <text:p>2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67">
            <text:p>20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0.28">
            <text:p>2720,28</text:p>
          </table:table-cell>
          <table:table-cell table:style-name="ce12N2" office:value-type="float" office:value="190.42">
            <text:p>19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171322916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8">
            <text:p>31000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1.02">
            <text:p>336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61.02">
            <text:p>3361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61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6.62">
            <text:p>2836,62</text:p>
          </table:table-cell>
          <table:table-cell table:style-name="ce12N2" office:value-type="float" office:value="2.84">
            <text:p>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53">
            <text:p>25,5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1.02">
            <text:p>3361,02</text:p>
          </table:table-cell>
          <table:table-cell table:style-name="ce12N2" office:value-type="float" office:value="235.27">
            <text:p>235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4117505032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2">
            <text:p>3100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1.41">
            <text:p>87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1.41">
            <text:p>87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17">
            <text:p>0,004</text:p>
          </table:table-cell>
          <table:table-cell table:style-name="ce12N2" office:value-type="float" office:value="2.62">
            <text:p>2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5.45">
            <text:p>735,45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1.41">
            <text:p>871,41</text:p>
          </table:table-cell>
          <table:table-cell table:style-name="ce12N2" office:value-type="float" office:value="61">
            <text:p>6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7511172048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3">
            <text:p>3100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39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82.32">
            <text:p>578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82.32">
            <text:p>578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856">
            <text:p>0,018</text:p>
          </table:table-cell>
          <table:table-cell table:style-name="ce12N2" office:value-type="float" office:value="8.93">
            <text:p>8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8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80.16">
            <text:p>4880,16</text:p>
          </table:table-cell>
          <table:table-cell table:style-name="ce12N2" office:value-type="float" office:value="4.88">
            <text:p>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92">
            <text:p>43,9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82.32">
            <text:p>5782,32</text:p>
          </table:table-cell>
          <table:table-cell table:style-name="ce12N2" office:value-type="float" office:value="404.76">
            <text:p>40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39417670120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8">
            <text:p>310018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6.4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2.54">
            <text:p>8862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075.2">
            <text:p>807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72">
            <text:p>0,013</text:p>
          </table:table-cell>
          <table:table-cell table:style-name="ce12N2" office:value-type="float" office:value="15.6">
            <text:p>1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62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075.2">
            <text:p>8075,20</text:p>
          </table:table-cell>
          <table:table-cell table:style-name="ce12N2" office:value-type="float" office:value="8.08">
            <text:p>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.68">
            <text:p>72,68</text:p>
          </table:table-cell>
          <table:table-cell table:style-name="ce12N2" office:value-type="float" office:value="44.58">
            <text:p>44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787.34">
            <text:p>787,34</text:p>
          </table:table-cell>
          <table:table-cell table:style-name="ce12N2" office:value-type="float" office:value="8075.2">
            <text:p>8075,20</text:p>
          </table:table-cell>
          <table:table-cell table:style-name="ce12N2" office:value-type="float" office:value="565.26">
            <text:p>565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648710026648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52">
            <text:p>52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1">
            <text:p>161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267.45">
            <text:p>8267,45</text:p>
          </table:table-cell>
          <table:table-cell table:style-name="ce26N2" office:value-type="float" office:value="804054.85">
            <text:p>804054,85</text:p>
          </table:table-cell>
          <table:table-cell table:style-name="ce26N2" office:value-type="float" office:value="55553.4">
            <text:p>55553,4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45.08">
            <text:p>345,08</text:p>
          </table:table-cell>
          <table:table-cell table:style-name="ce26N2" office:value-type="float" office:value="812899.89">
            <text:p>812899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1.730048">
            <text:p>21,730</text:p>
          </table:table-cell>
          <table:table-cell table:style-name="ce26N2" office:value-type="float" office:value="804471.44">
            <text:p>804471,44</text:p>
          </table:table-cell>
          <table:table-cell table:style-name="ce26N2" office:value-type="float" office:value="812899.89">
            <text:p>812899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75037.52">
            <text:p>675037,52</text:p>
          </table:table-cell>
          <table:table-cell table:style-name="ce26N2" office:value-type="float" office:value="675.04">
            <text:p>675,0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075.33">
            <text:p>6075,33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7519.84">
            <text:p>7519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5.48">
            <text:p>75,4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94" meta:object-count="0"/>
    <meta:generator>LibreOffice/4.3.0.4$Windows_x86 LibreOffice_project/62ad5818884a2fc2e5780dd45466868d41009ec0</meta:generator>
  </office:meta>
</office:document-meta>
</file>