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2/05/2026 07:50:0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8">
            <text:p>30671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4.17">
            <text:p>1326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026">
            <text:p>1,050</text:p>
          </table:table-cell>
          <table:table-cell table:style-name="ce12N2" office:value-type="float" office:value="92.08">
            <text:p>9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08.97">
            <text:p>908,97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864.86">
            <text:p>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2414056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4">
            <text:p>306754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41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6.37">
            <text:p>780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">
            <text:p>0,003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06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2">
            <text:p>57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97.87">
            <text:p>697,87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284.34">
            <text:p>2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4151168111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1">
            <text:p>306771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66541471008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1">
            <text:p>3068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4.01">
            <text:p>264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642">
            <text:p>0,476</text:p>
          </table:table-cell>
          <table:table-cell table:style-name="ce12N2" office:value-type="float" office:value="56.65">
            <text:p>5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434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50.97">
            <text:p>650,97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1265.66">
            <text:p>126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0371035091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6">
            <text:p>306806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8.53">
            <text:p>2990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28002.68">
            <text:p>2800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7.32">
            <text:p>3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0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905.85">
            <text:p>1905,85</text:p>
          </table:table-cell>
          <table:table-cell table:style-name="ce12N2" office:value-type="float" office:value="28002.68">
            <text:p>28002,68</text:p>
          </table:table-cell>
          <table:table-cell table:style-name="ce12N2" office:value-type="float" office:value="1120.05">
            <text:p>112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881358185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6">
            <text:p>306816</text:p>
          </table:table-cell>
          <table:table-cell table:style-name="ce0" table:number-columns-spanned="4" table:number-rows-spanned="1" office:value-type="string" calcext:value-type="string">
            <text:p>38.321 - S&amp;P BRASIL VENTILACAO LTDA.</text:p>
          </table:table-cell>
          <table:covered-table-cell table:number-columns-repeated="3"/>
          <table:table-cell table:style-name="ce0" office:value-type="string" calcext:value-type="string">
            <text:p>35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316.05">
            <text:p>3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26595070004125500100003555111600083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6">
            <text:p>30682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0.44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1.62">
            <text:p>453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978">
            <text:p>0,181</text:p>
          </table:table-cell>
          <table:table-cell table:style-name="ce12N2" office:value-type="float" office:value="29.27">
            <text:p>29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183">
            <text:p>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0441120048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0">
            <text:p>3068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1.19">
            <text:p>18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2.6">
            <text:p>180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621">
            <text:p>0,226</text:p>
          </table:table-cell>
          <table:table-cell table:style-name="ce12N2" office:value-type="float" office:value="7.52">
            <text:p>7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1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8.59">
            <text:p>58,59</text:p>
          </table:table-cell>
          <table:table-cell table:style-name="ce12N2" office:value-type="float" office:value="1802.6">
            <text:p>1802,60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421845374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9">
            <text:p>306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4.7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">
            <text:p>0,051</text:p>
          </table:table-cell>
          <table:table-cell table:style-name="ce12N2" office:value-type="float" office:value="54.16">
            <text:p>5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0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1337.27">
            <text:p>133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4749120240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4">
            <text:p>30689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8.38">
            <text:p>1651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973.46">
            <text:p>14973,4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11534">
            <text:p>0,012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51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86">
            <text:p>55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1459.92">
            <text:p>1459,92</text:p>
          </table:table-cell>
          <table:table-cell table:style-name="ce12N2" office:value-type="float" office:value="15058.46">
            <text:p>15058,46</text:p>
          </table:table-cell>
          <table:table-cell table:style-name="ce12N2" office:value-type="float" office:value="602.33">
            <text:p>6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5931234036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4">
            <text:p>3070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78">
            <text:p>0,092</text:p>
          </table:table-cell>
          <table:table-cell table:style-name="ce12N2" office:value-type="float" office:value="14.15">
            <text:p>1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53.26">
            <text:p>5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31502859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5">
            <text:p>3070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88">
            <text:p>0,017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53.29">
            <text:p>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2111394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6">
            <text:p>307046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9.24">
            <text:p>3954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6406.48">
            <text:p>36406,48</text:p>
          </table:table-cell>
          <table:table-cell table:style-name="ce12N2" office:value-type="float" office:value="1877.94">
            <text:p>1877,94</text:p>
          </table:table-cell>
          <table:table-cell table:style-name="ce12N3" office:value-type="float" office:value="2.71203">
            <text:p>2,712</text:p>
          </table:table-cell>
          <table:table-cell table:style-name="ce12N2" office:value-type="float" office:value="520.9">
            <text:p>52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4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264.82">
            <text:p>1264,82</text:p>
          </table:table-cell>
          <table:table-cell table:style-name="ce12N2" office:value-type="float" office:value="38284.42">
            <text:p>38284,42</text:p>
          </table:table-cell>
          <table:table-cell table:style-name="ce12N2" office:value-type="float" office:value="2330.38">
            <text:p>233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11668968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8">
            <text:p>3070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553.85">
            <text:p>55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211513869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3">
            <text:p>53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1962.94">
            <text:p>1962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482.18">
            <text:p>17482,18</text:p>
          </table:table-cell>
          <table:table-cell table:style-name="ce26N2" office:value-type="float" office:value="493496.63">
            <text:p>493496,63</text:p>
          </table:table-cell>
          <table:table-cell table:style-name="ce26N2" office:value-type="float" office:value="30997.96">
            <text:p>30997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3204.22">
            <text:p>543204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.384213">
            <text:p>19,384</text:p>
          </table:table-cell>
          <table:table-cell table:style-name="ce26N2" office:value-type="float" office:value="523819.2">
            <text:p>523819,20</text:p>
          </table:table-cell>
          <table:table-cell table:style-name="ce26N2" office:value-type="float" office:value="543204.22">
            <text:p>543204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060.75">
            <text:p>2060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78">
            <text:p>49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36" meta:object-count="0"/>
    <meta:generator>LibreOffice/4.3.0.4$Windows_x86 LibreOffice_project/62ad5818884a2fc2e5780dd45466868d41009ec0</meta:generator>
  </office:meta>
</office:document-meta>
</file>