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3/07/2026 07:42:1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5">
            <text:p>310365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22.07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03">
            <text:p>3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375">
            <text:p>0,854</text:p>
          </table:table-cell>
          <table:table-cell table:style-name="ce12N2" office:value-type="float" office:value="15.79">
            <text:p>15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3.03">
            <text:p>3263,03</text:p>
          </table:table-cell>
          <table:table-cell table:style-name="ce12N2" office:value-type="float" office:value="3.26">
            <text:p>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37">
            <text:p>29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5.03">
            <text:p>125,03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228.36">
            <text:p>22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84554530001785500400002207613466370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5">
            <text:p>3104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38">
            <text:p>0,005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0.06">
            <text:p>1300,06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107.83">
            <text:p>1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01745782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4">
            <text:p>3104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.38">
            <text:p>408,38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541651900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3">
            <text:p>31047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3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37.97">
            <text:p>6403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9304">
            <text:p>0,499</text:p>
          </table:table-cell>
          <table:table-cell table:style-name="ce12N2" office:value-type="float" office:value="410.5">
            <text:p>4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03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01.42">
            <text:p>52901,42</text:p>
          </table:table-cell>
          <table:table-cell table:style-name="ce12N2" office:value-type="float" office:value="52.9">
            <text:p>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1">
            <text:p>476,10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863.05">
            <text:p>1863,05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3881.36">
            <text:p>38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137771912698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2">
            <text:p>3104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82">
            <text:p>381,82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9721198719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6">
            <text:p>3104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64">
            <text:p>0,04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8.88">
            <text:p>3478,88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1">
            <text:p>31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288.54">
            <text:p>28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21803914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6">
            <text:p>31053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3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0.11">
            <text:p>469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04">
            <text:p>0,001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9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8">
            <text:p>3749,68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53.69">
            <text:p>53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386.09">
            <text:p>386,09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172.16">
            <text:p>1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3266140103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4">
            <text:p>310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816">
            <text:p>0,075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5.58">
            <text:p>4775,58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98">
            <text:p>4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396.09">
            <text:p>3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761883841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2">
            <text:p>310682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41177117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3">
            <text:p>310683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51451637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4">
            <text:p>31068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756">
            <text:p>0,370</text:p>
          </table:table-cell>
          <table:table-cell table:style-name="ce12N2" office:value-type="float" office:value="28.79">
            <text:p>28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2.44">
            <text:p>3182,44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4">
            <text:p>28,6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263.96">
            <text:p>2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6177017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5">
            <text:p>310685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58.64">
            <text:p>12458,64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3">
            <text:p>112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1033.33">
            <text:p>103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71306853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9">
            <text:p>2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12.79">
            <text:p>612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896.31">
            <text:p>10896,31</text:p>
          </table:table-cell>
          <table:table-cell table:style-name="ce26N2" office:value-type="float" office:value="553074.88">
            <text:p>553074,88</text:p>
          </table:table-cell>
          <table:table-cell table:style-name="ce26N2" office:value-type="float" office:value="37243.31">
            <text:p>37243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4035.08">
            <text:p>564035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5.766921">
            <text:p>15,767</text:p>
          </table:table-cell>
          <table:table-cell table:style-name="ce26N2" office:value-type="float" office:value="552472.09">
            <text:p>552472,09</text:p>
          </table:table-cell>
          <table:table-cell table:style-name="ce26N2" office:value-type="float" office:value="564035.08">
            <text:p>564035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8456.68">
            <text:p>468456,68</text:p>
          </table:table-cell>
          <table:table-cell table:style-name="ce26N2" office:value-type="float" office:value="468.46">
            <text:p>468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216.1">
            <text:p>4216,1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623.82">
            <text:p>3623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2.08">
            <text:p>82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6" meta:object-count="0"/>
    <meta:generator>LibreOffice/4.3.0.4$Windows_x86 LibreOffice_project/62ad5818884a2fc2e5780dd45466868d41009ec0</meta:generator>
  </office:meta>
</office:document-meta>
</file>