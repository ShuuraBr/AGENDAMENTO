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4">
            <text:p>311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4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1.39">
            <text:p>14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244">
            <text:p>0,018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6.4">
            <text:p>1126,40</text:p>
          </table:table-cell>
          <table:table-cell table:style-name="ce12N2" office:value-type="float" office:value="1.13">
            <text:p>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86.75">
            <text:p>86,75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93.42">
            <text:p>9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452148421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5">
            <text:p>3111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3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.32">
            <text:p>642,32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53.27">
            <text:p>5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3861273804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1">
            <text:p>31116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81">
            <text:p>52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8278">
            <text:p>0,458</text:p>
          </table:table-cell>
          <table:table-cell table:style-name="ce12N2" office:value-type="float" office:value="15.72">
            <text:p>1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1.28">
            <text:p>4331,28</text:p>
          </table:table-cell>
          <table:table-cell table:style-name="ce12N2" office:value-type="float" office:value="4.33">
            <text:p>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98">
            <text:p>38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3.17">
            <text:p>323,17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198.87">
            <text:p>1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3104214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3">
            <text:p>31117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43.97">
            <text:p>347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448">
            <text:p>0,404</text:p>
          </table:table-cell>
          <table:table-cell table:style-name="ce12N2" office:value-type="float" office:value="700.5">
            <text:p>70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7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15.58">
            <text:p>28415,58</text:p>
          </table:table-cell>
          <table:table-cell table:style-name="ce12N2" office:value-type="float" office:value="28.42">
            <text:p>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74">
            <text:p>255,74</text:p>
          </table:table-cell>
          <table:table-cell table:style-name="ce12N2" office:value-type="float" office:value="72.24">
            <text:p>72,2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127.37">
            <text:p>2127,37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1304.66">
            <text:p>130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81841386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5">
            <text:p>3111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6.36">
            <text:p>19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3.28">
            <text:p>1513,28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2">
            <text:p>13,6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71272938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3">
            <text:p>3112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1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5.68">
            <text:p>341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84">
            <text:p>0,118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24">
            <text:p>2798,24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8">
            <text:p>25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232.09">
            <text:p>2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145112987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7">
            <text:p>31125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8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83.34">
            <text:p>2908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2">
            <text:p>0,006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08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49">
            <text:p>238,49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83.7">
            <text:p>2583,7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1854.97">
            <text:p>185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1">
            <text:p>58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44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7/2026</text:p>
          </table:table-cell>
          <table:table-cell table:style-name="ce12" office:value-type="string" calcext:value-type="string">
            <text:p>587,1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5260758329608000144550010002680661002680670</text:p>
          </table:table-cell>
          <table:table-cell table:style-name="ce0" office:value-type="string" calcext:value-type="string">
            <text:p>3526071138956500020057005000403445100089943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3">
            <text:p>311263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54.12">
            <text:p>12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5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0.63">
            <text:p>1160,63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1.52">
            <text:p>81,52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93.49">
            <text:p>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814590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4">
            <text:p>31126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59.73">
            <text:p>1835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98.34">
            <text:p>198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5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75">
            <text:p>14625,75</text:p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2">
            <text:p>131,62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30.11">
            <text:p>1030,11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1213.05">
            <text:p>121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71114393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1">
            <text:p>311271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26.64">
            <text:p>1192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92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1.63">
            <text:p>10051,63</text:p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6">
            <text:p>90,46</text:p>
          </table:table-cell>
          <table:table-cell table:style-name="ce12N2" office:value-type="float" office:value="100">
            <text:p>10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59.54">
            <text:p>1059,54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434.68">
            <text:p>4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61554350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5">
            <text:p>311275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.79">
            <text:p>25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2.73">
            <text:p>22,73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7140506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9">
            <text:p>31130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24.51">
            <text:p>3912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6088">
            <text:p>3,061</text:p>
          </table:table-cell>
          <table:table-cell table:style-name="ce12N2" office:value-type="float" office:value="595.1">
            <text:p>59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12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40.81">
            <text:p>32840,81</text:p>
          </table:table-cell>
          <table:table-cell table:style-name="ce12N2" office:value-type="float" office:value="32.84">
            <text:p>3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56">
            <text:p>295,5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28.44">
            <text:p>1428,44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1507.84">
            <text:p>150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41066129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3">
            <text:p>31133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6.0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7">
            <text:p>0,16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7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8.87">
            <text:p>38638,87</text:p>
          </table:table-cell>
          <table:table-cell table:style-name="ce12N2" office:value-type="float" office:value="38.64">
            <text:p>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.75">
            <text:p>347,75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3204.74">
            <text:p>32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60231560625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6">
            <text:p>3113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761">
            <text:p>0,228</text:p>
          </table:table-cell>
          <table:table-cell table:style-name="ce12N2" office:value-type="float" office:value="94.12">
            <text:p>9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83">
            <text:p>1123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93.21">
            <text:p>9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4144451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9">
            <text:p>3113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4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5.44">
            <text:p>1115,4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92.52">
            <text:p>9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4500125383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2">
            <text:p>31134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39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3.73">
            <text:p>13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0.68">
            <text:p>1150,68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6">
            <text:p>10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2.93">
            <text:p>42,93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52.83">
            <text:p>5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393136646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9">
            <text:p>3113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.74">
            <text:p>17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">
            <text:p>0,02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4.1">
            <text:p>1494,10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5">
            <text:p>13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55.74">
            <text:p>55,74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68.6">
            <text:p>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51674666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0">
            <text:p>3113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.91">
            <text:p>98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.52">
            <text:p>828,5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6">
            <text:p>7,4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0.91">
            <text:p>30,91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38.04">
            <text:p>3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61940277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5">
            <text:p>311355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889">
            <text:p>5,689</text:p>
          </table:table-cell>
          <table:table-cell table:style-name="ce12N2" office:value-type="float" office:value="3959.37">
            <text:p>3959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62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31.94">
            <text:p>27531,94</text:p>
          </table:table-cell>
          <table:table-cell table:style-name="ce12N2" office:value-type="float" office:value="27.53">
            <text:p>2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78">
            <text:p>247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2283.52">
            <text:p>22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7110637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7">
            <text:p>311387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08.30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36.4">
            <text:p>404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9922.26">
            <text:p>3992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01744">
            <text:p>1,4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4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93.38">
            <text:p>33693,38</text:p>
          </table:table-cell>
          <table:table-cell table:style-name="ce12N2" office:value-type="float" office:value="33.73">
            <text:p>3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.26">
            <text:p>303,26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514.14">
            <text:p>514,14</text:p>
          </table:table-cell>
          <table:table-cell table:style-name="ce12N2" office:value-type="float" office:value="39922.26">
            <text:p>39922,26</text:p>
          </table:table-cell>
          <table:table-cell table:style-name="ce12N2" office:value-type="float" office:value="2794.57">
            <text:p>279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83081716442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8">
            <text:p>311388</text:p>
          </table:table-cell>
          <table:table-cell table:style-name="ce0" table:number-columns-spanned="4" table:number-rows-spanned="1" office:value-type="string" calcext:value-type="string">
            <text:p>39.290 - MOR DISTRIBUIDORA LTDA.</text:p>
          </table:table-cell>
          <table:covered-table-cell table:number-columns-repeated="3"/>
          <table:table-cell table:style-name="ce0" office:value-type="string" calcext:value-type="string">
            <text:p>247.86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4.32">
            <text:p>51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669.08">
            <text:p>466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8.7">
            <text:p>4318,70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7">
            <text:p>38,87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455.24">
            <text:p>455,24</text:p>
          </table:table-cell>
          <table:table-cell table:style-name="ce12N2" office:value-type="float" office:value="4669.08">
            <text:p>4669,08</text:p>
          </table:table-cell>
          <table:table-cell table:style-name="ce12N2" office:value-type="float" office:value="186.77">
            <text:p>18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7722274000133550050002478631400127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6">
            <text:p>31139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4.1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2.9">
            <text:p>59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558.6">
            <text:p>555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42.73">
            <text:p>4842,73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8">
            <text:p>43,5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384.3">
            <text:p>384,30</text:p>
          </table:table-cell>
          <table:table-cell table:style-name="ce12N2" office:value-type="float" office:value="5558.6">
            <text:p>5558,60</text:p>
          </table:table-cell>
          <table:table-cell table:style-name="ce12N2" office:value-type="float" office:value="222.34">
            <text:p>22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4146137095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7">
            <text:p>311397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.35">
            <text:p>7344,35</text:p>
          </table:table-cell>
          <table:table-cell table:style-name="ce12N2" office:value-type="float" office:value="7.34">
            <text:p>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573.74">
            <text:p>57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9221502977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8">
            <text:p>31139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9">
            <text:p>167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961.93">
            <text:p>15961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9816">
            <text:p>0,310</text:p>
          </table:table-cell>
          <table:table-cell table:style-name="ce12N2" office:value-type="float" office:value="137.49">
            <text:p>13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8.98">
            <text:p>13708,98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38">
            <text:p>1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67.07">
            <text:p>767,07</text:p>
          </table:table-cell>
          <table:table-cell table:style-name="ce12N2" office:value-type="float" office:value="15961.93">
            <text:p>15961,93</text:p>
          </table:table-cell>
          <table:table-cell table:style-name="ce12N2" office:value-type="float" office:value="806.32">
            <text:p>8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3541086409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2">
            <text:p>311422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10.24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9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67.5">
            <text:p>17467,50</text:p>
          </table:table-cell>
          <table:table-cell table:style-name="ce12N2" office:value-type="float" office:value="17.47">
            <text:p>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.21">
            <text:p>157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1448.77">
            <text:p>144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102481337114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3">
            <text:p>311423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10.24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0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51.53">
            <text:p>6251,53</text:p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26">
            <text:p>56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518.51">
            <text:p>51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102491376054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7">
            <text:p>31143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8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5.62">
            <text:p>450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2">
            <text:p>0,006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0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95">
            <text:p>36,95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400.26">
            <text:p>400,26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287.37">
            <text:p>2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8895100268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4">
            <text:p>4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1.01">
            <text:p>1071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807.95">
            <text:p>15807,95</text:p>
          </table:table-cell>
          <table:table-cell table:style-name="ce26N2" office:value-type="float" office:value="697371.8">
            <text:p>697371,80</text:p>
          </table:table-cell>
          <table:table-cell table:style-name="ce26N2" office:value-type="float" office:value="44799.94">
            <text:p>44799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7.11">
            <text:p>587,11</text:p>
          </table:table-cell>
          <table:table-cell table:style-name="ce26N2" office:value-type="float" office:value="713108.23">
            <text:p>713108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.697839">
            <text:p>19,698</text:p>
          </table:table-cell>
          <table:table-cell table:style-name="ce26N2" office:value-type="float" office:value="696229.27">
            <text:p>696229,27</text:p>
          </table:table-cell>
          <table:table-cell table:style-name="ce26N2" office:value-type="float" office:value="713108.23">
            <text:p>713108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9579.71">
            <text:p>599579,71</text:p>
          </table:table-cell>
          <table:table-cell table:style-name="ce26N2" office:value-type="float" office:value="599.58">
            <text:p>599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96.17">
            <text:p>5396,1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677.85">
            <text:p>8677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.84">
            <text:p>68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66" meta:object-count="0"/>
    <meta:generator>LibreOffice/4.3.0.4$Windows_x86 LibreOffice_project/62ad5818884a2fc2e5780dd45466868d41009ec0</meta:generator>
  </office:meta>
</office:document-meta>
</file>