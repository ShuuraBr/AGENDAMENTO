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1/07/2026 04:30:2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8">
            <text:p>3107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21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0044">
            <text:p>0,160</text:p>
          </table:table-cell>
          <table:table-cell table:style-name="ce12N2" office:value-type="float" office:value="743.9">
            <text:p>7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51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9.26">
            <text:p>11859,26</text:p>
          </table:table-cell>
          <table:table-cell table:style-name="ce12N2" office:value-type="float" office:value="11.85">
            <text:p>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72">
            <text:p>106,7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983.61">
            <text:p>9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21185405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2">
            <text:p>31081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2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9.2">
            <text:p>70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944">
            <text:p>0,510</text:p>
          </table:table-cell>
          <table:table-cell table:style-name="ce12N2" office:value-type="float" office:value="53.14">
            <text:p>5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5.39">
            <text:p>5955,39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81">
            <text:p>42,81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493.95">
            <text:p>4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9641520000158550010007724671738065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8">
            <text:p>310928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9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34">
            <text:p>49,3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87.15">
            <text:p>487,15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199.85">
            <text:p>19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90481412101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9">
            <text:p>31092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50.8">
            <text:p>2305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732">
            <text:p>0,135</text:p>
          </table:table-cell>
          <table:table-cell table:style-name="ce12N2" office:value-type="float" office:value="29.26">
            <text:p>2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05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16.99">
            <text:p>18316,99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87">
            <text:p>164,87</text:p>
          </table:table-cell>
          <table:table-cell table:style-name="ce12N2" office:value-type="float" office:value="80.08">
            <text:p>80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25.78">
            <text:p>2025,78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841.01">
            <text:p>84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5910578772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2">
            <text:p>310932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57.99">
            <text:p>62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E-5">
            <text:p>0,00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31">
            <text:p>5431,00</text:p>
          </table:table-cell>
          <table:table-cell table:style-name="ce12N2" office:value-type="float" office:value="5.43">
            <text:p>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87">
            <text:p>48,8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6.99">
            <text:p>196,99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424.27">
            <text:p>4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4171419170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7">
            <text:p>3109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.99">
            <text:p>1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3">
            <text:p>0,001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5.86">
            <text:p>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312945343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6">
            <text:p>310996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55.9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54.17">
            <text:p>2495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2173">
            <text:p>2,922</text:p>
          </table:table-cell>
          <table:table-cell table:style-name="ce12N2" office:value-type="float" office:value="793.84">
            <text:p>79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5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27.77">
            <text:p>20527,77</text:p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76">
            <text:p>184,76</text:p>
          </table:table-cell>
          <table:table-cell table:style-name="ce12N2" office:value-type="float" office:value="63.33">
            <text:p>63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31.45">
            <text:p>631,45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1702.59">
            <text:p>17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763720000171550050012559771578262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2">
            <text:p>31100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1.3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5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10.5">
            <text:p>72210,50</text:p>
          </table:table-cell>
          <table:table-cell table:style-name="ce12N2" office:value-type="float" office:value="72.21">
            <text:p>7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9.89">
            <text:p>649,89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5989.2">
            <text:p>59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1313101963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5">
            <text:p>31100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803.4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1.92">
            <text:p>9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69.28">
            <text:p>7869,28</text:p>
          </table:table-cell>
          <table:table-cell table:style-name="ce12N2" office:value-type="float" office:value="505.39">
            <text:p>505,39</text:p>
          </table:table-cell>
          <table:table-cell table:style-name="ce12N3" office:value-type="float" office:value="8E-6">
            <text:p>0,0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6.01">
            <text:p>7296,01</text:p>
          </table:table-cell>
          <table:table-cell table:style-name="ce12N2" office:value-type="float" office:value="7.3">
            <text:p>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6">
            <text:p>65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67.25">
            <text:p>767,25</text:p>
          </table:table-cell>
          <table:table-cell table:style-name="ce12N2" office:value-type="float" office:value="8374.67">
            <text:p>8374,67</text:p>
          </table:table-cell>
          <table:table-cell table:style-name="ce12N2" office:value-type="float" office:value="334.99">
            <text:p>33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803488160619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6">
            <text:p>31100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91.62">
            <text:p>9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26.96">
            <text:p>7926,96</text:p>
          </table:table-cell>
          <table:table-cell table:style-name="ce12N2" office:value-type="float" office:value="475.62">
            <text:p>475,62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3.29">
            <text:p>3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77.14">
            <text:p>7777,14</text:p>
          </table:table-cell>
          <table:table-cell table:style-name="ce12N2" office:value-type="float" office:value="7.78">
            <text:p>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99">
            <text:p>69,99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189.04">
            <text:p>1189,04</text:p>
          </table:table-cell>
          <table:table-cell table:style-name="ce12N2" office:value-type="float" office:value="8402.58">
            <text:p>8402,58</text:p>
          </table:table-cell>
          <table:table-cell table:style-name="ce12N2" office:value-type="float" office:value="336.1">
            <text:p>33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89541535925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8">
            <text:p>311018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5.35">
            <text:p>2715,35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3">
            <text:p>24,4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212.09">
            <text:p>2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806185346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0">
            <text:p>31103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6.0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0.96">
            <text:p>319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12">
            <text:p>0,001</text:p>
          </table:table-cell>
          <table:table-cell table:style-name="ce12N2" office:value-type="float" office:value="0.26">
            <text:p>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9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1.51">
            <text:p>2611,51</text:p>
          </table:table-cell>
          <table:table-cell table:style-name="ce12N2" office:value-type="float" office:value="2.61">
            <text:p>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5">
            <text:p>23,50</text:p>
          </table:table-cell>
          <table:table-cell table:style-name="ce12N2" office:value-type="float" office:value="41.15">
            <text:p>4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93.36">
            <text:p>193,36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119.91">
            <text:p>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6030174778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1">
            <text:p>311031</text:p>
          </table:table-cell>
          <table:table-cell table:style-name="ce0" table:number-columns-spanned="4" table:number-rows-spanned="1" office:value-type="string" calcext:value-type="string">
            <text:p>9.588 - STARLUX COMERCIO E REPRESENTACOES LTDA</text:p>
          </table:table-cell>
          <table:covered-table-cell table:number-columns-repeated="3"/>
          <table:table-cell table:style-name="ce0" office:value-type="string" calcext:value-type="string">
            <text:p>28.8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83">
            <text:p>227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0">
            <text:p>1980,00</text:p>
          </table:table-cell>
          <table:table-cell table:style-name="ce12N2" office:value-type="float" office:value="90">
            <text:p>9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1.64">
            <text:p>1911,64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">
            <text:p>17,20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201.83">
            <text:p>201,83</text:p>
          </table:table-cell>
          <table:table-cell table:style-name="ce12N2" office:value-type="float" office:value="2070">
            <text:p>2070,00</text:p>
          </table:table-cell>
          <table:table-cell table:style-name="ce12N2" office:value-type="float" office:value="82.8">
            <text:p>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8870880001785500300002889111615433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8">
            <text:p>3110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68">
            <text:p>0,058</text:p>
          </table:table-cell>
          <table:table-cell table:style-name="ce12N2" office:value-type="float" office:value="12.14">
            <text:p>1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0.36">
            <text:p>2120,36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8">
            <text:p>19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175.87">
            <text:p>1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75106233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9">
            <text:p>31103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8.64">
            <text:p>821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266">
            <text:p>0,28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3.9">
            <text:p>6823,90</text:p>
          </table:table-cell>
          <table:table-cell table:style-name="ce12N2" office:value-type="float" office:value="6.82">
            <text:p>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62.55">
            <text:p>62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565.98">
            <text:p>56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631135082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4">
            <text:p>3110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82.27">
            <text:p>66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42.25">
            <text:p>6242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3696">
            <text:p>1,737</text:p>
          </table:table-cell>
          <table:table-cell table:style-name="ce12N2" office:value-type="float" office:value="239.11">
            <text:p>239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8.29">
            <text:p>5268,29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40.02">
            <text:p>440,02</text:p>
          </table:table-cell>
          <table:table-cell table:style-name="ce12N2" office:value-type="float" office:value="6242.25">
            <text:p>6242,25</text:p>
          </table:table-cell>
          <table:table-cell table:style-name="ce12N2" office:value-type="float" office:value="436.97">
            <text:p>4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7159430000361550010000883201618135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2">
            <text:p>31107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3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4.9">
            <text:p>623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986.08">
            <text:p>598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">
            <text:p>0,206</text:p>
          </table:table-cell>
          <table:table-cell table:style-name="ce12N2" office:value-type="float" office:value="11.3">
            <text:p>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34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52.1">
            <text:p>5052,10</text:p>
          </table:table-cell>
          <table:table-cell table:style-name="ce12N2" office:value-type="float" office:value="5.05">
            <text:p>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47">
            <text:p>45,4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48.82">
            <text:p>248,82</text:p>
          </table:table-cell>
          <table:table-cell table:style-name="ce12N2" office:value-type="float" office:value="5986.08">
            <text:p>5986,08</text:p>
          </table:table-cell>
          <table:table-cell table:style-name="ce12N2" office:value-type="float" office:value="419.03">
            <text:p>41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715943000036155001000088321173101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4">
            <text:p>3110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4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1.39">
            <text:p>14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244">
            <text:p>0,018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6.4">
            <text:p>1126,40</text:p>
          </table:table-cell>
          <table:table-cell table:style-name="ce12N2" office:value-type="float" office:value="1.13">
            <text:p>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86.75">
            <text:p>86,75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93.42">
            <text:p>9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452148421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5">
            <text:p>3111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3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.32">
            <text:p>642,32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53.27">
            <text:p>5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3861273804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1">
            <text:p>31116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81">
            <text:p>529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971.64">
            <text:p>497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8278">
            <text:p>0,458</text:p>
          </table:table-cell>
          <table:table-cell table:style-name="ce12N2" office:value-type="float" office:value="15.72">
            <text:p>1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31.28">
            <text:p>4331,28</text:p>
          </table:table-cell>
          <table:table-cell table:style-name="ce12N2" office:value-type="float" office:value="4.33">
            <text:p>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98">
            <text:p>38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23.17">
            <text:p>323,17</text:p>
          </table:table-cell>
          <table:table-cell table:style-name="ce12N2" office:value-type="float" office:value="4971.64">
            <text:p>4971,64</text:p>
          </table:table-cell>
          <table:table-cell table:style-name="ce12N2" office:value-type="float" office:value="198.87">
            <text:p>1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3104214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3">
            <text:p>311173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43.97">
            <text:p>3474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2616.6">
            <text:p>3261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448">
            <text:p>0,404</text:p>
          </table:table-cell>
          <table:table-cell table:style-name="ce12N2" office:value-type="float" office:value="700.5">
            <text:p>70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74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15.58">
            <text:p>28415,58</text:p>
          </table:table-cell>
          <table:table-cell table:style-name="ce12N2" office:value-type="float" office:value="28.42">
            <text:p>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74">
            <text:p>255,74</text:p>
          </table:table-cell>
          <table:table-cell table:style-name="ce12N2" office:value-type="float" office:value="72.24">
            <text:p>72,2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127.37">
            <text:p>2127,37</text:p>
          </table:table-cell>
          <table:table-cell table:style-name="ce12N2" office:value-type="float" office:value="32616.6">
            <text:p>32616,60</text:p>
          </table:table-cell>
          <table:table-cell table:style-name="ce12N2" office:value-type="float" office:value="1304.66">
            <text:p>130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281841386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5">
            <text:p>3111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2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6.36">
            <text:p>19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7">
            <text:p>173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3.28">
            <text:p>1513,28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2">
            <text:p>13,6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1737">
            <text:p>1737,0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271272938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5">
            <text:p>3111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.87">
            <text:p>42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">
            <text:p>39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444">
            <text:p>0,008</text:p>
          </table:table-cell>
          <table:table-cell table:style-name="ce12N2" office:value-type="float" office:value="2.78">
            <text:p>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.74">
            <text:p>346,74</text:p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.87">
            <text:p>25,87</text:p>
          </table:table-cell>
          <table:table-cell table:style-name="ce12N2" office:value-type="float" office:value="398">
            <text:p>398,00</text:p>
          </table:table-cell>
          <table:table-cell table:style-name="ce12N2" office:value-type="float" office:value="15.92">
            <text:p>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31083799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4">
            <text:p>3111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37.6">
            <text:p>110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37.6">
            <text:p>110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97">
            <text:p>0,108</text:p>
          </table:table-cell>
          <table:table-cell table:style-name="ce12N2" office:value-type="float" office:value="13.5">
            <text:p>1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15.46">
            <text:p>9315,46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.84">
            <text:p>83,8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37.6">
            <text:p>11037,60</text:p>
          </table:table-cell>
          <table:table-cell table:style-name="ce12N2" office:value-type="float" office:value="772.63">
            <text:p>77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21674637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8">
            <text:p>3112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9.24">
            <text:p>109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2.15">
            <text:p>103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55">
            <text:p>0,011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9.2">
            <text:p>899,20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09">
            <text:p>8,0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67.09">
            <text:p>67,09</text:p>
          </table:table-cell>
          <table:table-cell table:style-name="ce12N2" office:value-type="float" office:value="1032.15">
            <text:p>1032,15</text:p>
          </table:table-cell>
          <table:table-cell table:style-name="ce12N2" office:value-type="float" office:value="41.29">
            <text:p>4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8172482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9">
            <text:p>31122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7.03">
            <text:p>182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15.52">
            <text:p>171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0236">
            <text:p>0,420</text:p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4.56">
            <text:p>1494,56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5">
            <text:p>13,4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1.51">
            <text:p>111,51</text:p>
          </table:table-cell>
          <table:table-cell table:style-name="ce12N2" office:value-type="float" office:value="1715.52">
            <text:p>1715,52</text:p>
          </table:table-cell>
          <table:table-cell table:style-name="ce12N2" office:value-type="float" office:value="68.62">
            <text:p>6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5311916887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3">
            <text:p>3112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1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5.68">
            <text:p>341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15.56">
            <text:p>331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84">
            <text:p>0,118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24">
            <text:p>2798,24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8">
            <text:p>25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3315.56">
            <text:p>3315,56</text:p>
          </table:table-cell>
          <table:table-cell table:style-name="ce12N2" office:value-type="float" office:value="232.09">
            <text:p>2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1451129875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2">
            <text:p>311252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">
            <text:p>31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5">
            <text:p>3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">
            <text:p>315,00</text:p>
          </table:table-cell>
          <table:table-cell table:style-name="ce12N2" office:value-type="float" office:value="12.6">
            <text:p>1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89361620849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7">
            <text:p>31125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8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83.34">
            <text:p>2908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2">
            <text:p>0,006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083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49">
            <text:p>238,49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83.7">
            <text:p>2583,70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1854.97">
            <text:p>185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7.11">
            <text:p>58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3.44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7/2026</text:p>
          </table:table-cell>
          <table:table-cell table:style-name="ce12" office:value-type="string" calcext:value-type="string">
            <text:p>587,1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5260758329608000144550010002680661002680670</text:p>
          </table:table-cell>
          <table:table-cell table:style-name="ce0" office:value-type="string" calcext:value-type="string">
            <text:p>3526071138956500020057005000403445100089943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0">
            <text:p>311260</text:p>
          </table:table-cell>
          <table:table-cell table:style-name="ce0" table:number-columns-spanned="4" table:number-rows-spanned="1" office:value-type="string" calcext:value-type="string">
            <text:p>31.410 - SAN HO COMERCIO IMPORTACAO E EXPORTACAO LTDA</text:p>
          </table:table-cell>
          <table:covered-table-cell table:number-columns-repeated="3"/>
          <table:table-cell table:style-name="ce0" office:value-type="string" calcext:value-type="string">
            <text:p>88.4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31.38">
            <text:p>853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8116.3">
            <text:p>811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5752">
            <text:p>0,116</text:p>
          </table:table-cell>
          <table:table-cell table:style-name="ce12N2" office:value-type="float" office:value="196.82">
            <text:p>19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3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07.23">
            <text:p>7507,23</text:p>
          </table:table-cell>
          <table:table-cell table:style-name="ce12N2" office:value-type="float" office:value="7.5">
            <text:p>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57">
            <text:p>67,5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15.08">
            <text:p>415,08</text:p>
          </table:table-cell>
          <table:table-cell table:style-name="ce12N2" office:value-type="float" office:value="8116.3">
            <text:p>8116,30</text:p>
          </table:table-cell>
          <table:table-cell table:style-name="ce12N2" office:value-type="float" office:value="324.66">
            <text:p>32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0.06">
            <text:p>23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97.587</text:p>
          </table:table-cell>
          <table:table-cell table:style-name="ce0" office:value-type="string" calcext:value-type="string">
            <text:p>30.965 - RTL ENCOMENDAS E CARGAS LTDA</text:p>
          </table:table-cell>
          <table:table-cell table:style-name="ce0" office:value-type="string" calcext:value-type="string">
            <text:p>17/07/2026</text:p>
          </table:table-cell>
          <table:table-cell table:style-name="ce12" office:value-type="string" calcext:value-type="string">
            <text:p>230,0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52260717328359000195550010000884271251082881</text:p>
          </table:table-cell>
          <table:table-cell table:style-name="ce0" office:value-type="string" calcext:value-type="string">
            <text:p>522607316075980001055700100009758710007293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3">
            <text:p>311263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5.64">
            <text:p>133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54.12">
            <text:p>12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5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0.63">
            <text:p>1160,63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1.52">
            <text:p>81,52</text:p>
          </table:table-cell>
          <table:table-cell table:style-name="ce12N2" office:value-type="float" office:value="1335.64">
            <text:p>1335,64</text:p>
          </table:table-cell>
          <table:table-cell table:style-name="ce12N2" office:value-type="float" office:value="93.49">
            <text:p>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814590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4">
            <text:p>31126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59.73">
            <text:p>1835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7329.62">
            <text:p>173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98.34">
            <text:p>198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59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75">
            <text:p>14625,75</text:p>
          </table:table-cell>
          <table:table-cell table:style-name="ce12N2" office:value-type="float" office:value="14.64">
            <text:p>1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2">
            <text:p>131,62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30.11">
            <text:p>1030,11</text:p>
          </table:table-cell>
          <table:table-cell table:style-name="ce12N2" office:value-type="float" office:value="17329.62">
            <text:p>17329,62</text:p>
          </table:table-cell>
          <table:table-cell table:style-name="ce12N2" office:value-type="float" office:value="1213.05">
            <text:p>121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71114393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1">
            <text:p>311271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7.5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26.64">
            <text:p>1192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867.1">
            <text:p>1086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92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51.63">
            <text:p>10051,63</text:p>
          </table:table-cell>
          <table:table-cell table:style-name="ce12N2" office:value-type="float" office:value="10.05">
            <text:p>1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6">
            <text:p>90,46</text:p>
          </table:table-cell>
          <table:table-cell table:style-name="ce12N2" office:value-type="float" office:value="100">
            <text:p>10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59.54">
            <text:p>1059,54</text:p>
          </table:table-cell>
          <table:table-cell table:style-name="ce12N2" office:value-type="float" office:value="10867.1">
            <text:p>10867,10</text:p>
          </table:table-cell>
          <table:table-cell table:style-name="ce12N2" office:value-type="float" office:value="434.68">
            <text:p>43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20913240002045500300000756615543504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5">
            <text:p>311275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7.56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.79">
            <text:p>25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3.06">
            <text:p>2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2.73">
            <text:p>22,73</text:p>
          </table:table-cell>
          <table:table-cell table:style-name="ce12N2" office:value-type="float" office:value="233.06">
            <text:p>233,06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2091324000204550030000075671405064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3">
            <text:p>4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71.01">
            <text:p>1071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513.4">
            <text:p>21513,40</text:p>
          </table:table-cell>
          <table:table-cell table:style-name="ce26N2" office:value-type="float" office:value="687176">
            <text:p>687176,00</text:p>
          </table:table-cell>
          <table:table-cell table:style-name="ce26N2" office:value-type="float" office:value="44565.54">
            <text:p>44565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17.17">
            <text:p>817,17</text:p>
          </table:table-cell>
          <table:table-cell table:style-name="ce26N2" office:value-type="float" office:value="708617.88">
            <text:p>708617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8.598724">
            <text:p>18,599</text:p>
          </table:table-cell>
          <table:table-cell table:style-name="ce26N2" office:value-type="float" office:value="686033.47">
            <text:p>686033,47</text:p>
          </table:table-cell>
          <table:table-cell table:style-name="ce26N2" office:value-type="float" office:value="708617.88">
            <text:p>708617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1696.21">
            <text:p>591696,21</text:p>
          </table:table-cell>
          <table:table-cell table:style-name="ce26N2" office:value-type="float" office:value="591.71">
            <text:p>591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325.19">
            <text:p>5325,1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208.5">
            <text:p>6208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6.36">
            <text:p>76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00" meta:object-count="0"/>
    <meta:generator>LibreOffice/4.3.0.4$Windows_x86 LibreOffice_project/62ad5818884a2fc2e5780dd45466868d41009ec0</meta:generator>
  </office:meta>
</office:document-meta>
</file>