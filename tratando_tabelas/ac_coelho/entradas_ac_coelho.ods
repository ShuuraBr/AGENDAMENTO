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6/05/2026 07:54:5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1">
            <text:p>306401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6.42">
            <text:p>970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0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862.3">
            <text:p>862,3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601541002601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19">
            <text:p>3065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3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0.34">
            <text:p>963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2">
            <text:p>0,121</text:p>
          </table:table-cell>
          <table:table-cell table:style-name="ce12N2" office:value-type="float" office:value="84.02">
            <text:p>8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2.54">
            <text:p>802,54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617.95">
            <text:p>61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317177295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1">
            <text:p>3065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87">
            <text:p>247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">
            <text:p>0,09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167.72">
            <text:p>16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35167670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9">
            <text:p>30652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2.43">
            <text:p>322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218.47">
            <text:p>21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4012933423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3">
            <text:p>30657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68.42">
            <text:p>196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342">
            <text:p>12,434</text:p>
          </table:table-cell>
          <table:table-cell table:style-name="ce12N2" office:value-type="float" office:value="1442.54">
            <text:p>144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6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65.88">
            <text:p>1465,88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1274.17">
            <text:p>127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460108885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4">
            <text:p>30657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28">
            <text:p>0,037</text:p>
          </table:table-cell>
          <table:table-cell table:style-name="ce12N2" office:value-type="float" office:value="10.46">
            <text:p>10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99.23">
            <text:p>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4.92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30/04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5260413576045000150550010000052791001826910</text:p>
          </table:table-cell>
          <table:table-cell table:style-name="ce0" office:value-type="string" calcext:value-type="string">
            <text:p>3526040522209200076357002000474922100647818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6">
            <text:p>30657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23.2">
            <text:p>952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75365">
            <text:p>0,775</text:p>
          </table:table-cell>
          <table:table-cell table:style-name="ce12N2" office:value-type="float" office:value="149.8">
            <text:p>14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2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46.05">
            <text:p>846,05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347.09">
            <text:p>34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505311315725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8">
            <text:p>306578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1.8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3754">
            <text:p>0,904</text:p>
          </table:table-cell>
          <table:table-cell table:style-name="ce12N2" office:value-type="float" office:value="1285.52">
            <text:p>1285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380.85">
            <text:p>3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555440001845500100024183013302239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8">
            <text:p>30671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4.17">
            <text:p>1326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026">
            <text:p>1,050</text:p>
          </table:table-cell>
          <table:table-cell table:style-name="ce12N2" office:value-type="float" office:value="92.08">
            <text:p>9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08.97">
            <text:p>908,97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864.86">
            <text:p>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2414056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4">
            <text:p>306754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41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6.37">
            <text:p>780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">
            <text:p>0,003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06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2">
            <text:p>57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97.87">
            <text:p>697,87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284.34">
            <text:p>2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4151168111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87">
            <text:p>87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257.16">
            <text:p>20257,16</text:p>
          </table:table-cell>
          <table:table-cell table:style-name="ce26N2" office:value-type="float" office:value="530290">
            <text:p>530290,00</text:p>
          </table:table-cell>
          <table:table-cell table:style-name="ce26N2" office:value-type="float" office:value="34488.42">
            <text:p>34488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.43">
            <text:p>107,43</text:p>
          </table:table-cell>
          <table:table-cell table:style-name="ce26N2" office:value-type="float" office:value="582772.57">
            <text:p>582772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0.343771">
            <text:p>40,344</text:p>
          </table:table-cell>
          <table:table-cell table:style-name="ce26N2" office:value-type="float" office:value="562575.51">
            <text:p>562575,51</text:p>
          </table:table-cell>
          <table:table-cell table:style-name="ce26N2" office:value-type="float" office:value="582772.57">
            <text:p>582772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378.94">
            <text:p>7378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43">
            <text:p>49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4" meta:object-count="0"/>
    <meta:generator>LibreOffice/4.3.0.4$Windows_x86 LibreOffice_project/62ad5818884a2fc2e5780dd45466868d41009ec0</meta:generator>
  </office:meta>
</office:document-meta>
</file>