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15/06/2026 07:37:42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8062">
            <text:p>3080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17.47">
            <text:p>9517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1862">
            <text:p>0,042</text:p>
          </table:table-cell>
          <table:table-cell table:style-name="ce12N2" office:value-type="float" office:value="13.64">
            <text:p>13,6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17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5/2026</text:p>
          </table:table-cell>
          <table:table-cell table:style-name="ce12N2" office:value-type="float" office:value="246.53">
            <text:p>246,53</text:p>
          </table:table-cell>
          <table:table-cell table:style-name="ce12N2" office:value-type="float" office:value="9270.94">
            <text:p>9270,94</text:p>
          </table:table-cell>
          <table:table-cell table:style-name="ce12N2" office:value-type="float" office:value="484.63">
            <text:p>48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339051000141550080006511331274472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08">
            <text:p>308308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501425519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76">
            <text:p>308376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89.2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2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313">
            <text:p>0,293</text:p>
          </table:table-cell>
          <table:table-cell table:style-name="ce12N2" office:value-type="float" office:value="411.88">
            <text:p>41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19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36.9">
            <text:p>6936,90</text:p>
          </table:table-cell>
          <table:table-cell table:style-name="ce12N2" office:value-type="float" office:value="6.93">
            <text:p>6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42">
            <text:p>62,42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19.32">
            <text:p>8219,32</text:p>
          </table:table-cell>
          <table:table-cell table:style-name="ce12N2" office:value-type="float" office:value="575.36">
            <text:p>57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75821546000102550030001892261066428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3">
            <text:p>30855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420.542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28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3.07">
            <text:p>49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3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5.44">
            <text:p>395,44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39.17">
            <text:p>39,17</text:p>
          </table:table-cell>
          <table:table-cell table:style-name="ce12N2" office:value-type="float" office:value="453.9">
            <text:p>453,90</text:p>
          </table:table-cell>
          <table:table-cell table:style-name="ce12N2" office:value-type="float" office:value="18.16">
            <text:p>1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5829010000014415501000042054215912804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4">
            <text:p>308554</text:p>
          </table:table-cell>
          <table:table-cell table:style-name="ce0" table:number-columns-spanned="4" table:number-rows-spanned="1" office:value-type="string" calcext:value-type="string">
            <text:p>785 - MEBER METAIS S/A</text:p>
          </table:table-cell>
          <table:covered-table-cell table:number-columns-repeated="3"/>
          <table:table-cell table:style-name="ce0" office:value-type="string" calcext:value-type="string">
            <text:p>318.685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348.91">
            <text:p>118348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36578">
            <text:p>3,366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8.348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268.57">
            <text:p>96268,57</text:p>
          </table:table-cell>
          <table:table-cell table:style-name="ce12N2" office:value-type="float" office:value="96.31">
            <text:p>9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6.39">
            <text:p>866,39</text:p>
          </table:table-cell>
          <table:table-cell table:style-name="ce12N2" office:value-type="float" office:value="82.72">
            <text:p>82,7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4283.18">
            <text:p>4283,18</text:p>
          </table:table-cell>
          <table:table-cell table:style-name="ce12N2" office:value-type="float" office:value="114065.73">
            <text:p>114065,73</text:p>
          </table:table-cell>
          <table:table-cell table:style-name="ce12N2" office:value-type="float" office:value="7984.65">
            <text:p>798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75479070001535500500031868513719871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56">
            <text:p>308556</text:p>
          </table:table-cell>
          <table:table-cell table:style-name="ce0" table:number-columns-spanned="4" table:number-rows-spanned="1" office:value-type="string" calcext:value-type="string">
            <text:p>19.264 - PAG EQUIPAMENTOS PARA PINTURAS LTDA</text:p>
          </table:table-cell>
          <table:covered-table-cell table:number-columns-repeated="3"/>
          <table:table-cell table:style-name="ce0" office:value-type="string" calcext:value-type="string">
            <text:p>8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2.65">
            <text:p>1129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0234.48">
            <text:p>10234,48</text:p>
          </table:table-cell>
          <table:table-cell table:style-name="ce12N2" office:value-type="float" office:value="500">
            <text:p>5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93.36">
            <text:p>9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618.69">
            <text:p>9618,69</text:p>
          </table:table-cell>
          <table:table-cell table:style-name="ce12N2" office:value-type="float" office:value="9.63">
            <text:p>9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.57">
            <text:p>86,57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558.17">
            <text:p>558,17</text:p>
          </table:table-cell>
          <table:table-cell table:style-name="ce12N2" office:value-type="float" office:value="10734.48">
            <text:p>10734,48</text:p>
          </table:table-cell>
          <table:table-cell table:style-name="ce12N2" office:value-type="float" office:value="751.42">
            <text:p>75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588581731000119550010000084661290605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81">
            <text:p>3085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7.77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6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0.26">
            <text:p>910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955">
            <text:p>0,023</text:p>
          </table:table-cell>
          <table:table-cell table:style-name="ce12N2" office:value-type="float" office:value="5.82">
            <text:p>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0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62.67">
            <text:p>7562,67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.07">
            <text:p>68,0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139.46">
            <text:p>139,46</text:p>
          </table:table-cell>
          <table:table-cell table:style-name="ce12N2" office:value-type="float" office:value="8960.8">
            <text:p>8960,80</text:p>
          </table:table-cell>
          <table:table-cell table:style-name="ce12N2" office:value-type="float" office:value="627.25">
            <text:p>627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77711228888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635">
            <text:p>308635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75.9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5677">
            <text:p>0,266</text:p>
          </table:table-cell>
          <table:table-cell table:style-name="ce12N2" office:value-type="float" office:value="169.83">
            <text:p>169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766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049.87">
            <text:p>15049,87</text:p>
          </table:table-cell>
          <table:table-cell table:style-name="ce12N2" office:value-type="float" office:value="15.06">
            <text:p>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5.43">
            <text:p>135,43</text:p>
          </table:table-cell>
          <table:table-cell table:style-name="ce12N2" office:value-type="float" office:value="38">
            <text:p>3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66.97">
            <text:p>17766,97</text:p>
          </table:table-cell>
          <table:table-cell table:style-name="ce12N2" office:value-type="float" office:value="1183.1">
            <text:p>11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611441500006785500100127595715053058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09">
            <text:p>30870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2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003.12">
            <text:p>19600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98224">
            <text:p>1,698</text:p>
          </table:table-cell>
          <table:table-cell table:style-name="ce12N2" office:value-type="float" office:value="3298.68">
            <text:p>329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6.00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5394.92">
            <text:p>165394,92</text:p>
          </table:table-cell>
          <table:table-cell table:style-name="ce12N2" office:value-type="float" office:value="165.4">
            <text:p>16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88.56">
            <text:p>1488,5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31.76">
            <text:p>31,76</text:p>
          </table:table-cell>
          <table:table-cell table:style-name="ce12N2" office:value-type="float" office:value="195971.36">
            <text:p>195971,36</text:p>
          </table:table-cell>
          <table:table-cell table:style-name="ce12N2" office:value-type="float" office:value="13717.99">
            <text:p>13717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0817616588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23">
            <text:p>308723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5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1/09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0505">
            <text:p>1,605</text:p>
          </table:table-cell>
          <table:table-cell table:style-name="ce12N2" office:value-type="float" office:value="5030.8">
            <text:p>503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628.79">
            <text:p>245628,79</text:p>
          </table:table-cell>
          <table:table-cell table:style-name="ce12N2" office:value-type="float" office:value="245.64">
            <text:p>24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0.66">
            <text:p>2210,66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38">
            <text:p>291038,00</text:p>
          </table:table-cell>
          <table:table-cell table:style-name="ce12N2" office:value-type="float" office:value="20372.66">
            <text:p>2037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141328200014355001002995239142188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6">
            <text:p>3087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6.15">
            <text:p>1576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5">
            <text:p>0,009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76,1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49.04">
            <text:p>1249,04</text:p>
          </table:table-cell>
          <table:table-cell table:style-name="ce12N2" office:value-type="float" office:value="1.25">
            <text:p>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24">
            <text:p>11,24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96.2">
            <text:p>96,20</text:p>
          </table:table-cell>
          <table:table-cell table:style-name="ce12N2" office:value-type="float" office:value="1479.95">
            <text:p>1479,95</text:p>
          </table:table-cell>
          <table:table-cell table:style-name="ce12N2" office:value-type="float" office:value="103.6">
            <text:p>10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1012312806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737">
            <text:p>3087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59.9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4/06/2026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78.61">
            <text:p>287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78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81.2">
            <text:p>2281,20</text:p>
          </table:table-cell>
          <table:table-cell table:style-name="ce12N2" office:value-type="float" office:value="2.28">
            <text:p>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53">
            <text:p>20,5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6/2026</text:p>
          </table:table-cell>
          <table:table-cell table:style-name="ce12N2" office:value-type="float" office:value="175.69">
            <text:p>175,69</text:p>
          </table:table-cell>
          <table:table-cell table:style-name="ce12N2" office:value-type="float" office:value="2702.92">
            <text:p>2702,92</text:p>
          </table:table-cell>
          <table:table-cell table:style-name="ce12N2" office:value-type="float" office:value="189.2">
            <text:p>18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5990411342156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38">
            <text:p>308838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3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.79">
            <text:p>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6.2">
            <text:p>6,20</text:p>
          </table:table-cell>
          <table:table-cell table:style-name="ce12N2" office:value-type="float" office:value="63.59">
            <text:p>63,59</text:p>
          </table:table-cell>
          <table:table-cell table:style-name="ce12N2" office:value-type="float" office:value="4.45">
            <text:p>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2077181000133550030002257871789661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47">
            <text:p>308847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8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9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695.43">
            <text:p>3695,43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25">
            <text:p>33,25</text:p>
          </table:table-cell>
          <table:table-cell table:style-name="ce12N2" office:value-type="float" office:value="52.87">
            <text:p>52,8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412.48">
            <text:p>412,48</text:p>
          </table:table-cell>
          <table:table-cell table:style-name="ce12N2" office:value-type="float" office:value="3282.95">
            <text:p>3282,95</text:p>
          </table:table-cell>
          <table:table-cell table:style-name="ce12N2" office:value-type="float" office:value="131.32">
            <text:p>13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6292449000002475500100006803611069193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55">
            <text:p>308855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201.1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5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73.56">
            <text:p>497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16.28">
            <text:p>4316,28</text:p>
          </table:table-cell>
          <table:table-cell table:style-name="ce12N2" office:value-type="float" office:value="4.31">
            <text:p>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.85">
            <text:p>38,85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156.56">
            <text:p>156,56</text:p>
          </table:table-cell>
          <table:table-cell table:style-name="ce12N2" office:value-type="float" office:value="4817">
            <text:p>4817,00</text:p>
          </table:table-cell>
          <table:table-cell table:style-name="ce12N2" office:value-type="float" office:value="337.19">
            <text:p>33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6771872600013555001000201141191984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886">
            <text:p>308886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22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8.3">
            <text:p>3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8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5.69">
            <text:p>335,69</text:p>
          </table:table-cell>
          <table:table-cell table:style-name="ce12N2" office:value-type="float" office:value="0.34">
            <text:p>0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02">
            <text:p>3,0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6/2026</text:p>
          </table:table-cell>
          <table:table-cell table:style-name="ce12N2" office:value-type="float" office:value="35.38">
            <text:p>35,38</text:p>
          </table:table-cell>
          <table:table-cell table:style-name="ce12N2" office:value-type="float" office:value="362.92">
            <text:p>362,92</text:p>
          </table:table-cell>
          <table:table-cell table:style-name="ce12N2" office:value-type="float" office:value="14.52">
            <text:p>1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105993420001235500200010522318170279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54">
            <text:p>30895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4.63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28.81">
            <text:p>492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773.67">
            <text:p>4773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94">
            <text:p>0,002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2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28.86">
            <text:p>4028,86</text:p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26">
            <text:p>36,26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155.14">
            <text:p>155,14</text:p>
          </table:table-cell>
          <table:table-cell table:style-name="ce12N2" office:value-type="float" office:value="4773.67">
            <text:p>4773,67</text:p>
          </table:table-cell>
          <table:table-cell table:style-name="ce12N2" office:value-type="float" office:value="334.16">
            <text:p>33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463413736374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978">
            <text:p>3089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5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9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75.98">
            <text:p>1175,9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.58">
            <text:p>10,5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3.38">
            <text:p>1393,38</text:p>
          </table:table-cell>
          <table:table-cell table:style-name="ce12N2" office:value-type="float" office:value="97.54">
            <text:p>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53419047482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17">
            <text:p>30901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34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8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531.18">
            <text:p>36531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0.02664">
            <text:p>20,027</text:p>
          </table:table-cell>
          <table:table-cell table:style-name="ce12N2" office:value-type="float" office:value="41.5">
            <text:p>4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.531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998.6">
            <text:p>28998,60</text:p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0.99">
            <text:p>260,99</text:p>
          </table:table-cell>
          <table:table-cell table:style-name="ce12N2" office:value-type="float" office:value="84.67">
            <text:p>84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245.37">
            <text:p>3245,37</text:p>
          </table:table-cell>
          <table:table-cell table:style-name="ce12N2" office:value-type="float" office:value="33285.81">
            <text:p>33285,81</text:p>
          </table:table-cell>
          <table:table-cell table:style-name="ce12N2" office:value-type="float" office:value="1331.43">
            <text:p>1331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3441574582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23">
            <text:p>3090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1.8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9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88">
            <text:p>0,028</text:p>
          </table:table-cell>
          <table:table-cell table:style-name="ce12N2" office:value-type="float" office:value="15.28">
            <text:p>15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0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87.8">
            <text:p>7687,80</text:p>
          </table:table-cell>
          <table:table-cell table:style-name="ce12N2" office:value-type="float" office:value="7.69">
            <text:p>7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.19">
            <text:p>69,1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9">
            <text:p>9109,00</text:p>
          </table:table-cell>
          <table:table-cell table:style-name="ce12N2" office:value-type="float" office:value="637.63">
            <text:p>63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18041930196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36">
            <text:p>3090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2.8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5.87">
            <text:p>881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815.87">
            <text:p>8815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211">
            <text:p>0,038</text:p>
          </table:table-cell>
          <table:table-cell table:style-name="ce12N2" office:value-type="float" office:value="6.94">
            <text:p>6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40.36">
            <text:p>7440,36</text:p>
          </table:table-cell>
          <table:table-cell table:style-name="ce12N2" office:value-type="float" office:value="7.44">
            <text:p>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.96">
            <text:p>66,9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5.87">
            <text:p>8815,87</text:p>
          </table:table-cell>
          <table:table-cell table:style-name="ce12N2" office:value-type="float" office:value="617.11">
            <text:p>617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280312799879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41">
            <text:p>309041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7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16">
            <text:p>2123,1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25">
            <text:p>0,02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33.83">
            <text:p>2133,83</text:p>
          </table:table-cell>
          <table:table-cell table:style-name="ce12N2" office:value-type="float" office:value="2.13">
            <text:p>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167.17">
            <text:p>1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272542970001785500100001073611396994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3">
            <text:p>309053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324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44.14">
            <text:p>654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460.87">
            <text:p>646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6644">
            <text:p>0,397</text:p>
          </table:table-cell>
          <table:table-cell table:style-name="ce12N2" office:value-type="float" office:value="58.2">
            <text:p>58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4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52.83">
            <text:p>5452,83</text:p>
          </table:table-cell>
          <table:table-cell table:style-name="ce12N2" office:value-type="float" office:value="5.45">
            <text:p>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.07">
            <text:p>49,07</text:p>
          </table:table-cell>
          <table:table-cell table:style-name="ce12N2" office:value-type="float" office:value="62.65">
            <text:p>62,6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83.27">
            <text:p>83,27</text:p>
          </table:table-cell>
          <table:table-cell table:style-name="ce12N2" office:value-type="float" office:value="6460.87">
            <text:p>6460,87</text:p>
          </table:table-cell>
          <table:table-cell table:style-name="ce12N2" office:value-type="float" office:value="452.26">
            <text:p>452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09495280012325500100232437013327872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7">
            <text:p>309057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8.9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09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113.09">
            <text:p>2711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1992">
            <text:p>0,122</text:p>
          </table:table-cell>
          <table:table-cell table:style-name="ce12N2" office:value-type="float" office:value="46.8">
            <text:p>46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.113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250.24">
            <text:p>20250,24</text:p>
          </table:table-cell>
          <table:table-cell table:style-name="ce12N2" office:value-type="float" office:value="20.25">
            <text:p>2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2.25">
            <text:p>182,25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3119.21">
            <text:p>3119,21</text:p>
          </table:table-cell>
          <table:table-cell table:style-name="ce12N2" office:value-type="float" office:value="23993.88">
            <text:p>23993,88</text:p>
          </table:table-cell>
          <table:table-cell table:style-name="ce12N2" office:value-type="float" office:value="1679.57">
            <text:p>1679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435628590001055500100016892919916892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59">
            <text:p>30905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5.51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1344">
            <text:p>0,421</text:p>
          </table:table-cell>
          <table:table-cell table:style-name="ce12N2" office:value-type="float" office:value="57.02">
            <text:p>57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21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67.64">
            <text:p>3367,64</text:p>
          </table:table-cell>
          <table:table-cell table:style-name="ce12N2" office:value-type="float" office:value="3.37">
            <text:p>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3">
            <text:p>30,30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21.12">
            <text:p>3621,12</text:p>
          </table:table-cell>
          <table:table-cell table:style-name="ce12N2" office:value-type="float" office:value="253.48">
            <text:p>25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551013417034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65">
            <text:p>30906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85.2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87.98">
            <text:p>688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334">
            <text:p>633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17">
            <text:p>0,582</text:p>
          </table:table-cell>
          <table:table-cell table:style-name="ce12N2" office:value-type="float" office:value="50.7">
            <text:p>5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87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45.78">
            <text:p>5345,78</text:p>
          </table:table-cell>
          <table:table-cell table:style-name="ce12N2" office:value-type="float" office:value="5.35">
            <text:p>5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.11">
            <text:p>48,11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1/06/2026</text:p>
          </table:table-cell>
          <table:table-cell table:style-name="ce12N2" office:value-type="float" office:value="553.98">
            <text:p>553,98</text:p>
          </table:table-cell>
          <table:table-cell table:style-name="ce12N2" office:value-type="float" office:value="6334">
            <text:p>6334,00</text:p>
          </table:table-cell>
          <table:table-cell table:style-name="ce12N2" office:value-type="float" office:value="443.38">
            <text:p>44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05890658000300550030000852771397943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5">
            <text:p>30908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5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82">
            <text:p>0,006</text:p>
          </table:table-cell>
          <table:table-cell table:style-name="ce12N2" office:value-type="float" office:value="5.49">
            <text:p>5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74.62">
            <text:p>4074,62</text:p>
          </table:table-cell>
          <table:table-cell table:style-name="ce12N2" office:value-type="float" office:value="4.07">
            <text:p>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.67">
            <text:p>36,6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7.9">
            <text:p>4827,90</text:p>
          </table:table-cell>
          <table:table-cell table:style-name="ce12N2" office:value-type="float" office:value="337.95">
            <text:p>33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5211342735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086">
            <text:p>30908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3.6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86">
            <text:p>0,004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31.62">
            <text:p>1531,62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78">
            <text:p>13,7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4.78">
            <text:p>1814,78</text:p>
          </table:table-cell>
          <table:table-cell table:style-name="ce12N2" office:value-type="float" office:value="127.03">
            <text:p>12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360711187336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8">
            <text:p>30910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5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76.98">
            <text:p>2576,98</text:p>
          </table:table-cell>
          <table:table-cell table:style-name="ce12N2" office:value-type="float" office:value="2.58">
            <text:p>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.19">
            <text:p>23,19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53.38">
            <text:p>3053,38</text:p>
          </table:table-cell>
          <table:table-cell table:style-name="ce12N2" office:value-type="float" office:value="213.74">
            <text:p>21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11401821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09">
            <text:p>30910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83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6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710.75">
            <text:p>3710,75</text:p>
          </table:table-cell>
          <table:table-cell table:style-name="ce12N2" office:value-type="float" office:value="3.71">
            <text:p>3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.4">
            <text:p>33,40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96.75">
            <text:p>4396,75</text:p>
          </table:table-cell>
          <table:table-cell table:style-name="ce12N2" office:value-type="float" office:value="307.77">
            <text:p>30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3652230001545500200068397217425345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1">
            <text:p>309111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9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54.37">
            <text:p>1645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5541.87">
            <text:p>15541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673">
            <text:p>0,787</text:p>
          </table:table-cell>
          <table:table-cell table:style-name="ce12N2" office:value-type="float" office:value="75.23">
            <text:p>75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54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71.95">
            <text:p>13271,95</text:p>
          </table:table-cell>
          <table:table-cell table:style-name="ce12N2" office:value-type="float" office:value="13.27">
            <text:p>13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9.46">
            <text:p>119,46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912.5">
            <text:p>912,50</text:p>
          </table:table-cell>
          <table:table-cell table:style-name="ce12N2" office:value-type="float" office:value="13101.94">
            <text:p>13101,94</text:p>
          </table:table-cell>
          <table:table-cell table:style-name="ce12N2" office:value-type="float" office:value="917.13">
            <text:p>917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6071594300003615500100008795018357860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12">
            <text:p>3091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64.3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6">
            <text:p>0,098</text:p>
          </table:table-cell>
          <table:table-cell table:style-name="ce12N2" office:value-type="float" office:value="48.4">
            <text:p>4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9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26">
            <text:p>15526,00</text:p>
          </table:table-cell>
          <table:table-cell table:style-name="ce12N2" office:value-type="float" office:value="15.53">
            <text:p>1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73">
            <text:p>139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6">
            <text:p>18396,00</text:p>
          </table:table-cell>
          <table:table-cell table:style-name="ce12N2" office:value-type="float" office:value="1287.72">
            <text:p>1287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643341524918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27">
            <text:p>309127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4.61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24.13">
            <text:p>222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35">
            <text:p>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24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51.29">
            <text:p>1751,29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76">
            <text:p>15,76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213.93">
            <text:p>213,93</text:p>
          </table:table-cell>
          <table:table-cell table:style-name="ce12N2" office:value-type="float" office:value="2010.2">
            <text:p>2010,20</text:p>
          </table:table-cell>
          <table:table-cell table:style-name="ce12N2" office:value-type="float" office:value="80.41">
            <text:p>8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356353460001405500200011461316559418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130">
            <text:p>309130</text:p>
          </table:table-cell>
          <table:table-cell table:style-name="ce0" table:number-columns-spanned="4" table:number-rows-spanned="1" office:value-type="string" calcext:value-type="string">
            <text:p>10.343 - METALURGICA IL INDUSTRIA DE ILUMINACAO LTDA</text:p>
          </table:table-cell>
          <table:covered-table-cell table:number-columns-repeated="3"/>
          <table:table-cell table:style-name="ce0" office:value-type="string" calcext:value-type="string">
            <text:p>264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1/06/2026</text:p>
          </table:table-cell>
          <table:table-cell table:style-name="ce0" office:value-type="string" calcext:value-type="string">
            <text:p>12/06/2026</text:p>
          </table:table-cell>
          <table:table-cell table:style-name="ce0" office:value-type="string" calcext:value-type="string">
            <text:p>1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82.71">
            <text:p>338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8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3.08">
            <text:p>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74">
            <text:p>27,74</text:p>
          </table:table-cell>
          <table:table-cell table:style-name="ce12N2" office:value-type="float" office:value="57.33">
            <text:p>57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6/2026</text:p>
          </table:table-cell>
          <table:table-cell table:style-name="ce12N2" office:value-type="float" office:value="300.51">
            <text:p>300,51</text:p>
          </table:table-cell>
          <table:table-cell table:style-name="ce12N2" office:value-type="float" office:value="3082.2">
            <text:p>3082,20</text:p>
          </table:table-cell>
          <table:table-cell table:style-name="ce12N2" office:value-type="float" office:value="215.75">
            <text:p>21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8329608000144550010002646871002646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34">
            <text:p>3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65">
            <text:p>76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4764.69">
            <text:p>14764,69</text:p>
          </table:table-cell>
          <table:table-cell table:style-name="ce26N2" office:value-type="float" office:value="820049.74">
            <text:p>820049,74</text:p>
          </table:table-cell>
          <table:table-cell table:style-name="ce26N2" office:value-type="float" office:value="55996.73">
            <text:p>55996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37264.36">
            <text:p>837264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9.865253">
            <text:p>29,865</text:p>
          </table:table-cell>
          <table:table-cell table:style-name="ce26N2" office:value-type="float" office:value="821734.67">
            <text:p>821734,67</text:p>
          </table:table-cell>
          <table:table-cell table:style-name="ce26N2" office:value-type="float" office:value="837264.36">
            <text:p>837264,3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90140.82">
            <text:p>690140,82</text:p>
          </table:table-cell>
          <table:table-cell table:style-name="ce26N2" office:value-type="float" office:value="690.21">
            <text:p>690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211.19">
            <text:p>6211,19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105.87">
            <text:p>10105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7.89">
            <text:p>77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AC COELH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06" meta:object-count="0"/>
    <meta:generator>LibreOffice/4.3.0.4$Windows_x86 LibreOffice_project/62ad5818884a2fc2e5780dd45466868d41009ec0</meta:generator>
  </office:meta>
</office:document-meta>
</file>