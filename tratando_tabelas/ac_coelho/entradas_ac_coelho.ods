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0/07/2026 07:41:12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1">
            <text:p>310061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5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47.76">
            <text:p>13344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">
            <text:p>54,00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96138">
            <text:p>4,596</text:p>
          </table:table-cell>
          <table:table-cell table:style-name="ce12N2" office:value-type="float" office:value="1165.53">
            <text:p>1165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3.44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61.32">
            <text:p>108361,32</text:p>
          </table:table-cell>
          <table:table-cell table:style-name="ce12N2" office:value-type="float" office:value="108.37">
            <text:p>10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5.24">
            <text:p>975,24</text:p>
          </table:table-cell>
          <table:table-cell table:style-name="ce12N2" office:value-type="float" office:value="82.67">
            <text:p>82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053.68">
            <text:p>5053,68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8987.59">
            <text:p>898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5771102022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4">
            <text:p>3101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.72">
            <text:p>13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64">
            <text:p>0,06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.56">
            <text:p>1124,56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51.63">
            <text:p>5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41664822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3">
            <text:p>310203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5.85">
            <text:p>46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9.27">
            <text:p>3769,27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3">
            <text:p>33,93</text:p>
          </table:table-cell>
          <table:table-cell table:style-name="ce12N2" office:value-type="float" office:value="82.76">
            <text:p>82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9.72">
            <text:p>159,72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312.64">
            <text:p>31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6781651239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0">
            <text:p>31029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7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4.19">
            <text:p>884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">
            <text:p>2,3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4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8.29">
            <text:p>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6">
            <text:p>74,6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56.4">
            <text:p>556,4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408.96">
            <text:p>40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624251000151550010000471701000350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5">
            <text:p>310495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8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1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1.01">
            <text:p>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1">
            <text:p>9,11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31.98">
            <text:p>131,98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35.2">
            <text:p>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884012231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0">
            <text:p>31054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665">
            <text:p>1,487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44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920.21">
            <text:p>56920,21</text:p>
          </table:table-cell>
          <table:table-cell table:style-name="ce12N2" office:value-type="float" office:value="56.92">
            <text:p>5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2.28">
            <text:p>512,28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4721.01">
            <text:p>472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31754562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1">
            <text:p>31054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16.24">
            <text:p>167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3">
            <text:p>0,153</text:p>
          </table:table-cell>
          <table:table-cell table:style-name="ce12N2" office:value-type="float" office:value="57.2">
            <text:p>5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7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74.36">
            <text:p>13674,36</text:p>
          </table:table-cell>
          <table:table-cell table:style-name="ce12N2" office:value-type="float" office:value="13.67">
            <text:p>1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07">
            <text:p>123,07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020.24">
            <text:p>1020,24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627.84">
            <text:p>62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41209589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6">
            <text:p>3105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8.25">
            <text:p>62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5.94">
            <text:p>5465,94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19">
            <text:p>49,1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427">
            <text:p>4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21318931143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3">
            <text:p>3107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04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6.85">
            <text:p>110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4.35">
            <text:p>1004,35</text:p>
          </table:table-cell>
          <table:table-cell table:style-name="ce12N2" office:value-type="float" office:value="102.5">
            <text:p>102,50</text:p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7.65">
            <text:p>847,65</text:p>
          </table:table-cell>
          <table:table-cell table:style-name="ce12N2" office:value-type="float" office:value="0.85">
            <text:p>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3">
            <text:p>7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6.85">
            <text:p>1106,85</text:p>
          </table:table-cell>
          <table:table-cell table:style-name="ce12N2" office:value-type="float" office:value="77.48">
            <text:p>7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04015839266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8">
            <text:p>310798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921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0044">
            <text:p>0,160</text:p>
          </table:table-cell>
          <table:table-cell table:style-name="ce12N2" office:value-type="float" office:value="743.9">
            <text:p>7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051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9.26">
            <text:p>11859,26</text:p>
          </table:table-cell>
          <table:table-cell table:style-name="ce12N2" office:value-type="float" office:value="11.85">
            <text:p>1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.72">
            <text:p>106,7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983.61">
            <text:p>98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9211854050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2">
            <text:p>31081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2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99.2">
            <text:p>709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7056.39">
            <text:p>705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9944">
            <text:p>0,510</text:p>
          </table:table-cell>
          <table:table-cell table:style-name="ce12N2" office:value-type="float" office:value="53.14">
            <text:p>5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99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55.39">
            <text:p>5955,39</text:p>
          </table:table-cell>
          <table:table-cell table:style-name="ce12N2" office:value-type="float" office:value="5.96">
            <text:p>5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59">
            <text:p>53,59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.81">
            <text:p>42,81</text:p>
          </table:table-cell>
          <table:table-cell table:style-name="ce12N2" office:value-type="float" office:value="7056.39">
            <text:p>7056,39</text:p>
          </table:table-cell>
          <table:table-cell table:style-name="ce12N2" office:value-type="float" office:value="493.95">
            <text:p>49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96415200001585500100077246717380651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3">
            <text:p>3108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2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7.32">
            <text:p>161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17.32">
            <text:p>1617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216">
            <text:p>0,021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17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9">
            <text:p>1409,00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68">
            <text:p>12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7.32">
            <text:p>1617,32</text:p>
          </table:table-cell>
          <table:table-cell table:style-name="ce12N2" office:value-type="float" office:value="64.69">
            <text:p>6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2611777004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4">
            <text:p>310824</text:p>
          </table:table-cell>
          <table:table-cell table:style-name="ce0" table:number-columns-spanned="4" table:number-rows-spanned="1" office:value-type="string" calcext:value-type="string">
            <text:p>39.105 - ALLTAPE INDUSTRIA E COMERCIO DE FITAS ADESIVAS LTDA</text:p>
          </table:table-cell>
          <table:covered-table-cell table:number-columns-repeated="3"/>
          <table:table-cell table:style-name="ce0" office:value-type="string" calcext:value-type="string">
            <text:p>232.1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31.3">
            <text:p>733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505.48">
            <text:p>6505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31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90.46">
            <text:p>5490,46</text:p>
          </table:table-cell>
          <table:table-cell table:style-name="ce12N2" office:value-type="float" office:value="5.49">
            <text:p>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41">
            <text:p>49,41</text:p>
          </table:table-cell>
          <table:table-cell table:style-name="ce12N2" office:value-type="float" office:value="31.5">
            <text:p>3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25.82">
            <text:p>825,82</text:p>
          </table:table-cell>
          <table:table-cell table:style-name="ce12N2" office:value-type="float" office:value="6505.48">
            <text:p>6505,48</text:p>
          </table:table-cell>
          <table:table-cell table:style-name="ce12N2" office:value-type="float" office:value="455.38">
            <text:p>45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2502040001795500100023210013782493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8">
            <text:p>310928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9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83.5">
            <text:p>548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996.35">
            <text:p>4996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8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83.5">
            <text:p>5483,50</text:p>
          </table:table-cell>
          <table:table-cell table:style-name="ce12N2" office:value-type="float" office:value="5.48">
            <text:p>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34">
            <text:p>49,34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87.15">
            <text:p>487,15</text:p>
          </table:table-cell>
          <table:table-cell table:style-name="ce12N2" office:value-type="float" office:value="4996.35">
            <text:p>4996,35</text:p>
          </table:table-cell>
          <table:table-cell table:style-name="ce12N2" office:value-type="float" office:value="199.85">
            <text:p>19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90481412101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9">
            <text:p>31092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5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050.8">
            <text:p>2305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1025.02">
            <text:p>21025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732">
            <text:p>0,135</text:p>
          </table:table-cell>
          <table:table-cell table:style-name="ce12N2" office:value-type="float" office:value="29.26">
            <text:p>29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05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16.99">
            <text:p>18316,99</text:p>
          </table:table-cell>
          <table:table-cell table:style-name="ce12N2" office:value-type="float" office:value="18.32">
            <text:p>1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.87">
            <text:p>164,87</text:p>
          </table:table-cell>
          <table:table-cell table:style-name="ce12N2" office:value-type="float" office:value="80.08">
            <text:p>80,0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025.78">
            <text:p>2025,78</text:p>
          </table:table-cell>
          <table:table-cell table:style-name="ce12N2" office:value-type="float" office:value="21025.02">
            <text:p>21025,02</text:p>
          </table:table-cell>
          <table:table-cell table:style-name="ce12N2" office:value-type="float" office:value="841.01">
            <text:p>84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545910578772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2">
            <text:p>310932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4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57.99">
            <text:p>625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061">
            <text:p>606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E-5">
            <text:p>0,000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5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31">
            <text:p>5431,00</text:p>
          </table:table-cell>
          <table:table-cell table:style-name="ce12N2" office:value-type="float" office:value="5.43">
            <text:p>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87">
            <text:p>48,8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6.99">
            <text:p>196,99</text:p>
          </table:table-cell>
          <table:table-cell table:style-name="ce12N2" office:value-type="float" office:value="6061">
            <text:p>6061,00</text:p>
          </table:table-cell>
          <table:table-cell table:style-name="ce12N2" office:value-type="float" office:value="424.27">
            <text:p>4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4171419170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7">
            <text:p>31093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.99">
            <text:p>15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.47">
            <text:p>146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93">
            <text:p>0,001</text:p>
          </table:table-cell>
          <table:table-cell table:style-name="ce12N2" office:value-type="float" office:value="0.73">
            <text:p>0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6">
            <text:p>127,6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9.52">
            <text:p>9,52</text:p>
          </table:table-cell>
          <table:table-cell table:style-name="ce12N2" office:value-type="float" office:value="146.47">
            <text:p>146,47</text:p>
          </table:table-cell>
          <table:table-cell table:style-name="ce12N2" office:value-type="float" office:value="5.86">
            <text:p>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312945343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6">
            <text:p>310996</text:p>
          </table:table-cell>
          <table:table-cell table:style-name="ce0" table:number-columns-spanned="4" table:number-rows-spanned="1" office:value-type="string" calcext:value-type="string">
            <text:p>3.404 - VENTISOL INDUSTRIA E COMERCIO LTDA</text:p>
          </table:table-cell>
          <table:covered-table-cell table:number-columns-repeated="3"/>
          <table:table-cell table:style-name="ce0" office:value-type="string" calcext:value-type="string">
            <text:p>1.255.9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54.17">
            <text:p>2495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4322.72">
            <text:p>2432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2173">
            <text:p>2,922</text:p>
          </table:table-cell>
          <table:table-cell table:style-name="ce12N2" office:value-type="float" office:value="793.84">
            <text:p>793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954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27.77">
            <text:p>20527,77</text:p>
          </table:table-cell>
          <table:table-cell table:style-name="ce12N2" office:value-type="float" office:value="20.53">
            <text:p>2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4.76">
            <text:p>184,76</text:p>
          </table:table-cell>
          <table:table-cell table:style-name="ce12N2" office:value-type="float" office:value="63.33">
            <text:p>63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631.45">
            <text:p>631,45</text:p>
          </table:table-cell>
          <table:table-cell table:style-name="ce12N2" office:value-type="float" office:value="24322.72">
            <text:p>24322,72</text:p>
          </table:table-cell>
          <table:table-cell table:style-name="ce12N2" office:value-type="float" office:value="1702.59">
            <text:p>170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7637200001715500500125597715782623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2">
            <text:p>311002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21.3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5.5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210.5">
            <text:p>72210,50</text:p>
          </table:table-cell>
          <table:table-cell table:style-name="ce12N2" office:value-type="float" office:value="72.21">
            <text:p>7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9.89">
            <text:p>649,89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5989.2">
            <text:p>598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213131019631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4">
            <text:p>31100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2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1.15">
            <text:p>1374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2943.8">
            <text:p>1294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58718">
            <text:p>10,587</text:p>
          </table:table-cell>
          <table:table-cell table:style-name="ce12N2" office:value-type="float" office:value="65.36">
            <text:p>65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41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24.21">
            <text:p>11024,21</text:p>
          </table:table-cell>
          <table:table-cell table:style-name="ce12N2" office:value-type="float" office:value="11.04">
            <text:p>1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.2">
            <text:p>99,2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797.35">
            <text:p>797,35</text:p>
          </table:table-cell>
          <table:table-cell table:style-name="ce12N2" office:value-type="float" office:value="12943.8">
            <text:p>12943,80</text:p>
          </table:table-cell>
          <table:table-cell table:style-name="ce12N2" office:value-type="float" office:value="795.91">
            <text:p>79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2381816220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5">
            <text:p>31100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803.48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41.92">
            <text:p>914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69.28">
            <text:p>7869,28</text:p>
          </table:table-cell>
          <table:table-cell table:style-name="ce12N2" office:value-type="float" office:value="505.39">
            <text:p>505,39</text:p>
          </table:table-cell>
          <table:table-cell table:style-name="ce12N3" office:value-type="float" office:value="8E-6">
            <text:p>0,000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41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6.01">
            <text:p>7296,01</text:p>
          </table:table-cell>
          <table:table-cell table:style-name="ce12N2" office:value-type="float" office:value="7.3">
            <text:p>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66">
            <text:p>65,6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767.25">
            <text:p>767,25</text:p>
          </table:table-cell>
          <table:table-cell table:style-name="ce12N2" office:value-type="float" office:value="8374.67">
            <text:p>8374,67</text:p>
          </table:table-cell>
          <table:table-cell table:style-name="ce12N2" office:value-type="float" office:value="334.99">
            <text:p>33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8034881606197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6">
            <text:p>31100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8.9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91.62">
            <text:p>95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26.96">
            <text:p>7926,96</text:p>
          </table:table-cell>
          <table:table-cell table:style-name="ce12N2" office:value-type="float" office:value="475.62">
            <text:p>475,62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3.29">
            <text:p>33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77.14">
            <text:p>7777,14</text:p>
          </table:table-cell>
          <table:table-cell table:style-name="ce12N2" office:value-type="float" office:value="7.78">
            <text:p>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99">
            <text:p>69,99</text:p>
          </table:table-cell>
          <table:table-cell table:style-name="ce12N2" office:value-type="float" office:value="74">
            <text:p>7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189.04">
            <text:p>1189,04</text:p>
          </table:table-cell>
          <table:table-cell table:style-name="ce12N2" office:value-type="float" office:value="8402.58">
            <text:p>8402,58</text:p>
          </table:table-cell>
          <table:table-cell table:style-name="ce12N2" office:value-type="float" office:value="336.1">
            <text:p>33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24855633000140550010000789541535925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8">
            <text:p>311018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4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3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15.35">
            <text:p>2715,35</text:p>
          </table:table-cell>
          <table:table-cell table:style-name="ce12N2" office:value-type="float" office:value="2.72">
            <text:p>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43">
            <text:p>24,4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212.09">
            <text:p>2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45123710000147550010000148061853462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0">
            <text:p>311030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6.0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90.96">
            <text:p>319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997.6">
            <text:p>29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12">
            <text:p>0,001</text:p>
          </table:table-cell>
          <table:table-cell table:style-name="ce12N2" office:value-type="float" office:value="0.26">
            <text:p>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90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11.51">
            <text:p>2611,51</text:p>
          </table:table-cell>
          <table:table-cell table:style-name="ce12N2" office:value-type="float" office:value="2.61">
            <text:p>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5">
            <text:p>23,50</text:p>
          </table:table-cell>
          <table:table-cell table:style-name="ce12N2" office:value-type="float" office:value="41.15">
            <text:p>41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93.36">
            <text:p>193,36</text:p>
          </table:table-cell>
          <table:table-cell table:style-name="ce12N2" office:value-type="float" office:value="2997.6">
            <text:p>2997,60</text:p>
          </table:table-cell>
          <table:table-cell table:style-name="ce12N2" office:value-type="float" office:value="119.91">
            <text:p>1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60301747788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1">
            <text:p>311031</text:p>
          </table:table-cell>
          <table:table-cell table:style-name="ce0" table:number-columns-spanned="4" table:number-rows-spanned="1" office:value-type="string" calcext:value-type="string">
            <text:p>9.588 - STARLUX COMERCIO E REPRESENTACOES LTDA</text:p>
          </table:table-cell>
          <table:covered-table-cell table:number-columns-repeated="3"/>
          <table:table-cell table:style-name="ce0" office:value-type="string" calcext:value-type="string">
            <text:p>28.89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1.83">
            <text:p>227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80">
            <text:p>1980,00</text:p>
          </table:table-cell>
          <table:table-cell table:style-name="ce12N2" office:value-type="float" office:value="90">
            <text:p>9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1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11.64">
            <text:p>1911,64</text:p>
          </table:table-cell>
          <table:table-cell table:style-name="ce12N2" office:value-type="float" office:value="1.91">
            <text:p>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2">
            <text:p>17,20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201.83">
            <text:p>201,83</text:p>
          </table:table-cell>
          <table:table-cell table:style-name="ce12N2" office:value-type="float" office:value="2070">
            <text:p>2070,00</text:p>
          </table:table-cell>
          <table:table-cell table:style-name="ce12N2" office:value-type="float" office:value="82.8">
            <text:p>8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8870880001785500300002889111615433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8">
            <text:p>311038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5.1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68">
            <text:p>0,058</text:p>
          </table:table-cell>
          <table:table-cell table:style-name="ce12N2" office:value-type="float" office:value="12.14">
            <text:p>1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1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20.36">
            <text:p>2120,36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08">
            <text:p>19,08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175.87">
            <text:p>17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51751062330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9">
            <text:p>311039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5.1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8.64">
            <text:p>821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085.42">
            <text:p>808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266">
            <text:p>0,288</text:p>
          </table:table-cell>
          <table:table-cell table:style-name="ce12N2" office:value-type="float" office:value="45.46">
            <text:p>45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3.9">
            <text:p>6823,90</text:p>
          </table:table-cell>
          <table:table-cell table:style-name="ce12N2" office:value-type="float" office:value="6.82">
            <text:p>6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2">
            <text:p>61,42</text:p>
          </table:table-cell>
          <table:table-cell table:style-name="ce12N2" office:value-type="float" office:value="62.55">
            <text:p>62,5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33.22">
            <text:p>133,22</text:p>
          </table:table-cell>
          <table:table-cell table:style-name="ce12N2" office:value-type="float" office:value="8085.42">
            <text:p>8085,42</text:p>
          </table:table-cell>
          <table:table-cell table:style-name="ce12N2" office:value-type="float" office:value="565.98">
            <text:p>56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516311350829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4">
            <text:p>311044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8.3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82.27">
            <text:p>668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6242.25">
            <text:p>6242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3696">
            <text:p>1,737</text:p>
          </table:table-cell>
          <table:table-cell table:style-name="ce12N2" office:value-type="float" office:value="239.11">
            <text:p>239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82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68.29">
            <text:p>5268,29</text:p>
          </table:table-cell>
          <table:table-cell table:style-name="ce12N2" office:value-type="float" office:value="5.29">
            <text:p>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41">
            <text:p>47,4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440.02">
            <text:p>440,02</text:p>
          </table:table-cell>
          <table:table-cell table:style-name="ce12N2" office:value-type="float" office:value="6242.25">
            <text:p>6242,25</text:p>
          </table:table-cell>
          <table:table-cell table:style-name="ce12N2" office:value-type="float" office:value="436.97">
            <text:p>43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07159430000361550010000883201618135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72">
            <text:p>311072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8.3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34.9">
            <text:p>623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986.08">
            <text:p>5986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9">
            <text:p>0,206</text:p>
          </table:table-cell>
          <table:table-cell table:style-name="ce12N2" office:value-type="float" office:value="11.3">
            <text:p>11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34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52.1">
            <text:p>5052,10</text:p>
          </table:table-cell>
          <table:table-cell table:style-name="ce12N2" office:value-type="float" office:value="5.05">
            <text:p>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47">
            <text:p>45,4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48.82">
            <text:p>248,82</text:p>
          </table:table-cell>
          <table:table-cell table:style-name="ce12N2" office:value-type="float" office:value="5986.08">
            <text:p>5986,08</text:p>
          </table:table-cell>
          <table:table-cell table:style-name="ce12N2" office:value-type="float" office:value="419.03">
            <text:p>419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07159430000361550010000883211731019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4">
            <text:p>3110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45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1.39">
            <text:p>142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4.64">
            <text:p>133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244">
            <text:p>0,018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1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6.4">
            <text:p>1126,40</text:p>
          </table:table-cell>
          <table:table-cell table:style-name="ce12N2" office:value-type="float" office:value="1.13">
            <text:p>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4">
            <text:p>10,1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86.75">
            <text:p>86,75</text:p>
          </table:table-cell>
          <table:table-cell table:style-name="ce12N2" office:value-type="float" office:value="1334.64">
            <text:p>1334,64</text:p>
          </table:table-cell>
          <table:table-cell table:style-name="ce12N2" office:value-type="float" office:value="93.42">
            <text:p>9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4521484211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5">
            <text:p>3111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3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.07">
            <text:p>76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1.07">
            <text:p>76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4">
            <text:p>0,003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1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2.32">
            <text:p>642,32</text:p>
          </table:table-cell>
          <table:table-cell table:style-name="ce12N2" office:value-type="float" office:value="0.64">
            <text:p>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78">
            <text:p>5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1.07">
            <text:p>761,07</text:p>
          </table:table-cell>
          <table:table-cell table:style-name="ce12N2" office:value-type="float" office:value="53.27">
            <text:p>53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38612738047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4">
            <text:p>3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173.51">
            <text:p>1173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039.64">
            <text:p>16039,64</text:p>
          </table:table-cell>
          <table:table-cell table:style-name="ce26N2" office:value-type="float" office:value="670968.02">
            <text:p>670968,02</text:p>
          </table:table-cell>
          <table:table-cell table:style-name="ce26N2" office:value-type="float" office:value="44661.52">
            <text:p>44661,5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87017.66">
            <text:p>687017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9.205022">
            <text:p>29,205</text:p>
          </table:table-cell>
          <table:table-cell table:style-name="ce26N2" office:value-type="float" office:value="669804.51">
            <text:p>669804,51</text:p>
          </table:table-cell>
          <table:table-cell table:style-name="ce26N2" office:value-type="float" office:value="687017.66">
            <text:p>687017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72102.88">
            <text:p>572102,88</text:p>
          </table:table-cell>
          <table:table-cell table:style-name="ce26N2" office:value-type="float" office:value="572.12">
            <text:p>572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148.86">
            <text:p>5148,8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213.84">
            <text:p>5213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9.45">
            <text:p>79,4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06" meta:object-count="0"/>
    <meta:generator>LibreOffice/4.3.0.4$Windows_x86 LibreOffice_project/62ad5818884a2fc2e5780dd45466868d41009ec0</meta:generator>
  </office:meta>
</office:document-meta>
</file>