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6/06/2026 07:31:43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0">
            <text:p>3093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3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2.35">
            <text:p>2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6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87.94">
            <text:p>1887,94</text:p>
          </table:table-cell>
          <table:table-cell table:style-name="ce12N2" office:value-type="float" office:value="1.89">
            <text:p>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99">
            <text:p>16,9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6.96">
            <text:p>2236,96</text:p>
          </table:table-cell>
          <table:table-cell table:style-name="ce12N2" office:value-type="float" office:value="156.59">
            <text:p>156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3710461518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51">
            <text:p>3093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1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14">
            <text:p>0,00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4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7.3">
            <text:p>1227,30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05">
            <text:p>11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54.2">
            <text:p>1454,20</text:p>
          </table:table-cell>
          <table:table-cell table:style-name="ce12N2" office:value-type="float" office:value="101.79">
            <text:p>10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182137494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97">
            <text:p>309397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7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727">
            <text:p>0,087</text:p>
          </table:table-cell>
          <table:table-cell table:style-name="ce12N2" office:value-type="float" office:value="33.1">
            <text:p>3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5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55">
            <text:p>7155,00</text:p>
          </table:table-cell>
          <table:table-cell table:style-name="ce12N2" office:value-type="float" office:value="500.85">
            <text:p>50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2296669000169550030000017881782303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24">
            <text:p>3094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8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088">
            <text:p>0,002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46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02.34">
            <text:p>2402,3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62">
            <text:p>21,6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8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46.46">
            <text:p>2846,46</text:p>
          </table:table-cell>
          <table:table-cell table:style-name="ce12N2" office:value-type="float" office:value="199.25">
            <text:p>19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883311100451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69">
            <text:p>30946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2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2.84">
            <text:p>91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411">
            <text:p>0,001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3.4">
            <text:p>723,40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51">
            <text:p>6,5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55.71">
            <text:p>55,71</text:p>
          </table:table-cell>
          <table:table-cell table:style-name="ce12N2" office:value-type="float" office:value="857.13">
            <text:p>857,13</text:p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24010912185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5">
            <text:p>309535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5.0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476.94">
            <text:p>14947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49322.78">
            <text:p>149322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45977">
            <text:p>4,346</text:p>
          </table:table-cell>
          <table:table-cell table:style-name="ce12N2" office:value-type="float" office:value="1306.75">
            <text:p>1306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9.476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6046.33">
            <text:p>126046,33</text:p>
          </table:table-cell>
          <table:table-cell table:style-name="ce12N2" office:value-type="float" office:value="126.05">
            <text:p>126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4.42">
            <text:p>1134,42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54.16">
            <text:p>154,16</text:p>
          </table:table-cell>
          <table:table-cell table:style-name="ce12N2" office:value-type="float" office:value="148981.94">
            <text:p>148981,94</text:p>
          </table:table-cell>
          <table:table-cell table:style-name="ce12N2" office:value-type="float" office:value="10428.74">
            <text:p>1042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50191131332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6">
            <text:p>309536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6025">
            <text:p>0,326</text:p>
          </table:table-cell>
          <table:table-cell table:style-name="ce12N2" office:value-type="float" office:value="25.81">
            <text:p>25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6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22">
            <text:p>3322,00</text:p>
          </table:table-cell>
          <table:table-cell table:style-name="ce12N2" office:value-type="float" office:value="3.32">
            <text:p>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9">
            <text:p>29,9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6.14">
            <text:p>3936,14</text:p>
          </table:table-cell>
          <table:table-cell table:style-name="ce12N2" office:value-type="float" office:value="275.53">
            <text:p>27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417550746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37">
            <text:p>309537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00872">
            <text:p>7,009</text:p>
          </table:table-cell>
          <table:table-cell table:style-name="ce12N2" office:value-type="float" office:value="117.6">
            <text:p>117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2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57.59">
            <text:p>17157,59</text:p>
          </table:table-cell>
          <table:table-cell table:style-name="ce12N2" office:value-type="float" office:value="17.16">
            <text:p>1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.42">
            <text:p>154,42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29.5">
            <text:p>20329,50</text:p>
          </table:table-cell>
          <table:table-cell table:style-name="ce12N2" office:value-type="float" office:value="1423.07">
            <text:p>142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615612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51">
            <text:p>309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9.1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54">
            <text:p>0,015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56.68">
            <text:p>3156,68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.41">
            <text:p>28,4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0.26">
            <text:p>3740,26</text:p>
          </table:table-cell>
          <table:table-cell table:style-name="ce12N2" office:value-type="float" office:value="261.82">
            <text:p>26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913618038852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3">
            <text:p>30956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21370152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4">
            <text:p>30956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0.87">
            <text:p>152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52">
            <text:p>0,004</text:p>
          </table:table-cell>
          <table:table-cell table:style-name="ce12N2" office:value-type="float" office:value="4.8">
            <text:p>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2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3.18">
            <text:p>1243,18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19">
            <text:p>11,19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47.87">
            <text:p>47,87</text:p>
          </table:table-cell>
          <table:table-cell table:style-name="ce12N2" office:value-type="float" office:value="1473">
            <text:p>1473,00</text:p>
          </table:table-cell>
          <table:table-cell table:style-name="ce12N2" office:value-type="float" office:value="103.11">
            <text:p>10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419041171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6">
            <text:p>30956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6.64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7.43">
            <text:p>2777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">
            <text:p>0,004</text:p>
          </table:table-cell>
          <table:table-cell table:style-name="ce12N2" office:value-type="float" office:value="16.4">
            <text:p>1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7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70.29">
            <text:p>2270,29</text:p>
          </table:table-cell>
          <table:table-cell table:style-name="ce12N2" office:value-type="float" office:value="2.27">
            <text:p>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43">
            <text:p>20,43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87.43">
            <text:p>87,43</text:p>
          </table:table-cell>
          <table:table-cell table:style-name="ce12N2" office:value-type="float" office:value="2690">
            <text:p>2690,00</text:p>
          </table:table-cell>
          <table:table-cell table:style-name="ce12N2" office:value-type="float" office:value="188.3">
            <text:p>18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66431819587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7">
            <text:p>3095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1.5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3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20.32">
            <text:p>4420,32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.78">
            <text:p>39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7.52">
            <text:p>5237,52</text:p>
          </table:table-cell>
          <table:table-cell table:style-name="ce12N2" office:value-type="float" office:value="366.63">
            <text:p>366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152214368079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68">
            <text:p>3095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7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62">
            <text:p>2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85.61">
            <text:p>3785,61</text:p>
          </table:table-cell>
          <table:table-cell table:style-name="ce12N2" office:value-type="float" office:value="3.79">
            <text:p>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.07">
            <text:p>34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5.45">
            <text:p>4485,45</text:p>
          </table:table-cell>
          <table:table-cell table:style-name="ce12N2" office:value-type="float" office:value="313.98">
            <text:p>31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71317788196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4">
            <text:p>30959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9.25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64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64.62">
            <text:p>2164,62</text:p>
          </table:table-cell>
          <table:table-cell table:style-name="ce12N2" office:value-type="float" office:value="2.16">
            <text:p>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48">
            <text:p>19,4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64.79">
            <text:p>2564,79</text:p>
          </table:table-cell>
          <table:table-cell table:style-name="ce12N2" office:value-type="float" office:value="179.54">
            <text:p>17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925518864121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7">
            <text:p>30960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6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3.09">
            <text:p>307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96">
            <text:p>0,049</text:p>
          </table:table-cell>
          <table:table-cell table:style-name="ce12N2" office:value-type="float" office:value="30">
            <text:p>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63.19">
            <text:p>2363,19</text:p>
          </table:table-cell>
          <table:table-cell table:style-name="ce12N2" office:value-type="float" office:value="2.36">
            <text:p>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.27">
            <text:p>21,27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273.01">
            <text:p>273,01</text:p>
          </table:table-cell>
          <table:table-cell table:style-name="ce12N2" office:value-type="float" office:value="2800.08">
            <text:p>2800,08</text:p>
          </table:table-cell>
          <table:table-cell table:style-name="ce12N2" office:value-type="float" office:value="196.01">
            <text:p>19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681318324982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8">
            <text:p>309608</text:p>
          </table:table-cell>
          <table:table-cell table:style-name="ce0" table:number-columns-spanned="4" table:number-rows-spanned="1" office:value-type="string" calcext:value-type="string">
            <text:p>26 - TECNOPERFIL PLASTICOS LTDA</text:p>
          </table:table-cell>
          <table:covered-table-cell table:number-columns-repeated="3"/>
          <table:table-cell table:style-name="ce0" office:value-type="string" calcext:value-type="string">
            <text:p>18.0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0.87">
            <text:p>195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498">
            <text:p>0,155</text:p>
          </table:table-cell>
          <table:table-cell table:style-name="ce12N2" office:value-type="float" office:value="32.94">
            <text:p>3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5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45.99">
            <text:p>1545,99</text:p>
          </table:table-cell>
          <table:table-cell table:style-name="ce12N2" office:value-type="float" office:value="1.55">
            <text:p>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91">
            <text:p>13,9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19.07">
            <text:p>119,07</text:p>
          </table:table-cell>
          <table:table-cell table:style-name="ce12N2" office:value-type="float" office:value="1831.8">
            <text:p>1831,80</text:p>
          </table:table-cell>
          <table:table-cell table:style-name="ce12N2" office:value-type="float" office:value="128.23">
            <text:p>12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03418570001755500300001803813032988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09">
            <text:p>309609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29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3.24">
            <text:p>864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07004">
            <text:p>0,707</text:p>
          </table:table-cell>
          <table:table-cell table:style-name="ce12N2" office:value-type="float" office:value="52.22">
            <text:p>5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837.13">
            <text:p>6837,13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.53">
            <text:p>61,53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767.84">
            <text:p>767,84</text:p>
          </table:table-cell>
          <table:table-cell table:style-name="ce12N2" office:value-type="float" office:value="7875.4">
            <text:p>7875,40</text:p>
          </table:table-cell>
          <table:table-cell table:style-name="ce12N2" office:value-type="float" office:value="341.36">
            <text:p>34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9416459000120550010008291951453167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29">
            <text:p>309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3.93">
            <text:p>1953,93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162623">
            <text:p>0,163</text:p>
          </table:table-cell>
          <table:table-cell table:style-name="ce12N2" office:value-type="float" office:value="43.61">
            <text:p>43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4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02.26">
            <text:p>1702,26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33">
            <text:p>15,3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14.93">
            <text:p>2114,93</text:p>
          </table:table-cell>
          <table:table-cell table:style-name="ce12N2" office:value-type="float" office:value="84.58">
            <text:p>8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10714647909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7">
            <text:p>30968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0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1.59">
            <text:p>240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26">
            <text:p>0,001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01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63.09">
            <text:p>1963,09</text:p>
          </table:table-cell>
          <table:table-cell table:style-name="ce12N2" office:value-type="float" office:value="1.96">
            <text:p>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67">
            <text:p>17,67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75.59">
            <text:p>75,59</text:p>
          </table:table-cell>
          <table:table-cell table:style-name="ce12N2" office:value-type="float" office:value="2326">
            <text:p>2326,00</text:p>
          </table:table-cell>
          <table:table-cell table:style-name="ce12N2" office:value-type="float" office:value="162.82">
            <text:p>16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0714033457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89">
            <text:p>30968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1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6.35">
            <text:p>369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8">
            <text:p>0,002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1.43">
            <text:p>3021,43</text:p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19">
            <text:p>27,19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16.35">
            <text:p>116,35</text:p>
          </table:table-cell>
          <table:table-cell table:style-name="ce12N2" office:value-type="float" office:value="3580">
            <text:p>3580,00</text:p>
          </table:table-cell>
          <table:table-cell table:style-name="ce12N2" office:value-type="float" office:value="250.6">
            <text:p>250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171392934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1">
            <text:p>309701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5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9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5.27">
            <text:p>1485,27</text:p>
          </table:table-cell>
          <table:table-cell table:style-name="ce12N2" office:value-type="float" office:value="1.49">
            <text:p>1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7">
            <text:p>13,3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9.86">
            <text:p>1759,86</text:p>
          </table:table-cell>
          <table:table-cell table:style-name="ce12N2" office:value-type="float" office:value="123.19">
            <text:p>12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5361736246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7">
            <text:p>3097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072.59">
            <text:p>3507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">
            <text:p>61,00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17491">
            <text:p>0,317</text:p>
          </table:table-cell>
          <table:table-cell table:style-name="ce12N2" office:value-type="float" office:value="72.8">
            <text:p>7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07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202.37">
            <text:p>29202,37</text:p>
          </table:table-cell>
          <table:table-cell table:style-name="ce12N2" office:value-type="float" office:value="29.2">
            <text:p>2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2.83">
            <text:p>262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1.52">
            <text:p>471,52</text:p>
          </table:table-cell>
          <table:table-cell table:style-name="ce12N2" office:value-type="float" office:value="34601.07">
            <text:p>34601,07</text:p>
          </table:table-cell>
          <table:table-cell table:style-name="ce12N2" office:value-type="float" office:value="2422.05">
            <text:p>242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071268184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1">
            <text:p>309721</text:p>
          </table:table-cell>
          <table:table-cell table:style-name="ce0" table:number-columns-spanned="4" table:number-rows-spanned="1" office:value-type="string" calcext:value-type="string">
            <text:p>34.021 - ELG COMERCIO DE ELETRONICOS LTDA</text:p>
          </table:table-cell>
          <table:covered-table-cell table:number-columns-repeated="3"/>
          <table:table-cell table:style-name="ce0" office:value-type="string" calcext:value-type="string">
            <text:p>52.6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0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.79">
            <text:p>25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9.8">
            <text:p>23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1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8.91">
            <text:p>208,91</text:p>
          </table:table-cell>
          <table:table-cell table:style-name="ce12N2" office:value-type="float" office:value="0.21">
            <text:p>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88">
            <text:p>1,88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1.99">
            <text:p>11,99</text:p>
          </table:table-cell>
          <table:table-cell table:style-name="ce12N2" office:value-type="float" office:value="239.8">
            <text:p>239,80</text:p>
          </table:table-cell>
          <table:table-cell table:style-name="ce12N2" office:value-type="float" office:value="9.59">
            <text:p>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72877800001025500100005267113969069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2">
            <text:p>309722</text:p>
          </table:table-cell>
          <table:table-cell table:style-name="ce0" table:number-columns-spanned="4" table:number-rows-spanned="1" office:value-type="string" calcext:value-type="string">
            <text:p>37.407 - ELG PEDESTAIS LTDA</text:p>
          </table:table-cell>
          <table:covered-table-cell table:number-columns-repeated="3"/>
          <table:table-cell table:style-name="ce0" office:value-type="string" calcext:value-type="string">
            <text:p>102.6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1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46.66">
            <text:p>1134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0785.84">
            <text:p>1078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4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976.48">
            <text:p>9976,48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9.79">
            <text:p>89,79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60.82">
            <text:p>560,82</text:p>
          </table:table-cell>
          <table:table-cell table:style-name="ce12N2" office:value-type="float" office:value="10785.84">
            <text:p>10785,84</text:p>
          </table:table-cell>
          <table:table-cell table:style-name="ce12N2" office:value-type="float" office:value="431.43">
            <text:p>4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05012368000193550030001026731534595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7">
            <text:p>30972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6.51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86.26">
            <text:p>65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988.24">
            <text:p>598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8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65.79">
            <text:p>5365,79</text:p>
          </table:table-cell>
          <table:table-cell table:style-name="ce12N2" office:value-type="float" office:value="5.37">
            <text:p>5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28">
            <text:p>48,28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98.02">
            <text:p>598,02</text:p>
          </table:table-cell>
          <table:table-cell table:style-name="ce12N2" office:value-type="float" office:value="5988.24">
            <text:p>5988,24</text:p>
          </table:table-cell>
          <table:table-cell table:style-name="ce12N2" office:value-type="float" office:value="419.19">
            <text:p>41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65121829304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29">
            <text:p>309729</text:p>
          </table:table-cell>
          <table:table-cell table:style-name="ce0" table:number-columns-spanned="4" table:number-rows-spanned="1" office:value-type="string" calcext:value-type="string">
            <text:p>790 - JACKWAL S/A</text:p>
          </table:table-cell>
          <table:covered-table-cell table:number-columns-repeated="3"/>
          <table:table-cell table:style-name="ce0" office:value-type="string" calcext:value-type="string">
            <text:p>276.2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2.32">
            <text:p>482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316">
            <text:p>0,005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86.44">
            <text:p>3486,44</text:p>
          </table:table-cell>
          <table:table-cell table:style-name="ce12N2" office:value-type="float" office:value="3.48">
            <text:p>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.37">
            <text:p>31,37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168.26">
            <text:p>168,26</text:p>
          </table:table-cell>
          <table:table-cell table:style-name="ce12N2" office:value-type="float" office:value="4654.06">
            <text:p>4654,06</text:p>
          </table:table-cell>
          <table:table-cell table:style-name="ce12N2" office:value-type="float" office:value="310.09">
            <text:p>31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92782366000188550030002762861870235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30">
            <text:p>30973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3.008.0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08.84">
            <text:p>2037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4713">
            <text:p>3,947</text:p>
          </table:table-cell>
          <table:table-cell table:style-name="ce12N2" office:value-type="float" office:value="1579.53">
            <text:p>15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3.7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1459.21">
            <text:p>171459,21</text:p>
          </table:table-cell>
          <table:table-cell table:style-name="ce12N2" office:value-type="float" office:value="171.45">
            <text:p>171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3.13">
            <text:p>1543,13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552.11">
            <text:p>552,11</text:p>
          </table:table-cell>
          <table:table-cell table:style-name="ce12N2" office:value-type="float" office:value="203156.73">
            <text:p>203156,73</text:p>
          </table:table-cell>
          <table:table-cell table:style-name="ce12N2" office:value-type="float" office:value="14220.97">
            <text:p>14220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30080821939820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48">
            <text:p>3097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4.0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3">
            <text:p>0,096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58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03">
            <text:p>3425,03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58.2">
            <text:p>4058,20</text:p>
          </table:table-cell>
          <table:table-cell table:style-name="ce12N2" office:value-type="float" office:value="284.07">
            <text:p>28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40581122833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4">
            <text:p>309754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91.34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7.47">
            <text:p>292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6.47">
            <text:p>2186,47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68">
            <text:p>19,68</text:p>
          </table:table-cell>
          <table:table-cell table:style-name="ce12N2" office:value-type="float" office:value="52.78">
            <text:p>52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336.79">
            <text:p>336,79</text:p>
          </table:table-cell>
          <table:table-cell table:style-name="ce12N2" office:value-type="float" office:value="2590.68">
            <text:p>2590,68</text:p>
          </table:table-cell>
          <table:table-cell table:style-name="ce12N2" office:value-type="float" office:value="181.35">
            <text:p>18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913411572801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55">
            <text:p>30975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3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52.53">
            <text:p>2295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5356">
            <text:p>0,365</text:p>
          </table:table-cell>
          <table:table-cell table:style-name="ce12N2" office:value-type="float" office:value="89.26">
            <text:p>89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952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296.67">
            <text:p>19296,67</text:p>
          </table:table-cell>
          <table:table-cell table:style-name="ce12N2" office:value-type="float" office:value="19.3">
            <text:p>19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3.67">
            <text:p>173,67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283.09">
            <text:p>283,09</text:p>
          </table:table-cell>
          <table:table-cell table:style-name="ce12N2" office:value-type="float" office:value="22669.44">
            <text:p>22669,44</text:p>
          </table:table-cell>
          <table:table-cell table:style-name="ce12N2" office:value-type="float" office:value="1405.91">
            <text:p>140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3011788581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4">
            <text:p>3097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824">
            <text:p>0,083</text:p>
          </table:table-cell>
          <table:table-cell table:style-name="ce12N2" office:value-type="float" office:value="5.2">
            <text:p>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4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28.96">
            <text:p>6028,96</text:p>
          </table:table-cell>
          <table:table-cell table:style-name="ce12N2" office:value-type="float" office:value="6.03">
            <text:p>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.26">
            <text:p>54,2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143.52">
            <text:p>7143,52</text:p>
          </table:table-cell>
          <table:table-cell table:style-name="ce12N2" office:value-type="float" office:value="500.05">
            <text:p>50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1614774098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5">
            <text:p>3097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52.31">
            <text:p>14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645">
            <text:p>0,008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2.12">
            <text:p>1222,12</text:p>
          </table:table-cell>
          <table:table-cell table:style-name="ce12N2" office:value-type="float" office:value="1.24">
            <text:p>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98">
            <text:p>10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.27">
            <text:p>4,27</text:p>
          </table:table-cell>
          <table:table-cell table:style-name="ce12N2" office:value-type="float" office:value="1448.04">
            <text:p>1448,04</text:p>
          </table:table-cell>
          <table:table-cell table:style-name="ce12N2" office:value-type="float" office:value="101.38">
            <text:p>10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2817893431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7">
            <text:p>30976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74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68.09">
            <text:p>136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205">
            <text:p>0,027</text:p>
          </table:table-cell>
          <table:table-cell table:style-name="ce12N2" office:value-type="float" office:value="2.22">
            <text:p>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68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19.04">
            <text:p>1119,04</text:p>
          </table:table-cell>
          <table:table-cell table:style-name="ce12N2" office:value-type="float" office:value="1.12">
            <text:p>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07">
            <text:p>10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42.17">
            <text:p>42,17</text:p>
          </table:table-cell>
          <table:table-cell table:style-name="ce12N2" office:value-type="float" office:value="1325.92">
            <text:p>1325,92</text:p>
          </table:table-cell>
          <table:table-cell table:style-name="ce12N2" office:value-type="float" office:value="92.81">
            <text:p>9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7471531125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7">
            <text:p>3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1">
            <text:p>16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851.46">
            <text:p>4851,46</text:p>
          </table:table-cell>
          <table:table-cell table:style-name="ce26N2" office:value-type="float" office:value="727662.91">
            <text:p>727662,91</text:p>
          </table:table-cell>
          <table:table-cell table:style-name="ce26N2" office:value-type="float" office:value="50135.62">
            <text:p>50135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32865.21">
            <text:p>732865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9.430228">
            <text:p>19,430</text:p>
          </table:table-cell>
          <table:table-cell table:style-name="ce26N2" office:value-type="float" office:value="727852.75">
            <text:p>727852,75</text:p>
          </table:table-cell>
          <table:table-cell table:style-name="ce26N2" office:value-type="float" office:value="732865.21">
            <text:p>732865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09368.66">
            <text:p>609368,66</text:p>
          </table:table-cell>
          <table:table-cell table:style-name="ce26N2" office:value-type="float" office:value="609.38">
            <text:p>609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484.3">
            <text:p>5484,3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6771.05">
            <text:p>6771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.76">
            <text:p>77,7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04" meta:object-count="0"/>
    <meta:generator>LibreOffice/4.3.0.4$Windows_x86 LibreOffice_project/62ad5818884a2fc2e5780dd45466868d41009ec0</meta:generator>
  </office:meta>
</office:document-meta>
</file>