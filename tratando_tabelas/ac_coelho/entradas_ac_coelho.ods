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6/05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20">
            <text:p>30702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6.3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2272">
            <text:p>0,142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6.8">
            <text:p>1756,80</text:p>
          </table:table-cell>
          <table:table-cell table:style-name="ce12N2" office:value-type="float" office:value="122.98">
            <text:p>12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63191755416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3">
            <text:p>3071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1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5.79">
            <text:p>426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4131">
            <text:p>0,484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4222.88">
            <text:p>4222,88</text:p>
          </table:table-cell>
          <table:table-cell table:style-name="ce12N2" office:value-type="float" office:value="281.12">
            <text:p>28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17316183353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67">
            <text:p>30736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2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1.17">
            <text:p>567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538.68">
            <text:p>553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4926">
            <text:p>0,315</text:p>
          </table:table-cell>
          <table:table-cell table:style-name="ce12N2" office:value-type="float" office:value="33.19">
            <text:p>33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35">
            <text:p>55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32.49">
            <text:p>132,49</text:p>
          </table:table-cell>
          <table:table-cell table:style-name="ce12N2" office:value-type="float" office:value="4787.31">
            <text:p>4787,31</text:p>
          </table:table-cell>
          <table:table-cell table:style-name="ce12N2" office:value-type="float" office:value="258.23">
            <text:p>25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29171646262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6">
            <text:p>3073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68">
            <text:p>0,002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1.59">
            <text:p>481,59</text:p>
          </table:table-cell>
          <table:table-cell table:style-name="ce12N2" office:value-type="float" office:value="19.26">
            <text:p>1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71736636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3">
            <text:p>3074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48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0.61">
            <text:p>104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1">
            <text:p>9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4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63.51">
            <text:p>63,51</text:p>
          </table:table-cell>
          <table:table-cell table:style-name="ce12N2" office:value-type="float" office:value="977.1">
            <text:p>977,10</text:p>
          </table:table-cell>
          <table:table-cell table:style-name="ce12N2" office:value-type="float" office:value="68.4">
            <text:p>6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48715470222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9">
            <text:p>30743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8.06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576">
            <text:p>0,296</text:p>
          </table:table-cell>
          <table:table-cell table:style-name="ce12N2" office:value-type="float" office:value="31.68">
            <text:p>3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01.84">
            <text:p>2401,84</text:p>
          </table:table-cell>
          <table:table-cell table:style-name="ce12N2" office:value-type="float" office:value="149.08">
            <text:p>14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880631168529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5">
            <text:p>307465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3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0.3">
            <text:p>114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79">
            <text:p>0,0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1.3">
            <text:p>101,30</text:p>
          </table:table-cell>
          <table:table-cell table:style-name="ce12N2" office:value-type="float" office:value="1039">
            <text:p>1039,00</text:p>
          </table:table-cell>
          <table:table-cell table:style-name="ce12N2" office:value-type="float" office:value="72.73">
            <text:p>7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2.33">
            <text:p>24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7.724.082</text:p>
          </table:table-cell>
          <table:table-cell table:style-name="ce0" office:value-type="string" calcext:value-type="string">
            <text:p>17.618 - ALFA TRANSPORTES EIRELI</text:p>
          </table:table-cell>
          <table:table-cell table:style-name="ce0" office:value-type="string" calcext:value-type="string">
            <text:p>14/05/2026</text:p>
          </table:table-cell>
          <table:table-cell table:style-name="ce12" office:value-type="string" calcext:value-type="string">
            <text:p>242,3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42260522670837000180550010000233691542222518</text:p>
          </table:table-cell>
          <table:table-cell table:style-name="ce0" office:value-type="string" calcext:value-type="string">
            <text:p>4226058211081800012157000007724082109034863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1">
            <text:p>307471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4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54">
            <text:p>0,165</text:p>
          </table:table-cell>
          <table:table-cell table:style-name="ce12N2" office:value-type="float" office:value="25.2">
            <text:p>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60">
            <text:p>7460,00</text:p>
          </table:table-cell>
          <table:table-cell table:style-name="ce12N2" office:value-type="float" office:value="895.2">
            <text:p>89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2296669000169550030000014561732534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2">
            <text:p>3075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51937497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8">
            <text:p>3075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31939175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9">
            <text:p>3075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4142536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6">
            <text:p>3075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3.1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62.82">
            <text:p>236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62.82">
            <text:p>236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24">
            <text:p>0,001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6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62.82">
            <text:p>2362,8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31411980070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8">
            <text:p>307598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4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6.29">
            <text:p>152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25">
            <text:p>1478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5">
            <text:p>0,002</text:p>
          </table:table-cell>
          <table:table-cell table:style-name="ce12N2" office:value-type="float" office:value="0.05">
            <text:p>0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6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8.04">
            <text:p>48,04</text:p>
          </table:table-cell>
          <table:table-cell table:style-name="ce12N2" office:value-type="float" office:value="1478.25">
            <text:p>1478,25</text:p>
          </table:table-cell>
          <table:table-cell table:style-name="ce12N2" office:value-type="float" office:value="103.48">
            <text:p>10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42611312671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1">
            <text:p>3076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3.9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2.18">
            <text:p>301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28.34">
            <text:p>282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216">
            <text:p>0,009</text:p>
          </table:table-cell>
          <table:table-cell table:style-name="ce12N2" office:value-type="float" office:value="2.96">
            <text:p>2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2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83.84">
            <text:p>183,84</text:p>
          </table:table-cell>
          <table:table-cell table:style-name="ce12N2" office:value-type="float" office:value="2828.34">
            <text:p>2828,34</text:p>
          </table:table-cell>
          <table:table-cell table:style-name="ce12N2" office:value-type="float" office:value="197.98">
            <text:p>19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39891906994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3">
            <text:p>30761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8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9.49">
            <text:p>594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49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28.54">
            <text:p>528,54</text:p>
          </table:table-cell>
          <table:table-cell table:style-name="ce12N2" office:value-type="float" office:value="5420.95">
            <text:p>5420,95</text:p>
          </table:table-cell>
          <table:table-cell table:style-name="ce12N2" office:value-type="float" office:value="216.84">
            <text:p>21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2091324000204550030000068451624550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4">
            <text:p>30761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6.45">
            <text:p>193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92.35">
            <text:p>1792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4.98">
            <text:p>1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36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44.1">
            <text:p>144,10</text:p>
          </table:table-cell>
          <table:table-cell table:style-name="ce12N2" office:value-type="float" office:value="1792.35">
            <text:p>1792,35</text:p>
          </table:table-cell>
          <table:table-cell table:style-name="ce12N2" office:value-type="float" office:value="111.31">
            <text:p>11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1816670359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7">
            <text:p>30761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.89">
            <text:p>45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36.7">
            <text:p>4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4.19">
            <text:p>14,19</text:p>
          </table:table-cell>
          <table:table-cell table:style-name="ce12N2" office:value-type="float" office:value="436.7">
            <text:p>436,70</text:p>
          </table:table-cell>
          <table:table-cell table:style-name="ce12N2" office:value-type="float" office:value="30.57">
            <text:p>3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916531283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3">
            <text:p>307633</text:p>
          </table:table-cell>
          <table:table-cell table:style-name="ce0" table:number-columns-spanned="4" table:number-rows-spanned="1" office:value-type="string" calcext:value-type="string">
            <text:p>13.356 - H. IMPORTS IMPORTACAO E EXPORTACAO EIRELI-EPP</text:p>
          </table:table-cell>
          <table:covered-table-cell table:number-columns-repeated="3"/>
          <table:table-cell table:style-name="ce0" office:value-type="string" calcext:value-type="string">
            <text:p>51.7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8.04">
            <text:p>23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85">
            <text:p>218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9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13.04">
            <text:p>213,04</text:p>
          </table:table-cell>
          <table:table-cell table:style-name="ce12N2" office:value-type="float" office:value="2185">
            <text:p>2185,00</text:p>
          </table:table-cell>
          <table:table-cell table:style-name="ce12N2" office:value-type="float" office:value="87.4">
            <text:p>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2091324000115550010000517391644084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0">
            <text:p>30767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4636">
            <text:p>5,346</text:p>
          </table:table-cell>
          <table:table-cell table:style-name="ce12N2" office:value-type="float" office:value="70.96">
            <text:p>7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24">
            <text:p>32424,00</text:p>
          </table:table-cell>
          <table:table-cell table:style-name="ce12N2" office:value-type="float" office:value="2269.68">
            <text:p>226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381155321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1">
            <text:p>307671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5.51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75.04">
            <text:p>817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95.49">
            <text:p>7795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416">
            <text:p>0,064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7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379.55">
            <text:p>379,55</text:p>
          </table:table-cell>
          <table:table-cell table:style-name="ce12N2" office:value-type="float" office:value="7795.49">
            <text:p>7795,49</text:p>
          </table:table-cell>
          <table:table-cell table:style-name="ce12N2" office:value-type="float" office:value="486.36">
            <text:p>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2782366000188550030002755111221903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6">
            <text:p>3076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6.1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5.93">
            <text:p>322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29.04">
            <text:p>302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48">
            <text:p>0,003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96.89">
            <text:p>196,89</text:p>
          </table:table-cell>
          <table:table-cell table:style-name="ce12N2" office:value-type="float" office:value="3029.04">
            <text:p>3029,04</text:p>
          </table:table-cell>
          <table:table-cell table:style-name="ce12N2" office:value-type="float" office:value="212.03">
            <text:p>21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61821645484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7">
            <text:p>3076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6.2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62">
            <text:p>354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">
            <text:p>0,003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232.91">
            <text:p>2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623710245680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5">
            <text:p>3077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2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4.8">
            <text:p>80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24.8">
            <text:p>80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68">
            <text:p>0,044</text:p>
          </table:table-cell>
          <table:table-cell table:style-name="ce12N2" office:value-type="float" office:value="9.4">
            <text:p>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24.8">
            <text:p>8024,80</text:p>
          </table:table-cell>
          <table:table-cell table:style-name="ce12N2" office:value-type="float" office:value="561.74">
            <text:p>56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2751334250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2">
            <text:p>307772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3.36">
            <text:p>240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9.85">
            <text:p>218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13.51">
            <text:p>213,51</text:p>
          </table:table-cell>
          <table:table-cell table:style-name="ce12N2" office:value-type="float" office:value="2189.85">
            <text:p>2189,85</text:p>
          </table:table-cell>
          <table:table-cell table:style-name="ce12N2" office:value-type="float" office:value="87.6">
            <text:p>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7551476543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5">
            <text:p>30780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6.6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9.8">
            <text:p>623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39.8">
            <text:p>623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">
            <text:p>0,034</text:p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3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39.8">
            <text:p>6239,80</text:p>
          </table:table-cell>
          <table:table-cell table:style-name="ce12N2" office:value-type="float" office:value="436.79">
            <text:p>43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663412198163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2">
            <text:p>307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">
            <text:p>0,00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0.68">
            <text:p>2630,68</text:p>
          </table:table-cell>
          <table:table-cell table:style-name="ce12N2" office:value-type="float" office:value="184.15">
            <text:p>18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161954616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7">
            <text:p>3078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4.85">
            <text:p>5654,85</text:p>
          </table:table-cell>
          <table:table-cell table:style-name="ce12N2" office:value-type="float" office:value="395.84">
            <text:p>39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4316594747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0">
            <text:p>307860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11.9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43.57">
            <text:p>524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43.57">
            <text:p>5243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86">
            <text:p>0,086</text:p>
          </table:table-cell>
          <table:table-cell table:style-name="ce12N2" office:value-type="float" office:value="204.96">
            <text:p>20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43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43.57">
            <text:p>5243,57</text:p>
          </table:table-cell>
          <table:table-cell table:style-name="ce12N2" office:value-type="float" office:value="367.06">
            <text:p>36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119281159961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7">
            <text:p>3078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3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19.68">
            <text:p>374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8374">
            <text:p>0,138</text:p>
          </table:table-cell>
          <table:table-cell table:style-name="ce12N2" office:value-type="float" office:value="28.67">
            <text:p>28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41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617.82">
            <text:p>617,82</text:p>
          </table:table-cell>
          <table:table-cell table:style-name="ce12N2" office:value-type="float" office:value="36801.86">
            <text:p>36801,86</text:p>
          </table:table-cell>
          <table:table-cell table:style-name="ce12N2" office:value-type="float" office:value="2576.12">
            <text:p>257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3711305727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9">
            <text:p>307869</text:p>
          </table:table-cell>
          <table:table-cell table:style-name="ce0" table:number-columns-spanned="4" table:number-rows-spanned="1" office:value-type="string" calcext:value-type="string">
            <text:p>27.064 - LINNI INDUSTRIA DE ARTEFATOS DE ALUMINIO LTDA</text:p>
          </table:table-cell>
          <table:covered-table-cell table:number-columns-repeated="3"/>
          <table:table-cell table:style-name="ce0" office:value-type="string" calcext:value-type="string">
            <text:p>3.6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8/06/2026</text:p>
          </table:table-cell>
          <table:table-cell table:style-name="ce141" office:value-type="string" calcext:value-type="string">
            <text:p>Nota</text:p>
          </table:table-cell>
          <table:table-cell table:style-name="ce12N2" office:value-type="float" office:value="103.6">
            <text:p>10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3.6">
            <text:p>10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E-5">
            <text:p>0,000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3.6">
            <text:p>103,60</text:p>
          </table:table-cell>
          <table:table-cell table:style-name="ce12N2" office:value-type="float" office:value="20.72">
            <text:p>2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39982555000111550010000036941617712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2">
            <text:p>3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096.01">
            <text:p>3096,01</text:p>
          </table:table-cell>
          <table:table-cell table:style-name="ce26N2" office:value-type="float" office:value="159287.36">
            <text:p>159287,36</text:p>
          </table:table-cell>
          <table:table-cell table:style-name="ce26N2" office:value-type="float" office:value="11011.24">
            <text:p>11011,2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42.33">
            <text:p>242,33</text:p>
          </table:table-cell>
          <table:table-cell table:style-name="ce26N2" office:value-type="float" office:value="163134.74">
            <text:p>163134,7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7.268807">
            <text:p>7,269</text:p>
          </table:table-cell>
          <table:table-cell table:style-name="ce26N2" office:value-type="float" office:value="160038.73">
            <text:p>160038,73</text:p>
          </table:table-cell>
          <table:table-cell table:style-name="ce26N2" office:value-type="float" office:value="163134.74">
            <text:p>163134,7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50.58">
            <text:p>550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7.34">
            <text:p>37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34" meta:object-count="0"/>
    <meta:generator>LibreOffice/4.3.0.4$Windows_x86 LibreOffice_project/62ad5818884a2fc2e5780dd45466868d41009ec0</meta:generator>
  </office:meta>
</office:document-meta>
</file>