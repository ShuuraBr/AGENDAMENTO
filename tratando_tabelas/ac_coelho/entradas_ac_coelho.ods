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04/05/2026 07:42:43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0155">
            <text:p>300155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60.35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1/2026</text:p>
          </table:table-cell>
          <table:table-cell table:style-name="ce0" office:value-type="string" calcext:value-type="string">
            <text:p>29/01/2026</text:p>
          </table:table-cell>
          <table:table-cell table:style-name="ce0" office:value-type="string" calcext:value-type="string">
            <text:p>26/02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6.21">
            <text:p>866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147">
            <text:p>0,015</text:p>
          </table:table-cell>
          <table:table-cell table:style-name="ce12N2" office:value-type="float" office:value="1.17">
            <text:p>1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6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1/2026</text:p>
          </table:table-cell>
          <table:table-cell table:style-name="ce12N2" office:value-type="float" office:value="27.26">
            <text:p>27,26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58.73">
            <text:p>5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05890658000300550030000603591859316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0446">
            <text:p>30044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3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1/2026</text:p>
          </table:table-cell>
          <table:table-cell table:style-name="ce0" office:value-type="string" calcext:value-type="string">
            <text:p>02/02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2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24855633000140550010000731981500237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6">
            <text:p>3051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5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93.13">
            <text:p>1809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988.85">
            <text:p>16988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8">
            <text:p>0,108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093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104.28">
            <text:p>1104,28</text:p>
          </table:table-cell>
          <table:table-cell table:style-name="ce12N2" office:value-type="float" office:value="16988.85">
            <text:p>16988,85</text:p>
          </table:table-cell>
          <table:table-cell table:style-name="ce12N2" office:value-type="float" office:value="1189.22">
            <text:p>118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59718773596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7">
            <text:p>305197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79.95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0.06">
            <text:p>2070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45.52">
            <text:p>2045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2892">
            <text:p>0,123</text:p>
          </table:table-cell>
          <table:table-cell table:style-name="ce12N2" office:value-type="float" office:value="16.63">
            <text:p>16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70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24.54">
            <text:p>24,54</text:p>
          </table:table-cell>
          <table:table-cell table:style-name="ce12N2" office:value-type="float" office:value="2045.52">
            <text:p>2045,52</text:p>
          </table:table-cell>
          <table:table-cell table:style-name="ce12N2" office:value-type="float" office:value="143.19">
            <text:p>14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799501247922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8">
            <text:p>305248</text:p>
          </table:table-cell>
          <table:table-cell table:style-name="ce0" table:number-columns-spanned="4" table:number-rows-spanned="1" office:value-type="string" calcext:value-type="string">
            <text:p>17.434 - SAINT-GOBAIN DO BRASIL PRODUTOS INDUSTRIAIS PARA CONST LTDA</text:p>
          </table:table-cell>
          <table:covered-table-cell table:number-columns-repeated="3"/>
          <table:table-cell table:style-name="ce0" office:value-type="string" calcext:value-type="string">
            <text:p>516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6.6">
            <text:p>482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4687.5">
            <text:p>468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2688">
            <text:p>0,363</text:p>
          </table:table-cell>
          <table:table-cell table:style-name="ce12N2" office:value-type="float" office:value="295.62">
            <text:p>295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39.1">
            <text:p>139,10</text:p>
          </table:table-cell>
          <table:table-cell table:style-name="ce12N2" office:value-type="float" office:value="4687.5">
            <text:p>4687,50</text:p>
          </table:table-cell>
          <table:table-cell table:style-name="ce12N2" office:value-type="float" office:value="198.3">
            <text:p>19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0648380165605500100051623917761966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6">
            <text:p>30545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4.23">
            <text:p>59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577.99">
            <text:p>577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3025">
            <text:p>0,203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6.24">
            <text:p>16,24</text:p>
          </table:table-cell>
          <table:table-cell table:style-name="ce12N2" office:value-type="float" office:value="577.99">
            <text:p>577,99</text:p>
          </table:table-cell>
          <table:table-cell table:style-name="ce12N2" office:value-type="float" office:value="23.13">
            <text:p>2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517838055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8">
            <text:p>30545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55.28">
            <text:p>205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039.04">
            <text:p>2039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9097">
            <text:p>0,209</text:p>
          </table:table-cell>
          <table:table-cell table:style-name="ce12N2" office:value-type="float" office:value="10.88">
            <text:p>10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55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6.24">
            <text:p>16,24</text:p>
          </table:table-cell>
          <table:table-cell table:style-name="ce12N2" office:value-type="float" office:value="2039.04">
            <text:p>2039,04</text:p>
          </table:table-cell>
          <table:table-cell table:style-name="ce12N2" office:value-type="float" office:value="81.57">
            <text:p>8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711356348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9">
            <text:p>30545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43.26">
            <text:p>3043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861.31">
            <text:p>2861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601">
            <text:p>0,246</text:p>
          </table:table-cell>
          <table:table-cell table:style-name="ce12N2" office:value-type="float" office:value="31.21">
            <text:p>31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43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81.95">
            <text:p>181,95</text:p>
          </table:table-cell>
          <table:table-cell table:style-name="ce12N2" office:value-type="float" office:value="2861.31">
            <text:p>2861,31</text:p>
          </table:table-cell>
          <table:table-cell table:style-name="ce12N2" office:value-type="float" office:value="114.45">
            <text:p>11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81361542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0">
            <text:p>30546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.62">
            <text:p>53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25.77">
            <text:p>525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2267">
            <text:p>0,172</text:p>
          </table:table-cell>
          <table:table-cell table:style-name="ce12N2" office:value-type="float" office:value="7.33">
            <text:p>7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2.85">
            <text:p>12,85</text:p>
          </table:table-cell>
          <table:table-cell table:style-name="ce12N2" office:value-type="float" office:value="525.77">
            <text:p>525,77</text:p>
          </table:table-cell>
          <table:table-cell table:style-name="ce12N2" office:value-type="float" office:value="21.04">
            <text:p>2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91144783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1">
            <text:p>30546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011028759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7">
            <text:p>30546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41374613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8">
            <text:p>3054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518640544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9">
            <text:p>30546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617305496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8">
            <text:p>3054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314033898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9">
            <text:p>3054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718834478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1">
            <text:p>3054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.8">
            <text:p>13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30.34">
            <text:p>130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644">
            <text:p>0,045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8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8.46">
            <text:p>8,46</text:p>
          </table:table-cell>
          <table:table-cell table:style-name="ce12N2" office:value-type="float" office:value="130.34">
            <text:p>130,34</text:p>
          </table:table-cell>
          <table:table-cell table:style-name="ce12N2" office:value-type="float" office:value="5.22">
            <text:p>5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913382543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2">
            <text:p>3054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819235574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7">
            <text:p>30555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8.34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18.24">
            <text:p>881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18.24">
            <text:p>8818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36">
            <text:p>0,017</text:p>
          </table:table-cell>
          <table:table-cell table:style-name="ce12N2" office:value-type="float" office:value="1.95">
            <text:p>1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18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18.24">
            <text:p>8818,24</text:p>
          </table:table-cell>
          <table:table-cell table:style-name="ce12N2" office:value-type="float" office:value="617.28">
            <text:p>61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834811245544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2">
            <text:p>3055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9.6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08.08">
            <text:p>5808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5636.94">
            <text:p>5636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27">
            <text:p>0,014</text:p>
          </table:table-cell>
          <table:table-cell table:style-name="ce12N2" office:value-type="float" office:value="9.09">
            <text:p>9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08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71.14">
            <text:p>171,14</text:p>
          </table:table-cell>
          <table:table-cell table:style-name="ce12N2" office:value-type="float" office:value="5636.94">
            <text:p>5636,94</text:p>
          </table:table-cell>
          <table:table-cell table:style-name="ce12N2" office:value-type="float" office:value="394.58">
            <text:p>39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965619699231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5">
            <text:p>30556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01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77.64">
            <text:p>657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77.64">
            <text:p>6577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908">
            <text:p>0,019</text:p>
          </table:table-cell>
          <table:table-cell table:style-name="ce12N2" office:value-type="float" office:value="3.36">
            <text:p>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77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77.64">
            <text:p>6577,64</text:p>
          </table:table-cell>
          <table:table-cell table:style-name="ce12N2" office:value-type="float" office:value="460.43">
            <text:p>46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01110690338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1">
            <text:p>305601</text:p>
          </table:table-cell>
          <table:table-cell table:style-name="ce0" table:number-columns-spanned="4" table:number-rows-spanned="1" office:value-type="string" calcext:value-type="string">
            <text:p>13.356 - H. IMPORTS IMPORTACAO E EXPORTACAO EIRELI-EPP</text:p>
          </table:table-cell>
          <table:covered-table-cell table:number-columns-repeated="3"/>
          <table:table-cell table:style-name="ce0" office:value-type="string" calcext:value-type="string">
            <text:p>51.3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8.82">
            <text:p>143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11">
            <text:p>131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38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27.82">
            <text:p>127,82</text:p>
          </table:table-cell>
          <table:table-cell table:style-name="ce12N2" office:value-type="float" office:value="1311">
            <text:p>1311,00</text:p>
          </table:table-cell>
          <table:table-cell table:style-name="ce12N2" office:value-type="float" office:value="52.44">
            <text:p>5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220913240001155500100005137314540804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2">
            <text:p>305602</text:p>
          </table:table-cell>
          <table:table-cell table:style-name="ce0" table:number-columns-spanned="4" table:number-rows-spanned="1" office:value-type="string" calcext:value-type="string">
            <text:p>34.228 - H. IMPORTS IMPORTACAO E EXPORTACAO LTDA</text:p>
          </table:table-cell>
          <table:covered-table-cell table:number-columns-repeated="3"/>
          <table:table-cell table:style-name="ce0" office:value-type="string" calcext:value-type="string">
            <text:p>6.37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4.54">
            <text:p>143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07.1">
            <text:p>130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34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">
            <text:p>7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27.44">
            <text:p>127,44</text:p>
          </table:table-cell>
          <table:table-cell table:style-name="ce12N2" office:value-type="float" office:value="1307.1">
            <text:p>1307,10</text:p>
          </table:table-cell>
          <table:table-cell table:style-name="ce12N2" office:value-type="float" office:value="52.28">
            <text:p>5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20913240002045500300000637814641504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3">
            <text:p>305603</text:p>
          </table:table-cell>
          <table:table-cell table:style-name="ce0" table:number-columns-spanned="4" table:number-rows-spanned="1" office:value-type="string" calcext:value-type="string">
            <text:p>34.228 - H. IMPORTS IMPORTACAO E EXPORTACAO LTDA</text:p>
          </table:table-cell>
          <table:covered-table-cell table:number-columns-repeated="3"/>
          <table:table-cell table:style-name="ce0" office:value-type="string" calcext:value-type="string">
            <text:p>6.38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33.85">
            <text:p>533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60">
            <text:p>48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33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473.85">
            <text:p>473,85</text:p>
          </table:table-cell>
          <table:table-cell table:style-name="ce12N2" office:value-type="float" office:value="4860">
            <text:p>4860,00</text:p>
          </table:table-cell>
          <table:table-cell table:style-name="ce12N2" office:value-type="float" office:value="194.4">
            <text:p>19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20913240002045500300000638214554947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24">
            <text:p>305624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6.5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.52">
            <text:p>16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4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">
            <text:p>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4.62">
            <text:p>14,62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4292449000002475500100006652711431384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88">
            <text:p>30568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4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20">
            <text:p>80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20">
            <text:p>80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84">
            <text:p>0,050</text:p>
          </table:table-cell>
          <table:table-cell table:style-name="ce12N2" office:value-type="float" office:value="11.4">
            <text:p>1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20">
            <text:p>8020,00</text:p>
          </table:table-cell>
          <table:table-cell table:style-name="ce12N2" office:value-type="float" office:value="561.4">
            <text:p>56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42318167494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89">
            <text:p>30568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2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08.81">
            <text:p>190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08.81">
            <text:p>1908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452">
            <text:p>0,020</text:p>
          </table:table-cell>
          <table:table-cell table:style-name="ce12N2" office:value-type="float" office:value="4.67">
            <text:p>4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08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08.81">
            <text:p>1908,81</text:p>
          </table:table-cell>
          <table:table-cell table:style-name="ce12N2" office:value-type="float" office:value="133.62">
            <text:p>13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28418445027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00">
            <text:p>30570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01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7">
            <text:p>0,022</text:p>
          </table:table-cell>
          <table:table-cell table:style-name="ce12N2" office:value-type="float" office:value="2.44">
            <text:p>2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02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771.6">
            <text:p>77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01318972095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04">
            <text:p>30570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9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01.16">
            <text:p>580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01.16">
            <text:p>5801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892">
            <text:p>0,010</text:p>
          </table:table-cell>
          <table:table-cell table:style-name="ce12N2" office:value-type="float" office:value="3.5">
            <text:p>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01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01.16">
            <text:p>5801,16</text:p>
          </table:table-cell>
          <table:table-cell table:style-name="ce12N2" office:value-type="float" office:value="406.08">
            <text:p>406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95010935640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1">
            <text:p>305711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0.56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08.11">
            <text:p>18508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6844">
            <text:p>168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32">
            <text:p>0,013</text:p>
          </table:table-cell>
          <table:table-cell table:style-name="ce12N2" office:value-type="float" office:value="16.15">
            <text:p>16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508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.95">
            <text:p>70,9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1664.11">
            <text:p>1664,11</text:p>
          </table:table-cell>
          <table:table-cell table:style-name="ce12N2" office:value-type="float" office:value="16844">
            <text:p>16844,00</text:p>
          </table:table-cell>
          <table:table-cell table:style-name="ce12N2" office:value-type="float" office:value="673.76">
            <text:p>67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56353460001405500200011056315057216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6">
            <text:p>305716</text:p>
          </table:table-cell>
          <table:table-cell table:style-name="ce0" table:number-columns-spanned="4" table:number-rows-spanned="1" office:value-type="string" calcext:value-type="string">
            <text:p>736 - BEMFIXA INDUSTRIAL LTDA</text:p>
          </table:table-cell>
          <table:covered-table-cell table:number-columns-repeated="3"/>
          <table:table-cell table:style-name="ce0" office:value-type="string" calcext:value-type="string">
            <text:p>210.2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3.18">
            <text:p>22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184.42">
            <text:p>2184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8">
            <text:p>0,002</text:p>
          </table:table-cell>
          <table:table-cell table:style-name="ce12N2" office:value-type="float" office:value="2.04">
            <text:p>2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6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78.76">
            <text:p>78,76</text:p>
          </table:table-cell>
          <table:table-cell table:style-name="ce12N2" office:value-type="float" office:value="2184.42">
            <text:p>2184,42</text:p>
          </table:table-cell>
          <table:table-cell table:style-name="ce12N2" office:value-type="float" office:value="152.91">
            <text:p>15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8019730001145500100021028215793436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7">
            <text:p>3057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2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8.4">
            <text:p>50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.4">
            <text:p>50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072">
            <text:p>0,003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8.4">
            <text:p>508,40</text:p>
          </table:table-cell>
          <table:table-cell table:style-name="ce12N2" office:value-type="float" office:value="35.59">
            <text:p>35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25610627152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49">
            <text:p>305749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0.63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82.48">
            <text:p>1058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023.4">
            <text:p>10023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2">
            <text:p>0,068</text:p>
          </table:table-cell>
          <table:table-cell table:style-name="ce12N2" office:value-type="float" office:value="49.1">
            <text:p>49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582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.62">
            <text:p>72,6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559.08">
            <text:p>559,08</text:p>
          </table:table-cell>
          <table:table-cell table:style-name="ce12N2" office:value-type="float" office:value="10023.4">
            <text:p>10023,40</text:p>
          </table:table-cell>
          <table:table-cell table:style-name="ce12N2" office:value-type="float" office:value="400.94">
            <text:p>40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56353460001405500200011063812822180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82">
            <text:p>305782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39.1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27.81">
            <text:p>972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8735.3">
            <text:p>873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03.75">
            <text:p>103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27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992.51">
            <text:p>992,51</text:p>
          </table:table-cell>
          <table:table-cell table:style-name="ce12N2" office:value-type="float" office:value="8735.3">
            <text:p>8735,30</text:p>
          </table:table-cell>
          <table:table-cell table:style-name="ce12N2" office:value-type="float" office:value="349.42">
            <text:p>349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05870170002855500100003916911098511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03">
            <text:p>30580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3.53">
            <text:p>87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3.53">
            <text:p>873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84">
            <text:p>0,001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73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3.53">
            <text:p>873,53</text:p>
          </table:table-cell>
          <table:table-cell table:style-name="ce12N2" office:value-type="float" office:value="61.15">
            <text:p>6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0715524998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0">
            <text:p>30582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1.02">
            <text:p>1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5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124.27">
            <text:p>1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331929481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3">
            <text:p>3058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001">
            <text:p>0,008</text:p>
          </table:table-cell>
          <table:table-cell table:style-name="ce12N2" office:value-type="float" office:value="3.1">
            <text:p>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02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126.16">
            <text:p>12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2211294236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8">
            <text:p>30582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41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28.48">
            <text:p>292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28.48">
            <text:p>2928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6">
            <text:p>0,005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28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8.48">
            <text:p>2928,48</text:p>
          </table:table-cell>
          <table:table-cell table:style-name="ce12N2" office:value-type="float" office:value="204.99">
            <text:p>20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41014401809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33">
            <text:p>3058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12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015.38">
            <text:p>4301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41146.7">
            <text:p>4114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4217">
            <text:p>0,164</text:p>
          </table:table-cell>
          <table:table-cell table:style-name="ce12N2" office:value-type="float" office:value="74.73">
            <text:p>74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015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1868.68">
            <text:p>1868,68</text:p>
          </table:table-cell>
          <table:table-cell table:style-name="ce12N2" office:value-type="float" office:value="41146.7">
            <text:p>41146,70</text:p>
          </table:table-cell>
          <table:table-cell table:style-name="ce12N2" office:value-type="float" office:value="2880.29">
            <text:p>2880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1291390092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1">
            <text:p>30586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8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424">
            <text:p>0,204</text:p>
          </table:table-cell>
          <table:table-cell table:style-name="ce12N2" office:value-type="float" office:value="81">
            <text:p>8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8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179.5">
            <text:p>17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85418274981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4">
            <text:p>305864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2.39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3.36">
            <text:p>159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3.36">
            <text:p>1593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5336">
            <text:p>0,105</text:p>
          </table:table-cell>
          <table:table-cell table:style-name="ce12N2" office:value-type="float" office:value="14.26">
            <text:p>1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93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3.36">
            <text:p>1593,36</text:p>
          </table:table-cell>
          <table:table-cell table:style-name="ce12N2" office:value-type="float" office:value="63.73">
            <text:p>63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823901225625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5">
            <text:p>305865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6.5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8">
            <text:p>0,258</text:p>
          </table:table-cell>
          <table:table-cell table:style-name="ce12N2" office:value-type="float" office:value="43">
            <text:p>4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55.2">
            <text:p>5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45422380001785500100009653310009633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6">
            <text:p>305866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6.7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8.87">
            <text:p>426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805.45">
            <text:p>380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68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.96">
            <text:p>52,9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463.42">
            <text:p>463,42</text:p>
          </table:table-cell>
          <table:table-cell table:style-name="ce12N2" office:value-type="float" office:value="3805.45">
            <text:p>3805,45</text:p>
          </table:table-cell>
          <table:table-cell table:style-name="ce12N2" office:value-type="float" office:value="152.22">
            <text:p>15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4292449000002475500100006674811691095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08">
            <text:p>30590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1912280999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6">
            <text:p>30592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313205233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8">
            <text:p>3059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415425760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0">
            <text:p>30593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519129137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1">
            <text:p>3059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115366248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3">
            <text:p>3059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311531934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4">
            <text:p>3059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410689356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5">
            <text:p>3059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514368757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6">
            <text:p>3059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61171361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0">
            <text:p>30595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4119310678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1">
            <text:p>30595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4018576831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2">
            <text:p>30595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4217995022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9">
            <text:p>30595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81660144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1">
            <text:p>30596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913875308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3">
            <text:p>30596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012166513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5">
            <text:p>30596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212872249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7">
            <text:p>30596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413542757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8">
            <text:p>3059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610155685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9">
            <text:p>30596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511086464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0">
            <text:p>3059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5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51814465461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7">
            <text:p>30597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4.56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7.39">
            <text:p>557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7.39">
            <text:p>557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7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7.39">
            <text:p>557,39</text:p>
          </table:table-cell>
          <table:table-cell table:style-name="ce12N2" office:value-type="float" office:value="39.02">
            <text:p>3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456614501061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9">
            <text:p>30597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7.41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5.86">
            <text:p>223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94.8">
            <text:p>209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6">
            <text:p>0,014</text:p>
          </table:table-cell>
          <table:table-cell table:style-name="ce12N2" office:value-type="float" office:value="2.44">
            <text:p>2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3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41.06">
            <text:p>141,06</text:p>
          </table:table-cell>
          <table:table-cell table:style-name="ce12N2" office:value-type="float" office:value="2094.8">
            <text:p>2094,80</text:p>
          </table:table-cell>
          <table:table-cell table:style-name="ce12N2" office:value-type="float" office:value="146.64">
            <text:p>14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741319687349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99">
            <text:p>30599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37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0.23">
            <text:p>143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42.94">
            <text:p>1342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30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87.29">
            <text:p>87,29</text:p>
          </table:table-cell>
          <table:table-cell table:style-name="ce12N2" office:value-type="float" office:value="1342.94">
            <text:p>1342,94</text:p>
          </table:table-cell>
          <table:table-cell table:style-name="ce12N2" office:value-type="float" office:value="94.01">
            <text:p>9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3791725851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02">
            <text:p>30600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9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5.63">
            <text:p>266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02.94">
            <text:p>2502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65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62.69">
            <text:p>162,69</text:p>
          </table:table-cell>
          <table:table-cell table:style-name="ce12N2" office:value-type="float" office:value="2502.94">
            <text:p>2502,94</text:p>
          </table:table-cell>
          <table:table-cell table:style-name="ce12N2" office:value-type="float" office:value="175.21">
            <text:p>175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94911551633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47">
            <text:p>30604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7.08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1.1">
            <text:p>102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1.1">
            <text:p>102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608">
            <text:p>0,011</text:p>
          </table:table-cell>
          <table:table-cell table:style-name="ce12N2" office:value-type="float" office:value="2.67">
            <text:p>2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21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1.1">
            <text:p>1021,10</text:p>
          </table:table-cell>
          <table:table-cell table:style-name="ce12N2" office:value-type="float" office:value="40.84">
            <text:p>4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70831848202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49">
            <text:p>30604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7.35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0.21">
            <text:p>366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45">
            <text:p>354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">
            <text:p>0,011</text:p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60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15.21">
            <text:p>115,21</text:p>
          </table:table-cell>
          <table:table-cell table:style-name="ce12N2" office:value-type="float" office:value="3545">
            <text:p>3545,00</text:p>
          </table:table-cell>
          <table:table-cell table:style-name="ce12N2" office:value-type="float" office:value="141.8">
            <text:p>14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735817225638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50">
            <text:p>30605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7.40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51.64">
            <text:p>415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993.25">
            <text:p>3993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02">
            <text:p>0,010</text:p>
          </table:table-cell>
          <table:table-cell table:style-name="ce12N2" office:value-type="float" office:value="18.95">
            <text:p>18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51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58.39">
            <text:p>158,39</text:p>
          </table:table-cell>
          <table:table-cell table:style-name="ce12N2" office:value-type="float" office:value="3993.25">
            <text:p>3993,25</text:p>
          </table:table-cell>
          <table:table-cell table:style-name="ce12N2" office:value-type="float" office:value="175.78">
            <text:p>17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740912251845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60">
            <text:p>306060</text:p>
          </table:table-cell>
          <table:table-cell table:style-name="ce0" table:number-columns-spanned="4" table:number-rows-spanned="1" office:value-type="string" calcext:value-type="string">
            <text:p>20.282 - LOTUS COMERCIAL DE FERRAGENS E FERRAMENTAS LTDA</text:p>
          </table:table-cell>
          <table:covered-table-cell table:number-columns-repeated="3"/>
          <table:table-cell table:style-name="ce0" office:value-type="string" calcext:value-type="string">
            <text:p>404.1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28.44">
            <text:p>422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152.95">
            <text:p>4152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08.9">
            <text:p>208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28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75.49">
            <text:p>75,49</text:p>
          </table:table-cell>
          <table:table-cell table:style-name="ce12N2" office:value-type="float" office:value="4152.95">
            <text:p>4152,95</text:p>
          </table:table-cell>
          <table:table-cell table:style-name="ce12N2" office:value-type="float" office:value="284.08">
            <text:p>28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4096425660001915500100040419310731661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56">
            <text:p>306156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199.4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33.03">
            <text:p>2733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647">
            <text:p>264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35">
            <text:p>0,000</text:p>
          </table:table-cell>
          <table:table-cell table:style-name="ce12N2" office:value-type="float" office:value="500">
            <text:p>5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33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86.03">
            <text:p>86,03</text:p>
          </table:table-cell>
          <table:table-cell table:style-name="ce12N2" office:value-type="float" office:value="2647">
            <text:p>2647,00</text:p>
          </table:table-cell>
          <table:table-cell table:style-name="ce12N2" office:value-type="float" office:value="185.29">
            <text:p>185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77187260001355500100019948911591425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0">
            <text:p>306160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2.71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6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810.62">
            <text:p>8481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83193.37">
            <text:p>83193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867016">
            <text:p>8,867</text:p>
          </table:table-cell>
          <table:table-cell table:style-name="ce12N2" office:value-type="float" office:value="1910.81">
            <text:p>191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.810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617.25">
            <text:p>1617,25</text:p>
          </table:table-cell>
          <table:table-cell table:style-name="ce12N2" office:value-type="float" office:value="83193.37">
            <text:p>83193,37</text:p>
          </table:table-cell>
          <table:table-cell table:style-name="ce12N2" office:value-type="float" office:value="5525.86">
            <text:p>552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827141379167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84">
            <text:p>306184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9.9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715.28">
            <text:p>43715,28</text:p>
          </table:table-cell>
          <table:table-cell table:style-name="ce12N2" office:value-type="float" office:value="2236.39">
            <text:p>2236,39</text:p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44727.8">
            <text:p>44727,80</text:p>
          </table:table-cell>
          <table:table-cell table:style-name="ce12N2" office:value-type="float" office:value="635">
            <text:p>635,00</text:p>
          </table:table-cell>
          <table:table-cell table:style-name="ce12N3" office:value-type="float" office:value="0.02844">
            <text:p>0,028</text:p>
          </table:table-cell>
          <table:table-cell table:style-name="ce12N2" office:value-type="float" office:value="67.83">
            <text:p>67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715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588.87">
            <text:p>588,87</text:p>
          </table:table-cell>
          <table:table-cell table:style-name="ce12N2" office:value-type="float" office:value="43126.41">
            <text:p>43126,41</text:p>
          </table:table-cell>
          <table:table-cell table:style-name="ce12N2" office:value-type="float" office:value="2687.18">
            <text:p>2687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45707420003295500100000999016971306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9">
            <text:p>306299</text:p>
          </table:table-cell>
          <table:table-cell table:style-name="ce0" table:number-columns-spanned="4" table:number-rows-spanned="1" office:value-type="string" calcext:value-type="string">
            <text:p>755 - CERAMICA ATLAS LTDA</text:p>
          </table:table-cell>
          <table:covered-table-cell table:number-columns-repeated="3"/>
          <table:table-cell table:style-name="ce0" office:value-type="string" calcext:value-type="string">
            <text:p>326.6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1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103.53">
            <text:p>10010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99457.05">
            <text:p>99457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37687">
            <text:p>0,638</text:p>
          </table:table-cell>
          <table:table-cell table:style-name="ce12N2" office:value-type="float" office:value="15558.85">
            <text:p>15558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0.103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">
            <text:p>1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646.48">
            <text:p>646,48</text:p>
          </table:table-cell>
          <table:table-cell table:style-name="ce12N2" office:value-type="float" office:value="99457.05">
            <text:p>99457,05</text:p>
          </table:table-cell>
          <table:table-cell table:style-name="ce12N2" office:value-type="float" office:value="6961.99">
            <text:p>6961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20506360001595500100032664514180892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8">
            <text:p>30632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10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54.7">
            <text:p>395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54.7">
            <text:p>395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25">
            <text:p>0,055</text:p>
          </table:table-cell>
          <table:table-cell table:style-name="ce12N2" office:value-type="float" office:value="14.5">
            <text:p>1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54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54.7">
            <text:p>3954,70</text:p>
          </table:table-cell>
          <table:table-cell table:style-name="ce12N2" office:value-type="float" office:value="276.83">
            <text:p>27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10116021297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0">
            <text:p>30633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40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72.82">
            <text:p>237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72.82">
            <text:p>2372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15">
            <text:p>0,033</text:p>
          </table:table-cell>
          <table:table-cell table:style-name="ce12N2" office:value-type="float" office:value="8.7">
            <text:p>8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72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72.82">
            <text:p>2372,82</text:p>
          </table:table-cell>
          <table:table-cell table:style-name="ce12N2" office:value-type="float" office:value="166.1">
            <text:p>16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40819726920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3">
            <text:p>3063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4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7.1">
            <text:p>80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7.1">
            <text:p>80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5">
            <text:p>0,011</text:p>
          </table:table-cell>
          <table:table-cell table:style-name="ce12N2" office:value-type="float" office:value="2.9">
            <text:p>2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7.1">
            <text:p>807,10</text:p>
          </table:table-cell>
          <table:table-cell table:style-name="ce12N2" office:value-type="float" office:value="56.5">
            <text:p>5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41218510065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9">
            <text:p>306339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6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6.18">
            <text:p>3766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66.18">
            <text:p>3766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6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">
            <text:p>3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66.18">
            <text:p>3766,18</text:p>
          </table:table-cell>
          <table:table-cell table:style-name="ce12N2" office:value-type="float" office:value="150.65">
            <text:p>150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69718604910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40">
            <text:p>306340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6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6.27">
            <text:p>936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15.61">
            <text:p>915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6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">
            <text:p>3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20.66">
            <text:p>20,66</text:p>
          </table:table-cell>
          <table:table-cell table:style-name="ce12N2" office:value-type="float" office:value="915.61">
            <text:p>915,61</text:p>
          </table:table-cell>
          <table:table-cell table:style-name="ce12N2" office:value-type="float" office:value="36.62">
            <text:p>3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69915051415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78">
            <text:p>306378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7.522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349.48">
            <text:p>9534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91519.49">
            <text:p>91519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0555">
            <text:p>0,806</text:p>
          </table:table-cell>
          <table:table-cell table:style-name="ce12N2" office:value-type="float" office:value="424.1">
            <text:p>424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.34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.61">
            <text:p>82,6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3829.99">
            <text:p>3829,99</text:p>
          </table:table-cell>
          <table:table-cell table:style-name="ce12N2" office:value-type="float" office:value="91519.49">
            <text:p>91519,49</text:p>
          </table:table-cell>
          <table:table-cell table:style-name="ce12N2" office:value-type="float" office:value="6406.35">
            <text:p>640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5479070001535500500031752213419347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97">
            <text:p>306397</text:p>
          </table:table-cell>
          <table:table-cell table:style-name="ce0" table:number-columns-spanned="4" table:number-rows-spanned="1" office:value-type="string" calcext:value-type="string">
            <text:p>709 - MAX EBERHARDT UTILIDADES DOMESTICAS IMPORTACAO E REPRES LTDA</text:p>
          </table:table-cell>
          <table:covered-table-cell table:number-columns-repeated="3"/>
          <table:table-cell table:style-name="ce0" office:value-type="string" calcext:value-type="string">
            <text:p>156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2.29">
            <text:p>2472,29</text:p>
          </table:table-cell>
          <table:table-cell table:style-name="ce12N2" office:value-type="float" office:value="60.1">
            <text:p>60,10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381.5">
            <text:p>238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3">
            <text:p>0,002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2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50.89">
            <text:p>150,89</text:p>
          </table:table-cell>
          <table:table-cell table:style-name="ce12N2" office:value-type="float" office:value="2321.4">
            <text:p>2321,40</text:p>
          </table:table-cell>
          <table:table-cell table:style-name="ce12N2" office:value-type="float" office:value="162.5">
            <text:p>16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69913340001295500100015611114370265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01">
            <text:p>306401</text:p>
          </table:table-cell>
          <table:table-cell table:style-name="ce0" table:number-columns-spanned="4" table:number-rows-spanned="1" office:value-type="string" calcext:value-type="string">
            <text:p>10.343 - INTERLIGHT SISTEMAS DE ILUMINACAO LTDA</text:p>
          </table:table-cell>
          <table:covered-table-cell table:number-columns-repeated="3"/>
          <table:table-cell table:style-name="ce0" office:value-type="string" calcext:value-type="string">
            <text:p>260.1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06.42">
            <text:p>9706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844.12">
            <text:p>884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06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58">
            <text:p>44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862.3">
            <text:p>862,30</text:p>
          </table:table-cell>
          <table:table-cell table:style-name="ce12N2" office:value-type="float" office:value="8844.12">
            <text:p>8844,12</text:p>
          </table:table-cell>
          <table:table-cell table:style-name="ce12N2" office:value-type="float" office:value="619.09">
            <text:p>61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83296080001445500100026015410026015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82">
            <text:p>82,00</text:p>
          </table:table-cell>
          <table:table-cell table:style-name="ce26N2" office:value-type="float" office:value="2296.49">
            <text:p>2296,49</text:p>
          </table:table-cell>
          <table:table-cell table:style-name="ce26N2" office:value-type="float" office:value="635">
            <text:p>63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6989.04">
            <text:p>16989,04</text:p>
          </table:table-cell>
          <table:table-cell table:style-name="ce26N2" office:value-type="float" office:value="551536.8">
            <text:p>551536,80</text:p>
          </table:table-cell>
          <table:table-cell table:style-name="ce26N2" office:value-type="float" office:value="35509.22">
            <text:p>35509,2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68525.84">
            <text:p>568525,8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3.227195">
            <text:p>13,227</text:p>
          </table:table-cell>
          <table:table-cell table:style-name="ce26N2" office:value-type="float" office:value="553198.29">
            <text:p>553198,29</text:p>
          </table:table-cell>
          <table:table-cell table:style-name="ce26N2" office:value-type="float" office:value="568525.84">
            <text:p>568525,8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9595.66">
            <text:p>19595,6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4.42">
            <text:p>44,4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AC COELH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234" meta:object-count="0"/>
    <meta:generator>LibreOffice/4.3.0.4$Windows_x86 LibreOffice_project/62ad5818884a2fc2e5780dd45466868d41009ec0</meta:generator>
  </office:meta>
</office:document-meta>
</file>