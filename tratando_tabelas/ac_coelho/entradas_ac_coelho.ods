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02/07/2026 04:30:31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8308">
            <text:p>308308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501425519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09">
            <text:p>30870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2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003.12">
            <text:p>19600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95971.36">
            <text:p>195971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98224">
            <text:p>1,698</text:p>
          </table:table-cell>
          <table:table-cell table:style-name="ce12N2" office:value-type="float" office:value="3298.68">
            <text:p>3298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6.00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5394.92">
            <text:p>165394,92</text:p>
          </table:table-cell>
          <table:table-cell table:style-name="ce12N2" office:value-type="float" office:value="165.4">
            <text:p>16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88.56">
            <text:p>1488,56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31.76">
            <text:p>31,76</text:p>
          </table:table-cell>
          <table:table-cell table:style-name="ce12N2" office:value-type="float" office:value="195971.36">
            <text:p>195971,36</text:p>
          </table:table-cell>
          <table:table-cell table:style-name="ce12N2" office:value-type="float" office:value="13717.99">
            <text:p>1371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0817616588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38">
            <text:p>308838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5.78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.79">
            <text:p>6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6.2">
            <text:p>6,2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4.45">
            <text:p>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0771810001335500300022578717896615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7">
            <text:p>309397</text:p>
          </table:table-cell>
          <table:table-cell table:style-name="ce0" table:number-columns-spanned="4" table:number-rows-spanned="1" office:value-type="string" calcext:value-type="string">
            <text:p>29.444 - PRIME BRAS SEGURANCA LTDA</text:p>
          </table:table-cell>
          <table:covered-table-cell table:number-columns-repeated="3"/>
          <table:table-cell table:style-name="ce0" office:value-type="string" calcext:value-type="string">
            <text:p>1.78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55">
            <text:p>715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155">
            <text:p>715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727">
            <text:p>0,087</text:p>
          </table:table-cell>
          <table:table-cell table:style-name="ce12N2" office:value-type="float" office:value="33.1">
            <text:p>3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55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55">
            <text:p>7155,00</text:p>
          </table:table-cell>
          <table:table-cell table:style-name="ce12N2" office:value-type="float" office:value="500.85">
            <text:p>50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22966690001695500300000178817823030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36">
            <text:p>309536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89.25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6.14">
            <text:p>393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36.14">
            <text:p>3936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26025">
            <text:p>0,326</text:p>
          </table:table-cell>
          <table:table-cell table:style-name="ce12N2" office:value-type="float" office:value="25.81">
            <text:p>25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6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22">
            <text:p>3322,00</text:p>
          </table:table-cell>
          <table:table-cell table:style-name="ce12N2" office:value-type="float" office:value="3.32">
            <text:p>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9">
            <text:p>29,9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36.14">
            <text:p>3936,14</text:p>
          </table:table-cell>
          <table:table-cell table:style-name="ce12N2" office:value-type="float" office:value="275.53">
            <text:p>275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3652230001545500200068925417550746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37">
            <text:p>309537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89.25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329.5">
            <text:p>2032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329.5">
            <text:p>20329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00872">
            <text:p>7,009</text:p>
          </table:table-cell>
          <table:table-cell table:style-name="ce12N2" office:value-type="float" office:value="117.6">
            <text:p>117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329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157.59">
            <text:p>17157,59</text:p>
          </table:table-cell>
          <table:table-cell table:style-name="ce12N2" office:value-type="float" office:value="17.16">
            <text:p>1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.42">
            <text:p>154,4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329.5">
            <text:p>20329,50</text:p>
          </table:table-cell>
          <table:table-cell table:style-name="ce12N2" office:value-type="float" office:value="1423.07">
            <text:p>1423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3652230001545500200068925615612165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3">
            <text:p>309563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6.64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77.43">
            <text:p>2777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90">
            <text:p>269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6">
            <text:p>0,004</text:p>
          </table:table-cell>
          <table:table-cell table:style-name="ce12N2" office:value-type="float" office:value="16.4">
            <text:p>16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77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70.29">
            <text:p>2270,29</text:p>
          </table:table-cell>
          <table:table-cell table:style-name="ce12N2" office:value-type="float" office:value="2.27">
            <text:p>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43">
            <text:p>20,43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87.43">
            <text:p>87,43</text:p>
          </table:table-cell>
          <table:table-cell table:style-name="ce12N2" office:value-type="float" office:value="2690">
            <text:p>2690,00</text:p>
          </table:table-cell>
          <table:table-cell table:style-name="ce12N2" office:value-type="float" office:value="188.3">
            <text:p>18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664213701525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4">
            <text:p>30956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6.64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20.87">
            <text:p>1520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3">
            <text:p>147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52">
            <text:p>0,004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20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3.18">
            <text:p>1243,18</text:p>
          </table:table-cell>
          <table:table-cell table:style-name="ce12N2" office:value-type="float" office:value="1.24">
            <text:p>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19">
            <text:p>11,19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47.87">
            <text:p>47,87</text:p>
          </table:table-cell>
          <table:table-cell table:style-name="ce12N2" office:value-type="float" office:value="1473">
            <text:p>1473,00</text:p>
          </table:table-cell>
          <table:table-cell table:style-name="ce12N2" office:value-type="float" office:value="103.11">
            <text:p>10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664419041171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6">
            <text:p>30956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6.64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77.43">
            <text:p>2777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90">
            <text:p>269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6">
            <text:p>0,004</text:p>
          </table:table-cell>
          <table:table-cell table:style-name="ce12N2" office:value-type="float" office:value="16.4">
            <text:p>16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77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70.29">
            <text:p>2270,29</text:p>
          </table:table-cell>
          <table:table-cell table:style-name="ce12N2" office:value-type="float" office:value="2.27">
            <text:p>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43">
            <text:p>20,43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87.43">
            <text:p>87,43</text:p>
          </table:table-cell>
          <table:table-cell table:style-name="ce12N2" office:value-type="float" office:value="2690">
            <text:p>2690,00</text:p>
          </table:table-cell>
          <table:table-cell table:style-name="ce12N2" office:value-type="float" office:value="188.3">
            <text:p>18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664318195877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7">
            <text:p>30956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1.52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37.52">
            <text:p>523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37.52">
            <text:p>5237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.58">
            <text:p>2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37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20.32">
            <text:p>4420,32</text:p>
          </table:table-cell>
          <table:table-cell table:style-name="ce12N2" office:value-type="float" office:value="4.42">
            <text:p>4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78">
            <text:p>39,7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37.52">
            <text:p>5237,52</text:p>
          </table:table-cell>
          <table:table-cell table:style-name="ce12N2" office:value-type="float" office:value="366.63">
            <text:p>366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152214368079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8">
            <text:p>30956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0.71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85.45">
            <text:p>4485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85.45">
            <text:p>448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419">
            <text:p>0,007</text:p>
          </table:table-cell>
          <table:table-cell table:style-name="ce12N2" office:value-type="float" office:value="2.62">
            <text:p>2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85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85.61">
            <text:p>3785,61</text:p>
          </table:table-cell>
          <table:table-cell table:style-name="ce12N2" office:value-type="float" office:value="3.79">
            <text:p>3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07">
            <text:p>34,0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85.45">
            <text:p>4485,45</text:p>
          </table:table-cell>
          <table:table-cell table:style-name="ce12N2" office:value-type="float" office:value="313.98">
            <text:p>313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071317788196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94">
            <text:p>309594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89.25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64.79">
            <text:p>2564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564.79">
            <text:p>2564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64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64.62">
            <text:p>2164,62</text:p>
          </table:table-cell>
          <table:table-cell table:style-name="ce12N2" office:value-type="float" office:value="2.16">
            <text:p>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48">
            <text:p>19,4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64.79">
            <text:p>2564,79</text:p>
          </table:table-cell>
          <table:table-cell table:style-name="ce12N2" office:value-type="float" office:value="179.54">
            <text:p>179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3652230001545500200068925518864121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07">
            <text:p>309607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06.8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73.09">
            <text:p>3073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00.08">
            <text:p>2800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896">
            <text:p>0,049</text:p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73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63.19">
            <text:p>2363,19</text:p>
          </table:table-cell>
          <table:table-cell table:style-name="ce12N2" office:value-type="float" office:value="2.36">
            <text:p>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27">
            <text:p>21,27</text:p>
          </table:table-cell>
          <table:table-cell table:style-name="ce12N2" office:value-type="float" office:value="91">
            <text:p>9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273.01">
            <text:p>273,01</text:p>
          </table:table-cell>
          <table:table-cell table:style-name="ce12N2" office:value-type="float" office:value="2800.08">
            <text:p>2800,08</text:p>
          </table:table-cell>
          <table:table-cell table:style-name="ce12N2" office:value-type="float" office:value="196.01">
            <text:p>196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0681318324982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29">
            <text:p>3096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10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14.93">
            <text:p>2114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953.93">
            <text:p>1953,93</text:p>
          </table:table-cell>
          <table:table-cell table:style-name="ce12N2" office:value-type="float" office:value="161">
            <text:p>161,00</text:p>
          </table:table-cell>
          <table:table-cell table:style-name="ce12N3" office:value-type="float" office:value="0.162623">
            <text:p>0,163</text:p>
          </table:table-cell>
          <table:table-cell table:style-name="ce12N2" office:value-type="float" office:value="43.61">
            <text:p>43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14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02.26">
            <text:p>1702,26</text:p>
          </table:table-cell>
          <table:table-cell table:style-name="ce12N2" office:value-type="float" office:value="1.69">
            <text:p>1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33">
            <text:p>15,3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14.93">
            <text:p>2114,93</text:p>
          </table:table-cell>
          <table:table-cell table:style-name="ce12N2" office:value-type="float" office:value="84.58">
            <text:p>84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10714647909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01">
            <text:p>309701</text:p>
          </table:table-cell>
          <table:table-cell table:style-name="ce0" table:number-columns-spanned="4" table:number-rows-spanned="1" office:value-type="string" calcext:value-type="string">
            <text:p>16.008 - MEKAL METALURGICA KADOW S.A.</text:p>
          </table:table-cell>
          <table:covered-table-cell table:number-columns-repeated="3"/>
          <table:table-cell table:style-name="ce0" office:value-type="string" calcext:value-type="string">
            <text:p>10.53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59.86">
            <text:p>1759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59.86">
            <text:p>1759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59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85.27">
            <text:p>1485,27</text:p>
          </table:table-cell>
          <table:table-cell table:style-name="ce12N2" office:value-type="float" office:value="1.49">
            <text:p>1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37">
            <text:p>13,3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59.86">
            <text:p>1759,86</text:p>
          </table:table-cell>
          <table:table-cell table:style-name="ce12N2" office:value-type="float" office:value="123.19">
            <text:p>12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70373920001805500300001053617362463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07">
            <text:p>30970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3.10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072.59">
            <text:p>35072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">
            <text:p>61,00</text:p>
          </table:table-cell>
          <table:table-cell table:style-name="ce12N2" office:value-type="float" office:value="34601.07">
            <text:p>34601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17491">
            <text:p>0,317</text:p>
          </table:table-cell>
          <table:table-cell table:style-name="ce12N2" office:value-type="float" office:value="72.8">
            <text:p>7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072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202.37">
            <text:p>29202,37</text:p>
          </table:table-cell>
          <table:table-cell table:style-name="ce12N2" office:value-type="float" office:value="29.2">
            <text:p>2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2.83">
            <text:p>262,8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471.52">
            <text:p>471,52</text:p>
          </table:table-cell>
          <table:table-cell table:style-name="ce12N2" office:value-type="float" office:value="34601.07">
            <text:p>34601,07</text:p>
          </table:table-cell>
          <table:table-cell table:style-name="ce12N2" office:value-type="float" office:value="2422.05">
            <text:p>242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310712681844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29">
            <text:p>309729</text:p>
          </table:table-cell>
          <table:table-cell table:style-name="ce0" table:number-columns-spanned="4" table:number-rows-spanned="1" office:value-type="string" calcext:value-type="string">
            <text:p>790 - JACKWAL S/A</text:p>
          </table:table-cell>
          <table:covered-table-cell table:number-columns-repeated="3"/>
          <table:table-cell table:style-name="ce0" office:value-type="string" calcext:value-type="string">
            <text:p>276.28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2.32">
            <text:p>482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4654.06">
            <text:p>4654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316">
            <text:p>0,005</text:p>
          </table:table-cell>
          <table:table-cell table:style-name="ce12N2" office:value-type="float" office:value="3.2">
            <text:p>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22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86.44">
            <text:p>3486,44</text:p>
          </table:table-cell>
          <table:table-cell table:style-name="ce12N2" office:value-type="float" office:value="3.48">
            <text:p>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37">
            <text:p>31,37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168.26">
            <text:p>168,26</text:p>
          </table:table-cell>
          <table:table-cell table:style-name="ce12N2" office:value-type="float" office:value="4654.06">
            <text:p>4654,06</text:p>
          </table:table-cell>
          <table:table-cell table:style-name="ce12N2" office:value-type="float" office:value="310.09">
            <text:p>31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27823660001885500300027628618702356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0">
            <text:p>309730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08.0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3708.84">
            <text:p>20370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03156.73">
            <text:p>203156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94713">
            <text:p>3,947</text:p>
          </table:table-cell>
          <table:table-cell table:style-name="ce12N2" office:value-type="float" office:value="1579.53">
            <text:p>1579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3.70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1459.21">
            <text:p>171459,21</text:p>
          </table:table-cell>
          <table:table-cell table:style-name="ce12N2" office:value-type="float" office:value="171.45">
            <text:p>171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3.13">
            <text:p>1543,13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552.11">
            <text:p>552,11</text:p>
          </table:table-cell>
          <table:table-cell table:style-name="ce12N2" office:value-type="float" office:value="203156.73">
            <text:p>203156,73</text:p>
          </table:table-cell>
          <table:table-cell table:style-name="ce12N2" office:value-type="float" office:value="14220.97">
            <text:p>14220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0808219398209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8">
            <text:p>3097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58.2">
            <text:p>405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58.2">
            <text:p>4058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63">
            <text:p>0,096</text:p>
          </table:table-cell>
          <table:table-cell table:style-name="ce12N2" office:value-type="float" office:value="16.52">
            <text:p>16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58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25.03">
            <text:p>3425,03</text:p>
          </table:table-cell>
          <table:table-cell table:style-name="ce12N2" office:value-type="float" office:value="3.43">
            <text:p>3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83">
            <text:p>30,8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58.2">
            <text:p>4058,20</text:p>
          </table:table-cell>
          <table:table-cell table:style-name="ce12N2" office:value-type="float" office:value="284.07">
            <text:p>284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811228332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54">
            <text:p>309754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91.34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27.47">
            <text:p>292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90.68">
            <text:p>2590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27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86.47">
            <text:p>2186,47</text:p>
          </table:table-cell>
          <table:table-cell table:style-name="ce12N2" office:value-type="float" office:value="2.19">
            <text:p>2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68">
            <text:p>19,68</text:p>
          </table:table-cell>
          <table:table-cell table:style-name="ce12N2" office:value-type="float" office:value="52.78">
            <text:p>52,7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336.79">
            <text:p>336,79</text:p>
          </table:table-cell>
          <table:table-cell table:style-name="ce12N2" office:value-type="float" office:value="2590.68">
            <text:p>2590,68</text:p>
          </table:table-cell>
          <table:table-cell table:style-name="ce12N2" office:value-type="float" office:value="181.35">
            <text:p>181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3652230001545500200069134115728012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55">
            <text:p>30975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4.3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952.53">
            <text:p>2295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12N2" office:value-type="float" office:value="22669.44">
            <text:p>2266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5356">
            <text:p>0,365</text:p>
          </table:table-cell>
          <table:table-cell table:style-name="ce12N2" office:value-type="float" office:value="89.26">
            <text:p>89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952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296.67">
            <text:p>19296,67</text:p>
          </table:table-cell>
          <table:table-cell table:style-name="ce12N2" office:value-type="float" office:value="19.3">
            <text:p>19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3.67">
            <text:p>173,67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283.09">
            <text:p>283,09</text:p>
          </table:table-cell>
          <table:table-cell table:style-name="ce12N2" office:value-type="float" office:value="22669.44">
            <text:p>22669,44</text:p>
          </table:table-cell>
          <table:table-cell table:style-name="ce12N2" office:value-type="float" office:value="1405.91">
            <text:p>1405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430117885818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64">
            <text:p>30976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3.71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43.52">
            <text:p>7143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143.52">
            <text:p>7143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2824">
            <text:p>0,083</text:p>
          </table:table-cell>
          <table:table-cell table:style-name="ce12N2" office:value-type="float" office:value="5.2">
            <text:p>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43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28.96">
            <text:p>6028,96</text:p>
          </table:table-cell>
          <table:table-cell table:style-name="ce12N2" office:value-type="float" office:value="6.03">
            <text:p>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26">
            <text:p>54,2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43.52">
            <text:p>7143,52</text:p>
          </table:table-cell>
          <table:table-cell table:style-name="ce12N2" office:value-type="float" office:value="500.05">
            <text:p>500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371614774098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65">
            <text:p>30976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3.72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52.31">
            <text:p>145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1448.04">
            <text:p>1448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645">
            <text:p>0,008</text:p>
          </table:table-cell>
          <table:table-cell table:style-name="ce12N2" office:value-type="float" office:value="3.42">
            <text:p>3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52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22.12">
            <text:p>1222,12</text:p>
          </table:table-cell>
          <table:table-cell table:style-name="ce12N2" office:value-type="float" office:value="1.24">
            <text:p>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98">
            <text:p>10,9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4.27">
            <text:p>4,27</text:p>
          </table:table-cell>
          <table:table-cell table:style-name="ce12N2" office:value-type="float" office:value="1448.04">
            <text:p>1448,04</text:p>
          </table:table-cell>
          <table:table-cell table:style-name="ce12N2" office:value-type="float" office:value="101.38">
            <text:p>10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372817893431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67">
            <text:p>30976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3.74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68.09">
            <text:p>136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325.92">
            <text:p>1325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205">
            <text:p>0,027</text:p>
          </table:table-cell>
          <table:table-cell table:style-name="ce12N2" office:value-type="float" office:value="2.22">
            <text:p>2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68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9.04">
            <text:p>1119,04</text:p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07">
            <text:p>10,0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42.17">
            <text:p>42,17</text:p>
          </table:table-cell>
          <table:table-cell table:style-name="ce12N2" office:value-type="float" office:value="1325.92">
            <text:p>1325,92</text:p>
          </table:table-cell>
          <table:table-cell table:style-name="ce12N2" office:value-type="float" office:value="92.81">
            <text:p>9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374715311257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49">
            <text:p>309849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9.0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30.35">
            <text:p>443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4348.58">
            <text:p>4348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67744">
            <text:p>0,268</text:p>
          </table:table-cell>
          <table:table-cell table:style-name="ce12N2" office:value-type="float" office:value="39.12">
            <text:p>39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30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70.07">
            <text:p>3670,07</text:p>
          </table:table-cell>
          <table:table-cell table:style-name="ce12N2" office:value-type="float" office:value="3.66">
            <text:p>3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04">
            <text:p>33,04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81.77">
            <text:p>81,77</text:p>
          </table:table-cell>
          <table:table-cell table:style-name="ce12N2" office:value-type="float" office:value="4348.58">
            <text:p>4348,58</text:p>
          </table:table-cell>
          <table:table-cell table:style-name="ce12N2" office:value-type="float" office:value="304.41">
            <text:p>304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6901818362224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51">
            <text:p>309851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08.7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2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841.22">
            <text:p>10841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594">
            <text:p>959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4912">
            <text:p>0,055</text:p>
          </table:table-cell>
          <table:table-cell table:style-name="ce12N2" office:value-type="float" office:value="37.34">
            <text:p>37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841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097.1">
            <text:p>8097,10</text:p>
          </table:table-cell>
          <table:table-cell table:style-name="ce12N2" office:value-type="float" office:value="8.1">
            <text:p>8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.87">
            <text:p>72,87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1247.22">
            <text:p>1247,22</text:p>
          </table:table-cell>
          <table:table-cell table:style-name="ce12N2" office:value-type="float" office:value="9594">
            <text:p>9594,00</text:p>
          </table:table-cell>
          <table:table-cell table:style-name="ce12N2" office:value-type="float" office:value="671.58">
            <text:p>671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0878418596887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66">
            <text:p>30986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5.23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63.93">
            <text:p>2663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01.34">
            <text:p>2501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56">
            <text:p>0,000</text:p>
          </table:table-cell>
          <table:table-cell table:style-name="ce12N2" office:value-type="float" office:value="0.25">
            <text:p>0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63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11.04">
            <text:p>2111,04</text:p>
          </table:table-cell>
          <table:table-cell table:style-name="ce12N2" office:value-type="float" office:value="2.11">
            <text:p>2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">
            <text:p>19,0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162.59">
            <text:p>162,59</text:p>
          </table:table-cell>
          <table:table-cell table:style-name="ce12N2" office:value-type="float" office:value="2501.34">
            <text:p>2501,34</text:p>
          </table:table-cell>
          <table:table-cell table:style-name="ce12N2" office:value-type="float" office:value="175.09">
            <text:p>175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523114403532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68">
            <text:p>309868</text:p>
          </table:table-cell>
          <table:table-cell table:style-name="ce0" table:number-columns-spanned="4" table:number-rows-spanned="1" office:value-type="string" calcext:value-type="string">
            <text:p>27.570 - DOCOL INDUSTRIA E COMERCIO LTDA</text:p>
          </table:table-cell>
          <table:covered-table-cell table:number-columns-repeated="3"/>
          <table:table-cell table:style-name="ce0" office:value-type="string" calcext:value-type="string">
            <text:p>19.39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80.52">
            <text:p>3580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580.52">
            <text:p>3580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80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21.87">
            <text:p>3021,87</text:p>
          </table:table-cell>
          <table:table-cell table:style-name="ce12N2" office:value-type="float" office:value="3.02">
            <text:p>3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2">
            <text:p>27,2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80.52">
            <text:p>3580,52</text:p>
          </table:table-cell>
          <table:table-cell table:style-name="ce12N2" office:value-type="float" office:value="250.63">
            <text:p>250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13855500200001939613481496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70">
            <text:p>309870</text:p>
          </table:table-cell>
          <table:table-cell table:style-name="ce0" table:number-columns-spanned="4" table:number-rows-spanned="1" office:value-type="string" calcext:value-type="string">
            <text:p>27.570 - DOCOL INDUSTRIA E COMERCIO LTDA</text:p>
          </table:table-cell>
          <table:covered-table-cell table:number-columns-repeated="3"/>
          <table:table-cell table:style-name="ce0" office:value-type="string" calcext:value-type="string">
            <text:p>19.40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37.22">
            <text:p>1437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37.22">
            <text:p>1437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37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2.98">
            <text:p>1212,98</text:p>
          </table:table-cell>
          <table:table-cell table:style-name="ce12N2" office:value-type="float" office:value="1.21">
            <text:p>1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92">
            <text:p>10,9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37.22">
            <text:p>1437,22</text:p>
          </table:table-cell>
          <table:table-cell table:style-name="ce12N2" office:value-type="float" office:value="100.61">
            <text:p>10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13855500200001940419549678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76">
            <text:p>309876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9.1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6">
            <text:p>132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6">
            <text:p>132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25">
            <text:p>0,212</text:p>
          </table:table-cell>
          <table:table-cell table:style-name="ce12N2" office:value-type="float" office:value="0.42">
            <text:p>0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33.18">
            <text:p>1233,18</text:p>
          </table:table-cell>
          <table:table-cell table:style-name="ce12N2" office:value-type="float" office:value="1.23">
            <text:p>1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1">
            <text:p>11,10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6">
            <text:p>1326,00</text:p>
          </table:table-cell>
          <table:table-cell table:style-name="ce12N2" office:value-type="float" office:value="92.82">
            <text:p>9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691131026826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77">
            <text:p>309877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83.2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02.51">
            <text:p>5102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102.51">
            <text:p>5102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3245">
            <text:p>0,053</text:p>
          </table:table-cell>
          <table:table-cell table:style-name="ce12N2" office:value-type="float" office:value="28.76">
            <text:p>28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02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40.53">
            <text:p>4340,53</text:p>
          </table:table-cell>
          <table:table-cell table:style-name="ce12N2" office:value-type="float" office:value="4.34">
            <text:p>4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07">
            <text:p>39,07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02.51">
            <text:p>5102,51</text:p>
          </table:table-cell>
          <table:table-cell table:style-name="ce12N2" office:value-type="float" office:value="319.56">
            <text:p>31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611441500006785500100128323010875856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79">
            <text:p>30987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6.0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.48">
            <text:p>10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.98">
            <text:p>99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8E-5">
            <text:p>0,000</text:p>
          </table:table-cell>
          <table:table-cell table:style-name="ce12N2" office:value-type="float" office:value="0.47">
            <text:p>0,4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6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.38">
            <text:p>84,38</text:p>
          </table:table-cell>
          <table:table-cell table:style-name="ce12N2" office:value-type="float" office:value="0.08">
            <text:p>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76">
            <text:p>0,7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6.5">
            <text:p>6,50</text:p>
          </table:table-cell>
          <table:table-cell table:style-name="ce12N2" office:value-type="float" office:value="99.98">
            <text:p>99,98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604913746976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80">
            <text:p>309880</text:p>
          </table:table-cell>
          <table:table-cell table:style-name="ce0" table:number-columns-spanned="4" table:number-rows-spanned="1" office:value-type="string" calcext:value-type="string">
            <text:p>38.379 - ASSA ABLOY BRASIL INDUSTRIA E COMERCIO LTDA</text:p>
          </table:table-cell>
          <table:covered-table-cell table:number-columns-repeated="3"/>
          <table:table-cell table:style-name="ce0" office:value-type="string" calcext:value-type="string">
            <text:p>222.30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51.12">
            <text:p>245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451.12">
            <text:p>2451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51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35.43">
            <text:p>2135,43</text:p>
          </table:table-cell>
          <table:table-cell table:style-name="ce12N2" office:value-type="float" office:value="2.13">
            <text:p>2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22">
            <text:p>19,2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51.12">
            <text:p>2451,12</text:p>
          </table:table-cell>
          <table:table-cell table:style-name="ce12N2" office:value-type="float" office:value="98.04">
            <text:p>9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52606022146040003285500300022230518117710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81">
            <text:p>309881</text:p>
          </table:table-cell>
          <table:table-cell table:style-name="ce0" table:number-columns-spanned="4" table:number-rows-spanned="1" office:value-type="string" calcext:value-type="string">
            <text:p>20.101 - SIMON MATERIAIS ELETRICOS E ELETRONICOS LTDA.</text:p>
          </table:table-cell>
          <table:covered-table-cell table:number-columns-repeated="3"/>
          <table:table-cell table:style-name="ce0" office:value-type="string" calcext:value-type="string">
            <text:p>88.1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381.71">
            <text:p>25381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">
            <text:p>32,00</text:p>
          </table:table-cell>
          <table:table-cell table:style-name="ce12N2" office:value-type="float" office:value="23771.99">
            <text:p>23771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8469">
            <text:p>1,185</text:p>
          </table:table-cell>
          <table:table-cell table:style-name="ce12N2" office:value-type="float" office:value="132.14">
            <text:p>13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381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077.31">
            <text:p>20077,31</text:p>
          </table:table-cell>
          <table:table-cell table:style-name="ce12N2" office:value-type="float" office:value="20.09">
            <text:p>2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0.66">
            <text:p>180,66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1609.72">
            <text:p>1609,72</text:p>
          </table:table-cell>
          <table:table-cell table:style-name="ce12N2" office:value-type="float" office:value="23545.24">
            <text:p>23545,24</text:p>
          </table:table-cell>
          <table:table-cell table:style-name="ce12N2" office:value-type="float" office:value="1648.19">
            <text:p>1648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071594300003615500100008813515977979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93">
            <text:p>30989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6.28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51.48">
            <text:p>1251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51.48">
            <text:p>1251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36">
            <text:p>0,005</text:p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51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6.22">
            <text:p>1056,22</text:p>
          </table:table-cell>
          <table:table-cell table:style-name="ce12N2" office:value-type="float" office:value="1.06">
            <text:p>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51">
            <text:p>9,5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51.48">
            <text:p>1251,48</text:p>
          </table:table-cell>
          <table:table-cell table:style-name="ce12N2" office:value-type="float" office:value="87.6">
            <text:p>8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628616446177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53">
            <text:p>309953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34.7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26.66">
            <text:p>1032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10185.74">
            <text:p>10185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9678">
            <text:p>0,370</text:p>
          </table:table-cell>
          <table:table-cell table:style-name="ce12N2" office:value-type="float" office:value="54.21">
            <text:p>54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326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596.48">
            <text:p>8596,48</text:p>
          </table:table-cell>
          <table:table-cell table:style-name="ce12N2" office:value-type="float" office:value="8.6">
            <text:p>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.38">
            <text:p>77,38</text:p>
          </table:table-cell>
          <table:table-cell table:style-name="ce12N2" office:value-type="float" office:value="62.62">
            <text:p>62,6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140.92">
            <text:p>140,92</text:p>
          </table:table-cell>
          <table:table-cell table:style-name="ce12N2" office:value-type="float" office:value="10185.74">
            <text:p>10185,74</text:p>
          </table:table-cell>
          <table:table-cell table:style-name="ce12N2" office:value-type="float" office:value="713.01">
            <text:p>713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09495280012325500100233472816454839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75">
            <text:p>30997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7.35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86.32">
            <text:p>148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86.32">
            <text:p>1486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36">
            <text:p>0,005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86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54.42">
            <text:p>1254,42</text:p>
          </table:table-cell>
          <table:table-cell table:style-name="ce12N2" office:value-type="float" office:value="1.25">
            <text:p>1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29">
            <text:p>11,2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86.32">
            <text:p>1486,32</text:p>
          </table:table-cell>
          <table:table-cell table:style-name="ce12N2" office:value-type="float" office:value="104.04">
            <text:p>10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735012568101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05">
            <text:p>31000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8.09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2.55">
            <text:p>922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22.55">
            <text:p>922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3">
            <text:p>0,002</text:p>
          </table:table-cell>
          <table:table-cell table:style-name="ce12N2" office:value-type="float" office:value="1.02">
            <text:p>1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22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8.61">
            <text:p>778,61</text:p>
          </table:table-cell>
          <table:table-cell table:style-name="ce12N2" office:value-type="float" office:value="0.78">
            <text:p>0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01">
            <text:p>7,0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2.55">
            <text:p>922,55</text:p>
          </table:table-cell>
          <table:table-cell table:style-name="ce12N2" office:value-type="float" office:value="64.58">
            <text:p>64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809016987877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07">
            <text:p>31000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8.11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20.28">
            <text:p>2720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0.28">
            <text:p>2720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94">
            <text:p>0,015</text:p>
          </table:table-cell>
          <table:table-cell table:style-name="ce12N2" office:value-type="float" office:value="9.64">
            <text:p>9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20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95.96">
            <text:p>2295,96</text:p>
          </table:table-cell>
          <table:table-cell table:style-name="ce12N2" office:value-type="float" office:value="2.29">
            <text:p>2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67">
            <text:p>20,6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20.28">
            <text:p>2720,28</text:p>
          </table:table-cell>
          <table:table-cell table:style-name="ce12N2" office:value-type="float" office:value="190.42">
            <text:p>190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811713229166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08">
            <text:p>31000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8.14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61.02">
            <text:p>3361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61.02">
            <text:p>3361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64">
            <text:p>0,001</text:p>
          </table:table-cell>
          <table:table-cell table:style-name="ce12N2" office:value-type="float" office:value="1.48">
            <text:p>1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61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36.62">
            <text:p>2836,62</text:p>
          </table:table-cell>
          <table:table-cell table:style-name="ce12N2" office:value-type="float" office:value="2.84">
            <text:p>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53">
            <text:p>25,5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61.02">
            <text:p>3361,02</text:p>
          </table:table-cell>
          <table:table-cell table:style-name="ce12N2" office:value-type="float" office:value="235.27">
            <text:p>235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814117505032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12">
            <text:p>31001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8.17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71.41">
            <text:p>871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1.41">
            <text:p>871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17">
            <text:p>0,004</text:p>
          </table:table-cell>
          <table:table-cell table:style-name="ce12N2" office:value-type="float" office:value="2.62">
            <text:p>2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71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5.45">
            <text:p>735,45</text:p>
          </table:table-cell>
          <table:table-cell table:style-name="ce12N2" office:value-type="float" office:value="0.74">
            <text:p>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62">
            <text:p>6,6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1.41">
            <text:p>871,41</text:p>
          </table:table-cell>
          <table:table-cell table:style-name="ce12N2" office:value-type="float" office:value="61">
            <text:p>6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817511172048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13">
            <text:p>31001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8.39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82.32">
            <text:p>578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82.32">
            <text:p>5782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856">
            <text:p>0,018</text:p>
          </table:table-cell>
          <table:table-cell table:style-name="ce12N2" office:value-type="float" office:value="8.93">
            <text:p>8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82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80.16">
            <text:p>4880,16</text:p>
          </table:table-cell>
          <table:table-cell table:style-name="ce12N2" office:value-type="float" office:value="4.88">
            <text:p>4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.92">
            <text:p>43,9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82.32">
            <text:p>5782,32</text:p>
          </table:table-cell>
          <table:table-cell table:style-name="ce12N2" office:value-type="float" office:value="404.76">
            <text:p>40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839417670120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18">
            <text:p>310018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6.4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62.54">
            <text:p>8862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8075.2">
            <text:p>8075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72">
            <text:p>0,013</text:p>
          </table:table-cell>
          <table:table-cell table:style-name="ce12N2" office:value-type="float" office:value="15.6">
            <text:p>15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62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075.2">
            <text:p>8075,20</text:p>
          </table:table-cell>
          <table:table-cell table:style-name="ce12N2" office:value-type="float" office:value="8.08">
            <text:p>8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.68">
            <text:p>72,68</text:p>
          </table:table-cell>
          <table:table-cell table:style-name="ce12N2" office:value-type="float" office:value="44.58">
            <text:p>44,5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787.34">
            <text:p>787,34</text:p>
          </table:table-cell>
          <table:table-cell table:style-name="ce12N2" office:value-type="float" office:value="8075.2">
            <text:p>8075,20</text:p>
          </table:table-cell>
          <table:table-cell table:style-name="ce12N2" office:value-type="float" office:value="565.26">
            <text:p>565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3296080001445500100026648710026648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0">
            <text:p>310060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6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372.93">
            <text:p>112372,93</text:p>
          </table:table-cell>
          <table:table-cell table:style-name="ce12N2" office:value-type="float" office:value="5694.8">
            <text:p>5694,80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13896">
            <text:p>113896,00</text:p>
          </table:table-cell>
          <table:table-cell table:style-name="ce12N2" office:value-type="float" office:value="1300">
            <text:p>1300,00</text:p>
          </table:table-cell>
          <table:table-cell table:style-name="ce12N3" office:value-type="float" office:value="0.1116">
            <text:p>0,112</text:p>
          </table:table-cell>
          <table:table-cell table:style-name="ce12N2" office:value-type="float" office:value="138.61">
            <text:p>138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2.372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918.88">
            <text:p>97918,88</text:p>
          </table:table-cell>
          <table:table-cell table:style-name="ce12N2" office:value-type="float" office:value="97.92">
            <text:p>97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1.27">
            <text:p>881,2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2871.73">
            <text:p>2871,73</text:p>
          </table:table-cell>
          <table:table-cell table:style-name="ce12N2" office:value-type="float" office:value="109501.2">
            <text:p>109501,20</text:p>
          </table:table-cell>
          <table:table-cell table:style-name="ce12N2" office:value-type="float" office:value="7585.52">
            <text:p>7585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145707420003295500100001066914013642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1">
            <text:p>310061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9.577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447.76">
            <text:p>133447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">
            <text:p>54,00</text:p>
          </table:table-cell>
          <table:table-cell table:style-name="ce12N2" office:value-type="float" office:value="128394.08">
            <text:p>128394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596138">
            <text:p>4,596</text:p>
          </table:table-cell>
          <table:table-cell table:style-name="ce12N2" office:value-type="float" office:value="1165.53">
            <text:p>1165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3.447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8361.32">
            <text:p>108361,32</text:p>
          </table:table-cell>
          <table:table-cell table:style-name="ce12N2" office:value-type="float" office:value="108.37">
            <text:p>108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5.24">
            <text:p>975,24</text:p>
          </table:table-cell>
          <table:table-cell table:style-name="ce12N2" office:value-type="float" office:value="82.67">
            <text:p>82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5053.68">
            <text:p>5053,68</text:p>
          </table:table-cell>
          <table:table-cell table:style-name="ce12N2" office:value-type="float" office:value="128394.08">
            <text:p>128394,08</text:p>
          </table:table-cell>
          <table:table-cell table:style-name="ce12N2" office:value-type="float" office:value="8987.59">
            <text:p>8987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5479070001535500500031957711020225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2">
            <text:p>31006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6.47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441.32">
            <text:p>4244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41532.48">
            <text:p>41532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1877">
            <text:p>0,319</text:p>
          </table:table-cell>
          <table:table-cell table:style-name="ce12N2" office:value-type="float" office:value="82.45">
            <text:p>82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.441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052.26">
            <text:p>35052,26</text:p>
          </table:table-cell>
          <table:table-cell table:style-name="ce12N2" office:value-type="float" office:value="35.05">
            <text:p>3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5.47">
            <text:p>315,4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908.84">
            <text:p>908,84</text:p>
          </table:table-cell>
          <table:table-cell table:style-name="ce12N2" office:value-type="float" office:value="41532.48">
            <text:p>41532,48</text:p>
          </table:table-cell>
          <table:table-cell table:style-name="ce12N2" office:value-type="float" office:value="2907.27">
            <text:p>2907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647713453430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71">
            <text:p>31007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56">
            <text:p>0,004</text:p>
          </table:table-cell>
          <table:table-cell table:style-name="ce12N2" office:value-type="float" office:value="5.27">
            <text:p>5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1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28.04">
            <text:p>2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512073437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98">
            <text:p>310098</text:p>
          </table:table-cell>
          <table:table-cell table:style-name="ce0" table:number-columns-spanned="4" table:number-rows-spanned="1" office:value-type="string" calcext:value-type="string">
            <text:p>7.808 - ABCC -REJUNTABRAS INDUSTRIA E COMERCIO LTDA</text:p>
          </table:table-cell>
          <table:covered-table-cell table:number-columns-repeated="3"/>
          <table:table-cell table:style-name="ce0" office:value-type="string" calcext:value-type="string">
            <text:p>97.4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581.57">
            <text:p>2758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27497.28">
            <text:p>27497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.326592">
            <text:p>21,327</text:p>
          </table:table-cell>
          <table:table-cell table:style-name="ce12N2" office:value-type="float" office:value="1220.7">
            <text:p>1220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.581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028.97">
            <text:p>23028,97</text:p>
          </table:table-cell>
          <table:table-cell table:style-name="ce12N2" office:value-type="float" office:value="23.02">
            <text:p>23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7.27">
            <text:p>207,27</text:p>
          </table:table-cell>
          <table:table-cell table:style-name="ce12N2" office:value-type="float" office:value="18">
            <text:p>1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84.29">
            <text:p>84,29</text:p>
          </table:table-cell>
          <table:table-cell table:style-name="ce12N2" office:value-type="float" office:value="27497.28">
            <text:p>27497,28</text:p>
          </table:table-cell>
          <table:table-cell table:style-name="ce12N2" office:value-type="float" office:value="1924.83">
            <text:p>1924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996.19">
            <text:p>99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2.141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9/06/2026</text:p>
          </table:table-cell>
          <table:table-cell table:style-name="ce12" office:value-type="string" calcext:value-type="string">
            <text:p>996,19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5260654542238000178550010000974241000972283</text:p>
          </table:table-cell>
          <table:table-cell table:style-name="ce0" office:value-type="string" calcext:value-type="string">
            <text:p>35260611389565000200570050004021411000885631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34">
            <text:p>31013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9.83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54.85">
            <text:p>2254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254.85">
            <text:p>2254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84">
            <text:p>0,038</text:p>
          </table:table-cell>
          <table:table-cell table:style-name="ce12N2" office:value-type="float" office:value="5.24">
            <text:p>5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54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03.04">
            <text:p>1903,04</text:p>
          </table:table-cell>
          <table:table-cell table:style-name="ce12N2" office:value-type="float" office:value="1.9">
            <text:p>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13">
            <text:p>17,1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54.85">
            <text:p>2254,85</text:p>
          </table:table-cell>
          <table:table-cell table:style-name="ce12N2" office:value-type="float" office:value="157.84">
            <text:p>157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983916586694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74">
            <text:p>310174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6.2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          </text:p>
          </table:table-cell>
          <table:table-cell table:style-name="ce122" office:value-type="string" calcext:value-type="string">
            <text:p>ADM</text:p>
          </table:table-cell>
          <table:table-cell table:style-name="ce12N2" office:value-type="float" office:value="308.29">
            <text:p>308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1.8">
            <text:p>231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8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1.8">
            <text:p>231,80</text:p>
          </table:table-cell>
          <table:table-cell table:style-name="ce12N2" office:value-type="float" office:value="0.23">
            <text:p>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09">
            <text:p>2,09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7/2026</text:p>
          </table:table-cell>
          <table:table-cell table:style-name="ce12N2" office:value-type="float" office:value="22.6">
            <text:p>22,60</text:p>
          </table:table-cell>
          <table:table-cell table:style-name="ce12N2" office:value-type="float" office:value="231.8">
            <text:p>231,80</text:p>
          </table:table-cell>
          <table:table-cell table:style-name="ce12N2" office:value-type="float" office:value="16.23">
            <text:p>16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89.51">
            <text:p>389,51</text:p>
          </table:table-cell>
          <table:table-cell table:style-name="ce12N2" office:value-type="float" office:value="53.89">
            <text:p>53,89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3296080001445500100026626510026626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50">
            <text:p>50,00</text:p>
          </table:table-cell>
          <table:table-cell table:style-name="ce26N2" office:value-type="float" office:value="5694.8">
            <text:p>5694,80</text:p>
          </table:table-cell>
          <table:table-cell table:style-name="ce26N2" office:value-type="float" office:value="1461">
            <text:p>1461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5369.11">
            <text:p>15369,11</text:p>
          </table:table-cell>
          <table:table-cell table:style-name="ce26N2" office:value-type="float" office:value="933674.44">
            <text:p>933674,44</text:p>
          </table:table-cell>
          <table:table-cell table:style-name="ce26N2" office:value-type="float" office:value="64885.4">
            <text:p>64885,4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996.19">
            <text:p>996,19</text:p>
          </table:table-cell>
          <table:table-cell table:style-name="ce26N2" office:value-type="float" office:value="949334.19">
            <text:p>949334,1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89.51">
            <text:p>389,51</text:p>
          </table:table-cell>
          <table:table-cell table:style-name="ce26N2" office:value-type="float" office:value="53.89">
            <text:p>53,8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42.799759">
            <text:p>42,800</text:p>
          </table:table-cell>
          <table:table-cell table:style-name="ce26N2" office:value-type="float" office:value="938144.99">
            <text:p>938144,99</text:p>
          </table:table-cell>
          <table:table-cell table:style-name="ce26N2" office:value-type="float" office:value="949334.19">
            <text:p>949334,1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87995.13">
            <text:p>787995,13</text:p>
          </table:table-cell>
          <table:table-cell table:style-name="ce26N2" office:value-type="float" office:value="787.99">
            <text:p>787,9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7091.97">
            <text:p>7091,97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8316.45">
            <text:p>8316,4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5.79">
            <text:p>65,7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AC COELH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462" meta:object-count="0"/>
    <meta:generator>LibreOffice/4.3.0.4$Windows_x86 LibreOffice_project/62ad5818884a2fc2e5780dd45466868d41009ec0</meta:generator>
  </office:meta>
</office:document-meta>
</file>