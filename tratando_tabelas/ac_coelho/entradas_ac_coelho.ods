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5/05/2026 07:59:54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4">
            <text:p>3056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52">
            <text:p>16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5271143138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6">
            <text:p>305716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3.18">
            <text:p>2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8">
            <text:p>0,002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78.76">
            <text:p>78,76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152.91">
            <text:p>15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8215793436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5">
            <text:p>30586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8">
            <text:p>0,258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55.2">
            <text:p>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4542238000178550010000965331000963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78">
            <text:p>30637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522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49.48">
            <text:p>9534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555">
            <text:p>0,806</text:p>
          </table:table-cell>
          <table:table-cell table:style-name="ce12N2" office:value-type="float" office:value="424.1">
            <text:p>42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34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.61">
            <text:p>82,6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3829.99">
            <text:p>3829,99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6406.35">
            <text:p>640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52213419347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4">
            <text:p>3064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0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206.95">
            <text:p>4020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753">
            <text:p>3775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">
            <text:p>0,24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20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453.95">
            <text:p>2453,95</text:p>
          </table:table-cell>
          <table:table-cell table:style-name="ce12N2" office:value-type="float" office:value="37753">
            <text:p>37753,00</text:p>
          </table:table-cell>
          <table:table-cell table:style-name="ce12N2" office:value-type="float" office:value="2642.71">
            <text:p>264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01416482142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6">
            <text:p>3064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4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798.26">
            <text:p>7979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696.44">
            <text:p>7969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90242">
            <text:p>0,990</text:p>
          </table:table-cell>
          <table:table-cell table:style-name="ce12N2" office:value-type="float" office:value="316.25">
            <text:p>31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79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01.82">
            <text:p>101,82</text:p>
          </table:table-cell>
          <table:table-cell table:style-name="ce12N2" office:value-type="float" office:value="79696.44">
            <text:p>79696,44</text:p>
          </table:table-cell>
          <table:table-cell table:style-name="ce12N2" office:value-type="float" office:value="5578.75">
            <text:p>557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47119164320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7">
            <text:p>3064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4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1.26">
            <text:p>533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16">
            <text:p>0,056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25.38">
            <text:p>325,38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350.41">
            <text:p>35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49917708381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8">
            <text:p>3064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5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736">
            <text:p>0,009</text:p>
          </table:table-cell>
          <table:table-cell table:style-name="ce12N2" office:value-type="float" office:value="2.32">
            <text:p>2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0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210.39">
            <text:p>21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54912247987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01">
            <text:p>3065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6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3">
            <text:p>0,00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7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404.55">
            <text:p>40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624195505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6">
            <text:p>30653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59">
            <text:p>0,022</text:p>
          </table:table-cell>
          <table:table-cell table:style-name="ce12N2" office:value-type="float" office:value="29.29">
            <text:p>2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0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41503152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7">
            <text:p>30653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2728">
            <text:p>0,583</text:p>
          </table:table-cell>
          <table:table-cell table:style-name="ce12N2" office:value-type="float" office:value="76.55">
            <text:p>76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45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212522509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8">
            <text:p>30656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75.54">
            <text:p>3277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3129">
            <text:p>1,031</text:p>
          </table:table-cell>
          <table:table-cell table:style-name="ce12N2" office:value-type="float" office:value="102.16">
            <text:p>102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775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.35">
            <text:p>83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210.32">
            <text:p>1210,32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2209.57">
            <text:p>220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6781577672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59">
            <text:p>30665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904">
            <text:p>0,041</text:p>
          </table:table-cell>
          <table:table-cell table:style-name="ce12N2" office:value-type="float" office:value="9.34">
            <text:p>9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3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259.22">
            <text:p>25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461841845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1">
            <text:p>3066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60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172.27">
            <text:p>17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231488772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2">
            <text:p>3066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968">
            <text:p>0,010</text:p>
          </table:table-cell>
          <table:table-cell table:style-name="ce12N2" office:value-type="float" office:value="2.28">
            <text:p>2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112.28">
            <text:p>1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121026499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8">
            <text:p>306668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46.24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0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76.84">
            <text:p>7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582901000001522550100001462471179714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9">
            <text:p>306669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46.254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0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384.22">
            <text:p>384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582901000001522550100001462541960234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2">
            <text:p>3066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0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08">
            <text:p>0,015</text:p>
          </table:table-cell>
          <table:table-cell table:style-name="ce12N2" office:value-type="float" office:value="4.43">
            <text:p>4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314.73">
            <text:p>31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0731926027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6">
            <text:p>306716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6.84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.8">
            <text:p>14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9.67">
            <text:p>9,67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11.09">
            <text:p>1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68441492652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69">
            <text:p>306769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32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2.28">
            <text:p>50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12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45.28">
            <text:p>445,28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319.68">
            <text:p>3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616460000152550020000713281306751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3">
            <text:p>3067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92">
            <text:p>287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75.53">
            <text:p>175,53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108.02">
            <text:p>10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91705951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4">
            <text:p>3067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7.28">
            <text:p>191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0.26">
            <text:p>180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7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17.02">
            <text:p>117,02</text:p>
          </table:table-cell>
          <table:table-cell table:style-name="ce12N2" office:value-type="float" office:value="1800.26">
            <text:p>1800,26</text:p>
          </table:table-cell>
          <table:table-cell table:style-name="ce12N2" office:value-type="float" office:value="72.01">
            <text:p>7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6012700590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1">
            <text:p>30680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3.0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34.01">
            <text:p>2643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5783.04">
            <text:p>25783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642">
            <text:p>0,476</text:p>
          </table:table-cell>
          <table:table-cell table:style-name="ce12N2" office:value-type="float" office:value="56.65">
            <text:p>56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434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650.97">
            <text:p>650,97</text:p>
          </table:table-cell>
          <table:table-cell table:style-name="ce12N2" office:value-type="float" office:value="25783.04">
            <text:p>25783,04</text:p>
          </table:table-cell>
          <table:table-cell table:style-name="ce12N2" office:value-type="float" office:value="1265.66">
            <text:p>126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30371035091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6">
            <text:p>306816</text:p>
          </table:table-cell>
          <table:table-cell table:style-name="ce0" table:number-columns-spanned="4" table:number-rows-spanned="1" office:value-type="string" calcext:value-type="string">
            <text:p>38.321 - S&amp;P BRASIL VENTILACAO LTDA.</text:p>
          </table:table-cell>
          <table:covered-table-cell table:number-columns-repeated="3"/>
          <table:table-cell table:style-name="ce0" office:value-type="string" calcext:value-type="string">
            <text:p>35.5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01.28">
            <text:p>790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01.28">
            <text:p>7901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01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01.28">
            <text:p>7901,28</text:p>
          </table:table-cell>
          <table:table-cell table:style-name="ce12N2" office:value-type="float" office:value="316.05">
            <text:p>3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26595070004125500100003555111600083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6">
            <text:p>306826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0.441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31.62">
            <text:p>453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473.82">
            <text:p>4473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0978">
            <text:p>0,181</text:p>
          </table:table-cell>
          <table:table-cell table:style-name="ce12N2" office:value-type="float" office:value="29.27">
            <text:p>29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3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75">
            <text:p>75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57.8">
            <text:p>57,80</text:p>
          </table:table-cell>
          <table:table-cell table:style-name="ce12N2" office:value-type="float" office:value="4473.82">
            <text:p>4473,82</text:p>
          </table:table-cell>
          <table:table-cell table:style-name="ce12N2" office:value-type="float" office:value="183">
            <text:p>1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308456000149550050004504411200487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9">
            <text:p>3068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4.7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03.8">
            <text:p>1910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103.8">
            <text:p>1910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7">
            <text:p>0,051</text:p>
          </table:table-cell>
          <table:table-cell table:style-name="ce12N2" office:value-type="float" office:value="54.16">
            <text:p>5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0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03.8">
            <text:p>19103,80</text:p>
          </table:table-cell>
          <table:table-cell table:style-name="ce12N2" office:value-type="float" office:value="1337.27">
            <text:p>133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47491202405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5">
            <text:p>3069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6.0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7">
            <text:p>0,022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2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771.6">
            <text:p>7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60711913994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20">
            <text:p>30702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6.3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2272">
            <text:p>0,142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122.98">
            <text:p>12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631917554164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4">
            <text:p>307044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80.74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0.8">
            <text:p>76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0.8">
            <text:p>7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78">
            <text:p>0,092</text:p>
          </table:table-cell>
          <table:table-cell table:style-name="ce12N2" office:value-type="float" office:value="14.15">
            <text:p>1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0.8">
            <text:p>760,80</text:p>
          </table:table-cell>
          <table:table-cell table:style-name="ce12N2" office:value-type="float" office:value="53.26">
            <text:p>5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842870001045500200178074315028590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5">
            <text:p>30704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80.74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2.17">
            <text:p>133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2.17">
            <text:p>1332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488">
            <text:p>0,017</text:p>
          </table:table-cell>
          <table:table-cell table:style-name="ce12N2" office:value-type="float" office:value="8.85">
            <text:p>8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2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2.17">
            <text:p>1332,17</text:p>
          </table:table-cell>
          <table:table-cell table:style-name="ce12N2" office:value-type="float" office:value="53.29">
            <text:p>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84287000104550020017807421113944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6">
            <text:p>307046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80.74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49.24">
            <text:p>39549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6406.48">
            <text:p>36406,48</text:p>
          </table:table-cell>
          <table:table-cell table:style-name="ce12N2" office:value-type="float" office:value="1877.94">
            <text:p>1877,94</text:p>
          </table:table-cell>
          <table:table-cell table:style-name="ce12N3" office:value-type="float" office:value="2.71203">
            <text:p>2,712</text:p>
          </table:table-cell>
          <table:table-cell table:style-name="ce12N2" office:value-type="float" office:value="520.9">
            <text:p>52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549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1264.82">
            <text:p>1264,82</text:p>
          </table:table-cell>
          <table:table-cell table:style-name="ce12N2" office:value-type="float" office:value="38284.42">
            <text:p>38284,42</text:p>
          </table:table-cell>
          <table:table-cell table:style-name="ce12N2" office:value-type="float" office:value="2330.38">
            <text:p>233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842870001045500200178074116689682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8">
            <text:p>30704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1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12.1">
            <text:p>791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12.1">
            <text:p>791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1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12.1">
            <text:p>7912,10</text:p>
          </table:table-cell>
          <table:table-cell table:style-name="ce12N2" office:value-type="float" office:value="553.85">
            <text:p>55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12115138697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2">
            <text:p>307062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5.4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092.8">
            <text:p>9409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3172">
            <text:p>931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22527">
            <text:p>2,123</text:p>
          </table:table-cell>
          <table:table-cell table:style-name="ce12N2" office:value-type="float" office:value="493.99">
            <text:p>493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4.09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20.8">
            <text:p>920,80</text:p>
          </table:table-cell>
          <table:table-cell table:style-name="ce12N2" office:value-type="float" office:value="92335.42">
            <text:p>92335,42</text:p>
          </table:table-cell>
          <table:table-cell table:style-name="ce12N2" office:value-type="float" office:value="5743.16">
            <text:p>574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549112286539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3">
            <text:p>307073</text:p>
          </table:table-cell>
          <table:table-cell table:style-name="ce0" table:number-columns-spanned="4" table:number-rows-spanned="1" office:value-type="string" calcext:value-type="string">
            <text:p>790 - JACKWAL S/A</text:p>
          </table:table-cell>
          <table:covered-table-cell table:number-columns-repeated="3"/>
          <table:table-cell table:style-name="ce0" office:value-type="string" calcext:value-type="string">
            <text:p>275.19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4.72">
            <text:p>783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524.33">
            <text:p>7524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10.39">
            <text:p>310,39</text:p>
          </table:table-cell>
          <table:table-cell table:style-name="ce12N2" office:value-type="float" office:value="7524.33">
            <text:p>7524,33</text:p>
          </table:table-cell>
          <table:table-cell table:style-name="ce12N2" office:value-type="float" office:value="526.7">
            <text:p>5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2782366000188550030002751961654432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3">
            <text:p>3071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7.1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5.79">
            <text:p>426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4131">
            <text:p>0,484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6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2.91">
            <text:p>42,91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281.12">
            <text:p>28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717316183353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2">
            <text:p>3071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7.2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61.14">
            <text:p>2076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61.14">
            <text:p>20761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2">
            <text:p>0,012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761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61.14">
            <text:p>20761,14</text:p>
          </table:table-cell>
          <table:table-cell table:style-name="ce12N2" office:value-type="float" office:value="1453.28">
            <text:p>145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72551066202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6">
            <text:p>307146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62.15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81.9">
            <text:p>658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81.9">
            <text:p>6581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16.22">
            <text:p>416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81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81.9">
            <text:p>6581,90</text:p>
          </table:table-cell>
          <table:table-cell table:style-name="ce12N2" office:value-type="float" office:value="460.73">
            <text:p>46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365223000154550020006621501364814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9">
            <text:p>30715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0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3.35">
            <text:p>1603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27">
            <text:p>152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265">
            <text:p>0,053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3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6.35">
            <text:p>76,35</text:p>
          </table:table-cell>
          <table:table-cell table:style-name="ce12N2" office:value-type="float" office:value="1527">
            <text:p>1527,00</text:p>
          </table:table-cell>
          <table:table-cell table:style-name="ce12N2" office:value-type="float" office:value="106.89">
            <text:p>10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0415007735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1">
            <text:p>3071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7.7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96">
            <text:p>0,001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0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342.32">
            <text:p>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778417509298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2">
            <text:p>30716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5.87">
            <text:p>118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9.4">
            <text:p>11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1">
            <text:p>0,035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5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6.47">
            <text:p>56,47</text:p>
          </table:table-cell>
          <table:table-cell table:style-name="ce12N2" office:value-type="float" office:value="1129.4">
            <text:p>1129,40</text:p>
          </table:table-cell>
          <table:table-cell table:style-name="ce12N2" office:value-type="float" office:value="79.06">
            <text:p>7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1711611450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1">
            <text:p>3071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112007302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3">
            <text:p>3071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819917936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4">
            <text:p>3071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21347149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1">
            <text:p>307181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4.0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.2">
            <text:p>42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26.2">
            <text:p>42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">
            <text:p>0,003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">
            <text:p>7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6.2">
            <text:p>426,20</text:p>
          </table:table-cell>
          <table:table-cell table:style-name="ce12N2" office:value-type="float" office:value="29.84">
            <text:p>2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407119030903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3">
            <text:p>30718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95.18">
            <text:p>12695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1935.6">
            <text:p>1193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98">
            <text:p>0,070</text:p>
          </table:table-cell>
          <table:table-cell table:style-name="ce12N2" office:value-type="float" office:value="31.68">
            <text:p>3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69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59.58">
            <text:p>759,58</text:p>
          </table:table-cell>
          <table:table-cell table:style-name="ce12N2" office:value-type="float" office:value="11935.6">
            <text:p>11935,60</text:p>
          </table:table-cell>
          <table:table-cell table:style-name="ce12N2" office:value-type="float" office:value="614.43">
            <text:p>61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4711551624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1">
            <text:p>3072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205.07">
            <text:p>20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216618409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5">
            <text:p>30723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61140036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2">
            <text:p>3072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72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32">
            <text:p>0,008</text:p>
          </table:table-cell>
          <table:table-cell table:style-name="ce12N2" office:value-type="float" office:value="1.9">
            <text:p>1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87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132.09">
            <text:p>13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7251174884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5">
            <text:p>307265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2.49">
            <text:p>370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37.49">
            <text:p>3437,49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2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2.49">
            <text:p>3702,49</text:p>
          </table:table-cell>
          <table:table-cell table:style-name="ce12N2" office:value-type="float" office:value="259.17">
            <text:p>25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27254297000178550010000105531584622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8">
            <text:p>307278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7.1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09.55">
            <text:p>2970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29280.46">
            <text:p>29280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9578">
            <text:p>0,696</text:p>
          </table:table-cell>
          <table:table-cell table:style-name="ce12N2" office:value-type="float" office:value="130.96">
            <text:p>13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70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429.09">
            <text:p>429,09</text:p>
          </table:table-cell>
          <table:table-cell table:style-name="ce12N2" office:value-type="float" office:value="29280.46">
            <text:p>29280,46</text:p>
          </table:table-cell>
          <table:table-cell table:style-name="ce12N2" office:value-type="float" office:value="1794.18">
            <text:p>179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714415821550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7">
            <text:p>307297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0.2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14.33">
            <text:p>331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10">
            <text:p>32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14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04.33">
            <text:p>104,33</text:p>
          </table:table-cell>
          <table:table-cell table:style-name="ce12N2" office:value-type="float" office:value="3210">
            <text:p>3210,00</text:p>
          </table:table-cell>
          <table:table-cell table:style-name="ce12N2" office:value-type="float" office:value="224.7">
            <text:p>22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7718726000135550010002002511236212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0">
            <text:p>3073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78.63">
            <text:p>7078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46.6">
            <text:p>664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25">
            <text:p>0,043</text:p>
          </table:table-cell>
          <table:table-cell table:style-name="ce12N2" office:value-type="float" office:value="9.6">
            <text:p>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78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432.03">
            <text:p>432,03</text:p>
          </table:table-cell>
          <table:table-cell table:style-name="ce12N2" office:value-type="float" office:value="6646.6">
            <text:p>6646,60</text:p>
          </table:table-cell>
          <table:table-cell table:style-name="ce12N2" office:value-type="float" office:value="465.26">
            <text:p>465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451885129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4">
            <text:p>3073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2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904">
            <text:p>0,030</text:p>
          </table:table-cell>
          <table:table-cell table:style-name="ce12N2" office:value-type="float" office:value="6.84">
            <text:p>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6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347.47">
            <text:p>34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2151526143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6">
            <text:p>3073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04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147.28">
            <text:p>14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8413178758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56">
            <text:p>56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142.94">
            <text:p>2142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3867.88">
            <text:p>13867,88</text:p>
          </table:table-cell>
          <table:table-cell table:style-name="ce26N2" office:value-type="float" office:value="608885.96">
            <text:p>608885,96</text:p>
          </table:table-cell>
          <table:table-cell table:style-name="ce26N2" office:value-type="float" office:value="40115.94">
            <text:p>40115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55815.83">
            <text:p>655815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1.364159">
            <text:p>11,364</text:p>
          </table:table-cell>
          <table:table-cell table:style-name="ce26N2" office:value-type="float" office:value="639805.01">
            <text:p>639805,01</text:p>
          </table:table-cell>
          <table:table-cell table:style-name="ce26N2" office:value-type="float" office:value="655815.83">
            <text:p>655815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991.18">
            <text:p>2991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2.17">
            <text:p>52,1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22" meta:object-count="0"/>
    <meta:generator>LibreOffice/4.3.0.4$Windows_x86 LibreOffice_project/62ad5818884a2fc2e5780dd45466868d41009ec0</meta:generator>
  </office:meta>
</office:document-meta>
</file>