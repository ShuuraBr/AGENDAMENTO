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5/2026 07:28:1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6">
            <text:p>306816</text:p>
          </table:table-cell>
          <table:table-cell table:style-name="ce0" table:number-columns-spanned="4" table:number-rows-spanned="1" office:value-type="string" calcext:value-type="string">
            <text:p>38.321 - S&amp;P BRASIL VENTILACAO LTDA.</text:p>
          </table:table-cell>
          <table:covered-table-cell table:number-columns-repeated="3"/>
          <table:table-cell table:style-name="ce0" office:value-type="string" calcext:value-type="string">
            <text:p>35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316.05">
            <text:p>3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2659507000412550010000355511160008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6">
            <text:p>30682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0.44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1.62">
            <text:p>453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978">
            <text:p>0,181</text:p>
          </table:table-cell>
          <table:table-cell table:style-name="ce12N2" office:value-type="float" office:value="29.27">
            <text:p>2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183">
            <text:p>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0441120048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9">
            <text:p>306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4.7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">
            <text:p>0,051</text:p>
          </table:table-cell>
          <table:table-cell table:style-name="ce12N2" office:value-type="float" office:value="54.16">
            <text:p>5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0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1337.27">
            <text:p>133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4749120240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6">
            <text:p>307046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9.24">
            <text:p>3954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6406.48">
            <text:p>36406,48</text:p>
          </table:table-cell>
          <table:table-cell table:style-name="ce12N2" office:value-type="float" office:value="1877.94">
            <text:p>1877,94</text:p>
          </table:table-cell>
          <table:table-cell table:style-name="ce12N3" office:value-type="float" office:value="2.71203">
            <text:p>2,712</text:p>
          </table:table-cell>
          <table:table-cell table:style-name="ce12N2" office:value-type="float" office:value="520.9">
            <text:p>5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4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264.82">
            <text:p>1264,82</text:p>
          </table:table-cell>
          <table:table-cell table:style-name="ce12N2" office:value-type="float" office:value="38284.42">
            <text:p>38284,42</text:p>
          </table:table-cell>
          <table:table-cell table:style-name="ce12N2" office:value-type="float" office:value="2330.38">
            <text:p>233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11668968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8">
            <text:p>3070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2.1">
            <text:p>7912,10</text:p>
          </table:table-cell>
          <table:table-cell table:style-name="ce12N2" office:value-type="float" office:value="553.85">
            <text:p>55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211513869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2">
            <text:p>30706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092.8">
            <text:p>940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3172">
            <text:p>931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2527">
            <text:p>2,123</text:p>
          </table:table-cell>
          <table:table-cell table:style-name="ce12N2" office:value-type="float" office:value="493.99">
            <text:p>493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0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0.8">
            <text:p>920,80</text:p>
          </table:table-cell>
          <table:table-cell table:style-name="ce12N2" office:value-type="float" office:value="92335.42">
            <text:p>92335,42</text:p>
          </table:table-cell>
          <table:table-cell table:style-name="ce12N2" office:value-type="float" office:value="5743.16">
            <text:p>574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11228653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2">
            <text:p>3071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2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6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1453.28">
            <text:p>145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2551066202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6">
            <text:p>30714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62.15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6.22">
            <text:p>416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1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460.73">
            <text:p>46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36522300015455002000662150136481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9">
            <text:p>3071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3.35">
            <text:p>160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65">
            <text:p>0,053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3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6.35">
            <text:p>76,35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106.89">
            <text:p>10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04150077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1">
            <text:p>3071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7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7841750929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2">
            <text:p>3071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5.87">
            <text:p>11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1">
            <text:p>0,03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6.47">
            <text:p>56,47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79.06">
            <text:p>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71161145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1">
            <text:p>30718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1190309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3">
            <text:p>3071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5.18">
            <text:p>1269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8">
            <text:p>0,070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9.58">
            <text:p>759,58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614.43">
            <text:p>61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4711551624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2">
            <text:p>5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42.94">
            <text:p>214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331.52">
            <text:p>13331,52</text:p>
          </table:table-cell>
          <table:table-cell table:style-name="ce26N2" office:value-type="float" office:value="591961.42">
            <text:p>591961,42</text:p>
          </table:table-cell>
          <table:table-cell table:style-name="ce26N2" office:value-type="float" office:value="38931.23">
            <text:p>38931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8354.93">
            <text:p>638354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1.286207">
            <text:p>11,286</text:p>
          </table:table-cell>
          <table:table-cell table:style-name="ce26N2" office:value-type="float" office:value="622880.47">
            <text:p>622880,47</text:p>
          </table:table-cell>
          <table:table-cell table:style-name="ce26N2" office:value-type="float" office:value="638354.93">
            <text:p>638354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973.66">
            <text:p>2973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8">
            <text:p>52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4" meta:object-count="0"/>
    <meta:generator>LibreOffice/4.3.0.4$Windows_x86 LibreOffice_project/62ad5818884a2fc2e5780dd45466868d41009ec0</meta:generator>
  </office:meta>
</office:document-meta>
</file>