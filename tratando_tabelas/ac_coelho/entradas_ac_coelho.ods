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8/05/2026 07:42:1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5">
            <text:p>307465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3">
            <text:p>114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9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1.3">
            <text:p>101,3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72.73">
            <text:p>7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2.33">
            <text:p>24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7.724.082</text:p>
          </table:table-cell>
          <table:table-cell table:style-name="ce0" office:value-type="string" calcext:value-type="string">
            <text:p>17.618 - ALFA TRANSPORTES EIRELI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242,3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42260522670837000180550010000233691542222518</text:p>
          </table:table-cell>
          <table:table-cell table:style-name="ce0" office:value-type="string" calcext:value-type="string">
            <text:p>4226058211081800012157000007724082109034863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3">
            <text:p>30761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8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.49">
            <text:p>594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28.54">
            <text:p>528,54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216.84">
            <text:p>2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2091324000204550030000068451624550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1">
            <text:p>307671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51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5.04">
            <text:p>817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416">
            <text:p>0,064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7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79.55">
            <text:p>379,55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486.36">
            <text:p>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5111221903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2">
            <text:p>30777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.36">
            <text:p>240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9.85">
            <text:p>218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13.51">
            <text:p>213,51</text:p>
          </table:table-cell>
          <table:table-cell table:style-name="ce12N2" office:value-type="float" office:value="2189.85">
            <text:p>2189,85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7551476543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0">
            <text:p>307860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1.9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86">
            <text:p>0,086</text:p>
          </table:table-cell>
          <table:table-cell table:style-name="ce12N2" office:value-type="float" office:value="204.96">
            <text:p>20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4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367.06">
            <text:p>36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1928115996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2">
            <text:p>30789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53">
            <text:p>114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04.63">
            <text:p>110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35">
            <text:p>0,084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.9">
            <text:p>35,90</text:p>
          </table:table-cell>
          <table:table-cell table:style-name="ce12N2" office:value-type="float" office:value="1104.63">
            <text:p>1104,63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7451702070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2">
            <text:p>30792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1.82">
            <text:p>421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7.8">
            <text:p>9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1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27.52">
            <text:p>527,52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147.37">
            <text:p>14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1111008326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4">
            <text:p>307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8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46">
            <text:p>364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71">
            <text:p>0,077</text:p>
          </table:table-cell>
          <table:table-cell table:style-name="ce12N2" office:value-type="float" office:value="20.56">
            <text:p>2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11.41">
            <text:p>211,41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2511.18">
            <text:p>251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8781094873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4">
            <text:p>30793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0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643.56">
            <text:p>5264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7966.8">
            <text:p>4796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44">
            <text:p>0,011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64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4676.76">
            <text:p>4676,76</text:p>
          </table:table-cell>
          <table:table-cell table:style-name="ce12N2" office:value-type="float" office:value="47966.8">
            <text:p>47966,80</text:p>
          </table:table-cell>
          <table:table-cell table:style-name="ce12N2" office:value-type="float" office:value="3357.66">
            <text:p>335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01610026301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5">
            <text:p>3079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77.64">
            <text:p>58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4">
            <text:p>0,504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2.77">
            <text:p>292,77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4072.93">
            <text:p>4072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2771216544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8">
            <text:p>3079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6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68.41">
            <text:p>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6371336743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4">
            <text:p>308004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9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3.77">
            <text:p>622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670.86">
            <text:p>5670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52.91">
            <text:p>552,91</text:p>
          </table:table-cell>
          <table:table-cell table:style-name="ce12N2" office:value-type="float" office:value="5670.86">
            <text:p>5670,86</text:p>
          </table:table-cell>
          <table:table-cell table:style-name="ce12N2" office:value-type="float" office:value="396.95">
            <text:p>39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2.9">
            <text:p>18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08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182,9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5260510713221000160550020000091451000118020</text:p>
          </table:table-cell>
          <table:table-cell table:style-name="ce0" office:value-type="string" calcext:value-type="string">
            <text:p>3526051138956500020057005000400080100086351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7">
            <text:p>30800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09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01.25">
            <text:p>5220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4">
            <text:p>0,009</text:p>
          </table:table-cell>
          <table:table-cell table:style-name="ce12N2" office:value-type="float" office:value="43.6">
            <text:p>4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201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.01">
            <text:p>71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26.15">
            <text:p>4626,15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1903">
            <text:p>1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09518666739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9">
            <text:p>3080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1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524.4">
            <text:p>5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4191226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3">
            <text:p>30802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1.9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.8">
            <text:p>1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.8">
            <text:p>1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.8">
            <text:p>190,80</text:p>
          </table:table-cell>
          <table:table-cell table:style-name="ce12N2" office:value-type="float" office:value="13.36">
            <text:p>1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19331602875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9">
            <text:p>3080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7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2">
            <text:p>0,008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7701138599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0">
            <text:p>308030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0.6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08.47">
            <text:p>130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99">
            <text:p>1259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0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09.47">
            <text:p>409,47</text:p>
          </table:table-cell>
          <table:table-cell table:style-name="ce12N2" office:value-type="float" office:value="12599">
            <text:p>12599,00</text:p>
          </table:table-cell>
          <table:table-cell table:style-name="ce12N2" office:value-type="float" office:value="881.93">
            <text:p>8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718726000135550010002006581282400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2">
            <text:p>308042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52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27.5">
            <text:p>74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767.65">
            <text:p>6767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.45">
            <text:p>6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59.85">
            <text:p>659,85</text:p>
          </table:table-cell>
          <table:table-cell table:style-name="ce12N2" office:value-type="float" office:value="6767.65">
            <text:p>6767,65</text:p>
          </table:table-cell>
          <table:table-cell table:style-name="ce12N2" office:value-type="float" office:value="462.38">
            <text:p>4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52214649530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2">
            <text:p>30805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71">
            <text:p>200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946.45">
            <text:p>194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695">
            <text:p>0,167</text:p>
          </table:table-cell>
          <table:table-cell table:style-name="ce12N2" office:value-type="float" office:value="20.16">
            <text:p>2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3.26">
            <text:p>63,26</text:p>
          </table:table-cell>
          <table:table-cell table:style-name="ce12N2" office:value-type="float" office:value="1946.45">
            <text:p>1946,45</text:p>
          </table:table-cell>
          <table:table-cell table:style-name="ce12N2" office:value-type="float" office:value="136.25">
            <text:p>13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784124097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4">
            <text:p>30805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.96">
            <text:p>187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73.96">
            <text:p>187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352">
            <text:p>0,038</text:p>
          </table:table-cell>
          <table:table-cell table:style-name="ce12N2" office:value-type="float" office:value="13.1">
            <text:p>1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.96">
            <text:p>1873,96</text:p>
          </table:table-cell>
          <table:table-cell table:style-name="ce12N2" office:value-type="float" office:value="131.18">
            <text:p>1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5.31">
            <text:p>8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8.043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85,3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5260513576045000150550010000052981001875686</text:p>
          </table:table-cell>
          <table:table-cell table:style-name="ce0" office:value-type="string" calcext:value-type="string">
            <text:p>3526050522209200076357002000478043100678328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7">
            <text:p>308057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63.76">
            <text:p>54463,76</text:p>
          </table:table-cell>
          <table:table-cell table:style-name="ce12N2" office:value-type="float" office:value="2757.3">
            <text:p>2757,30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55145.9">
            <text:p>55145,90</text:p>
          </table:table-cell>
          <table:table-cell table:style-name="ce12N2" office:value-type="float" office:value="950">
            <text:p>950,00</text:p>
          </table:table-cell>
          <table:table-cell table:style-name="ce12N3" office:value-type="float" office:value="0.0468">
            <text:p>0,047</text:p>
          </table:table-cell>
          <table:table-cell table:style-name="ce12N2" office:value-type="float" office:value="93.92">
            <text:p>9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46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25.16">
            <text:p>1125,16</text:p>
          </table:table-cell>
          <table:table-cell table:style-name="ce12N2" office:value-type="float" office:value="53338.6">
            <text:p>53338,60</text:p>
          </table:table-cell>
          <table:table-cell table:style-name="ce12N2" office:value-type="float" office:value="3733.71">
            <text:p>373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491923003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1">
            <text:p>3080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86.55">
            <text:p>8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111562759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3">
            <text:p>30806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4">
            <text:p>0,005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716.05">
            <text:p>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01105940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4">
            <text:p>308064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">
            <text:p>0,016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79.93">
            <text:p>7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41583124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0">
            <text:p>308070</text:p>
          </table:table-cell>
          <table:table-cell table:style-name="ce0" table:number-columns-spanned="4" table:number-rows-spanned="1" office:value-type="string" calcext:value-type="string">
            <text:p>2.925 - MOHAWK REVESTIMENTOS COCAL DO SUL LTDA</text:p>
          </table:table-cell>
          <table:covered-table-cell table:number-columns-repeated="3"/>
          <table:table-cell table:style-name="ce0" office:value-type="string" calcext:value-type="string">
            <text:p>1.396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56">
            <text:p>1145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456">
            <text:p>1145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5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56">
            <text:p>11456,00</text:p>
          </table:table-cell>
          <table:table-cell table:style-name="ce12N2" office:value-type="float" office:value="801.92">
            <text:p>80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6532538003005550010013963311001774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3">
            <text:p>308073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4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.65">
            <text:p>43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0">
            <text:p>4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.33">
            <text:p>5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3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3.65">
            <text:p>13,65</text:p>
          </table:table-cell>
          <table:table-cell table:style-name="ce12N2" office:value-type="float" office:value="420">
            <text:p>420,00</text:p>
          </table:table-cell>
          <table:table-cell table:style-name="ce12N2" office:value-type="float" office:value="29.4">
            <text:p>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46318246592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4">
            <text:p>308114</text:p>
          </table:table-cell>
          <table:table-cell table:style-name="ce0" table:number-columns-spanned="4" table:number-rows-spanned="1" office:value-type="string" calcext:value-type="string">
            <text:p>30.843 - DEXCO S.A</text:p>
          </table:table-cell>
          <table:covered-table-cell table:number-columns-repeated="3"/>
          <table:table-cell table:style-name="ce0" office:value-type="string" calcext:value-type="string">
            <text:p>81.8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20.9">
            <text:p>442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2.35">
            <text:p>439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657.36">
            <text:p>165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20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07.04">
            <text:p>3707,04</text:p>
          </table:table-cell>
          <table:table-cell table:style-name="ce12N2" office:value-type="float" office:value="3.71">
            <text:p>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36">
            <text:p>33,3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.55">
            <text:p>28,55</text:p>
          </table:table-cell>
          <table:table-cell table:style-name="ce12N2" office:value-type="float" office:value="4392.35">
            <text:p>4392,35</text:p>
          </table:table-cell>
          <table:table-cell table:style-name="ce12N2" office:value-type="float" office:value="307.46">
            <text:p>30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97837181005459550010000818921980360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5">
            <text:p>35,00</text:p>
          </table:table-cell>
          <table:table-cell table:style-name="ce26N2" office:value-type="float" office:value="2757.3">
            <text:p>2757,30</text:p>
          </table:table-cell>
          <table:table-cell table:style-name="ce26N2" office:value-type="float" office:value="950">
            <text:p>95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310.61">
            <text:p>15310,61</text:p>
          </table:table-cell>
          <table:table-cell table:style-name="ce26N2" office:value-type="float" office:value="432666.45">
            <text:p>432666,45</text:p>
          </table:table-cell>
          <table:table-cell table:style-name="ce26N2" office:value-type="float" office:value="28261.61">
            <text:p>28261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10.54">
            <text:p>510,54</text:p>
          </table:table-cell>
          <table:table-cell table:style-name="ce26N2" office:value-type="float" office:value="447977.06">
            <text:p>447977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6.756131">
            <text:p>6,756</text:p>
          </table:table-cell>
          <table:table-cell table:style-name="ce26N2" office:value-type="float" office:value="434473.75">
            <text:p>434473,75</text:p>
          </table:table-cell>
          <table:table-cell table:style-name="ce26N2" office:value-type="float" office:value="447977.06">
            <text:p>447977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07.04">
            <text:p>3707,04</text:p>
          </table:table-cell>
          <table:table-cell table:style-name="ce26N2" office:value-type="float" office:value="3.71">
            <text:p>3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3.36">
            <text:p>33,3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438.35">
            <text:p>2438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1">
            <text:p>40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2" meta:object-count="0"/>
    <meta:generator>LibreOffice/4.3.0.4$Windows_x86 LibreOffice_project/62ad5818884a2fc2e5780dd45466868d41009ec0</meta:generator>
  </office:meta>
</office:document-meta>
</file>