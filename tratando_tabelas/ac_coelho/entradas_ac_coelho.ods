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1/06/2026 07:30:45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613">
            <text:p>307613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6.8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49.49">
            <text:p>5949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420.95">
            <text:p>5420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49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528.54">
            <text:p>528,54</text:p>
          </table:table-cell>
          <table:table-cell table:style-name="ce12N2" office:value-type="float" office:value="5420.95">
            <text:p>5420,95</text:p>
          </table:table-cell>
          <table:table-cell table:style-name="ce12N2" office:value-type="float" office:value="216.84">
            <text:p>21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20913240002045500300000684516245504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0">
            <text:p>307670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7.38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4636">
            <text:p>5,346</text:p>
          </table:table-cell>
          <table:table-cell table:style-name="ce12N2" office:value-type="float" office:value="70.96">
            <text:p>7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4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2269.68">
            <text:p>226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6293564000146550020003373811553217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2">
            <text:p>3078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6">
            <text:p>0,006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0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184.15">
            <text:p>18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1619546161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7">
            <text:p>30785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74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54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395.84">
            <text:p>39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74316594747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1">
            <text:p>3078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0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8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356.03">
            <text:p>35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0451818279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7">
            <text:p>3078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3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19.68">
            <text:p>3741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36801.86">
            <text:p>36801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8374">
            <text:p>0,138</text:p>
          </table:table-cell>
          <table:table-cell table:style-name="ce12N2" office:value-type="float" office:value="28.67">
            <text:p>28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419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617.82">
            <text:p>617,82</text:p>
          </table:table-cell>
          <table:table-cell table:style-name="ce12N2" office:value-type="float" office:value="36801.86">
            <text:p>36801,86</text:p>
          </table:table-cell>
          <table:table-cell table:style-name="ce12N2" office:value-type="float" office:value="2576.12">
            <text:p>257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37113057277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2">
            <text:p>307892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7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0.53">
            <text:p>114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04.63">
            <text:p>1104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35">
            <text:p>0,084</text:p>
          </table:table-cell>
          <table:table-cell table:style-name="ce12N2" office:value-type="float" office:value="8.22">
            <text:p>8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40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35.9">
            <text:p>35,90</text:p>
          </table:table-cell>
          <table:table-cell table:style-name="ce12N2" office:value-type="float" office:value="1104.63">
            <text:p>1104,63</text:p>
          </table:table-cell>
          <table:table-cell table:style-name="ce12N2" office:value-type="float" office:value="77.32">
            <text:p>7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071594300003615500100008774517020708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22">
            <text:p>307922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11.82">
            <text:p>4211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684.3">
            <text:p>368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97.8">
            <text:p>9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11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527.52">
            <text:p>527,52</text:p>
          </table:table-cell>
          <table:table-cell table:style-name="ce12N2" office:value-type="float" office:value="3684.3">
            <text:p>3684,30</text:p>
          </table:table-cell>
          <table:table-cell table:style-name="ce12N2" office:value-type="float" office:value="147.37">
            <text:p>14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5870170002855500100004011110083266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24">
            <text:p>3079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8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09.46">
            <text:p>3640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36198.05">
            <text:p>36198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7471">
            <text:p>0,077</text:p>
          </table:table-cell>
          <table:table-cell table:style-name="ce12N2" office:value-type="float" office:value="20.56">
            <text:p>20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40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11.41">
            <text:p>211,41</text:p>
          </table:table-cell>
          <table:table-cell table:style-name="ce12N2" office:value-type="float" office:value="36198.05">
            <text:p>36198,05</text:p>
          </table:table-cell>
          <table:table-cell table:style-name="ce12N2" office:value-type="float" office:value="2511.18">
            <text:p>251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8781094873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5">
            <text:p>3079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0.2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477.64">
            <text:p>5847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58184.87">
            <text:p>58184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364">
            <text:p>0,504</text:p>
          </table:table-cell>
          <table:table-cell table:style-name="ce12N2" office:value-type="float" office:value="65.38">
            <text:p>65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477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92.77">
            <text:p>292,77</text:p>
          </table:table-cell>
          <table:table-cell table:style-name="ce12N2" office:value-type="float" office:value="58184.87">
            <text:p>58184,87</text:p>
          </table:table-cell>
          <table:table-cell table:style-name="ce12N2" office:value-type="float" office:value="4072.93">
            <text:p>4072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02771216544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8">
            <text:p>3079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0.63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7.28">
            <text:p>97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7.28">
            <text:p>977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7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7.28">
            <text:p>977,28</text:p>
          </table:table-cell>
          <table:table-cell table:style-name="ce12N2" office:value-type="float" office:value="68.41">
            <text:p>6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06371336743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4">
            <text:p>308004</text:p>
          </table:table-cell>
          <table:table-cell table:style-name="ce0" table:number-columns-spanned="4" table:number-rows-spanned="1" office:value-type="string" calcext:value-type="string">
            <text:p>9.974 - USINA DESIGN IND E COMERCIO DE ILUMINACAO LTDA-ME</text:p>
          </table:table-cell>
          <table:covered-table-cell table:number-columns-repeated="3"/>
          <table:table-cell table:style-name="ce0" office:value-type="string" calcext:value-type="string">
            <text:p>9.14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23.77">
            <text:p>622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670.86">
            <text:p>5670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23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1.5">
            <text:p>31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52.91">
            <text:p>552,91</text:p>
          </table:table-cell>
          <table:table-cell table:style-name="ce12N2" office:value-type="float" office:value="5670.86">
            <text:p>5670,86</text:p>
          </table:table-cell>
          <table:table-cell table:style-name="ce12N2" office:value-type="float" office:value="396.95">
            <text:p>39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82.9">
            <text:p>18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0.080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6/05/2026</text:p>
          </table:table-cell>
          <table:table-cell table:style-name="ce12" office:value-type="string" calcext:value-type="string">
            <text:p>182,90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35260510713221000160550020000091451000118020</text:p>
          </table:table-cell>
          <table:table-cell table:style-name="ce0" office:value-type="string" calcext:value-type="string">
            <text:p>3526051138956500020057005000400080100086351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7">
            <text:p>308007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3.09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01.25">
            <text:p>5220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47575.1">
            <text:p>47575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84">
            <text:p>0,009</text:p>
          </table:table-cell>
          <table:table-cell table:style-name="ce12N2" office:value-type="float" office:value="43.6">
            <text:p>4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.201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1.01">
            <text:p>71,0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4626.15">
            <text:p>4626,15</text:p>
          </table:table-cell>
          <table:table-cell table:style-name="ce12N2" office:value-type="float" office:value="47575.1">
            <text:p>47575,10</text:p>
          </table:table-cell>
          <table:table-cell table:style-name="ce12N2" office:value-type="float" office:value="1903">
            <text:p>190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309518666739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9">
            <text:p>30801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5.93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91.44">
            <text:p>7491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91.44">
            <text:p>7491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6">
            <text:p>0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91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91.44">
            <text:p>7491,44</text:p>
          </table:table-cell>
          <table:table-cell table:style-name="ce12N2" office:value-type="float" office:value="524.4">
            <text:p>52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593419122682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9">
            <text:p>3080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77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75.88">
            <text:p>4175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75.88">
            <text:p>417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22">
            <text:p>0,008</text:p>
          </table:table-cell>
          <table:table-cell table:style-name="ce12N2" office:value-type="float" office:value="1.47">
            <text:p>1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75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75.88">
            <text:p>4175,88</text:p>
          </table:table-cell>
          <table:table-cell table:style-name="ce12N2" office:value-type="float" office:value="292.31">
            <text:p>2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77011385990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0">
            <text:p>308030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0.6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08.47">
            <text:p>1300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599">
            <text:p>1259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008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409.47">
            <text:p>409,47</text:p>
          </table:table-cell>
          <table:table-cell table:style-name="ce12N2" office:value-type="float" office:value="12599">
            <text:p>12599,00</text:p>
          </table:table-cell>
          <table:table-cell table:style-name="ce12N2" office:value-type="float" office:value="881.93">
            <text:p>88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77187260001355500100020065812824003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4">
            <text:p>308034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4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31.32">
            <text:p>3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4781115478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42">
            <text:p>308042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52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27.5">
            <text:p>74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6767.65">
            <text:p>6767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.45">
            <text:p>6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659.85">
            <text:p>659,85</text:p>
          </table:table-cell>
          <table:table-cell table:style-name="ce12N2" office:value-type="float" office:value="6767.65">
            <text:p>6767,65</text:p>
          </table:table-cell>
          <table:table-cell table:style-name="ce12N2" office:value-type="float" office:value="462.38">
            <text:p>46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52214649530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2">
            <text:p>308052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7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9.71">
            <text:p>2009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946.45">
            <text:p>1946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695">
            <text:p>0,167</text:p>
          </table:table-cell>
          <table:table-cell table:style-name="ce12N2" office:value-type="float" office:value="20.16">
            <text:p>20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09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63.26">
            <text:p>63,26</text:p>
          </table:table-cell>
          <table:table-cell table:style-name="ce12N2" office:value-type="float" office:value="1946.45">
            <text:p>1946,45</text:p>
          </table:table-cell>
          <table:table-cell table:style-name="ce12N2" office:value-type="float" office:value="136.25">
            <text:p>13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07159430000361550010000877841240978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7">
            <text:p>308057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463.76">
            <text:p>54463,76</text:p>
          </table:table-cell>
          <table:table-cell table:style-name="ce12N2" office:value-type="float" office:value="2757.3">
            <text:p>2757,30</text:p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55145.9">
            <text:p>55145,90</text:p>
          </table:table-cell>
          <table:table-cell table:style-name="ce12N2" office:value-type="float" office:value="950">
            <text:p>950,00</text:p>
          </table:table-cell>
          <table:table-cell table:style-name="ce12N3" office:value-type="float" office:value="0.0468">
            <text:p>0,047</text:p>
          </table:table-cell>
          <table:table-cell table:style-name="ce12N2" office:value-type="float" office:value="93.92">
            <text:p>93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463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125.16">
            <text:p>1125,16</text:p>
          </table:table-cell>
          <table:table-cell table:style-name="ce12N2" office:value-type="float" office:value="53338.6">
            <text:p>53338,60</text:p>
          </table:table-cell>
          <table:table-cell table:style-name="ce12N2" office:value-type="float" office:value="3733.71">
            <text:p>3733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4919230031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1">
            <text:p>3080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11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6.36">
            <text:p>123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36.36">
            <text:p>123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36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6.36">
            <text:p>1236,36</text:p>
          </table:table-cell>
          <table:table-cell table:style-name="ce12N2" office:value-type="float" office:value="86.55">
            <text:p>8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11115627599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2">
            <text:p>3080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1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17.47">
            <text:p>951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13.64">
            <text:p>13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17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46.53">
            <text:p>246,53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484.63">
            <text:p>48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1331274472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3">
            <text:p>308063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8.52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29.4">
            <text:p>1022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0229.4">
            <text:p>102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4">
            <text:p>0,005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22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29.4">
            <text:p>10229,40</text:p>
          </table:table-cell>
          <table:table-cell table:style-name="ce12N2" office:value-type="float" office:value="716.05">
            <text:p>71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13855500200001852011059403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4">
            <text:p>308064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8.52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.92">
            <text:p>1141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41.92">
            <text:p>1141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">
            <text:p>0,016</text:p>
          </table:table-cell>
          <table:table-cell table:style-name="ce12N2" office:value-type="float" office:value="6.78">
            <text:p>6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41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1.92">
            <text:p>1141,92</text:p>
          </table:table-cell>
          <table:table-cell table:style-name="ce12N2" office:value-type="float" office:value="79.93">
            <text:p>79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13855500200001852415831249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4">
            <text:p>308154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08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84.58">
            <text:p>688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884.58">
            <text:p>6884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.39">
            <text:p>3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84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84.58">
            <text:p>6884,58</text:p>
          </table:table-cell>
          <table:table-cell table:style-name="ce12N2" office:value-type="float" office:value="481.93">
            <text:p>48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70373920001805500300001008817243412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5">
            <text:p>3081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38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125.49">
            <text:p>3312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3125.49">
            <text:p>33125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87034">
            <text:p>1,487</text:p>
          </table:table-cell>
          <table:table-cell table:style-name="ce12N2" office:value-type="float" office:value="568.8">
            <text:p>56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125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125.49">
            <text:p>33125,49</text:p>
          </table:table-cell>
          <table:table-cell table:style-name="ce12N2" office:value-type="float" office:value="1325.02">
            <text:p>132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38111941309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6">
            <text:p>308156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91.51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882.51">
            <text:p>5988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">
            <text:p>53,00</text:p>
          </table:table-cell>
          <table:table-cell table:style-name="ce12N2" office:value-type="float" office:value="58558.19">
            <text:p>58558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708618">
            <text:p>2,709</text:p>
          </table:table-cell>
          <table:table-cell table:style-name="ce12N2" office:value-type="float" office:value="1274.26">
            <text:p>127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.88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324.32">
            <text:p>1324,32</text:p>
          </table:table-cell>
          <table:table-cell table:style-name="ce12N2" office:value-type="float" office:value="58558.19">
            <text:p>58558,19</text:p>
          </table:table-cell>
          <table:table-cell table:style-name="ce12N2" office:value-type="float" office:value="3904.7">
            <text:p>390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9151612133098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75">
            <text:p>3081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64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42.98">
            <text:p>234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42.98">
            <text:p>2342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1.45">
            <text:p>1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42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77.42">
            <text:p>1977,42</text:p>
          </table:table-cell>
          <table:table-cell table:style-name="ce12N2" office:value-type="float" office:value="1.98">
            <text:p>1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8">
            <text:p>17,8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2.98">
            <text:p>2342,98</text:p>
          </table:table-cell>
          <table:table-cell table:style-name="ce12N2" office:value-type="float" office:value="164.01">
            <text:p>16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6431526894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79">
            <text:p>30817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72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50.5">
            <text:p>815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50.5">
            <text:p>8150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365">
            <text:p>0,012</text:p>
          </table:table-cell>
          <table:table-cell table:style-name="ce12N2" office:value-type="float" office:value="3.83">
            <text:p>3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5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78.8">
            <text:p>6878,80</text:p>
          </table:table-cell>
          <table:table-cell table:style-name="ce12N2" office:value-type="float" office:value="6.88">
            <text:p>6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91">
            <text:p>61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50.5">
            <text:p>8150,50</text:p>
          </table:table-cell>
          <table:table-cell table:style-name="ce12N2" office:value-type="float" office:value="570.54">
            <text:p>57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7261241660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1">
            <text:p>30819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3.11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67.69">
            <text:p>566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571.17">
            <text:p>557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0735">
            <text:p>0,231</text:p>
          </table:table-cell>
          <table:table-cell table:style-name="ce12N2" office:value-type="float" office:value="7.75">
            <text:p>7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67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01.94">
            <text:p>4701,94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32">
            <text:p>42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96.52">
            <text:p>96,52</text:p>
          </table:table-cell>
          <table:table-cell table:style-name="ce12N2" office:value-type="float" office:value="5571.17">
            <text:p>5571,17</text:p>
          </table:table-cell>
          <table:table-cell table:style-name="ce12N2" office:value-type="float" office:value="389.98">
            <text:p>38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31111092210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15">
            <text:p>308215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7.0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282.89">
            <text:p>4428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">
            <text:p>39,00</text:p>
          </table:table-cell>
          <table:table-cell table:style-name="ce12N2" office:value-type="float" office:value="44142.3">
            <text:p>44142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144726">
            <text:p>21,145</text:p>
          </table:table-cell>
          <table:table-cell table:style-name="ce12N2" office:value-type="float" office:value="7549.32">
            <text:p>7549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282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969.16">
            <text:p>36969,16</text:p>
          </table:table-cell>
          <table:table-cell table:style-name="ce12N2" office:value-type="float" office:value="36.95">
            <text:p>3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2.7">
            <text:p>332,70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40.59">
            <text:p>140,59</text:p>
          </table:table-cell>
          <table:table-cell table:style-name="ce12N2" office:value-type="float" office:value="44142.3">
            <text:p>44142,30</text:p>
          </table:table-cell>
          <table:table-cell table:style-name="ce12N2" office:value-type="float" office:value="3090.01">
            <text:p>3090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45422380001785500100009700010009680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7">
            <text:p>30824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6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31.11">
            <text:p>803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34.91">
            <text:p>7934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554">
            <text:p>0,024</text:p>
          </table:table-cell>
          <table:table-cell table:style-name="ce12N2" office:value-type="float" office:value="6.8">
            <text:p>6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31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96.86">
            <text:p>6696,86</text:p>
          </table:table-cell>
          <table:table-cell table:style-name="ce12N2" office:value-type="float" office:value="6.7">
            <text:p>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27">
            <text:p>60,2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96.2">
            <text:p>96,20</text:p>
          </table:table-cell>
          <table:table-cell table:style-name="ce12N2" office:value-type="float" office:value="7934.91">
            <text:p>7934,91</text:p>
          </table:table-cell>
          <table:table-cell table:style-name="ce12N2" office:value-type="float" office:value="555.45">
            <text:p>55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65512180296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58">
            <text:p>308258</text:p>
          </table:table-cell>
          <table:table-cell table:style-name="ce0" table:number-columns-spanned="4" table:number-rows-spanned="1" office:value-type="string" calcext:value-type="string">
            <text:p>12.915 - LPS COMPANY LTDA</text:p>
          </table:table-cell>
          <table:covered-table-cell table:number-columns-repeated="3"/>
          <table:table-cell table:style-name="ce0" office:value-type="string" calcext:value-type="string">
            <text:p>1.094.5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.11">
            <text:p>118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8">
            <text:p>107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3325">
            <text:p>0,043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3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9.15">
            <text:p>939,15</text:p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05.11">
            <text:p>105,11</text:p>
          </table:table-cell>
          <table:table-cell table:style-name="ce12N2" office:value-type="float" office:value="1078">
            <text:p>1078,00</text:p>
          </table:table-cell>
          <table:table-cell table:style-name="ce12N2" office:value-type="float" office:value="43.12">
            <text:p>4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88908380004525500100109455916824132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71">
            <text:p>308271</text:p>
          </table:table-cell>
          <table:table-cell table:style-name="ce0" table:number-columns-spanned="4" table:number-rows-spanned="1" office:value-type="string" calcext:value-type="string">
            <text:p>9.300 - INTELBRAS S/A IND TELEC ELETR BRASILEIRA</text:p>
          </table:table-cell>
          <table:covered-table-cell table:number-columns-repeated="3"/>
          <table:table-cell table:style-name="ce0" office:value-type="string" calcext:value-type="string">
            <text:p>152.770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7.52">
            <text:p>172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27.52">
            <text:p>1727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27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64.73">
            <text:p>1464,73</text:p>
          </table:table-cell>
          <table:table-cell table:style-name="ce12N2" office:value-type="float" office:value="1.46">
            <text:p>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18">
            <text:p>13,1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27.52">
            <text:p>1727,52</text:p>
          </table:table-cell>
          <table:table-cell table:style-name="ce12N2" office:value-type="float" office:value="207.3">
            <text:p>20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3260582901000001522550100001527701316591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0">
            <text:p>308280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92.36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6.7">
            <text:p>93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36.7">
            <text:p>93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2427">
            <text:p>0,424</text:p>
          </table:table-cell>
          <table:table-cell table:style-name="ce12N2" office:value-type="float" office:value="57.42">
            <text:p>5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90.55">
            <text:p>790,55</text:p>
          </table:table-cell>
          <table:table-cell table:style-name="ce12N2" office:value-type="float" office:value="0.79">
            <text:p>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11">
            <text:p>7,1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6.7">
            <text:p>936,70</text:p>
          </table:table-cell>
          <table:table-cell table:style-name="ce12N2" office:value-type="float" office:value="65.57">
            <text:p>65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923671142938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1">
            <text:p>308281</text:p>
          </table:table-cell>
          <table:table-cell table:style-name="ce0" table:number-columns-spanned="4" table:number-rows-spanned="1" office:value-type="string" calcext:value-type="string">
            <text:p>9.300 - INTELBRAS S/A IND TELEC ELETR BRASILEIRA</text:p>
          </table:table-cell>
          <table:covered-table-cell table:number-columns-repeated="3"/>
          <table:table-cell table:style-name="ce0" office:value-type="string" calcext:value-type="string">
            <text:p>152.775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6.02">
            <text:p>121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16.02">
            <text:p>1216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6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1.03">
            <text:p>1031,03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27">
            <text:p>9,2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6.02">
            <text:p>1216,02</text:p>
          </table:table-cell>
          <table:table-cell table:style-name="ce12N2" office:value-type="float" office:value="145.92">
            <text:p>14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32605829010000015225501000015277518928778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5">
            <text:p>30828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4.93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94.4">
            <text:p>749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94.4">
            <text:p>749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2">
            <text:p>0,015</text:p>
          </table:table-cell>
          <table:table-cell table:style-name="ce12N2" office:value-type="float" office:value="15.4">
            <text:p>1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9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25">
            <text:p>6325,00</text:p>
          </table:table-cell>
          <table:table-cell table:style-name="ce12N2" office:value-type="float" office:value="6.33">
            <text:p>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93">
            <text:p>56,9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94.4">
            <text:p>7494,40</text:p>
          </table:table-cell>
          <table:table-cell table:style-name="ce12N2" office:value-type="float" office:value="524.61">
            <text:p>52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493816580048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7">
            <text:p>30828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1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87.9">
            <text:p>338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87.9">
            <text:p>3387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4.65">
            <text:p>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87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9.3">
            <text:p>2859,30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73">
            <text:p>25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87.9">
            <text:p>3387,90</text:p>
          </table:table-cell>
          <table:table-cell table:style-name="ce12N2" office:value-type="float" office:value="237.15">
            <text:p>237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15019487798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8">
            <text:p>30828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2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4.96">
            <text:p>1141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414.96">
            <text:p>11414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2824">
            <text:p>0,083</text:p>
          </table:table-cell>
          <table:table-cell table:style-name="ce12N2" office:value-type="float" office:value="5.2">
            <text:p>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414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33.92">
            <text:p>9633,92</text:p>
          </table:table-cell>
          <table:table-cell table:style-name="ce12N2" office:value-type="float" office:value="9.63">
            <text:p>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71">
            <text:p>86,7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14.96">
            <text:p>11414,96</text:p>
          </table:table-cell>
          <table:table-cell table:style-name="ce12N2" office:value-type="float" office:value="799.05">
            <text:p>799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21712475924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5">
            <text:p>308305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7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68.38">
            <text:p>32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24.64">
            <text:p>2924,64</text:p>
          </table:table-cell>
          <table:table-cell table:style-name="ce12N2" office:value-type="float" office:value="175.48">
            <text:p>175,48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68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9">
            <text:p>5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68.26">
            <text:p>168,26</text:p>
          </table:table-cell>
          <table:table-cell table:style-name="ce12N2" office:value-type="float" office:value="3100.12">
            <text:p>3100,12</text:p>
          </table:table-cell>
          <table:table-cell table:style-name="ce12N2" office:value-type="float" office:value="124">
            <text:p>1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48556330001405500100007742214524157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1">
            <text:p>41,00</text:p>
          </table:table-cell>
          <table:table-cell table:style-name="ce26N2" office:value-type="float" office:value="2757.3">
            <text:p>2757,30</text:p>
          </table:table-cell>
          <table:table-cell table:style-name="ce26N2" office:value-type="float" office:value="1125.48">
            <text:p>1125,4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1828.29">
            <text:p>11828,29</text:p>
          </table:table-cell>
          <table:table-cell table:style-name="ce26N2" office:value-type="float" office:value="547124.37">
            <text:p>547124,37</text:p>
          </table:table-cell>
          <table:table-cell table:style-name="ce26N2" office:value-type="float" office:value="35233.64">
            <text:p>35233,6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82.9">
            <text:p>182,90</text:p>
          </table:table-cell>
          <table:table-cell table:style-name="ce26N2" office:value-type="float" office:value="558962.66">
            <text:p>558962,6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2.744846">
            <text:p>32,745</text:p>
          </table:table-cell>
          <table:table-cell table:style-name="ce26N2" office:value-type="float" office:value="548766.19">
            <text:p>548766,19</text:p>
          </table:table-cell>
          <table:table-cell table:style-name="ce26N2" office:value-type="float" office:value="558962.66">
            <text:p>558962,6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0267.86">
            <text:p>80267,86</text:p>
          </table:table-cell>
          <table:table-cell table:style-name="ce26N2" office:value-type="float" office:value="80.25">
            <text:p>80,2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22.38">
            <text:p>722,38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0010.16">
            <text:p>10010,1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7.65">
            <text:p>37,6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68" meta:object-count="0"/>
    <meta:generator>LibreOffice/4.3.0.4$Windows_x86 LibreOffice_project/62ad5818884a2fc2e5780dd45466868d41009ec0</meta:generator>
  </office:meta>
</office:document-meta>
</file>