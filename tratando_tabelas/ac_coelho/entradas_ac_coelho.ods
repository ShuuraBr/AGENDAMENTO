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1/05/2026 05:30:34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0446">
            <text:p>30044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3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1/2026</text:p>
          </table:table-cell>
          <table:table-cell table:style-name="ce0" office:value-type="string" calcext:value-type="string">
            <text:p>02/02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2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24855633000140550010000731981500237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5">
            <text:p>305865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6.5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8">
            <text:p>0,258</text:p>
          </table:table-cell>
          <table:table-cell table:style-name="ce12N2" office:value-type="float" office:value="43">
            <text:p>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55.2">
            <text:p>5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4542238000178550010000965331000963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6">
            <text:p>306716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6.84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.47">
            <text:p>15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8.8">
            <text:p>14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8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9.67">
            <text:p>9,67</text:p>
          </table:table-cell>
          <table:table-cell table:style-name="ce12N2" office:value-type="float" office:value="158.47">
            <text:p>158,47</text:p>
          </table:table-cell>
          <table:table-cell table:style-name="ce12N2" office:value-type="float" office:value="11.09">
            <text:p>11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684414926521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69">
            <text:p>306769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1.32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12.28">
            <text:p>501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567">
            <text:p>456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12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75">
            <text:p>40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45.28">
            <text:p>445,28</text:p>
          </table:table-cell>
          <table:table-cell table:style-name="ce12N2" office:value-type="float" office:value="4567">
            <text:p>4567,00</text:p>
          </table:table-cell>
          <table:table-cell table:style-name="ce12N2" office:value-type="float" office:value="319.68">
            <text:p>31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616460000152550020000713281306751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20">
            <text:p>30702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6.3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2272">
            <text:p>0,142</text:p>
          </table:table-cell>
          <table:table-cell table:style-name="ce12N2" office:value-type="float" office:value="3.42">
            <text:p>3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5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122.98">
            <text:p>12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7631917554164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73">
            <text:p>307073</text:p>
          </table:table-cell>
          <table:table-cell table:style-name="ce0" table:number-columns-spanned="4" table:number-rows-spanned="1" office:value-type="string" calcext:value-type="string">
            <text:p>790 - JACKWAL S/A</text:p>
          </table:table-cell>
          <table:covered-table-cell table:number-columns-repeated="3"/>
          <table:table-cell table:style-name="ce0" office:value-type="string" calcext:value-type="string">
            <text:p>275.19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34.72">
            <text:p>783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524.33">
            <text:p>7524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3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310.39">
            <text:p>310,39</text:p>
          </table:table-cell>
          <table:table-cell table:style-name="ce12N2" office:value-type="float" office:value="7524.33">
            <text:p>7524,33</text:p>
          </table:table-cell>
          <table:table-cell table:style-name="ce12N2" office:value-type="float" office:value="526.7">
            <text:p>5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27823660001885500300027519616544321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33">
            <text:p>307133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7.1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5.79">
            <text:p>426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4222.88">
            <text:p>422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84131">
            <text:p>0,484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6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42.91">
            <text:p>42,91</text:p>
          </table:table-cell>
          <table:table-cell table:style-name="ce12N2" office:value-type="float" office:value="4222.88">
            <text:p>4222,88</text:p>
          </table:table-cell>
          <table:table-cell table:style-name="ce12N2" office:value-type="float" office:value="281.12">
            <text:p>28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717316183353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1">
            <text:p>3071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1112007302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3">
            <text:p>3071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9819917936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4">
            <text:p>3071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121347149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1">
            <text:p>3072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84">
            <text:p>0,000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205.07">
            <text:p>20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216618409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5">
            <text:p>30723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57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1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18.48">
            <text:p>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611400365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2">
            <text:p>30724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72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87.04">
            <text:p>188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7.04">
            <text:p>1887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832">
            <text:p>0,008</text:p>
          </table:table-cell>
          <table:table-cell table:style-name="ce12N2" office:value-type="float" office:value="1.9">
            <text:p>1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87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7.04">
            <text:p>1887,04</text:p>
          </table:table-cell>
          <table:table-cell table:style-name="ce12N2" office:value-type="float" office:value="132.09">
            <text:p>13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72511748843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65">
            <text:p>307265</text:p>
          </table:table-cell>
          <table:table-cell table:style-name="ce0" table:number-columns-spanned="4" table:number-rows-spanned="1" office:value-type="string" calcext:value-type="string">
            <text:p>25.941 - AQUECE METAIS FABRICACAO E MANUTENCAO LTDA</text:p>
          </table:table-cell>
          <table:covered-table-cell table:number-columns-repeated="3"/>
          <table:table-cell table:style-name="ce0" office:value-type="string" calcext:value-type="string">
            <text:p>10.5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2.49">
            <text:p>370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37.49">
            <text:p>3437,49</text:p>
          </table:table-cell>
          <table:table-cell table:style-name="ce12N2" office:value-type="float" office:value="265">
            <text:p>26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3.5">
            <text:p>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2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2.49">
            <text:p>3702,49</text:p>
          </table:table-cell>
          <table:table-cell table:style-name="ce12N2" office:value-type="float" office:value="259.17">
            <text:p>259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27254297000178550010000105531584622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8">
            <text:p>307278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7.1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709.55">
            <text:p>2970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29280.46">
            <text:p>29280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9578">
            <text:p>0,696</text:p>
          </table:table-cell>
          <table:table-cell table:style-name="ce12N2" office:value-type="float" office:value="130.96">
            <text:p>13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70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429.09">
            <text:p>429,09</text:p>
          </table:table-cell>
          <table:table-cell table:style-name="ce12N2" office:value-type="float" office:value="29280.46">
            <text:p>29280,46</text:p>
          </table:table-cell>
          <table:table-cell table:style-name="ce12N2" office:value-type="float" office:value="1794.18">
            <text:p>179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6714415821550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0">
            <text:p>30733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7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78.63">
            <text:p>7078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46.6">
            <text:p>664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25">
            <text:p>0,043</text:p>
          </table:table-cell>
          <table:table-cell table:style-name="ce12N2" office:value-type="float" office:value="9.6">
            <text:p>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78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432.03">
            <text:p>432,03</text:p>
          </table:table-cell>
          <table:table-cell table:style-name="ce12N2" office:value-type="float" office:value="6646.6">
            <text:p>6646,60</text:p>
          </table:table-cell>
          <table:table-cell table:style-name="ce12N2" office:value-type="float" office:value="465.26">
            <text:p>465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7451885129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4">
            <text:p>3073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21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63.92">
            <text:p>496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63.92">
            <text:p>4963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904">
            <text:p>0,030</text:p>
          </table:table-cell>
          <table:table-cell table:style-name="ce12N2" office:value-type="float" office:value="6.84">
            <text:p>6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63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63.92">
            <text:p>4963,92</text:p>
          </table:table-cell>
          <table:table-cell table:style-name="ce12N2" office:value-type="float" office:value="347.47">
            <text:p>34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21515261434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6">
            <text:p>30735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5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04.02">
            <text:p>210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04.02">
            <text:p>2104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1.08">
            <text:p>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04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04.02">
            <text:p>2104,02</text:p>
          </table:table-cell>
          <table:table-cell table:style-name="ce12N2" office:value-type="float" office:value="147.28">
            <text:p>14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58413178758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67">
            <text:p>307367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2.9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71.17">
            <text:p>567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538.68">
            <text:p>553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4926">
            <text:p>0,315</text:p>
          </table:table-cell>
          <table:table-cell table:style-name="ce12N2" office:value-type="float" office:value="33.19">
            <text:p>33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7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35">
            <text:p>55,3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132.49">
            <text:p>132,49</text:p>
          </table:table-cell>
          <table:table-cell table:style-name="ce12N2" office:value-type="float" office:value="4787.31">
            <text:p>4787,31</text:p>
          </table:table-cell>
          <table:table-cell table:style-name="ce12N2" office:value-type="float" office:value="258.23">
            <text:p>25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29171646262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69">
            <text:p>307369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7.2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5.13">
            <text:p>182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67.68">
            <text:p>1767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844">
            <text:p>0,026</text:p>
          </table:table-cell>
          <table:table-cell table:style-name="ce12N2" office:value-type="float" office:value="6.79">
            <text:p>6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2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57.45">
            <text:p>57,45</text:p>
          </table:table-cell>
          <table:table-cell table:style-name="ce12N2" office:value-type="float" office:value="1767.68">
            <text:p>1767,68</text:p>
          </table:table-cell>
          <table:table-cell table:style-name="ce12N2" office:value-type="float" office:value="110.47">
            <text:p>110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6722415038238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6">
            <text:p>30737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1.03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9.53">
            <text:p>499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9.53">
            <text:p>499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07">
            <text:p>0,001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9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9.53">
            <text:p>499,53</text:p>
          </table:table-cell>
          <table:table-cell table:style-name="ce12N2" office:value-type="float" office:value="34.97">
            <text:p>34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103111542554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6">
            <text:p>3073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1.59">
            <text:p>48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1.59">
            <text:p>481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68">
            <text:p>0,002</text:p>
          </table:table-cell>
          <table:table-cell table:style-name="ce12N2" office:value-type="float" office:value="0.44">
            <text:p>0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1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1.59">
            <text:p>481,59</text:p>
          </table:table-cell>
          <table:table-cell table:style-name="ce12N2" office:value-type="float" office:value="19.26">
            <text:p>1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717366362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24">
            <text:p>307424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7.3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83.2">
            <text:p>178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624.79">
            <text:p>1624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8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58.41">
            <text:p>158,41</text:p>
          </table:table-cell>
          <table:table-cell table:style-name="ce12N2" office:value-type="float" office:value="1624.79">
            <text:p>1624,79</text:p>
          </table:table-cell>
          <table:table-cell table:style-name="ce12N2" office:value-type="float" office:value="65.04">
            <text:p>6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6.5">
            <text:p>8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8.941</text:p>
          </table:table-cell>
          <table:table-cell table:style-name="ce0" office:value-type="string" calcext:value-type="string">
            <text:p>38.647 - ACCERT TRANSPORTES E LOGISTICA LTDA</text:p>
          </table:table-cell>
          <table:table-cell table:style-name="ce0" office:value-type="string" calcext:value-type="string">
            <text:p>14/05/2026</text:p>
          </table:table-cell>
          <table:table-cell table:style-name="ce12" office:value-type="string" calcext:value-type="string">
            <text:p>86,50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9260529244900000247550010000673361492026159</text:p>
          </table:table-cell>
          <table:table-cell table:style-name="ce0" office:value-type="string" calcext:value-type="string">
            <text:p>29260505222092001069570010000389411006647635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28">
            <text:p>307428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8.8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5.04">
            <text:p>78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85.04">
            <text:p>785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96">
            <text:p>0,067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5.04">
            <text:p>785,04</text:p>
          </table:table-cell>
          <table:table-cell table:style-name="ce12N2" office:value-type="float" office:value="54.95">
            <text:p>54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882617173575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3">
            <text:p>3074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2.48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40.61">
            <text:p>104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7.1">
            <text:p>97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40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63.51">
            <text:p>63,51</text:p>
          </table:table-cell>
          <table:table-cell table:style-name="ce12N2" office:value-type="float" office:value="977.1">
            <text:p>977,10</text:p>
          </table:table-cell>
          <table:table-cell table:style-name="ce12N2" office:value-type="float" office:value="68.4">
            <text:p>6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248715470222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9">
            <text:p>30743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8.06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1.84">
            <text:p>240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401.84">
            <text:p>2401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576">
            <text:p>0,296</text:p>
          </table:table-cell>
          <table:table-cell table:style-name="ce12N2" office:value-type="float" office:value="31.68">
            <text:p>31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01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01.84">
            <text:p>2401,84</text:p>
          </table:table-cell>
          <table:table-cell table:style-name="ce12N2" office:value-type="float" office:value="149.08">
            <text:p>149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723837000172550000006880631168529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3">
            <text:p>307443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6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7.13">
            <text:p>447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3.06">
            <text:p>433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9">
            <text:p>0,022</text:p>
          </table:table-cell>
          <table:table-cell table:style-name="ce12N2" office:value-type="float" office:value="1.7">
            <text:p>1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7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4.07">
            <text:p>14,07</text:p>
          </table:table-cell>
          <table:table-cell table:style-name="ce12N2" office:value-type="float" office:value="433.06">
            <text:p>433,06</text:p>
          </table:table-cell>
          <table:table-cell table:style-name="ce12N2" office:value-type="float" office:value="30.31">
            <text:p>3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071594300003615500100008761419540829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4">
            <text:p>307444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6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671.51">
            <text:p>2467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23273.18">
            <text:p>23273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54421">
            <text:p>3,544</text:p>
          </table:table-cell>
          <table:table-cell table:style-name="ce12N2" office:value-type="float" office:value="399.29">
            <text:p>39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671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398.33">
            <text:p>1398,33</text:p>
          </table:table-cell>
          <table:table-cell table:style-name="ce12N2" office:value-type="float" office:value="23273.18">
            <text:p>23273,18</text:p>
          </table:table-cell>
          <table:table-cell table:style-name="ce12N2" office:value-type="float" office:value="1629.14">
            <text:p>162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071594300003615500100008762018810864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2">
            <text:p>307462</text:p>
          </table:table-cell>
          <table:table-cell table:style-name="ce0" table:number-columns-spanned="4" table:number-rows-spanned="1" office:value-type="string" calcext:value-type="string">
            <text:p>29.238 - EURO METAIS IMPORTACAO E EXPORTACAO LTDA</text:p>
          </table:table-cell>
          <table:covered-table-cell table:number-columns-repeated="3"/>
          <table:table-cell table:style-name="ce0" office:value-type="string" calcext:value-type="string">
            <text:p>66.5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9.81">
            <text:p>31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1.4">
            <text:p>29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46">
            <text:p>0,002</text:p>
          </table:table-cell>
          <table:table-cell table:style-name="ce12N2" office:value-type="float" office:value="0.53">
            <text:p>0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">
            <text:p>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28.41">
            <text:p>28,41</text:p>
          </table:table-cell>
          <table:table-cell table:style-name="ce12N2" office:value-type="float" office:value="291.4">
            <text:p>291,40</text:p>
          </table:table-cell>
          <table:table-cell table:style-name="ce12N2" office:value-type="float" office:value="11.65">
            <text:p>11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5103170380001465500100006658712725653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5">
            <text:p>307465</text:p>
          </table:table-cell>
          <table:table-cell table:style-name="ce0" table:number-columns-spanned="4" table:number-rows-spanned="1" office:value-type="string" calcext:value-type="string">
            <text:p>22.015 - FOCO METALLO FABRICACAO E MONTAGEM DE LUMINARIAS E COMERCIO</text:p>
          </table:table-cell>
          <table:covered-table-cell table:number-columns-repeated="3"/>
          <table:table-cell table:style-name="ce0" office:value-type="string" calcext:value-type="string">
            <text:p>23.3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0.3">
            <text:p>114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39">
            <text:p>103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79">
            <text:p>0,0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40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01.3">
            <text:p>101,30</text:p>
          </table:table-cell>
          <table:table-cell table:style-name="ce12N2" office:value-type="float" office:value="1039">
            <text:p>1039,00</text:p>
          </table:table-cell>
          <table:table-cell table:style-name="ce12N2" office:value-type="float" office:value="72.73">
            <text:p>72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42.33">
            <text:p>24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7.724.082</text:p>
          </table:table-cell>
          <table:table-cell table:style-name="ce0" office:value-type="string" calcext:value-type="string">
            <text:p>17.618 - ALFA TRANSPORTES EIRELI</text:p>
          </table:table-cell>
          <table:table-cell table:style-name="ce0" office:value-type="string" calcext:value-type="string">
            <text:p>14/05/2026</text:p>
          </table:table-cell>
          <table:table-cell table:style-name="ce12" office:value-type="string" calcext:value-type="string">
            <text:p>242,33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42260522670837000180550010000233691542222518</text:p>
          </table:table-cell>
          <table:table-cell table:style-name="ce0" office:value-type="string" calcext:value-type="string">
            <text:p>42260582110818000121570000077240821090348638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1">
            <text:p>307471</text:p>
          </table:table-cell>
          <table:table-cell table:style-name="ce0" table:number-columns-spanned="4" table:number-rows-spanned="1" office:value-type="string" calcext:value-type="string">
            <text:p>29.444 - PRIME BRAS SEGURANCA LTDA</text:p>
          </table:table-cell>
          <table:covered-table-cell table:number-columns-repeated="3"/>
          <table:table-cell table:style-name="ce0" office:value-type="string" calcext:value-type="string">
            <text:p>1.45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60">
            <text:p>74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60">
            <text:p>74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454">
            <text:p>0,165</text:p>
          </table:table-cell>
          <table:table-cell table:style-name="ce12N2" office:value-type="float" office:value="25.2">
            <text:p>2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6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60">
            <text:p>7460,00</text:p>
          </table:table-cell>
          <table:table-cell table:style-name="ce12N2" office:value-type="float" office:value="895.2">
            <text:p>89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2296669000169550030000014561732534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39">
            <text:p>307539</text:p>
          </table:table-cell>
          <table:table-cell table:style-name="ce0" table:number-columns-spanned="4" table:number-rows-spanned="1" office:value-type="string" calcext:value-type="string">
            <text:p>16.628 - VFL IMPORTADORA E DISTRIBUIDORA LTDA</text:p>
          </table:table-cell>
          <table:covered-table-cell table:number-columns-repeated="3"/>
          <table:table-cell table:style-name="ce0" office:value-type="string" calcext:value-type="string">
            <text:p>4.6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23.65">
            <text:p>272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723.65">
            <text:p>2723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185">
            <text:p>0,004</text:p>
          </table:table-cell>
          <table:table-cell table:style-name="ce12N2" office:value-type="float" office:value="3.07">
            <text:p>3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23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.33">
            <text:p>6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23.65">
            <text:p>2723,65</text:p>
          </table:table-cell>
          <table:table-cell table:style-name="ce12N2" office:value-type="float" office:value="108.95">
            <text:p>108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051043590001225500100000467717371791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2">
            <text:p>3075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519374979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8">
            <text:p>3075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319391751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9">
            <text:p>3075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41425368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35">
            <text:p>3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65">
            <text:p>26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623.34">
            <text:p>3623,34</text:p>
          </table:table-cell>
          <table:table-cell table:style-name="ce26N2" office:value-type="float" office:value="121859.18">
            <text:p>121859,18</text:p>
          </table:table-cell>
          <table:table-cell table:style-name="ce26N2" office:value-type="float" office:value="8286.95">
            <text:p>8286,9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28.83">
            <text:p>328,83</text:p>
          </table:table-cell>
          <table:table-cell table:style-name="ce26N2" office:value-type="float" office:value="126224.22">
            <text:p>126224,2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6.143688">
            <text:p>6,144</text:p>
          </table:table-cell>
          <table:table-cell table:style-name="ce26N2" office:value-type="float" office:value="122335.88">
            <text:p>122335,88</text:p>
          </table:table-cell>
          <table:table-cell table:style-name="ce26N2" office:value-type="float" office:value="126224.22">
            <text:p>126224,2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796.71">
            <text:p>796,7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9.43">
            <text:p>49,4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AC COELH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20" meta:object-count="0"/>
    <meta:generator>LibreOffice/4.3.0.4$Windows_x86 LibreOffice_project/62ad5818884a2fc2e5780dd45466868d41009ec0</meta:generator>
  </office:meta>
</office:document-meta>
</file>