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2/07/2026 04:30:30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61">
            <text:p>310061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5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447.76">
            <text:p>133447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">
            <text:p>54,00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96138">
            <text:p>4,596</text:p>
          </table:table-cell>
          <table:table-cell table:style-name="ce12N2" office:value-type="float" office:value="1165.53">
            <text:p>1165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3.447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8361.32">
            <text:p>108361,32</text:p>
          </table:table-cell>
          <table:table-cell table:style-name="ce12N2" office:value-type="float" office:value="108.37">
            <text:p>10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.24">
            <text:p>975,24</text:p>
          </table:table-cell>
          <table:table-cell table:style-name="ce12N2" office:value-type="float" office:value="82.67">
            <text:p>82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5053.68">
            <text:p>5053,68</text:p>
          </table:table-cell>
          <table:table-cell table:style-name="ce12N2" office:value-type="float" office:value="128394.08">
            <text:p>128394,08</text:p>
          </table:table-cell>
          <table:table-cell table:style-name="ce12N2" office:value-type="float" office:value="8987.59">
            <text:p>8987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57711020225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94">
            <text:p>31019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74.72">
            <text:p>137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64">
            <text:p>0,069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74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4.56">
            <text:p>1124,56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83.9">
            <text:p>83,90</text:p>
          </table:table-cell>
          <table:table-cell table:style-name="ce12N2" office:value-type="float" office:value="1290.82">
            <text:p>1290,82</text:p>
          </table:table-cell>
          <table:table-cell table:style-name="ce12N2" office:value-type="float" office:value="51.63">
            <text:p>5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4241664822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03">
            <text:p>310203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9.67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25.85">
            <text:p>462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25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69.27">
            <text:p>3769,27</text:p>
          </table:table-cell>
          <table:table-cell table:style-name="ce12N2" office:value-type="float" office:value="3.76">
            <text:p>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82.76">
            <text:p>82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159.72">
            <text:p>159,72</text:p>
          </table:table-cell>
          <table:table-cell table:style-name="ce12N2" office:value-type="float" office:value="4466.13">
            <text:p>4466,13</text:p>
          </table:table-cell>
          <table:table-cell table:style-name="ce12N2" office:value-type="float" office:value="312.64">
            <text:p>31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7547907000153550050003196781651239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90">
            <text:p>310290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7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44.19">
            <text:p>884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3">
            <text:p>2,300</text:p>
          </table:table-cell>
          <table:table-cell table:style-name="ce12N2" office:value-type="float" office:value="124.8">
            <text:p>12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44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8.29">
            <text:p>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.6">
            <text:p>74,6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556.4">
            <text:p>556,40</text:p>
          </table:table-cell>
          <table:table-cell table:style-name="ce12N2" office:value-type="float" office:value="8287.79">
            <text:p>8287,79</text:p>
          </table:table-cell>
          <table:table-cell table:style-name="ce12N2" office:value-type="float" office:value="408.96">
            <text:p>40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4624251000151550010000471701000350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95">
            <text:p>310495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8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11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11.87">
            <text:p>1011,87</text:p>
          </table:table-cell>
          <table:table-cell table:style-name="ce12N2" office:value-type="float" office:value="1.01">
            <text:p>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11">
            <text:p>9,11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131.98">
            <text:p>131,98</text:p>
          </table:table-cell>
          <table:table-cell table:style-name="ce12N2" office:value-type="float" office:value="879.89">
            <text:p>879,89</text:p>
          </table:table-cell>
          <table:table-cell table:style-name="ce12N2" office:value-type="float" office:value="35.2">
            <text:p>3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8840122311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556">
            <text:p>3105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07/07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98.25">
            <text:p>629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98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65.94">
            <text:p>5465,94</text:p>
          </table:table-cell>
          <table:table-cell table:style-name="ce12N2" office:value-type="float" office:value="5.47">
            <text:p>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19">
            <text:p>49,19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7/2026</text:p>
          </table:table-cell>
          <table:table-cell table:style-name="ce12N2" office:value-type="float" office:value="198.25">
            <text:p>198,25</text:p>
          </table:table-cell>
          <table:table-cell table:style-name="ce12N2" office:value-type="float" office:value="6100">
            <text:p>6100,00</text:p>
          </table:table-cell>
          <table:table-cell table:style-name="ce12N2" office:value-type="float" office:value="427">
            <text:p>42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21318931143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798">
            <text:p>310798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921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0044">
            <text:p>0,160</text:p>
          </table:table-cell>
          <table:table-cell table:style-name="ce12N2" office:value-type="float" office:value="743.9">
            <text:p>743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51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859.26">
            <text:p>11859,26</text:p>
          </table:table-cell>
          <table:table-cell table:style-name="ce12N2" office:value-type="float" office:value="11.85">
            <text:p>1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.72">
            <text:p>106,7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51.67">
            <text:p>14051,67</text:p>
          </table:table-cell>
          <table:table-cell table:style-name="ce12N2" office:value-type="float" office:value="983.61">
            <text:p>98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8215460001025501200000092118540501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812">
            <text:p>310812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72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7/2026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08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99.2">
            <text:p>70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9944">
            <text:p>0,510</text:p>
          </table:table-cell>
          <table:table-cell table:style-name="ce12N2" office:value-type="float" office:value="53.14">
            <text:p>5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0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55.39">
            <text:p>5955,39</text:p>
          </table:table-cell>
          <table:table-cell table:style-name="ce12N2" office:value-type="float" office:value="5.96">
            <text:p>5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7/2026</text:p>
          </table:table-cell>
          <table:table-cell table:style-name="ce12N2" office:value-type="float" office:value="42.81">
            <text:p>42,81</text:p>
          </table:table-cell>
          <table:table-cell table:style-name="ce12N2" office:value-type="float" office:value="7056.39">
            <text:p>7056,39</text:p>
          </table:table-cell>
          <table:table-cell table:style-name="ce12N2" office:value-type="float" office:value="493.95">
            <text:p>4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96415200001585500100077246717380651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28">
            <text:p>310928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9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83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83.5">
            <text:p>5483,50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34">
            <text:p>49,3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487.15">
            <text:p>487,15</text:p>
          </table:table-cell>
          <table:table-cell table:style-name="ce12N2" office:value-type="float" office:value="4996.35">
            <text:p>4996,35</text:p>
          </table:table-cell>
          <table:table-cell table:style-name="ce12N2" office:value-type="float" office:value="199.85">
            <text:p>19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729244900000247550010000690481412101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2">
            <text:p>310932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2.4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57.99">
            <text:p>625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4E-5">
            <text:p>0,000</text:p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57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31">
            <text:p>5431,00</text:p>
          </table:table-cell>
          <table:table-cell table:style-name="ce12N2" office:value-type="float" office:value="5.43">
            <text:p>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87">
            <text:p>48,8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196.99">
            <text:p>196,99</text:p>
          </table:table-cell>
          <table:table-cell table:style-name="ce12N2" office:value-type="float" office:value="6061">
            <text:p>6061,00</text:p>
          </table:table-cell>
          <table:table-cell table:style-name="ce12N2" office:value-type="float" office:value="424.27">
            <text:p>4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7718726000135550010002024171419170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37">
            <text:p>3109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.99">
            <text:p>15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3">
            <text:p>0,001</text:p>
          </table:table-cell>
          <table:table-cell table:style-name="ce12N2" office:value-type="float" office:value="0.73">
            <text:p>0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6">
            <text:p>127,6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7/2026</text:p>
          </table:table-cell>
          <table:table-cell table:style-name="ce12N2" office:value-type="float" office:value="9.52">
            <text:p>9,52</text:p>
          </table:table-cell>
          <table:table-cell table:style-name="ce12N2" office:value-type="float" office:value="146.47">
            <text:p>146,47</text:p>
          </table:table-cell>
          <table:table-cell table:style-name="ce12N2" office:value-type="float" office:value="5.86">
            <text:p>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5312945343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996">
            <text:p>310996</text:p>
          </table:table-cell>
          <table:table-cell table:style-name="ce0" table:number-columns-spanned="4" table:number-rows-spanned="1" office:value-type="string" calcext:value-type="string">
            <text:p>3.404 - VENTISOL INDUSTRIA E COMERCIO LTDA</text:p>
          </table:table-cell>
          <table:covered-table-cell table:number-columns-repeated="3"/>
          <table:table-cell table:style-name="ce0" office:value-type="string" calcext:value-type="string">
            <text:p>1.255.97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0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54.17">
            <text:p>24954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2173">
            <text:p>2,922</text:p>
          </table:table-cell>
          <table:table-cell table:style-name="ce12N2" office:value-type="float" office:value="793.84">
            <text:p>79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954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527.77">
            <text:p>20527,77</text:p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4.76">
            <text:p>184,76</text:p>
          </table:table-cell>
          <table:table-cell table:style-name="ce12N2" office:value-type="float" office:value="63.33">
            <text:p>63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631.45">
            <text:p>631,45</text:p>
          </table:table-cell>
          <table:table-cell table:style-name="ce12N2" office:value-type="float" office:value="24322.72">
            <text:p>24322,72</text:p>
          </table:table-cell>
          <table:table-cell table:style-name="ce12N2" office:value-type="float" office:value="1702.59">
            <text:p>170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7637200001715500500125597715782623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2">
            <text:p>311002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1.3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.5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210.5">
            <text:p>72210,50</text:p>
          </table:table-cell>
          <table:table-cell table:style-name="ce12N2" office:value-type="float" office:value="72.21">
            <text:p>72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9.89">
            <text:p>649,89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560">
            <text:p>85560,00</text:p>
          </table:table-cell>
          <table:table-cell table:style-name="ce12N2" office:value-type="float" office:value="5989.2">
            <text:p>59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1313101963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5">
            <text:p>311005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803.4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1.92">
            <text:p>914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69.28">
            <text:p>7869,28</text:p>
          </table:table-cell>
          <table:table-cell table:style-name="ce12N2" office:value-type="float" office:value="505.39">
            <text:p>505,39</text:p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41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96.01">
            <text:p>7296,01</text:p>
          </table:table-cell>
          <table:table-cell table:style-name="ce12N2" office:value-type="float" office:value="7.3">
            <text:p>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.66">
            <text:p>65,66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767.25">
            <text:p>767,25</text:p>
          </table:table-cell>
          <table:table-cell table:style-name="ce12N2" office:value-type="float" office:value="8374.67">
            <text:p>8374,67</text:p>
          </table:table-cell>
          <table:table-cell table:style-name="ce12N2" office:value-type="float" office:value="334.99">
            <text:p>33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82984287000104550020018034881606197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06">
            <text:p>31100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8.9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91.62">
            <text:p>9591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6.96">
            <text:p>7926,96</text:p>
          </table:table-cell>
          <table:table-cell table:style-name="ce12N2" office:value-type="float" office:value="475.62">
            <text:p>475,62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33.29">
            <text:p>33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91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77.14">
            <text:p>7777,14</text:p>
          </table:table-cell>
          <table:table-cell table:style-name="ce12N2" office:value-type="float" office:value="7.78">
            <text:p>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99">
            <text:p>69,99</text:p>
          </table:table-cell>
          <table:table-cell table:style-name="ce12N2" office:value-type="float" office:value="74">
            <text:p>7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189.04">
            <text:p>1189,04</text:p>
          </table:table-cell>
          <table:table-cell table:style-name="ce12N2" office:value-type="float" office:value="8402.58">
            <text:p>8402,58</text:p>
          </table:table-cell>
          <table:table-cell table:style-name="ce12N2" office:value-type="float" office:value="336.1">
            <text:p>336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24855633000140550010000789541535925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18">
            <text:p>311018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4.8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3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15.35">
            <text:p>2715,35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.25">
            <text:p>3030,25</text:p>
          </table:table-cell>
          <table:table-cell table:style-name="ce12N2" office:value-type="float" office:value="212.09">
            <text:p>21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4512371000014755001000014806185346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0">
            <text:p>311030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36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0.96">
            <text:p>319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12">
            <text:p>0,001</text:p>
          </table:table-cell>
          <table:table-cell table:style-name="ce12N2" office:value-type="float" office:value="0.26">
            <text:p>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9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11.51">
            <text:p>2611,51</text:p>
          </table:table-cell>
          <table:table-cell table:style-name="ce12N2" office:value-type="float" office:value="2.61">
            <text:p>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5">
            <text:p>23,50</text:p>
          </table:table-cell>
          <table:table-cell table:style-name="ce12N2" office:value-type="float" office:value="41.15">
            <text:p>41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93.36">
            <text:p>193,36</text:p>
          </table:table-cell>
          <table:table-cell table:style-name="ce12N2" office:value-type="float" office:value="2997.6">
            <text:p>2997,60</text:p>
          </table:table-cell>
          <table:table-cell table:style-name="ce12N2" office:value-type="float" office:value="119.91">
            <text:p>119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9416459000120550010008360301747788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1">
            <text:p>311031</text:p>
          </table:table-cell>
          <table:table-cell table:style-name="ce0" table:number-columns-spanned="4" table:number-rows-spanned="1" office:value-type="string" calcext:value-type="string">
            <text:p>9.588 - STARLUX COMERCIO E REPRESENTACOES LTDA</text:p>
          </table:table-cell>
          <table:covered-table-cell table:number-columns-repeated="3"/>
          <table:table-cell table:style-name="ce0" office:value-type="string" calcext:value-type="string">
            <text:p>28.8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1.83">
            <text:p>2271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80">
            <text:p>1980,00</text:p>
          </table:table-cell>
          <table:table-cell table:style-name="ce12N2" office:value-type="float" office:value="90">
            <text:p>9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1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11.64">
            <text:p>1911,64</text:p>
          </table:table-cell>
          <table:table-cell table:style-name="ce12N2" office:value-type="float" office:value="1.91">
            <text:p>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2">
            <text:p>17,20</text:p>
          </table:table-cell>
          <table:table-cell table:style-name="ce12N2" office:value-type="float" office:value="37">
            <text:p>3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201.83">
            <text:p>201,83</text:p>
          </table:table-cell>
          <table:table-cell table:style-name="ce12N2" office:value-type="float" office:value="2070">
            <text:p>2070,00</text:p>
          </table:table-cell>
          <table:table-cell table:style-name="ce12N2" office:value-type="float" office:value="82.8">
            <text:p>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8870880001785500300002889111615433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8">
            <text:p>311038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68">
            <text:p>0,058</text:p>
          </table:table-cell>
          <table:table-cell table:style-name="ce12N2" office:value-type="float" office:value="12.14">
            <text:p>1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1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20.36">
            <text:p>2120,36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08">
            <text:p>19,08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12.36">
            <text:p>2512,36</text:p>
          </table:table-cell>
          <table:table-cell table:style-name="ce12N2" office:value-type="float" office:value="175.87">
            <text:p>17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7510623307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39">
            <text:p>311039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45.1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8.64">
            <text:p>821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266">
            <text:p>0,288</text:p>
          </table:table-cell>
          <table:table-cell table:style-name="ce12N2" office:value-type="float" office:value="45.46">
            <text:p>45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23.9">
            <text:p>6823,90</text:p>
          </table:table-cell>
          <table:table-cell table:style-name="ce12N2" office:value-type="float" office:value="6.82">
            <text:p>6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42">
            <text:p>61,42</text:p>
          </table:table-cell>
          <table:table-cell table:style-name="ce12N2" office:value-type="float" office:value="62.55">
            <text:p>62,5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7/2026</text:p>
          </table:table-cell>
          <table:table-cell table:style-name="ce12N2" office:value-type="float" office:value="133.22">
            <text:p>133,22</text:p>
          </table:table-cell>
          <table:table-cell table:style-name="ce12N2" office:value-type="float" office:value="8085.42">
            <text:p>8085,42</text:p>
          </table:table-cell>
          <table:table-cell table:style-name="ce12N2" office:value-type="float" office:value="565.98">
            <text:p>56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09495280012325500100234516311350829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094">
            <text:p>311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4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1.39">
            <text:p>14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244">
            <text:p>0,018</text:p>
          </table:table-cell>
          <table:table-cell table:style-name="ce12N2" office:value-type="float" office:value="0.44">
            <text:p>0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6.4">
            <text:p>1126,40</text:p>
          </table:table-cell>
          <table:table-cell table:style-name="ce12N2" office:value-type="float" office:value="1.13">
            <text:p>1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86.75">
            <text:p>86,75</text:p>
          </table:table-cell>
          <table:table-cell table:style-name="ce12N2" office:value-type="float" office:value="1334.64">
            <text:p>1334,64</text:p>
          </table:table-cell>
          <table:table-cell table:style-name="ce12N2" office:value-type="float" office:value="93.42">
            <text:p>9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4521484211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25">
            <text:p>3111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1.3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7/2026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51">
            <text:p>0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61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42.32">
            <text:p>642,32</text:p>
          </table:table-cell>
          <table:table-cell table:style-name="ce12N2" office:value-type="float" office:value="0.64">
            <text:p>0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78">
            <text:p>5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53.27">
            <text:p>5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138612738047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61">
            <text:p>31116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0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4.81">
            <text:p>529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58278">
            <text:p>0,458</text:p>
          </table:table-cell>
          <table:table-cell table:style-name="ce12N2" office:value-type="float" office:value="15.72">
            <text:p>1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4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31.28">
            <text:p>4331,28</text:p>
          </table:table-cell>
          <table:table-cell table:style-name="ce12N2" office:value-type="float" office:value="4.33">
            <text:p>4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98">
            <text:p>38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323.17">
            <text:p>323,17</text:p>
          </table:table-cell>
          <table:table-cell table:style-name="ce12N2" office:value-type="float" office:value="4971.64">
            <text:p>4971,64</text:p>
          </table:table-cell>
          <table:table-cell table:style-name="ce12N2" office:value-type="float" office:value="198.87">
            <text:p>19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06310421438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3">
            <text:p>311173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743.97">
            <text:p>3474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448">
            <text:p>0,404</text:p>
          </table:table-cell>
          <table:table-cell table:style-name="ce12N2" office:value-type="float" office:value="700.5">
            <text:p>70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74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415.58">
            <text:p>28415,58</text:p>
          </table:table-cell>
          <table:table-cell table:style-name="ce12N2" office:value-type="float" office:value="28.42">
            <text:p>2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.74">
            <text:p>255,74</text:p>
          </table:table-cell>
          <table:table-cell table:style-name="ce12N2" office:value-type="float" office:value="72.24">
            <text:p>72,2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127.37">
            <text:p>2127,37</text:p>
          </table:table-cell>
          <table:table-cell table:style-name="ce12N2" office:value-type="float" office:value="32616.6">
            <text:p>32616,60</text:p>
          </table:table-cell>
          <table:table-cell table:style-name="ce12N2" office:value-type="float" office:value="1304.66">
            <text:p>130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818413868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75">
            <text:p>311175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7.72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6.36">
            <text:p>19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13.28">
            <text:p>1513,28</text:p>
          </table:table-cell>
          <table:table-cell table:style-name="ce12N2" office:value-type="float" office:value="1.51">
            <text:p>1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62">
            <text:p>13,62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69.36">
            <text:p>169,36</text:p>
          </table:table-cell>
          <table:table-cell table:style-name="ce12N2" office:value-type="float" office:value="1737">
            <text:p>1737,00</text:p>
          </table:table-cell>
          <table:table-cell table:style-name="ce12N2" office:value-type="float" office:value="69.48">
            <text:p>69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35635346000140550020001177271272938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85">
            <text:p>3111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.87">
            <text:p>42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8">
            <text:p>39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444">
            <text:p>0,008</text:p>
          </table:table-cell>
          <table:table-cell table:style-name="ce12N2" office:value-type="float" office:value="2.78">
            <text:p>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6.74">
            <text:p>346,74</text:p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12">
            <text:p>3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.87">
            <text:p>25,87</text:p>
          </table:table-cell>
          <table:table-cell table:style-name="ce12N2" office:value-type="float" office:value="398">
            <text:p>398,00</text:p>
          </table:table-cell>
          <table:table-cell table:style-name="ce12N2" office:value-type="float" office:value="15.92">
            <text:p>1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831083799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194">
            <text:p>3111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3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37.6">
            <text:p>1103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37.6">
            <text:p>1103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97">
            <text:p>0,108</text:p>
          </table:table-cell>
          <table:table-cell table:style-name="ce12N2" office:value-type="float" office:value="13.5">
            <text:p>1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3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315.46">
            <text:p>9315,46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.84">
            <text:p>83,8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37.6">
            <text:p>11037,60</text:p>
          </table:table-cell>
          <table:table-cell table:style-name="ce12N2" office:value-type="float" office:value="772.63">
            <text:p>77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39216746377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18">
            <text:p>31121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34.4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9.24">
            <text:p>1099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2.15">
            <text:p>1032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55">
            <text:p>0,011</text:p>
          </table:table-cell>
          <table:table-cell table:style-name="ce12N2" office:value-type="float" office:value="3.47">
            <text:p>3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9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99.2">
            <text:p>899,20</text:p>
          </table:table-cell>
          <table:table-cell table:style-name="ce12N2" office:value-type="float" office:value="0.9">
            <text:p>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.09">
            <text:p>8,0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67.09">
            <text:p>67,09</text:p>
          </table:table-cell>
          <table:table-cell table:style-name="ce12N2" office:value-type="float" office:value="1032.15">
            <text:p>1032,15</text:p>
          </table:table-cell>
          <table:table-cell table:style-name="ce12N2" office:value-type="float" office:value="41.29">
            <text:p>4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190550010051344181724821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29">
            <text:p>31122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51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27.03">
            <text:p>182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715.52">
            <text:p>171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0236">
            <text:p>0,420</text:p>
          </table:table-cell>
          <table:table-cell table:style-name="ce12N2" office:value-type="float" office:value="10.14">
            <text:p>10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2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4.56">
            <text:p>1494,56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5">
            <text:p>13,4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11.51">
            <text:p>111,51</text:p>
          </table:table-cell>
          <table:table-cell table:style-name="ce12N2" office:value-type="float" office:value="1715.52">
            <text:p>1715,52</text:p>
          </table:table-cell>
          <table:table-cell table:style-name="ce12N2" office:value-type="float" office:value="68.62">
            <text:p>6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59635500100005153119168873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33">
            <text:p>3112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3.1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5.68">
            <text:p>341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784">
            <text:p>0,118</text:p>
          </table:table-cell>
          <table:table-cell table:style-name="ce12N2" office:value-type="float" office:value="7.42">
            <text:p>7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98.24">
            <text:p>2798,24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.18">
            <text:p>25,1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0.12">
            <text:p>100,12</text:p>
          </table:table-cell>
          <table:table-cell table:style-name="ce12N2" office:value-type="float" office:value="3315.56">
            <text:p>3315,56</text:p>
          </table:table-cell>
          <table:table-cell table:style-name="ce12N2" office:value-type="float" office:value="232.09">
            <text:p>23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31451129875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57">
            <text:p>311257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8.0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83.34">
            <text:p>2908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2">
            <text:p>0,006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083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26.51">
            <text:p>26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.49">
            <text:p>238,49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583.7">
            <text:p>2583,70</text:p>
          </table:table-cell>
          <table:table-cell table:style-name="ce12N2" office:value-type="float" office:value="26499.64">
            <text:p>26499,64</text:p>
          </table:table-cell>
          <table:table-cell table:style-name="ce12N2" office:value-type="float" office:value="1854.97">
            <text:p>1854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87.11">
            <text:p>58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3.44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7/2026</text:p>
          </table:table-cell>
          <table:table-cell table:style-name="ce12" office:value-type="string" calcext:value-type="string">
            <text:p>587,1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35260758329608000144550010002680661002680670</text:p>
          </table:table-cell>
          <table:table-cell table:style-name="ce0" office:value-type="string" calcext:value-type="string">
            <text:p>3526071138956500020057005000403445100089943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0">
            <text:p>311260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8.4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15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31.38">
            <text:p>853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8116.3">
            <text:p>8116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752">
            <text:p>0,116</text:p>
          </table:table-cell>
          <table:table-cell table:style-name="ce12N2" office:value-type="float" office:value="196.82">
            <text:p>196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53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07.23">
            <text:p>7507,23</text:p>
          </table:table-cell>
          <table:table-cell table:style-name="ce12N2" office:value-type="float" office:value="7.5">
            <text:p>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.57">
            <text:p>67,57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415.08">
            <text:p>415,08</text:p>
          </table:table-cell>
          <table:table-cell table:style-name="ce12N2" office:value-type="float" office:value="8116.3">
            <text:p>8116,30</text:p>
          </table:table-cell>
          <table:table-cell table:style-name="ce12N2" office:value-type="float" office:value="324.66">
            <text:p>324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0.06">
            <text:p>23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97.587</text:p>
          </table:table-cell>
          <table:table-cell table:style-name="ce0" office:value-type="string" calcext:value-type="string">
            <text:p>30.965 - RTL ENCOMENDAS E CARGAS LTDA</text:p>
          </table:table-cell>
          <table:table-cell table:style-name="ce0" office:value-type="string" calcext:value-type="string">
            <text:p>17/07/2026</text:p>
          </table:table-cell>
          <table:table-cell table:style-name="ce12" office:value-type="string" calcext:value-type="string">
            <text:p>230,0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52260717328359000195550010000884271251082881</text:p>
          </table:table-cell>
          <table:table-cell table:style-name="ce0" office:value-type="string" calcext:value-type="string">
            <text:p>5226073160759800010557001000097587100072931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3">
            <text:p>311263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8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254.12">
            <text:p>125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5.66">
            <text:p>15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5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60.63">
            <text:p>1160,63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44">
            <text:p>10,44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81.52">
            <text:p>81,52</text:p>
          </table:table-cell>
          <table:table-cell table:style-name="ce12N2" office:value-type="float" office:value="1335.64">
            <text:p>1335,64</text:p>
          </table:table-cell>
          <table:table-cell table:style-name="ce12N2" office:value-type="float" office:value="93.49">
            <text:p>93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814590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64">
            <text:p>311264</text:p>
          </table:table-cell>
          <table:table-cell table:style-name="ce0" table:number-columns-spanned="4" table:number-rows-spanned="1" office:value-type="string" calcext:value-type="string">
            <text:p>4.003 - JAPI SA INDUSTRIA E COMERCIO</text:p>
          </table:table-cell>
          <table:covered-table-cell table:number-columns-repeated="3"/>
          <table:table-cell table:style-name="ce0" office:value-type="string" calcext:value-type="string">
            <text:p>779.207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6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59.73">
            <text:p>1835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98.34">
            <text:p>198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59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625.75">
            <text:p>14625,75</text:p>
          </table:table-cell>
          <table:table-cell table:style-name="ce12N2" office:value-type="float" office:value="14.64">
            <text:p>1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1.62">
            <text:p>131,62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30.11">
            <text:p>1030,11</text:p>
          </table:table-cell>
          <table:table-cell table:style-name="ce12N2" office:value-type="float" office:value="17329.62">
            <text:p>17329,62</text:p>
          </table:table-cell>
          <table:table-cell table:style-name="ce12N2" office:value-type="float" office:value="1213.05">
            <text:p>121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715224600001285500500077920711143939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1">
            <text:p>311271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926.64">
            <text:p>1192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92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051.63">
            <text:p>10051,63</text:p>
          </table:table-cell>
          <table:table-cell table:style-name="ce12N2" office:value-type="float" office:value="10.05">
            <text:p>1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.46">
            <text:p>90,46</text:p>
          </table:table-cell>
          <table:table-cell table:style-name="ce12N2" office:value-type="float" office:value="100">
            <text:p>10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1059.54">
            <text:p>1059,54</text:p>
          </table:table-cell>
          <table:table-cell table:style-name="ce12N2" office:value-type="float" office:value="10867.1">
            <text:p>10867,10</text:p>
          </table:table-cell>
          <table:table-cell table:style-name="ce12N2" office:value-type="float" office:value="434.68">
            <text:p>43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615543504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275">
            <text:p>311275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7.56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7/2026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.79">
            <text:p>25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7/2026</text:p>
          </table:table-cell>
          <table:table-cell table:style-name="ce12N2" office:value-type="float" office:value="22.73">
            <text:p>22,73</text:p>
          </table:table-cell>
          <table:table-cell table:style-name="ce12N2" office:value-type="float" office:value="233.06">
            <text:p>233,06</text:p>
          </table:table-cell>
          <table:table-cell table:style-name="ce12N2" office:value-type="float" office:value="9.32">
            <text:p>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22091324000204550030000075671405064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09">
            <text:p>311309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44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0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124.51">
            <text:p>3912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7696.07">
            <text:p>37696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6088">
            <text:p>3,061</text:p>
          </table:table-cell>
          <table:table-cell table:style-name="ce12N2" office:value-type="float" office:value="595.1">
            <text:p>59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12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40.81">
            <text:p>32840,81</text:p>
          </table:table-cell>
          <table:table-cell table:style-name="ce12N2" office:value-type="float" office:value="32.84">
            <text:p>3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5.56">
            <text:p>295,56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1428.44">
            <text:p>1428,44</text:p>
          </table:table-cell>
          <table:table-cell table:style-name="ce12N2" office:value-type="float" office:value="37696.07">
            <text:p>37696,07</text:p>
          </table:table-cell>
          <table:table-cell table:style-name="ce12N2" office:value-type="float" office:value="1507.84">
            <text:p>150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90049792000181550010013440441066129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3">
            <text:p>31133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26.0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9/10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57">
            <text:p>0,166</text:p>
          </table:table-cell>
          <table:table-cell table:style-name="ce12N2" office:value-type="float" office:value="212.8">
            <text:p>21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78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8638.87">
            <text:p>38638,87</text:p>
          </table:table-cell>
          <table:table-cell table:style-name="ce12N2" office:value-type="float" office:value="38.64">
            <text:p>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7.75">
            <text:p>347,75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82">
            <text:p>45782,00</text:p>
          </table:table-cell>
          <table:table-cell table:style-name="ce12N2" office:value-type="float" office:value="3204.74">
            <text:p>320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61413282000143550010030260231560625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6">
            <text:p>311336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9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761">
            <text:p>0,228</text:p>
          </table:table-cell>
          <table:table-cell table:style-name="ce12N2" office:value-type="float" office:value="94.12">
            <text:p>9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3.83">
            <text:p>1123,83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31.6">
            <text:p>1331,60</text:p>
          </table:table-cell>
          <table:table-cell table:style-name="ce12N2" office:value-type="float" office:value="93.21">
            <text:p>93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978371810022715500100216961414445120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39">
            <text:p>3113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94.5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67">
            <text:p>1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5.44">
            <text:p>1115,4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4">
            <text:p>10,0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1.66">
            <text:p>1321,66</text:p>
          </table:table-cell>
          <table:table-cell table:style-name="ce12N2" office:value-type="float" office:value="92.52">
            <text:p>92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75339051000141550080006945001253830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2">
            <text:p>31134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39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3.73">
            <text:p>13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0.8">
            <text:p>132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4">
            <text:p>0,000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3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50.68">
            <text:p>1150,68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36">
            <text:p>10,3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42.93">
            <text:p>42,93</text:p>
          </table:table-cell>
          <table:table-cell table:style-name="ce12N2" office:value-type="float" office:value="1320.8">
            <text:p>1320,80</text:p>
          </table:table-cell>
          <table:table-cell table:style-name="ce12N2" office:value-type="float" office:value="52.83">
            <text:p>5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3931366460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49">
            <text:p>3113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5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0.74">
            <text:p>177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">
            <text:p>0,02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4.1">
            <text:p>1494,10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5">
            <text:p>13,45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55.74">
            <text:p>55,74</text:p>
          </table:table-cell>
          <table:table-cell table:style-name="ce12N2" office:value-type="float" office:value="1715">
            <text:p>1715,00</text:p>
          </table:table-cell>
          <table:table-cell table:style-name="ce12N2" office:value-type="float" office:value="68.6">
            <text:p>6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551674666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0">
            <text:p>3113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81.45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0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.91">
            <text:p>98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1">
            <text:p>9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28.52">
            <text:p>828,52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.46">
            <text:p>7,4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30.91">
            <text:p>30,91</text:p>
          </table:table-cell>
          <table:table-cell table:style-name="ce12N2" office:value-type="float" office:value="951">
            <text:p>951,00</text:p>
          </table:table-cell>
          <table:table-cell table:style-name="ce12N2" office:value-type="float" office:value="38.04">
            <text:p>3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52618139002817550030008814561940277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1355">
            <text:p>311355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62.517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21/07/2026</text:p>
          </table:table-cell>
          <table:table-cell table:style-name="ce0" office:value-type="string" calcext:value-type="string">
            <text:p>18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6889">
            <text:p>5,689</text:p>
          </table:table-cell>
          <table:table-cell table:style-name="ce12N2" office:value-type="float" office:value="3959.37">
            <text:p>3959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621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7531.94">
            <text:p>27531,94</text:p>
          </table:table-cell>
          <table:table-cell table:style-name="ce12N2" office:value-type="float" office:value="27.53">
            <text:p>27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.78">
            <text:p>247,78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1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621.74">
            <text:p>32621,74</text:p>
          </table:table-cell>
          <table:table-cell table:style-name="ce12N2" office:value-type="float" office:value="2283.52">
            <text:p>228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7146752700004505504000006251711063781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47">
            <text:p>4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71.01">
            <text:p>1071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0356.8">
            <text:p>20356,80</text:p>
          </table:table-cell>
          <table:table-cell table:style-name="ce26N2" office:value-type="float" office:value="776347.52">
            <text:p>776347,52</text:p>
          </table:table-cell>
          <table:table-cell table:style-name="ce26N2" office:value-type="float" office:value="50197.23">
            <text:p>50197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17.17">
            <text:p>817,17</text:p>
          </table:table-cell>
          <table:table-cell table:style-name="ce26N2" office:value-type="float" office:value="796632.8">
            <text:p>796632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5.70021">
            <text:p>25,700</text:p>
          </table:table-cell>
          <table:table-cell table:style-name="ce26N2" office:value-type="float" office:value="775204.99">
            <text:p>775204,99</text:p>
          </table:table-cell>
          <table:table-cell table:style-name="ce26N2" office:value-type="float" office:value="796632.8">
            <text:p>796632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7783.02">
            <text:p>667783,02</text:p>
          </table:table-cell>
          <table:table-cell table:style-name="ce26N2" office:value-type="float" office:value="667.77">
            <text:p>667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009.96">
            <text:p>6009,96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795.97">
            <text:p>10795,9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2.78">
            <text:p>72,7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4" meta:object-count="0"/>
    <meta:generator>LibreOffice/4.3.0.4$Windows_x86 LibreOffice_project/62ad5818884a2fc2e5780dd45466868d41009ec0</meta:generator>
  </office:meta>
</office:document-meta>
</file>