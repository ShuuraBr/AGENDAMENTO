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9/06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812">
            <text:p>3078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6">
            <text:p>0,006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0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184.15">
            <text:p>18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1619546161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7">
            <text:p>30785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7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54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395.84">
            <text:p>39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74316594747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7">
            <text:p>3078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3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19.68">
            <text:p>3741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36801.86">
            <text:p>36801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8374">
            <text:p>0,138</text:p>
          </table:table-cell>
          <table:table-cell table:style-name="ce12N2" office:value-type="float" office:value="28.67">
            <text:p>28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419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617.82">
            <text:p>617,82</text:p>
          </table:table-cell>
          <table:table-cell table:style-name="ce12N2" office:value-type="float" office:value="36801.86">
            <text:p>36801,86</text:p>
          </table:table-cell>
          <table:table-cell table:style-name="ce12N2" office:value-type="float" office:value="2576.12">
            <text:p>257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37113057277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4">
            <text:p>3079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8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09.46">
            <text:p>3640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36198.05">
            <text:p>36198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7471">
            <text:p>0,077</text:p>
          </table:table-cell>
          <table:table-cell table:style-name="ce12N2" office:value-type="float" office:value="20.56">
            <text:p>20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40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11.41">
            <text:p>211,41</text:p>
          </table:table-cell>
          <table:table-cell table:style-name="ce12N2" office:value-type="float" office:value="36198.05">
            <text:p>36198,05</text:p>
          </table:table-cell>
          <table:table-cell table:style-name="ce12N2" office:value-type="float" office:value="2511.18">
            <text:p>251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8781094873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5">
            <text:p>3079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0.2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477.64">
            <text:p>5847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58184.87">
            <text:p>58184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364">
            <text:p>0,504</text:p>
          </table:table-cell>
          <table:table-cell table:style-name="ce12N2" office:value-type="float" office:value="65.38">
            <text:p>65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477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92.77">
            <text:p>292,77</text:p>
          </table:table-cell>
          <table:table-cell table:style-name="ce12N2" office:value-type="float" office:value="58184.87">
            <text:p>58184,87</text:p>
          </table:table-cell>
          <table:table-cell table:style-name="ce12N2" office:value-type="float" office:value="4072.93">
            <text:p>4072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02771216544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8">
            <text:p>3079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0.63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7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7.28">
            <text:p>977,28</text:p>
          </table:table-cell>
          <table:table-cell table:style-name="ce12N2" office:value-type="float" office:value="68.41">
            <text:p>6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06371336743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7">
            <text:p>308007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3.09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01.25">
            <text:p>5220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47575.1">
            <text:p>47575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4">
            <text:p>0,009</text:p>
          </table:table-cell>
          <table:table-cell table:style-name="ce12N2" office:value-type="float" office:value="43.6">
            <text:p>4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.201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1.01">
            <text:p>71,0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4626.15">
            <text:p>4626,15</text:p>
          </table:table-cell>
          <table:table-cell table:style-name="ce12N2" office:value-type="float" office:value="47575.1">
            <text:p>47575,10</text:p>
          </table:table-cell>
          <table:table-cell table:style-name="ce12N2" office:value-type="float" office:value="1903">
            <text:p>190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309518666739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9">
            <text:p>30801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5.93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91.44">
            <text:p>7491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91.44">
            <text:p>7491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6">
            <text:p>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91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91.44">
            <text:p>7491,44</text:p>
          </table:table-cell>
          <table:table-cell table:style-name="ce12N2" office:value-type="float" office:value="524.4">
            <text:p>52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593419122682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9">
            <text:p>3080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77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5.88">
            <text:p>4175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75.88">
            <text:p>417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22">
            <text:p>0,008</text:p>
          </table:table-cell>
          <table:table-cell table:style-name="ce12N2" office:value-type="float" office:value="1.47">
            <text:p>1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75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75.88">
            <text:p>4175,88</text:p>
          </table:table-cell>
          <table:table-cell table:style-name="ce12N2" office:value-type="float" office:value="292.31">
            <text:p>2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77011385990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4">
            <text:p>308034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4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7.4">
            <text:p>447,40</text:p>
          </table:table-cell>
          <table:table-cell table:style-name="ce12N2" office:value-type="float" office:value="31.32">
            <text:p>3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4781115478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1">
            <text:p>3080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11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6.36">
            <text:p>123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6.36">
            <text:p>123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3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6.36">
            <text:p>1236,36</text:p>
          </table:table-cell>
          <table:table-cell table:style-name="ce12N2" office:value-type="float" office:value="86.55">
            <text:p>8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11115627599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2">
            <text:p>3080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1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17.47">
            <text:p>951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13.64">
            <text:p>13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17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46.53">
            <text:p>246,53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484.63">
            <text:p>48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1331274472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3">
            <text:p>308063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8.52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29.4">
            <text:p>1022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0229.4">
            <text:p>102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4">
            <text:p>0,005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22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29.4">
            <text:p>10229,40</text:p>
          </table:table-cell>
          <table:table-cell table:style-name="ce12N2" office:value-type="float" office:value="716.05">
            <text:p>71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13855500200001852011059403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4">
            <text:p>308064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8.52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.92">
            <text:p>1141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41.92">
            <text:p>1141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">
            <text:p>0,016</text:p>
          </table:table-cell>
          <table:table-cell table:style-name="ce12N2" office:value-type="float" office:value="6.78">
            <text:p>6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41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1.92">
            <text:p>1141,92</text:p>
          </table:table-cell>
          <table:table-cell table:style-name="ce12N2" office:value-type="float" office:value="79.93">
            <text:p>79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13855500200001852415831249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4">
            <text:p>308154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08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84.58">
            <text:p>688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884.58">
            <text:p>6884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.39">
            <text:p>3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84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84.58">
            <text:p>6884,58</text:p>
          </table:table-cell>
          <table:table-cell table:style-name="ce12N2" office:value-type="float" office:value="481.93">
            <text:p>48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70373920001805500300001008817243412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5">
            <text:p>3081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38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125.49">
            <text:p>3312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3125.49">
            <text:p>33125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7034">
            <text:p>1,487</text:p>
          </table:table-cell>
          <table:table-cell table:style-name="ce12N2" office:value-type="float" office:value="568.8">
            <text:p>56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125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125.49">
            <text:p>33125,49</text:p>
          </table:table-cell>
          <table:table-cell table:style-name="ce12N2" office:value-type="float" office:value="1325.02">
            <text:p>132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38111941309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6">
            <text:p>308156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1.51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882.51">
            <text:p>5988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">
            <text:p>53,00</text:p>
          </table:table-cell>
          <table:table-cell table:style-name="ce12N2" office:value-type="float" office:value="58558.19">
            <text:p>58558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708618">
            <text:p>2,709</text:p>
          </table:table-cell>
          <table:table-cell table:style-name="ce12N2" office:value-type="float" office:value="1274.26">
            <text:p>127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.88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324.32">
            <text:p>1324,32</text:p>
          </table:table-cell>
          <table:table-cell table:style-name="ce12N2" office:value-type="float" office:value="58558.19">
            <text:p>58558,19</text:p>
          </table:table-cell>
          <table:table-cell table:style-name="ce12N2" office:value-type="float" office:value="3904.7">
            <text:p>390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9151612133098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75">
            <text:p>3081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6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42.98">
            <text:p>234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42.98">
            <text:p>2342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1.45">
            <text:p>1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42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77.42">
            <text:p>1977,42</text:p>
          </table:table-cell>
          <table:table-cell table:style-name="ce12N2" office:value-type="float" office:value="1.98">
            <text:p>1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8">
            <text:p>17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2.98">
            <text:p>2342,98</text:p>
          </table:table-cell>
          <table:table-cell table:style-name="ce12N2" office:value-type="float" office:value="164.01">
            <text:p>16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6431526894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79">
            <text:p>30817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72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50.5">
            <text:p>815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50.5">
            <text:p>8150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365">
            <text:p>0,012</text:p>
          </table:table-cell>
          <table:table-cell table:style-name="ce12N2" office:value-type="float" office:value="3.83">
            <text:p>3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5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78.8">
            <text:p>6878,80</text:p>
          </table:table-cell>
          <table:table-cell table:style-name="ce12N2" office:value-type="float" office:value="6.88">
            <text:p>6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91">
            <text:p>61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50.5">
            <text:p>8150,50</text:p>
          </table:table-cell>
          <table:table-cell table:style-name="ce12N2" office:value-type="float" office:value="570.54">
            <text:p>57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7261241660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1">
            <text:p>30819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3.11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67.69">
            <text:p>566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571.17">
            <text:p>557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0735">
            <text:p>0,231</text:p>
          </table:table-cell>
          <table:table-cell table:style-name="ce12N2" office:value-type="float" office:value="7.75">
            <text:p>7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67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01.94">
            <text:p>4701,94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32">
            <text:p>42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96.52">
            <text:p>96,52</text:p>
          </table:table-cell>
          <table:table-cell table:style-name="ce12N2" office:value-type="float" office:value="5571.17">
            <text:p>5571,17</text:p>
          </table:table-cell>
          <table:table-cell table:style-name="ce12N2" office:value-type="float" office:value="389.98">
            <text:p>38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31111092210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7">
            <text:p>30824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6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31.11">
            <text:p>803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34.91">
            <text:p>7934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554">
            <text:p>0,024</text:p>
          </table:table-cell>
          <table:table-cell table:style-name="ce12N2" office:value-type="float" office:value="6.8">
            <text:p>6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31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96.86">
            <text:p>6696,86</text:p>
          </table:table-cell>
          <table:table-cell table:style-name="ce12N2" office:value-type="float" office:value="6.7">
            <text:p>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27">
            <text:p>60,2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96.2">
            <text:p>96,20</text:p>
          </table:table-cell>
          <table:table-cell table:style-name="ce12N2" office:value-type="float" office:value="7934.91">
            <text:p>7934,91</text:p>
          </table:table-cell>
          <table:table-cell table:style-name="ce12N2" office:value-type="float" office:value="555.45">
            <text:p>55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65512180296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58">
            <text:p>308258</text:p>
          </table:table-cell>
          <table:table-cell table:style-name="ce0" table:number-columns-spanned="4" table:number-rows-spanned="1" office:value-type="string" calcext:value-type="string">
            <text:p>12.915 - LPS COMPANY LTDA</text:p>
          </table:table-cell>
          <table:covered-table-cell table:number-columns-repeated="3"/>
          <table:table-cell table:style-name="ce0" office:value-type="string" calcext:value-type="string">
            <text:p>1.094.5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.11">
            <text:p>118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8">
            <text:p>107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3325">
            <text:p>0,043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3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9.15">
            <text:p>939,15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05.11">
            <text:p>105,11</text:p>
          </table:table-cell>
          <table:table-cell table:style-name="ce12N2" office:value-type="float" office:value="1078">
            <text:p>1078,00</text:p>
          </table:table-cell>
          <table:table-cell table:style-name="ce12N2" office:value-type="float" office:value="43.12">
            <text:p>4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88908380004525500100109455916824132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0">
            <text:p>30828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2.36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6.7">
            <text:p>93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36.7">
            <text:p>93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427">
            <text:p>0,424</text:p>
          </table:table-cell>
          <table:table-cell table:style-name="ce12N2" office:value-type="float" office:value="57.42">
            <text:p>5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0.55">
            <text:p>790,55</text:p>
          </table:table-cell>
          <table:table-cell table:style-name="ce12N2" office:value-type="float" office:value="0.79">
            <text:p>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11">
            <text:p>7,1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6.7">
            <text:p>936,70</text:p>
          </table:table-cell>
          <table:table-cell table:style-name="ce12N2" office:value-type="float" office:value="65.57">
            <text:p>6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923671142938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5">
            <text:p>30828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4.93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94.4">
            <text:p>749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94.4">
            <text:p>749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2">
            <text:p>0,015</text:p>
          </table:table-cell>
          <table:table-cell table:style-name="ce12N2" office:value-type="float" office:value="15.4">
            <text:p>1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9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25">
            <text:p>6325,00</text:p>
          </table:table-cell>
          <table:table-cell table:style-name="ce12N2" office:value-type="float" office:value="6.33">
            <text:p>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93">
            <text:p>56,9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94.4">
            <text:p>7494,40</text:p>
          </table:table-cell>
          <table:table-cell table:style-name="ce12N2" office:value-type="float" office:value="524.61">
            <text:p>52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493816580048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7">
            <text:p>30828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1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87.9">
            <text:p>338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87.9">
            <text:p>338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4.65">
            <text:p>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87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9.3">
            <text:p>2859,30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73">
            <text:p>25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87.9">
            <text:p>3387,90</text:p>
          </table:table-cell>
          <table:table-cell table:style-name="ce12N2" office:value-type="float" office:value="237.15">
            <text:p>237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15019487798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8">
            <text:p>30828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2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4.96">
            <text:p>1141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414.96">
            <text:p>11414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2824">
            <text:p>0,083</text:p>
          </table:table-cell>
          <table:table-cell table:style-name="ce12N2" office:value-type="float" office:value="5.2">
            <text:p>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414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33.92">
            <text:p>9633,92</text:p>
          </table:table-cell>
          <table:table-cell table:style-name="ce12N2" office:value-type="float" office:value="9.63">
            <text:p>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71">
            <text:p>86,7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14.96">
            <text:p>11414,96</text:p>
          </table:table-cell>
          <table:table-cell table:style-name="ce12N2" office:value-type="float" office:value="799.05">
            <text:p>799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21712475924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5">
            <text:p>308305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7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68.38">
            <text:p>32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24.64">
            <text:p>2924,64</text:p>
          </table:table-cell>
          <table:table-cell table:style-name="ce12N2" office:value-type="float" office:value="175.48">
            <text:p>175,48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68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9">
            <text:p>5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68.26">
            <text:p>168,26</text:p>
          </table:table-cell>
          <table:table-cell table:style-name="ce12N2" office:value-type="float" office:value="3100.12">
            <text:p>3100,12</text:p>
          </table:table-cell>
          <table:table-cell table:style-name="ce12N2" office:value-type="float" office:value="124">
            <text:p>1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48556330001405500100007742214524157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76">
            <text:p>308376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89.22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313">
            <text:p>0,293</text:p>
          </table:table-cell>
          <table:table-cell table:style-name="ce12N2" office:value-type="float" office:value="411.88">
            <text:p>411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19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36.9">
            <text:p>6936,90</text:p>
          </table:table-cell>
          <table:table-cell table:style-name="ce12N2" office:value-type="float" office:value="6.93">
            <text:p>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42">
            <text:p>62,42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575.36">
            <text:p>57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300018922610664288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4">
            <text:p>30842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7.65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5.12">
            <text:p>2875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75.12">
            <text:p>2875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5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73.86">
            <text:p>2673,86</text:p>
          </table:table-cell>
          <table:table-cell table:style-name="ce12N2" office:value-type="float" office:value="2.68">
            <text:p>2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06">
            <text:p>24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75.12">
            <text:p>2875,12</text:p>
          </table:table-cell>
          <table:table-cell table:style-name="ce12N2" office:value-type="float" office:value="201.26">
            <text:p>20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765117727677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7">
            <text:p>308427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8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02.33">
            <text:p>630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5997">
            <text:p>599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9691">
            <text:p>0,597</text:p>
          </table:table-cell>
          <table:table-cell table:style-name="ce12N2" office:value-type="float" office:value="175.47">
            <text:p>175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02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83.22">
            <text:p>5083,22</text:p>
          </table:table-cell>
          <table:table-cell table:style-name="ce12N2" office:value-type="float" office:value="5.08">
            <text:p>5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75">
            <text:p>45,75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05.33">
            <text:p>305,33</text:p>
          </table:table-cell>
          <table:table-cell table:style-name="ce12N2" office:value-type="float" office:value="5651.97">
            <text:p>5651,97</text:p>
          </table:table-cell>
          <table:table-cell table:style-name="ce12N2" office:value-type="float" office:value="395.64">
            <text:p>39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071594300003615500100008785710539132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2">
            <text:p>3084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3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21.17">
            <text:p>622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21.17">
            <text:p>622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57">
            <text:p>0,013</text:p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2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50.51">
            <text:p>5250,51</text:p>
          </table:table-cell>
          <table:table-cell table:style-name="ce12N2" office:value-type="float" office:value="5.25">
            <text:p>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25">
            <text:p>47,2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21.17">
            <text:p>6221,17</text:p>
          </table:table-cell>
          <table:table-cell table:style-name="ce12N2" office:value-type="float" office:value="435.48">
            <text:p>43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37913349837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1">
            <text:p>308511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17.4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.26">
            <text:p>51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4.26">
            <text:p>51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4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.26">
            <text:p>478,26</text:p>
          </table:table-cell>
          <table:table-cell table:style-name="ce12N2" office:value-type="float" office:value="0.48">
            <text:p>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4.26">
            <text:p>514,26</text:p>
          </table:table-cell>
          <table:table-cell table:style-name="ce12N2" office:value-type="float" office:value="36">
            <text:p>3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1743111787939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7">
            <text:p>3085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6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88.8">
            <text:p>778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88.8">
            <text:p>778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784">
            <text:p>0,020</text:p>
          </table:table-cell>
          <table:table-cell table:style-name="ce12N2" office:value-type="float" office:value="4.6">
            <text:p>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8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73.52">
            <text:p>6573,52</text:p>
          </table:table-cell>
          <table:table-cell table:style-name="ce12N2" office:value-type="float" office:value="6.57">
            <text:p>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16">
            <text:p>59,1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88.8">
            <text:p>7788,80</text:p>
          </table:table-cell>
          <table:table-cell table:style-name="ce12N2" office:value-type="float" office:value="545.22">
            <text:p>54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66911330680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8">
            <text:p>30851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6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50.44">
            <text:p>475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50.44">
            <text:p>4750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054">
            <text:p>0,015</text:p>
          </table:table-cell>
          <table:table-cell table:style-name="ce12N2" office:value-type="float" office:value="4.44">
            <text:p>4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50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9.24">
            <text:p>4009,24</text:p>
          </table:table-cell>
          <table:table-cell table:style-name="ce12N2" office:value-type="float" office:value="4.01">
            <text:p>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8">
            <text:p>36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50.44">
            <text:p>4750,44</text:p>
          </table:table-cell>
          <table:table-cell table:style-name="ce12N2" office:value-type="float" office:value="332.53">
            <text:p>33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66016152277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3">
            <text:p>3085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6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0.02">
            <text:p>287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70.02">
            <text:p>2870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0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22.22">
            <text:p>2422,22</text:p>
          </table:table-cell>
          <table:table-cell table:style-name="ce12N2" office:value-type="float" office:value="2.42">
            <text:p>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8">
            <text:p>21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70.02">
            <text:p>2870,02</text:p>
          </table:table-cell>
          <table:table-cell table:style-name="ce12N2" office:value-type="float" office:value="200.9">
            <text:p>20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6115175280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1">
            <text:p>308551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3.64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77.24">
            <text:p>1227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12111.92">
            <text:p>12111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33506">
            <text:p>0,534</text:p>
          </table:table-cell>
          <table:table-cell table:style-name="ce12N2" office:value-type="float" office:value="84.88">
            <text:p>84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277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04.57">
            <text:p>10504,57</text:p>
          </table:table-cell>
          <table:table-cell table:style-name="ce12N2" office:value-type="float" office:value="10.53">
            <text:p>1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4.55">
            <text:p>94,55</text:p>
          </table:table-cell>
          <table:table-cell table:style-name="ce12N2" office:value-type="float" office:value="75.75">
            <text:p>75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65.32">
            <text:p>165,32</text:p>
          </table:table-cell>
          <table:table-cell table:style-name="ce12N2" office:value-type="float" office:value="12111.92">
            <text:p>12111,92</text:p>
          </table:table-cell>
          <table:table-cell table:style-name="ce12N2" office:value-type="float" office:value="536.66">
            <text:p>53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308456000149550050004536441866478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3">
            <text:p>308553</text:p>
          </table:table-cell>
          <table:table-cell table:style-name="ce0" table:number-columns-spanned="4" table:number-rows-spanned="1" office:value-type="string" calcext:value-type="string">
            <text:p>9.267 - INTELBRAS S/A IND DE TEL ELETRICO BRASILEIRO</text:p>
          </table:table-cell>
          <table:covered-table-cell table:number-columns-repeated="3"/>
          <table:table-cell table:style-name="ce0" office:value-type="string" calcext:value-type="string">
            <text:p>420.542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3.07">
            <text:p>49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3.9">
            <text:p>453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3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5.44">
            <text:p>395,44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39.17">
            <text:p>39,17</text:p>
          </table:table-cell>
          <table:table-cell table:style-name="ce12N2" office:value-type="float" office:value="453.9">
            <text:p>453,90</text:p>
          </table:table-cell>
          <table:table-cell table:style-name="ce12N2" office:value-type="float" office:value="18.16">
            <text:p>18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010000014415501000042054215912804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4">
            <text:p>308554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685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48.91">
            <text:p>11834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114065.73">
            <text:p>114065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6578">
            <text:p>3,366</text:p>
          </table:table-cell>
          <table:table-cell table:style-name="ce12N2" office:value-type="float" office:value="664.37">
            <text:p>66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8.348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268.57">
            <text:p>96268,57</text:p>
          </table:table-cell>
          <table:table-cell table:style-name="ce12N2" office:value-type="float" office:value="96.31">
            <text:p>96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6.39">
            <text:p>866,39</text:p>
          </table:table-cell>
          <table:table-cell table:style-name="ce12N2" office:value-type="float" office:value="82.72">
            <text:p>82,7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4283.18">
            <text:p>4283,18</text:p>
          </table:table-cell>
          <table:table-cell table:style-name="ce12N2" office:value-type="float" office:value="114065.73">
            <text:p>114065,73</text:p>
          </table:table-cell>
          <table:table-cell table:style-name="ce12N2" office:value-type="float" office:value="7984.65">
            <text:p>798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68513719871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6">
            <text:p>308556</text:p>
          </table:table-cell>
          <table:table-cell table:style-name="ce0" table:number-columns-spanned="4" table:number-rows-spanned="1" office:value-type="string" calcext:value-type="string">
            <text:p>19.264 - PAG EQUIPAMENTOS PARA PINTURAS LTDA</text:p>
          </table:table-cell>
          <table:covered-table-cell table:number-columns-repeated="3"/>
          <table:table-cell table:style-name="ce0" office:value-type="string" calcext:value-type="string">
            <text:p>8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2.65">
            <text:p>1129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0234.48">
            <text:p>10234,48</text:p>
          </table:table-cell>
          <table:table-cell table:style-name="ce12N2" office:value-type="float" office:value="500">
            <text:p>5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93.36">
            <text:p>9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92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18.69">
            <text:p>9618,69</text:p>
          </table:table-cell>
          <table:table-cell table:style-name="ce12N2" office:value-type="float" office:value="9.63">
            <text:p>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57">
            <text:p>86,57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558.17">
            <text:p>558,17</text:p>
          </table:table-cell>
          <table:table-cell table:style-name="ce12N2" office:value-type="float" office:value="10734.48">
            <text:p>10734,48</text:p>
          </table:table-cell>
          <table:table-cell table:style-name="ce12N2" office:value-type="float" office:value="751.42">
            <text:p>751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581731000119550010000084661290605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9">
            <text:p>308559</text:p>
          </table:table-cell>
          <table:table-cell table:style-name="ce0" table:number-columns-spanned="4" table:number-rows-spanned="1" office:value-type="string" calcext:value-type="string">
            <text:p>31.254 - NAUBER MAQUINAS E EQUIPAMENTOS</text:p>
          </table:table-cell>
          <table:covered-table-cell table:number-columns-repeated="3"/>
          <table:table-cell table:style-name="ce0" office:value-type="string" calcext:value-type="string">
            <text:p>30.8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729.77">
            <text:p>15729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15565.32">
            <text:p>1556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348">
            <text:p>0,233</text:p>
          </table:table-cell>
          <table:table-cell table:style-name="ce12N2" office:value-type="float" office:value="94.39">
            <text:p>94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729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64.45">
            <text:p>164,45</text:p>
          </table:table-cell>
          <table:table-cell table:style-name="ce12N2" office:value-type="float" office:value="15565.32">
            <text:p>15565,32</text:p>
          </table:table-cell>
          <table:table-cell table:style-name="ce12N2" office:value-type="float" office:value="622.61">
            <text:p>622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6332570001985500100003087115830110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1">
            <text:p>3085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7.7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00.26">
            <text:p>9100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960.8">
            <text:p>896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955">
            <text:p>0,023</text:p>
          </table:table-cell>
          <table:table-cell table:style-name="ce12N2" office:value-type="float" office:value="5.82">
            <text:p>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00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62.67">
            <text:p>7562,67</text:p>
          </table:table-cell>
          <table:table-cell table:style-name="ce12N2" office:value-type="float" office:value="7.56">
            <text:p>7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07">
            <text:p>68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39.46">
            <text:p>139,46</text:p>
          </table:table-cell>
          <table:table-cell table:style-name="ce12N2" office:value-type="float" office:value="8960.8">
            <text:p>8960,80</text:p>
          </table:table-cell>
          <table:table-cell table:style-name="ce12N2" office:value-type="float" office:value="627.25">
            <text:p>62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77711228888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4">
            <text:p>30863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9.74">
            <text:p>1619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20.88">
            <text:p>152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504">
            <text:p>0,015</text:p>
          </table:table-cell>
          <table:table-cell table:style-name="ce12N2" office:value-type="float" office:value="3.3">
            <text:p>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19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83.58">
            <text:p>1283,58</text:p>
          </table:table-cell>
          <table:table-cell table:style-name="ce12N2" office:value-type="float" office:value="1.28">
            <text:p>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55">
            <text:p>11,5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98.86">
            <text:p>98,86</text:p>
          </table:table-cell>
          <table:table-cell table:style-name="ce12N2" office:value-type="float" office:value="1520.88">
            <text:p>1520,88</text:p>
          </table:table-cell>
          <table:table-cell table:style-name="ce12N2" office:value-type="float" office:value="106.46">
            <text:p>10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412808820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5">
            <text:p>308635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5.9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5677">
            <text:p>0,266</text:p>
          </table:table-cell>
          <table:table-cell table:style-name="ce12N2" office:value-type="float" office:value="169.83">
            <text:p>169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766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49.87">
            <text:p>15049,87</text:p>
          </table:table-cell>
          <table:table-cell table:style-name="ce12N2" office:value-type="float" office:value="15.06">
            <text:p>1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.43">
            <text:p>135,43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1183.1">
            <text:p>118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7595715053058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43">
            <text:p>3086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912409708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09">
            <text:p>30870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03.12">
            <text:p>19600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8224">
            <text:p>1,698</text:p>
          </table:table-cell>
          <table:table-cell table:style-name="ce12N2" office:value-type="float" office:value="3298.68">
            <text:p>329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6.00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394.92">
            <text:p>165394,92</text:p>
          </table:table-cell>
          <table:table-cell table:style-name="ce12N2" office:value-type="float" office:value="165.4">
            <text:p>1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56">
            <text:p>1488,5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1.76">
            <text:p>31,76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13717.99">
            <text:p>137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81761658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3">
            <text:p>30872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0505">
            <text:p>1,605</text:p>
          </table:table-cell>
          <table:table-cell table:style-name="ce12N2" office:value-type="float" office:value="5030.8">
            <text:p>503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1.03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628.79">
            <text:p>245628,79</text:p>
          </table:table-cell>
          <table:table-cell table:style-name="ce12N2" office:value-type="float" office:value="245.64">
            <text:p>24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0.66">
            <text:p>2210,6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20372.66">
            <text:p>2037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39142188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5">
            <text:p>308725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3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4.51">
            <text:p>171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14.51">
            <text:p>171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8">
            <text:p>0,010</text:p>
          </table:table-cell>
          <table:table-cell table:style-name="ce12N2" office:value-type="float" office:value="14.4">
            <text:p>1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91">
            <text:p>1531,91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14.51">
            <text:p>1714,51</text:p>
          </table:table-cell>
          <table:table-cell table:style-name="ce12N2" office:value-type="float" office:value="120.02">
            <text:p>12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35760450001505500100000531610018945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6">
            <text:p>3087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9.9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76.15">
            <text:p>1576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9.95">
            <text:p>1479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5">
            <text:p>0,009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76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9.04">
            <text:p>1249,04</text:p>
          </table:table-cell>
          <table:table-cell table:style-name="ce12N2" office:value-type="float" office:value="1.25">
            <text:p>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24">
            <text:p>11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96.2">
            <text:p>96,20</text:p>
          </table:table-cell>
          <table:table-cell table:style-name="ce12N2" office:value-type="float" office:value="1479.95">
            <text:p>1479,95</text:p>
          </table:table-cell>
          <table:table-cell table:style-name="ce12N2" office:value-type="float" office:value="103.6">
            <text:p>10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991012312806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7">
            <text:p>30873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9.9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8.61">
            <text:p>2878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2.92">
            <text:p>270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8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81.2">
            <text:p>2281,20</text:p>
          </table:table-cell>
          <table:table-cell table:style-name="ce12N2" office:value-type="float" office:value="2.28">
            <text:p>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53">
            <text:p>20,5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175.69">
            <text:p>175,69</text:p>
          </table:table-cell>
          <table:table-cell table:style-name="ce12N2" office:value-type="float" office:value="2702.92">
            <text:p>2702,92</text:p>
          </table:table-cell>
          <table:table-cell table:style-name="ce12N2" office:value-type="float" office:value="189.2">
            <text:p>18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990411342156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50">
            <text:p>5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75.48">
            <text:p>675,4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3842.68">
            <text:p>13842,68</text:p>
          </table:table-cell>
          <table:table-cell table:style-name="ce26N2" office:value-type="float" office:value="1085309.71">
            <text:p>1085309,71</text:p>
          </table:table-cell>
          <table:table-cell table:style-name="ce26N2" office:value-type="float" office:value="72181.56">
            <text:p>72181,5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99507.42">
            <text:p>1099507,4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4.639238">
            <text:p>14,639</text:p>
          </table:table-cell>
          <table:table-cell table:style-name="ce26N2" office:value-type="float" office:value="1084989.26">
            <text:p>1084989,26</text:p>
          </table:table-cell>
          <table:table-cell table:style-name="ce26N2" office:value-type="float" office:value="1099507.42">
            <text:p>1099507,4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30999.92">
            <text:p>630999,92</text:p>
          </table:table-cell>
          <table:table-cell table:style-name="ce26N2" office:value-type="float" office:value="631.1">
            <text:p>631,1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678.94">
            <text:p>5678,94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2226.16">
            <text:p>12226,1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6.54">
            <text:p>66,5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62" meta:object-count="0"/>
    <meta:generator>LibreOffice/4.3.0.4$Windows_x86 LibreOffice_project/62ad5818884a2fc2e5780dd45466868d41009ec0</meta:generator>
  </office:meta>
</office:document-meta>
</file>