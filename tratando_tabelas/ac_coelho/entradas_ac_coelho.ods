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0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53">
            <text:p>3099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4.7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26.66">
            <text:p>103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678">
            <text:p>0,370</text:p>
          </table:table-cell>
          <table:table-cell table:style-name="ce12N2" office:value-type="float" office:value="54.21">
            <text:p>5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2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96.48">
            <text:p>8596,4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.38">
            <text:p>77,38</text:p>
          </table:table-cell>
          <table:table-cell table:style-name="ce12N2" office:value-type="float" office:value="62.62">
            <text:p>6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40.92">
            <text:p>140,92</text:p>
          </table:table-cell>
          <table:table-cell table:style-name="ce12N2" office:value-type="float" office:value="10185.74">
            <text:p>10185,74</text:p>
          </table:table-cell>
          <table:table-cell table:style-name="ce12N2" office:value-type="float" office:value="713.01">
            <text:p>7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347281645483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1">
            <text:p>3100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0512073437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4">
            <text:p>310174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22" office:value-type="string" calcext:value-type="string">
            <text:p>ADM</text:p>
          </table:table-cell>
          <table:table-cell table:style-name="ce12N2" office:value-type="float" office:value="308.29">
            <text:p>30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22.6">
            <text:p>22,60</text:p>
          </table:table-cell>
          <table:table-cell table:style-name="ce12N2" office:value-type="float" office:value="231.8">
            <text:p>231,80</text:p>
          </table:table-cell>
          <table:table-cell table:style-name="ce12N2" office:value-type="float" office:value="16.23">
            <text:p>1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9.51">
            <text:p>389,51</text:p>
          </table:table-cell>
          <table:table-cell table:style-name="ce12N2" office:value-type="float" office:value="53.89">
            <text:p>53,8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626510026626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43">
            <text:p>310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21.0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45">
            <text:p>0,144</text:p>
          </table:table-cell>
          <table:table-cell table:style-name="ce12N2" office:value-type="float" office:value="24.78">
            <text:p>2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8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37.53">
            <text:p>5137,53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.24">
            <text:p>46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87.3">
            <text:p>6087,30</text:p>
          </table:table-cell>
          <table:table-cell table:style-name="ce12N2" office:value-type="float" office:value="426.11">
            <text:p>42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210571397106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2">
            <text:p>31025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815972433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4">
            <text:p>31025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01682147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4">
            <text:p>3102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09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5.8">
            <text:p>1695,80</text:p>
          </table:table-cell>
          <table:table-cell table:style-name="ce12N2" office:value-type="float" office:value="1.7">
            <text:p>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6">
            <text:p>15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9.3">
            <text:p>2009,30</text:p>
          </table:table-cell>
          <table:table-cell table:style-name="ce12N2" office:value-type="float" office:value="140.65">
            <text:p>14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09611178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09">
            <text:p>3103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5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.81">
            <text:p>405,81</text:p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811882279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0">
            <text:p>3103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4.84">
            <text:p>584,84</text:p>
          </table:table-cell>
          <table:table-cell table:style-name="ce12N2" office:value-type="float" office:value="40.94">
            <text:p>4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9315705789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0">
            <text:p>3103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0.5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4">
            <text:p>0,012</text:p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439.48">
            <text:p>13439,48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.96">
            <text:p>12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24.04">
            <text:p>15924,04</text:p>
          </table:table-cell>
          <table:table-cell table:style-name="ce12N2" office:value-type="float" office:value="1114.68">
            <text:p>111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80593198683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4">
            <text:p>310324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1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3">
            <text:p>39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05">
            <text:p>3505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7.6">
            <text:p>3127,60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5">
            <text:p>28,15</text:p>
          </table:table-cell>
          <table:table-cell table:style-name="ce12N2" office:value-type="float" office:value="41.7">
            <text:p>41,7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41.73">
            <text:p>341,73</text:p>
          </table:table-cell>
          <table:table-cell table:style-name="ce12N2" office:value-type="float" office:value="3590">
            <text:p>3590,00</text:p>
          </table:table-cell>
          <table:table-cell table:style-name="ce12N2" office:value-type="float" office:value="143.6">
            <text:p>14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1111795254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7">
            <text:p>310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1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4.91">
            <text:p>178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553">
            <text:p>0,010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84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2.1">
            <text:p>1472,10</text:p>
          </table:table-cell>
          <table:table-cell table:style-name="ce12N2" office:value-type="float" office:value="1.47">
            <text:p>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25">
            <text:p>13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.67">
            <text:p>40,67</text:p>
          </table:table-cell>
          <table:table-cell table:style-name="ce12N2" office:value-type="float" office:value="1744.24">
            <text:p>1744,24</text:p>
          </table:table-cell>
          <table:table-cell table:style-name="ce12N2" office:value-type="float" office:value="122.09">
            <text:p>12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1841233645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8">
            <text:p>3103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4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6.76">
            <text:p>512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2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62.78">
            <text:p>4062,78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57">
            <text:p>3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2.9">
            <text:p>312,90</text:p>
          </table:table-cell>
          <table:table-cell table:style-name="ce12N2" office:value-type="float" office:value="4813.86">
            <text:p>4813,86</text:p>
          </table:table-cell>
          <table:table-cell table:style-name="ce12N2" office:value-type="float" office:value="336.97">
            <text:p>33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4741481861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30">
            <text:p>31033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99.48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0.95">
            <text:p>976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3.6">
            <text:p>8513,60</text:p>
          </table:table-cell>
          <table:table-cell table:style-name="ce12N2" office:value-type="float" office:value="510.29">
            <text:p>510,29</text:p>
          </table:table-cell>
          <table:table-cell table:style-name="ce12N3" office:value-type="float" office:value="0.587396">
            <text:p>0,587</text:p>
          </table:table-cell>
          <table:table-cell table:style-name="ce12N2" office:value-type="float" office:value="90.81">
            <text:p>9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60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23.97">
            <text:p>7723,97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737.06">
            <text:p>737,06</text:p>
          </table:table-cell>
          <table:table-cell table:style-name="ce12N2" office:value-type="float" office:value="9023.89">
            <text:p>9023,89</text:p>
          </table:table-cell>
          <table:table-cell table:style-name="ce12N2" office:value-type="float" office:value="512.63">
            <text:p>51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7994821394054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8">
            <text:p>310358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56.72">
            <text:p>615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56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63.51">
            <text:p>5063,51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58">
            <text:p>45,58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673.78">
            <text:p>673,78</text:p>
          </table:table-cell>
          <table:table-cell table:style-name="ce12N2" office:value-type="float" office:value="5482.94">
            <text:p>5482,94</text:p>
          </table:table-cell>
          <table:table-cell table:style-name="ce12N2" office:value-type="float" office:value="219.31">
            <text:p>2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01202658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5">
            <text:p>310365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22.07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03">
            <text:p>374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375">
            <text:p>0,854</text:p>
          </table:table-cell>
          <table:table-cell table:style-name="ce12N2" office:value-type="float" office:value="15.79">
            <text:p>15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63.03">
            <text:p>3263,03</text:p>
          </table:table-cell>
          <table:table-cell table:style-name="ce12N2" office:value-type="float" office:value="3.26">
            <text:p>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37">
            <text:p>29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25.03">
            <text:p>125,03</text:p>
          </table:table-cell>
          <table:table-cell table:style-name="ce12N2" office:value-type="float" office:value="3615">
            <text:p>3615,00</text:p>
          </table:table-cell>
          <table:table-cell table:style-name="ce12N2" office:value-type="float" office:value="228.36">
            <text:p>22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84554530001785500400002207613466370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7">
            <text:p>3103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2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02">
            <text:p>0,022</text:p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4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65.24">
            <text:p>12165,24</text:p>
          </table:table-cell>
          <table:table-cell table:style-name="ce12N2" office:value-type="float" office:value="12.17">
            <text:p>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49">
            <text:p>109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14.22">
            <text:p>14414,22</text:p>
          </table:table-cell>
          <table:table-cell table:style-name="ce12N2" office:value-type="float" office:value="1009">
            <text:p>10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24313758644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2">
            <text:p>310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.86">
            <text:p>2456,86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1">
            <text:p>22,1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1.06">
            <text:p>2911,06</text:p>
          </table:table-cell>
          <table:table-cell table:style-name="ce12N2" office:value-type="float" office:value="203.77">
            <text:p>20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511293957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3">
            <text:p>310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66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527">
            <text:p>0,075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84.8">
            <text:p>3384,80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6">
            <text:p>30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0.6">
            <text:p>4010,60</text:p>
          </table:table-cell>
          <table:table-cell table:style-name="ce12N2" office:value-type="float" office:value="280.74">
            <text:p>28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66817532148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8">
            <text:p>310418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6.60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13.9">
            <text:p>1591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52">
            <text:p>0,042</text:p>
          </table:table-cell>
          <table:table-cell table:style-name="ce12N2" office:value-type="float" office:value="27.8">
            <text:p>2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1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985.4">
            <text:p>12985,40</text:p>
          </table:table-cell>
          <table:table-cell table:style-name="ce12N2" office:value-type="float" office:value="12.99">
            <text:p>1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6.87">
            <text:p>116,87</text:p>
          </table:table-cell>
          <table:table-cell table:style-name="ce12N2" office:value-type="float" office:value="72.15">
            <text:p>72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1008.71">
            <text:p>1008,71</text:p>
          </table:table-cell>
          <table:table-cell table:style-name="ce12N2" office:value-type="float" office:value="14905.19">
            <text:p>14905,19</text:p>
          </table:table-cell>
          <table:table-cell table:style-name="ce12N2" office:value-type="float" office:value="596.21">
            <text:p>59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66091489590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3">
            <text:p>310423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6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0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93.05">
            <text:p>1393,05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54">
            <text:p>12,5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0.57">
            <text:p>1650,57</text:p>
          </table:table-cell>
          <table:table-cell table:style-name="ce12N2" office:value-type="float" office:value="115.54">
            <text:p>1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7037392000180550030000106871130136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5">
            <text:p>3104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38">
            <text:p>0,005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0.06">
            <text:p>1300,06</text:p>
          </table:table-cell>
          <table:table-cell table:style-name="ce12N2" office:value-type="float" office:value="1.3">
            <text:p>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0.4">
            <text:p>1540,40</text:p>
          </table:table-cell>
          <table:table-cell table:style-name="ce12N2" office:value-type="float" office:value="107.83">
            <text:p>10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01745782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4">
            <text:p>3104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.38">
            <text:p>408,38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3.88">
            <text:p>483,88</text:p>
          </table:table-cell>
          <table:table-cell table:style-name="ce12N2" office:value-type="float" office:value="33.87">
            <text:p>3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541651900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3">
            <text:p>31047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3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037.97">
            <text:p>6403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9304">
            <text:p>0,499</text:p>
          </table:table-cell>
          <table:table-cell table:style-name="ce12N2" office:value-type="float" office:value="410.5">
            <text:p>4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037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901.42">
            <text:p>52901,42</text:p>
          </table:table-cell>
          <table:table-cell table:style-name="ce12N2" office:value-type="float" office:value="52.9">
            <text:p>5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6.1">
            <text:p>476,10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863.05">
            <text:p>1863,05</text:p>
          </table:table-cell>
          <table:table-cell table:style-name="ce12N2" office:value-type="float" office:value="62174.92">
            <text:p>62174,92</text:p>
          </table:table-cell>
          <table:table-cell table:style-name="ce12N2" office:value-type="float" office:value="3881.36">
            <text:p>38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137771912698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2">
            <text:p>3104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24">
            <text:p>0,001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2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1.82">
            <text:p>381,82</text:p>
          </table:table-cell>
          <table:table-cell table:style-name="ce12N2" office:value-type="float" office:value="0.38">
            <text:p>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44">
            <text:p>3,4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.42">
            <text:p>452,42</text:p>
          </table:table-cell>
          <table:table-cell table:style-name="ce12N2" office:value-type="float" office:value="31.67">
            <text:p>3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9721198719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6">
            <text:p>3104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64">
            <text:p>0,047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2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78.88">
            <text:p>3478,88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1">
            <text:p>31,3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2.02">
            <text:p>4122,02</text:p>
          </table:table-cell>
          <table:table-cell table:style-name="ce12N2" office:value-type="float" office:value="288.54">
            <text:p>28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3521803914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8">
            <text:p>3104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9.2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3.24">
            <text:p>33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2.79">
            <text:p>2732,79</text:p>
          </table:table-cell>
          <table:table-cell table:style-name="ce12N2" office:value-type="float" office:value="2.73">
            <text:p>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6">
            <text:p>24,6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05.24">
            <text:p>105,24</text:p>
          </table:table-cell>
          <table:table-cell table:style-name="ce12N2" office:value-type="float" office:value="3238">
            <text:p>3238,00</text:p>
          </table:table-cell>
          <table:table-cell table:style-name="ce12N2" office:value-type="float" office:value="226.66">
            <text:p>22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7927316776191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36">
            <text:p>31053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3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0.11">
            <text:p>469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04">
            <text:p>0,001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9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49.68">
            <text:p>3749,68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53.69">
            <text:p>53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386.09">
            <text:p>386,09</text:p>
          </table:table-cell>
          <table:table-cell table:style-name="ce12N2" office:value-type="float" office:value="4304.02">
            <text:p>4304,02</text:p>
          </table:table-cell>
          <table:table-cell table:style-name="ce12N2" office:value-type="float" office:value="172.16">
            <text:p>1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3266140103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0">
            <text:p>31054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665">
            <text:p>1,487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44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920.21">
            <text:p>56920,21</text:p>
          </table:table-cell>
          <table:table-cell table:style-name="ce12N2" office:value-type="float" office:value="56.92">
            <text:p>5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2.28">
            <text:p>512,28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443">
            <text:p>67443,00</text:p>
          </table:table-cell>
          <table:table-cell table:style-name="ce12N2" office:value-type="float" office:value="4721.01">
            <text:p>472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31754562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1">
            <text:p>31054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17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5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16.24">
            <text:p>1671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3">
            <text:p>0,153</text:p>
          </table:table-cell>
          <table:table-cell table:style-name="ce12N2" office:value-type="float" office:value="57.2">
            <text:p>5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71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74.36">
            <text:p>13674,36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07">
            <text:p>123,0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020.24">
            <text:p>1020,24</text:p>
          </table:table-cell>
          <table:table-cell table:style-name="ce12N2" office:value-type="float" office:value="15696">
            <text:p>15696,00</text:p>
          </table:table-cell>
          <table:table-cell table:style-name="ce12N2" office:value-type="float" office:value="627.84">
            <text:p>6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176741209589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44">
            <text:p>310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816">
            <text:p>0,075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5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75.58">
            <text:p>4775,58</text:p>
          </table:table-cell>
          <table:table-cell table:style-name="ce12N2" office:value-type="float" office:value="4.78">
            <text:p>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.98">
            <text:p>4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58.44">
            <text:p>5658,44</text:p>
          </table:table-cell>
          <table:table-cell table:style-name="ce12N2" office:value-type="float" office:value="396.09">
            <text:p>3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40761883841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75">
            <text:p>310675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0.3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8">
            <text:p>12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4.8">
            <text:p>12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12">
            <text:p>0,08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3.7">
            <text:p>1033,70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4.8">
            <text:p>1224,80</text:p>
          </table:table-cell>
          <table:table-cell table:style-name="ce12N2" office:value-type="float" office:value="85.74">
            <text:p>8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0376147378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2">
            <text:p>310682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411771173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3">
            <text:p>310683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912">
            <text:p>0,367</text:p>
          </table:table-cell>
          <table:table-cell table:style-name="ce12N2" office:value-type="float" office:value="28.08">
            <text:p>2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7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39.4">
            <text:p>1839,40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5">
            <text:p>16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79.44">
            <text:p>2179,44</text:p>
          </table:table-cell>
          <table:table-cell table:style-name="ce12N2" office:value-type="float" office:value="152.56">
            <text:p>15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514516377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4">
            <text:p>31068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9756">
            <text:p>0,370</text:p>
          </table:table-cell>
          <table:table-cell table:style-name="ce12N2" office:value-type="float" office:value="28.79">
            <text:p>28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82.44">
            <text:p>3182,44</text:p>
          </table:table-cell>
          <table:table-cell table:style-name="ce12N2" office:value-type="float" office:value="3.18">
            <text:p>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64">
            <text:p>28,6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0.78">
            <text:p>3770,78</text:p>
          </table:table-cell>
          <table:table-cell table:style-name="ce12N2" office:value-type="float" office:value="263.96">
            <text:p>26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61770174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685">
            <text:p>310685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701.3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6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58.64">
            <text:p>12458,64</text:p>
          </table:table-cell>
          <table:table-cell table:style-name="ce12N2" office:value-type="float" office:value="12.46">
            <text:p>1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.13">
            <text:p>112,1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761.86">
            <text:p>14761,86</text:p>
          </table:table-cell>
          <table:table-cell table:style-name="ce12N2" office:value-type="float" office:value="1033.33">
            <text:p>103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365223000154550020007013871306853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13">
            <text:p>3107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7.0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4.35">
            <text:p>1004,35</text:p>
          </table:table-cell>
          <table:table-cell table:style-name="ce12N2" office:value-type="float" office:value="102.5">
            <text:p>102,50</text:p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.65">
            <text:p>847,65</text:p>
          </table:table-cell>
          <table:table-cell table:style-name="ce12N2" office:value-type="float" office:value="0.85">
            <text:p>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3">
            <text:p>7,6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6.85">
            <text:p>1106,85</text:p>
          </table:table-cell>
          <table:table-cell table:style-name="ce12N2" office:value-type="float" office:value="77.48">
            <text:p>7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70401583926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6">
            <text:p>4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97.79">
            <text:p>697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520.26">
            <text:p>13520,26</text:p>
          </table:table-cell>
          <table:table-cell table:style-name="ce26N2" office:value-type="float" office:value="646624.66">
            <text:p>646624,66</text:p>
          </table:table-cell>
          <table:table-cell table:style-name="ce26N2" office:value-type="float" office:value="43031.71">
            <text:p>43031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0208.81">
            <text:p>660208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9.51">
            <text:p>389,51</text:p>
          </table:table-cell>
          <table:table-cell table:style-name="ce26N2" office:value-type="float" office:value="53.89">
            <text:p>53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7.031858">
            <text:p>17,032</text:p>
          </table:table-cell>
          <table:table-cell table:style-name="ce26N2" office:value-type="float" office:value="645936.87">
            <text:p>645936,87</text:p>
          </table:table-cell>
          <table:table-cell table:style-name="ce26N2" office:value-type="float" office:value="660208.81">
            <text:p>660208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47203.8">
            <text:p>547203,80</text:p>
          </table:table-cell>
          <table:table-cell table:style-name="ce26N2" office:value-type="float" office:value="547.21">
            <text:p>547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924.86">
            <text:p>4924,8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955.88">
            <text:p>3955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6.26">
            <text:p>76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98" meta:object-count="0"/>
    <meta:generator>LibreOffice/4.3.0.4$Windows_x86 LibreOffice_project/62ad5818884a2fc2e5780dd45466868d41009ec0</meta:generator>
  </office:meta>
</office:document-meta>
</file>