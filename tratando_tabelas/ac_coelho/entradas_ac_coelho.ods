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5/05/2026 07:37:38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20">
            <text:p>30702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6.3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2272">
            <text:p>0,142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122.98">
            <text:p>12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631917554164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33">
            <text:p>30713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7.1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5.79">
            <text:p>426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222.88">
            <text:p>422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84131">
            <text:p>0,484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6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42.91">
            <text:p>42,91</text:p>
          </table:table-cell>
          <table:table-cell table:style-name="ce12N2" office:value-type="float" office:value="4222.88">
            <text:p>4222,88</text:p>
          </table:table-cell>
          <table:table-cell table:style-name="ce12N2" office:value-type="float" office:value="281.12">
            <text:p>28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717316183353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5">
            <text:p>307265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2.49">
            <text:p>370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37.49">
            <text:p>3437,49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2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2.49">
            <text:p>3702,49</text:p>
          </table:table-cell>
          <table:table-cell table:style-name="ce12N2" office:value-type="float" office:value="259.17">
            <text:p>25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27254297000178550010000105531584622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4">
            <text:p>3073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2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63.92">
            <text:p>496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63.92">
            <text:p>496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904">
            <text:p>0,030</text:p>
          </table:table-cell>
          <table:table-cell table:style-name="ce12N2" office:value-type="float" office:value="6.84">
            <text:p>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6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63.92">
            <text:p>4963,92</text:p>
          </table:table-cell>
          <table:table-cell table:style-name="ce12N2" office:value-type="float" office:value="347.47">
            <text:p>34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2151526143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6">
            <text:p>3073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4.02">
            <text:p>210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04.02">
            <text:p>2104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04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04.02">
            <text:p>2104,02</text:p>
          </table:table-cell>
          <table:table-cell table:style-name="ce12N2" office:value-type="float" office:value="147.28">
            <text:p>14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8413178758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67">
            <text:p>307367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2.9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1.17">
            <text:p>567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538.68">
            <text:p>553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4926">
            <text:p>0,315</text:p>
          </table:table-cell>
          <table:table-cell table:style-name="ce12N2" office:value-type="float" office:value="33.19">
            <text:p>33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7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35">
            <text:p>55,3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132.49">
            <text:p>132,49</text:p>
          </table:table-cell>
          <table:table-cell table:style-name="ce12N2" office:value-type="float" office:value="4787.31">
            <text:p>4787,31</text:p>
          </table:table-cell>
          <table:table-cell table:style-name="ce12N2" office:value-type="float" office:value="258.23">
            <text:p>25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29171646262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69">
            <text:p>307369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7.2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5.13">
            <text:p>182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67.68">
            <text:p>1767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844">
            <text:p>0,026</text:p>
          </table:table-cell>
          <table:table-cell table:style-name="ce12N2" office:value-type="float" office:value="6.79">
            <text:p>6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2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57.45">
            <text:p>57,45</text:p>
          </table:table-cell>
          <table:table-cell table:style-name="ce12N2" office:value-type="float" office:value="1767.68">
            <text:p>1767,68</text:p>
          </table:table-cell>
          <table:table-cell table:style-name="ce12N2" office:value-type="float" office:value="110.47">
            <text:p>11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72241503823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6">
            <text:p>3073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68">
            <text:p>0,002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19.26">
            <text:p>1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717366362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4">
            <text:p>3074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7.3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3.2">
            <text:p>178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624.79">
            <text:p>1624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8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58.41">
            <text:p>158,41</text:p>
          </table:table-cell>
          <table:table-cell table:style-name="ce12N2" office:value-type="float" office:value="1624.79">
            <text:p>1624,79</text:p>
          </table:table-cell>
          <table:table-cell table:style-name="ce12N2" office:value-type="float" office:value="65.04">
            <text:p>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6.5">
            <text:p>8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8.941</text:p>
          </table:table-cell>
          <table:table-cell table:style-name="ce0" office:value-type="string" calcext:value-type="string">
            <text:p>38.647 - ACCERT TRANSPORTES E LOGISTICA LTDA</text:p>
          </table:table-cell>
          <table:table-cell table:style-name="ce0" office:value-type="string" calcext:value-type="string">
            <text:p>14/05/2026</text:p>
          </table:table-cell>
          <table:table-cell table:style-name="ce12" office:value-type="string" calcext:value-type="string">
            <text:p>86,50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9260529244900000247550010000673361492026159</text:p>
          </table:table-cell>
          <table:table-cell table:style-name="ce0" office:value-type="string" calcext:value-type="string">
            <text:p>2926050522209200106957001000038941100664763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3">
            <text:p>3074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48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40.61">
            <text:p>104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7.1">
            <text:p>97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40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63.51">
            <text:p>63,51</text:p>
          </table:table-cell>
          <table:table-cell table:style-name="ce12N2" office:value-type="float" office:value="977.1">
            <text:p>977,10</text:p>
          </table:table-cell>
          <table:table-cell table:style-name="ce12N2" office:value-type="float" office:value="68.4">
            <text:p>6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48715470222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9">
            <text:p>30743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8.06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1.84">
            <text:p>240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401.84">
            <text:p>2401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576">
            <text:p>0,296</text:p>
          </table:table-cell>
          <table:table-cell table:style-name="ce12N2" office:value-type="float" office:value="31.68">
            <text:p>31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01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01.84">
            <text:p>2401,84</text:p>
          </table:table-cell>
          <table:table-cell table:style-name="ce12N2" office:value-type="float" office:value="149.08">
            <text:p>149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880631168529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3">
            <text:p>307443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.13">
            <text:p>447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3.06">
            <text:p>433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9">
            <text:p>0,022</text:p>
          </table:table-cell>
          <table:table-cell table:style-name="ce12N2" office:value-type="float" office:value="1.7">
            <text:p>1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7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4.07">
            <text:p>14,07</text:p>
          </table:table-cell>
          <table:table-cell table:style-name="ce12N2" office:value-type="float" office:value="433.06">
            <text:p>433,06</text:p>
          </table:table-cell>
          <table:table-cell table:style-name="ce12N2" office:value-type="float" office:value="30.31">
            <text:p>3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61419540829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4">
            <text:p>307444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6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71.51">
            <text:p>2467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23273.18">
            <text:p>2327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54421">
            <text:p>3,544</text:p>
          </table:table-cell>
          <table:table-cell table:style-name="ce12N2" office:value-type="float" office:value="399.29">
            <text:p>39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671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398.33">
            <text:p>1398,33</text:p>
          </table:table-cell>
          <table:table-cell table:style-name="ce12N2" office:value-type="float" office:value="23273.18">
            <text:p>23273,18</text:p>
          </table:table-cell>
          <table:table-cell table:style-name="ce12N2" office:value-type="float" office:value="1629.14">
            <text:p>162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6201881086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2">
            <text:p>307462</text:p>
          </table:table-cell>
          <table:table-cell table:style-name="ce0" table:number-columns-spanned="4" table:number-rows-spanned="1" office:value-type="string" calcext:value-type="string">
            <text:p>29.238 - EURO METAIS IMPORTACAO E EXPORTACAO LTDA</text:p>
          </table:table-cell>
          <table:covered-table-cell table:number-columns-repeated="3"/>
          <table:table-cell table:style-name="ce0" office:value-type="string" calcext:value-type="string">
            <text:p>66.5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9.81">
            <text:p>31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1.4">
            <text:p>29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46">
            <text:p>0,002</text:p>
          </table:table-cell>
          <table:table-cell table:style-name="ce12N2" office:value-type="float" office:value="0.53">
            <text:p>0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8.41">
            <text:p>28,41</text:p>
          </table:table-cell>
          <table:table-cell table:style-name="ce12N2" office:value-type="float" office:value="291.4">
            <text:p>291,40</text:p>
          </table:table-cell>
          <table:table-cell table:style-name="ce12N2" office:value-type="float" office:value="11.65">
            <text:p>1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5103170380001465500100006658712725653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5">
            <text:p>307465</text:p>
          </table:table-cell>
          <table:table-cell table:style-name="ce0" table:number-columns-spanned="4" table:number-rows-spanned="1" office:value-type="string" calcext:value-type="string">
            <text:p>22.015 - FOCO METALLO FABRICACAO E MONTAGEM DE LUMINARIAS E COMERCIO</text:p>
          </table:table-cell>
          <table:covered-table-cell table:number-columns-repeated="3"/>
          <table:table-cell table:style-name="ce0" office:value-type="string" calcext:value-type="string">
            <text:p>23.3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0.3">
            <text:p>114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39">
            <text:p>103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79">
            <text:p>0,0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0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01.3">
            <text:p>101,30</text:p>
          </table:table-cell>
          <table:table-cell table:style-name="ce12N2" office:value-type="float" office:value="1039">
            <text:p>1039,00</text:p>
          </table:table-cell>
          <table:table-cell table:style-name="ce12N2" office:value-type="float" office:value="72.73">
            <text:p>7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2.33">
            <text:p>24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7.724.082</text:p>
          </table:table-cell>
          <table:table-cell table:style-name="ce0" office:value-type="string" calcext:value-type="string">
            <text:p>17.618 - ALFA TRANSPORTES EIRELI</text:p>
          </table:table-cell>
          <table:table-cell table:style-name="ce0" office:value-type="string" calcext:value-type="string">
            <text:p>14/05/2026</text:p>
          </table:table-cell>
          <table:table-cell table:style-name="ce12" office:value-type="string" calcext:value-type="string">
            <text:p>242,33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42260522670837000180550010000233691542222518</text:p>
          </table:table-cell>
          <table:table-cell table:style-name="ce0" office:value-type="string" calcext:value-type="string">
            <text:p>4226058211081800012157000007724082109034863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1">
            <text:p>307471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45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60">
            <text:p>74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60">
            <text:p>74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454">
            <text:p>0,165</text:p>
          </table:table-cell>
          <table:table-cell table:style-name="ce12N2" office:value-type="float" office:value="25.2">
            <text:p>2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60">
            <text:p>7460,00</text:p>
          </table:table-cell>
          <table:table-cell table:style-name="ce12N2" office:value-type="float" office:value="895.2">
            <text:p>89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2296669000169550030000014561732534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39">
            <text:p>307539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6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3.65">
            <text:p>272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723.65">
            <text:p>2723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185">
            <text:p>0,004</text:p>
          </table:table-cell>
          <table:table-cell table:style-name="ce12N2" office:value-type="float" office:value="3.07">
            <text:p>3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3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.33">
            <text:p>6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3.65">
            <text:p>2723,65</text:p>
          </table:table-cell>
          <table:table-cell table:style-name="ce12N2" office:value-type="float" office:value="108.95">
            <text:p>108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05104359000122550010000046771737179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2">
            <text:p>3075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51937497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8">
            <text:p>3075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319391751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9">
            <text:p>3075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41425368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6">
            <text:p>3075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3.1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62.82">
            <text:p>236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62.82">
            <text:p>236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24">
            <text:p>0,001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6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62.82">
            <text:p>2362,8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31411980070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8">
            <text:p>307598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4.2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6.29">
            <text:p>152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8.25">
            <text:p>1478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5">
            <text:p>0,002</text:p>
          </table:table-cell>
          <table:table-cell table:style-name="ce12N2" office:value-type="float" office:value="0.05">
            <text:p>0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6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48.04">
            <text:p>48,04</text:p>
          </table:table-cell>
          <table:table-cell table:style-name="ce12N2" office:value-type="float" office:value="1478.25">
            <text:p>1478,25</text:p>
          </table:table-cell>
          <table:table-cell table:style-name="ce12N2" office:value-type="float" office:value="103.48">
            <text:p>10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42611312671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1">
            <text:p>3076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3.9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2.18">
            <text:p>301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28.34">
            <text:p>2828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216">
            <text:p>0,009</text:p>
          </table:table-cell>
          <table:table-cell table:style-name="ce12N2" office:value-type="float" office:value="2.96">
            <text:p>2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12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83.84">
            <text:p>183,84</text:p>
          </table:table-cell>
          <table:table-cell table:style-name="ce12N2" office:value-type="float" office:value="2828.34">
            <text:p>2828,34</text:p>
          </table:table-cell>
          <table:table-cell table:style-name="ce12N2" office:value-type="float" office:value="197.98">
            <text:p>197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39891906994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3">
            <text:p>307613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8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9.49">
            <text:p>594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20.95">
            <text:p>5420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49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528.54">
            <text:p>528,54</text:p>
          </table:table-cell>
          <table:table-cell table:style-name="ce12N2" office:value-type="float" office:value="5420.95">
            <text:p>5420,95</text:p>
          </table:table-cell>
          <table:table-cell table:style-name="ce12N2" office:value-type="float" office:value="216.84">
            <text:p>21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2091324000204550030000068451624550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4">
            <text:p>30761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1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36.45">
            <text:p>193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92.35">
            <text:p>1792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4.98">
            <text:p>1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36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44.1">
            <text:p>144,10</text:p>
          </table:table-cell>
          <table:table-cell table:style-name="ce12N2" office:value-type="float" office:value="1792.35">
            <text:p>1792,35</text:p>
          </table:table-cell>
          <table:table-cell table:style-name="ce12N2" office:value-type="float" office:value="111.31">
            <text:p>11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1816670359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7">
            <text:p>30761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0.89">
            <text:p>45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36.7">
            <text:p>43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5">
            <text:p>0,003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0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4.19">
            <text:p>14,19</text:p>
          </table:table-cell>
          <table:table-cell table:style-name="ce12N2" office:value-type="float" office:value="436.7">
            <text:p>436,70</text:p>
          </table:table-cell>
          <table:table-cell table:style-name="ce12N2" office:value-type="float" office:value="30.57">
            <text:p>3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0916531283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3">
            <text:p>307633</text:p>
          </table:table-cell>
          <table:table-cell table:style-name="ce0" table:number-columns-spanned="4" table:number-rows-spanned="1" office:value-type="string" calcext:value-type="string">
            <text:p>13.356 - H. IMPORTS IMPORTACAO E EXPORTACAO EIRELI-EPP</text:p>
          </table:table-cell>
          <table:covered-table-cell table:number-columns-repeated="3"/>
          <table:table-cell table:style-name="ce0" office:value-type="string" calcext:value-type="string">
            <text:p>51.7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98.04">
            <text:p>239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85">
            <text:p>218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9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13.04">
            <text:p>213,04</text:p>
          </table:table-cell>
          <table:table-cell table:style-name="ce12N2" office:value-type="float" office:value="2185">
            <text:p>2185,00</text:p>
          </table:table-cell>
          <table:table-cell table:style-name="ce12N2" office:value-type="float" office:value="87.4">
            <text:p>8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20913240001155500100005173916440844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9">
            <text:p>307639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11.2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39.72">
            <text:p>323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39.72">
            <text:p>323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10659">
            <text:p>3,107</text:p>
          </table:table-cell>
          <table:table-cell table:style-name="ce12N2" office:value-type="float" office:value="30.71">
            <text:p>3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39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39.72">
            <text:p>3239,72</text:p>
          </table:table-cell>
          <table:table-cell table:style-name="ce12N2" office:value-type="float" office:value="211.61">
            <text:p>21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00142240000120550010007112461929672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52">
            <text:p>307652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1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147.58">
            <text:p>28147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8147.58">
            <text:p>28147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6796">
            <text:p>3,068</text:p>
          </table:table-cell>
          <table:table-cell table:style-name="ce12N2" office:value-type="float" office:value="550.35">
            <text:p>55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147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">
            <text:p>5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47.58">
            <text:p>28147,58</text:p>
          </table:table-cell>
          <table:table-cell table:style-name="ce12N2" office:value-type="float" office:value="1970.33">
            <text:p>197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650140001625500100004615913440973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0">
            <text:p>30767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3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4636">
            <text:p>5,346</text:p>
          </table:table-cell>
          <table:table-cell table:style-name="ce12N2" office:value-type="float" office:value="70.96">
            <text:p>7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4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2269.68">
            <text:p>226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3811553217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1">
            <text:p>307671</text:p>
          </table:table-cell>
          <table:table-cell table:style-name="ce0" table:number-columns-spanned="4" table:number-rows-spanned="1" office:value-type="string" calcext:value-type="string">
            <text:p>790 - JACKWAL S/A</text:p>
          </table:table-cell>
          <table:covered-table-cell table:number-columns-repeated="3"/>
          <table:table-cell table:style-name="ce0" office:value-type="string" calcext:value-type="string">
            <text:p>275.51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75.04">
            <text:p>817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795.49">
            <text:p>7795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416">
            <text:p>0,064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7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379.55">
            <text:p>379,55</text:p>
          </table:table-cell>
          <table:table-cell table:style-name="ce12N2" office:value-type="float" office:value="7795.49">
            <text:p>7795,49</text:p>
          </table:table-cell>
          <table:table-cell table:style-name="ce12N2" office:value-type="float" office:value="486.36">
            <text:p>48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2782366000188550030002755111221903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2">
            <text:p>307672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1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731.4">
            <text:p>11673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116731.4">
            <text:p>1167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7106">
            <text:p>13,711</text:p>
          </table:table-cell>
          <table:table-cell table:style-name="ce12N2" office:value-type="float" office:value="2125.05">
            <text:p>2125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6.73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">
            <text:p>5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731.4">
            <text:p>116731,40</text:p>
          </table:table-cell>
          <table:table-cell table:style-name="ce12N2" office:value-type="float" office:value="8171.19">
            <text:p>817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65014000162550010000461611478984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3">
            <text:p>307673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1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48.8">
            <text:p>1004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48.8">
            <text:p>1004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34">
            <text:p>1,134</text:p>
          </table:table-cell>
          <table:table-cell table:style-name="ce12N2" office:value-type="float" office:value="230">
            <text:p>2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4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">
            <text:p>5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48.8">
            <text:p>10048,80</text:p>
          </table:table-cell>
          <table:table-cell table:style-name="ce12N2" office:value-type="float" office:value="703.42">
            <text:p>70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650140001625500100004616014484648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6">
            <text:p>30767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6.1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5.93">
            <text:p>322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29.04">
            <text:p>3029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48">
            <text:p>0,003</text:p>
          </table:table-cell>
          <table:table-cell table:style-name="ce12N2" office:value-type="float" office:value="2.6">
            <text:p>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5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96.89">
            <text:p>196,89</text:p>
          </table:table-cell>
          <table:table-cell table:style-name="ce12N2" office:value-type="float" office:value="3029.04">
            <text:p>3029,04</text:p>
          </table:table-cell>
          <table:table-cell table:style-name="ce12N2" office:value-type="float" office:value="212.03">
            <text:p>21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61821645484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7">
            <text:p>3076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6.2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3.62">
            <text:p>354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">
            <text:p>0,003</text:p>
          </table:table-cell>
          <table:table-cell table:style-name="ce12N2" office:value-type="float" office:value="0.2">
            <text:p>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43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16.28">
            <text:p>216,28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232.91">
            <text:p>23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623710245680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83">
            <text:p>307683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66.48">
            <text:p>1606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066.48">
            <text:p>16066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876">
            <text:p>1,588</text:p>
          </table:table-cell>
          <table:table-cell table:style-name="ce12N2" office:value-type="float" office:value="312">
            <text:p>3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066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">
            <text:p>5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66.48">
            <text:p>16066,48</text:p>
          </table:table-cell>
          <table:table-cell table:style-name="ce12N2" office:value-type="float" office:value="1124.66">
            <text:p>112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650140001625500100004615816111122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28">
            <text:p>307728</text:p>
          </table:table-cell>
          <table:table-cell table:style-name="ce0" table:number-columns-spanned="4" table:number-rows-spanned="1" office:value-type="string" calcext:value-type="string">
            <text:p>38.379 - ASSA ABLOY BRASIL INDUSTRIA E COMERCIO LTDA</text:p>
          </table:table-cell>
          <table:covered-table-cell table:number-columns-repeated="3"/>
          <table:table-cell table:style-name="ce0" office:value-type="string" calcext:value-type="string">
            <text:p>220.87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88.73">
            <text:p>1308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2998.64">
            <text:p>1299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088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81">
            <text:p>55,8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90.09">
            <text:p>90,09</text:p>
          </table:table-cell>
          <table:table-cell table:style-name="ce12N2" office:value-type="float" office:value="12998.64">
            <text:p>12998,64</text:p>
          </table:table-cell>
          <table:table-cell table:style-name="ce12N2" office:value-type="float" office:value="575.15">
            <text:p>57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52605022146040003285500300022087618818703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35">
            <text:p>307735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11.2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7.85">
            <text:p>547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7.85">
            <text:p>547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8178">
            <text:p>0,038</text:p>
          </table:table-cell>
          <table:table-cell table:style-name="ce12N2" office:value-type="float" office:value="6.65">
            <text:p>6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7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7.85">
            <text:p>547,85</text:p>
          </table:table-cell>
          <table:table-cell table:style-name="ce12N2" office:value-type="float" office:value="65.74">
            <text:p>6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00142240000120550010007112251212108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55">
            <text:p>3077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2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24.8">
            <text:p>802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24.8">
            <text:p>802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368">
            <text:p>0,044</text:p>
          </table:table-cell>
          <table:table-cell table:style-name="ce12N2" office:value-type="float" office:value="9.4">
            <text:p>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2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24.8">
            <text:p>8024,80</text:p>
          </table:table-cell>
          <table:table-cell table:style-name="ce12N2" office:value-type="float" office:value="561.74">
            <text:p>56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27513342501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2">
            <text:p>307772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9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3.36">
            <text:p>240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89.85">
            <text:p>218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0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6">
            <text:p>40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213.51">
            <text:p>213,51</text:p>
          </table:table-cell>
          <table:table-cell table:style-name="ce12N2" office:value-type="float" office:value="2189.85">
            <text:p>2189,85</text:p>
          </table:table-cell>
          <table:table-cell table:style-name="ce12N2" office:value-type="float" office:value="87.6">
            <text:p>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97551476543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05">
            <text:p>30780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6.6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39.8">
            <text:p>623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239.8">
            <text:p>623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">
            <text:p>0,034</text:p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39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39.8">
            <text:p>6239,80</text:p>
          </table:table-cell>
          <table:table-cell table:style-name="ce12N2" office:value-type="float" office:value="436.79">
            <text:p>43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663412198163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2">
            <text:p>3078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6">
            <text:p>0,006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184.15">
            <text:p>18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1619546161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43">
            <text:p>43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65">
            <text:p>26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224.95">
            <text:p>4224,95</text:p>
          </table:table-cell>
          <table:table-cell table:style-name="ce26N2" office:value-type="float" office:value="335061.98">
            <text:p>335061,98</text:p>
          </table:table-cell>
          <table:table-cell table:style-name="ce26N2" office:value-type="float" office:value="22827.05">
            <text:p>22827,0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28.83">
            <text:p>328,83</text:p>
          </table:table-cell>
          <table:table-cell table:style-name="ce26N2" office:value-type="float" office:value="340038.3">
            <text:p>340038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3.230526">
            <text:p>33,231</text:p>
          </table:table-cell>
          <table:table-cell table:style-name="ce26N2" office:value-type="float" office:value="335548.35">
            <text:p>335548,35</text:p>
          </table:table-cell>
          <table:table-cell table:style-name="ce26N2" office:value-type="float" office:value="340038.3">
            <text:p>340038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979.43">
            <text:p>3979,4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7.34">
            <text:p>47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16" meta:object-count="0"/>
    <meta:generator>LibreOffice/4.3.0.4$Windows_x86 LibreOffice_project/62ad5818884a2fc2e5780dd45466868d41009ec0</meta:generator>
  </office:meta>
</office:document-meta>
</file>