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6/2026 04:30:3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9">
            <text:p>309219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381986976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3">
            <text:p>309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08">
            <text:p>0,030</text:p>
          </table:table-cell>
          <table:table-cell table:style-name="ce12N2" office:value-type="float" office:value="10.19">
            <text:p>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2.2">
            <text:p>6422,20</text:p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532.66">
            <text:p>53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5651866437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4">
            <text:p>3092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0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4">
            <text:p>0,090</text:p>
          </table:table-cell>
          <table:table-cell table:style-name="ce12N2" office:value-type="float" office:value="57.08">
            <text:p>5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3.67">
            <text:p>4353,6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8">
            <text:p>39,1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361.1">
            <text:p>36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0171174874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5">
            <text:p>30922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82">
            <text:p>0,010</text:p>
          </table:table-cell>
          <table:table-cell table:style-name="ce12N2" office:value-type="float" office:value="6.75">
            <text:p>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51">
            <text:p>1123,51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1">
            <text:p>10,11</text:p>
          </table:table-cell>
          <table:table-cell table:style-name="ce12N2" office:value-type="float" office:value="37.99">
            <text:p>37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93.19">
            <text:p>9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1471239419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7">
            <text:p>3092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6.2">
            <text:p>2296,20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82017149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1">
            <text:p>3092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2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207153627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5">
            <text:p>309235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4.26">
            <text:p>466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2">
            <text:p>0,059</text:p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2.11">
            <text:p>3752,11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7">
            <text:p>33,77</text:p>
          </table:table-cell>
          <table:table-cell table:style-name="ce12N2" office:value-type="float" office:value="40.34">
            <text:p>40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18.51">
            <text:p>218,51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311.19">
            <text:p>31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69159760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3">
            <text:p>30924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0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.64">
            <text:p>547,6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3">
            <text:p>4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45.42">
            <text:p>4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0821378128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2">
            <text:p>3092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6.35">
            <text:p>43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52">
            <text:p>0,048</text:p>
          </table:table-cell>
          <table:table-cell table:style-name="ce12N2" office:value-type="float" office:value="39.36">
            <text:p>3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0.05">
            <text:p>3520,05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5.55">
            <text:p>135,55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291.96">
            <text:p>29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8018641279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6">
            <text:p>3092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0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0591446448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7">
            <text:p>3092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1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38">
            <text:p>0,005</text:p>
          </table:table-cell>
          <table:table-cell table:style-name="ce12N2" office:value-type="float" office:value="4.51">
            <text:p>4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1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1.02">
            <text:p>6511,02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">
            <text:p>58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540.02">
            <text:p>54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1551192158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4">
            <text:p>309284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2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.18">
            <text:p>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26">
            <text:p>0,001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.81">
            <text:p>10,81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17.61">
            <text:p>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211542551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1">
            <text:p>3093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6">
            <text:p>0,044</text:p>
          </table:table-cell>
          <table:table-cell table:style-name="ce12N2" office:value-type="float" office:value="30.76">
            <text:p>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16.64">
            <text:p>7116,6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05">
            <text:p>64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590.25">
            <text:p>59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591833447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6">
            <text:p>3093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7.87">
            <text:p>11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22">
            <text:p>0,003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3.42">
            <text:p>933,4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71.89">
            <text:p>71,89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77.42">
            <text:p>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261806665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7">
            <text:p>309387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6.8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.25">
            <text:p>46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3.06">
            <text:p>383,06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68921542769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0">
            <text:p>30942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1.26">
            <text:p>71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7.01">
            <text:p>5637,01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73">
            <text:p>50,7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30.86">
            <text:p>630,86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258.82">
            <text:p>2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1412428352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4">
            <text:p>309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8">
            <text:p>0,002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34">
            <text:p>2402,3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2">
            <text:p>2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199.25">
            <text:p>1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8331110045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69">
            <text:p>3094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2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2.84">
            <text:p>9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11">
            <text:p>0,001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.4">
            <text:p>723,40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55.71">
            <text:p>55,71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2401091218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5">
            <text:p>309485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17.2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24.75">
            <text:p>63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106.52">
            <text:p>6106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75">
            <text:p>0,188</text:p>
          </table:table-cell>
          <table:table-cell table:style-name="ce12N2" office:value-type="float" office:value="289.4">
            <text:p>28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24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19.98">
            <text:p>5319,98</text:p>
          </table:table-cell>
          <table:table-cell table:style-name="ce12N2" office:value-type="float" office:value="5.32">
            <text:p>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18.23">
            <text:p>218,23</text:p>
          </table:table-cell>
          <table:table-cell table:style-name="ce12N2" office:value-type="float" office:value="6106.52">
            <text:p>6106,52</text:p>
          </table:table-cell>
          <table:table-cell table:style-name="ce12N2" office:value-type="float" office:value="244.27">
            <text:p>24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609642566000191550010004172471179364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5">
            <text:p>309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5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76.94">
            <text:p>14947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9322.78">
            <text:p>14932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45977">
            <text:p>4,346</text:p>
          </table:table-cell>
          <table:table-cell table:style-name="ce12N2" office:value-type="float" office:value="1306.75">
            <text:p>130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47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046.33">
            <text:p>126046,33</text:p>
          </table:table-cell>
          <table:table-cell table:style-name="ce12N2" office:value-type="float" office:value="126.05">
            <text:p>12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4.42">
            <text:p>1134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4.16">
            <text:p>154,16</text:p>
          </table:table-cell>
          <table:table-cell table:style-name="ce12N2" office:value-type="float" office:value="148981.94">
            <text:p>148981,94</text:p>
          </table:table-cell>
          <table:table-cell table:style-name="ce12N2" office:value-type="float" office:value="10428.74">
            <text:p>1042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5019113133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1">
            <text:p>309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1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6.68">
            <text:p>3156,68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261.82">
            <text:p>26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1361803885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8">
            <text:p>309608</text:p>
          </table:table-cell>
          <table:table-cell table:style-name="ce0" table:number-columns-spanned="4" table:number-rows-spanned="1" office:value-type="string" calcext:value-type="string">
            <text:p>26 - TECNOPERFIL PLASTICOS LTDA</text:p>
          </table:table-cell>
          <table:covered-table-cell table:number-columns-repeated="3"/>
          <table:table-cell table:style-name="ce0" office:value-type="string" calcext:value-type="string">
            <text:p>18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87">
            <text:p>195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98">
            <text:p>0,155</text:p>
          </table:table-cell>
          <table:table-cell table:style-name="ce12N2" office:value-type="float" office:value="32.94">
            <text:p>3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.99">
            <text:p>1545,99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1">
            <text:p>13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07">
            <text:p>119,07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128.23">
            <text:p>1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341857000175550030000180381303298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9">
            <text:p>3096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4">
            <text:p>8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7004">
            <text:p>0,707</text:p>
          </table:table-cell>
          <table:table-cell table:style-name="ce12N2" office:value-type="float" office:value="52.22">
            <text:p>5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37.13">
            <text:p>6837,1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53">
            <text:p>61,53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67.84">
            <text:p>767,84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341.36">
            <text:p>34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1951453167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4">
            <text:p>4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46.82">
            <text:p>3246,82</text:p>
          </table:table-cell>
          <table:table-cell table:style-name="ce26N2" office:value-type="float" office:value="789090.81">
            <text:p>789090,81</text:p>
          </table:table-cell>
          <table:table-cell table:style-name="ce26N2" office:value-type="float" office:value="54635.89">
            <text:p>54635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92688.47">
            <text:p>792688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6.534898">
            <text:p>16,535</text:p>
          </table:table-cell>
          <table:table-cell table:style-name="ce26N2" office:value-type="float" office:value="789441.65">
            <text:p>789441,65</text:p>
          </table:table-cell>
          <table:table-cell table:style-name="ce26N2" office:value-type="float" office:value="792688.47">
            <text:p>792688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0976.99">
            <text:p>660976,99</text:p>
          </table:table-cell>
          <table:table-cell table:style-name="ce26N2" office:value-type="float" office:value="661">
            <text:p>6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48.77">
            <text:p>5948,7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469.05">
            <text:p>10469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0.34">
            <text:p>80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66" meta:object-count="0"/>
    <meta:generator>LibreOffice/4.3.0.4$Windows_x86 LibreOffice_project/62ad5818884a2fc2e5780dd45466868d41009ec0</meta:generator>
  </office:meta>
</office:document-meta>
</file>