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8/06/2026 07:17:5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7">
            <text:p>30905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8.9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13.09">
            <text:p>271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92">
            <text:p>0,122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1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0.24">
            <text:p>20250,24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5">
            <text:p>182,2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119.21">
            <text:p>3119,21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1679.57">
            <text:p>167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3562859000105550010001689291991689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9">
            <text:p>30905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5.5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1344">
            <text:p>0,421</text:p>
          </table:table-cell>
          <table:table-cell table:style-name="ce12N2" office:value-type="float" office:value="57.02">
            <text:p>57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7.64">
            <text:p>3367,64</text:p>
          </table:table-cell>
          <table:table-cell table:style-name="ce12N2" office:value-type="float" office:value="3.37">
            <text:p>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3">
            <text:p>30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253.48">
            <text:p>25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551013417034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5">
            <text:p>3090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5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2">
            <text:p>0,00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.62">
            <text:p>4074,62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337.95">
            <text:p>33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5211342735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6">
            <text:p>309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6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6">
            <text:p>0,0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62">
            <text:p>1531,62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127.03">
            <text:p>1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6071118733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1">
            <text:p>30911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54.37">
            <text:p>164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5541.87">
            <text:p>155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673">
            <text:p>0,787</text:p>
          </table:table-cell>
          <table:table-cell table:style-name="ce12N2" office:value-type="float" office:value="75.23">
            <text:p>75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71.95">
            <text:p>13271,9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46">
            <text:p>119,4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12.5">
            <text:p>912,50</text:p>
          </table:table-cell>
          <table:table-cell table:style-name="ce12N2" office:value-type="float" office:value="13101.94">
            <text:p>13101,94</text:p>
          </table:table-cell>
          <table:table-cell table:style-name="ce12N2" office:value-type="float" office:value="917.13">
            <text:p>91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79501835786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2">
            <text:p>3091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4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26">
            <text:p>15526,00</text:p>
          </table:table-cell>
          <table:table-cell table:style-name="ce12N2" office:value-type="float" office:value="15.53">
            <text:p>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73">
            <text:p>139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1287.72">
            <text:p>128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43341524918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9">
            <text:p>309219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381986976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5">
            <text:p>30922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82">
            <text:p>0,010</text:p>
          </table:table-cell>
          <table:table-cell table:style-name="ce12N2" office:value-type="float" office:value="6.75">
            <text:p>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51">
            <text:p>1123,51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1">
            <text:p>10,11</text:p>
          </table:table-cell>
          <table:table-cell table:style-name="ce12N2" office:value-type="float" office:value="37.99">
            <text:p>37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1471239419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5">
            <text:p>309235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4.26">
            <text:p>466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2">
            <text:p>0,059</text:p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2.11">
            <text:p>3752,11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40.34">
            <text:p>40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18.51">
            <text:p>218,51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311.19">
            <text:p>31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69159760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0">
            <text:p>309240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12.64">
            <text:p>3212,64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5">
            <text:p>0,05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52">
            <text:p>2912,52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2">
            <text:p>26,2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243.44">
            <text:p>24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751693871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2">
            <text:p>3092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6.35">
            <text:p>43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52">
            <text:p>0,048</text:p>
          </table:table-cell>
          <table:table-cell table:style-name="ce12N2" office:value-type="float" office:value="39.36">
            <text:p>3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0.05">
            <text:p>3520,05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5.55">
            <text:p>135,55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291.96">
            <text:p>29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8018641279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9">
            <text:p>309279</text:p>
          </table:table-cell>
          <table:table-cell table:style-name="ce0" table:number-columns-spanned="4" table:number-rows-spanned="1" office:value-type="string" calcext:value-type="string">
            <text:p>32.986 - MARCELO NUNES ALENCAR</text:p>
          </table:table-cell>
          <table:covered-table-cell table:number-columns-repeated="3"/>
          <table:table-cell table:style-name="ce0" office:value-type="string" calcext:value-type="string">
            <text:p>2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6260621258670000182550010000002121300000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4">
            <text:p>309284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2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.18">
            <text:p>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26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.81">
            <text:p>10,81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17.61">
            <text:p>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211542551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6">
            <text:p>3093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7.87">
            <text:p>11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22">
            <text:p>0,003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3.42">
            <text:p>933,4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71.89">
            <text:p>71,89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77.42">
            <text:p>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261806665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7">
            <text:p>309387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6.8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.25">
            <text:p>4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3.06">
            <text:p>383,06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68921542769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1">
            <text:p>4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5">
            <text:p>7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540.66">
            <text:p>13540,66</text:p>
          </table:table-cell>
          <table:table-cell table:style-name="ce26N2" office:value-type="float" office:value="808831.84">
            <text:p>808831,84</text:p>
          </table:table-cell>
          <table:table-cell table:style-name="ce26N2" office:value-type="float" office:value="55312.84">
            <text:p>55312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24822.43">
            <text:p>824822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8.640856">
            <text:p>28,641</text:p>
          </table:table-cell>
          <table:table-cell table:style-name="ce26N2" office:value-type="float" office:value="810516.77">
            <text:p>810516,77</text:p>
          </table:table-cell>
          <table:table-cell table:style-name="ce26N2" office:value-type="float" office:value="824822.43">
            <text:p>824822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2199.06">
            <text:p>672199,06</text:p>
          </table:table-cell>
          <table:table-cell table:style-name="ce26N2" office:value-type="float" office:value="672.27">
            <text:p>672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049.77">
            <text:p>6049,7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616.68">
            <text:p>9616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92">
            <text:p>77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8" meta:object-count="0"/>
    <meta:generator>LibreOffice/4.3.0.4$Windows_x86 LibreOffice_project/62ad5818884a2fc2e5780dd45466868d41009ec0</meta:generator>
  </office:meta>
</office:document-meta>
</file>