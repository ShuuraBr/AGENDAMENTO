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2/06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76">
            <text:p>30837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13">
            <text:p>0,293</text:p>
          </table:table-cell>
          <table:table-cell table:style-name="ce12N2" office:value-type="float" office:value="411.88">
            <text:p>41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6.9">
            <text:p>6936,90</text:p>
          </table:table-cell>
          <table:table-cell table:style-name="ce12N2" office:value-type="float" office:value="6.93">
            <text:p>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42">
            <text:p>62,4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575.36">
            <text:p>5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261066428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3">
            <text:p>308553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420.542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.07">
            <text:p>49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3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5.44">
            <text:p>395,44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18.16">
            <text:p>1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010000014415501000042054215912804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4">
            <text:p>30855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48.91">
            <text:p>11834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6578">
            <text:p>3,366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34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268.57">
            <text:p>96268,57</text:p>
          </table:table-cell>
          <table:table-cell table:style-name="ce12N2" office:value-type="float" office:value="96.31">
            <text:p>9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.39">
            <text:p>866,39</text:p>
          </table:table-cell>
          <table:table-cell table:style-name="ce12N2" office:value-type="float" office:value="82.72">
            <text:p>82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283.18">
            <text:p>4283,18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7984.65">
            <text:p>79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51371987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6">
            <text:p>308556</text:p>
          </table:table-cell>
          <table:table-cell table:style-name="ce0" table:number-columns-spanned="4" table:number-rows-spanned="1" office:value-type="string" calcext:value-type="string">
            <text:p>19.264 - PAG EQUIPAMENTOS PARA PINTURAS LTDA</text:p>
          </table:table-cell>
          <table:covered-table-cell table:number-columns-repeated="3"/>
          <table:table-cell table:style-name="ce0" office:value-type="string" calcext:value-type="string">
            <text:p>8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2.65">
            <text:p>1129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0234.48">
            <text:p>10234,48</text:p>
          </table:table-cell>
          <table:table-cell table:style-name="ce12N2" office:value-type="float" office:value="500">
            <text:p>5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93.36">
            <text:p>9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8.69">
            <text:p>9618,69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7">
            <text:p>86,5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558.17">
            <text:p>558,17</text:p>
          </table:table-cell>
          <table:table-cell table:style-name="ce12N2" office:value-type="float" office:value="10734.48">
            <text:p>10734,48</text:p>
          </table:table-cell>
          <table:table-cell table:style-name="ce12N2" office:value-type="float" office:value="751.42">
            <text:p>75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581731000119550010000084661290605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1">
            <text:p>3085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7.7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0.26">
            <text:p>910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55">
            <text:p>0,02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62.67">
            <text:p>7562,67</text:p>
          </table:table-cell>
          <table:table-cell table:style-name="ce12N2" office:value-type="float" office:value="7.56">
            <text:p>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07">
            <text:p>68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627.25">
            <text:p>62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77711228888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4">
            <text:p>30863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9.74">
            <text:p>1619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20.88">
            <text:p>1520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504">
            <text:p>0,015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19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83.58">
            <text:p>1283,58</text:p>
          </table:table-cell>
          <table:table-cell table:style-name="ce12N2" office:value-type="float" office:value="1.28">
            <text:p>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55">
            <text:p>11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98.86">
            <text:p>98,86</text:p>
          </table:table-cell>
          <table:table-cell table:style-name="ce12N2" office:value-type="float" office:value="1520.88">
            <text:p>1520,88</text:p>
          </table:table-cell>
          <table:table-cell table:style-name="ce12N2" office:value-type="float" office:value="106.46">
            <text:p>10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412808820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5">
            <text:p>30863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5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5677">
            <text:p>0,266</text:p>
          </table:table-cell>
          <table:table-cell table:style-name="ce12N2" office:value-type="float" office:value="169.83">
            <text:p>16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66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49.87">
            <text:p>15049,87</text:p>
          </table:table-cell>
          <table:table-cell table:style-name="ce12N2" office:value-type="float" office:value="15.06">
            <text:p>1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43">
            <text:p>135,43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1183.1">
            <text:p>118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59571505305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43">
            <text:p>3086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00.1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2.64">
            <text:p>2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.94">
            <text:p>335,94</text:p>
          </table:table-cell>
          <table:table-cell table:style-name="ce12N2" office:value-type="float" office:value="13.44">
            <text:p>1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0011912409708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6">
            <text:p>3087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9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6.15">
            <text:p>157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9.95">
            <text:p>147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5">
            <text:p>0,00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76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9.04">
            <text:p>1249,04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24">
            <text:p>11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96.2">
            <text:p>96,20</text:p>
          </table:table-cell>
          <table:table-cell table:style-name="ce12N2" office:value-type="float" office:value="1479.95">
            <text:p>1479,95</text:p>
          </table:table-cell>
          <table:table-cell table:style-name="ce12N2" office:value-type="float" office:value="103.6">
            <text:p>10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91012312806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7">
            <text:p>3087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9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8.61">
            <text:p>287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2.92">
            <text:p>27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8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81.2">
            <text:p>2281,20</text:p>
          </table:table-cell>
          <table:table-cell table:style-name="ce12N2" office:value-type="float" office:value="2.28">
            <text:p>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53">
            <text:p>20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75.69">
            <text:p>175,69</text:p>
          </table:table-cell>
          <table:table-cell table:style-name="ce12N2" office:value-type="float" office:value="2702.92">
            <text:p>2702,92</text:p>
          </table:table-cell>
          <table:table-cell table:style-name="ce12N2" office:value-type="float" office:value="189.2">
            <text:p>18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9041134215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47">
            <text:p>308847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5.43">
            <text:p>369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82.95">
            <text:p>328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95.43">
            <text:p>3695,43</text:p>
          </table:table-cell>
          <table:table-cell table:style-name="ce12N2" office:value-type="float" office:value="3.69">
            <text:p>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25">
            <text:p>33,25</text:p>
          </table:table-cell>
          <table:table-cell table:style-name="ce12N2" office:value-type="float" office:value="52.87">
            <text:p>52,8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12.48">
            <text:p>412,48</text:p>
          </table:table-cell>
          <table:table-cell table:style-name="ce12N2" office:value-type="float" office:value="3282.95">
            <text:p>3282,95</text:p>
          </table:table-cell>
          <table:table-cell table:style-name="ce12N2" office:value-type="float" office:value="131.32">
            <text:p>1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629244900000247550010000680361106919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5">
            <text:p>308855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1.1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3.56">
            <text:p>497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6.28">
            <text:p>4316,28</text:p>
          </table:table-cell>
          <table:table-cell table:style-name="ce12N2" office:value-type="float" office:value="4.31">
            <text:p>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6.56">
            <text:p>156,56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337.19">
            <text:p>33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7718726000135550010002011411919840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6">
            <text:p>308886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5.22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8.3">
            <text:p>3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92">
            <text:p>36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5.69">
            <text:p>335,69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35.38">
            <text:p>35,38</text:p>
          </table:table-cell>
          <table:table-cell table:style-name="ce12N2" office:value-type="float" office:value="362.92">
            <text:p>362,92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9934200012355002000105223181702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4">
            <text:p>30895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6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28.81">
            <text:p>492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3.67">
            <text:p>4773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94">
            <text:p>0,002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2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28.86">
            <text:p>4028,86</text:p>
          </table:table-cell>
          <table:table-cell table:style-name="ce12N2" office:value-type="float" office:value="4.03">
            <text:p>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26">
            <text:p>36,2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55.14">
            <text:p>155,14</text:p>
          </table:table-cell>
          <table:table-cell table:style-name="ce12N2" office:value-type="float" office:value="4773.67">
            <text:p>4773,67</text:p>
          </table:table-cell>
          <table:table-cell table:style-name="ce12N2" office:value-type="float" office:value="334.16">
            <text:p>3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63413736374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8">
            <text:p>3089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2.5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98">
            <text:p>1175,9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97.54">
            <text:p>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25341904748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7">
            <text:p>30901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34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531.18">
            <text:p>365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33285.81">
            <text:p>3328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02664">
            <text:p>20,027</text:p>
          </table:table-cell>
          <table:table-cell table:style-name="ce12N2" office:value-type="float" office:value="41.5">
            <text:p>4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531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98.6">
            <text:p>28998,60</text:p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.99">
            <text:p>260,99</text:p>
          </table:table-cell>
          <table:table-cell table:style-name="ce12N2" office:value-type="float" office:value="84.67">
            <text:p>84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245.37">
            <text:p>3245,37</text:p>
          </table:table-cell>
          <table:table-cell table:style-name="ce12N2" office:value-type="float" office:value="33285.81">
            <text:p>33285,81</text:p>
          </table:table-cell>
          <table:table-cell table:style-name="ce12N2" office:value-type="float" office:value="1331.43">
            <text:p>133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3441574582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3">
            <text:p>3090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1.8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88">
            <text:p>0,028</text:p>
          </table:table-cell>
          <table:table-cell table:style-name="ce12N2" office:value-type="float" office:value="15.28">
            <text:p>1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87.8">
            <text:p>7687,80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19">
            <text:p>69,1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637.63">
            <text:p>63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18041930196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6">
            <text:p>3090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2.80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15.87">
            <text:p>881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15.87">
            <text:p>8815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211">
            <text:p>0,038</text:p>
          </table:table-cell>
          <table:table-cell table:style-name="ce12N2" office:value-type="float" office:value="6.94">
            <text:p>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15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40.36">
            <text:p>7440,36</text:p>
          </table:table-cell>
          <table:table-cell table:style-name="ce12N2" office:value-type="float" office:value="7.44">
            <text:p>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96">
            <text:p>66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15.87">
            <text:p>8815,87</text:p>
          </table:table-cell>
          <table:table-cell table:style-name="ce12N2" office:value-type="float" office:value="617.11">
            <text:p>61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280312799879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1">
            <text:p>309041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7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8.16">
            <text:p>238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3.16">
            <text:p>2123,16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0.025">
            <text:p>0,025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8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3.83">
            <text:p>2133,83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8.16">
            <text:p>2388,16</text:p>
          </table:table-cell>
          <table:table-cell table:style-name="ce12N2" office:value-type="float" office:value="167.17">
            <text:p>1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272542970001785500100001073611396994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3">
            <text:p>30905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24.3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44.14">
            <text:p>654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460.87">
            <text:p>6460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6644">
            <text:p>0,397</text:p>
          </table:table-cell>
          <table:table-cell table:style-name="ce12N2" office:value-type="float" office:value="58.2">
            <text:p>5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4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52.83">
            <text:p>5452,83</text:p>
          </table:table-cell>
          <table:table-cell table:style-name="ce12N2" office:value-type="float" office:value="5.45">
            <text:p>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07">
            <text:p>49,07</text:p>
          </table:table-cell>
          <table:table-cell table:style-name="ce12N2" office:value-type="float" office:value="62.65">
            <text:p>62,6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83.27">
            <text:p>83,27</text:p>
          </table:table-cell>
          <table:table-cell table:style-name="ce12N2" office:value-type="float" office:value="6460.87">
            <text:p>6460,87</text:p>
          </table:table-cell>
          <table:table-cell table:style-name="ce12N2" office:value-type="float" office:value="452.26">
            <text:p>45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2437013327872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7">
            <text:p>309057</text:p>
          </table:table-cell>
          <table:table-cell table:style-name="ce0" table:number-columns-spanned="4" table:number-rows-spanned="1" office:value-type="string" calcext:value-type="string">
            <text:p>691 - CARDAL ELETRO METALURGICA LTDA</text:p>
          </table:table-cell>
          <table:covered-table-cell table:number-columns-repeated="3"/>
          <table:table-cell table:style-name="ce0" office:value-type="string" calcext:value-type="string">
            <text:p>168.9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113.09">
            <text:p>2711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993.88">
            <text:p>2399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992">
            <text:p>0,122</text:p>
          </table:table-cell>
          <table:table-cell table:style-name="ce12N2" office:value-type="float" office:value="46.8">
            <text:p>4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11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50.24">
            <text:p>20250,24</text:p>
          </table:table-cell>
          <table:table-cell table:style-name="ce12N2" office:value-type="float" office:value="20.25">
            <text:p>2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25">
            <text:p>182,2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119.21">
            <text:p>3119,21</text:p>
          </table:table-cell>
          <table:table-cell table:style-name="ce12N2" office:value-type="float" office:value="23993.88">
            <text:p>23993,88</text:p>
          </table:table-cell>
          <table:table-cell table:style-name="ce12N2" office:value-type="float" office:value="1679.57">
            <text:p>167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35628590001055500100016892919916892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9">
            <text:p>30905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5.51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1344">
            <text:p>0,421</text:p>
          </table:table-cell>
          <table:table-cell table:style-name="ce12N2" office:value-type="float" office:value="57.02">
            <text:p>57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67.64">
            <text:p>3367,64</text:p>
          </table:table-cell>
          <table:table-cell table:style-name="ce12N2" office:value-type="float" office:value="3.37">
            <text:p>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3">
            <text:p>30,3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253.48">
            <text:p>25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7238370001725500000069551013417034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5">
            <text:p>30906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85.27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7.98">
            <text:p>688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334">
            <text:p>633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17">
            <text:p>0,582</text:p>
          </table:table-cell>
          <table:table-cell table:style-name="ce12N2" office:value-type="float" office:value="50.7">
            <text:p>5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7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45.78">
            <text:p>5345,78</text:p>
          </table:table-cell>
          <table:table-cell table:style-name="ce12N2" office:value-type="float" office:value="5.35">
            <text:p>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11">
            <text:p>48,1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53.98">
            <text:p>553,98</text:p>
          </table:table-cell>
          <table:table-cell table:style-name="ce12N2" office:value-type="float" office:value="6334">
            <text:p>6334,00</text:p>
          </table:table-cell>
          <table:table-cell table:style-name="ce12N2" office:value-type="float" office:value="443.38">
            <text:p>44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5890658000300550030000852771397943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8">
            <text:p>2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65">
            <text:p>7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436.61">
            <text:p>13436,61</text:p>
          </table:table-cell>
          <table:table-cell table:style-name="ce26N2" office:value-type="float" office:value="771223.41">
            <text:p>771223,41</text:p>
          </table:table-cell>
          <table:table-cell table:style-name="ce26N2" office:value-type="float" office:value="52629.13">
            <text:p>52629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84670.02">
            <text:p>784670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8.985967">
            <text:p>28,986</text:p>
          </table:table-cell>
          <table:table-cell table:style-name="ce26N2" office:value-type="float" office:value="770468.41">
            <text:p>770468,41</text:p>
          </table:table-cell>
          <table:table-cell table:style-name="ce26N2" office:value-type="float" office:value="784670.02">
            <text:p>784670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45898.99">
            <text:p>645898,99</text:p>
          </table:table-cell>
          <table:table-cell table:style-name="ce26N2" office:value-type="float" office:value="645.97">
            <text:p>645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813.01">
            <text:p>5813,0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9981.6">
            <text:p>9981,6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0.24">
            <text:p>80,2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10" meta:object-count="0"/>
    <meta:generator>LibreOffice/4.3.0.4$Windows_x86 LibreOffice_project/62ad5818884a2fc2e5780dd45466868d41009ec0</meta:generator>
  </office:meta>
</office:document-meta>
</file>