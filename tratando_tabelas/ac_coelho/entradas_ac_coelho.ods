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0/07/2026 07:42:27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3">
            <text:p>30995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4.7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26.66">
            <text:p>103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678">
            <text:p>0,370</text:p>
          </table:table-cell>
          <table:table-cell table:style-name="ce12N2" office:value-type="float" office:value="54.21">
            <text:p>5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2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96.48">
            <text:p>8596,48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38">
            <text:p>77,38</text:p>
          </table:table-cell>
          <table:table-cell table:style-name="ce12N2" office:value-type="float" office:value="62.62">
            <text:p>6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0.92">
            <text:p>140,92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713.01">
            <text:p>7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347281645483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1">
            <text:p>3100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51207343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4">
            <text:p>31017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22" office:value-type="string" calcext:value-type="string">
            <text:p>ADM</text:p>
          </table:table-cell>
          <table:table-cell table:style-name="ce12N2" office:value-type="float" office:value="308.29">
            <text:p>30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2.6">
            <text:p>22,6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16.23">
            <text:p>1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9.51">
            <text:p>389,51</text:p>
          </table:table-cell>
          <table:table-cell table:style-name="ce12N2" office:value-type="float" office:value="53.89">
            <text:p>53,8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62651002662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3">
            <text:p>3102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5">
            <text:p>0,144</text:p>
          </table:table-cell>
          <table:table-cell table:style-name="ce12N2" office:value-type="float" office:value="24.78">
            <text:p>24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8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37.53">
            <text:p>5137,53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.24">
            <text:p>46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426.11">
            <text:p>42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57139710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2">
            <text:p>31025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815972433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4">
            <text:p>31025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016821478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4">
            <text:p>3102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09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5.8">
            <text:p>1695,80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6">
            <text:p>15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140.65">
            <text:p>14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096111780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9">
            <text:p>31030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811882279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0">
            <text:p>3103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40.94">
            <text:p>4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931570578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0">
            <text:p>3103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64">
            <text:p>0,012</text:p>
          </table:table-cell>
          <table:table-cell table:style-name="ce12N2" office:value-type="float" office:value="10.98">
            <text:p>1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24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39.48">
            <text:p>13439,48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96">
            <text:p>120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1114.68">
            <text:p>111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5931986830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4">
            <text:p>31032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1.73">
            <text:p>39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05">
            <text:p>3505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7.6">
            <text:p>3127,60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5">
            <text:p>28,15</text:p>
          </table:table-cell>
          <table:table-cell table:style-name="ce12N2" office:value-type="float" office:value="41.7">
            <text:p>41,7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41.73">
            <text:p>341,73</text:p>
          </table:table-cell>
          <table:table-cell table:style-name="ce12N2" office:value-type="float" office:value="3590">
            <text:p>3590,00</text:p>
          </table:table-cell>
          <table:table-cell table:style-name="ce12N2" office:value-type="float" office:value="143.6">
            <text:p>14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1111795254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7">
            <text:p>310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1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4.91">
            <text:p>178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553">
            <text:p>0,010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84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2.1">
            <text:p>1472,10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25">
            <text:p>13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.67">
            <text:p>40,67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122.09">
            <text:p>12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1841233645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8">
            <text:p>310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4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6.76">
            <text:p>512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2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62.78">
            <text:p>4062,78</text:p>
          </table:table-cell>
          <table:table-cell table:style-name="ce12N2" office:value-type="float" office:value="4.06">
            <text:p>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57">
            <text:p>3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2.9">
            <text:p>312,9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336.97">
            <text:p>33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4741481861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0">
            <text:p>31033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4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0.95">
            <text:p>97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3.6">
            <text:p>8513,60</text:p>
          </table:table-cell>
          <table:table-cell table:style-name="ce12N2" office:value-type="float" office:value="510.29">
            <text:p>510,29</text:p>
          </table:table-cell>
          <table:table-cell table:style-name="ce12N3" office:value-type="float" office:value="0.587396">
            <text:p>0,587</text:p>
          </table:table-cell>
          <table:table-cell table:style-name="ce12N2" office:value-type="float" office:value="90.81">
            <text:p>9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0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3.97">
            <text:p>7723,97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737.06">
            <text:p>737,06</text:p>
          </table:table-cell>
          <table:table-cell table:style-name="ce12N2" office:value-type="float" office:value="9023.89">
            <text:p>9023,89</text:p>
          </table:table-cell>
          <table:table-cell table:style-name="ce12N2" office:value-type="float" office:value="512.63">
            <text:p>51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4821394054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8">
            <text:p>310358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6.72">
            <text:p>615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482.94">
            <text:p>548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6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63.51">
            <text:p>5063,51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58">
            <text:p>45,58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673.78">
            <text:p>673,78</text:p>
          </table:table-cell>
          <table:table-cell table:style-name="ce12N2" office:value-type="float" office:value="5482.94">
            <text:p>5482,94</text:p>
          </table:table-cell>
          <table:table-cell table:style-name="ce12N2" office:value-type="float" office:value="219.31">
            <text:p>21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2401202658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5">
            <text:p>310365</text:p>
          </table:table-cell>
          <table:table-cell table:style-name="ce0" table:number-columns-spanned="4" table:number-rows-spanned="1" office:value-type="string" calcext:value-type="string">
            <text:p>32.977 - COMFORT DOOR IMPORTACAO E DISTRIBUICAO DE UTILIDADES</text:p>
          </table:table-cell>
          <table:covered-table-cell table:number-columns-repeated="3"/>
          <table:table-cell table:style-name="ce0" office:value-type="string" calcext:value-type="string">
            <text:p>22.07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0.03">
            <text:p>37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375">
            <text:p>0,854</text:p>
          </table:table-cell>
          <table:table-cell table:style-name="ce12N2" office:value-type="float" office:value="15.79">
            <text:p>15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3.03">
            <text:p>3263,03</text:p>
          </table:table-cell>
          <table:table-cell table:style-name="ce12N2" office:value-type="float" office:value="3.26">
            <text:p>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37">
            <text:p>29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25.03">
            <text:p>125,03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228.36">
            <text:p>22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84554530001785500400002207613466370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7">
            <text:p>3103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2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02">
            <text:p>0,022</text:p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14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65.24">
            <text:p>12165,24</text:p>
          </table:table-cell>
          <table:table-cell table:style-name="ce12N2" office:value-type="float" office:value="12.17">
            <text:p>1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49">
            <text:p>109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1009">
            <text:p>10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24313758644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2">
            <text:p>3103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6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.86">
            <text:p>2456,86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11">
            <text:p>22,1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203.77">
            <text:p>20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66511293957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3">
            <text:p>3103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66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27">
            <text:p>0,075</text:p>
          </table:table-cell>
          <table:table-cell table:style-name="ce12N2" office:value-type="float" office:value="10.34">
            <text:p>10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1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84.8">
            <text:p>3384,80</text:p>
          </table:table-cell>
          <table:table-cell table:style-name="ce12N2" office:value-type="float" office:value="3.38">
            <text:p>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46">
            <text:p>30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280.74">
            <text:p>28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6681753214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8">
            <text:p>310418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6.60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13.9">
            <text:p>1591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4905.19">
            <text:p>1490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52">
            <text:p>0,042</text:p>
          </table:table-cell>
          <table:table-cell table:style-name="ce12N2" office:value-type="float" office:value="27.8">
            <text:p>2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1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85.4">
            <text:p>12985,40</text:p>
          </table:table-cell>
          <table:table-cell table:style-name="ce12N2" office:value-type="float" office:value="12.99">
            <text:p>1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.87">
            <text:p>116,87</text:p>
          </table:table-cell>
          <table:table-cell table:style-name="ce12N2" office:value-type="float" office:value="72.15">
            <text:p>72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008.71">
            <text:p>1008,71</text:p>
          </table:table-cell>
          <table:table-cell table:style-name="ce12N2" office:value-type="float" office:value="14905.19">
            <text:p>14905,19</text:p>
          </table:table-cell>
          <table:table-cell table:style-name="ce12N2" office:value-type="float" office:value="596.21">
            <text:p>59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66091489590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3">
            <text:p>310423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6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06">
            <text:p>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0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93.05">
            <text:p>1393,05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54">
            <text:p>12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115.54">
            <text:p>11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7037392000180550030000106871130136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5">
            <text:p>3104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3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38">
            <text:p>0,005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0.06">
            <text:p>1300,06</text:p>
          </table:table-cell>
          <table:table-cell table:style-name="ce12N2" office:value-type="float" office:value="1.3">
            <text:p>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7">
            <text:p>11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107.83">
            <text:p>10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3501745782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4">
            <text:p>3104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9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.38">
            <text:p>408,38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68">
            <text:p>3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33.87">
            <text:p>3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9541651900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3">
            <text:p>31047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3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37.97">
            <text:p>6403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9304">
            <text:p>0,499</text:p>
          </table:table-cell>
          <table:table-cell table:style-name="ce12N2" office:value-type="float" office:value="410.5">
            <text:p>4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03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901.42">
            <text:p>52901,42</text:p>
          </table:table-cell>
          <table:table-cell table:style-name="ce12N2" office:value-type="float" office:value="52.9">
            <text:p>5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6.1">
            <text:p>476,10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863.05">
            <text:p>1863,05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3881.36">
            <text:p>388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137771912698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2">
            <text:p>3104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97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24">
            <text:p>0,001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1.82">
            <text:p>381,82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4">
            <text:p>3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31.67">
            <text:p>3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9721198719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6">
            <text:p>3104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3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64">
            <text:p>0,047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2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8.88">
            <text:p>3478,88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1">
            <text:p>31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288.54">
            <text:p>28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3521803914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8">
            <text:p>3104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43.24">
            <text:p>33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38">
            <text:p>32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32.79">
            <text:p>2732,79</text:p>
          </table:table-cell>
          <table:table-cell table:style-name="ce12N2" office:value-type="float" office:value="2.73">
            <text:p>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6">
            <text:p>24,6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05.24">
            <text:p>105,24</text:p>
          </table:table-cell>
          <table:table-cell table:style-name="ce12N2" office:value-type="float" office:value="3238">
            <text:p>3238,00</text:p>
          </table:table-cell>
          <table:table-cell table:style-name="ce12N2" office:value-type="float" office:value="226.66">
            <text:p>2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7316776191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6">
            <text:p>31053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3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90.11">
            <text:p>469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304.02">
            <text:p>430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04">
            <text:p>0,001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9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49.68">
            <text:p>3749,68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75">
            <text:p>33,75</text:p>
          </table:table-cell>
          <table:table-cell table:style-name="ce12N2" office:value-type="float" office:value="53.69">
            <text:p>53,6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386.09">
            <text:p>386,09</text:p>
          </table:table-cell>
          <table:table-cell table:style-name="ce12N2" office:value-type="float" office:value="4304.02">
            <text:p>4304,02</text:p>
          </table:table-cell>
          <table:table-cell table:style-name="ce12N2" office:value-type="float" office:value="172.16">
            <text:p>1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32661401032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0">
            <text:p>31054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665">
            <text:p>1,487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44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20.21">
            <text:p>56920,2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2.28">
            <text:p>512,28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4721.01">
            <text:p>472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31754562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1">
            <text:p>31054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16.24">
            <text:p>167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3">
            <text:p>0,153</text:p>
          </table:table-cell>
          <table:table-cell table:style-name="ce12N2" office:value-type="float" office:value="57.2">
            <text:p>5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7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4.36">
            <text:p>13674,36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07">
            <text:p>123,0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020.24">
            <text:p>1020,24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627.84">
            <text:p>62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41209589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4">
            <text:p>3105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0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816">
            <text:p>0,075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75.58">
            <text:p>4775,58</text:p>
          </table:table-cell>
          <table:table-cell table:style-name="ce12N2" office:value-type="float" office:value="4.78">
            <text:p>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98">
            <text:p>42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396.09">
            <text:p>3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0761883841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5">
            <text:p>310675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0.3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4.8">
            <text:p>12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4.8">
            <text:p>12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12">
            <text:p>0,08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3.7">
            <text:p>1033,70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4.8">
            <text:p>1224,80</text:p>
          </table:table-cell>
          <table:table-cell table:style-name="ce12N2" office:value-type="float" office:value="85.74">
            <text:p>8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03761473783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2">
            <text:p>310682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912">
            <text:p>0,367</text:p>
          </table:table-cell>
          <table:table-cell table:style-name="ce12N2" office:value-type="float" office:value="28.08">
            <text:p>28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7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9.4">
            <text:p>1839,40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5">
            <text:p>16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152.56">
            <text:p>15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41177117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3">
            <text:p>310683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912">
            <text:p>0,367</text:p>
          </table:table-cell>
          <table:table-cell table:style-name="ce12N2" office:value-type="float" office:value="28.08">
            <text:p>28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7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9.4">
            <text:p>1839,40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5">
            <text:p>16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152.56">
            <text:p>15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514516377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4">
            <text:p>31068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756">
            <text:p>0,370</text:p>
          </table:table-cell>
          <table:table-cell table:style-name="ce12N2" office:value-type="float" office:value="28.79">
            <text:p>28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70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82.44">
            <text:p>3182,44</text:p>
          </table:table-cell>
          <table:table-cell table:style-name="ce12N2" office:value-type="float" office:value="3.18">
            <text:p>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64">
            <text:p>28,6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263.96">
            <text:p>26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61770174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5">
            <text:p>310685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61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58.64">
            <text:p>12458,64</text:p>
          </table:table-cell>
          <table:table-cell table:style-name="ce12N2" office:value-type="float" office:value="12.46">
            <text:p>1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.13">
            <text:p>112,1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1033.33">
            <text:p>103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71306853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3">
            <text:p>3107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0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4.35">
            <text:p>1004,35</text:p>
          </table:table-cell>
          <table:table-cell table:style-name="ce12N2" office:value-type="float" office:value="102.5">
            <text:p>102,50</text:p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.65">
            <text:p>847,65</text:p>
          </table:table-cell>
          <table:table-cell table:style-name="ce12N2" office:value-type="float" office:value="0.85">
            <text:p>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3">
            <text:p>7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77.48">
            <text:p>7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04015839266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6">
            <text:p>4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97.79">
            <text:p>697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520.26">
            <text:p>13520,26</text:p>
          </table:table-cell>
          <table:table-cell table:style-name="ce26N2" office:value-type="float" office:value="646624.66">
            <text:p>646624,66</text:p>
          </table:table-cell>
          <table:table-cell table:style-name="ce26N2" office:value-type="float" office:value="43031.71">
            <text:p>43031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60208.81">
            <text:p>660208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9.51">
            <text:p>389,51</text:p>
          </table:table-cell>
          <table:table-cell table:style-name="ce26N2" office:value-type="float" office:value="53.89">
            <text:p>53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7.031858">
            <text:p>17,032</text:p>
          </table:table-cell>
          <table:table-cell table:style-name="ce26N2" office:value-type="float" office:value="645936.87">
            <text:p>645936,87</text:p>
          </table:table-cell>
          <table:table-cell table:style-name="ce26N2" office:value-type="float" office:value="660208.81">
            <text:p>660208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47203.8">
            <text:p>547203,80</text:p>
          </table:table-cell>
          <table:table-cell table:style-name="ce26N2" office:value-type="float" office:value="547.21">
            <text:p>547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924.86">
            <text:p>4924,8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955.88">
            <text:p>3955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6.26">
            <text:p>76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98" meta:object-count="0"/>
    <meta:generator>LibreOffice/4.3.0.4$Windows_x86 LibreOffice_project/62ad5818884a2fc2e5780dd45466868d41009ec0</meta:generator>
  </office:meta>
</office:document-meta>
</file>