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2">
            <text:p>310682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41177117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3">
            <text:p>310683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51451637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4">
            <text:p>31068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756">
            <text:p>0,370</text:p>
          </table:table-cell>
          <table:table-cell table:style-name="ce12N2" office:value-type="float" office:value="28.79">
            <text:p>28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2.44">
            <text:p>3182,44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4">
            <text:p>28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263.96">
            <text:p>2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6177017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5">
            <text:p>31068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58.64">
            <text:p>12458,64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3">
            <text:p>112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1033.33">
            <text:p>10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71306853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8">
            <text:p>31080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2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37.79">
            <text:p>1563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95">
            <text:p>1,399</text:p>
          </table:table-cell>
          <table:table-cell table:style-name="ce12N2" office:value-type="float" office:value="104.6">
            <text:p>10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37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56.72">
            <text:p>12356,72</text:p>
          </table:table-cell>
          <table:table-cell table:style-name="ce12N2" office:value-type="float" office:value="12.37">
            <text:p>1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22">
            <text:p>111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96.79">
            <text:p>996,79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1024.87">
            <text:p>102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2601273772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9">
            <text:p>310809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3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0.15">
            <text:p>84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71">
            <text:p>6912,71</text:p>
          </table:table-cell>
          <table:table-cell table:style-name="ce12N2" office:value-type="float" office:value="6.92">
            <text:p>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3">
            <text:p>62,2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45.59">
            <text:p>545,59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317.4">
            <text:p>31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3411101530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3">
            <text:p>310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64.69">
            <text:p>6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611777004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9">
            <text:p>310819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0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5.38">
            <text:p>29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70728">
            <text:p>21,707</text:p>
          </table:table-cell>
          <table:table-cell table:style-name="ce12N2" office:value-type="float" office:value="19.59">
            <text:p>19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6.77">
            <text:p>2496,77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7">
            <text:p>22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195.05">
            <text:p>1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0781769416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4">
            <text:p>310824</text:p>
          </table:table-cell>
          <table:table-cell table:style-name="ce0" table:number-columns-spanned="4" table:number-rows-spanned="1" office:value-type="string" calcext:value-type="string">
            <text:p>39.105 - ALLTAPE INDUSTRIA E COMERCIO DE FITAS ADESIVAS LTDA</text:p>
          </table:table-cell>
          <table:covered-table-cell table:number-columns-repeated="3"/>
          <table:table-cell table:style-name="ce0" office:value-type="string" calcext:value-type="string">
            <text:p>232.1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1.3">
            <text:p>733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0.46">
            <text:p>5490,4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41">
            <text:p>49,4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5.82">
            <text:p>825,82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455.38">
            <text:p>45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25020400017955001000232100137824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9">
            <text:p>31092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50.8">
            <text:p>2305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732">
            <text:p>0,135</text:p>
          </table:table-cell>
          <table:table-cell table:style-name="ce12N2" office:value-type="float" office:value="29.26">
            <text:p>2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5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16.99">
            <text:p>18316,99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87">
            <text:p>164,87</text:p>
          </table:table-cell>
          <table:table-cell table:style-name="ce12N2" office:value-type="float" office:value="80.08">
            <text:p>80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25.78">
            <text:p>2025,78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841.01">
            <text:p>84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5910578772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0">
            <text:p>3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2.79">
            <text:p>612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781.57">
            <text:p>13781,57</text:p>
          </table:table-cell>
          <table:table-cell table:style-name="ce26N2" office:value-type="float" office:value="556554.79">
            <text:p>556554,79</text:p>
          </table:table-cell>
          <table:table-cell table:style-name="ce26N2" office:value-type="float" office:value="37040.02">
            <text:p>37040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0400.25">
            <text:p>570400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8.18728">
            <text:p>38,187</text:p>
          </table:table-cell>
          <table:table-cell table:style-name="ce26N2" office:value-type="float" office:value="555952">
            <text:p>555952,00</text:p>
          </table:table-cell>
          <table:table-cell table:style-name="ce26N2" office:value-type="float" office:value="570400.25">
            <text:p>570400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4037.23">
            <text:p>474037,23</text:p>
          </table:table-cell>
          <table:table-cell table:style-name="ce26N2" office:value-type="float" office:value="474.05">
            <text:p>474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66.32">
            <text:p>4266,3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322.86">
            <text:p>4322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.31">
            <text:p>79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42" meta:object-count="0"/>
    <meta:generator>LibreOffice/4.3.0.4$Windows_x86 LibreOffice_project/62ad5818884a2fc2e5780dd45466868d41009ec0</meta:generator>
  </office:meta>
</office:document-meta>
</file>