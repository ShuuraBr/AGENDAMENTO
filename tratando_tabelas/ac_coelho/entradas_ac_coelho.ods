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2/05/2026 05:30:31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69">
            <text:p>306769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1.32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2.28">
            <text:p>50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12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5">
            <text:p>40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45.28">
            <text:p>445,28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319.68">
            <text:p>3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616460000152550020000713281306751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20">
            <text:p>30702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6.3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2272">
            <text:p>0,142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122.98">
            <text:p>12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631917554164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3">
            <text:p>30713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7.1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5.79">
            <text:p>426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4131">
            <text:p>0,484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6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42.91">
            <text:p>42,91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281.12">
            <text:p>28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717316183353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1">
            <text:p>3071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112007302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3">
            <text:p>3071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819917936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4">
            <text:p>3071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21347149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1">
            <text:p>3072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205.07">
            <text:p>20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216618409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5">
            <text:p>30723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61140036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2">
            <text:p>3072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72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32">
            <text:p>0,008</text:p>
          </table:table-cell>
          <table:table-cell table:style-name="ce12N2" office:value-type="float" office:value="1.9">
            <text:p>1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87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132.09">
            <text:p>13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7251174884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5">
            <text:p>307265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2.49">
            <text:p>370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37.49">
            <text:p>3437,49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2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2.49">
            <text:p>3702,49</text:p>
          </table:table-cell>
          <table:table-cell table:style-name="ce12N2" office:value-type="float" office:value="259.17">
            <text:p>25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27254297000178550010000105531584622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8">
            <text:p>307278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7.1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09.55">
            <text:p>2970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29280.46">
            <text:p>29280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9578">
            <text:p>0,696</text:p>
          </table:table-cell>
          <table:table-cell table:style-name="ce12N2" office:value-type="float" office:value="130.96">
            <text:p>13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70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429.09">
            <text:p>429,09</text:p>
          </table:table-cell>
          <table:table-cell table:style-name="ce12N2" office:value-type="float" office:value="29280.46">
            <text:p>29280,46</text:p>
          </table:table-cell>
          <table:table-cell table:style-name="ce12N2" office:value-type="float" office:value="1794.18">
            <text:p>179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714415821550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0">
            <text:p>3073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78.63">
            <text:p>7078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46.6">
            <text:p>664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25">
            <text:p>0,043</text:p>
          </table:table-cell>
          <table:table-cell table:style-name="ce12N2" office:value-type="float" office:value="9.6">
            <text:p>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78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432.03">
            <text:p>432,03</text:p>
          </table:table-cell>
          <table:table-cell table:style-name="ce12N2" office:value-type="float" office:value="6646.6">
            <text:p>6646,60</text:p>
          </table:table-cell>
          <table:table-cell table:style-name="ce12N2" office:value-type="float" office:value="465.26">
            <text:p>465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451885129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4">
            <text:p>3073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2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904">
            <text:p>0,030</text:p>
          </table:table-cell>
          <table:table-cell table:style-name="ce12N2" office:value-type="float" office:value="6.84">
            <text:p>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6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347.47">
            <text:p>34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2151526143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6">
            <text:p>3073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04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147.28">
            <text:p>14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8413178758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67">
            <text:p>307367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2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1.17">
            <text:p>567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538.68">
            <text:p>553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4926">
            <text:p>0,315</text:p>
          </table:table-cell>
          <table:table-cell table:style-name="ce12N2" office:value-type="float" office:value="33.19">
            <text:p>33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7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35">
            <text:p>55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32.49">
            <text:p>132,49</text:p>
          </table:table-cell>
          <table:table-cell table:style-name="ce12N2" office:value-type="float" office:value="4787.31">
            <text:p>4787,31</text:p>
          </table:table-cell>
          <table:table-cell table:style-name="ce12N2" office:value-type="float" office:value="258.23">
            <text:p>25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29171646262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69">
            <text:p>307369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7.2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5.13">
            <text:p>182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67.68">
            <text:p>1767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844">
            <text:p>0,026</text:p>
          </table:table-cell>
          <table:table-cell table:style-name="ce12N2" office:value-type="float" office:value="6.79">
            <text:p>6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2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57.45">
            <text:p>57,45</text:p>
          </table:table-cell>
          <table:table-cell table:style-name="ce12N2" office:value-type="float" office:value="1767.68">
            <text:p>1767,68</text:p>
          </table:table-cell>
          <table:table-cell table:style-name="ce12N2" office:value-type="float" office:value="110.47">
            <text:p>11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72241503823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6">
            <text:p>30737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1.03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.53">
            <text:p>49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.53">
            <text:p>499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07">
            <text:p>0,001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9.53">
            <text:p>499,53</text:p>
          </table:table-cell>
          <table:table-cell table:style-name="ce12N2" office:value-type="float" office:value="34.97">
            <text:p>3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10311154255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6">
            <text:p>3073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68">
            <text:p>0,002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19.26">
            <text:p>1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717366362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4">
            <text:p>3074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7.3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3.2">
            <text:p>178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624.79">
            <text:p>1624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8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58.41">
            <text:p>158,41</text:p>
          </table:table-cell>
          <table:table-cell table:style-name="ce12N2" office:value-type="float" office:value="1624.79">
            <text:p>1624,79</text:p>
          </table:table-cell>
          <table:table-cell table:style-name="ce12N2" office:value-type="float" office:value="65.04">
            <text:p>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6.5">
            <text:p>8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8.941</text:p>
          </table:table-cell>
          <table:table-cell table:style-name="ce0" office:value-type="string" calcext:value-type="string">
            <text:p>38.647 - ACCERT TRANSPORTES E LOGISTICA LTDA</text:p>
          </table:table-cell>
          <table:table-cell table:style-name="ce0" office:value-type="string" calcext:value-type="string">
            <text:p>14/05/2026</text:p>
          </table:table-cell>
          <table:table-cell table:style-name="ce12" office:value-type="string" calcext:value-type="string">
            <text:p>86,50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9260529244900000247550010000673361492026159</text:p>
          </table:table-cell>
          <table:table-cell table:style-name="ce0" office:value-type="string" calcext:value-type="string">
            <text:p>2926050522209200106957001000038941100664763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8">
            <text:p>30742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8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5.04">
            <text:p>78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85.04">
            <text:p>785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96">
            <text:p>0,067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5.04">
            <text:p>785,04</text:p>
          </table:table-cell>
          <table:table-cell table:style-name="ce12N2" office:value-type="float" office:value="54.95">
            <text:p>54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82617173575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3">
            <text:p>3074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48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0.61">
            <text:p>104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7.1">
            <text:p>97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40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63.51">
            <text:p>63,51</text:p>
          </table:table-cell>
          <table:table-cell table:style-name="ce12N2" office:value-type="float" office:value="977.1">
            <text:p>977,10</text:p>
          </table:table-cell>
          <table:table-cell table:style-name="ce12N2" office:value-type="float" office:value="68.4">
            <text:p>6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48715470222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9">
            <text:p>30743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8.06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576">
            <text:p>0,296</text:p>
          </table:table-cell>
          <table:table-cell table:style-name="ce12N2" office:value-type="float" office:value="31.68">
            <text:p>3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01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149.08">
            <text:p>14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880631168529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3">
            <text:p>307443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.13">
            <text:p>447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3.06">
            <text:p>433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9">
            <text:p>0,022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7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4.07">
            <text:p>14,07</text:p>
          </table:table-cell>
          <table:table-cell table:style-name="ce12N2" office:value-type="float" office:value="433.06">
            <text:p>433,06</text:p>
          </table:table-cell>
          <table:table-cell table:style-name="ce12N2" office:value-type="float" office:value="30.31">
            <text:p>3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6141954082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4">
            <text:p>307444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6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71.51">
            <text:p>2467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23273.18">
            <text:p>2327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54421">
            <text:p>3,544</text:p>
          </table:table-cell>
          <table:table-cell table:style-name="ce12N2" office:value-type="float" office:value="399.29">
            <text:p>39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671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398.33">
            <text:p>1398,33</text:p>
          </table:table-cell>
          <table:table-cell table:style-name="ce12N2" office:value-type="float" office:value="23273.18">
            <text:p>23273,18</text:p>
          </table:table-cell>
          <table:table-cell table:style-name="ce12N2" office:value-type="float" office:value="1629.14">
            <text:p>162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6201881086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2">
            <text:p>307462</text:p>
          </table:table-cell>
          <table:table-cell table:style-name="ce0" table:number-columns-spanned="4" table:number-rows-spanned="1" office:value-type="string" calcext:value-type="string">
            <text:p>29.238 - EURO METAIS IMPORTACAO E EXPORTACAO LTDA</text:p>
          </table:table-cell>
          <table:covered-table-cell table:number-columns-repeated="3"/>
          <table:table-cell table:style-name="ce0" office:value-type="string" calcext:value-type="string">
            <text:p>66.5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9.81">
            <text:p>31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1.4">
            <text:p>29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46">
            <text:p>0,002</text:p>
          </table:table-cell>
          <table:table-cell table:style-name="ce12N2" office:value-type="float" office:value="0.53">
            <text:p>0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8.41">
            <text:p>28,41</text:p>
          </table:table-cell>
          <table:table-cell table:style-name="ce12N2" office:value-type="float" office:value="291.4">
            <text:p>291,40</text:p>
          </table:table-cell>
          <table:table-cell table:style-name="ce12N2" office:value-type="float" office:value="11.65">
            <text:p>1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510317038000146550010000665871272565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5">
            <text:p>307465</text:p>
          </table:table-cell>
          <table:table-cell table:style-name="ce0" table:number-columns-spanned="4" table:number-rows-spanned="1" office:value-type="string" calcext:value-type="string">
            <text:p>22.015 - FOCO METALLO FABRICACAO E MONTAGEM DE LUMINARIAS E COMERCIO</text:p>
          </table:table-cell>
          <table:covered-table-cell table:number-columns-repeated="3"/>
          <table:table-cell table:style-name="ce0" office:value-type="string" calcext:value-type="string">
            <text:p>23.3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0.3">
            <text:p>114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39">
            <text:p>103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79">
            <text:p>0,0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01.3">
            <text:p>101,30</text:p>
          </table:table-cell>
          <table:table-cell table:style-name="ce12N2" office:value-type="float" office:value="1039">
            <text:p>1039,00</text:p>
          </table:table-cell>
          <table:table-cell table:style-name="ce12N2" office:value-type="float" office:value="72.73">
            <text:p>7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2.33">
            <text:p>24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7.724.082</text:p>
          </table:table-cell>
          <table:table-cell table:style-name="ce0" office:value-type="string" calcext:value-type="string">
            <text:p>17.618 - ALFA TRANSPORTES EIRELI</text:p>
          </table:table-cell>
          <table:table-cell table:style-name="ce0" office:value-type="string" calcext:value-type="string">
            <text:p>14/05/2026</text:p>
          </table:table-cell>
          <table:table-cell table:style-name="ce12" office:value-type="string" calcext:value-type="string">
            <text:p>242,33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42260522670837000180550010000233691542222518</text:p>
          </table:table-cell>
          <table:table-cell table:style-name="ce0" office:value-type="string" calcext:value-type="string">
            <text:p>4226058211081800012157000007724082109034863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1">
            <text:p>307471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45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54">
            <text:p>0,165</text:p>
          </table:table-cell>
          <table:table-cell table:style-name="ce12N2" office:value-type="float" office:value="25.2">
            <text:p>2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895.2">
            <text:p>89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2296669000169550030000014561732534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39">
            <text:p>307539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6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3.65">
            <text:p>272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23.65">
            <text:p>2723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85">
            <text:p>0,004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3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.33">
            <text:p>6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3.65">
            <text:p>2723,65</text:p>
          </table:table-cell>
          <table:table-cell table:style-name="ce12N2" office:value-type="float" office:value="108.95">
            <text:p>10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05104359000122550010000046771737179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2">
            <text:p>3075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51937497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8">
            <text:p>3075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31939175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9">
            <text:p>3075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4142536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6">
            <text:p>3075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3.1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62.82">
            <text:p>236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62.82">
            <text:p>236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24">
            <text:p>0,001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6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62.82">
            <text:p>2362,8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31411980070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8">
            <text:p>307598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4.2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6.29">
            <text:p>152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25">
            <text:p>1478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5">
            <text:p>0,002</text:p>
          </table:table-cell>
          <table:table-cell table:style-name="ce12N2" office:value-type="float" office:value="0.05">
            <text:p>0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6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48.04">
            <text:p>48,04</text:p>
          </table:table-cell>
          <table:table-cell table:style-name="ce12N2" office:value-type="float" office:value="1478.25">
            <text:p>1478,25</text:p>
          </table:table-cell>
          <table:table-cell table:style-name="ce12N2" office:value-type="float" office:value="103.48">
            <text:p>10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42611312671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1">
            <text:p>3076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3.9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2.18">
            <text:p>301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28.34">
            <text:p>282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216">
            <text:p>0,009</text:p>
          </table:table-cell>
          <table:table-cell table:style-name="ce12N2" office:value-type="float" office:value="2.96">
            <text:p>2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12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83.84">
            <text:p>183,84</text:p>
          </table:table-cell>
          <table:table-cell table:style-name="ce12N2" office:value-type="float" office:value="2828.34">
            <text:p>2828,34</text:p>
          </table:table-cell>
          <table:table-cell table:style-name="ce12N2" office:value-type="float" office:value="197.98">
            <text:p>19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39891906994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3">
            <text:p>307613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8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9.49">
            <text:p>594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20.95">
            <text:p>5420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49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528.54">
            <text:p>528,54</text:p>
          </table:table-cell>
          <table:table-cell table:style-name="ce12N2" office:value-type="float" office:value="5420.95">
            <text:p>5420,95</text:p>
          </table:table-cell>
          <table:table-cell table:style-name="ce12N2" office:value-type="float" office:value="216.84">
            <text:p>21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2091324000204550030000068451624550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4">
            <text:p>30761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1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6.45">
            <text:p>193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92.35">
            <text:p>1792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4.98">
            <text:p>1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36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44.1">
            <text:p>144,10</text:p>
          </table:table-cell>
          <table:table-cell table:style-name="ce12N2" office:value-type="float" office:value="1792.35">
            <text:p>1792,35</text:p>
          </table:table-cell>
          <table:table-cell table:style-name="ce12N2" office:value-type="float" office:value="111.31">
            <text:p>11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1816670359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7">
            <text:p>30761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.89">
            <text:p>45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36.7">
            <text:p>43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5">
            <text:p>0,003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0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4.19">
            <text:p>14,19</text:p>
          </table:table-cell>
          <table:table-cell table:style-name="ce12N2" office:value-type="float" office:value="436.7">
            <text:p>436,70</text:p>
          </table:table-cell>
          <table:table-cell table:style-name="ce12N2" office:value-type="float" office:value="30.57">
            <text:p>3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0916531283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3">
            <text:p>307633</text:p>
          </table:table-cell>
          <table:table-cell table:style-name="ce0" table:number-columns-spanned="4" table:number-rows-spanned="1" office:value-type="string" calcext:value-type="string">
            <text:p>13.356 - H. IMPORTS IMPORTACAO E EXPORTACAO EIRELI-EPP</text:p>
          </table:table-cell>
          <table:covered-table-cell table:number-columns-repeated="3"/>
          <table:table-cell table:style-name="ce0" office:value-type="string" calcext:value-type="string">
            <text:p>51.7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98.04">
            <text:p>239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85">
            <text:p>218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9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13.04">
            <text:p>213,04</text:p>
          </table:table-cell>
          <table:table-cell table:style-name="ce12N2" office:value-type="float" office:value="2185">
            <text:p>2185,00</text:p>
          </table:table-cell>
          <table:table-cell table:style-name="ce12N2" office:value-type="float" office:value="87.4">
            <text:p>8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2091324000115550010000517391644084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9">
            <text:p>307639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11.2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39.72">
            <text:p>323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39.72">
            <text:p>323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0659">
            <text:p>3,107</text:p>
          </table:table-cell>
          <table:table-cell table:style-name="ce12N2" office:value-type="float" office:value="30.71">
            <text:p>3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3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39.72">
            <text:p>3239,72</text:p>
          </table:table-cell>
          <table:table-cell table:style-name="ce12N2" office:value-type="float" office:value="211.61">
            <text:p>21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00142240000120550010007112461929672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2">
            <text:p>307652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1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147.58">
            <text:p>28147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8147.58">
            <text:p>28147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6796">
            <text:p>3,068</text:p>
          </table:table-cell>
          <table:table-cell table:style-name="ce12N2" office:value-type="float" office:value="550.35">
            <text:p>55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147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">
            <text:p>5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47.58">
            <text:p>28147,58</text:p>
          </table:table-cell>
          <table:table-cell table:style-name="ce12N2" office:value-type="float" office:value="1970.33">
            <text:p>197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65014000162550010000461591344097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0">
            <text:p>30767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3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4636">
            <text:p>5,346</text:p>
          </table:table-cell>
          <table:table-cell table:style-name="ce12N2" office:value-type="float" office:value="70.96">
            <text:p>7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4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2269.68">
            <text:p>226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3811553217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1">
            <text:p>307671</text:p>
          </table:table-cell>
          <table:table-cell table:style-name="ce0" table:number-columns-spanned="4" table:number-rows-spanned="1" office:value-type="string" calcext:value-type="string">
            <text:p>790 - JACKWAL S/A</text:p>
          </table:table-cell>
          <table:covered-table-cell table:number-columns-repeated="3"/>
          <table:table-cell table:style-name="ce0" office:value-type="string" calcext:value-type="string">
            <text:p>275.51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75.04">
            <text:p>817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795.49">
            <text:p>7795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416">
            <text:p>0,064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7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379.55">
            <text:p>379,55</text:p>
          </table:table-cell>
          <table:table-cell table:style-name="ce12N2" office:value-type="float" office:value="7795.49">
            <text:p>7795,49</text:p>
          </table:table-cell>
          <table:table-cell table:style-name="ce12N2" office:value-type="float" office:value="486.36">
            <text:p>48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2782366000188550030002755111221903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2">
            <text:p>307672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1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731.4">
            <text:p>11673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16731.4">
            <text:p>1167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7106">
            <text:p>13,711</text:p>
          </table:table-cell>
          <table:table-cell table:style-name="ce12N2" office:value-type="float" office:value="2125.05">
            <text:p>2125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6.73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">
            <text:p>5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731.4">
            <text:p>116731,40</text:p>
          </table:table-cell>
          <table:table-cell table:style-name="ce12N2" office:value-type="float" office:value="8171.19">
            <text:p>817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65014000162550010000461611478984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3">
            <text:p>307673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1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48.8">
            <text:p>1004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48.8">
            <text:p>1004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34">
            <text:p>1,134</text:p>
          </table:table-cell>
          <table:table-cell table:style-name="ce12N2" office:value-type="float" office:value="230">
            <text:p>2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4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">
            <text:p>5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48.8">
            <text:p>10048,80</text:p>
          </table:table-cell>
          <table:table-cell table:style-name="ce12N2" office:value-type="float" office:value="703.42">
            <text:p>70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650140001625500100004616014484648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6">
            <text:p>30767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6.1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5.93">
            <text:p>322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29.04">
            <text:p>3029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48">
            <text:p>0,003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5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96.89">
            <text:p>196,89</text:p>
          </table:table-cell>
          <table:table-cell table:style-name="ce12N2" office:value-type="float" office:value="3029.04">
            <text:p>3029,04</text:p>
          </table:table-cell>
          <table:table-cell table:style-name="ce12N2" office:value-type="float" office:value="212.03">
            <text:p>21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61821645484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7">
            <text:p>3076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6.2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3.62">
            <text:p>354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">
            <text:p>0,003</text:p>
          </table:table-cell>
          <table:table-cell table:style-name="ce12N2" office:value-type="float" office:value="0.2">
            <text:p>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43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16.28">
            <text:p>216,28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232.91">
            <text:p>2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623710245680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83">
            <text:p>307683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66.48">
            <text:p>1606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066.48">
            <text:p>1606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876">
            <text:p>1,588</text:p>
          </table:table-cell>
          <table:table-cell table:style-name="ce12N2" office:value-type="float" office:value="312">
            <text:p>3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66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">
            <text:p>5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66.48">
            <text:p>16066,48</text:p>
          </table:table-cell>
          <table:table-cell table:style-name="ce12N2" office:value-type="float" office:value="1124.66">
            <text:p>112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650140001625500100004615816111122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48">
            <text:p>4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65">
            <text:p>26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227.75">
            <text:p>5227,75</text:p>
          </table:table-cell>
          <table:table-cell table:style-name="ce26N2" office:value-type="float" office:value="350702.02">
            <text:p>350702,02</text:p>
          </table:table-cell>
          <table:table-cell table:style-name="ce26N2" office:value-type="float" office:value="23989.13">
            <text:p>23989,1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28.83">
            <text:p>328,83</text:p>
          </table:table-cell>
          <table:table-cell table:style-name="ce26N2" office:value-type="float" office:value="356681.14">
            <text:p>356681,1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3.927302">
            <text:p>33,927</text:p>
          </table:table-cell>
          <table:table-cell table:style-name="ce26N2" office:value-type="float" office:value="351188.39">
            <text:p>351188,39</text:p>
          </table:table-cell>
          <table:table-cell table:style-name="ce26N2" office:value-type="float" office:value="356681.14">
            <text:p>356681,1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108.8">
            <text:p>4108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8.56">
            <text:p>48,5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26" meta:object-count="0"/>
    <meta:generator>LibreOffice/4.3.0.4$Windows_x86 LibreOffice_project/62ad5818884a2fc2e5780dd45466868d41009ec0</meta:generator>
  </office:meta>
</office:document-meta>
</file>