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1/05/2026 07:42:26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8">
            <text:p>30671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4.17">
            <text:p>1326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026">
            <text:p>1,050</text:p>
          </table:table-cell>
          <table:table-cell table:style-name="ce12N2" office:value-type="float" office:value="92.08">
            <text:p>9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864.86">
            <text:p>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2414056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4">
            <text:p>306754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41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6.37">
            <text:p>780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">
            <text:p>0,003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06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2">
            <text:p>57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97.87">
            <text:p>697,87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284.34">
            <text:p>2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4151168111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1">
            <text:p>306771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66541471008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6">
            <text:p>30680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8.53">
            <text:p>2990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7.32">
            <text:p>3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0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905.85">
            <text:p>1905,85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1120.05">
            <text:p>112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881358185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6">
            <text:p>306816</text:p>
          </table:table-cell>
          <table:table-cell table:style-name="ce0" table:number-columns-spanned="4" table:number-rows-spanned="1" office:value-type="string" calcext:value-type="string">
            <text:p>38.321 - S&amp;P BRASIL VENTILACAO LTDA.</text:p>
          </table:table-cell>
          <table:covered-table-cell table:number-columns-repeated="3"/>
          <table:table-cell table:style-name="ce0" office:value-type="string" calcext:value-type="string">
            <text:p>35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316.05">
            <text:p>3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2659507000412550010000355511160008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6">
            <text:p>30682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0.44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1.62">
            <text:p>453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978">
            <text:p>0,181</text:p>
          </table:table-cell>
          <table:table-cell table:style-name="ce12N2" office:value-type="float" office:value="29.27">
            <text:p>2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183">
            <text:p>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0441120048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0">
            <text:p>3068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1.19">
            <text:p>18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21">
            <text:p>0,226</text:p>
          </table:table-cell>
          <table:table-cell table:style-name="ce12N2" office:value-type="float" office:value="7.52">
            <text:p>7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1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8.59">
            <text:p>58,59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21845374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9">
            <text:p>3068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4.7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">
            <text:p>0,051</text:p>
          </table:table-cell>
          <table:table-cell table:style-name="ce12N2" office:value-type="float" office:value="54.16">
            <text:p>5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0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03.8">
            <text:p>19103,80</text:p>
          </table:table-cell>
          <table:table-cell table:style-name="ce12N2" office:value-type="float" office:value="1337.27">
            <text:p>133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4749120240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4">
            <text:p>30689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8.38">
            <text:p>1651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973.46">
            <text:p>14973,4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11534">
            <text:p>0,012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1459.92">
            <text:p>1459,92</text:p>
          </table:table-cell>
          <table:table-cell table:style-name="ce12N2" office:value-type="float" office:value="15058.46">
            <text:p>15058,46</text:p>
          </table:table-cell>
          <table:table-cell table:style-name="ce12N2" office:value-type="float" office:value="602.33">
            <text:p>6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5931234036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5">
            <text:p>3069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6.0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60711913994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63">
            <text:p>63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9959.34">
            <text:p>19959,34</text:p>
          </table:table-cell>
          <table:table-cell table:style-name="ce26N2" office:value-type="float" office:value="503218.96">
            <text:p>503218,96</text:p>
          </table:table-cell>
          <table:table-cell table:style-name="ce26N2" office:value-type="float" office:value="31158.78">
            <text:p>31158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5403.71">
            <text:p>555403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7.578879">
            <text:p>17,579</text:p>
          </table:table-cell>
          <table:table-cell table:style-name="ce26N2" office:value-type="float" office:value="535419.47">
            <text:p>535419,47</text:p>
          </table:table-cell>
          <table:table-cell table:style-name="ce26N2" office:value-type="float" office:value="555403.71">
            <text:p>555403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11.32">
            <text:p>1811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12">
            <text:p>50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56" meta:object-count="0"/>
    <meta:generator>LibreOffice/4.3.0.4$Windows_x86 LibreOffice_project/62ad5818884a2fc2e5780dd45466868d41009ec0</meta:generator>
  </office:meta>
</office:document-meta>
</file>