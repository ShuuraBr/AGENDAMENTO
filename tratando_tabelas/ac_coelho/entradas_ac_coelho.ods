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8/05/2026 07:30:5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1">
            <text:p>3068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3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4.01">
            <text:p>2643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642">
            <text:p>0,476</text:p>
          </table:table-cell>
          <table:table-cell table:style-name="ce12N2" office:value-type="float" office:value="56.65">
            <text:p>56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434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50.97">
            <text:p>650,97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1265.66">
            <text:p>126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30371035091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5">
            <text:p>3069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6.0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60711913994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4">
            <text:p>307044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78">
            <text:p>0,092</text:p>
          </table:table-cell>
          <table:table-cell table:style-name="ce12N2" office:value-type="float" office:value="14.15">
            <text:p>1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53.26">
            <text:p>5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31502859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5">
            <text:p>3070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88">
            <text:p>0,017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53.29">
            <text:p>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2111394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6">
            <text:p>307046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9.24">
            <text:p>3954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6406.48">
            <text:p>36406,48</text:p>
          </table:table-cell>
          <table:table-cell table:style-name="ce12N2" office:value-type="float" office:value="1877.94">
            <text:p>1877,94</text:p>
          </table:table-cell>
          <table:table-cell table:style-name="ce12N3" office:value-type="float" office:value="2.71203">
            <text:p>2,712</text:p>
          </table:table-cell>
          <table:table-cell table:style-name="ce12N2" office:value-type="float" office:value="520.9">
            <text:p>52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549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264.82">
            <text:p>1264,82</text:p>
          </table:table-cell>
          <table:table-cell table:style-name="ce12N2" office:value-type="float" office:value="38284.42">
            <text:p>38284,42</text:p>
          </table:table-cell>
          <table:table-cell table:style-name="ce12N2" office:value-type="float" office:value="2330.38">
            <text:p>233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11668968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2">
            <text:p>30706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092.8">
            <text:p>940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3172">
            <text:p>931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2527">
            <text:p>2,123</text:p>
          </table:table-cell>
          <table:table-cell table:style-name="ce12N2" office:value-type="float" office:value="493.99">
            <text:p>493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.09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0.8">
            <text:p>920,80</text:p>
          </table:table-cell>
          <table:table-cell table:style-name="ce12N2" office:value-type="float" office:value="92335.42">
            <text:p>92335,42</text:p>
          </table:table-cell>
          <table:table-cell table:style-name="ce12N2" office:value-type="float" office:value="5743.16">
            <text:p>574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112286539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3">
            <text:p>307073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1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4.72">
            <text:p>783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10.39">
            <text:p>310,39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526.7">
            <text:p>5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1961654432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2">
            <text:p>3071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2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6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1453.28">
            <text:p>145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2551066202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6">
            <text:p>30714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62.15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6.22">
            <text:p>416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1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460.73">
            <text:p>46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36522300015455002000662150136481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9">
            <text:p>3071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3.35">
            <text:p>1603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65">
            <text:p>0,053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3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6.35">
            <text:p>76,35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106.89">
            <text:p>10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04150077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1">
            <text:p>3071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7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78417509298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2">
            <text:p>3071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5.87">
            <text:p>11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1">
            <text:p>0,035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6.47">
            <text:p>56,47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79.06">
            <text:p>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711611450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1">
            <text:p>3071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11200730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3">
            <text:p>307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81991793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4">
            <text:p>307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21347149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1">
            <text:p>30718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">
            <text:p>7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1190309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3">
            <text:p>30718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5.18">
            <text:p>1269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8">
            <text:p>0,070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9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9.58">
            <text:p>759,58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614.43">
            <text:p>61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4711551624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1">
            <text:p>307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21661840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5">
            <text:p>307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61140036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2">
            <text:p>3072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7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32">
            <text:p>0,008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132.09">
            <text:p>1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7251174884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5">
            <text:p>307265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7.49">
            <text:p>3437,49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259.17">
            <text:p>25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531584622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8">
            <text:p>3072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1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09.55">
            <text:p>2970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578">
            <text:p>0,696</text:p>
          </table:table-cell>
          <table:table-cell table:style-name="ce12N2" office:value-type="float" office:value="130.96">
            <text:p>13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70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429.09">
            <text:p>429,09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1794.18">
            <text:p>179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14415821550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7">
            <text:p>307297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0.2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4.33">
            <text:p>331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10">
            <text:p>32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14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04.33">
            <text:p>104,33</text:p>
          </table:table-cell>
          <table:table-cell table:style-name="ce12N2" office:value-type="float" office:value="3210">
            <text:p>3210,00</text:p>
          </table:table-cell>
          <table:table-cell table:style-name="ce12N2" office:value-type="float" office:value="224.7">
            <text:p>22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718726000135550010002002511236212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0">
            <text:p>307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78.63">
            <text:p>707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5">
            <text:p>0,043</text:p>
          </table:table-cell>
          <table:table-cell table:style-name="ce12N2" office:value-type="float" office:value="9.6">
            <text:p>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7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432.03">
            <text:p>432,03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465.26">
            <text:p>4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45188512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4">
            <text:p>307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347.47">
            <text:p>34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2151526143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6">
            <text:p>3073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147.28">
            <text:p>14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841317875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7">
            <text:p>30736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1.17">
            <text:p>567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538.68">
            <text:p>553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926">
            <text:p>0,315</text:p>
          </table:table-cell>
          <table:table-cell table:style-name="ce12N2" office:value-type="float" office:value="33.19">
            <text:p>33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35">
            <text:p>55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32.49">
            <text:p>132,49</text:p>
          </table:table-cell>
          <table:table-cell table:style-name="ce12N2" office:value-type="float" office:value="4787.31">
            <text:p>4787,31</text:p>
          </table:table-cell>
          <table:table-cell table:style-name="ce12N2" office:value-type="float" office:value="258.23">
            <text:p>25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17164626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9">
            <text:p>30736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5.13">
            <text:p>182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44">
            <text:p>0,026</text:p>
          </table:table-cell>
          <table:table-cell table:style-name="ce12N2" office:value-type="float" office:value="6.79">
            <text:p>6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57.45">
            <text:p>57,45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110.47">
            <text:p>11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2241503823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2">
            <text:p>307372</text:p>
          </table:table-cell>
          <table:table-cell table:style-name="ce0" table:number-columns-spanned="4" table:number-rows-spanned="1" office:value-type="string" calcext:value-type="string">
            <text:p>30.485 - ABRILAR INDUSTRIA DE ESQUADRIAS LTDA</text:p>
          </table:table-cell>
          <table:covered-table-cell table:number-columns-repeated="3"/>
          <table:table-cell table:style-name="ce0" office:value-type="string" calcext:value-type="string">
            <text:p>47.0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289">
            <text:p>6028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0289">
            <text:p>602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625">
            <text:p>262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.28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6">
            <text:p>60,6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289">
            <text:p>60289,00</text:p>
          </table:table-cell>
          <table:table-cell table:style-name="ce12N2" office:value-type="float" office:value="4220.23">
            <text:p>422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11699630001305500100004701413354114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6">
            <text:p>3073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1.0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7">
            <text:p>0,001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34.97">
            <text:p>3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1031115425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6">
            <text:p>3073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68">
            <text:p>0,002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19.26">
            <text:p>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71736636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43">
            <text:p>4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42.94">
            <text:p>2142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747.56">
            <text:p>10747,56</text:p>
          </table:table-cell>
          <table:table-cell table:style-name="ce26N2" office:value-type="float" office:value="483288.47">
            <text:p>483288,47</text:p>
          </table:table-cell>
          <table:table-cell table:style-name="ce26N2" office:value-type="float" office:value="31529.62">
            <text:p>31529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27849.39">
            <text:p>527849,3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0.09365">
            <text:p>10,094</text:p>
          </table:table-cell>
          <table:table-cell table:style-name="ce26N2" office:value-type="float" office:value="514958.89">
            <text:p>514958,89</text:p>
          </table:table-cell>
          <table:table-cell table:style-name="ce26N2" office:value-type="float" office:value="527849.39">
            <text:p>527849,3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221.16">
            <text:p>5221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1.6">
            <text:p>61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6" meta:object-count="0"/>
    <meta:generator>LibreOffice/4.3.0.4$Windows_x86 LibreOffice_project/62ad5818884a2fc2e5780dd45466868d41009ec0</meta:generator>
  </office:meta>
</office:document-meta>
</file>