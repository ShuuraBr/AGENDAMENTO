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8">
            <text:p>31080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2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37.79">
            <text:p>1563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95">
            <text:p>1,399</text:p>
          </table:table-cell>
          <table:table-cell table:style-name="ce12N2" office:value-type="float" office:value="104.6">
            <text:p>10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37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56.72">
            <text:p>12356,72</text:p>
          </table:table-cell>
          <table:table-cell table:style-name="ce12N2" office:value-type="float" office:value="12.37">
            <text:p>1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22">
            <text:p>111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96.79">
            <text:p>996,79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1024.87">
            <text:p>102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2601273772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9">
            <text:p>310809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3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0.15">
            <text:p>84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71">
            <text:p>6912,71</text:p>
          </table:table-cell>
          <table:table-cell table:style-name="ce12N2" office:value-type="float" office:value="6.92">
            <text:p>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3">
            <text:p>62,2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45.59">
            <text:p>545,59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317.4">
            <text:p>31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3411101530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3">
            <text:p>310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64.69">
            <text:p>6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611777004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9">
            <text:p>310819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0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5.38">
            <text:p>29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70728">
            <text:p>21,707</text:p>
          </table:table-cell>
          <table:table-cell table:style-name="ce12N2" office:value-type="float" office:value="19.59">
            <text:p>19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6.77">
            <text:p>2496,77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7">
            <text:p>22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195.05">
            <text:p>1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0781769416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4">
            <text:p>310824</text:p>
          </table:table-cell>
          <table:table-cell table:style-name="ce0" table:number-columns-spanned="4" table:number-rows-spanned="1" office:value-type="string" calcext:value-type="string">
            <text:p>39.105 - ALLTAPE INDUSTRIA E COMERCIO DE FITAS ADESIVAS LTDA</text:p>
          </table:table-cell>
          <table:covered-table-cell table:number-columns-repeated="3"/>
          <table:table-cell table:style-name="ce0" office:value-type="string" calcext:value-type="string">
            <text:p>232.1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1.3">
            <text:p>733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0.46">
            <text:p>5490,4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41">
            <text:p>49,4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5.82">
            <text:p>825,82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455.38">
            <text:p>45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25020400017955001000232100137824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8">
            <text:p>310928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34">
            <text:p>49,3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87.15">
            <text:p>487,15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199.85">
            <text:p>19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0481412101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9">
            <text:p>31092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50.8">
            <text:p>2305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732">
            <text:p>0,135</text:p>
          </table:table-cell>
          <table:table-cell table:style-name="ce12N2" office:value-type="float" office:value="29.26">
            <text:p>2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5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16.99">
            <text:p>18316,99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87">
            <text:p>164,87</text:p>
          </table:table-cell>
          <table:table-cell table:style-name="ce12N2" office:value-type="float" office:value="80.08">
            <text:p>80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25.78">
            <text:p>2025,78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841.01">
            <text:p>84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5910578772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4">
            <text:p>31100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2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1.15">
            <text:p>1374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943.8">
            <text:p>129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58718">
            <text:p>10,587</text:p>
          </table:table-cell>
          <table:table-cell table:style-name="ce12N2" office:value-type="float" office:value="65.36">
            <text:p>65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1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24.21">
            <text:p>11024,21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2">
            <text:p>99,2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97.35">
            <text:p>797,35</text:p>
          </table:table-cell>
          <table:table-cell table:style-name="ce12N2" office:value-type="float" office:value="12943.8">
            <text:p>12943,80</text:p>
          </table:table-cell>
          <table:table-cell table:style-name="ce12N2" office:value-type="float" office:value="795.91">
            <text:p>7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238181622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5">
            <text:p>31100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803.4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1.92">
            <text:p>9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69.28">
            <text:p>7869,28</text:p>
          </table:table-cell>
          <table:table-cell table:style-name="ce12N2" office:value-type="float" office:value="505.39">
            <text:p>505,39</text:p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6.01">
            <text:p>7296,01</text:p>
          </table:table-cell>
          <table:table-cell table:style-name="ce12N2" office:value-type="float" office:value="7.3">
            <text:p>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6">
            <text:p>65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67.25">
            <text:p>767,25</text:p>
          </table:table-cell>
          <table:table-cell table:style-name="ce12N2" office:value-type="float" office:value="8374.67">
            <text:p>8374,67</text:p>
          </table:table-cell>
          <table:table-cell table:style-name="ce12N2" office:value-type="float" office:value="334.99">
            <text:p>33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803488160619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6">
            <text:p>31100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91.62">
            <text:p>9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6.96">
            <text:p>7926,96</text:p>
          </table:table-cell>
          <table:table-cell table:style-name="ce12N2" office:value-type="float" office:value="475.62">
            <text:p>475,62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3.29">
            <text:p>3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7.14">
            <text:p>7777,14</text:p>
          </table:table-cell>
          <table:table-cell table:style-name="ce12N2" office:value-type="float" office:value="7.78">
            <text:p>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99">
            <text:p>69,99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189.04">
            <text:p>1189,04</text:p>
          </table:table-cell>
          <table:table-cell table:style-name="ce12N2" office:value-type="float" office:value="8402.58">
            <text:p>8402,58</text:p>
          </table:table-cell>
          <table:table-cell table:style-name="ce12N2" office:value-type="float" office:value="336.1">
            <text:p>33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541535925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8">
            <text:p>31101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5.35">
            <text:p>2715,35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212.09">
            <text:p>2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806185346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0">
            <text:p>31103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6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0.96">
            <text:p>319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12">
            <text:p>0,001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9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1.51">
            <text:p>2611,51</text:p>
          </table:table-cell>
          <table:table-cell table:style-name="ce12N2" office:value-type="float" office:value="2.61">
            <text:p>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">
            <text:p>23,50</text:p>
          </table:table-cell>
          <table:table-cell table:style-name="ce12N2" office:value-type="float" office:value="41.15">
            <text:p>4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93.36">
            <text:p>193,36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119.91">
            <text:p>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6030174778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4">
            <text:p>3110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82.27">
            <text:p>66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3696">
            <text:p>1,737</text:p>
          </table:table-cell>
          <table:table-cell table:style-name="ce12N2" office:value-type="float" office:value="239.11">
            <text:p>239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8.29">
            <text:p>5268,29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40.02">
            <text:p>440,02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436.97">
            <text:p>4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01618135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6">
            <text:p>3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83.8">
            <text:p>1683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112.49">
            <text:p>18112,49</text:p>
          </table:table-cell>
          <table:table-cell table:style-name="ce26N2" office:value-type="float" office:value="697973.12">
            <text:p>697973,12</text:p>
          </table:table-cell>
          <table:table-cell table:style-name="ce26N2" office:value-type="float" office:value="46173.79">
            <text:p>46173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16095.61">
            <text:p>716095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52.676036">
            <text:p>52,676</text:p>
          </table:table-cell>
          <table:table-cell table:style-name="ce26N2" office:value-type="float" office:value="696299.32">
            <text:p>696299,32</text:p>
          </table:table-cell>
          <table:table-cell table:style-name="ce26N2" office:value-type="float" office:value="716095.61">
            <text:p>716095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4772.23">
            <text:p>594772,23</text:p>
          </table:table-cell>
          <table:table-cell table:style-name="ce26N2" office:value-type="float" office:value="594.82">
            <text:p>594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52.9">
            <text:p>5352,9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427.86">
            <text:p>5427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.33">
            <text:p>78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38" meta:object-count="0"/>
    <meta:generator>LibreOffice/4.3.0.4$Windows_x86 LibreOffice_project/62ad5818884a2fc2e5780dd45466868d41009ec0</meta:generator>
  </office:meta>
</office:document-meta>
</file>