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4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7">
            <text:p>31093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.99">
            <text:p>1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3">
            <text:p>0,001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5.86">
            <text:p>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312945343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6">
            <text:p>310996</text:p>
          </table:table-cell>
          <table:table-cell table:style-name="ce0" table:number-columns-spanned="4" table:number-rows-spanned="1" office:value-type="string" calcext:value-type="string">
            <text:p>3.404 - VENTISOL INDUSTRIA E COMERCIO LTDA</text:p>
          </table:table-cell>
          <table:covered-table-cell table:number-columns-repeated="3"/>
          <table:table-cell table:style-name="ce0" office:value-type="string" calcext:value-type="string">
            <text:p>1.255.9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54.17">
            <text:p>2495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2173">
            <text:p>2,922</text:p>
          </table:table-cell>
          <table:table-cell table:style-name="ce12N2" office:value-type="float" office:value="793.84">
            <text:p>79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5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27.77">
            <text:p>20527,77</text:p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4.76">
            <text:p>184,76</text:p>
          </table:table-cell>
          <table:table-cell table:style-name="ce12N2" office:value-type="float" office:value="63.33">
            <text:p>63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631.45">
            <text:p>631,45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1702.59">
            <text:p>170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763720000171550050012559771578262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2">
            <text:p>31100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21.3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.5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10.5">
            <text:p>72210,50</text:p>
          </table:table-cell>
          <table:table-cell table:style-name="ce12N2" office:value-type="float" office:value="72.21">
            <text:p>7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9.89">
            <text:p>649,89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5989.2">
            <text:p>59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21313101963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1">
            <text:p>311031</text:p>
          </table:table-cell>
          <table:table-cell table:style-name="ce0" table:number-columns-spanned="4" table:number-rows-spanned="1" office:value-type="string" calcext:value-type="string">
            <text:p>9.588 - STARLUX COMERCIO E REPRESENTACOES LTDA</text:p>
          </table:table-cell>
          <table:covered-table-cell table:number-columns-repeated="3"/>
          <table:table-cell table:style-name="ce0" office:value-type="string" calcext:value-type="string">
            <text:p>28.89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83">
            <text:p>227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0">
            <text:p>1980,00</text:p>
          </table:table-cell>
          <table:table-cell table:style-name="ce12N2" office:value-type="float" office:value="90">
            <text:p>9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1.64">
            <text:p>1911,64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2">
            <text:p>17,20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201.83">
            <text:p>201,83</text:p>
          </table:table-cell>
          <table:table-cell table:style-name="ce12N2" office:value-type="float" office:value="2070">
            <text:p>2070,00</text:p>
          </table:table-cell>
          <table:table-cell table:style-name="ce12N2" office:value-type="float" office:value="82.8">
            <text:p>8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8870880001785500300002889111615433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8">
            <text:p>3110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68">
            <text:p>0,058</text:p>
          </table:table-cell>
          <table:table-cell table:style-name="ce12N2" office:value-type="float" office:value="12.14">
            <text:p>1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20.36">
            <text:p>2120,36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8">
            <text:p>19,08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175.87">
            <text:p>1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751062330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9">
            <text:p>311039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8.64">
            <text:p>821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266">
            <text:p>0,288</text:p>
          </table:table-cell>
          <table:table-cell table:style-name="ce12N2" office:value-type="float" office:value="45.46">
            <text:p>45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3.9">
            <text:p>6823,90</text:p>
          </table:table-cell>
          <table:table-cell table:style-name="ce12N2" office:value-type="float" office:value="6.82">
            <text:p>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2">
            <text:p>61,42</text:p>
          </table:table-cell>
          <table:table-cell table:style-name="ce12N2" office:value-type="float" office:value="62.55">
            <text:p>62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33.22">
            <text:p>133,22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565.98">
            <text:p>56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631135082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1">
            <text:p>31116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4.81">
            <text:p>529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971.64">
            <text:p>497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8278">
            <text:p>0,458</text:p>
          </table:table-cell>
          <table:table-cell table:style-name="ce12N2" office:value-type="float" office:value="15.72">
            <text:p>1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31.28">
            <text:p>4331,28</text:p>
          </table:table-cell>
          <table:table-cell table:style-name="ce12N2" office:value-type="float" office:value="4.33">
            <text:p>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98">
            <text:p>38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23.17">
            <text:p>323,17</text:p>
          </table:table-cell>
          <table:table-cell table:style-name="ce12N2" office:value-type="float" office:value="4971.64">
            <text:p>4971,64</text:p>
          </table:table-cell>
          <table:table-cell table:style-name="ce12N2" office:value-type="float" office:value="198.87">
            <text:p>19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31042143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3">
            <text:p>311173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43.97">
            <text:p>3474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2616.6">
            <text:p>3261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448">
            <text:p>0,404</text:p>
          </table:table-cell>
          <table:table-cell table:style-name="ce12N2" office:value-type="float" office:value="700.5">
            <text:p>70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743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15.58">
            <text:p>28415,58</text:p>
          </table:table-cell>
          <table:table-cell table:style-name="ce12N2" office:value-type="float" office:value="28.42">
            <text:p>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74">
            <text:p>255,74</text:p>
          </table:table-cell>
          <table:table-cell table:style-name="ce12N2" office:value-type="float" office:value="72.24">
            <text:p>72,2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127.37">
            <text:p>2127,37</text:p>
          </table:table-cell>
          <table:table-cell table:style-name="ce12N2" office:value-type="float" office:value="32616.6">
            <text:p>32616,60</text:p>
          </table:table-cell>
          <table:table-cell table:style-name="ce12N2" office:value-type="float" office:value="1304.66">
            <text:p>130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2818413868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5">
            <text:p>31117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2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6.36">
            <text:p>19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37">
            <text:p>173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3.28">
            <text:p>1513,28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2">
            <text:p>13,6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9.36">
            <text:p>169,36</text:p>
          </table:table-cell>
          <table:table-cell table:style-name="ce12N2" office:value-type="float" office:value="1737">
            <text:p>1737,00</text:p>
          </table:table-cell>
          <table:table-cell table:style-name="ce12N2" office:value-type="float" office:value="69.48">
            <text:p>6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2712729386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3">
            <text:p>3112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1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5.68">
            <text:p>341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15.56">
            <text:p>331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784">
            <text:p>0,118</text:p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1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8.24">
            <text:p>2798,24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18">
            <text:p>25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3315.56">
            <text:p>3315,56</text:p>
          </table:table-cell>
          <table:table-cell table:style-name="ce12N2" office:value-type="float" office:value="232.09">
            <text:p>2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1451129875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3">
            <text:p>311263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5.64">
            <text:p>133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54.12">
            <text:p>125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5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0.63">
            <text:p>1160,63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1.52">
            <text:p>81,52</text:p>
          </table:table-cell>
          <table:table-cell table:style-name="ce12N2" office:value-type="float" office:value="1335.64">
            <text:p>1335,64</text:p>
          </table:table-cell>
          <table:table-cell table:style-name="ce12N2" office:value-type="float" office:value="93.49">
            <text:p>9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814590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4">
            <text:p>311264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59.73">
            <text:p>1835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17329.62">
            <text:p>173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98.34">
            <text:p>198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59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25.75">
            <text:p>14625,75</text:p>
          </table:table-cell>
          <table:table-cell table:style-name="ce12N2" office:value-type="float" office:value="14.64">
            <text:p>1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.62">
            <text:p>131,62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30.11">
            <text:p>1030,11</text:p>
          </table:table-cell>
          <table:table-cell table:style-name="ce12N2" office:value-type="float" office:value="17329.62">
            <text:p>17329,62</text:p>
          </table:table-cell>
          <table:table-cell table:style-name="ce12N2" office:value-type="float" office:value="1213.05">
            <text:p>121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71114393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1">
            <text:p>311271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7.56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26.64">
            <text:p>1192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867.1">
            <text:p>1086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92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51.63">
            <text:p>10051,63</text:p>
          </table:table-cell>
          <table:table-cell table:style-name="ce12N2" office:value-type="float" office:value="10.05">
            <text:p>1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6">
            <text:p>90,46</text:p>
          </table:table-cell>
          <table:table-cell table:style-name="ce12N2" office:value-type="float" office:value="100">
            <text:p>10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59.54">
            <text:p>1059,54</text:p>
          </table:table-cell>
          <table:table-cell table:style-name="ce12N2" office:value-type="float" office:value="10867.1">
            <text:p>10867,10</text:p>
          </table:table-cell>
          <table:table-cell table:style-name="ce12N2" office:value-type="float" office:value="434.68">
            <text:p>43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20913240002045500300000756615543504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5">
            <text:p>311275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7.56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.79">
            <text:p>25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3.06">
            <text:p>23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2.73">
            <text:p>22,73</text:p>
          </table:table-cell>
          <table:table-cell table:style-name="ce12N2" office:value-type="float" office:value="233.06">
            <text:p>233,06</text:p>
          </table:table-cell>
          <table:table-cell table:style-name="ce12N2" office:value-type="float" office:value="9.32">
            <text:p>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2091324000204550030000075671405064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09">
            <text:p>311309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24.51">
            <text:p>3912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696.07">
            <text:p>37696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6088">
            <text:p>3,061</text:p>
          </table:table-cell>
          <table:table-cell table:style-name="ce12N2" office:value-type="float" office:value="595.1">
            <text:p>59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12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40.81">
            <text:p>32840,81</text:p>
          </table:table-cell>
          <table:table-cell table:style-name="ce12N2" office:value-type="float" office:value="32.84">
            <text:p>3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.56">
            <text:p>295,56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428.44">
            <text:p>1428,44</text:p>
          </table:table-cell>
          <table:table-cell table:style-name="ce12N2" office:value-type="float" office:value="37696.07">
            <text:p>37696,07</text:p>
          </table:table-cell>
          <table:table-cell table:style-name="ce12N2" office:value-type="float" office:value="1507.84">
            <text:p>150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0441066129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3">
            <text:p>31133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26.0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82">
            <text:p>4578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82">
            <text:p>4578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7">
            <text:p>0,166</text:p>
          </table:table-cell>
          <table:table-cell table:style-name="ce12N2" office:value-type="float" office:value="212.8">
            <text:p>21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78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38.87">
            <text:p>38638,87</text:p>
          </table:table-cell>
          <table:table-cell table:style-name="ce12N2" office:value-type="float" office:value="38.64">
            <text:p>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7.75">
            <text:p>347,75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82">
            <text:p>45782,00</text:p>
          </table:table-cell>
          <table:table-cell table:style-name="ce12N2" office:value-type="float" office:value="3204.74">
            <text:p>320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260231560625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6">
            <text:p>3113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1.6">
            <text:p>13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31.6">
            <text:p>13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761">
            <text:p>0,228</text:p>
          </table:table-cell>
          <table:table-cell table:style-name="ce12N2" office:value-type="float" office:value="94.12">
            <text:p>94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3.83">
            <text:p>1123,83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1.6">
            <text:p>1331,60</text:p>
          </table:table-cell>
          <table:table-cell table:style-name="ce12N2" office:value-type="float" office:value="93.21">
            <text:p>9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41444512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9">
            <text:p>31133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4.5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1.66">
            <text:p>13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1.66">
            <text:p>132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5.44">
            <text:p>1115,44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4">
            <text:p>10,0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1.66">
            <text:p>1321,66</text:p>
          </table:table-cell>
          <table:table-cell table:style-name="ce12N2" office:value-type="float" office:value="92.52">
            <text:p>9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45001253830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2">
            <text:p>31134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39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3.73">
            <text:p>136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.8">
            <text:p>132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">
            <text:p>0,000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3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0.68">
            <text:p>1150,68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6">
            <text:p>10,3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42.93">
            <text:p>42,93</text:p>
          </table:table-cell>
          <table:table-cell table:style-name="ce12N2" office:value-type="float" office:value="1320.8">
            <text:p>1320,80</text:p>
          </table:table-cell>
          <table:table-cell table:style-name="ce12N2" office:value-type="float" office:value="52.83">
            <text:p>5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39313664600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9">
            <text:p>31134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5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0.74">
            <text:p>177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5">
            <text:p>171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">
            <text:p>0,02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0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4.1">
            <text:p>1494,10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5">
            <text:p>13,4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55.74">
            <text:p>55,74</text:p>
          </table:table-cell>
          <table:table-cell table:style-name="ce12N2" office:value-type="float" office:value="1715">
            <text:p>1715,00</text:p>
          </table:table-cell>
          <table:table-cell table:style-name="ce12N2" office:value-type="float" office:value="68.6">
            <text:p>6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5516746661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0">
            <text:p>3113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.91">
            <text:p>98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1">
            <text:p>9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">
            <text:p>0,01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.52">
            <text:p>828,5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46">
            <text:p>7,4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0.91">
            <text:p>30,91</text:p>
          </table:table-cell>
          <table:table-cell table:style-name="ce12N2" office:value-type="float" office:value="951">
            <text:p>951,00</text:p>
          </table:table-cell>
          <table:table-cell table:style-name="ce12N2" office:value-type="float" office:value="38.04">
            <text:p>3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561940277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5">
            <text:p>311355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517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21.74">
            <text:p>3262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621.74">
            <text:p>3262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889">
            <text:p>5,689</text:p>
          </table:table-cell>
          <table:table-cell table:style-name="ce12N2" office:value-type="float" office:value="3959.37">
            <text:p>3959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62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531.94">
            <text:p>27531,94</text:p>
          </table:table-cell>
          <table:table-cell table:style-name="ce12N2" office:value-type="float" office:value="27.53">
            <text:p>2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78">
            <text:p>247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621.74">
            <text:p>32621,74</text:p>
          </table:table-cell>
          <table:table-cell table:style-name="ce12N2" office:value-type="float" office:value="2283.52">
            <text:p>228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517110637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87">
            <text:p>311387</text:p>
          </table:table-cell>
          <table:table-cell table:style-name="ce0" table:number-columns-spanned="4" table:number-rows-spanned="1" office:value-type="string" calcext:value-type="string">
            <text:p>4.376 - ZAGONEL S.A.</text:p>
          </table:table-cell>
          <table:covered-table-cell table:number-columns-repeated="3"/>
          <table:table-cell table:style-name="ce0" office:value-type="string" calcext:value-type="string">
            <text:p>708.30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36.4">
            <text:p>4043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9922.26">
            <text:p>39922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01744">
            <text:p>1,4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43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93.38">
            <text:p>33693,38</text:p>
          </table:table-cell>
          <table:table-cell table:style-name="ce12N2" office:value-type="float" office:value="33.73">
            <text:p>3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3.26">
            <text:p>303,26</text:p>
          </table:table-cell>
          <table:table-cell table:style-name="ce12N2" office:value-type="float" office:value="55.64">
            <text:p>55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514.14">
            <text:p>514,14</text:p>
          </table:table-cell>
          <table:table-cell table:style-name="ce12N2" office:value-type="float" office:value="39922.26">
            <text:p>39922,26</text:p>
          </table:table-cell>
          <table:table-cell table:style-name="ce12N2" office:value-type="float" office:value="2794.57">
            <text:p>2794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830817164427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88">
            <text:p>311388</text:p>
          </table:table-cell>
          <table:table-cell table:style-name="ce0" table:number-columns-spanned="4" table:number-rows-spanned="1" office:value-type="string" calcext:value-type="string">
            <text:p>39.290 - MOR DISTRIBUIDORA LTDA.</text:p>
          </table:table-cell>
          <table:covered-table-cell table:number-columns-repeated="3"/>
          <table:table-cell table:style-name="ce0" office:value-type="string" calcext:value-type="string">
            <text:p>247.86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4.32">
            <text:p>512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669.08">
            <text:p>466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2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8.7">
            <text:p>4318,70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7">
            <text:p>38,87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455.24">
            <text:p>455,24</text:p>
          </table:table-cell>
          <table:table-cell table:style-name="ce12N2" office:value-type="float" office:value="4669.08">
            <text:p>4669,08</text:p>
          </table:table-cell>
          <table:table-cell table:style-name="ce12N2" office:value-type="float" office:value="186.77">
            <text:p>18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07722274000133550050002478631400127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6">
            <text:p>311396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4.1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2.9">
            <text:p>594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558.6">
            <text:p>555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42.73">
            <text:p>4842,73</text:p>
          </table:table-cell>
          <table:table-cell table:style-name="ce12N2" office:value-type="float" office:value="4.84">
            <text:p>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58">
            <text:p>43,58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384.3">
            <text:p>384,30</text:p>
          </table:table-cell>
          <table:table-cell table:style-name="ce12N2" office:value-type="float" office:value="5558.6">
            <text:p>5558,60</text:p>
          </table:table-cell>
          <table:table-cell table:style-name="ce12N2" office:value-type="float" office:value="222.34">
            <text:p>22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414613709566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7">
            <text:p>311397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4.9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6.3">
            <text:p>819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96.3">
            <text:p>819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.35">
            <text:p>7344,35</text:p>
          </table:table-cell>
          <table:table-cell table:style-name="ce12N2" office:value-type="float" office:value="7.34">
            <text:p>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1">
            <text:p>66,1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6.3">
            <text:p>8196,30</text:p>
          </table:table-cell>
          <table:table-cell table:style-name="ce12N2" office:value-type="float" office:value="573.74">
            <text:p>57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45123710000147550010000149221502977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98">
            <text:p>311398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29">
            <text:p>167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961.93">
            <text:p>15961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9816">
            <text:p>0,310</text:p>
          </table:table-cell>
          <table:table-cell table:style-name="ce12N2" office:value-type="float" office:value="137.49">
            <text:p>137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2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08.98">
            <text:p>13708,98</text:p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38">
            <text:p>123,3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767.07">
            <text:p>767,07</text:p>
          </table:table-cell>
          <table:table-cell table:style-name="ce12N2" office:value-type="float" office:value="15961.93">
            <text:p>15961,93</text:p>
          </table:table-cell>
          <table:table-cell table:style-name="ce12N2" office:value-type="float" office:value="806.32">
            <text:p>80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35410864095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22">
            <text:p>311422</text:p>
          </table:table-cell>
          <table:table-cell table:style-name="ce0" table:number-columns-spanned="4" table:number-rows-spanned="1" office:value-type="string" calcext:value-type="string">
            <text:p>4.376 - ZAGONEL S.A.</text:p>
          </table:table-cell>
          <table:covered-table-cell table:number-columns-repeated="3"/>
          <table:table-cell table:style-name="ce0" office:value-type="string" calcext:value-type="string">
            <text:p>710.24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96.7">
            <text:p>2069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96.7">
            <text:p>2069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9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67.5">
            <text:p>17467,50</text:p>
          </table:table-cell>
          <table:table-cell table:style-name="ce12N2" office:value-type="float" office:value="17.47">
            <text:p>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.21">
            <text:p>157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96.7">
            <text:p>20696,70</text:p>
          </table:table-cell>
          <table:table-cell table:style-name="ce12N2" office:value-type="float" office:value="1448.77">
            <text:p>144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102481337114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23">
            <text:p>311423</text:p>
          </table:table-cell>
          <table:table-cell table:style-name="ce0" table:number-columns-spanned="4" table:number-rows-spanned="1" office:value-type="string" calcext:value-type="string">
            <text:p>4.376 - ZAGONEL S.A.</text:p>
          </table:table-cell>
          <table:covered-table-cell table:number-columns-repeated="3"/>
          <table:table-cell table:style-name="ce0" office:value-type="string" calcext:value-type="string">
            <text:p>710.24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07.24">
            <text:p>740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07.24">
            <text:p>740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0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51.53">
            <text:p>6251,53</text:p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26">
            <text:p>56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07.24">
            <text:p>7407,24</text:p>
          </table:table-cell>
          <table:table-cell table:style-name="ce12N2" office:value-type="float" office:value="518.51">
            <text:p>51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1024913760546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37">
            <text:p>311437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8.8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5.62">
            <text:p>450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05.36">
            <text:p>410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2">
            <text:p>0,006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0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05.36">
            <text:p>4105,36</text:p>
          </table:table-cell>
          <table:table-cell table:style-name="ce12N2" office:value-type="float" office:value="4.1">
            <text:p>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95">
            <text:p>36,95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400.26">
            <text:p>400,26</text:p>
          </table:table-cell>
          <table:table-cell table:style-name="ce12N2" office:value-type="float" office:value="4105.36">
            <text:p>4105,36</text:p>
          </table:table-cell>
          <table:table-cell table:style-name="ce12N2" office:value-type="float" office:value="287.37">
            <text:p>28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2960800014455001000268895100268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78">
            <text:p>31147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26.9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918.12">
            <text:p>9391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3408">
            <text:p>934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5">
            <text:p>0,076</text:p>
          </table:table-cell>
          <table:table-cell table:style-name="ce12N2" office:value-type="float" office:value="28.6">
            <text:p>2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.91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47.68">
            <text:p>79047,68</text:p>
          </table:table-cell>
          <table:table-cell table:style-name="ce12N2" office:value-type="float" office:value="79.05">
            <text:p>7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1.42">
            <text:p>711,42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510.12">
            <text:p>510,12</text:p>
          </table:table-cell>
          <table:table-cell table:style-name="ce12N2" office:value-type="float" office:value="93408">
            <text:p>93408,00</text:p>
          </table:table-cell>
          <table:table-cell table:style-name="ce12N2" office:value-type="float" office:value="6303.12">
            <text:p>63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2693315119373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81">
            <text:p>311481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9.3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1.33">
            <text:p>347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162.95">
            <text:p>316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71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1.33">
            <text:p>3471,33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5">
            <text:p>31,25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308.38">
            <text:p>308,38</text:p>
          </table:table-cell>
          <table:table-cell table:style-name="ce12N2" office:value-type="float" office:value="3162.95">
            <text:p>3162,95</text:p>
          </table:table-cell>
          <table:table-cell table:style-name="ce12N2" office:value-type="float" office:value="126.52">
            <text:p>12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9383179235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85">
            <text:p>31148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4.5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8.95">
            <text:p>29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.4">
            <text:p>27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.32">
            <text:p>237,32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26.55">
            <text:p>26,55</text:p>
          </table:table-cell>
          <table:table-cell table:style-name="ce12N2" office:value-type="float" office:value="272.4">
            <text:p>272,40</text:p>
          </table:table-cell>
          <table:table-cell table:style-name="ce12N2" office:value-type="float" office:value="10.9">
            <text:p>1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456011180462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86">
            <text:p>311486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94.5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8.95">
            <text:p>29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.4">
            <text:p>27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.32">
            <text:p>237,32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26.55">
            <text:p>26,55</text:p>
          </table:table-cell>
          <table:table-cell table:style-name="ce12N2" office:value-type="float" office:value="272.4">
            <text:p>272,40</text:p>
          </table:table-cell>
          <table:table-cell table:style-name="ce12N2" office:value-type="float" office:value="10.9">
            <text:p>1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90658000300550030000945581656074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501">
            <text:p>311501</text:p>
          </table:table-cell>
          <table:table-cell table:style-name="ce0" table:number-columns-spanned="4" table:number-rows-spanned="1" office:value-type="string" calcext:value-type="string">
            <text:p>31.410 - SAN HO COMERCIO IMPORTACAO E EXPORTACAO LTDA</text:p>
          </table:table-cell>
          <table:covered-table-cell table:number-columns-repeated="3"/>
          <table:table-cell table:style-name="ce0" office:value-type="string" calcext:value-type="string">
            <text:p>88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24.4">
            <text:p>57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5439.83">
            <text:p>543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46">
            <text:p>0,096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2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31.6">
            <text:p>5031,60</text:p>
          </table:table-cell>
          <table:table-cell table:style-name="ce12N2" office:value-type="float" office:value="5.04">
            <text:p>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27">
            <text:p>45,2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284.57">
            <text:p>284,57</text:p>
          </table:table-cell>
          <table:table-cell table:style-name="ce12N2" office:value-type="float" office:value="5439.83">
            <text:p>5439,83</text:p>
          </table:table-cell>
          <table:table-cell table:style-name="ce12N2" office:value-type="float" office:value="217.61">
            <text:p>21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33.32">
            <text:p>13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97.883</text:p>
          </table:table-cell>
          <table:table-cell table:style-name="ce0" office:value-type="string" calcext:value-type="string">
            <text:p>30.965 - RTL ENCOMENDAS E CARGAS LTDA</text:p>
          </table:table-cell>
          <table:table-cell table:style-name="ce0" office:value-type="string" calcext:value-type="string">
            <text:p>22/07/2026</text:p>
          </table:table-cell>
          <table:table-cell table:style-name="ce12" office:value-type="string" calcext:value-type="string">
            <text:p>133,32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52260717328359000195550010000886521270099500</text:p>
          </table:table-cell>
          <table:table-cell table:style-name="ce0" office:value-type="string" calcext:value-type="string">
            <text:p>5226073160759800010557001000097883100073399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505">
            <text:p>31150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32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0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2.32">
            <text:p>507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899.81">
            <text:p>4899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0.028196">
            <text:p>120,028</text:p>
          </table:table-cell>
          <table:table-cell table:style-name="ce12N2" office:value-type="float" office:value="25.66">
            <text:p>25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7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65.77">
            <text:p>4165,77</text:p>
          </table:table-cell>
          <table:table-cell table:style-name="ce12N2" office:value-type="float" office:value="4.17">
            <text:p>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49">
            <text:p>37,4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172.51">
            <text:p>172,51</text:p>
          </table:table-cell>
          <table:table-cell table:style-name="ce12N2" office:value-type="float" office:value="4899.81">
            <text:p>4899,81</text:p>
          </table:table-cell>
          <table:table-cell table:style-name="ce12N2" office:value-type="float" office:value="309.43">
            <text:p>30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320491570520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2">
            <text:p>4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0">
            <text:p>9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270.09">
            <text:p>12270,09</text:p>
          </table:table-cell>
          <table:table-cell table:style-name="ce26N2" office:value-type="float" office:value="743306.95">
            <text:p>743306,95</text:p>
          </table:table-cell>
          <table:table-cell table:style-name="ce26N2" office:value-type="float" office:value="47975.36">
            <text:p>47975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3.32">
            <text:p>133,32</text:p>
          </table:table-cell>
          <table:table-cell table:style-name="ce26N2" office:value-type="float" office:value="755505.52">
            <text:p>755505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39.362251">
            <text:p>139,362</text:p>
          </table:table-cell>
          <table:table-cell table:style-name="ce26N2" office:value-type="float" office:value="743145.43">
            <text:p>743145,43</text:p>
          </table:table-cell>
          <table:table-cell table:style-name="ce26N2" office:value-type="float" office:value="755505.52">
            <text:p>755505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34327.48">
            <text:p>634327,48</text:p>
          </table:table-cell>
          <table:table-cell table:style-name="ce26N2" office:value-type="float" office:value="634.32">
            <text:p>634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708.93">
            <text:p>5708,93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453.64">
            <text:p>8453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.45">
            <text:p>72,4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34" meta:object-count="0"/>
    <meta:generator>LibreOffice/4.3.0.4$Windows_x86 LibreOffice_project/62ad5818884a2fc2e5780dd45466868d41009ec0</meta:generator>
  </office:meta>
</office:document-meta>
</file>