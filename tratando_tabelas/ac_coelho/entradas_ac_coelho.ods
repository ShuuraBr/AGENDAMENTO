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07/07/2026 04:30:28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8308">
            <text:p>308308</text:p>
          </table:table-cell>
          <table:table-cell table:style-name="ce0" table:number-columns-spanned="4" table:number-rows-spanned="1" office:value-type="string" calcext:value-type="string">
            <text:p>30.445 - PERFIS VISCARDI LTDA</text:p>
          </table:table-cell>
          <table:covered-table-cell table:number-columns-repeated="3"/>
          <table:table-cell table:style-name="ce0" office:value-type="string" calcext:value-type="string">
            <text:p>10.3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1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145707420003295500100001035014255199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38">
            <text:p>308838</text:p>
          </table:table-cell>
          <table:table-cell table:style-name="ce0" table:number-columns-spanned="4" table:number-rows-spanned="1" office:value-type="string" calcext:value-type="string">
            <text:p>2.923 - NEW LINE ILUMINACAO LTDA</text:p>
          </table:table-cell>
          <table:covered-table-cell table:number-columns-repeated="3"/>
          <table:table-cell table:style-name="ce0" office:value-type="string" calcext:value-type="string">
            <text:p>225.78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9.79">
            <text:p>69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3.59">
            <text:p>63,5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9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6.2">
            <text:p>6,20</text:p>
          </table:table-cell>
          <table:table-cell table:style-name="ce12N2" office:value-type="float" office:value="63.59">
            <text:p>63,59</text:p>
          </table:table-cell>
          <table:table-cell table:style-name="ce12N2" office:value-type="float" office:value="4.45">
            <text:p>4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20771810001335500300022578717896615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30">
            <text:p>309730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3.008.08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3708.84">
            <text:p>203708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203156.73">
            <text:p>203156,7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94713">
            <text:p>3,947</text:p>
          </table:table-cell>
          <table:table-cell table:style-name="ce12N2" office:value-type="float" office:value="1579.53">
            <text:p>1579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3.708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1459.21">
            <text:p>171459,21</text:p>
          </table:table-cell>
          <table:table-cell table:style-name="ce12N2" office:value-type="float" office:value="171.45">
            <text:p>171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43.13">
            <text:p>1543,13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552.11">
            <text:p>552,11</text:p>
          </table:table-cell>
          <table:table-cell table:style-name="ce12N2" office:value-type="float" office:value="203156.73">
            <text:p>203156,73</text:p>
          </table:table-cell>
          <table:table-cell table:style-name="ce12N2" office:value-type="float" office:value="14220.97">
            <text:p>14220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4132820001435500100300808219398209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48">
            <text:p>30974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4.0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58.2">
            <text:p>4058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58.2">
            <text:p>4058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63">
            <text:p>0,096</text:p>
          </table:table-cell>
          <table:table-cell table:style-name="ce12N2" office:value-type="float" office:value="16.52">
            <text:p>16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058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25.03">
            <text:p>3425,03</text:p>
          </table:table-cell>
          <table:table-cell table:style-name="ce12N2" office:value-type="float" office:value="3.43">
            <text:p>3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.83">
            <text:p>30,8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58.2">
            <text:p>4058,20</text:p>
          </table:table-cell>
          <table:table-cell table:style-name="ce12N2" office:value-type="float" office:value="284.07">
            <text:p>284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405811228332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49">
            <text:p>309849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69.0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30.35">
            <text:p>4430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4348.58">
            <text:p>4348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67744">
            <text:p>0,268</text:p>
          </table:table-cell>
          <table:table-cell table:style-name="ce12N2" office:value-type="float" office:value="39.12">
            <text:p>39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30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670.07">
            <text:p>3670,07</text:p>
          </table:table-cell>
          <table:table-cell table:style-name="ce12N2" office:value-type="float" office:value="3.66">
            <text:p>3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.04">
            <text:p>33,04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81.77">
            <text:p>81,77</text:p>
          </table:table-cell>
          <table:table-cell table:style-name="ce12N2" office:value-type="float" office:value="4348.58">
            <text:p>4348,58</text:p>
          </table:table-cell>
          <table:table-cell table:style-name="ce12N2" office:value-type="float" office:value="304.41">
            <text:p>304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96415200001585500100076901818362224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51">
            <text:p>309851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3.008.78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2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841.22">
            <text:p>10841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594">
            <text:p>959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4912">
            <text:p>0,055</text:p>
          </table:table-cell>
          <table:table-cell table:style-name="ce12N2" office:value-type="float" office:value="37.34">
            <text:p>37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841,2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097.1">
            <text:p>8097,10</text:p>
          </table:table-cell>
          <table:table-cell table:style-name="ce12N2" office:value-type="float" office:value="8.1">
            <text:p>8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2.87">
            <text:p>72,87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1247.22">
            <text:p>1247,22</text:p>
          </table:table-cell>
          <table:table-cell table:style-name="ce12N2" office:value-type="float" office:value="9594">
            <text:p>9594,00</text:p>
          </table:table-cell>
          <table:table-cell table:style-name="ce12N2" office:value-type="float" office:value="671.58">
            <text:p>671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4132820001435500100300878418596887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76">
            <text:p>309876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69.1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26">
            <text:p>132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26">
            <text:p>132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125">
            <text:p>0,212</text:p>
          </table:table-cell>
          <table:table-cell table:style-name="ce12N2" office:value-type="float" office:value="0.42">
            <text:p>0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26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33.18">
            <text:p>1233,18</text:p>
          </table:table-cell>
          <table:table-cell table:style-name="ce12N2" office:value-type="float" office:value="1.23">
            <text:p>1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1">
            <text:p>11,10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26">
            <text:p>1326,00</text:p>
          </table:table-cell>
          <table:table-cell table:style-name="ce12N2" office:value-type="float" office:value="92.82">
            <text:p>92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96415200001585500100076911310268261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77">
            <text:p>309877</text:p>
          </table:table-cell>
          <table:table-cell table:style-name="ce0" table:number-columns-spanned="4" table:number-rows-spanned="1" office:value-type="string" calcext:value-type="string">
            <text:p>986 - PADO S A INDUSTRIAL COMERCIAL E IMPORTADORA</text:p>
          </table:table-cell>
          <table:covered-table-cell table:number-columns-repeated="3"/>
          <table:table-cell table:style-name="ce0" office:value-type="string" calcext:value-type="string">
            <text:p>1.283.23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02.51">
            <text:p>5102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5102.51">
            <text:p>5102,5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3245">
            <text:p>0,053</text:p>
          </table:table-cell>
          <table:table-cell table:style-name="ce12N2" office:value-type="float" office:value="28.76">
            <text:p>28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102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340.53">
            <text:p>4340,53</text:p>
          </table:table-cell>
          <table:table-cell table:style-name="ce12N2" office:value-type="float" office:value="4.34">
            <text:p>4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.07">
            <text:p>39,07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02.51">
            <text:p>5102,51</text:p>
          </table:table-cell>
          <table:table-cell table:style-name="ce12N2" office:value-type="float" office:value="319.56">
            <text:p>319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611441500006785500100128323010875856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79">
            <text:p>30987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6.04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6.48">
            <text:p>106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9.98">
            <text:p>99,9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.8E-5">
            <text:p>0,000</text:p>
          </table:table-cell>
          <table:table-cell table:style-name="ce12N2" office:value-type="float" office:value="0.47">
            <text:p>0,4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6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.38">
            <text:p>84,38</text:p>
          </table:table-cell>
          <table:table-cell table:style-name="ce12N2" office:value-type="float" office:value="0.08">
            <text:p>0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0.76">
            <text:p>0,7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6.5">
            <text:p>6,50</text:p>
          </table:table-cell>
          <table:table-cell table:style-name="ce12N2" office:value-type="float" office:value="99.98">
            <text:p>99,98</text:p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604913746976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80">
            <text:p>309880</text:p>
          </table:table-cell>
          <table:table-cell table:style-name="ce0" table:number-columns-spanned="4" table:number-rows-spanned="1" office:value-type="string" calcext:value-type="string">
            <text:p>38.379 - ASSA ABLOY BRASIL INDUSTRIA E COMERCIO LTDA</text:p>
          </table:table-cell>
          <table:covered-table-cell table:number-columns-repeated="3"/>
          <table:table-cell table:style-name="ce0" office:value-type="string" calcext:value-type="string">
            <text:p>222.30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51.12">
            <text:p>2451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451.12">
            <text:p>2451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51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35.43">
            <text:p>2135,43</text:p>
          </table:table-cell>
          <table:table-cell table:style-name="ce12N2" office:value-type="float" office:value="2.13">
            <text:p>2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22">
            <text:p>19,22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51.12">
            <text:p>2451,12</text:p>
          </table:table-cell>
          <table:table-cell table:style-name="ce12N2" office:value-type="float" office:value="98.04">
            <text:p>98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52606022146040003285500300022230518117710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93">
            <text:p>30989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6.28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51.48">
            <text:p>1251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51.48">
            <text:p>1251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136">
            <text:p>0,005</text:p>
          </table:table-cell>
          <table:table-cell table:style-name="ce12N2" office:value-type="float" office:value="1.12">
            <text:p>1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51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56.22">
            <text:p>1056,22</text:p>
          </table:table-cell>
          <table:table-cell table:style-name="ce12N2" office:value-type="float" office:value="1.06">
            <text:p>1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51">
            <text:p>9,5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51.48">
            <text:p>1251,48</text:p>
          </table:table-cell>
          <table:table-cell table:style-name="ce12N2" office:value-type="float" office:value="87.6">
            <text:p>8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6286164461776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53">
            <text:p>309953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334.72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326.66">
            <text:p>10326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10185.74">
            <text:p>10185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69678">
            <text:p>0,370</text:p>
          </table:table-cell>
          <table:table-cell table:style-name="ce12N2" office:value-type="float" office:value="54.21">
            <text:p>54,2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326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596.48">
            <text:p>8596,48</text:p>
          </table:table-cell>
          <table:table-cell table:style-name="ce12N2" office:value-type="float" office:value="8.6">
            <text:p>8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7.38">
            <text:p>77,38</text:p>
          </table:table-cell>
          <table:table-cell table:style-name="ce12N2" office:value-type="float" office:value="62.62">
            <text:p>62,6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140.92">
            <text:p>140,92</text:p>
          </table:table-cell>
          <table:table-cell table:style-name="ce12N2" office:value-type="float" office:value="10185.74">
            <text:p>10185,74</text:p>
          </table:table-cell>
          <table:table-cell table:style-name="ce12N2" office:value-type="float" office:value="713.01">
            <text:p>713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09495280012325500100233472816454839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75">
            <text:p>30997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7.35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86.32">
            <text:p>1486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86.32">
            <text:p>1486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136">
            <text:p>0,005</text:p>
          </table:table-cell>
          <table:table-cell table:style-name="ce12N2" office:value-type="float" office:value="1.76">
            <text:p>1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86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54.42">
            <text:p>1254,42</text:p>
          </table:table-cell>
          <table:table-cell table:style-name="ce12N2" office:value-type="float" office:value="1.25">
            <text:p>1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29">
            <text:p>11,2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86.32">
            <text:p>1486,32</text:p>
          </table:table-cell>
          <table:table-cell table:style-name="ce12N2" office:value-type="float" office:value="104.04">
            <text:p>104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735012568101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05">
            <text:p>31000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8.09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8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22.55">
            <text:p>922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22.55">
            <text:p>922,5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473">
            <text:p>0,002</text:p>
          </table:table-cell>
          <table:table-cell table:style-name="ce12N2" office:value-type="float" office:value="1.02">
            <text:p>1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22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78.61">
            <text:p>778,61</text:p>
          </table:table-cell>
          <table:table-cell table:style-name="ce12N2" office:value-type="float" office:value="0.78">
            <text:p>0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.01">
            <text:p>7,0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22.55">
            <text:p>922,55</text:p>
          </table:table-cell>
          <table:table-cell table:style-name="ce12N2" office:value-type="float" office:value="64.58">
            <text:p>64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809016987877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07">
            <text:p>31000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8.11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8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20.28">
            <text:p>2720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720.28">
            <text:p>2720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494">
            <text:p>0,015</text:p>
          </table:table-cell>
          <table:table-cell table:style-name="ce12N2" office:value-type="float" office:value="9.64">
            <text:p>9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20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95.96">
            <text:p>2295,96</text:p>
          </table:table-cell>
          <table:table-cell table:style-name="ce12N2" office:value-type="float" office:value="2.29">
            <text:p>2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.67">
            <text:p>20,6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20.28">
            <text:p>2720,28</text:p>
          </table:table-cell>
          <table:table-cell table:style-name="ce12N2" office:value-type="float" office:value="190.42">
            <text:p>190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811713229166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08">
            <text:p>31000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8.14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8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61.02">
            <text:p>3361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61.02">
            <text:p>3361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64">
            <text:p>0,001</text:p>
          </table:table-cell>
          <table:table-cell table:style-name="ce12N2" office:value-type="float" office:value="1.48">
            <text:p>1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61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36.62">
            <text:p>2836,62</text:p>
          </table:table-cell>
          <table:table-cell table:style-name="ce12N2" office:value-type="float" office:value="2.84">
            <text:p>2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.53">
            <text:p>25,5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61.02">
            <text:p>3361,02</text:p>
          </table:table-cell>
          <table:table-cell table:style-name="ce12N2" office:value-type="float" office:value="235.27">
            <text:p>235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814117505032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12">
            <text:p>31001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8.17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8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71.41">
            <text:p>871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71.41">
            <text:p>871,4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717">
            <text:p>0,004</text:p>
          </table:table-cell>
          <table:table-cell table:style-name="ce12N2" office:value-type="float" office:value="2.62">
            <text:p>2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71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35.45">
            <text:p>735,45</text:p>
          </table:table-cell>
          <table:table-cell table:style-name="ce12N2" office:value-type="float" office:value="0.74">
            <text:p>0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62">
            <text:p>6,6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71.41">
            <text:p>871,41</text:p>
          </table:table-cell>
          <table:table-cell table:style-name="ce12N2" office:value-type="float" office:value="61">
            <text:p>61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8175111720481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13">
            <text:p>31001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8.39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82.32">
            <text:p>5782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782.32">
            <text:p>5782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856">
            <text:p>0,018</text:p>
          </table:table-cell>
          <table:table-cell table:style-name="ce12N2" office:value-type="float" office:value="8.93">
            <text:p>8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782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880.16">
            <text:p>4880,16</text:p>
          </table:table-cell>
          <table:table-cell table:style-name="ce12N2" office:value-type="float" office:value="4.88">
            <text:p>4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.92">
            <text:p>43,9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82.32">
            <text:p>5782,32</text:p>
          </table:table-cell>
          <table:table-cell table:style-name="ce12N2" office:value-type="float" office:value="404.76">
            <text:p>40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839417670120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61">
            <text:p>310061</text:p>
          </table:table-cell>
          <table:table-cell table:style-name="ce0" table:number-columns-spanned="4" table:number-rows-spanned="1" office:value-type="string" calcext:value-type="string">
            <text:p>785 - MEBER METAIS S/A</text:p>
          </table:table-cell>
          <table:covered-table-cell table:number-columns-repeated="3"/>
          <table:table-cell table:style-name="ce0" office:value-type="string" calcext:value-type="string">
            <text:p>319.577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3447.76">
            <text:p>133447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">
            <text:p>54,00</text:p>
          </table:table-cell>
          <table:table-cell table:style-name="ce12N2" office:value-type="float" office:value="128394.08">
            <text:p>128394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596138">
            <text:p>4,596</text:p>
          </table:table-cell>
          <table:table-cell table:style-name="ce12N2" office:value-type="float" office:value="1165.53">
            <text:p>1165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3.447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8361.32">
            <text:p>108361,32</text:p>
          </table:table-cell>
          <table:table-cell table:style-name="ce12N2" office:value-type="float" office:value="108.37">
            <text:p>108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75.24">
            <text:p>975,24</text:p>
          </table:table-cell>
          <table:table-cell table:style-name="ce12N2" office:value-type="float" office:value="82.67">
            <text:p>82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5053.68">
            <text:p>5053,68</text:p>
          </table:table-cell>
          <table:table-cell table:style-name="ce12N2" office:value-type="float" office:value="128394.08">
            <text:p>128394,08</text:p>
          </table:table-cell>
          <table:table-cell table:style-name="ce12N2" office:value-type="float" office:value="8987.59">
            <text:p>8987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75479070001535500500031957711020225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62">
            <text:p>31006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6.47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441.32">
            <text:p>42441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41532.48">
            <text:p>41532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1877">
            <text:p>0,319</text:p>
          </table:table-cell>
          <table:table-cell table:style-name="ce12N2" office:value-type="float" office:value="82.45">
            <text:p>82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.441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052.26">
            <text:p>35052,26</text:p>
          </table:table-cell>
          <table:table-cell table:style-name="ce12N2" office:value-type="float" office:value="35.05">
            <text:p>35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5.47">
            <text:p>315,4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908.84">
            <text:p>908,84</text:p>
          </table:table-cell>
          <table:table-cell table:style-name="ce12N2" office:value-type="float" office:value="41532.48">
            <text:p>41532,48</text:p>
          </table:table-cell>
          <table:table-cell table:style-name="ce12N2" office:value-type="float" office:value="2907.27">
            <text:p>2907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647713453430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71">
            <text:p>31007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0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756">
            <text:p>0,004</text:p>
          </table:table-cell>
          <table:table-cell table:style-name="ce12N2" office:value-type="float" office:value="5.27">
            <text:p>5,2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01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28.04">
            <text:p>28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0512073437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34">
            <text:p>31013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9.83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54.85">
            <text:p>2254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254.85">
            <text:p>2254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784">
            <text:p>0,038</text:p>
          </table:table-cell>
          <table:table-cell table:style-name="ce12N2" office:value-type="float" office:value="5.24">
            <text:p>5,2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54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03.04">
            <text:p>1903,04</text:p>
          </table:table-cell>
          <table:table-cell table:style-name="ce12N2" office:value-type="float" office:value="1.9">
            <text:p>1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.13">
            <text:p>17,1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54.85">
            <text:p>2254,85</text:p>
          </table:table-cell>
          <table:table-cell table:style-name="ce12N2" office:value-type="float" office:value="157.84">
            <text:p>157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9839165866940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74">
            <text:p>310174</text:p>
          </table:table-cell>
          <table:table-cell table:style-name="ce0" table:number-columns-spanned="4" table:number-rows-spanned="1" office:value-type="string" calcext:value-type="string">
            <text:p>10.343 - METALURGICA IL INDUSTRIA DE ILUMINACAO LTDA</text:p>
          </table:table-cell>
          <table:covered-table-cell table:number-columns-repeated="3"/>
          <table:table-cell table:style-name="ce0" office:value-type="string" calcext:value-type="string">
            <text:p>266.2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          </text:p>
          </table:table-cell>
          <table:table-cell table:style-name="ce122" office:value-type="string" calcext:value-type="string">
            <text:p>ADM</text:p>
          </table:table-cell>
          <table:table-cell table:style-name="ce12N2" office:value-type="float" office:value="308.29">
            <text:p>308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1.8">
            <text:p>231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08,2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1.8">
            <text:p>231,80</text:p>
          </table:table-cell>
          <table:table-cell table:style-name="ce12N2" office:value-type="float" office:value="0.23">
            <text:p>0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.09">
            <text:p>2,09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7/2026</text:p>
          </table:table-cell>
          <table:table-cell table:style-name="ce12N2" office:value-type="float" office:value="22.6">
            <text:p>22,60</text:p>
          </table:table-cell>
          <table:table-cell table:style-name="ce12N2" office:value-type="float" office:value="231.8">
            <text:p>231,80</text:p>
          </table:table-cell>
          <table:table-cell table:style-name="ce12N2" office:value-type="float" office:value="16.23">
            <text:p>16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89.51">
            <text:p>389,51</text:p>
          </table:table-cell>
          <table:table-cell table:style-name="ce12N2" office:value-type="float" office:value="53.89">
            <text:p>53,89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83296080001445500100026626510026626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94">
            <text:p>310194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8.42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74.72">
            <text:p>1374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90.82">
            <text:p>1290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864">
            <text:p>0,069</text:p>
          </table:table-cell>
          <table:table-cell table:style-name="ce12N2" office:value-type="float" office:value="4.8">
            <text:p>4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74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24.56">
            <text:p>1124,56</text:p>
          </table:table-cell>
          <table:table-cell table:style-name="ce12N2" office:value-type="float" office:value="1.12">
            <text:p>1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12">
            <text:p>10,1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83.9">
            <text:p>83,90</text:p>
          </table:table-cell>
          <table:table-cell table:style-name="ce12N2" office:value-type="float" office:value="1290.82">
            <text:p>1290,82</text:p>
          </table:table-cell>
          <table:table-cell table:style-name="ce12N2" office:value-type="float" office:value="51.63">
            <text:p>51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842416648226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01">
            <text:p>31020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9.62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15.3">
            <text:p>2115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115.3">
            <text:p>2115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3.15">
            <text:p>3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115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85.27">
            <text:p>1785,27</text:p>
          </table:table-cell>
          <table:table-cell table:style-name="ce12N2" office:value-type="float" office:value="1.79">
            <text:p>1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.07">
            <text:p>16,0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15.3">
            <text:p>2115,30</text:p>
          </table:table-cell>
          <table:table-cell table:style-name="ce12N2" office:value-type="float" office:value="148.07">
            <text:p>148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962815064740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03">
            <text:p>310203</text:p>
          </table:table-cell>
          <table:table-cell table:style-name="ce0" table:number-columns-spanned="4" table:number-rows-spanned="1" office:value-type="string" calcext:value-type="string">
            <text:p>785 - MEBER METAIS S/A</text:p>
          </table:table-cell>
          <table:covered-table-cell table:number-columns-repeated="3"/>
          <table:table-cell table:style-name="ce0" office:value-type="string" calcext:value-type="string">
            <text:p>319.678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25.85">
            <text:p>4625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4466.13">
            <text:p>4466,1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625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69.27">
            <text:p>3769,27</text:p>
          </table:table-cell>
          <table:table-cell table:style-name="ce12N2" office:value-type="float" office:value="3.76">
            <text:p>3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.93">
            <text:p>33,93</text:p>
          </table:table-cell>
          <table:table-cell table:style-name="ce12N2" office:value-type="float" office:value="82.76">
            <text:p>82,7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159.72">
            <text:p>159,72</text:p>
          </table:table-cell>
          <table:table-cell table:style-name="ce12N2" office:value-type="float" office:value="4466.13">
            <text:p>4466,13</text:p>
          </table:table-cell>
          <table:table-cell table:style-name="ce12N2" office:value-type="float" office:value="312.64">
            <text:p>312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75479070001535500500031967816512399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14">
            <text:p>310214</text:p>
          </table:table-cell>
          <table:table-cell table:style-name="ce0" table:number-columns-spanned="4" table:number-rows-spanned="1" office:value-type="string" calcext:value-type="string">
            <text:p>2.923 - NEW LINE ILUMINACAO LTDA</text:p>
          </table:table-cell>
          <table:covered-table-cell table:number-columns-repeated="3"/>
          <table:table-cell table:style-name="ce0" office:value-type="string" calcext:value-type="string">
            <text:p>226.89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688.56">
            <text:p>21688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19803.9">
            <text:p>19803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24.35">
            <text:p>24,3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.688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745.37">
            <text:p>17745,37</text:p>
          </table:table-cell>
          <table:table-cell table:style-name="ce12N2" office:value-type="float" office:value="17.74">
            <text:p>17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9.7">
            <text:p>159,70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1884.66">
            <text:p>1884,66</text:p>
          </table:table-cell>
          <table:table-cell table:style-name="ce12N2" office:value-type="float" office:value="19803.9">
            <text:p>19803,90</text:p>
          </table:table-cell>
          <table:table-cell table:style-name="ce12N2" office:value-type="float" office:value="1386.27">
            <text:p>1386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20771810001335500300022689612248718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43">
            <text:p>31024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21.0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087.3">
            <text:p>6087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087.3">
            <text:p>6087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445">
            <text:p>0,144</text:p>
          </table:table-cell>
          <table:table-cell table:style-name="ce12N2" office:value-type="float" office:value="24.78">
            <text:p>24,7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087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137.53">
            <text:p>5137,53</text:p>
          </table:table-cell>
          <table:table-cell table:style-name="ce12N2" office:value-type="float" office:value="5.14">
            <text:p>5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6.24">
            <text:p>46,2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87.3">
            <text:p>6087,30</text:p>
          </table:table-cell>
          <table:table-cell table:style-name="ce12N2" office:value-type="float" office:value="426.11">
            <text:p>426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2105713971063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52">
            <text:p>310252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8.77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9125">
            <text:p>0,199</text:p>
          </table:table-cell>
          <table:table-cell table:style-name="ce12N2" office:value-type="float" office:value="43.53">
            <text:p>43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78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27.16">
            <text:p>27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877815972433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54">
            <text:p>310254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8.7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9125">
            <text:p>0,199</text:p>
          </table:table-cell>
          <table:table-cell table:style-name="ce12N2" office:value-type="float" office:value="43.53">
            <text:p>43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78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27.16">
            <text:p>27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878016821478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64">
            <text:p>31026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0.09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09.3">
            <text:p>2009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09.3">
            <text:p>2009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9896">
            <text:p>0,050</text:p>
          </table:table-cell>
          <table:table-cell table:style-name="ce12N2" office:value-type="float" office:value="1.48">
            <text:p>1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09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95.8">
            <text:p>1695,80</text:p>
          </table:table-cell>
          <table:table-cell table:style-name="ce12N2" office:value-type="float" office:value="1.7">
            <text:p>1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26">
            <text:p>15,2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09.3">
            <text:p>2009,30</text:p>
          </table:table-cell>
          <table:table-cell table:style-name="ce12N2" office:value-type="float" office:value="140.65">
            <text:p>140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8009611178009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90">
            <text:p>310290</text:p>
          </table:table-cell>
          <table:table-cell table:style-name="ce0" table:number-columns-spanned="4" table:number-rows-spanned="1" office:value-type="string" calcext:value-type="string">
            <text:p>20.116 - MS DISTRIBUIDORA LTDA</text:p>
          </table:table-cell>
          <table:covered-table-cell table:number-columns-repeated="3"/>
          <table:table-cell table:style-name="ce0" office:value-type="string" calcext:value-type="string">
            <text:p>47.17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44.19">
            <text:p>8844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8287.79">
            <text:p>8287,7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3">
            <text:p>2,300</text:p>
          </table:table-cell>
          <table:table-cell table:style-name="ce12N2" office:value-type="float" office:value="124.8">
            <text:p>124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844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287.79">
            <text:p>8287,79</text:p>
          </table:table-cell>
          <table:table-cell table:style-name="ce12N2" office:value-type="float" office:value="8.29">
            <text:p>8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.6">
            <text:p>74,60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556.4">
            <text:p>556,40</text:p>
          </table:table-cell>
          <table:table-cell table:style-name="ce12N2" office:value-type="float" office:value="8287.79">
            <text:p>8287,79</text:p>
          </table:table-cell>
          <table:table-cell table:style-name="ce12N2" office:value-type="float" office:value="408.96">
            <text:p>408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7146242510001515500100004717010003502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09">
            <text:p>31030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6.58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5.81">
            <text:p>405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5.81">
            <text:p>405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552">
            <text:p>0,016</text:p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5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5.81">
            <text:p>405,81</text:p>
          </table:table-cell>
          <table:table-cell table:style-name="ce12N2" office:value-type="float" office:value="28.41">
            <text:p>28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658118822799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10">
            <text:p>31031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6.59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4.84">
            <text:p>584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84.84">
            <text:p>584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552">
            <text:p>0,016</text:p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84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4.84">
            <text:p>584,84</text:p>
          </table:table-cell>
          <table:table-cell table:style-name="ce12N2" office:value-type="float" office:value="40.94">
            <text:p>40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659315705789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12">
            <text:p>310312</text:p>
          </table:table-cell>
          <table:table-cell table:style-name="ce0" table:number-columns-spanned="4" table:number-rows-spanned="1" office:value-type="string" calcext:value-type="string">
            <text:p>541 - FAME FABRICA DE APARELHOS ELETRICOS LTDA</text:p>
          </table:table-cell>
          <table:covered-table-cell table:number-columns-repeated="3"/>
          <table:table-cell table:style-name="ce0" office:value-type="string" calcext:value-type="string">
            <text:p>501.181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.75">
            <text:p>28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8.75">
            <text:p>28,7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8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75">
            <text:p>28,75</text:p>
          </table:table-cell>
          <table:table-cell table:style-name="ce12N2" office:value-type="float" office:value="2.01">
            <text:p>2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06203660001955500200050118115813280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20">
            <text:p>31032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0.59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924.04">
            <text:p>15924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924.04">
            <text:p>15924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2164">
            <text:p>0,012</text:p>
          </table:table-cell>
          <table:table-cell table:style-name="ce12N2" office:value-type="float" office:value="10.98">
            <text:p>10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924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439.48">
            <text:p>13439,48</text:p>
          </table:table-cell>
          <table:table-cell table:style-name="ce12N2" office:value-type="float" office:value="13.44">
            <text:p>13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0.96">
            <text:p>120,9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924.04">
            <text:p>15924,04</text:p>
          </table:table-cell>
          <table:table-cell table:style-name="ce12N2" office:value-type="float" office:value="1114.68">
            <text:p>1114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8059319868301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24">
            <text:p>310324</text:p>
          </table:table-cell>
          <table:table-cell table:style-name="ce0" table:number-columns-spanned="4" table:number-rows-spanned="1" office:value-type="string" calcext:value-type="string">
            <text:p>10.718 - STELLA IMPORTACAO E EXPORTACAO DE LUMINARIAS LTDA</text:p>
          </table:table-cell>
          <table:covered-table-cell table:number-columns-repeated="3"/>
          <table:table-cell table:style-name="ce0" office:value-type="string" calcext:value-type="string">
            <text:p>297.1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31.73">
            <text:p>3931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505">
            <text:p>3505,00</text:p>
          </table:table-cell>
          <table:table-cell table:style-name="ce12N2" office:value-type="float" office:value="85">
            <text:p>85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31,7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27.6">
            <text:p>3127,60</text:p>
          </table:table-cell>
          <table:table-cell table:style-name="ce12N2" office:value-type="float" office:value="3.12">
            <text:p>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15">
            <text:p>28,15</text:p>
          </table:table-cell>
          <table:table-cell table:style-name="ce12N2" office:value-type="float" office:value="41.7">
            <text:p>41,7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341.73">
            <text:p>341,73</text:p>
          </table:table-cell>
          <table:table-cell table:style-name="ce12N2" office:value-type="float" office:value="3590">
            <text:p>3590,00</text:p>
          </table:table-cell>
          <table:table-cell table:style-name="ce12N2" office:value-type="float" office:value="143.6">
            <text:p>143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106911580003705500100029711117952546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27">
            <text:p>31032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1.18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84.91">
            <text:p>1784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744.24">
            <text:p>1744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553">
            <text:p>0,010</text:p>
          </table:table-cell>
          <table:table-cell table:style-name="ce12N2" office:value-type="float" office:value="3.07">
            <text:p>3,0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84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72.1">
            <text:p>1472,10</text:p>
          </table:table-cell>
          <table:table-cell table:style-name="ce12N2" office:value-type="float" office:value="1.47">
            <text:p>1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25">
            <text:p>13,2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40.67">
            <text:p>40,67</text:p>
          </table:table-cell>
          <table:table-cell table:style-name="ce12N2" office:value-type="float" office:value="1744.24">
            <text:p>1744,24</text:p>
          </table:table-cell>
          <table:table-cell table:style-name="ce12N2" office:value-type="float" office:value="122.09">
            <text:p>122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118412336454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28">
            <text:p>31032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1.47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26.76">
            <text:p>5126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13.86">
            <text:p>4813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1862">
            <text:p>0,042</text:p>
          </table:table-cell>
          <table:table-cell table:style-name="ce12N2" office:value-type="float" office:value="4.8">
            <text:p>4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126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62.78">
            <text:p>4062,78</text:p>
          </table:table-cell>
          <table:table-cell table:style-name="ce12N2" office:value-type="float" office:value="4.06">
            <text:p>4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57">
            <text:p>36,5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312.9">
            <text:p>312,90</text:p>
          </table:table-cell>
          <table:table-cell table:style-name="ce12N2" office:value-type="float" office:value="4813.86">
            <text:p>4813,86</text:p>
          </table:table-cell>
          <table:table-cell table:style-name="ce12N2" office:value-type="float" office:value="336.97">
            <text:p>336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147414818616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30">
            <text:p>310330</text:p>
          </table:table-cell>
          <table:table-cell table:style-name="ce0" table:number-columns-spanned="4" table:number-rows-spanned="1" office:value-type="string" calcext:value-type="string">
            <text:p>777 - IRMAOS FISCHER S.A IND. E COM.</text:p>
          </table:table-cell>
          <table:covered-table-cell table:number-columns-repeated="3"/>
          <table:table-cell table:style-name="ce0" office:value-type="string" calcext:value-type="string">
            <text:p>1.799.482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760.95">
            <text:p>9760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513.6">
            <text:p>8513,60</text:p>
          </table:table-cell>
          <table:table-cell table:style-name="ce12N2" office:value-type="float" office:value="510.29">
            <text:p>510,29</text:p>
          </table:table-cell>
          <table:table-cell table:style-name="ce12N3" office:value-type="float" office:value="0.587396">
            <text:p>0,587</text:p>
          </table:table-cell>
          <table:table-cell table:style-name="ce12N2" office:value-type="float" office:value="90.81">
            <text:p>90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760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723.97">
            <text:p>7723,97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9.51">
            <text:p>69,51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737.06">
            <text:p>737,06</text:p>
          </table:table-cell>
          <table:table-cell table:style-name="ce12N2" office:value-type="float" office:value="9023.89">
            <text:p>9023,89</text:p>
          </table:table-cell>
          <table:table-cell table:style-name="ce12N2" office:value-type="float" office:value="512.63">
            <text:p>512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829842870001045500200179948213940548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58">
            <text:p>310358</text:p>
          </table:table-cell>
          <table:table-cell table:style-name="ce0" table:number-columns-spanned="4" table:number-rows-spanned="1" office:value-type="string" calcext:value-type="string">
            <text:p>24.582 - GRUPO MARMO E HIME COMERCIO, IMPORTACAO E EXPORTACAO LTDA</text:p>
          </table:table-cell>
          <table:covered-table-cell table:number-columns-repeated="3"/>
          <table:table-cell table:style-name="ce0" office:value-type="string" calcext:value-type="string">
            <text:p>41.2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156.72">
            <text:p>6156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5482.94">
            <text:p>5482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64">
            <text:p>6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156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063.51">
            <text:p>5063,51</text:p>
          </table:table-cell>
          <table:table-cell table:style-name="ce12N2" office:value-type="float" office:value="5.07">
            <text:p>5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.58">
            <text:p>45,58</text:p>
          </table:table-cell>
          <table:table-cell table:style-name="ce12N2" office:value-type="float" office:value="75">
            <text:p>7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673.78">
            <text:p>673,78</text:p>
          </table:table-cell>
          <table:table-cell table:style-name="ce12N2" office:value-type="float" office:value="5482.94">
            <text:p>5482,94</text:p>
          </table:table-cell>
          <table:table-cell table:style-name="ce12N2" office:value-type="float" office:value="219.31">
            <text:p>219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205870170002855500100004124012026585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65">
            <text:p>310365</text:p>
          </table:table-cell>
          <table:table-cell table:style-name="ce0" table:number-columns-spanned="4" table:number-rows-spanned="1" office:value-type="string" calcext:value-type="string">
            <text:p>32.977 - COMFORT DOOR IMPORTACAO E DISTRIBUICAO DE UTILIDADES</text:p>
          </table:table-cell>
          <table:covered-table-cell table:number-columns-repeated="3"/>
          <table:table-cell table:style-name="ce0" office:value-type="string" calcext:value-type="string">
            <text:p>22.076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40.03">
            <text:p>3740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3615">
            <text:p>3615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5375">
            <text:p>0,854</text:p>
          </table:table-cell>
          <table:table-cell table:style-name="ce12N2" office:value-type="float" office:value="15.79">
            <text:p>15,7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40,0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263.03">
            <text:p>3263,03</text:p>
          </table:table-cell>
          <table:table-cell table:style-name="ce12N2" office:value-type="float" office:value="3.26">
            <text:p>3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.37">
            <text:p>29,3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125.03">
            <text:p>125,03</text:p>
          </table:table-cell>
          <table:table-cell table:style-name="ce12N2" office:value-type="float" office:value="3615">
            <text:p>3615,00</text:p>
          </table:table-cell>
          <table:table-cell table:style-name="ce12N2" office:value-type="float" office:value="228.36">
            <text:p>228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71845545300017855004000022076134663700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67">
            <text:p>31036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2.24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414.22">
            <text:p>14414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414.22">
            <text:p>14414,2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2302">
            <text:p>0,022</text:p>
          </table:table-cell>
          <table:table-cell table:style-name="ce12N2" office:value-type="float" office:value="15.69">
            <text:p>15,6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414,2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165.24">
            <text:p>12165,24</text:p>
          </table:table-cell>
          <table:table-cell table:style-name="ce12N2" office:value-type="float" office:value="12.17">
            <text:p>12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9.49">
            <text:p>109,4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414.22">
            <text:p>14414,22</text:p>
          </table:table-cell>
          <table:table-cell table:style-name="ce12N2" office:value-type="float" office:value="1009">
            <text:p>1009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224313758644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82">
            <text:p>31038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2.66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11.06">
            <text:p>2911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11.06">
            <text:p>2911,0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272">
            <text:p>0,010</text:p>
          </table:table-cell>
          <table:table-cell table:style-name="ce12N2" office:value-type="float" office:value="3.6">
            <text:p>3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11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56.86">
            <text:p>2456,86</text:p>
          </table:table-cell>
          <table:table-cell table:style-name="ce12N2" office:value-type="float" office:value="2.46">
            <text:p>2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.11">
            <text:p>22,1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11.06">
            <text:p>2911,06</text:p>
          </table:table-cell>
          <table:table-cell table:style-name="ce12N2" office:value-type="float" office:value="203.77">
            <text:p>20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266511293957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83">
            <text:p>31038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2.66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10.6">
            <text:p>4010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10.6">
            <text:p>4010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527">
            <text:p>0,075</text:p>
          </table:table-cell>
          <table:table-cell table:style-name="ce12N2" office:value-type="float" office:value="10.34">
            <text:p>10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010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84.8">
            <text:p>3384,80</text:p>
          </table:table-cell>
          <table:table-cell table:style-name="ce12N2" office:value-type="float" office:value="3.38">
            <text:p>3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.46">
            <text:p>30,4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10.6">
            <text:p>4010,60</text:p>
          </table:table-cell>
          <table:table-cell table:style-name="ce12N2" office:value-type="float" office:value="280.74">
            <text:p>280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266817532148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89">
            <text:p>310389</text:p>
          </table:table-cell>
          <table:table-cell table:style-name="ce0" table:number-columns-spanned="4" table:number-rows-spanned="1" office:value-type="string" calcext:value-type="string">
            <text:p>11.247 - NOVA ROCHA INDUSTRIA DE TINTAS LTDA.</text:p>
          </table:table-cell>
          <table:covered-table-cell table:number-columns-repeated="3"/>
          <table:table-cell table:style-name="ce0" office:value-type="string" calcext:value-type="string">
            <text:p>559.15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1.87">
            <text:p>341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41.87">
            <text:p>341,8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2486">
            <text:p>0,072</text:p>
          </table:table-cell>
          <table:table-cell table:style-name="ce12N2" office:value-type="float" office:value="64.52">
            <text:p>64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41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73.03">
            <text:p>273,03</text:p>
          </table:table-cell>
          <table:table-cell table:style-name="ce12N2" office:value-type="float" office:value="0.27">
            <text:p>0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.46">
            <text:p>2,46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1.87">
            <text:p>341,87</text:p>
          </table:table-cell>
          <table:table-cell table:style-name="ce12N2" office:value-type="float" office:value="41.02">
            <text:p>41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7030051230001035500100055915214256968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18">
            <text:p>310418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6.609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913.9">
            <text:p>15913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14905.19">
            <text:p>14905,1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152">
            <text:p>0,042</text:p>
          </table:table-cell>
          <table:table-cell table:style-name="ce12N2" office:value-type="float" office:value="27.8">
            <text:p>27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913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985.4">
            <text:p>12985,40</text:p>
          </table:table-cell>
          <table:table-cell table:style-name="ce12N2" office:value-type="float" office:value="12.99">
            <text:p>12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6.87">
            <text:p>116,87</text:p>
          </table:table-cell>
          <table:table-cell table:style-name="ce12N2" office:value-type="float" office:value="72.15">
            <text:p>72,1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1008.71">
            <text:p>1008,71</text:p>
          </table:table-cell>
          <table:table-cell table:style-name="ce12N2" office:value-type="float" office:value="14905.19">
            <text:p>14905,19</text:p>
          </table:table-cell>
          <table:table-cell table:style-name="ce12N2" office:value-type="float" office:value="596.21">
            <text:p>596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356353460001405500200011660914895903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23">
            <text:p>310423</text:p>
          </table:table-cell>
          <table:table-cell table:style-name="ce0" table:number-columns-spanned="4" table:number-rows-spanned="1" office:value-type="string" calcext:value-type="string">
            <text:p>16.008 - MEKAL METALURGICA KADOW S.A.</text:p>
          </table:table-cell>
          <table:covered-table-cell table:number-columns-repeated="3"/>
          <table:table-cell table:style-name="ce0" office:value-type="string" calcext:value-type="string">
            <text:p>10.68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50.57">
            <text:p>1650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50.57">
            <text:p>1650,5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0.06">
            <text:p>0,0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50,5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93.05">
            <text:p>1393,05</text:p>
          </table:table-cell>
          <table:table-cell table:style-name="ce12N2" office:value-type="float" office:value="1.39">
            <text:p>1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.54">
            <text:p>12,5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50.57">
            <text:p>1650,57</text:p>
          </table:table-cell>
          <table:table-cell table:style-name="ce12N2" office:value-type="float" office:value="115.54">
            <text:p>115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70373920001805500300001068711301365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25">
            <text:p>31042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3.35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40.4">
            <text:p>1540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540.4">
            <text:p>1540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338">
            <text:p>0,005</text:p>
          </table:table-cell>
          <table:table-cell table:style-name="ce12N2" office:value-type="float" office:value="2.2">
            <text:p>2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40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00.06">
            <text:p>1300,06</text:p>
          </table:table-cell>
          <table:table-cell table:style-name="ce12N2" office:value-type="float" office:value="1.3">
            <text:p>1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7">
            <text:p>11,7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40.4">
            <text:p>1540,40</text:p>
          </table:table-cell>
          <table:table-cell table:style-name="ce12N2" office:value-type="float" office:value="107.83">
            <text:p>107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335017457825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54">
            <text:p>31045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3.95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3.88">
            <text:p>483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3.88">
            <text:p>483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83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8.38">
            <text:p>408,38</text:p>
          </table:table-cell>
          <table:table-cell table:style-name="ce12N2" office:value-type="float" office:value="0.41">
            <text:p>0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68">
            <text:p>3,6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3.88">
            <text:p>483,88</text:p>
          </table:table-cell>
          <table:table-cell table:style-name="ce12N2" office:value-type="float" office:value="33.87">
            <text:p>33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395416519003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73">
            <text:p>310473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3.013.77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28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4037.97">
            <text:p>64037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62174.92">
            <text:p>62174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99304">
            <text:p>0,499</text:p>
          </table:table-cell>
          <table:table-cell table:style-name="ce12N2" office:value-type="float" office:value="410.5">
            <text:p>410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4.037,9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2901.42">
            <text:p>52901,42</text:p>
          </table:table-cell>
          <table:table-cell table:style-name="ce12N2" office:value-type="float" office:value="52.9">
            <text:p>52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6.1">
            <text:p>476,10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1863.05">
            <text:p>1863,05</text:p>
          </table:table-cell>
          <table:table-cell table:style-name="ce12N2" office:value-type="float" office:value="62174.92">
            <text:p>62174,92</text:p>
          </table:table-cell>
          <table:table-cell table:style-name="ce12N2" office:value-type="float" office:value="3881.36">
            <text:p>3881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4132820001435500100301377719126982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82">
            <text:p>31048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2.97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2.42">
            <text:p>452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2.42">
            <text:p>452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24">
            <text:p>0,001</text:p>
          </table:table-cell>
          <table:table-cell table:style-name="ce12N2" office:value-type="float" office:value="0.88">
            <text:p>0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52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81.82">
            <text:p>381,82</text:p>
          </table:table-cell>
          <table:table-cell table:style-name="ce12N2" office:value-type="float" office:value="0.38">
            <text:p>0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44">
            <text:p>3,4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2.42">
            <text:p>452,42</text:p>
          </table:table-cell>
          <table:table-cell table:style-name="ce12N2" office:value-type="float" office:value="31.67">
            <text:p>31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297211987199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86">
            <text:p>31048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3.35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22.02">
            <text:p>4122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122.02">
            <text:p>4122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6864">
            <text:p>0,047</text:p>
          </table:table-cell>
          <table:table-cell table:style-name="ce12N2" office:value-type="float" office:value="8.45">
            <text:p>8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122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78.88">
            <text:p>3478,88</text:p>
          </table:table-cell>
          <table:table-cell table:style-name="ce12N2" office:value-type="float" office:value="3.48">
            <text:p>3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.31">
            <text:p>31,3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22.02">
            <text:p>4122,02</text:p>
          </table:table-cell>
          <table:table-cell table:style-name="ce12N2" office:value-type="float" office:value="288.54">
            <text:p>288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335218039149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95">
            <text:p>310495</text:p>
          </table:table-cell>
          <table:table-cell table:style-name="ce0" table:number-columns-spanned="4" table:number-rows-spanned="1" office:value-type="string" calcext:value-type="string">
            <text:p>33.065 - LUXMUNDO COMERCIO IMPORTACAO EXPORTACAO</text:p>
          </table:table-cell>
          <table:covered-table-cell table:number-columns-repeated="3"/>
          <table:table-cell table:style-name="ce0" office:value-type="string" calcext:value-type="string">
            <text:p>68.8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11.87">
            <text:p>1011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79.89">
            <text:p>879,8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11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11.87">
            <text:p>1011,87</text:p>
          </table:table-cell>
          <table:table-cell table:style-name="ce12N2" office:value-type="float" office:value="1.01">
            <text:p>1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11">
            <text:p>9,11</text:p>
          </table:table-cell>
          <table:table-cell table:style-name="ce12N2" office:value-type="float" office:value="9">
            <text:p>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131.98">
            <text:p>131,98</text:p>
          </table:table-cell>
          <table:table-cell table:style-name="ce12N2" office:value-type="float" office:value="879.89">
            <text:p>879,89</text:p>
          </table:table-cell>
          <table:table-cell table:style-name="ce12N2" office:value-type="float" office:value="35.2">
            <text:p>35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92607292449000002475500100006884012231172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98">
            <text:p>310498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9.27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43.24">
            <text:p>3343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238">
            <text:p>323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6">
            <text:p>0,004</text:p>
          </table:table-cell>
          <table:table-cell table:style-name="ce12N2" office:value-type="float" office:value="16.4">
            <text:p>16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43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732.79">
            <text:p>2732,79</text:p>
          </table:table-cell>
          <table:table-cell table:style-name="ce12N2" office:value-type="float" office:value="2.73">
            <text:p>2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.6">
            <text:p>24,60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105.24">
            <text:p>105,24</text:p>
          </table:table-cell>
          <table:table-cell table:style-name="ce12N2" office:value-type="float" office:value="3238">
            <text:p>3238,00</text:p>
          </table:table-cell>
          <table:table-cell table:style-name="ce12N2" office:value-type="float" office:value="226.66">
            <text:p>226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7927316776191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55">
            <text:p>55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595.29">
            <text:p>595,2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6044.67">
            <text:p>16044,67</text:p>
          </table:table-cell>
          <table:table-cell table:style-name="ce26N2" office:value-type="float" office:value="631652.95">
            <text:p>631652,95</text:p>
          </table:table-cell>
          <table:table-cell table:style-name="ce26N2" office:value-type="float" office:value="42489.61">
            <text:p>42489,6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647761.51">
            <text:p>647761,5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389.51">
            <text:p>389,51</text:p>
          </table:table-cell>
          <table:table-cell table:style-name="ce26N2" office:value-type="float" office:value="53.89">
            <text:p>53,8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15.283048">
            <text:p>15,283</text:p>
          </table:table-cell>
          <table:table-cell table:style-name="ce26N2" office:value-type="float" office:value="631067.66">
            <text:p>631067,66</text:p>
          </table:table-cell>
          <table:table-cell table:style-name="ce26N2" office:value-type="float" office:value="647761.51">
            <text:p>647761,5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534998.93">
            <text:p>534998,93</text:p>
          </table:table-cell>
          <table:table-cell table:style-name="ce26N2" office:value-type="float" office:value="534.97">
            <text:p>534,9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4815.06">
            <text:p>4815,06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4077.73">
            <text:p>4077,7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71.03">
            <text:p>71,0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AC COELH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792" meta:object-count="0"/>
    <meta:generator>LibreOffice/4.3.0.4$Windows_x86 LibreOffice_project/62ad5818884a2fc2e5780dd45466868d41009ec0</meta:generator>
  </office:meta>
</office:document-meta>
</file>