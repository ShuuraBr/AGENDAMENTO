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9/06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8">
            <text:p>3089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98">
            <text:p>1175,9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97.54">
            <text:p>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5341904748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7">
            <text:p>30901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34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531.18">
            <text:p>365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02664">
            <text:p>20,027</text:p>
          </table:table-cell>
          <table:table-cell table:style-name="ce12N2" office:value-type="float" office:value="41.5">
            <text:p>4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531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98.6">
            <text:p>28998,60</text:p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.99">
            <text:p>260,99</text:p>
          </table:table-cell>
          <table:table-cell table:style-name="ce12N2" office:value-type="float" office:value="84.67">
            <text:p>8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245.37">
            <text:p>3245,37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1331.43">
            <text:p>133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3441574582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3">
            <text:p>3090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1.8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88">
            <text:p>0,028</text:p>
          </table:table-cell>
          <table:table-cell table:style-name="ce12N2" office:value-type="float" office:value="15.28">
            <text:p>1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87.8">
            <text:p>7687,80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9">
            <text:p>69,1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637.63">
            <text:p>6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18041930196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5">
            <text:p>3090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5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2">
            <text:p>0,006</text:p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4.62">
            <text:p>4074,62</text:p>
          </table:table-cell>
          <table:table-cell table:style-name="ce12N2" office:value-type="float" office:value="4.07">
            <text:p>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7">
            <text:p>36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337.95">
            <text:p>33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5211342735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6">
            <text:p>309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6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86">
            <text:p>0,004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62">
            <text:p>1531,62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127.03">
            <text:p>12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60711187336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8">
            <text:p>309108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6.98">
            <text:p>2576,98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19">
            <text:p>23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213.74">
            <text:p>21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11401821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9">
            <text:p>309109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6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10.75">
            <text:p>3710,75</text:p>
          </table:table-cell>
          <table:table-cell table:style-name="ce12N2" office:value-type="float" office:value="3.71">
            <text:p>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4">
            <text:p>33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307.77">
            <text:p>3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217425345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1">
            <text:p>309111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9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54.37">
            <text:p>164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5541.87">
            <text:p>15541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8673">
            <text:p>0,787</text:p>
          </table:table-cell>
          <table:table-cell table:style-name="ce12N2" office:value-type="float" office:value="75.23">
            <text:p>75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71.95">
            <text:p>13271,95</text:p>
          </table:table-cell>
          <table:table-cell table:style-name="ce12N2" office:value-type="float" office:value="13.27">
            <text:p>1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46">
            <text:p>119,4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912.5">
            <text:p>912,50</text:p>
          </table:table-cell>
          <table:table-cell table:style-name="ce12N2" office:value-type="float" office:value="13101.94">
            <text:p>13101,94</text:p>
          </table:table-cell>
          <table:table-cell table:style-name="ce12N2" office:value-type="float" office:value="917.13">
            <text:p>91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7159430000361550010000879501835786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2">
            <text:p>3091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4.3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6">
            <text:p>0,098</text:p>
          </table:table-cell>
          <table:table-cell table:style-name="ce12N2" office:value-type="float" office:value="48.4">
            <text:p>4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9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26">
            <text:p>15526,00</text:p>
          </table:table-cell>
          <table:table-cell table:style-name="ce12N2" office:value-type="float" office:value="15.53">
            <text:p>1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73">
            <text:p>139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1287.72">
            <text:p>128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43341524918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27">
            <text:p>30912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6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4.13">
            <text:p>222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1.29">
            <text:p>1751,29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6">
            <text:p>15,7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13.93">
            <text:p>213,93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80.41">
            <text:p>8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6131655941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0">
            <text:p>30913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2.71">
            <text:p>338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74">
            <text:p>27,7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00.51">
            <text:p>300,51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215.75">
            <text:p>2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6871002646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9">
            <text:p>309219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.89">
            <text:p>3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0.48">
            <text:p>3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4">
            <text:p>0,001</text:p>
          </table:table-cell>
          <table:table-cell table:style-name="ce12N2" office:value-type="float" office:value="0.19">
            <text:p>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30.48">
            <text:p>30,48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381986976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3">
            <text:p>3092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5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108">
            <text:p>0,030</text:p>
          </table:table-cell>
          <table:table-cell table:style-name="ce12N2" office:value-type="float" office:value="10.19">
            <text:p>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0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22.2">
            <text:p>6422,20</text:p>
          </table:table-cell>
          <table:table-cell table:style-name="ce12N2" office:value-type="float" office:value="6.42">
            <text:p>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">
            <text:p>5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532.66">
            <text:p>53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5651866437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4">
            <text:p>309224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9.0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4">
            <text:p>0,090</text:p>
          </table:table-cell>
          <table:table-cell table:style-name="ce12N2" office:value-type="float" office:value="57.08">
            <text:p>5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3.67">
            <text:p>4353,6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8">
            <text:p>39,18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361.1">
            <text:p>36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901711748741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5">
            <text:p>30922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9.1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82">
            <text:p>0,010</text:p>
          </table:table-cell>
          <table:table-cell table:style-name="ce12N2" office:value-type="float" office:value="6.75">
            <text:p>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3.51">
            <text:p>1123,51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1">
            <text:p>10,11</text:p>
          </table:table-cell>
          <table:table-cell table:style-name="ce12N2" office:value-type="float" office:value="37.99">
            <text:p>37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93.19">
            <text:p>9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91471239419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7">
            <text:p>3092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">
            <text:p>0,003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96.2">
            <text:p>2296,20</text:p>
          </table:table-cell>
          <table:table-cell table:style-name="ce12N2" office:value-type="float" office:value="2.3">
            <text:p>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82017149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1">
            <text:p>3092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2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207153627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5">
            <text:p>309235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6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4.26">
            <text:p>466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445.75">
            <text:p>4445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2">
            <text:p>0,059</text:p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2.11">
            <text:p>3752,11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7">
            <text:p>33,77</text:p>
          </table:table-cell>
          <table:table-cell table:style-name="ce12N2" office:value-type="float" office:value="40.34">
            <text:p>40,3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18.51">
            <text:p>218,51</text:p>
          </table:table-cell>
          <table:table-cell table:style-name="ce12N2" office:value-type="float" office:value="4445.75">
            <text:p>4445,75</text:p>
          </table:table-cell>
          <table:table-cell table:style-name="ce12N2" office:value-type="float" office:value="311.19">
            <text:p>31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69159760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0">
            <text:p>309240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7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7.64">
            <text:p>3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12.64">
            <text:p>3212,64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0.05">
            <text:p>0,05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2.52">
            <text:p>2912,52</text:p>
          </table:table-cell>
          <table:table-cell table:style-name="ce12N2" office:value-type="float" office:value="2.91">
            <text:p>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2">
            <text:p>26,2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77.64">
            <text:p>3477,64</text:p>
          </table:table-cell>
          <table:table-cell table:style-name="ce12N2" office:value-type="float" office:value="243.44">
            <text:p>24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27254297000178550010000107751693871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3">
            <text:p>30924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0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7.64">
            <text:p>547,64</text:p>
          </table:table-cell>
          <table:table-cell table:style-name="ce12N2" office:value-type="float" office:value="0.55">
            <text:p>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93">
            <text:p>4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45.42">
            <text:p>4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0821378128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2">
            <text:p>3092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6.35">
            <text:p>43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70.8">
            <text:p>417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52">
            <text:p>0,048</text:p>
          </table:table-cell>
          <table:table-cell table:style-name="ce12N2" office:value-type="float" office:value="39.36">
            <text:p>3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0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0.05">
            <text:p>3520,05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5.55">
            <text:p>135,55</text:p>
          </table:table-cell>
          <table:table-cell table:style-name="ce12N2" office:value-type="float" office:value="4170.8">
            <text:p>4170,80</text:p>
          </table:table-cell>
          <table:table-cell table:style-name="ce12N2" office:value-type="float" office:value="291.96">
            <text:p>29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8018641279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6">
            <text:p>3092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0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0591446448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7">
            <text:p>3092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1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38">
            <text:p>0,005</text:p>
          </table:table-cell>
          <table:table-cell table:style-name="ce12N2" office:value-type="float" office:value="4.51">
            <text:p>4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1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11.02">
            <text:p>6511,02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6">
            <text:p>58,6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540.02">
            <text:p>54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1551192158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4">
            <text:p>309284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2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.18">
            <text:p>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252.37">
            <text:p>252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26">
            <text:p>0,001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0.81">
            <text:p>10,81</text:p>
          </table:table-cell>
          <table:table-cell table:style-name="ce12N2" office:value-type="float" office:value="252.37">
            <text:p>252,37</text:p>
          </table:table-cell>
          <table:table-cell table:style-name="ce12N2" office:value-type="float" office:value="17.61">
            <text:p>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2115425518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1">
            <text:p>3093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3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376">
            <text:p>0,044</text:p>
          </table:table-cell>
          <table:table-cell table:style-name="ce12N2" office:value-type="float" office:value="30.76">
            <text:p>3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16.64">
            <text:p>7116,6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05">
            <text:p>64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590.25">
            <text:p>59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3591833447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0">
            <text:p>3093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2.35">
            <text:p>2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7.94">
            <text:p>1887,94</text:p>
          </table:table-cell>
          <table:table-cell table:style-name="ce12N2" office:value-type="float" office:value="1.89">
            <text:p>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99">
            <text:p>16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156.59">
            <text:p>15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3710461518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1">
            <text:p>3093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1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7.3">
            <text:p>1227,30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5">
            <text:p>11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101.79">
            <text:p>10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821374941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6">
            <text:p>3093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7.87">
            <text:p>11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5.98">
            <text:p>110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22">
            <text:p>0,003</text:p>
          </table:table-cell>
          <table:table-cell table:style-name="ce12N2" office:value-type="float" office:value="0.9">
            <text:p>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3.42">
            <text:p>933,4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71.89">
            <text:p>71,89</text:p>
          </table:table-cell>
          <table:table-cell table:style-name="ce12N2" office:value-type="float" office:value="1105.98">
            <text:p>1105,98</text:p>
          </table:table-cell>
          <table:table-cell table:style-name="ce12N2" office:value-type="float" office:value="77.42">
            <text:p>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3261806665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7">
            <text:p>309387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86.89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.25">
            <text:p>46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.68">
            <text:p>43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3.06">
            <text:p>383,06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28.57">
            <text:p>28,57</text:p>
          </table:table-cell>
          <table:table-cell table:style-name="ce12N2" office:value-type="float" office:value="439.68">
            <text:p>439,68</text:p>
          </table:table-cell>
          <table:table-cell table:style-name="ce12N2" office:value-type="float" office:value="17.59">
            <text:p>1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890658000300550030000868921542769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7">
            <text:p>309397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7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7">
            <text:p>0,087</text:p>
          </table:table-cell>
          <table:table-cell table:style-name="ce12N2" office:value-type="float" office:value="33.1">
            <text:p>3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500.85">
            <text:p>5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2296669000169550030000017881782303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0">
            <text:p>30942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01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01.26">
            <text:p>71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470.4">
            <text:p>64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0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7.01">
            <text:p>5637,01</text:p>
          </table:table-cell>
          <table:table-cell table:style-name="ce12N2" office:value-type="float" office:value="5.64">
            <text:p>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73">
            <text:p>50,73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630.86">
            <text:p>630,86</text:p>
          </table:table-cell>
          <table:table-cell table:style-name="ce12N2" office:value-type="float" office:value="6470.4">
            <text:p>6470,40</text:p>
          </table:table-cell>
          <table:table-cell table:style-name="ce12N2" office:value-type="float" office:value="258.82">
            <text:p>2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01412428352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4">
            <text:p>309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8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88">
            <text:p>0,002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2.34">
            <text:p>2402,34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62">
            <text:p>2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199.25">
            <text:p>19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8331110045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7">
            <text:p>3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5">
            <text:p>2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091.05">
            <text:p>10091,05</text:p>
          </table:table-cell>
          <table:table-cell table:style-name="ce26N2" office:value-type="float" office:value="764471.28">
            <text:p>764471,28</text:p>
          </table:table-cell>
          <table:table-cell table:style-name="ce26N2" office:value-type="float" office:value="52246.76">
            <text:p>52246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77012.26">
            <text:p>777012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8.057746">
            <text:p>28,058</text:p>
          </table:table-cell>
          <table:table-cell table:style-name="ce26N2" office:value-type="float" office:value="766656.21">
            <text:p>766656,21</text:p>
          </table:table-cell>
          <table:table-cell table:style-name="ce26N2" office:value-type="float" office:value="777012.26">
            <text:p>777012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42685.56">
            <text:p>642685,56</text:p>
          </table:table-cell>
          <table:table-cell table:style-name="ce26N2" office:value-type="float" office:value="642.75">
            <text:p>642,7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784.15">
            <text:p>5784,1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408.36">
            <text:p>9408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9.57">
            <text:p>79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04" meta:object-count="0"/>
    <meta:generator>LibreOffice/4.3.0.4$Windows_x86 LibreOffice_project/62ad5818884a2fc2e5780dd45466868d41009ec0</meta:generator>
  </office:meta>
</office:document-meta>
</file>