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5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0">
            <text:p>307860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86">
            <text:p>0,086</text:p>
          </table:table-cell>
          <table:table-cell table:style-name="ce12N2" office:value-type="float" office:value="204.96">
            <text:p>20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28115996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2">
            <text:p>30789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53">
            <text:p>11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35">
            <text:p>0,084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.9">
            <text:p>35,90</text:p>
          </table:table-cell>
          <table:table-cell table:style-name="ce12N2" office:value-type="float" office:value="1104.63">
            <text:p>1104,63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451702070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2">
            <text:p>30792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82">
            <text:p>421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7.8">
            <text:p>9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27.52">
            <text:p>527,52</text:p>
          </table:table-cell>
          <table:table-cell table:style-name="ce12N2" office:value-type="float" office:value="3684.3">
            <text:p>3684,30</text:p>
          </table:table-cell>
          <table:table-cell table:style-name="ce12N2" office:value-type="float" office:value="147.37">
            <text:p>14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111100832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4">
            <text:p>30793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43.56">
            <text:p>5264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44">
            <text:p>0,011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64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676.76">
            <text:p>4676,76</text:p>
          </table:table-cell>
          <table:table-cell table:style-name="ce12N2" office:value-type="float" office:value="47966.8">
            <text:p>47966,80</text:p>
          </table:table-cell>
          <table:table-cell table:style-name="ce12N2" office:value-type="float" office:value="3357.66">
            <text:p>335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1610026301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4">
            <text:p>308004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9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3.77">
            <text:p>622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52.91">
            <text:p>552,91</text:p>
          </table:table-cell>
          <table:table-cell table:style-name="ce12N2" office:value-type="float" office:value="5670.86">
            <text:p>5670,86</text:p>
          </table:table-cell>
          <table:table-cell table:style-name="ce12N2" office:value-type="float" office:value="396.95">
            <text:p>39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2.9">
            <text:p>18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08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182,9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0713221000160550020000091451000118020</text:p>
          </table:table-cell>
          <table:table-cell table:style-name="ce0" office:value-type="string" calcext:value-type="string">
            <text:p>3526051138956500020057005000400080100086351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3">
            <text:p>30802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8">
            <text:p>190,80</text:p>
          </table:table-cell>
          <table:table-cell table:style-name="ce12N2" office:value-type="float" office:value="13.36">
            <text:p>1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331602875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0">
            <text:p>30803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08.47">
            <text:p>130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0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09.47">
            <text:p>409,47</text:p>
          </table:table-cell>
          <table:table-cell table:style-name="ce12N2" office:value-type="float" office:value="12599">
            <text:p>12599,00</text:p>
          </table:table-cell>
          <table:table-cell table:style-name="ce12N2" office:value-type="float" office:value="881.93">
            <text:p>8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718726000135550010002006581282400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2">
            <text:p>308042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52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7.5">
            <text:p>7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59.85">
            <text:p>659,85</text:p>
          </table:table-cell>
          <table:table-cell table:style-name="ce12N2" office:value-type="float" office:value="6767.65">
            <text:p>6767,65</text:p>
          </table:table-cell>
          <table:table-cell table:style-name="ce12N2" office:value-type="float" office:value="462.38">
            <text:p>4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52214649530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2">
            <text:p>308052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71">
            <text:p>200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695">
            <text:p>0,167</text:p>
          </table:table-cell>
          <table:table-cell table:style-name="ce12N2" office:value-type="float" office:value="20.16">
            <text:p>2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3.26">
            <text:p>63,26</text:p>
          </table:table-cell>
          <table:table-cell table:style-name="ce12N2" office:value-type="float" office:value="1946.45">
            <text:p>1946,45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784124097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4">
            <text:p>30805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352">
            <text:p>0,038</text:p>
          </table:table-cell>
          <table:table-cell table:style-name="ce12N2" office:value-type="float" office:value="13.1">
            <text:p>1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96">
            <text:p>1873,96</text:p>
          </table:table-cell>
          <table:table-cell table:style-name="ce12N2" office:value-type="float" office:value="131.18">
            <text:p>1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5.31">
            <text:p>8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8.0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85,3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13576045000150550010000052981001875686</text:p>
          </table:table-cell>
          <table:table-cell table:style-name="ce0" office:value-type="string" calcext:value-type="string">
            <text:p>3526050522209200076357002000478043100678328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7">
            <text:p>308057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63.76">
            <text:p>54463,76</text:p>
          </table:table-cell>
          <table:table-cell table:style-name="ce12N2" office:value-type="float" office:value="2757.3">
            <text:p>2757,30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55145.9">
            <text:p>55145,90</text:p>
          </table:table-cell>
          <table:table-cell table:style-name="ce12N2" office:value-type="float" office:value="950">
            <text:p>950,00</text:p>
          </table:table-cell>
          <table:table-cell table:style-name="ce12N3" office:value-type="float" office:value="0.0468">
            <text:p>0,047</text:p>
          </table:table-cell>
          <table:table-cell table:style-name="ce12N2" office:value-type="float" office:value="93.92">
            <text:p>9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46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25.16">
            <text:p>1125,16</text:p>
          </table:table-cell>
          <table:table-cell table:style-name="ce12N2" office:value-type="float" office:value="53338.6">
            <text:p>53338,60</text:p>
          </table:table-cell>
          <table:table-cell table:style-name="ce12N2" office:value-type="float" office:value="3733.71">
            <text:p>373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491923003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62">
            <text:p>308162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2.8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7.8">
            <text:p>2473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2540.14">
            <text:p>22540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3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97.66">
            <text:p>2197,66</text:p>
          </table:table-cell>
          <table:table-cell table:style-name="ce12N2" office:value-type="float" office:value="22540.14">
            <text:p>22540,14</text:p>
          </table:table-cell>
          <table:table-cell table:style-name="ce12N2" office:value-type="float" office:value="1577.81">
            <text:p>15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9.38">
            <text:p>49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04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499,3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5260558329608000144550010002628581002628595</text:p>
          </table:table-cell>
          <table:table-cell table:style-name="ce0" office:value-type="string" calcext:value-type="string">
            <text:p>3526051138956500020057005000400043100086314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5">
            <text:p>30821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0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282.89">
            <text:p>4428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">
            <text:p>39,00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44726">
            <text:p>21,145</text:p>
          </table:table-cell>
          <table:table-cell table:style-name="ce12N2" office:value-type="float" office:value="7549.32">
            <text:p>754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28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69.16">
            <text:p>36969,16</text:p>
          </table:table-cell>
          <table:table-cell table:style-name="ce12N2" office:value-type="float" office:value="36.95">
            <text:p>3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.7">
            <text:p>332,7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40.59">
            <text:p>140,59</text:p>
          </table:table-cell>
          <table:table-cell table:style-name="ce12N2" office:value-type="float" office:value="44142.3">
            <text:p>44142,30</text:p>
          </table:table-cell>
          <table:table-cell table:style-name="ce12N2" office:value-type="float" office:value="3090.01">
            <text:p>309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70001000968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2757.3">
            <text:p>2757,30</text:p>
          </table:table-cell>
          <table:table-cell table:style-name="ce26N2" office:value-type="float" office:value="950">
            <text:p>9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333.14">
            <text:p>18333,14</text:p>
          </table:table-cell>
          <table:table-cell table:style-name="ce26N2" office:value-type="float" office:value="586689.11">
            <text:p>586689,11</text:p>
          </table:table-cell>
          <table:table-cell table:style-name="ce26N2" office:value-type="float" office:value="37980.14">
            <text:p>37980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7.59">
            <text:p>767,59</text:p>
          </table:table-cell>
          <table:table-cell table:style-name="ce26N2" office:value-type="float" office:value="605022.25">
            <text:p>605022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.274325">
            <text:p>32,274</text:p>
          </table:table-cell>
          <table:table-cell table:style-name="ce26N2" office:value-type="float" office:value="588496.41">
            <text:p>588496,41</text:p>
          </table:table-cell>
          <table:table-cell table:style-name="ce26N2" office:value-type="float" office:value="605022.25">
            <text:p>605022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527.32">
            <text:p>50527,32</text:p>
          </table:table-cell>
          <table:table-cell table:style-name="ce26N2" office:value-type="float" office:value="50.51">
            <text:p>50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4.73">
            <text:p>454,7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139.46">
            <text:p>10139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96">
            <text:p>39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