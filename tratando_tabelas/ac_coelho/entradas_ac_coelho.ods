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7/05/2026 05:30:39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1">
            <text:p>30571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5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08.11">
            <text:p>1850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32">
            <text:p>0,013</text:p>
          </table:table-cell>
          <table:table-cell table:style-name="ce12N2" office:value-type="float" office:value="16.15">
            <text:p>16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0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.95">
            <text:p>70,9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1664.11">
            <text:p>1664,11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673.76">
            <text:p>67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56315057216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6">
            <text:p>305716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3.18">
            <text:p>2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8">
            <text:p>0,002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8.76">
            <text:p>78,76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152.91">
            <text:p>15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8215793436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3">
            <text:p>3058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84">
            <text:p>0,001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61.15">
            <text:p>6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071552499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0">
            <text:p>3058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124.27">
            <text:p>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31929481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3">
            <text:p>3058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01">
            <text:p>0,008</text:p>
          </table:table-cell>
          <table:table-cell table:style-name="ce12N2" office:value-type="float" office:value="3.1">
            <text:p>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126.16">
            <text:p>1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211294236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1">
            <text:p>30586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424">
            <text:p>0,204</text:p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179.5">
            <text:p>17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41827498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08">
            <text:p>3059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912280999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6">
            <text:p>3059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31320523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8">
            <text:p>3059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41542576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0">
            <text:p>3059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51912913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1">
            <text:p>3059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11536624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3">
            <text:p>3059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31153193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4">
            <text:p>3059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410689356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5">
            <text:p>3059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51436875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6">
            <text:p>3059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61171361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0">
            <text:p>3059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119310678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1">
            <text:p>3059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01857683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2">
            <text:p>30595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21799502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9">
            <text:p>3059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8166014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1">
            <text:p>3059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913875308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3">
            <text:p>3059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012166513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5">
            <text:p>3059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212872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7">
            <text:p>3059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413542757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8">
            <text:p>3059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610155685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9">
            <text:p>3059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511086464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0">
            <text:p>3059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81446546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7">
            <text:p>3059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4.5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7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39.02">
            <text:p>3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456614501061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9">
            <text:p>3059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0.23">
            <text:p>143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0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7.29">
            <text:p>87,29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94.01">
            <text:p>9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3791725851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2">
            <text:p>30600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.63">
            <text:p>266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2.69">
            <text:p>162,69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175.21">
            <text:p>17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491155163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47">
            <text:p>3060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08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08">
            <text:p>0,011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40.84">
            <text:p>4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0831848202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60">
            <text:p>306060</text:p>
          </table:table-cell>
          <table:table-cell table:style-name="ce0" table:number-columns-spanned="4" table:number-rows-spanned="1" office:value-type="string" calcext:value-type="string">
            <text:p>20.282 - LOTUS COMERCIAL DE FERRAGENS E FERRAMENTAS LTDA</text:p>
          </table:table-cell>
          <table:covered-table-cell table:number-columns-repeated="3"/>
          <table:table-cell table:style-name="ce0" office:value-type="string" calcext:value-type="string">
            <text:p>404.1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28.44">
            <text:p>422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152.95">
            <text:p>415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08.9">
            <text:p>208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2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75.49">
            <text:p>75,49</text:p>
          </table:table-cell>
          <table:table-cell table:style-name="ce12N2" office:value-type="float" office:value="4152.95">
            <text:p>4152,95</text:p>
          </table:table-cell>
          <table:table-cell table:style-name="ce12N2" office:value-type="float" office:value="284.08">
            <text:p>28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9642566000191550010004041931073166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0">
            <text:p>30616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2.7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810.62">
            <text:p>8481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83193.37">
            <text:p>83193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867016">
            <text:p>8,867</text:p>
          </table:table-cell>
          <table:table-cell table:style-name="ce12N2" office:value-type="float" office:value="1910.81">
            <text:p>191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810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17.25">
            <text:p>1617,25</text:p>
          </table:table-cell>
          <table:table-cell table:style-name="ce12N2" office:value-type="float" office:value="83193.37">
            <text:p>83193,37</text:p>
          </table:table-cell>
          <table:table-cell table:style-name="ce12N2" office:value-type="float" office:value="5525.86">
            <text:p>552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27141379167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8">
            <text:p>3063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10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25">
            <text:p>0,055</text:p>
          </table:table-cell>
          <table:table-cell table:style-name="ce12N2" office:value-type="float" office:value="14.5">
            <text:p>1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5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54.7">
            <text:p>3954,70</text:p>
          </table:table-cell>
          <table:table-cell table:style-name="ce12N2" office:value-type="float" office:value="276.83">
            <text:p>27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1011602129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0">
            <text:p>3063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4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15">
            <text:p>0,033</text:p>
          </table:table-cell>
          <table:table-cell table:style-name="ce12N2" office:value-type="float" office:value="8.7">
            <text:p>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72.82">
            <text:p>2372,82</text:p>
          </table:table-cell>
          <table:table-cell table:style-name="ce12N2" office:value-type="float" office:value="166.1">
            <text:p>1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4081972692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3">
            <text:p>3063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4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5">
            <text:p>0,011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7.1">
            <text:p>807,10</text:p>
          </table:table-cell>
          <table:table-cell table:style-name="ce12N2" office:value-type="float" office:value="56.5">
            <text:p>5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4121851006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9">
            <text:p>306339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6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6.18">
            <text:p>3766,18</text:p>
          </table:table-cell>
          <table:table-cell table:style-name="ce12N2" office:value-type="float" office:value="150.65">
            <text:p>15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71860491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40">
            <text:p>306340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6.27">
            <text:p>93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15.61">
            <text:p>915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6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915.61">
            <text:p>915,61</text:p>
          </table:table-cell>
          <table:table-cell table:style-name="ce12N2" office:value-type="float" office:value="36.62">
            <text:p>3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91505141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8">
            <text:p>30637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522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49.48">
            <text:p>953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555">
            <text:p>0,806</text:p>
          </table:table-cell>
          <table:table-cell table:style-name="ce12N2" office:value-type="float" office:value="424.1">
            <text:p>42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4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.61">
            <text:p>82,6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3829.99">
            <text:p>3829,99</text:p>
          </table:table-cell>
          <table:table-cell table:style-name="ce12N2" office:value-type="float" office:value="91519.49">
            <text:p>91519,49</text:p>
          </table:table-cell>
          <table:table-cell table:style-name="ce12N2" office:value-type="float" office:value="6406.35">
            <text:p>640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5221341934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7">
            <text:p>306397</text:p>
          </table:table-cell>
          <table:table-cell table:style-name="ce0" table:number-columns-spanned="4" table:number-rows-spanned="1" office:value-type="string" calcext:value-type="string">
            <text:p>709 - MAX EBERHARDT UTILIDADES DOMESTICAS IMPORTACAO E REPRES LTDA</text:p>
          </table:table-cell>
          <table:covered-table-cell table:number-columns-repeated="3"/>
          <table:table-cell table:style-name="ce0" office:value-type="string" calcext:value-type="string">
            <text:p>156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29">
            <text:p>2472,29</text:p>
          </table:table-cell>
          <table:table-cell table:style-name="ce12N2" office:value-type="float" office:value="60.1">
            <text:p>60,10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81.5">
            <text:p>23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3">
            <text:p>0,002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50.89">
            <text:p>150,89</text:p>
          </table:table-cell>
          <table:table-cell table:style-name="ce12N2" office:value-type="float" office:value="2321.4">
            <text:p>2321,40</text:p>
          </table:table-cell>
          <table:table-cell table:style-name="ce12N2" office:value-type="float" office:value="162.5">
            <text:p>16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991334000129550010001561111437026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4">
            <text:p>3064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0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06.95">
            <text:p>4020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">
            <text:p>0,24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0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453.95">
            <text:p>2453,95</text:p>
          </table:table-cell>
          <table:table-cell table:style-name="ce12N2" office:value-type="float" office:value="37753">
            <text:p>37753,00</text:p>
          </table:table-cell>
          <table:table-cell table:style-name="ce12N2" office:value-type="float" office:value="2642.71">
            <text:p>264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01416482142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6">
            <text:p>3064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798.26">
            <text:p>7979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90242">
            <text:p>0,990</text:p>
          </table:table-cell>
          <table:table-cell table:style-name="ce12N2" office:value-type="float" office:value="316.25">
            <text:p>3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79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01.82">
            <text:p>101,82</text:p>
          </table:table-cell>
          <table:table-cell table:style-name="ce12N2" office:value-type="float" office:value="79696.44">
            <text:p>79696,44</text:p>
          </table:table-cell>
          <table:table-cell table:style-name="ce12N2" office:value-type="float" office:value="5578.75">
            <text:p>557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47119164320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7">
            <text:p>3064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4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1.26">
            <text:p>533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16">
            <text:p>0,056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25.38">
            <text:p>325,38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350.41">
            <text:p>35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49917708381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8">
            <text:p>3064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5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736">
            <text:p>0,009</text:p>
          </table:table-cell>
          <table:table-cell table:style-name="ce12N2" office:value-type="float" office:value="2.32">
            <text:p>2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0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05.56">
            <text:p>3005,56</text:p>
          </table:table-cell>
          <table:table-cell table:style-name="ce12N2" office:value-type="float" office:value="210.39">
            <text:p>21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54912247987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01">
            <text:p>3065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6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3">
            <text:p>0,00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7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79.28">
            <text:p>5779,28</text:p>
          </table:table-cell>
          <table:table-cell table:style-name="ce12N2" office:value-type="float" office:value="404.55">
            <text:p>40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624195505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19">
            <text:p>30651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3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30.34">
            <text:p>963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827.8">
            <text:p>882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2">
            <text:p>0,121</text:p>
          </table:table-cell>
          <table:table-cell table:style-name="ce12N2" office:value-type="float" office:value="84.02">
            <text:p>84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630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02.54">
            <text:p>802,54</text:p>
          </table:table-cell>
          <table:table-cell table:style-name="ce12N2" office:value-type="float" office:value="8827.8">
            <text:p>8827,80</text:p>
          </table:table-cell>
          <table:table-cell table:style-name="ce12N2" office:value-type="float" office:value="617.95">
            <text:p>61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317177295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1">
            <text:p>30652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4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3.87">
            <text:p>247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96">
            <text:p>23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6">
            <text:p>0,090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3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77.87">
            <text:p>77,87</text:p>
          </table:table-cell>
          <table:table-cell table:style-name="ce12N2" office:value-type="float" office:value="2396">
            <text:p>2396,00</text:p>
          </table:table-cell>
          <table:table-cell table:style-name="ce12N2" office:value-type="float" office:value="167.72">
            <text:p>16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4351676709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9">
            <text:p>30652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44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2.43">
            <text:p>322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1">
            <text:p>312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01.43">
            <text:p>101,43</text:p>
          </table:table-cell>
          <table:table-cell table:style-name="ce12N2" office:value-type="float" office:value="3121">
            <text:p>3121,00</text:p>
          </table:table-cell>
          <table:table-cell table:style-name="ce12N2" office:value-type="float" office:value="218.47">
            <text:p>21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44012933423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6">
            <text:p>30653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05.8">
            <text:p>830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59">
            <text:p>0,022</text:p>
          </table:table-cell>
          <table:table-cell table:style-name="ce12N2" office:value-type="float" office:value="29.29">
            <text:p>2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0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41503152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7">
            <text:p>30653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545.08">
            <text:p>1854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2728">
            <text:p>0,583</text:p>
          </table:table-cell>
          <table:table-cell table:style-name="ce12N2" office:value-type="float" office:value="76.55">
            <text:p>76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45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212522509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6">
            <text:p>306566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31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73.58">
            <text:p>1917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7759.1">
            <text:p>1775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05579">
            <text:p>10,056</text:p>
          </table:table-cell>
          <table:table-cell table:style-name="ce12N2" office:value-type="float" office:value="44.3">
            <text:p>4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7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.68">
            <text:p>71,6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414.48">
            <text:p>1414,48</text:p>
          </table:table-cell>
          <table:table-cell table:style-name="ce12N2" office:value-type="float" office:value="17759.1">
            <text:p>17759,10</text:p>
          </table:table-cell>
          <table:table-cell table:style-name="ce12N2" office:value-type="float" office:value="710.36">
            <text:p>71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13171687660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8">
            <text:p>306568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7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75.54">
            <text:p>3277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3129">
            <text:p>1,031</text:p>
          </table:table-cell>
          <table:table-cell table:style-name="ce12N2" office:value-type="float" office:value="102.16">
            <text:p>102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7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.35">
            <text:p>83,3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210.32">
            <text:p>1210,32</text:p>
          </table:table-cell>
          <table:table-cell table:style-name="ce12N2" office:value-type="float" office:value="31565.22">
            <text:p>31565,22</text:p>
          </table:table-cell>
          <table:table-cell table:style-name="ce12N2" office:value-type="float" office:value="2209.57">
            <text:p>220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76781577672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3">
            <text:p>306573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68.42">
            <text:p>1966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8202.54">
            <text:p>18202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4342">
            <text:p>12,434</text:p>
          </table:table-cell>
          <table:table-cell table:style-name="ce12N2" office:value-type="float" office:value="1442.54">
            <text:p>144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6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465.88">
            <text:p>1465,88</text:p>
          </table:table-cell>
          <table:table-cell table:style-name="ce12N2" office:value-type="float" office:value="18202.54">
            <text:p>18202,54</text:p>
          </table:table-cell>
          <table:table-cell table:style-name="ce12N2" office:value-type="float" office:value="1274.17">
            <text:p>127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07159430000361550010000874601088851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4">
            <text:p>306574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2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7.54">
            <text:p>141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17.54">
            <text:p>1417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28">
            <text:p>0,037</text:p>
          </table:table-cell>
          <table:table-cell table:style-name="ce12N2" office:value-type="float" office:value="10.46">
            <text:p>10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1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7.54">
            <text:p>1417,54</text:p>
          </table:table-cell>
          <table:table-cell table:style-name="ce12N2" office:value-type="float" office:value="99.23">
            <text:p>9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7.43">
            <text:p>10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74.922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30/04/2026</text:p>
          </table:table-cell>
          <table:table-cell table:style-name="ce12" office:value-type="string" calcext:value-type="string">
            <text:p>107,43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5260413576045000150550010000052791001826910</text:p>
          </table:table-cell>
          <table:table-cell table:style-name="ce0" office:value-type="string" calcext:value-type="string">
            <text:p>3526040522209200076357002000474922100647818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6">
            <text:p>30657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5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23.2">
            <text:p>952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677.15">
            <text:p>8677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75365">
            <text:p>0,775</text:p>
          </table:table-cell>
          <table:table-cell table:style-name="ce12N2" office:value-type="float" office:value="149.8">
            <text:p>14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2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.02">
            <text:p>79,0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46.05">
            <text:p>846,05</text:p>
          </table:table-cell>
          <table:table-cell table:style-name="ce12N2" office:value-type="float" office:value="8677.15">
            <text:p>8677,15</text:p>
          </table:table-cell>
          <table:table-cell table:style-name="ce12N2" office:value-type="float" office:value="347.09">
            <text:p>34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94164590001205500100081505311315725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59">
            <text:p>3066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904">
            <text:p>0,041</text:p>
          </table:table-cell>
          <table:table-cell table:style-name="ce12N2" office:value-type="float" office:value="9.34">
            <text:p>9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3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3.1">
            <text:p>3703,10</text:p>
          </table:table-cell>
          <table:table-cell table:style-name="ce12N2" office:value-type="float" office:value="259.22">
            <text:p>25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461841845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1">
            <text:p>3066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60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0.96">
            <text:p>2460,96</text:p>
          </table:table-cell>
          <table:table-cell table:style-name="ce12N2" office:value-type="float" office:value="172.27">
            <text:p>17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231488772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2">
            <text:p>3066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968">
            <text:p>0,010</text:p>
          </table:table-cell>
          <table:table-cell table:style-name="ce12N2" office:value-type="float" office:value="2.28">
            <text:p>2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112.28">
            <text:p>1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121026499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8">
            <text:p>306668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46.24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0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0.37">
            <text:p>640,37</text:p>
          </table:table-cell>
          <table:table-cell table:style-name="ce12N2" office:value-type="float" office:value="76.84">
            <text:p>7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462471179714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9">
            <text:p>306669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46.254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0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01.85">
            <text:p>3201,85</text:p>
          </table:table-cell>
          <table:table-cell table:style-name="ce12N2" office:value-type="float" office:value="384.22">
            <text:p>384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582901000001522550100001462541960234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2">
            <text:p>3066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0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08">
            <text:p>0,015</text:p>
          </table:table-cell>
          <table:table-cell table:style-name="ce12N2" office:value-type="float" office:value="4.43">
            <text:p>4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6.09">
            <text:p>4496,09</text:p>
          </table:table-cell>
          <table:table-cell table:style-name="ce12N2" office:value-type="float" office:value="314.73">
            <text:p>31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0731926027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6">
            <text:p>306716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6.84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.8">
            <text:p>14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.67">
            <text:p>9,67</text:p>
          </table:table-cell>
          <table:table-cell table:style-name="ce12N2" office:value-type="float" office:value="158.47">
            <text:p>158,47</text:p>
          </table:table-cell>
          <table:table-cell table:style-name="ce12N2" office:value-type="float" office:value="11.09">
            <text:p>1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547907000153550050003168441492652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8">
            <text:p>306718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78.0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4.17">
            <text:p>1326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2355.2">
            <text:p>1235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026">
            <text:p>1,050</text:p>
          </table:table-cell>
          <table:table-cell table:style-name="ce12N2" office:value-type="float" office:value="92.08">
            <text:p>9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64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08.97">
            <text:p>908,97</text:p>
          </table:table-cell>
          <table:table-cell table:style-name="ce12N2" office:value-type="float" office:value="12355.2">
            <text:p>12355,20</text:p>
          </table:table-cell>
          <table:table-cell table:style-name="ce12N2" office:value-type="float" office:value="864.86">
            <text:p>86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90658000300550030000780241405676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54">
            <text:p>306754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41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06.37">
            <text:p>780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108.5">
            <text:p>710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9">
            <text:p>0,003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06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.32">
            <text:p>57,3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97.87">
            <text:p>697,87</text:p>
          </table:table-cell>
          <table:table-cell table:style-name="ce12N2" office:value-type="float" office:value="7108.5">
            <text:p>7108,50</text:p>
          </table:table-cell>
          <table:table-cell table:style-name="ce12N2" office:value-type="float" office:value="284.34">
            <text:p>28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14151168111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69">
            <text:p>306769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3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2.28">
            <text:p>50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12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45.28">
            <text:p>445,28</text:p>
          </table:table-cell>
          <table:table-cell table:style-name="ce12N2" office:value-type="float" office:value="4567">
            <text:p>4567,00</text:p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616460000152550020000713281306751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71">
            <text:p>306771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6.6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">
            <text:p>1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">
            <text:p>1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">
            <text:p>130,00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48556330001405500100007665414710086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3">
            <text:p>306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92">
            <text:p>287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75.53">
            <text:p>175,53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108.02">
            <text:p>10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91705951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4">
            <text:p>3067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7.28">
            <text:p>191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0.26">
            <text:p>18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17.02">
            <text:p>117,02</text:p>
          </table:table-cell>
          <table:table-cell table:style-name="ce12N2" office:value-type="float" office:value="1800.26">
            <text:p>1800,26</text:p>
          </table:table-cell>
          <table:table-cell table:style-name="ce12N2" office:value-type="float" office:value="72.01">
            <text:p>7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601270059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1">
            <text:p>3068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3.0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34.01">
            <text:p>2643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5783.04">
            <text:p>25783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642">
            <text:p>0,476</text:p>
          </table:table-cell>
          <table:table-cell table:style-name="ce12N2" office:value-type="float" office:value="56.65">
            <text:p>56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434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650.97">
            <text:p>650,97</text:p>
          </table:table-cell>
          <table:table-cell table:style-name="ce12N2" office:value-type="float" office:value="25783.04">
            <text:p>25783,04</text:p>
          </table:table-cell>
          <table:table-cell table:style-name="ce12N2" office:value-type="float" office:value="1265.66">
            <text:p>126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30371035091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3">
            <text:p>306803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4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7.56">
            <text:p>2070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9470.06">
            <text:p>19470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847">
            <text:p>3,985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707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237.5">
            <text:p>1237,50</text:p>
          </table:table-cell>
          <table:table-cell table:style-name="ce12N2" office:value-type="float" office:value="19328.84">
            <text:p>19328,84</text:p>
          </table:table-cell>
          <table:table-cell table:style-name="ce12N2" office:value-type="float" office:value="1353.01">
            <text:p>135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071594300003615500100008744917433596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6">
            <text:p>306806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78.0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08.53">
            <text:p>2990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28002.68">
            <text:p>28002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7.32">
            <text:p>37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908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905.85">
            <text:p>1905,85</text:p>
          </table:table-cell>
          <table:table-cell table:style-name="ce12N2" office:value-type="float" office:value="28002.68">
            <text:p>28002,68</text:p>
          </table:table-cell>
          <table:table-cell table:style-name="ce12N2" office:value-type="float" office:value="1120.05">
            <text:p>112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906580003005500300007808813581853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6">
            <text:p>306816</text:p>
          </table:table-cell>
          <table:table-cell table:style-name="ce0" table:number-columns-spanned="4" table:number-rows-spanned="1" office:value-type="string" calcext:value-type="string">
            <text:p>38.321 - S&amp;P BRASIL VENTILACAO LTDA.</text:p>
          </table:table-cell>
          <table:covered-table-cell table:number-columns-repeated="3"/>
          <table:table-cell table:style-name="ce0" office:value-type="string" calcext:value-type="string">
            <text:p>35.5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01.28">
            <text:p>790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01.28">
            <text:p>7901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01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01.28">
            <text:p>7901,28</text:p>
          </table:table-cell>
          <table:table-cell table:style-name="ce12N2" office:value-type="float" office:value="316.05">
            <text:p>3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26595070004125500100003555111600083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6">
            <text:p>306826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0.441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31.62">
            <text:p>453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473.82">
            <text:p>4473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0978">
            <text:p>0,181</text:p>
          </table:table-cell>
          <table:table-cell table:style-name="ce12N2" office:value-type="float" office:value="29.27">
            <text:p>29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3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75">
            <text:p>75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57.8">
            <text:p>57,80</text:p>
          </table:table-cell>
          <table:table-cell table:style-name="ce12N2" office:value-type="float" office:value="4473.82">
            <text:p>4473,82</text:p>
          </table:table-cell>
          <table:table-cell table:style-name="ce12N2" office:value-type="float" office:value="183">
            <text:p>1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0441120048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0">
            <text:p>30685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0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1.19">
            <text:p>186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02.6">
            <text:p>180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621">
            <text:p>0,226</text:p>
          </table:table-cell>
          <table:table-cell table:style-name="ce12N2" office:value-type="float" office:value="7.52">
            <text:p>7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61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58.59">
            <text:p>58,59</text:p>
          </table:table-cell>
          <table:table-cell table:style-name="ce12N2" office:value-type="float" office:value="1802.6">
            <text:p>1802,60</text:p>
          </table:table-cell>
          <table:table-cell table:style-name="ce12N2" office:value-type="float" office:value="74.73">
            <text:p>7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0421845374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78">
            <text:p>78,00</text:p>
          </table:table-cell>
          <table:table-cell table:style-name="ce26N2" office:value-type="float" office:value="60.1">
            <text:p>60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075.86">
            <text:p>23075,86</text:p>
          </table:table-cell>
          <table:table-cell table:style-name="ce26N2" office:value-type="float" office:value="587976.87">
            <text:p>587976,87</text:p>
          </table:table-cell>
          <table:table-cell table:style-name="ce26N2" office:value-type="float" office:value="37156.04">
            <text:p>37156,0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7.43">
            <text:p>107,43</text:p>
          </table:table-cell>
          <table:table-cell table:style-name="ce26N2" office:value-type="float" office:value="643419.36">
            <text:p>643419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2.928793">
            <text:p>42,929</text:p>
          </table:table-cell>
          <table:table-cell table:style-name="ce26N2" office:value-type="float" office:value="620403.6">
            <text:p>620403,60</text:p>
          </table:table-cell>
          <table:table-cell table:style-name="ce26N2" office:value-type="float" office:value="643419.36">
            <text:p>643419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771.61">
            <text:p>5771,6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2.62">
            <text:p>52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86" meta:object-count="0"/>
    <meta:generator>LibreOffice/4.3.0.4$Windows_x86 LibreOffice_project/62ad5818884a2fc2e5780dd45466868d41009ec0</meta:generator>
  </office:meta>
</office:document-meta>
</file>