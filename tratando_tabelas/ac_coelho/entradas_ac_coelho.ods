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5/06/2026 07:40:1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0">
            <text:p>3093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7.94">
            <text:p>1887,94</text:p>
          </table:table-cell>
          <table:table-cell table:style-name="ce12N2" office:value-type="float" office:value="1.89">
            <text:p>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99">
            <text:p>16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156.59">
            <text:p>15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371046151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1">
            <text:p>3093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1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7.3">
            <text:p>1227,30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5">
            <text:p>11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101.79">
            <text:p>10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821374941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4">
            <text:p>309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8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8">
            <text:p>0,002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2.34">
            <text:p>2402,34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62">
            <text:p>2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199.25">
            <text:p>1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8331110045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69">
            <text:p>3094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2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2.84">
            <text:p>9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11">
            <text:p>0,001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3.4">
            <text:p>723,40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55.71">
            <text:p>55,71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2401091218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5">
            <text:p>309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5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76.94">
            <text:p>14947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9322.78">
            <text:p>14932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345977">
            <text:p>4,346</text:p>
          </table:table-cell>
          <table:table-cell table:style-name="ce12N2" office:value-type="float" office:value="1306.75">
            <text:p>130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476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046.33">
            <text:p>126046,33</text:p>
          </table:table-cell>
          <table:table-cell table:style-name="ce12N2" office:value-type="float" office:value="126.05">
            <text:p>12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4.42">
            <text:p>1134,42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4.16">
            <text:p>154,16</text:p>
          </table:table-cell>
          <table:table-cell table:style-name="ce12N2" office:value-type="float" office:value="148981.94">
            <text:p>148981,94</text:p>
          </table:table-cell>
          <table:table-cell table:style-name="ce12N2" office:value-type="float" office:value="10428.74">
            <text:p>1042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50191131332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6">
            <text:p>30953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6025">
            <text:p>0,326</text:p>
          </table:table-cell>
          <table:table-cell table:style-name="ce12N2" office:value-type="float" office:value="25.81">
            <text:p>25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2">
            <text:p>3322,0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">
            <text:p>29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275.53">
            <text:p>27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417550746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7">
            <text:p>309537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00872">
            <text:p>7,009</text:p>
          </table:table-cell>
          <table:table-cell table:style-name="ce12N2" office:value-type="float" office:value="117.6">
            <text:p>1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2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57.59">
            <text:p>17157,59</text:p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42">
            <text:p>154,4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1423.07">
            <text:p>1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615612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1">
            <text:p>309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1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56.68">
            <text:p>3156,68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261.82">
            <text:p>26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1361803885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3">
            <text:p>3095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2137015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4">
            <text:p>3095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0.87">
            <text:p>152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.18">
            <text:p>1243,1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103.11">
            <text:p>10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41904117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6">
            <text:p>30956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3181958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7">
            <text:p>3095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1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20.32">
            <text:p>4420,3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8">
            <text:p>39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366.63">
            <text:p>36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152214368079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8">
            <text:p>3095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85.61">
            <text:p>3785,61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07">
            <text:p>34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313.98">
            <text:p>31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7131778819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4">
            <text:p>30959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4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4.62">
            <text:p>2164,62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8">
            <text:p>19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179.54">
            <text:p>17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51886412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7">
            <text:p>3096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6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09">
            <text:p>307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96">
            <text:p>0,049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3.19">
            <text:p>2363,19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27">
            <text:p>21,2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273.01">
            <text:p>273,01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196.01">
            <text:p>19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68131832498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8">
            <text:p>309608</text:p>
          </table:table-cell>
          <table:table-cell table:style-name="ce0" table:number-columns-spanned="4" table:number-rows-spanned="1" office:value-type="string" calcext:value-type="string">
            <text:p>26 - TECNOPERFIL PLASTICOS LTDA</text:p>
          </table:table-cell>
          <table:covered-table-cell table:number-columns-repeated="3"/>
          <table:table-cell table:style-name="ce0" office:value-type="string" calcext:value-type="string">
            <text:p>18.0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87">
            <text:p>195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98">
            <text:p>0,155</text:p>
          </table:table-cell>
          <table:table-cell table:style-name="ce12N2" office:value-type="float" office:value="32.94">
            <text:p>3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5.99">
            <text:p>1545,99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1">
            <text:p>13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19.07">
            <text:p>119,07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128.23">
            <text:p>1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341857000175550030000180381303298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9">
            <text:p>3096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4">
            <text:p>8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7004">
            <text:p>0,707</text:p>
          </table:table-cell>
          <table:table-cell table:style-name="ce12N2" office:value-type="float" office:value="52.22">
            <text:p>5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37.13">
            <text:p>6837,13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53">
            <text:p>61,53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767.84">
            <text:p>767,84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341.36">
            <text:p>34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1951453167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9">
            <text:p>3096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3.93">
            <text:p>1953,93</text:p>
          </table:table-cell>
          <table:table-cell table:style-name="ce12N2" office:value-type="float" office:value="161">
            <text:p>161,00</text:p>
          </table:table-cell>
          <table:table-cell table:style-name="ce12N3" office:value-type="float" office:value="0.162623">
            <text:p>0,163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.26">
            <text:p>1702,26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3">
            <text:p>15,3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84.58">
            <text:p>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071464790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7">
            <text:p>30968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59">
            <text:p>240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3.09">
            <text:p>1963,09</text:p>
          </table:table-cell>
          <table:table-cell table:style-name="ce12N2" office:value-type="float" office:value="1.96">
            <text:p>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67">
            <text:p>17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5.59">
            <text:p>75,59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162.82">
            <text:p>16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714033457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9">
            <text:p>30968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6.35">
            <text:p>369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.43">
            <text:p>3021,43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19">
            <text:p>27,1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6.35">
            <text:p>116,35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250.6">
            <text:p>25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71392934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1">
            <text:p>309701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5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.27">
            <text:p>1485,27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123.19">
            <text:p>12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536173624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7">
            <text:p>3097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72.59">
            <text:p>350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491">
            <text:p>0,317</text:p>
          </table:table-cell>
          <table:table-cell table:style-name="ce12N2" office:value-type="float" office:value="72.8">
            <text:p>7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0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02.37">
            <text:p>29202,37</text:p>
          </table:table-cell>
          <table:table-cell table:style-name="ce12N2" office:value-type="float" office:value="29.2">
            <text:p>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.83">
            <text:p>262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1.52">
            <text:p>471,52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2422.05">
            <text:p>242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071268184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1">
            <text:p>309721</text:p>
          </table:table-cell>
          <table:table-cell table:style-name="ce0" table:number-columns-spanned="4" table:number-rows-spanned="1" office:value-type="string" calcext:value-type="string">
            <text:p>34.021 - ELG COMERCIO DE ELETRONICOS LTDA</text:p>
          </table:table-cell>
          <table:covered-table-cell table:number-columns-repeated="3"/>
          <table:table-cell table:style-name="ce0" office:value-type="string" calcext:value-type="string">
            <text:p>52.6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.79">
            <text:p>25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.8">
            <text:p>23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1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.91">
            <text:p>208,91</text:p>
          </table:table-cell>
          <table:table-cell table:style-name="ce12N2" office:value-type="float" office:value="0.21">
            <text:p>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88">
            <text:p>1,8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.99">
            <text:p>11,99</text:p>
          </table:table-cell>
          <table:table-cell table:style-name="ce12N2" office:value-type="float" office:value="239.8">
            <text:p>239,80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72877800001025500100005267113969069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2">
            <text:p>309722</text:p>
          </table:table-cell>
          <table:table-cell table:style-name="ce0" table:number-columns-spanned="4" table:number-rows-spanned="1" office:value-type="string" calcext:value-type="string">
            <text:p>37.407 - ELG PEDESTAIS LTDA</text:p>
          </table:table-cell>
          <table:covered-table-cell table:number-columns-repeated="3"/>
          <table:table-cell table:style-name="ce0" office:value-type="string" calcext:value-type="string">
            <text:p>102.6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46.66">
            <text:p>1134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0785.84">
            <text:p>1078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4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76.48">
            <text:p>9976,48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.79">
            <text:p>89,7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60.82">
            <text:p>560,82</text:p>
          </table:table-cell>
          <table:table-cell table:style-name="ce12N2" office:value-type="float" office:value="10785.84">
            <text:p>10785,84</text:p>
          </table:table-cell>
          <table:table-cell table:style-name="ce12N2" office:value-type="float" office:value="431.43">
            <text:p>43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5012368000193550030001026731534595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7">
            <text:p>309727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5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6.26">
            <text:p>65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88.24">
            <text:p>598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65.79">
            <text:p>5365,7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28">
            <text:p>48,2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98.02">
            <text:p>598,02</text:p>
          </table:table-cell>
          <table:table-cell table:style-name="ce12N2" office:value-type="float" office:value="5988.24">
            <text:p>5988,24</text:p>
          </table:table-cell>
          <table:table-cell table:style-name="ce12N2" office:value-type="float" office:value="419.19">
            <text:p>41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65121829304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9">
            <text:p>309729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6.2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32">
            <text:p>482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16">
            <text:p>0,005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6.44">
            <text:p>3486,44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7">
            <text:p>31,3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310.09">
            <text:p>31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2782366000188550030002762861870235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4">
            <text:p>30975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91.3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7.47">
            <text:p>292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6.47">
            <text:p>2186,47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8">
            <text:p>19,68</text:p>
          </table:table-cell>
          <table:table-cell table:style-name="ce12N2" office:value-type="float" office:value="52.78">
            <text:p>52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36.79">
            <text:p>336,79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181.35">
            <text:p>18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913411572801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5">
            <text:p>30975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3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52.53">
            <text:p>2295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5356">
            <text:p>0,365</text:p>
          </table:table-cell>
          <table:table-cell table:style-name="ce12N2" office:value-type="float" office:value="89.26">
            <text:p>8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95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296.67">
            <text:p>19296,67</text:p>
          </table:table-cell>
          <table:table-cell table:style-name="ce12N2" office:value-type="float" office:value="19.3">
            <text:p>1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3.67">
            <text:p>173,6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283.09">
            <text:p>283,09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1405.91">
            <text:p>140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301178858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4">
            <text:p>3097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8.96">
            <text:p>6028,96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6">
            <text:p>54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500.05">
            <text:p>50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161477409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5">
            <text:p>3097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31">
            <text:p>14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45">
            <text:p>0,008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.12">
            <text:p>1222,12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101.38">
            <text:p>10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281789343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7">
            <text:p>3097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8.09">
            <text:p>13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205">
            <text:p>0,027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9.04">
            <text:p>1119,04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7">
            <text:p>10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2.17">
            <text:p>42,17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92.81">
            <text:p>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71531125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8">
            <text:p>3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1">
            <text:p>16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851.46">
            <text:p>4851,46</text:p>
          </table:table-cell>
          <table:table-cell table:style-name="ce26N2" office:value-type="float" office:value="1018700.91">
            <text:p>1018700,91</text:p>
          </table:table-cell>
          <table:table-cell table:style-name="ce26N2" office:value-type="float" office:value="70508.28">
            <text:p>70508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23903.21">
            <text:p>1023903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1.035278">
            <text:p>21,035</text:p>
          </table:table-cell>
          <table:table-cell table:style-name="ce26N2" office:value-type="float" office:value="1018890.75">
            <text:p>1018890,75</text:p>
          </table:table-cell>
          <table:table-cell table:style-name="ce26N2" office:value-type="float" office:value="1023903.21">
            <text:p>1023903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54997.45">
            <text:p>854997,45</text:p>
          </table:table-cell>
          <table:table-cell table:style-name="ce26N2" office:value-type="float" office:value="855.02">
            <text:p>855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694.96">
            <text:p>7694,9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1801.85">
            <text:p>11801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1.24">
            <text:p>81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70" meta:object-count="0"/>
    <meta:generator>LibreOffice/4.3.0.4$Windows_x86 LibreOffice_project/62ad5818884a2fc2e5780dd45466868d41009ec0</meta:generator>
  </office:meta>
</office:document-meta>
</file>