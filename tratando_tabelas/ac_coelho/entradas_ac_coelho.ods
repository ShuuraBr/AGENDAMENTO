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06/05/2026 08:38:37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0155">
            <text:p>300155</text:p>
          </table:table-cell>
          <table:table-cell table:style-name="ce0" table:number-columns-spanned="4" table:number-rows-spanned="1" office:value-type="string" calcext:value-type="string">
            <text:p>34.619 - STECK INDUSTRIA ELETRICA LTDA</text:p>
          </table:table-cell>
          <table:covered-table-cell table:number-columns-repeated="3"/>
          <table:table-cell table:style-name="ce0" office:value-type="string" calcext:value-type="string">
            <text:p>60.35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1/2026</text:p>
          </table:table-cell>
          <table:table-cell table:style-name="ce0" office:value-type="string" calcext:value-type="string">
            <text:p>29/01/2026</text:p>
          </table:table-cell>
          <table:table-cell table:style-name="ce0" office:value-type="string" calcext:value-type="string">
            <text:p>26/02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6.21">
            <text:p>866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38.95">
            <text:p>838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147">
            <text:p>0,015</text:p>
          </table:table-cell>
          <table:table-cell table:style-name="ce12N2" office:value-type="float" office:value="1.17">
            <text:p>1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6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1/2026</text:p>
          </table:table-cell>
          <table:table-cell table:style-name="ce12N2" office:value-type="float" office:value="27.26">
            <text:p>27,26</text:p>
          </table:table-cell>
          <table:table-cell table:style-name="ce12N2" office:value-type="float" office:value="838.95">
            <text:p>838,95</text:p>
          </table:table-cell>
          <table:table-cell table:style-name="ce12N2" office:value-type="float" office:value="58.73">
            <text:p>58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1058906580003005500300006035918593164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0446">
            <text:p>300446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3.1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1/2026</text:p>
          </table:table-cell>
          <table:table-cell table:style-name="ce0" office:value-type="string" calcext:value-type="string">
            <text:p>02/02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2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1248556330001405500100007319815002377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48">
            <text:p>305248</text:p>
          </table:table-cell>
          <table:table-cell table:style-name="ce0" table:number-columns-spanned="4" table:number-rows-spanned="1" office:value-type="string" calcext:value-type="string">
            <text:p>17.434 - SAINT-GOBAIN DO BRASIL PRODUTOS INDUSTRIAIS PARA CONST LTDA</text:p>
          </table:table-cell>
          <table:covered-table-cell table:number-columns-repeated="3"/>
          <table:table-cell table:style-name="ce0" office:value-type="string" calcext:value-type="string">
            <text:p>516.2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26.6">
            <text:p>482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4687.5">
            <text:p>4687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2688">
            <text:p>0,363</text:p>
          </table:table-cell>
          <table:table-cell table:style-name="ce12N2" office:value-type="float" office:value="295.62">
            <text:p>295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26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139.1">
            <text:p>139,10</text:p>
          </table:table-cell>
          <table:table-cell table:style-name="ce12N2" office:value-type="float" office:value="4687.5">
            <text:p>4687,50</text:p>
          </table:table-cell>
          <table:table-cell table:style-name="ce12N2" office:value-type="float" office:value="198.3">
            <text:p>19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0648380165605500100051623917761966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6">
            <text:p>30545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4.23">
            <text:p>594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577.99">
            <text:p>577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3025">
            <text:p>0,203</text:p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94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6.24">
            <text:p>16,24</text:p>
          </table:table-cell>
          <table:table-cell table:style-name="ce12N2" office:value-type="float" office:value="577.99">
            <text:p>577,99</text:p>
          </table:table-cell>
          <table:table-cell table:style-name="ce12N2" office:value-type="float" office:value="23.13">
            <text:p>2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517838055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8">
            <text:p>30545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55.28">
            <text:p>2055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039.04">
            <text:p>2039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9097">
            <text:p>0,209</text:p>
          </table:table-cell>
          <table:table-cell table:style-name="ce12N2" office:value-type="float" office:value="10.88">
            <text:p>10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55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6.24">
            <text:p>16,24</text:p>
          </table:table-cell>
          <table:table-cell table:style-name="ce12N2" office:value-type="float" office:value="2039.04">
            <text:p>2039,04</text:p>
          </table:table-cell>
          <table:table-cell table:style-name="ce12N2" office:value-type="float" office:value="81.57">
            <text:p>8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711356348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9">
            <text:p>30545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43.26">
            <text:p>3043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861.31">
            <text:p>2861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601">
            <text:p>0,246</text:p>
          </table:table-cell>
          <table:table-cell table:style-name="ce12N2" office:value-type="float" office:value="31.21">
            <text:p>31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43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81.95">
            <text:p>181,95</text:p>
          </table:table-cell>
          <table:table-cell table:style-name="ce12N2" office:value-type="float" office:value="2861.31">
            <text:p>2861,31</text:p>
          </table:table-cell>
          <table:table-cell table:style-name="ce12N2" office:value-type="float" office:value="114.45">
            <text:p>11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813615421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0">
            <text:p>30546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8.62">
            <text:p>538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25.77">
            <text:p>525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2267">
            <text:p>0,172</text:p>
          </table:table-cell>
          <table:table-cell table:style-name="ce12N2" office:value-type="float" office:value="7.33">
            <text:p>7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38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2.85">
            <text:p>12,85</text:p>
          </table:table-cell>
          <table:table-cell table:style-name="ce12N2" office:value-type="float" office:value="525.77">
            <text:p>525,77</text:p>
          </table:table-cell>
          <table:table-cell table:style-name="ce12N2" office:value-type="float" office:value="21.04">
            <text:p>2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91144783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1">
            <text:p>30546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011028759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7">
            <text:p>30546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41374613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8">
            <text:p>30546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518640544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9">
            <text:p>30546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617305496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8">
            <text:p>30547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314033898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9">
            <text:p>30547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718834478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81">
            <text:p>30548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8.8">
            <text:p>138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30.34">
            <text:p>130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4644">
            <text:p>0,045</text:p>
          </table:table-cell>
          <table:table-cell table:style-name="ce12N2" office:value-type="float" office:value="2.05">
            <text:p>2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8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8.46">
            <text:p>8,46</text:p>
          </table:table-cell>
          <table:table-cell table:style-name="ce12N2" office:value-type="float" office:value="130.34">
            <text:p>130,34</text:p>
          </table:table-cell>
          <table:table-cell table:style-name="ce12N2" office:value-type="float" office:value="5.22">
            <text:p>5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913382543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82">
            <text:p>3054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819235574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24">
            <text:p>305624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6.5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.52">
            <text:p>164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9.9">
            <text:p>149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4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">
            <text:p>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4.62">
            <text:p>14,62</text:p>
          </table:table-cell>
          <table:table-cell table:style-name="ce12N2" office:value-type="float" office:value="149.9">
            <text:p>149,90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4292449000002475500100006652711431384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11">
            <text:p>305711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0.56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508.11">
            <text:p>18508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6844">
            <text:p>1684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32">
            <text:p>0,013</text:p>
          </table:table-cell>
          <table:table-cell table:style-name="ce12N2" office:value-type="float" office:value="16.15">
            <text:p>16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508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.95">
            <text:p>70,9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1664.11">
            <text:p>1664,11</text:p>
          </table:table-cell>
          <table:table-cell table:style-name="ce12N2" office:value-type="float" office:value="16844">
            <text:p>16844,00</text:p>
          </table:table-cell>
          <table:table-cell table:style-name="ce12N2" office:value-type="float" office:value="673.76">
            <text:p>67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356353460001405500200011056315057216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16">
            <text:p>305716</text:p>
          </table:table-cell>
          <table:table-cell table:style-name="ce0" table:number-columns-spanned="4" table:number-rows-spanned="1" office:value-type="string" calcext:value-type="string">
            <text:p>736 - BEMFIXA INDUSTRIAL LTDA</text:p>
          </table:table-cell>
          <table:covered-table-cell table:number-columns-repeated="3"/>
          <table:table-cell table:style-name="ce0" office:value-type="string" calcext:value-type="string">
            <text:p>210.2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63.18">
            <text:p>226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184.42">
            <text:p>2184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8">
            <text:p>0,002</text:p>
          </table:table-cell>
          <table:table-cell table:style-name="ce12N2" office:value-type="float" office:value="2.04">
            <text:p>2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63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78.76">
            <text:p>78,76</text:p>
          </table:table-cell>
          <table:table-cell table:style-name="ce12N2" office:value-type="float" office:value="2184.42">
            <text:p>2184,42</text:p>
          </table:table-cell>
          <table:table-cell table:style-name="ce12N2" office:value-type="float" office:value="152.91">
            <text:p>15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8019730001145500100021028215793436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03">
            <text:p>30580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73.53">
            <text:p>873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3.53">
            <text:p>873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84">
            <text:p>0,001</text:p>
          </table:table-cell>
          <table:table-cell table:style-name="ce12N2" office:value-type="float" office:value="1.75">
            <text:p>1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73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3.53">
            <text:p>873,53</text:p>
          </table:table-cell>
          <table:table-cell table:style-name="ce12N2" office:value-type="float" office:value="61.15">
            <text:p>61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0715524998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0">
            <text:p>30582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73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5.28">
            <text:p>1775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75.28">
            <text:p>1775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48">
            <text:p>0,006</text:p>
          </table:table-cell>
          <table:table-cell table:style-name="ce12N2" office:value-type="float" office:value="1.02">
            <text:p>1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75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5.28">
            <text:p>1775,28</text:p>
          </table:table-cell>
          <table:table-cell table:style-name="ce12N2" office:value-type="float" office:value="124.27">
            <text:p>124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73319294814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3">
            <text:p>30582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72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02.22">
            <text:p>1802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02.22">
            <text:p>1802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001">
            <text:p>0,008</text:p>
          </table:table-cell>
          <table:table-cell table:style-name="ce12N2" office:value-type="float" office:value="3.1">
            <text:p>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02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02.22">
            <text:p>1802,22</text:p>
          </table:table-cell>
          <table:table-cell table:style-name="ce12N2" office:value-type="float" office:value="126.16">
            <text:p>12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72211294236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61">
            <text:p>305861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5.8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87.4">
            <text:p>448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87.4">
            <text:p>4487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424">
            <text:p>0,204</text:p>
          </table:table-cell>
          <table:table-cell table:style-name="ce12N2" office:value-type="float" office:value="81">
            <text:p>8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87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87.4">
            <text:p>4487,40</text:p>
          </table:table-cell>
          <table:table-cell table:style-name="ce12N2" office:value-type="float" office:value="179.5">
            <text:p>179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585418274981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65">
            <text:p>305865</text:p>
          </table:table-cell>
          <table:table-cell table:style-name="ce0" table:number-columns-spanned="4" table:number-rows-spanned="1" office:value-type="string" calcext:value-type="string">
            <text:p>7.808 - ABCC -REJUNTABRAS INDUSTRIA E COMERCIO LTDA</text:p>
          </table:table-cell>
          <table:covered-table-cell table:number-columns-repeated="3"/>
          <table:table-cell table:style-name="ce0" office:value-type="string" calcext:value-type="string">
            <text:p>96.5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9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58">
            <text:p>0,258</text:p>
          </table:table-cell>
          <table:table-cell table:style-name="ce12N2" office:value-type="float" office:value="43">
            <text:p>4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88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55.2">
            <text:p>5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45422380001785500100009653310009633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08">
            <text:p>30590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1912280999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6">
            <text:p>30592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313205233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8">
            <text:p>30592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415425760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30">
            <text:p>30593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519129137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1">
            <text:p>30594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115366248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3">
            <text:p>30594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311531934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4">
            <text:p>30594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410689356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5">
            <text:p>30594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514368757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6">
            <text:p>30594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61171361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0">
            <text:p>30595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4119310678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1">
            <text:p>30595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4018576831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2">
            <text:p>30595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4217995022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9">
            <text:p>30595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816601445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1">
            <text:p>30596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913875308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3">
            <text:p>30596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012166513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5">
            <text:p>30596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212872249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7">
            <text:p>30596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413542757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8">
            <text:p>30596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610155685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9">
            <text:p>30596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511086464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70">
            <text:p>30597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5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51814465461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77">
            <text:p>30597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4.56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7.39">
            <text:p>557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7.39">
            <text:p>557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136">
            <text:p>0,005</text:p>
          </table:table-cell>
          <table:table-cell table:style-name="ce12N2" office:value-type="float" office:value="1.07">
            <text:p>1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7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7.39">
            <text:p>557,39</text:p>
          </table:table-cell>
          <table:table-cell table:style-name="ce12N2" office:value-type="float" office:value="39.02">
            <text:p>39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456614501061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79">
            <text:p>30597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7.41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5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5.86">
            <text:p>223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94.8">
            <text:p>209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6">
            <text:p>0,014</text:p>
          </table:table-cell>
          <table:table-cell table:style-name="ce12N2" office:value-type="float" office:value="2.44">
            <text:p>2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35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41.06">
            <text:p>141,06</text:p>
          </table:table-cell>
          <table:table-cell table:style-name="ce12N2" office:value-type="float" office:value="2094.8">
            <text:p>2094,80</text:p>
          </table:table-cell>
          <table:table-cell table:style-name="ce12N2" office:value-type="float" office:value="146.64">
            <text:p>14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741319687349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99">
            <text:p>30599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3.37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30.23">
            <text:p>143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42.94">
            <text:p>1342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30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87.29">
            <text:p>87,29</text:p>
          </table:table-cell>
          <table:table-cell table:style-name="ce12N2" office:value-type="float" office:value="1342.94">
            <text:p>1342,94</text:p>
          </table:table-cell>
          <table:table-cell table:style-name="ce12N2" office:value-type="float" office:value="94.01">
            <text:p>9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337917258517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02">
            <text:p>30600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3.9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65.63">
            <text:p>266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02.94">
            <text:p>2502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908">
            <text:p>0,028</text:p>
          </table:table-cell>
          <table:table-cell table:style-name="ce12N2" office:value-type="float" office:value="3.56">
            <text:p>3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65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162.69">
            <text:p>162,69</text:p>
          </table:table-cell>
          <table:table-cell table:style-name="ce12N2" office:value-type="float" office:value="2502.94">
            <text:p>2502,94</text:p>
          </table:table-cell>
          <table:table-cell table:style-name="ce12N2" office:value-type="float" office:value="175.21">
            <text:p>175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394911551633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47">
            <text:p>30604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7.08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1.1">
            <text:p>102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21.1">
            <text:p>1021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608">
            <text:p>0,011</text:p>
          </table:table-cell>
          <table:table-cell table:style-name="ce12N2" office:value-type="float" office:value="2.67">
            <text:p>2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21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1.1">
            <text:p>1021,10</text:p>
          </table:table-cell>
          <table:table-cell table:style-name="ce12N2" office:value-type="float" office:value="40.84">
            <text:p>4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708318482026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49">
            <text:p>30604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7.35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5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0.21">
            <text:p>3660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45">
            <text:p>354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5">
            <text:p>0,011</text:p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60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115.21">
            <text:p>115,21</text:p>
          </table:table-cell>
          <table:table-cell table:style-name="ce12N2" office:value-type="float" office:value="3545">
            <text:p>3545,00</text:p>
          </table:table-cell>
          <table:table-cell table:style-name="ce12N2" office:value-type="float" office:value="141.8">
            <text:p>141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735817225638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50">
            <text:p>306050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7.40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5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51.64">
            <text:p>4151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993.25">
            <text:p>3993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02">
            <text:p>0,010</text:p>
          </table:table-cell>
          <table:table-cell table:style-name="ce12N2" office:value-type="float" office:value="18.95">
            <text:p>18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51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158.39">
            <text:p>158,39</text:p>
          </table:table-cell>
          <table:table-cell table:style-name="ce12N2" office:value-type="float" office:value="3993.25">
            <text:p>3993,25</text:p>
          </table:table-cell>
          <table:table-cell table:style-name="ce12N2" office:value-type="float" office:value="175.78">
            <text:p>175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740912251845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60">
            <text:p>306060</text:p>
          </table:table-cell>
          <table:table-cell table:style-name="ce0" table:number-columns-spanned="4" table:number-rows-spanned="1" office:value-type="string" calcext:value-type="string">
            <text:p>20.282 - LOTUS COMERCIAL DE FERRAGENS E FERRAMENTAS LTDA</text:p>
          </table:table-cell>
          <table:covered-table-cell table:number-columns-repeated="3"/>
          <table:table-cell table:style-name="ce0" office:value-type="string" calcext:value-type="string">
            <text:p>404.1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28.44">
            <text:p>4228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4152.95">
            <text:p>4152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08.9">
            <text:p>208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28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75.49">
            <text:p>75,49</text:p>
          </table:table-cell>
          <table:table-cell table:style-name="ce12N2" office:value-type="float" office:value="4152.95">
            <text:p>4152,95</text:p>
          </table:table-cell>
          <table:table-cell table:style-name="ce12N2" office:value-type="float" office:value="284.08">
            <text:p>284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22604096425660001915500100040419310731661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56">
            <text:p>306156</text:p>
          </table:table-cell>
          <table:table-cell table:style-name="ce0" table:number-columns-spanned="4" table:number-rows-spanned="1" office:value-type="string" calcext:value-type="string">
            <text:p>750 - COPLAS INDUSTRIA DE PLASTICOS LTDA</text:p>
          </table:table-cell>
          <table:covered-table-cell table:number-columns-repeated="3"/>
          <table:table-cell table:style-name="ce0" office:value-type="string" calcext:value-type="string">
            <text:p>199.4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33.03">
            <text:p>2733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647">
            <text:p>264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135">
            <text:p>0,000</text:p>
          </table:table-cell>
          <table:table-cell table:style-name="ce12N2" office:value-type="float" office:value="500">
            <text:p>5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33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86.03">
            <text:p>86,03</text:p>
          </table:table-cell>
          <table:table-cell table:style-name="ce12N2" office:value-type="float" office:value="2647">
            <text:p>2647,00</text:p>
          </table:table-cell>
          <table:table-cell table:style-name="ce12N2" office:value-type="float" office:value="185.29">
            <text:p>185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77187260001355500100019948911591425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60">
            <text:p>306160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82.71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6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810.62">
            <text:p>84810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12N2" office:value-type="float" office:value="83193.37">
            <text:p>83193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867016">
            <text:p>8,867</text:p>
          </table:table-cell>
          <table:table-cell table:style-name="ce12N2" office:value-type="float" office:value="1910.81">
            <text:p>1910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.810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1617.25">
            <text:p>1617,25</text:p>
          </table:table-cell>
          <table:table-cell table:style-name="ce12N2" office:value-type="float" office:value="83193.37">
            <text:p>83193,37</text:p>
          </table:table-cell>
          <table:table-cell table:style-name="ce12N2" office:value-type="float" office:value="5525.86">
            <text:p>552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97238370001725500000068271413791677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28">
            <text:p>30632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10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54.7">
            <text:p>395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54.7">
            <text:p>3954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525">
            <text:p>0,055</text:p>
          </table:table-cell>
          <table:table-cell table:style-name="ce12N2" office:value-type="float" office:value="14.5">
            <text:p>1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54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54.7">
            <text:p>3954,70</text:p>
          </table:table-cell>
          <table:table-cell table:style-name="ce12N2" office:value-type="float" office:value="276.83">
            <text:p>276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10116021297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0">
            <text:p>30633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40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72.82">
            <text:p>237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72.82">
            <text:p>2372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315">
            <text:p>0,033</text:p>
          </table:table-cell>
          <table:table-cell table:style-name="ce12N2" office:value-type="float" office:value="8.7">
            <text:p>8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72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72.82">
            <text:p>2372,82</text:p>
          </table:table-cell>
          <table:table-cell table:style-name="ce12N2" office:value-type="float" office:value="166.1">
            <text:p>16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40819726920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3">
            <text:p>30633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41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7.1">
            <text:p>807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7.1">
            <text:p>80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05">
            <text:p>0,011</text:p>
          </table:table-cell>
          <table:table-cell table:style-name="ce12N2" office:value-type="float" office:value="2.9">
            <text:p>2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07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7.1">
            <text:p>807,10</text:p>
          </table:table-cell>
          <table:table-cell table:style-name="ce12N2" office:value-type="float" office:value="56.5">
            <text:p>5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41218510065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9">
            <text:p>306339</text:p>
          </table:table-cell>
          <table:table-cell table:style-name="ce0" table:number-columns-spanned="4" table:number-rows-spanned="1" office:value-type="string" calcext:value-type="string">
            <text:p>36.576 - GRUPO METAL DESIGN LTDA</text:p>
          </table:table-cell>
          <table:covered-table-cell table:number-columns-repeated="3"/>
          <table:table-cell table:style-name="ce0" office:value-type="string" calcext:value-type="string">
            <text:p>6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66.18">
            <text:p>3766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66.18">
            <text:p>3766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66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">
            <text:p>3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66.18">
            <text:p>3766,18</text:p>
          </table:table-cell>
          <table:table-cell table:style-name="ce12N2" office:value-type="float" office:value="150.65">
            <text:p>150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68954480005605500100000069718604910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40">
            <text:p>306340</text:p>
          </table:table-cell>
          <table:table-cell table:style-name="ce0" table:number-columns-spanned="4" table:number-rows-spanned="1" office:value-type="string" calcext:value-type="string">
            <text:p>36.576 - GRUPO METAL DESIGN LTDA</text:p>
          </table:table-cell>
          <table:covered-table-cell table:number-columns-repeated="3"/>
          <table:table-cell table:style-name="ce0" office:value-type="string" calcext:value-type="string">
            <text:p>6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6.27">
            <text:p>936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15.61">
            <text:p>915,6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36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">
            <text:p>3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20.66">
            <text:p>20,66</text:p>
          </table:table-cell>
          <table:table-cell table:style-name="ce12N2" office:value-type="float" office:value="915.61">
            <text:p>915,61</text:p>
          </table:table-cell>
          <table:table-cell table:style-name="ce12N2" office:value-type="float" office:value="36.62">
            <text:p>3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68954480005605500100000069915051415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78">
            <text:p>306378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7.522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349.48">
            <text:p>9534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91519.49">
            <text:p>91519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0555">
            <text:p>0,806</text:p>
          </table:table-cell>
          <table:table-cell table:style-name="ce12N2" office:value-type="float" office:value="424.1">
            <text:p>424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.349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.61">
            <text:p>82,6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3829.99">
            <text:p>3829,99</text:p>
          </table:table-cell>
          <table:table-cell table:style-name="ce12N2" office:value-type="float" office:value="91519.49">
            <text:p>91519,49</text:p>
          </table:table-cell>
          <table:table-cell table:style-name="ce12N2" office:value-type="float" office:value="6406.35">
            <text:p>6406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75479070001535500500031752213419347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97">
            <text:p>306397</text:p>
          </table:table-cell>
          <table:table-cell table:style-name="ce0" table:number-columns-spanned="4" table:number-rows-spanned="1" office:value-type="string" calcext:value-type="string">
            <text:p>709 - MAX EBERHARDT UTILIDADES DOMESTICAS IMPORTACAO E REPRES LTDA</text:p>
          </table:table-cell>
          <table:covered-table-cell table:number-columns-repeated="3"/>
          <table:table-cell table:style-name="ce0" office:value-type="string" calcext:value-type="string">
            <text:p>156.1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72.29">
            <text:p>2472,29</text:p>
          </table:table-cell>
          <table:table-cell table:style-name="ce12N2" office:value-type="float" office:value="60.1">
            <text:p>60,10</text:p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381.5">
            <text:p>2381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3">
            <text:p>0,002</text:p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72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50.89">
            <text:p>150,89</text:p>
          </table:table-cell>
          <table:table-cell table:style-name="ce12N2" office:value-type="float" office:value="2321.4">
            <text:p>2321,40</text:p>
          </table:table-cell>
          <table:table-cell table:style-name="ce12N2" office:value-type="float" office:value="162.5">
            <text:p>16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69913340001295500100015611114370265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01">
            <text:p>306401</text:p>
          </table:table-cell>
          <table:table-cell table:style-name="ce0" table:number-columns-spanned="4" table:number-rows-spanned="1" office:value-type="string" calcext:value-type="string">
            <text:p>10.343 - INTERLIGHT SISTEMAS DE ILUMINACAO LTDA</text:p>
          </table:table-cell>
          <table:covered-table-cell table:number-columns-repeated="3"/>
          <table:table-cell table:style-name="ce0" office:value-type="string" calcext:value-type="string">
            <text:p>260.1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06.42">
            <text:p>9706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844.12">
            <text:p>8844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706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.58">
            <text:p>44,5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862.3">
            <text:p>862,30</text:p>
          </table:table-cell>
          <table:table-cell table:style-name="ce12N2" office:value-type="float" office:value="8844.12">
            <text:p>8844,12</text:p>
          </table:table-cell>
          <table:table-cell table:style-name="ce12N2" office:value-type="float" office:value="619.09">
            <text:p>619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83296080001445500100026015410026015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4">
            <text:p>30649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01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206.95">
            <text:p>40206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753">
            <text:p>3775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">
            <text:p>0,240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.206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2453.95">
            <text:p>2453,95</text:p>
          </table:table-cell>
          <table:table-cell table:style-name="ce12N2" office:value-type="float" office:value="37753">
            <text:p>37753,00</text:p>
          </table:table-cell>
          <table:table-cell table:style-name="ce12N2" office:value-type="float" office:value="2642.71">
            <text:p>264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3101416482142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6">
            <text:p>30649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4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798.26">
            <text:p>79798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9696.44">
            <text:p>79696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90242">
            <text:p>0,990</text:p>
          </table:table-cell>
          <table:table-cell table:style-name="ce12N2" office:value-type="float" office:value="316.25">
            <text:p>316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9.798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01.82">
            <text:p>101,82</text:p>
          </table:table-cell>
          <table:table-cell table:style-name="ce12N2" office:value-type="float" office:value="79696.44">
            <text:p>79696,44</text:p>
          </table:table-cell>
          <table:table-cell table:style-name="ce12N2" office:value-type="float" office:value="5578.75">
            <text:p>5578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3147119164320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7">
            <text:p>30649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49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31.26">
            <text:p>5331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05.88">
            <text:p>5005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5816">
            <text:p>0,056</text:p>
          </table:table-cell>
          <table:table-cell table:style-name="ce12N2" office:value-type="float" office:value="7.12">
            <text:p>7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31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325.38">
            <text:p>325,38</text:p>
          </table:table-cell>
          <table:table-cell table:style-name="ce12N2" office:value-type="float" office:value="5005.88">
            <text:p>5005,88</text:p>
          </table:table-cell>
          <table:table-cell table:style-name="ce12N2" office:value-type="float" office:value="350.41">
            <text:p>35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149917708381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8">
            <text:p>30649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5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05.56">
            <text:p>3005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05.56">
            <text:p>3005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736">
            <text:p>0,009</text:p>
          </table:table-cell>
          <table:table-cell table:style-name="ce12N2" office:value-type="float" office:value="2.32">
            <text:p>2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05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05.56">
            <text:p>3005,56</text:p>
          </table:table-cell>
          <table:table-cell table:style-name="ce12N2" office:value-type="float" office:value="210.39">
            <text:p>210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154912247987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01">
            <text:p>30650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62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79.28">
            <text:p>5779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79.28">
            <text:p>5779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3">
            <text:p>0,009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79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79.28">
            <text:p>5779,28</text:p>
          </table:table-cell>
          <table:table-cell table:style-name="ce12N2" office:value-type="float" office:value="404.55">
            <text:p>404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162419550564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19">
            <text:p>30651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8.31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630.34">
            <text:p>963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8827.8">
            <text:p>8827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12">
            <text:p>0,121</text:p>
          </table:table-cell>
          <table:table-cell table:style-name="ce12N2" office:value-type="float" office:value="84.02">
            <text:p>84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630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802.54">
            <text:p>802,54</text:p>
          </table:table-cell>
          <table:table-cell table:style-name="ce12N2" office:value-type="float" office:value="8827.8">
            <text:p>8827,80</text:p>
          </table:table-cell>
          <table:table-cell table:style-name="ce12N2" office:value-type="float" office:value="617.95">
            <text:p>617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831717729544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21">
            <text:p>306521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8.43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73.87">
            <text:p>2473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96">
            <text:p>239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96">
            <text:p>0,090</text:p>
          </table:table-cell>
          <table:table-cell table:style-name="ce12N2" office:value-type="float" office:value="7.2">
            <text:p>7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73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77.87">
            <text:p>77,87</text:p>
          </table:table-cell>
          <table:table-cell table:style-name="ce12N2" office:value-type="float" office:value="2396">
            <text:p>2396,00</text:p>
          </table:table-cell>
          <table:table-cell table:style-name="ce12N2" office:value-type="float" office:value="167.72">
            <text:p>167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843516767098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29">
            <text:p>30652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8.44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22.43">
            <text:p>322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21">
            <text:p>312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">
            <text:p>0,002</text:p>
          </table:table-cell>
          <table:table-cell table:style-name="ce12N2" office:value-type="float" office:value="3.2">
            <text:p>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22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01.43">
            <text:p>101,43</text:p>
          </table:table-cell>
          <table:table-cell table:style-name="ce12N2" office:value-type="float" office:value="3121">
            <text:p>3121,00</text:p>
          </table:table-cell>
          <table:table-cell table:style-name="ce12N2" office:value-type="float" office:value="218.47">
            <text:p>21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844012933423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5">
            <text:p>306535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2.3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84.2">
            <text:p>538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5384.2">
            <text:p>5384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054">
            <text:p>0,023</text:p>
          </table:table-cell>
          <table:table-cell table:style-name="ce12N2" office:value-type="float" office:value="28.62">
            <text:p>28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84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7238017221315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6">
            <text:p>306536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2.3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05.8">
            <text:p>8305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305.8">
            <text:p>8305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59">
            <text:p>0,022</text:p>
          </table:table-cell>
          <table:table-cell table:style-name="ce12N2" office:value-type="float" office:value="29.29">
            <text:p>29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05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7238415031529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7">
            <text:p>306537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2.3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545.08">
            <text:p>18545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545.08">
            <text:p>18545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82728">
            <text:p>0,583</text:p>
          </table:table-cell>
          <table:table-cell table:style-name="ce12N2" office:value-type="float" office:value="76.55">
            <text:p>76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545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7238212522509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66">
            <text:p>306566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1.31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3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73.58">
            <text:p>19173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17759.1">
            <text:p>17759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0.05579">
            <text:p>10,056</text:p>
          </table:table-cell>
          <table:table-cell table:style-name="ce12N2" office:value-type="float" office:value="44.3">
            <text:p>44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173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.68">
            <text:p>71,6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414.48">
            <text:p>1414,48</text:p>
          </table:table-cell>
          <table:table-cell table:style-name="ce12N2" office:value-type="float" office:value="17759.1">
            <text:p>17759,10</text:p>
          </table:table-cell>
          <table:table-cell table:style-name="ce12N2" office:value-type="float" office:value="710.36">
            <text:p>710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356353460001405500200011131716876600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68">
            <text:p>306568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7.678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75.54">
            <text:p>32775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">
            <text:p>19,00</text:p>
          </table:table-cell>
          <table:table-cell table:style-name="ce12N2" office:value-type="float" office:value="31565.22">
            <text:p>31565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3129">
            <text:p>1,031</text:p>
          </table:table-cell>
          <table:table-cell table:style-name="ce12N2" office:value-type="float" office:value="102.16">
            <text:p>102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775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3.35">
            <text:p>83,3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210.32">
            <text:p>1210,32</text:p>
          </table:table-cell>
          <table:table-cell table:style-name="ce12N2" office:value-type="float" office:value="31565.22">
            <text:p>31565,22</text:p>
          </table:table-cell>
          <table:table-cell table:style-name="ce12N2" office:value-type="float" office:value="2209.57">
            <text:p>2209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75479070001535500500031767815776725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73">
            <text:p>306573</text:p>
          </table:table-cell>
          <table:table-cell table:style-name="ce0" table:number-columns-spanned="4" table:number-rows-spanned="1" office:value-type="string" calcext:value-type="string">
            <text:p>20.101 - SIMON MATERIAIS ELETRICOS E ELETRONICOS LTDA.</text:p>
          </table:table-cell>
          <table:covered-table-cell table:number-columns-repeated="3"/>
          <table:table-cell table:style-name="ce0" office:value-type="string" calcext:value-type="string">
            <text:p>87.4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3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68.42">
            <text:p>19668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18202.54">
            <text:p>18202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.4342">
            <text:p>12,434</text:p>
          </table:table-cell>
          <table:table-cell table:style-name="ce12N2" office:value-type="float" office:value="1442.54">
            <text:p>1442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668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465.88">
            <text:p>1465,88</text:p>
          </table:table-cell>
          <table:table-cell table:style-name="ce12N2" office:value-type="float" office:value="18202.54">
            <text:p>18202,54</text:p>
          </table:table-cell>
          <table:table-cell table:style-name="ce12N2" office:value-type="float" office:value="1274.17">
            <text:p>1274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07159430000361550010000874601088851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74">
            <text:p>306574</text:p>
          </table:table-cell>
          <table:table-cell table:style-name="ce0" table:number-columns-spanned="4" table:number-rows-spanned="1" office:value-type="string" calcext:value-type="string">
            <text:p>4.463 - SAMER - COMERCIO DE MATERIAL HIDRAULICO LTDA - EPP</text:p>
          </table:table-cell>
          <table:covered-table-cell table:number-columns-repeated="3"/>
          <table:table-cell table:style-name="ce0" office:value-type="string" calcext:value-type="string">
            <text:p>5.2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17.54">
            <text:p>141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417.54">
            <text:p>1417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428">
            <text:p>0,037</text:p>
          </table:table-cell>
          <table:table-cell table:style-name="ce12N2" office:value-type="float" office:value="10.46">
            <text:p>10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17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17.54">
            <text:p>1417,54</text:p>
          </table:table-cell>
          <table:table-cell table:style-name="ce12N2" office:value-type="float" office:value="99.23">
            <text:p>99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7.43">
            <text:p>107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74.922</text:p>
          </table:table-cell>
          <table:table-cell table:style-name="ce0" office:value-type="string" calcext:value-type="string">
            <text:p>29.371 - ACCERT TRANSPORTES E LOGISTICAS LTDA</text:p>
          </table:table-cell>
          <table:table-cell table:style-name="ce0" office:value-type="string" calcext:value-type="string">
            <text:p>30/04/2026</text:p>
          </table:table-cell>
          <table:table-cell table:style-name="ce12" office:value-type="string" calcext:value-type="string">
            <text:p>107,43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35260413576045000150550010000052791001826910</text:p>
          </table:table-cell>
          <table:table-cell table:style-name="ce0" office:value-type="string" calcext:value-type="string">
            <text:p>35260405222092000763570020004749221006478189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76">
            <text:p>306576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5.0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23.2">
            <text:p>9523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8677.15">
            <text:p>8677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75365">
            <text:p>0,775</text:p>
          </table:table-cell>
          <table:table-cell table:style-name="ce12N2" office:value-type="float" office:value="149.8">
            <text:p>149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523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9.02">
            <text:p>79,0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846.05">
            <text:p>846,05</text:p>
          </table:table-cell>
          <table:table-cell table:style-name="ce12N2" office:value-type="float" office:value="8677.15">
            <text:p>8677,15</text:p>
          </table:table-cell>
          <table:table-cell table:style-name="ce12N2" office:value-type="float" office:value="347.09">
            <text:p>347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94164590001205500100081505311315725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78">
            <text:p>306578</text:p>
          </table:table-cell>
          <table:table-cell table:style-name="ce0" table:number-columns-spanned="4" table:number-rows-spanned="1" office:value-type="string" calcext:value-type="string">
            <text:p>37.802 - VINICOLOR IND. E COM. DE TINTAS, TEXTURA E GRAFIATO LTDA</text:p>
          </table:table-cell>
          <table:covered-table-cell table:number-columns-repeated="3"/>
          <table:table-cell table:style-name="ce0" office:value-type="string" calcext:value-type="string">
            <text:p>241.8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40.76">
            <text:p>5440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440.76">
            <text:p>5440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03754">
            <text:p>0,904</text:p>
          </table:table-cell>
          <table:table-cell table:style-name="ce12N2" office:value-type="float" office:value="1285.52">
            <text:p>1285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40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.99">
            <text:p>55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40.76">
            <text:p>5440,76</text:p>
          </table:table-cell>
          <table:table-cell table:style-name="ce12N2" office:value-type="float" office:value="380.85">
            <text:p>380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78555440001845500100024183013302239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59">
            <text:p>30665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3.54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3.1">
            <text:p>3703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03.1">
            <text:p>3703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0904">
            <text:p>0,041</text:p>
          </table:table-cell>
          <table:table-cell table:style-name="ce12N2" office:value-type="float" office:value="9.34">
            <text:p>9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03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3.1">
            <text:p>3703,10</text:p>
          </table:table-cell>
          <table:table-cell table:style-name="ce12N2" office:value-type="float" office:value="259.22">
            <text:p>259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354618418451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61">
            <text:p>30666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3.52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60.96">
            <text:p>246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60.96">
            <text:p>2460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892">
            <text:p>0,010</text:p>
          </table:table-cell>
          <table:table-cell table:style-name="ce12N2" office:value-type="float" office:value="3.51">
            <text:p>3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60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60.96">
            <text:p>2460,96</text:p>
          </table:table-cell>
          <table:table-cell table:style-name="ce12N2" office:value-type="float" office:value="172.27">
            <text:p>17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352314887721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62">
            <text:p>30666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3.51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04">
            <text:p>160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04">
            <text:p>160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968">
            <text:p>0,010</text:p>
          </table:table-cell>
          <table:table-cell table:style-name="ce12N2" office:value-type="float" office:value="2.28">
            <text:p>2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0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04">
            <text:p>1604,00</text:p>
          </table:table-cell>
          <table:table-cell table:style-name="ce12N2" office:value-type="float" office:value="112.28">
            <text:p>112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351210264990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68">
            <text:p>306668</text:p>
          </table:table-cell>
          <table:table-cell table:style-name="ce0" table:number-columns-spanned="4" table:number-rows-spanned="1" office:value-type="string" calcext:value-type="string">
            <text:p>9.300 - INTELBRAS S/A IND TELEC ELETR BRASILEIRA</text:p>
          </table:table-cell>
          <table:covered-table-cell table:number-columns-repeated="3"/>
          <table:table-cell table:style-name="ce0" office:value-type="string" calcext:value-type="string">
            <text:p>146.247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0.37">
            <text:p>640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40.37">
            <text:p>640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40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0.37">
            <text:p>640,37</text:p>
          </table:table-cell>
          <table:table-cell table:style-name="ce12N2" office:value-type="float" office:value="76.84">
            <text:p>76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32605829010000015225501000014624711797144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69">
            <text:p>306669</text:p>
          </table:table-cell>
          <table:table-cell table:style-name="ce0" table:number-columns-spanned="4" table:number-rows-spanned="1" office:value-type="string" calcext:value-type="string">
            <text:p>9.300 - INTELBRAS S/A IND TELEC ELETR BRASILEIRA</text:p>
          </table:table-cell>
          <table:covered-table-cell table:number-columns-repeated="3"/>
          <table:table-cell table:style-name="ce0" office:value-type="string" calcext:value-type="string">
            <text:p>146.254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01.85">
            <text:p>3201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01.85">
            <text:p>3201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01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01.85">
            <text:p>3201,85</text:p>
          </table:table-cell>
          <table:table-cell table:style-name="ce12N2" office:value-type="float" office:value="384.22">
            <text:p>384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32605829010000015225501000014625419602349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72">
            <text:p>30667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3.07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96.09">
            <text:p>4496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496.09">
            <text:p>4496,0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408">
            <text:p>0,015</text:p>
          </table:table-cell>
          <table:table-cell table:style-name="ce12N2" office:value-type="float" office:value="4.43">
            <text:p>4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96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6.09">
            <text:p>4496,09</text:p>
          </table:table-cell>
          <table:table-cell table:style-name="ce12N2" office:value-type="float" office:value="314.73">
            <text:p>314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307319260274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6">
            <text:p>306716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6.844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8.47">
            <text:p>15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8.8">
            <text:p>14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8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9.67">
            <text:p>9,67</text:p>
          </table:table-cell>
          <table:table-cell table:style-name="ce12N2" office:value-type="float" office:value="158.47">
            <text:p>158,47</text:p>
          </table:table-cell>
          <table:table-cell table:style-name="ce12N2" office:value-type="float" office:value="11.09">
            <text:p>11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75479070001535500500031684414926521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8">
            <text:p>306718</text:p>
          </table:table-cell>
          <table:table-cell table:style-name="ce0" table:number-columns-spanned="4" table:number-rows-spanned="1" office:value-type="string" calcext:value-type="string">
            <text:p>34.619 - STECK INDUSTRIA ELETRICA LTDA</text:p>
          </table:table-cell>
          <table:covered-table-cell table:number-columns-repeated="3"/>
          <table:table-cell table:style-name="ce0" office:value-type="string" calcext:value-type="string">
            <text:p>78.02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64.17">
            <text:p>13264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12355.2">
            <text:p>12355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5026">
            <text:p>1,050</text:p>
          </table:table-cell>
          <table:table-cell table:style-name="ce12N2" office:value-type="float" office:value="92.08">
            <text:p>92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264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908.97">
            <text:p>908,97</text:p>
          </table:table-cell>
          <table:table-cell table:style-name="ce12N2" office:value-type="float" office:value="12355.2">
            <text:p>12355,20</text:p>
          </table:table-cell>
          <table:table-cell table:style-name="ce12N2" office:value-type="float" office:value="864.86">
            <text:p>864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58906580003005500300007802414056767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54">
            <text:p>306754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1.41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06.37">
            <text:p>7806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7108.5">
            <text:p>7108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59">
            <text:p>0,003</text:p>
          </table:table-cell>
          <table:table-cell table:style-name="ce12N2" office:value-type="float" office:value="1.1">
            <text:p>1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06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.32">
            <text:p>57,3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697.87">
            <text:p>697,87</text:p>
          </table:table-cell>
          <table:table-cell table:style-name="ce12N2" office:value-type="float" office:value="7108.5">
            <text:p>7108,50</text:p>
          </table:table-cell>
          <table:table-cell table:style-name="ce12N2" office:value-type="float" office:value="284.34">
            <text:p>284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56353460001405500200011141511681114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87">
            <text:p>87,00</text:p>
          </table:table-cell>
          <table:table-cell table:style-name="ce26N2" office:value-type="float" office:value="60.1">
            <text:p>60,1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0257.16">
            <text:p>20257,16</text:p>
          </table:table-cell>
          <table:table-cell table:style-name="ce26N2" office:value-type="float" office:value="530290">
            <text:p>530290,00</text:p>
          </table:table-cell>
          <table:table-cell table:style-name="ce26N2" office:value-type="float" office:value="34488.42">
            <text:p>34488,4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07.43">
            <text:p>107,43</text:p>
          </table:table-cell>
          <table:table-cell table:style-name="ce26N2" office:value-type="float" office:value="582772.57">
            <text:p>582772,5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40.343771">
            <text:p>40,344</text:p>
          </table:table-cell>
          <table:table-cell table:style-name="ce26N2" office:value-type="float" office:value="562575.51">
            <text:p>562575,51</text:p>
          </table:table-cell>
          <table:table-cell table:style-name="ce26N2" office:value-type="float" office:value="582772.57">
            <text:p>582772,5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7378.94">
            <text:p>7378,9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9.43">
            <text:p>49,4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AC COELH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544" meta:object-count="0"/>
    <meta:generator>LibreOffice/4.3.0.4$Windows_x86 LibreOffice_project/62ad5818884a2fc2e5780dd45466868d41009ec0</meta:generator>
  </office:meta>
</office:document-meta>
</file>