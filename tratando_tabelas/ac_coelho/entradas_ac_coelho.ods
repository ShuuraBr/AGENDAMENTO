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8">
            <text:p>30910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.98">
            <text:p>2576,98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9">
            <text:p>23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213.74">
            <text:p>21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11401821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9">
            <text:p>30910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10.75">
            <text:p>3710,75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4">
            <text:p>33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307.77">
            <text:p>3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2174253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7">
            <text:p>30912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4.13">
            <text:p>222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1.29">
            <text:p>1751,29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6">
            <text:p>15,7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13.93">
            <text:p>213,93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80.41">
            <text:p>8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31655941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0">
            <text:p>30913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2.71">
            <text:p>338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00.51">
            <text:p>300,51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215.75">
            <text:p>2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6871002646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9">
            <text:p>309219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.89">
            <text:p>3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">
            <text:p>0,001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30.48">
            <text:p>30,48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381986976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3">
            <text:p>309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08">
            <text:p>0,030</text:p>
          </table:table-cell>
          <table:table-cell table:style-name="ce12N2" office:value-type="float" office:value="10.19">
            <text:p>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2.2">
            <text:p>6422,20</text:p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48">
            <text:p>7609,48</text:p>
          </table:table-cell>
          <table:table-cell table:style-name="ce12N2" office:value-type="float" office:value="532.66">
            <text:p>53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5651866437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4">
            <text:p>3092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0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4">
            <text:p>0,090</text:p>
          </table:table-cell>
          <table:table-cell table:style-name="ce12N2" office:value-type="float" office:value="57.08">
            <text:p>5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3.67">
            <text:p>4353,6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8">
            <text:p>39,1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8.54">
            <text:p>5158,54</text:p>
          </table:table-cell>
          <table:table-cell table:style-name="ce12N2" office:value-type="float" office:value="361.1">
            <text:p>36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0171174874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5">
            <text:p>30922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9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82">
            <text:p>0,010</text:p>
          </table:table-cell>
          <table:table-cell table:style-name="ce12N2" office:value-type="float" office:value="6.75">
            <text:p>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51">
            <text:p>1123,51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1">
            <text:p>10,11</text:p>
          </table:table-cell>
          <table:table-cell table:style-name="ce12N2" office:value-type="float" office:value="37.99">
            <text:p>37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22">
            <text:p>1331,22</text:p>
          </table:table-cell>
          <table:table-cell table:style-name="ce12N2" office:value-type="float" office:value="93.19">
            <text:p>9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91471239419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7">
            <text:p>3092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">
            <text:p>0,003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96.2">
            <text:p>2296,20</text:p>
          </table:table-cell>
          <table:table-cell table:style-name="ce12N2" office:value-type="float" office:value="2.3">
            <text:p>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2">
            <text:p>2720,72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82017149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1">
            <text:p>3092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2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207153627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5">
            <text:p>309235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4.26">
            <text:p>466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2">
            <text:p>0,059</text:p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2.11">
            <text:p>3752,11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7">
            <text:p>33,77</text:p>
          </table:table-cell>
          <table:table-cell table:style-name="ce12N2" office:value-type="float" office:value="40.34">
            <text:p>40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18.51">
            <text:p>218,51</text:p>
          </table:table-cell>
          <table:table-cell table:style-name="ce12N2" office:value-type="float" office:value="4445.75">
            <text:p>4445,75</text:p>
          </table:table-cell>
          <table:table-cell table:style-name="ce12N2" office:value-type="float" office:value="311.19">
            <text:p>31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69159760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0">
            <text:p>309240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7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12.64">
            <text:p>3212,64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5">
            <text:p>0,05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52">
            <text:p>2912,52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2">
            <text:p>26,2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7.64">
            <text:p>3477,64</text:p>
          </table:table-cell>
          <table:table-cell table:style-name="ce12N2" office:value-type="float" office:value="243.44">
            <text:p>24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27254297000178550010000107751693871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3">
            <text:p>30924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0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7.64">
            <text:p>547,6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3">
            <text:p>4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88">
            <text:p>648,88</text:p>
          </table:table-cell>
          <table:table-cell table:style-name="ce12N2" office:value-type="float" office:value="45.42">
            <text:p>4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0821378128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2">
            <text:p>3092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6.35">
            <text:p>43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52">
            <text:p>0,048</text:p>
          </table:table-cell>
          <table:table-cell table:style-name="ce12N2" office:value-type="float" office:value="39.36">
            <text:p>3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0.05">
            <text:p>3520,05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5.55">
            <text:p>135,55</text:p>
          </table:table-cell>
          <table:table-cell table:style-name="ce12N2" office:value-type="float" office:value="4170.8">
            <text:p>4170,80</text:p>
          </table:table-cell>
          <table:table-cell table:style-name="ce12N2" office:value-type="float" office:value="291.96">
            <text:p>29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8018641279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6">
            <text:p>3092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0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67">
            <text:p>0,003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.43">
            <text:p>489,43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.91">
            <text:p>579,91</text:p>
          </table:table-cell>
          <table:table-cell table:style-name="ce12N2" office:value-type="float" office:value="40.59">
            <text:p>4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0591446448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7">
            <text:p>3092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1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38">
            <text:p>0,005</text:p>
          </table:table-cell>
          <table:table-cell table:style-name="ce12N2" office:value-type="float" office:value="4.51">
            <text:p>4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1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1.02">
            <text:p>6511,02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">
            <text:p>58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4.68">
            <text:p>7714,68</text:p>
          </table:table-cell>
          <table:table-cell table:style-name="ce12N2" office:value-type="float" office:value="540.02">
            <text:p>54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1551192158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4">
            <text:p>309284</text:p>
          </table:table-cell>
          <table:table-cell table:style-name="ce0" table:number-columns-spanned="4" table:number-rows-spanned="1" office:value-type="string" calcext:value-type="string">
            <text:p>18.871 - ALUMBRA PRODUTOS ELETRICOS ELETRON LTDA</text:p>
          </table:table-cell>
          <table:covered-table-cell table:number-columns-repeated="3"/>
          <table:table-cell table:style-name="ce0" office:value-type="string" calcext:value-type="string">
            <text:p>413.72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.18">
            <text:p>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26">
            <text:p>0,001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.81">
            <text:p>10,81</text:p>
          </table:table-cell>
          <table:table-cell table:style-name="ce12N2" office:value-type="float" office:value="252.37">
            <text:p>252,37</text:p>
          </table:table-cell>
          <table:table-cell table:style-name="ce12N2" office:value-type="float" office:value="17.61">
            <text:p>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91147770001205500200041372115425518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1">
            <text:p>3093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6">
            <text:p>0,044</text:p>
          </table:table-cell>
          <table:table-cell table:style-name="ce12N2" office:value-type="float" office:value="30.76">
            <text:p>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16.64">
            <text:p>7116,6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05">
            <text:p>64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2.2">
            <text:p>8432,20</text:p>
          </table:table-cell>
          <table:table-cell table:style-name="ce12N2" office:value-type="float" office:value="590.25">
            <text:p>59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591833447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0">
            <text:p>3093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7.94">
            <text:p>1887,94</text:p>
          </table:table-cell>
          <table:table-cell table:style-name="ce12N2" office:value-type="float" office:value="1.89">
            <text:p>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99">
            <text:p>16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156.59">
            <text:p>15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371046151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1">
            <text:p>3093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1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7.3">
            <text:p>1227,30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5">
            <text:p>11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101.79">
            <text:p>10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82137494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6">
            <text:p>3093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7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7.87">
            <text:p>11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22">
            <text:p>0,003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3.42">
            <text:p>933,4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71.89">
            <text:p>71,89</text:p>
          </table:table-cell>
          <table:table-cell table:style-name="ce12N2" office:value-type="float" office:value="1105.98">
            <text:p>1105,98</text:p>
          </table:table-cell>
          <table:table-cell table:style-name="ce12N2" office:value-type="float" office:value="77.42">
            <text:p>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73261806665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7">
            <text:p>309387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86.89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.25">
            <text:p>46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3.06">
            <text:p>383,06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439.68">
            <text:p>439,68</text:p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90658000300550030000868921542769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0">
            <text:p>30942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0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1.26">
            <text:p>71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7.01">
            <text:p>5637,01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73">
            <text:p>50,73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30.86">
            <text:p>630,86</text:p>
          </table:table-cell>
          <table:table-cell table:style-name="ce12N2" office:value-type="float" office:value="6470.4">
            <text:p>6470,40</text:p>
          </table:table-cell>
          <table:table-cell table:style-name="ce12N2" office:value-type="float" office:value="258.82">
            <text:p>2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01412428352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4">
            <text:p>309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8">
            <text:p>0,002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2.34">
            <text:p>2402,3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62">
            <text:p>2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199.25">
            <text:p>1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8331110045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69">
            <text:p>3094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2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2.84">
            <text:p>9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11">
            <text:p>0,001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.4">
            <text:p>723,40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55.71">
            <text:p>55,71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2401091218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5">
            <text:p>309485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17.2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24.75">
            <text:p>632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106.52">
            <text:p>6106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75">
            <text:p>0,188</text:p>
          </table:table-cell>
          <table:table-cell table:style-name="ce12N2" office:value-type="float" office:value="289.4">
            <text:p>28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24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19.98">
            <text:p>5319,98</text:p>
          </table:table-cell>
          <table:table-cell table:style-name="ce12N2" office:value-type="float" office:value="5.32">
            <text:p>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18.23">
            <text:p>218,23</text:p>
          </table:table-cell>
          <table:table-cell table:style-name="ce12N2" office:value-type="float" office:value="6106.52">
            <text:p>6106,52</text:p>
          </table:table-cell>
          <table:table-cell table:style-name="ce12N2" office:value-type="float" office:value="244.27">
            <text:p>24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609642566000191550010004172471179364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3">
            <text:p>3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923.94">
            <text:p>1923,94</text:p>
          </table:table-cell>
          <table:table-cell table:style-name="ce26N2" office:value-type="float" office:value="585942.77">
            <text:p>585942,77</text:p>
          </table:table-cell>
          <table:table-cell table:style-name="ce26N2" office:value-type="float" office:value="40565.12">
            <text:p>40565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7876.71">
            <text:p>587876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960039">
            <text:p>3,960</text:p>
          </table:table-cell>
          <table:table-cell table:style-name="ce26N2" office:value-type="float" office:value="585687.77">
            <text:p>585687,77</text:p>
          </table:table-cell>
          <table:table-cell table:style-name="ce26N2" office:value-type="float" office:value="587876.71">
            <text:p>587876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9057.58">
            <text:p>489057,58</text:p>
          </table:table-cell>
          <table:table-cell table:style-name="ce26N2" office:value-type="float" office:value="489.08">
            <text:p>489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401.51">
            <text:p>4401,5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862.48">
            <text:p>8862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1.07">
            <text:p>81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0" meta:object-count="0"/>
    <meta:generator>LibreOffice/4.3.0.4$Windows_x86 LibreOffice_project/62ad5818884a2fc2e5780dd45466868d41009ec0</meta:generator>
  </office:meta>
</office:document-meta>
</file>