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2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613">
            <text:p>30761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8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.49">
            <text:p>59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28.54">
            <text:p>528,54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216.84">
            <text:p>2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2091324000204550030000068451624550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2">
            <text:p>30792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1.82">
            <text:p>421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7.8">
            <text:p>9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1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27.52">
            <text:p>527,52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147.37">
            <text:p>14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1111008326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4">
            <text:p>308004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3.77">
            <text:p>622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670.86">
            <text:p>5670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52.91">
            <text:p>552,91</text:p>
          </table:table-cell>
          <table:table-cell table:style-name="ce12N2" office:value-type="float" office:value="5670.86">
            <text:p>5670,86</text:p>
          </table:table-cell>
          <table:table-cell table:style-name="ce12N2" office:value-type="float" office:value="396.95">
            <text:p>39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2.9">
            <text:p>18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08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182,9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5260510713221000160550020000091451000118020</text:p>
          </table:table-cell>
          <table:table-cell table:style-name="ce0" office:value-type="string" calcext:value-type="string">
            <text:p>3526051138956500020057005000400080100086351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7">
            <text:p>30800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09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01.25">
            <text:p>5220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4">
            <text:p>0,009</text:p>
          </table:table-cell>
          <table:table-cell table:style-name="ce12N2" office:value-type="float" office:value="43.6">
            <text:p>4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201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.01">
            <text:p>71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26.15">
            <text:p>4626,15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1903">
            <text:p>1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0951866673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9">
            <text:p>3080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524.4">
            <text:p>5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4191226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9">
            <text:p>3080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7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2">
            <text:p>0,008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7701138599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0">
            <text:p>308030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0.6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08.47">
            <text:p>130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9">
            <text:p>1259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0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09.47">
            <text:p>409,47</text:p>
          </table:table-cell>
          <table:table-cell table:style-name="ce12N2" office:value-type="float" office:value="12599">
            <text:p>12599,00</text:p>
          </table:table-cell>
          <table:table-cell table:style-name="ce12N2" office:value-type="float" office:value="881.93">
            <text:p>8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718726000135550010002006581282400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2">
            <text:p>308042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52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7.5">
            <text:p>74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67.65">
            <text:p>6767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.45">
            <text:p>6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59.85">
            <text:p>659,85</text:p>
          </table:table-cell>
          <table:table-cell table:style-name="ce12N2" office:value-type="float" office:value="6767.65">
            <text:p>6767,65</text:p>
          </table:table-cell>
          <table:table-cell table:style-name="ce12N2" office:value-type="float" office:value="462.38">
            <text:p>4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52214649530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7">
            <text:p>308057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63.76">
            <text:p>54463,76</text:p>
          </table:table-cell>
          <table:table-cell table:style-name="ce12N2" office:value-type="float" office:value="2757.3">
            <text:p>2757,30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55145.9">
            <text:p>55145,90</text:p>
          </table:table-cell>
          <table:table-cell table:style-name="ce12N2" office:value-type="float" office:value="950">
            <text:p>950,00</text:p>
          </table:table-cell>
          <table:table-cell table:style-name="ce12N3" office:value-type="float" office:value="0.0468">
            <text:p>0,047</text:p>
          </table:table-cell>
          <table:table-cell table:style-name="ce12N2" office:value-type="float" office:value="93.92">
            <text:p>9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46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25.16">
            <text:p>1125,16</text:p>
          </table:table-cell>
          <table:table-cell table:style-name="ce12N2" office:value-type="float" office:value="53338.6">
            <text:p>53338,60</text:p>
          </table:table-cell>
          <table:table-cell table:style-name="ce12N2" office:value-type="float" office:value="3733.71">
            <text:p>373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491923003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1">
            <text:p>3080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86.55">
            <text:p>8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111562759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3">
            <text:p>30806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4">
            <text:p>0,005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716.05">
            <text:p>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01105940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4">
            <text:p>308064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">
            <text:p>0,016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79.93">
            <text:p>7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41583124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4">
            <text:p>308154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4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481.93">
            <text:p>4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7392000180550030000100881724341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5">
            <text:p>3081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3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7034">
            <text:p>1,487</text:p>
          </table:table-cell>
          <table:table-cell table:style-name="ce12N2" office:value-type="float" office:value="568.8">
            <text:p>5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125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1325.02">
            <text:p>132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3811194130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5">
            <text:p>3081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7.42">
            <text:p>1977,42</text:p>
          </table:table-cell>
          <table:table-cell table:style-name="ce12N2" office:value-type="float" office:value="1.98">
            <text:p>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">
            <text:p>1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164.01">
            <text:p>1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431526894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9">
            <text:p>3081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7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65">
            <text:p>0,012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5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78.8">
            <text:p>6878,80</text:p>
          </table:table-cell>
          <table:table-cell table:style-name="ce12N2" office:value-type="float" office:value="6.88">
            <text:p>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91">
            <text:p>61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570.54">
            <text:p>57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726124166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1">
            <text:p>308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7.69">
            <text:p>566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735">
            <text:p>0,231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6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01.94">
            <text:p>4701,94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32">
            <text:p>42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6.52">
            <text:p>96,52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389.98">
            <text:p>38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11109221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5">
            <text:p>30821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0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282.89">
            <text:p>4428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">
            <text:p>39,00</text:p>
          </table:table-cell>
          <table:table-cell table:style-name="ce12N2" office:value-type="float" office:value="44142.3">
            <text:p>4414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144726">
            <text:p>21,145</text:p>
          </table:table-cell>
          <table:table-cell table:style-name="ce12N2" office:value-type="float" office:value="7549.32">
            <text:p>754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28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69.16">
            <text:p>36969,16</text:p>
          </table:table-cell>
          <table:table-cell table:style-name="ce12N2" office:value-type="float" office:value="36.95">
            <text:p>3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2.7">
            <text:p>332,7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40.59">
            <text:p>140,59</text:p>
          </table:table-cell>
          <table:table-cell table:style-name="ce12N2" office:value-type="float" office:value="44142.3">
            <text:p>44142,30</text:p>
          </table:table-cell>
          <table:table-cell table:style-name="ce12N2" office:value-type="float" office:value="3090.01">
            <text:p>309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4542238000178550010000970001000968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7">
            <text:p>3082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1.11">
            <text:p>803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54">
            <text:p>0,024</text:p>
          </table:table-cell>
          <table:table-cell table:style-name="ce12N2" office:value-type="float" office:value="6.8">
            <text:p>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31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6.86">
            <text:p>6696,86</text:p>
          </table:table-cell>
          <table:table-cell table:style-name="ce12N2" office:value-type="float" office:value="6.7">
            <text:p>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7">
            <text:p>60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555.45">
            <text:p>55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551218029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8">
            <text:p>308258</text:p>
          </table:table-cell>
          <table:table-cell table:style-name="ce0" table:number-columns-spanned="4" table:number-rows-spanned="1" office:value-type="string" calcext:value-type="string">
            <text:p>12.915 - LPS COMPANY LTDA</text:p>
          </table:table-cell>
          <table:covered-table-cell table:number-columns-repeated="3"/>
          <table:table-cell table:style-name="ce0" office:value-type="string" calcext:value-type="string">
            <text:p>1.094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.11">
            <text:p>118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325">
            <text:p>0,043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.15">
            <text:p>939,1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11">
            <text:p>105,11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43.12">
            <text:p>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8890838000452550010010945591682413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71">
            <text:p>308271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52.770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52">
            <text:p>172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7.52">
            <text:p>172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4.73">
            <text:p>1464,73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8">
            <text:p>13,1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7.52">
            <text:p>1727,52</text:p>
          </table:table-cell>
          <table:table-cell table:style-name="ce12N2" office:value-type="float" office:value="207.3">
            <text:p>20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527701316591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0">
            <text:p>3082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2.36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427">
            <text:p>0,424</text:p>
          </table:table-cell>
          <table:table-cell table:style-name="ce12N2" office:value-type="float" office:value="57.42">
            <text:p>5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55">
            <text:p>790,55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1">
            <text:p>7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65.57">
            <text:p>6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23671142938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1">
            <text:p>308281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52.775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6.02">
            <text:p>121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6.02">
            <text:p>1216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1.03">
            <text:p>1031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7">
            <text:p>9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6.02">
            <text:p>1216,02</text:p>
          </table:table-cell>
          <table:table-cell table:style-name="ce12N2" office:value-type="float" office:value="145.92">
            <text:p>14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527751892877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5">
            <text:p>3082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2">
            <text:p>0,015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5">
            <text:p>6325,0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3">
            <text:p>56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524.61">
            <text:p>5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49381658004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7">
            <text:p>3082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">
            <text:p>2859,3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237.15">
            <text:p>23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501948779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8">
            <text:p>3082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2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1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33.92">
            <text:p>9633,92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71">
            <text:p>86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799.05">
            <text:p>79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2171247592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5">
            <text:p>308305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8.38">
            <text:p>32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4.64">
            <text:p>2924,64</text:p>
          </table:table-cell>
          <table:table-cell table:style-name="ce12N2" office:value-type="float" office:value="175.48">
            <text:p>175,48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3100.12">
            <text:p>3100,12</text:p>
          </table:table-cell>
          <table:table-cell table:style-name="ce12N2" office:value-type="float" office:value="124">
            <text:p>1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74221452415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4">
            <text:p>3084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6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3.86">
            <text:p>2673,86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6">
            <text:p>24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201.26">
            <text:p>2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6511772767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7">
            <text:p>308427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02.33">
            <text:p>630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5997">
            <text:p>59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691">
            <text:p>0,597</text:p>
          </table:table-cell>
          <table:table-cell table:style-name="ce12N2" office:value-type="float" office:value="175.47">
            <text:p>17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0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3.22">
            <text:p>5083,22</text:p>
          </table:table-cell>
          <table:table-cell table:style-name="ce12N2" office:value-type="float" office:value="5.08">
            <text:p>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75">
            <text:p>45,7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05.33">
            <text:p>305,33</text:p>
          </table:table-cell>
          <table:table-cell table:style-name="ce12N2" office:value-type="float" office:value="5651.97">
            <text:p>5651,97</text:p>
          </table:table-cell>
          <table:table-cell table:style-name="ce12N2" office:value-type="float" office:value="395.64">
            <text:p>39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85710539132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2">
            <text:p>308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7">
            <text:p>0,013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0.51">
            <text:p>5250,51</text:p>
          </table:table-cell>
          <table:table-cell table:style-name="ce12N2" office:value-type="float" office:value="5.25">
            <text:p>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5">
            <text:p>47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435.48">
            <text:p>43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379133498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0">
            <text:p>308510</text:p>
          </table:table-cell>
          <table:table-cell table:style-name="ce0" table:number-columns-spanned="4" table:number-rows-spanned="1" office:value-type="string" calcext:value-type="string">
            <text:p>37.802 - VINICOLOR IND. E COM. DE TINTAS, TEXTURA E GRAFIATO LTDA</text:p>
          </table:table-cell>
          <table:covered-table-cell table:number-columns-repeated="3"/>
          <table:table-cell table:style-name="ce0" office:value-type="string" calcext:value-type="string">
            <text:p>243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32418">
            <text:p>9,324</text:p>
          </table:table-cell>
          <table:table-cell table:style-name="ce12N2" office:value-type="float" office:value="13236">
            <text:p>132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72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78.23">
            <text:p>47878,23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94">
            <text:p>430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3971.06">
            <text:p>397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7855544000184550010002435931352228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1">
            <text:p>30851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7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6">
            <text:p>478,26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74311178793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7">
            <text:p>3085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84">
            <text:p>0,020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73.52">
            <text:p>6573,52</text:p>
          </table:table-cell>
          <table:table-cell table:style-name="ce12N2" office:value-type="float" office:value="6.57">
            <text:p>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16">
            <text:p>59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545.22">
            <text:p>54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9113306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8">
            <text:p>3085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5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9.24">
            <text:p>4009,24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332.53">
            <text:p>33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01615227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3">
            <text:p>3085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2.22">
            <text:p>2422,22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8">
            <text:p>21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200.9">
            <text:p>2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11517528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8">
            <text:p>48,00</text:p>
          </table:table-cell>
          <table:table-cell table:style-name="ce26N2" office:value-type="float" office:value="2757.3">
            <text:p>2757,30</text:p>
          </table:table-cell>
          <table:table-cell table:style-name="ce26N2" office:value-type="float" office:value="1125.48">
            <text:p>112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034.46">
            <text:p>12034,46</text:p>
          </table:table-cell>
          <table:table-cell table:style-name="ce26N2" office:value-type="float" office:value="639693.85">
            <text:p>639693,85</text:p>
          </table:table-cell>
          <table:table-cell table:style-name="ce26N2" office:value-type="float" office:value="41713.52">
            <text:p>41713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2.9">
            <text:p>182,90</text:p>
          </table:table-cell>
          <table:table-cell table:style-name="ce26N2" office:value-type="float" office:value="652083.34">
            <text:p>652083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2.761572">
            <text:p>42,762</text:p>
          </table:table-cell>
          <table:table-cell table:style-name="ce26N2" office:value-type="float" office:value="641680.7">
            <text:p>641680,70</text:p>
          </table:table-cell>
          <table:table-cell table:style-name="ce26N2" office:value-type="float" office:value="652083.34">
            <text:p>652083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1573.82">
            <text:p>161573,82</text:p>
          </table:table-cell>
          <table:table-cell table:style-name="ce26N2" office:value-type="float" office:value="161.54">
            <text:p>161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454.14">
            <text:p>1454,1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3819.56">
            <text:p>23819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07">
            <text:p>39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30" meta:object-count="0"/>
    <meta:generator>LibreOffice/4.3.0.4$Windows_x86 LibreOffice_project/62ad5818884a2fc2e5780dd45466868d41009ec0</meta:generator>
  </office:meta>
</office:document-meta>
</file>