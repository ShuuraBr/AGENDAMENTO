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4/06/2026 07:16:26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09">
            <text:p>30870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03.12">
            <text:p>19600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8224">
            <text:p>1,698</text:p>
          </table:table-cell>
          <table:table-cell table:style-name="ce12N2" office:value-type="float" office:value="3298.68">
            <text:p>329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6.00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394.92">
            <text:p>165394,92</text:p>
          </table:table-cell>
          <table:table-cell table:style-name="ce12N2" office:value-type="float" office:value="165.4">
            <text:p>1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56">
            <text:p>1488,5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1.76">
            <text:p>31,76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13717.99">
            <text:p>137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81761658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3">
            <text:p>30872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0505">
            <text:p>1,605</text:p>
          </table:table-cell>
          <table:table-cell table:style-name="ce12N2" office:value-type="float" office:value="5030.8">
            <text:p>503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1.03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628.79">
            <text:p>245628,79</text:p>
          </table:table-cell>
          <table:table-cell table:style-name="ce12N2" office:value-type="float" office:value="245.64">
            <text:p>24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0.66">
            <text:p>2210,6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20372.66">
            <text:p>2037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39142188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8">
            <text:p>30897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2.5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64">
            <text:p>0,001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5.98">
            <text:p>1175,98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58">
            <text:p>10,5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97.54">
            <text:p>9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253419047482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3">
            <text:p>3090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1.8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88">
            <text:p>0,028</text:p>
          </table:table-cell>
          <table:table-cell table:style-name="ce12N2" office:value-type="float" office:value="15.28">
            <text:p>1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0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87.8">
            <text:p>7687,80</text:p>
          </table:table-cell>
          <table:table-cell table:style-name="ce12N2" office:value-type="float" office:value="7.69">
            <text:p>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19">
            <text:p>69,1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637.63">
            <text:p>63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180419301969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3">
            <text:p>3092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5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09.48">
            <text:p>760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09.48">
            <text:p>7609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108">
            <text:p>0,030</text:p>
          </table:table-cell>
          <table:table-cell table:style-name="ce12N2" office:value-type="float" office:value="10.19">
            <text:p>10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0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22.2">
            <text:p>6422,20</text:p>
          </table:table-cell>
          <table:table-cell table:style-name="ce12N2" office:value-type="float" office:value="6.42">
            <text:p>6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8">
            <text:p>57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09.48">
            <text:p>7609,48</text:p>
          </table:table-cell>
          <table:table-cell table:style-name="ce12N2" office:value-type="float" office:value="532.66">
            <text:p>53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56518664372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4">
            <text:p>309224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9.0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58.54">
            <text:p>515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158.54">
            <text:p>5158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964">
            <text:p>0,090</text:p>
          </table:table-cell>
          <table:table-cell table:style-name="ce12N2" office:value-type="float" office:value="57.08">
            <text:p>5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58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53.67">
            <text:p>4353,67</text:p>
          </table:table-cell>
          <table:table-cell table:style-name="ce12N2" office:value-type="float" office:value="4.35">
            <text:p>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18">
            <text:p>39,18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58.54">
            <text:p>5158,54</text:p>
          </table:table-cell>
          <table:table-cell table:style-name="ce12N2" office:value-type="float" office:value="361.1">
            <text:p>36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7901711748741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7">
            <text:p>3092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8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0.72">
            <text:p>272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20.72">
            <text:p>272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">
            <text:p>0,003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96.2">
            <text:p>2296,20</text:p>
          </table:table-cell>
          <table:table-cell table:style-name="ce12N2" office:value-type="float" office:value="2.3">
            <text:p>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67">
            <text:p>20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20.72">
            <text:p>2720,72</text:p>
          </table:table-cell>
          <table:table-cell table:style-name="ce12N2" office:value-type="float" office:value="190.45">
            <text:p>19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8201714911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1">
            <text:p>30923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6.2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67">
            <text:p>0,003</text:p>
          </table:table-cell>
          <table:table-cell table:style-name="ce12N2" office:value-type="float" office:value="1.27">
            <text:p>1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9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9.43">
            <text:p>489,43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40.59">
            <text:p>4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62071536276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3">
            <text:p>309243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9.08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8.88">
            <text:p>64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8.88">
            <text:p>64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7.64">
            <text:p>547,64</text:p>
          </table:table-cell>
          <table:table-cell table:style-name="ce12N2" office:value-type="float" office:value="0.55">
            <text:p>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93">
            <text:p>4,9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8.88">
            <text:p>648,88</text:p>
          </table:table-cell>
          <table:table-cell table:style-name="ce12N2" office:value-type="float" office:value="45.42">
            <text:p>4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1385550020000190821378128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6">
            <text:p>30926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7.0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67">
            <text:p>0,003</text:p>
          </table:table-cell>
          <table:table-cell table:style-name="ce12N2" office:value-type="float" office:value="1.27">
            <text:p>1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9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9.43">
            <text:p>489,43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40.59">
            <text:p>4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705914464482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7">
            <text:p>3092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7.1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14.68">
            <text:p>771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714.68">
            <text:p>771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638">
            <text:p>0,005</text:p>
          </table:table-cell>
          <table:table-cell table:style-name="ce12N2" office:value-type="float" office:value="4.51">
            <text:p>4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14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11.02">
            <text:p>6511,02</text:p>
          </table:table-cell>
          <table:table-cell table:style-name="ce12N2" office:value-type="float" office:value="6.51">
            <text:p>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6">
            <text:p>58,6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14.68">
            <text:p>7714,68</text:p>
          </table:table-cell>
          <table:table-cell table:style-name="ce12N2" office:value-type="float" office:value="540.02">
            <text:p>54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715511921587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21">
            <text:p>30932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7.3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32.2">
            <text:p>843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432.2">
            <text:p>843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376">
            <text:p>0,044</text:p>
          </table:table-cell>
          <table:table-cell table:style-name="ce12N2" office:value-type="float" office:value="30.76">
            <text:p>30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32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16.64">
            <text:p>7116,64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.05">
            <text:p>64,0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32.2">
            <text:p>8432,20</text:p>
          </table:table-cell>
          <table:table-cell table:style-name="ce12N2" office:value-type="float" office:value="590.25">
            <text:p>59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73591833447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50">
            <text:p>3093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13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6.96">
            <text:p>223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6.96">
            <text:p>2236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32">
            <text:p>0,000</text:p>
          </table:table-cell>
          <table:table-cell table:style-name="ce12N2" office:value-type="float" office:value="2.35">
            <text:p>2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6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87.94">
            <text:p>1887,94</text:p>
          </table:table-cell>
          <table:table-cell table:style-name="ce12N2" office:value-type="float" office:value="1.89">
            <text:p>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99">
            <text:p>16,9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6.96">
            <text:p>2236,96</text:p>
          </table:table-cell>
          <table:table-cell table:style-name="ce12N2" office:value-type="float" office:value="156.59">
            <text:p>15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13710461518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51">
            <text:p>3093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18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4.2">
            <text:p>145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4.2">
            <text:p>145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14">
            <text:p>0,001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7.3">
            <text:p>1227,30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05">
            <text:p>11,0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4.2">
            <text:p>1454,20</text:p>
          </table:table-cell>
          <table:table-cell table:style-name="ce12N2" office:value-type="float" office:value="101.79">
            <text:p>10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18213749412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86">
            <text:p>3093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7.32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7.87">
            <text:p>117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5.98">
            <text:p>110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22">
            <text:p>0,003</text:p>
          </table:table-cell>
          <table:table-cell table:style-name="ce12N2" office:value-type="float" office:value="0.9">
            <text:p>0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3.42">
            <text:p>933,42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">
            <text:p>8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71.89">
            <text:p>71,89</text:p>
          </table:table-cell>
          <table:table-cell table:style-name="ce12N2" office:value-type="float" office:value="1105.98">
            <text:p>1105,98</text:p>
          </table:table-cell>
          <table:table-cell table:style-name="ce12N2" office:value-type="float" office:value="77.42">
            <text:p>7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732618066657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7">
            <text:p>309397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78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27">
            <text:p>0,087</text:p>
          </table:table-cell>
          <table:table-cell table:style-name="ce12N2" office:value-type="float" office:value="33.1">
            <text:p>3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5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500.85">
            <text:p>50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2296669000169550030000017881782303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20">
            <text:p>309420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5.01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01.26">
            <text:p>710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470.4">
            <text:p>64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0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37.01">
            <text:p>5637,01</text:p>
          </table:table-cell>
          <table:table-cell table:style-name="ce12N2" office:value-type="float" office:value="5.64">
            <text:p>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.73">
            <text:p>50,73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630.86">
            <text:p>630,86</text:p>
          </table:table-cell>
          <table:table-cell table:style-name="ce12N2" office:value-type="float" office:value="6470.4">
            <text:p>6470,40</text:p>
          </table:table-cell>
          <table:table-cell table:style-name="ce12N2" office:value-type="float" office:value="258.82">
            <text:p>25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501412428352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24">
            <text:p>3094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8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46.46">
            <text:p>284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46.46">
            <text:p>2846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88">
            <text:p>0,002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46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02.34">
            <text:p>2402,34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62">
            <text:p>21,6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46.46">
            <text:p>2846,46</text:p>
          </table:table-cell>
          <table:table-cell table:style-name="ce12N2" office:value-type="float" office:value="199.25">
            <text:p>19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83311100451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69">
            <text:p>30946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9.24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2.84">
            <text:p>91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7.13">
            <text:p>857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11">
            <text:p>0,001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3.4">
            <text:p>723,40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51">
            <text:p>6,5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55.71">
            <text:p>55,71</text:p>
          </table:table-cell>
          <table:table-cell table:style-name="ce12N2" office:value-type="float" office:value="857.13">
            <text:p>857,13</text:p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924010912185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5">
            <text:p>309485</text:p>
          </table:table-cell>
          <table:table-cell table:style-name="ce0" table:number-columns-spanned="4" table:number-rows-spanned="1" office:value-type="string" calcext:value-type="string">
            <text:p>20.282 - LOTUS COMERCIAL DE FERRAGENS E FERRAMENTAS LTDA</text:p>
          </table:table-cell>
          <table:covered-table-cell table:number-columns-repeated="3"/>
          <table:table-cell table:style-name="ce0" office:value-type="string" calcext:value-type="string">
            <text:p>417.2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24.75">
            <text:p>632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6106.52">
            <text:p>6106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75">
            <text:p>0,188</text:p>
          </table:table-cell>
          <table:table-cell table:style-name="ce12N2" office:value-type="float" office:value="289.4">
            <text:p>28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24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19.98">
            <text:p>5319,98</text:p>
          </table:table-cell>
          <table:table-cell table:style-name="ce12N2" office:value-type="float" office:value="5.32">
            <text:p>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87">
            <text:p>47,87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218.23">
            <text:p>218,23</text:p>
          </table:table-cell>
          <table:table-cell table:style-name="ce12N2" office:value-type="float" office:value="6106.52">
            <text:p>6106,52</text:p>
          </table:table-cell>
          <table:table-cell table:style-name="ce12N2" office:value-type="float" office:value="244.27">
            <text:p>24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6096425660001915500100041724711793649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5">
            <text:p>309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5.0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476.94">
            <text:p>149476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49322.78">
            <text:p>149322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345977">
            <text:p>4,346</text:p>
          </table:table-cell>
          <table:table-cell table:style-name="ce12N2" office:value-type="float" office:value="1306.75">
            <text:p>1306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9.476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046.33">
            <text:p>126046,33</text:p>
          </table:table-cell>
          <table:table-cell table:style-name="ce12N2" office:value-type="float" office:value="126.05">
            <text:p>12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34.42">
            <text:p>1134,42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54.16">
            <text:p>154,16</text:p>
          </table:table-cell>
          <table:table-cell table:style-name="ce12N2" office:value-type="float" office:value="148981.94">
            <text:p>148981,94</text:p>
          </table:table-cell>
          <table:table-cell table:style-name="ce12N2" office:value-type="float" office:value="10428.74">
            <text:p>1042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50191131332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6">
            <text:p>309536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9.25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6.14">
            <text:p>393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36.14">
            <text:p>3936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6025">
            <text:p>0,326</text:p>
          </table:table-cell>
          <table:table-cell table:style-name="ce12N2" office:value-type="float" office:value="25.81">
            <text:p>25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6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22">
            <text:p>3322,00</text:p>
          </table:table-cell>
          <table:table-cell table:style-name="ce12N2" office:value-type="float" office:value="3.32">
            <text:p>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9">
            <text:p>29,9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6.14">
            <text:p>3936,14</text:p>
          </table:table-cell>
          <table:table-cell table:style-name="ce12N2" office:value-type="float" office:value="275.53">
            <text:p>27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925417550746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7">
            <text:p>309537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9.25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29.5">
            <text:p>2032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329.5">
            <text:p>2032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00872">
            <text:p>7,009</text:p>
          </table:table-cell>
          <table:table-cell table:style-name="ce12N2" office:value-type="float" office:value="117.6">
            <text:p>117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32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57.59">
            <text:p>17157,59</text:p>
          </table:table-cell>
          <table:table-cell table:style-name="ce12N2" office:value-type="float" office:value="17.16">
            <text:p>1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.42">
            <text:p>154,4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329.5">
            <text:p>20329,50</text:p>
          </table:table-cell>
          <table:table-cell table:style-name="ce12N2" office:value-type="float" office:value="1423.07">
            <text:p>142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925615612165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51">
            <text:p>3095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9.1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0.26">
            <text:p>3740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40.26">
            <text:p>374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054">
            <text:p>0,015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0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56.68">
            <text:p>3156,68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41">
            <text:p>28,4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40.26">
            <text:p>3740,26</text:p>
          </table:table-cell>
          <table:table-cell table:style-name="ce12N2" office:value-type="float" office:value="261.82">
            <text:p>26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913618038852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3">
            <text:p>30956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77.43">
            <text:p>277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77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70.29">
            <text:p>2270,29</text:p>
          </table:table-cell>
          <table:table-cell table:style-name="ce12N2" office:value-type="float" office:value="2.27">
            <text:p>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43">
            <text:p>20,43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87.43">
            <text:p>87,43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188.3">
            <text:p>18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21370152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4">
            <text:p>30956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0.87">
            <text:p>1520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3">
            <text:p>147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52">
            <text:p>0,004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0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3.18">
            <text:p>1243,18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9">
            <text:p>11,19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47.87">
            <text:p>47,87</text:p>
          </table:table-cell>
          <table:table-cell table:style-name="ce12N2" office:value-type="float" office:value="1473">
            <text:p>1473,00</text:p>
          </table:table-cell>
          <table:table-cell table:style-name="ce12N2" office:value-type="float" office:value="103.11">
            <text:p>10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419041171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6">
            <text:p>30956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77.43">
            <text:p>277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77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70.29">
            <text:p>2270,29</text:p>
          </table:table-cell>
          <table:table-cell table:style-name="ce12N2" office:value-type="float" office:value="2.27">
            <text:p>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43">
            <text:p>20,43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87.43">
            <text:p>87,43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188.3">
            <text:p>18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318195877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7">
            <text:p>3095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1.5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37.52">
            <text:p>523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37.52">
            <text:p>5237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37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20.32">
            <text:p>4420,32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78">
            <text:p>39,7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37.52">
            <text:p>5237,52</text:p>
          </table:table-cell>
          <table:table-cell table:style-name="ce12N2" office:value-type="float" office:value="366.63">
            <text:p>366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152214368079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8">
            <text:p>30956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0.71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5.45">
            <text:p>448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85.45">
            <text:p>448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19">
            <text:p>0,007</text:p>
          </table:table-cell>
          <table:table-cell table:style-name="ce12N2" office:value-type="float" office:value="2.62">
            <text:p>2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5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85.61">
            <text:p>3785,61</text:p>
          </table:table-cell>
          <table:table-cell table:style-name="ce12N2" office:value-type="float" office:value="3.79">
            <text:p>3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07">
            <text:p>34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5.45">
            <text:p>4485,45</text:p>
          </table:table-cell>
          <table:table-cell table:style-name="ce12N2" office:value-type="float" office:value="313.98">
            <text:p>31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07131778819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4">
            <text:p>309594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9.25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64.79">
            <text:p>256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64.79">
            <text:p>2564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64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64.62">
            <text:p>2164,62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48">
            <text:p>19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4.79">
            <text:p>2564,79</text:p>
          </table:table-cell>
          <table:table-cell table:style-name="ce12N2" office:value-type="float" office:value="179.54">
            <text:p>17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925518864121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7">
            <text:p>309607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6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73.09">
            <text:p>307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00.08">
            <text:p>2800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896">
            <text:p>0,049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73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3.19">
            <text:p>2363,19</text:p>
          </table:table-cell>
          <table:table-cell table:style-name="ce12N2" office:value-type="float" office:value="2.36">
            <text:p>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27">
            <text:p>21,27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273.01">
            <text:p>273,01</text:p>
          </table:table-cell>
          <table:table-cell table:style-name="ce12N2" office:value-type="float" office:value="2800.08">
            <text:p>2800,08</text:p>
          </table:table-cell>
          <table:table-cell table:style-name="ce12N2" office:value-type="float" office:value="196.01">
            <text:p>19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681318324982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8">
            <text:p>309608</text:p>
          </table:table-cell>
          <table:table-cell table:style-name="ce0" table:number-columns-spanned="4" table:number-rows-spanned="1" office:value-type="string" calcext:value-type="string">
            <text:p>26 - TECNOPERFIL PLASTICOS LTDA</text:p>
          </table:table-cell>
          <table:covered-table-cell table:number-columns-repeated="3"/>
          <table:table-cell table:style-name="ce0" office:value-type="string" calcext:value-type="string">
            <text:p>18.03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0.87">
            <text:p>1950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31.8">
            <text:p>183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498">
            <text:p>0,155</text:p>
          </table:table-cell>
          <table:table-cell table:style-name="ce12N2" office:value-type="float" office:value="32.94">
            <text:p>32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50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5.99">
            <text:p>1545,99</text:p>
          </table:table-cell>
          <table:table-cell table:style-name="ce12N2" office:value-type="float" office:value="1.55">
            <text:p>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91">
            <text:p>13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19.07">
            <text:p>119,07</text:p>
          </table:table-cell>
          <table:table-cell table:style-name="ce12N2" office:value-type="float" office:value="1831.8">
            <text:p>1831,80</text:p>
          </table:table-cell>
          <table:table-cell table:style-name="ce12N2" office:value-type="float" office:value="128.23">
            <text:p>12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0341857000175550030000180381303298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9">
            <text:p>30960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9.1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43.24">
            <text:p>864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875.4">
            <text:p>7875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07004">
            <text:p>0,707</text:p>
          </table:table-cell>
          <table:table-cell table:style-name="ce12N2" office:value-type="float" office:value="52.22">
            <text:p>5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4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37.13">
            <text:p>6837,13</text:p>
          </table:table-cell>
          <table:table-cell table:style-name="ce12N2" office:value-type="float" office:value="6.83">
            <text:p>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53">
            <text:p>61,53</text:p>
          </table:table-cell>
          <table:table-cell table:style-name="ce12N2" office:value-type="float" office:value="53.51">
            <text:p>53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767.84">
            <text:p>767,84</text:p>
          </table:table-cell>
          <table:table-cell table:style-name="ce12N2" office:value-type="float" office:value="7875.4">
            <text:p>7875,40</text:p>
          </table:table-cell>
          <table:table-cell table:style-name="ce12N2" office:value-type="float" office:value="341.36">
            <text:p>34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919514531673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9">
            <text:p>3096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1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4.93">
            <text:p>2114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3.93">
            <text:p>1953,93</text:p>
          </table:table-cell>
          <table:table-cell table:style-name="ce12N2" office:value-type="float" office:value="161">
            <text:p>161,00</text:p>
          </table:table-cell>
          <table:table-cell table:style-name="ce12N3" office:value-type="float" office:value="0.162623">
            <text:p>0,163</text:p>
          </table:table-cell>
          <table:table-cell table:style-name="ce12N2" office:value-type="float" office:value="43.61">
            <text:p>43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14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2.26">
            <text:p>1702,26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33">
            <text:p>15,3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14.93">
            <text:p>2114,93</text:p>
          </table:table-cell>
          <table:table-cell table:style-name="ce12N2" office:value-type="float" office:value="84.58">
            <text:p>8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10714647909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87">
            <text:p>30968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0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1.59">
            <text:p>240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26">
            <text:p>23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6">
            <text:p>0,001</text:p>
          </table:table-cell>
          <table:table-cell table:style-name="ce12N2" office:value-type="float" office:value="1.92">
            <text:p>1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01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63.09">
            <text:p>1963,09</text:p>
          </table:table-cell>
          <table:table-cell table:style-name="ce12N2" office:value-type="float" office:value="1.96">
            <text:p>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67">
            <text:p>17,6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75.59">
            <text:p>75,59</text:p>
          </table:table-cell>
          <table:table-cell table:style-name="ce12N2" office:value-type="float" office:value="2326">
            <text:p>2326,00</text:p>
          </table:table-cell>
          <table:table-cell table:style-name="ce12N2" office:value-type="float" office:value="162.82">
            <text:p>16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0714033457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89">
            <text:p>30968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96.35">
            <text:p>369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80">
            <text:p>35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8">
            <text:p>0,002</text:p>
          </table:table-cell>
          <table:table-cell table:style-name="ce12N2" office:value-type="float" office:value="2.56">
            <text:p>2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96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1.43">
            <text:p>3021,43</text:p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19">
            <text:p>27,1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16.35">
            <text:p>116,35</text:p>
          </table:table-cell>
          <table:table-cell table:style-name="ce12N2" office:value-type="float" office:value="3580">
            <text:p>3580,00</text:p>
          </table:table-cell>
          <table:table-cell table:style-name="ce12N2" office:value-type="float" office:value="250.6">
            <text:p>25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1713929349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1">
            <text:p>309701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5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9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5.27">
            <text:p>1485,27</text:p>
          </table:table-cell>
          <table:table-cell table:style-name="ce12N2" office:value-type="float" office:value="1.49">
            <text:p>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37">
            <text:p>13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123.19">
            <text:p>12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53617362463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7">
            <text:p>30970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1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072.59">
            <text:p>3507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">
            <text:p>61,00</text:p>
          </table:table-cell>
          <table:table-cell table:style-name="ce12N2" office:value-type="float" office:value="34601.07">
            <text:p>34601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7491">
            <text:p>0,317</text:p>
          </table:table-cell>
          <table:table-cell table:style-name="ce12N2" office:value-type="float" office:value="72.8">
            <text:p>7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07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202.37">
            <text:p>29202,37</text:p>
          </table:table-cell>
          <table:table-cell table:style-name="ce12N2" office:value-type="float" office:value="29.2">
            <text:p>2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2.83">
            <text:p>262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471.52">
            <text:p>471,52</text:p>
          </table:table-cell>
          <table:table-cell table:style-name="ce12N2" office:value-type="float" office:value="34601.07">
            <text:p>34601,07</text:p>
          </table:table-cell>
          <table:table-cell table:style-name="ce12N2" office:value-type="float" office:value="2422.05">
            <text:p>242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1071268184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0">
            <text:p>4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61">
            <text:p>161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214.92">
            <text:p>3214,92</text:p>
          </table:table-cell>
          <table:table-cell table:style-name="ce26N2" office:value-type="float" office:value="812270.04">
            <text:p>812270,04</text:p>
          </table:table-cell>
          <table:table-cell table:style-name="ce26N2" office:value-type="float" office:value="56208.2">
            <text:p>56208,2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15835.8">
            <text:p>815835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6.899164">
            <text:p>16,899</text:p>
          </table:table-cell>
          <table:table-cell table:style-name="ce26N2" office:value-type="float" office:value="812459.88">
            <text:p>812459,88</text:p>
          </table:table-cell>
          <table:table-cell table:style-name="ce26N2" office:value-type="float" office:value="815835.8">
            <text:p>815835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80202.75">
            <text:p>680202,75</text:p>
          </table:table-cell>
          <table:table-cell table:style-name="ce26N2" office:value-type="float" office:value="680.21">
            <text:p>680,2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121.82">
            <text:p>6121,82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0521.16">
            <text:p>10521,1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8.35">
            <text:p>78,3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02" meta:object-count="0"/>
    <meta:generator>LibreOffice/4.3.0.4$Windows_x86 LibreOffice_project/62ad5818884a2fc2e5780dd45466868d41009ec0</meta:generator>
  </office:meta>
</office:document-meta>
</file>