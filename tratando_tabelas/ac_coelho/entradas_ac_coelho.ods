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7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7">
            <text:p>308847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25">
            <text:p>33,25</text:p>
          </table:table-cell>
          <table:table-cell table:style-name="ce12N2" office:value-type="float" office:value="52.87">
            <text:p>52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12.48">
            <text:p>412,48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131.32">
            <text:p>1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629244900000247550010000680361106919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5">
            <text:p>308855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1.1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3.56">
            <text:p>497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.28">
            <text:p>4316,28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.56">
            <text:p>156,56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337.19">
            <text:p>33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71872600013555001000201141191984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6">
            <text:p>30888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2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.3">
            <text:p>3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5.69">
            <text:p>335,69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5.38">
            <text:p>35,38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223181702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7">
            <text:p>30901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34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31.18">
            <text:p>365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02664">
            <text:p>20,027</text:p>
          </table:table-cell>
          <table:table-cell table:style-name="ce12N2" office:value-type="float" office:value="41.5">
            <text:p>4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531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98.6">
            <text:p>28998,60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99">
            <text:p>260,99</text:p>
          </table:table-cell>
          <table:table-cell table:style-name="ce12N2" office:value-type="float" office:value="84.67">
            <text:p>8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245.37">
            <text:p>3245,37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1331.43">
            <text:p>13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3441574582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7">
            <text:p>30905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8.9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13.09">
            <text:p>271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992">
            <text:p>0,122</text:p>
          </table:table-cell>
          <table:table-cell table:style-name="ce12N2" office:value-type="float" office:value="46.8">
            <text:p>4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11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0.24">
            <text:p>20250,24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5">
            <text:p>182,2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119.21">
            <text:p>3119,21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1679.57">
            <text:p>167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35628590001055500100016892919916892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9">
            <text:p>30905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5.5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1344">
            <text:p>0,421</text:p>
          </table:table-cell>
          <table:table-cell table:style-name="ce12N2" office:value-type="float" office:value="57.02">
            <text:p>57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7.64">
            <text:p>3367,64</text:p>
          </table:table-cell>
          <table:table-cell table:style-name="ce12N2" office:value-type="float" office:value="3.37">
            <text:p>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3">
            <text:p>30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253.48">
            <text:p>25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551013417034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5">
            <text:p>3090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5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2">
            <text:p>0,00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.62">
            <text:p>4074,62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337.95">
            <text:p>33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5211342735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6">
            <text:p>309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6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86">
            <text:p>0,0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62">
            <text:p>1531,62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127.03">
            <text:p>12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6071118733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8">
            <text:p>30910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.98">
            <text:p>2576,98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9">
            <text:p>23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213.74">
            <text:p>21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11401821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9">
            <text:p>30910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6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10.75">
            <text:p>3710,75</text:p>
          </table:table-cell>
          <table:table-cell table:style-name="ce12N2" office:value-type="float" office:value="3.71">
            <text:p>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4">
            <text:p>33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307.77">
            <text:p>3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2174253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1">
            <text:p>309111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9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54.37">
            <text:p>164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5541.87">
            <text:p>15541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673">
            <text:p>0,787</text:p>
          </table:table-cell>
          <table:table-cell table:style-name="ce12N2" office:value-type="float" office:value="75.23">
            <text:p>75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71.95">
            <text:p>13271,95</text:p>
          </table:table-cell>
          <table:table-cell table:style-name="ce12N2" office:value-type="float" office:value="13.27">
            <text:p>1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46">
            <text:p>119,4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12.5">
            <text:p>912,50</text:p>
          </table:table-cell>
          <table:table-cell table:style-name="ce12N2" office:value-type="float" office:value="13101.94">
            <text:p>13101,94</text:p>
          </table:table-cell>
          <table:table-cell table:style-name="ce12N2" office:value-type="float" office:value="917.13">
            <text:p>91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7159430000361550010000879501835786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2">
            <text:p>3091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4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6">
            <text:p>0,098</text:p>
          </table:table-cell>
          <table:table-cell table:style-name="ce12N2" office:value-type="float" office:value="48.4">
            <text:p>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26">
            <text:p>15526,00</text:p>
          </table:table-cell>
          <table:table-cell table:style-name="ce12N2" office:value-type="float" office:value="15.53">
            <text:p>1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73">
            <text:p>139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1287.72">
            <text:p>128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43341524918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7">
            <text:p>30912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4.13">
            <text:p>222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1.29">
            <text:p>1751,29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6">
            <text:p>15,7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13.93">
            <text:p>213,93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80.41">
            <text:p>8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31655941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0">
            <text:p>30913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2.71">
            <text:p>338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00.51">
            <text:p>300,51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215.75">
            <text:p>2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6871002646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9">
            <text:p>309219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">
            <text:p>0,001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381986976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3">
            <text:p>309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08">
            <text:p>0,030</text:p>
          </table:table-cell>
          <table:table-cell table:style-name="ce12N2" office:value-type="float" office:value="10.19">
            <text:p>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0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2.2">
            <text:p>6422,20</text:p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532.66">
            <text:p>53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5651866437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4">
            <text:p>3092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0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4">
            <text:p>0,090</text:p>
          </table:table-cell>
          <table:table-cell table:style-name="ce12N2" office:value-type="float" office:value="57.08">
            <text:p>5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3.67">
            <text:p>4353,6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8">
            <text:p>39,18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361.1">
            <text:p>36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01711748741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5">
            <text:p>30922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82">
            <text:p>0,010</text:p>
          </table:table-cell>
          <table:table-cell table:style-name="ce12N2" office:value-type="float" office:value="6.75">
            <text:p>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3.51">
            <text:p>1123,51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1">
            <text:p>10,11</text:p>
          </table:table-cell>
          <table:table-cell table:style-name="ce12N2" office:value-type="float" office:value="37.99">
            <text:p>37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93.19">
            <text:p>9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1471239419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7">
            <text:p>3092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6.2">
            <text:p>2296,20</text:p>
          </table:table-cell>
          <table:table-cell table:style-name="ce12N2" office:value-type="float" office:value="2.3">
            <text:p>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82017149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1">
            <text:p>3092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2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207153627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5">
            <text:p>309235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6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4.26">
            <text:p>466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2">
            <text:p>0,059</text:p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2.11">
            <text:p>3752,11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7">
            <text:p>33,77</text:p>
          </table:table-cell>
          <table:table-cell table:style-name="ce12N2" office:value-type="float" office:value="40.34">
            <text:p>40,3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18.51">
            <text:p>218,51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311.19">
            <text:p>31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69159760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0">
            <text:p>309240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7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7.64">
            <text:p>3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12.64">
            <text:p>3212,64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5">
            <text:p>0,05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2.52">
            <text:p>2912,52</text:p>
          </table:table-cell>
          <table:table-cell table:style-name="ce12N2" office:value-type="float" office:value="2.91">
            <text:p>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2">
            <text:p>26,2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7.64">
            <text:p>3477,64</text:p>
          </table:table-cell>
          <table:table-cell table:style-name="ce12N2" office:value-type="float" office:value="243.44">
            <text:p>24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27254297000178550010000107751693871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3">
            <text:p>30924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0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7.64">
            <text:p>547,6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3">
            <text:p>4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45.42">
            <text:p>4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0821378128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2">
            <text:p>3092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6.35">
            <text:p>43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52">
            <text:p>0,048</text:p>
          </table:table-cell>
          <table:table-cell table:style-name="ce12N2" office:value-type="float" office:value="39.36">
            <text:p>3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0.05">
            <text:p>3520,05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5.55">
            <text:p>135,55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291.96">
            <text:p>29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8018641279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6">
            <text:p>3092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0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0591446448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7">
            <text:p>3092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1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38">
            <text:p>0,005</text:p>
          </table:table-cell>
          <table:table-cell table:style-name="ce12N2" office:value-type="float" office:value="4.51">
            <text:p>4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1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1.02">
            <text:p>6511,02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">
            <text:p>58,6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540.02">
            <text:p>54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1551192158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9">
            <text:p>309279</text:p>
          </table:table-cell>
          <table:table-cell table:style-name="ce0" table:number-columns-spanned="4" table:number-rows-spanned="1" office:value-type="string" calcext:value-type="string">
            <text:p>32.986 - MARCELO NUNES ALENCAR</text:p>
          </table:table-cell>
          <table:covered-table-cell table:number-columns-repeated="3"/>
          <table:table-cell table:style-name="ce0" office:value-type="string" calcext:value-type="string">
            <text:p>2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0">
            <text:p>12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0">
            <text:p>12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0">
            <text:p>1240,00</text:p>
          </table:table-cell>
          <table:table-cell table:style-name="ce12N2" office:value-type="float" office:value="17.86">
            <text:p>1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6260621258670000182550010000002121300000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4">
            <text:p>309284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2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.18">
            <text:p>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26">
            <text:p>0,001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.81">
            <text:p>10,81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17.61">
            <text:p>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2115425518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1">
            <text:p>3093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6">
            <text:p>0,044</text:p>
          </table:table-cell>
          <table:table-cell table:style-name="ce12N2" office:value-type="float" office:value="30.76">
            <text:p>3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16.64">
            <text:p>7116,6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05">
            <text:p>64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590.25">
            <text:p>59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591833447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0">
            <text:p>4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5">
            <text:p>7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888.06">
            <text:p>13888,06</text:p>
          </table:table-cell>
          <table:table-cell table:style-name="ce26N2" office:value-type="float" office:value="826072.18">
            <text:p>826072,18</text:p>
          </table:table-cell>
          <table:table-cell table:style-name="ce26N2" office:value-type="float" office:value="56362.9">
            <text:p>56362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42410.17">
            <text:p>842410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9.108025">
            <text:p>29,108</text:p>
          </table:table-cell>
          <table:table-cell table:style-name="ce26N2" office:value-type="float" office:value="827757.11">
            <text:p>827757,11</text:p>
          </table:table-cell>
          <table:table-cell table:style-name="ce26N2" office:value-type="float" office:value="842410.17">
            <text:p>842410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93785.23">
            <text:p>693785,23</text:p>
          </table:table-cell>
          <table:table-cell table:style-name="ce26N2" office:value-type="float" office:value="693.86">
            <text:p>693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244">
            <text:p>6244,0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161.25">
            <text:p>10161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.18">
            <text:p>77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02" meta:object-count="0"/>
    <meta:generator>LibreOffice/4.3.0.4$Windows_x86 LibreOffice_project/62ad5818884a2fc2e5780dd45466868d41009ec0</meta:generator>
  </office:meta>
</office:document-meta>
</file>