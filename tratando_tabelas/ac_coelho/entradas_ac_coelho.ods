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1/06/2026 04:30:3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1">
            <text:p>308551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6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7.24">
            <text:p>1227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3506">
            <text:p>0,534</text:p>
          </table:table-cell>
          <table:table-cell table:style-name="ce12N2" office:value-type="float" office:value="84.88">
            <text:p>84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04.57">
            <text:p>10504,57</text:p>
          </table:table-cell>
          <table:table-cell table:style-name="ce12N2" office:value-type="float" office:value="10.53">
            <text:p>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55">
            <text:p>94,55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5.32">
            <text:p>165,32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536.66">
            <text:p>53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644186647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9">
            <text:p>308559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29.77">
            <text:p>1572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48">
            <text:p>0,233</text:p>
          </table:table-cell>
          <table:table-cell table:style-name="ce12N2" office:value-type="float" office:value="94.39">
            <text:p>9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2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4.45">
            <text:p>164,45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622.61">
            <text:p>62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6332570001985500100003087115830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4">
            <text:p>3086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9.74">
            <text:p>161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04">
            <text:p>0,01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9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.58">
            <text:p>1283,58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5">
            <text:p>11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8.86">
            <text:p>98,86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106.46">
            <text:p>10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412808820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3">
            <text:p>308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91240970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5">
            <text:p>308725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91">
            <text:p>1531,9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120.02">
            <text:p>1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161001894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6">
            <text:p>3087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15">
            <text:p>15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9.04">
            <text:p>1249,04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1012312806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7">
            <text:p>3087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8.61">
            <text:p>287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1.2">
            <text:p>2281,2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75.69">
            <text:p>175,69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189.2">
            <text:p>1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041134215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7">
            <text:p>308847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25">
            <text:p>33,25</text:p>
          </table:table-cell>
          <table:table-cell table:style-name="ce12N2" office:value-type="float" office:value="52.87">
            <text:p>52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12.48">
            <text:p>412,48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131.32">
            <text:p>1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629244900000247550010000680361106919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7">
            <text:p>308877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6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4.82">
            <text:p>448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234.98">
            <text:p>423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1.8">
            <text:p>331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17.19">
            <text:p>3917,19</text:p>
          </table:table-cell>
          <table:table-cell table:style-name="ce12N2" office:value-type="float" office:value="3.91">
            <text:p>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49.84">
            <text:p>249,84</text:p>
          </table:table-cell>
          <table:table-cell table:style-name="ce12N2" office:value-type="float" office:value="4234.98">
            <text:p>4234,98</text:p>
          </table:table-cell>
          <table:table-cell table:style-name="ce12N2" office:value-type="float" office:value="169.4">
            <text:p>16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7328359000195550010000860661262992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6">
            <text:p>30888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2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.3">
            <text:p>3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5.69">
            <text:p>335,69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5.38">
            <text:p>35,38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223181702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3">
            <text:p>308953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4.73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182">
            <text:p>2731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72372">
            <text:p>2723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760624">
            <text:p>12,761</text:p>
          </table:table-cell>
          <table:table-cell table:style-name="ce12N2" office:value-type="float" office:value="23562">
            <text:p>2356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.1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352.46">
            <text:p>230352,46</text:p>
          </table:table-cell>
          <table:table-cell table:style-name="ce12N2" office:value-type="float" office:value="230.35">
            <text:p>23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3.17">
            <text:p>2073,1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10">
            <text:p>810,00</text:p>
          </table:table-cell>
          <table:table-cell table:style-name="ce12N2" office:value-type="float" office:value="272372">
            <text:p>272372,00</text:p>
          </table:table-cell>
          <table:table-cell table:style-name="ce12N2" office:value-type="float" office:value="18540.07">
            <text:p>1854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47301592398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4">
            <text:p>3089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28.81">
            <text:p>4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4">
            <text:p>0,002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8.86">
            <text:p>4028,86</text:p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6">
            <text:p>36,2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55.14">
            <text:p>155,14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334.16">
            <text:p>3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341373637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5.48">
            <text:p>6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422.08">
            <text:p>9422,08</text:p>
          </table:table-cell>
          <table:table-cell table:style-name="ce26N2" office:value-type="float" office:value="1071416.95">
            <text:p>1071416,95</text:p>
          </table:table-cell>
          <table:table-cell table:style-name="ce26N2" office:value-type="float" office:value="72890.39">
            <text:p>72890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80849.03">
            <text:p>1080849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3.689145">
            <text:p>23,689</text:p>
          </table:table-cell>
          <table:table-cell table:style-name="ce26N2" office:value-type="float" office:value="1070751.47">
            <text:p>1070751,47</text:p>
          </table:table-cell>
          <table:table-cell table:style-name="ce26N2" office:value-type="float" office:value="1080849.03">
            <text:p>1080849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33874.8">
            <text:p>833874,80</text:p>
          </table:table-cell>
          <table:table-cell table:style-name="ce26N2" office:value-type="float" office:value="833.96">
            <text:p>833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504.8">
            <text:p>7504,8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5088.82">
            <text:p>35088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.39">
            <text:p>60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2" meta:object-count="0"/>
    <meta:generator>LibreOffice/4.3.0.4$Windows_x86 LibreOffice_project/62ad5818884a2fc2e5780dd45466868d41009ec0</meta:generator>
  </office:meta>
</office:document-meta>
</file>