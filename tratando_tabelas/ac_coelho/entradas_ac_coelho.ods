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4/07/2026 04:30:3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2">
            <text:p>310682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41177117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3">
            <text:p>310683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51451637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4">
            <text:p>31068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756">
            <text:p>0,370</text:p>
          </table:table-cell>
          <table:table-cell table:style-name="ce12N2" office:value-type="float" office:value="28.79">
            <text:p>28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2.44">
            <text:p>3182,44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4">
            <text:p>28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263.96">
            <text:p>2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6177017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5">
            <text:p>31068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58.64">
            <text:p>12458,64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3">
            <text:p>112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1033.33">
            <text:p>10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71306853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8">
            <text:p>31080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2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37.79">
            <text:p>1563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95">
            <text:p>1,399</text:p>
          </table:table-cell>
          <table:table-cell table:style-name="ce12N2" office:value-type="float" office:value="104.6">
            <text:p>10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37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56.72">
            <text:p>12356,72</text:p>
          </table:table-cell>
          <table:table-cell table:style-name="ce12N2" office:value-type="float" office:value="12.37">
            <text:p>1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22">
            <text:p>111,2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996.79">
            <text:p>996,79</text:p>
          </table:table-cell>
          <table:table-cell table:style-name="ce12N2" office:value-type="float" office:value="14641">
            <text:p>14641,00</text:p>
          </table:table-cell>
          <table:table-cell table:style-name="ce12N2" office:value-type="float" office:value="1024.87">
            <text:p>102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2601273772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9">
            <text:p>310809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2.3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0.15">
            <text:p>84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71">
            <text:p>6912,71</text:p>
          </table:table-cell>
          <table:table-cell table:style-name="ce12N2" office:value-type="float" office:value="6.92">
            <text:p>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3">
            <text:p>62,2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45.59">
            <text:p>545,59</text:p>
          </table:table-cell>
          <table:table-cell table:style-name="ce12N2" office:value-type="float" office:value="7934.56">
            <text:p>7934,56</text:p>
          </table:table-cell>
          <table:table-cell table:style-name="ce12N2" office:value-type="float" office:value="317.4">
            <text:p>31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23411101530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3">
            <text:p>310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2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8">
            <text:p>1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.32">
            <text:p>1617,32</text:p>
          </table:table-cell>
          <table:table-cell table:style-name="ce12N2" office:value-type="float" office:value="64.69">
            <text:p>6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2611777004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9">
            <text:p>310819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2.0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5.38">
            <text:p>29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70728">
            <text:p>21,707</text:p>
          </table:table-cell>
          <table:table-cell table:style-name="ce12N2" office:value-type="float" office:value="19.59">
            <text:p>19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6.77">
            <text:p>2496,77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7">
            <text:p>22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2786.4">
            <text:p>2786,40</text:p>
          </table:table-cell>
          <table:table-cell table:style-name="ce12N2" office:value-type="float" office:value="195.05">
            <text:p>1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2803462000172550030001320781769416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4">
            <text:p>310824</text:p>
          </table:table-cell>
          <table:table-cell table:style-name="ce0" table:number-columns-spanned="4" table:number-rows-spanned="1" office:value-type="string" calcext:value-type="string">
            <text:p>39.105 - ALLTAPE INDUSTRIA E COMERCIO DE FITAS ADESIVAS LTDA</text:p>
          </table:table-cell>
          <table:covered-table-cell table:number-columns-repeated="3"/>
          <table:table-cell table:style-name="ce0" office:value-type="string" calcext:value-type="string">
            <text:p>232.1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1.3">
            <text:p>733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0.46">
            <text:p>5490,4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41">
            <text:p>49,4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5.82">
            <text:p>825,82</text:p>
          </table:table-cell>
          <table:table-cell table:style-name="ce12N2" office:value-type="float" office:value="6505.48">
            <text:p>6505,48</text:p>
          </table:table-cell>
          <table:table-cell table:style-name="ce12N2" office:value-type="float" office:value="455.38">
            <text:p>45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25020400017955001000232100137824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2.79">
            <text:p>612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311.27">
            <text:p>13311,27</text:p>
          </table:table-cell>
          <table:table-cell table:style-name="ce26N2" office:value-type="float" office:value="590804.89">
            <text:p>590804,89</text:p>
          </table:table-cell>
          <table:table-cell table:style-name="ce26N2" office:value-type="float" office:value="39622.55">
            <text:p>39622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4180.05">
            <text:p>604180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8.552209">
            <text:p>38,552</text:p>
          </table:table-cell>
          <table:table-cell table:style-name="ce26N2" office:value-type="float" office:value="590202.1">
            <text:p>590202,10</text:p>
          </table:table-cell>
          <table:table-cell table:style-name="ce26N2" office:value-type="float" office:value="604180.05">
            <text:p>604180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1329.24">
            <text:p>501329,24</text:p>
          </table:table-cell>
          <table:table-cell table:style-name="ce26N2" office:value-type="float" office:value="501.35">
            <text:p>501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11.94">
            <text:p>4511,9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504.08">
            <text:p>4504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0.89">
            <text:p>80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