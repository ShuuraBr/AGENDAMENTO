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9/07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8">
            <text:p>3087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51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0.58">
            <text:p>6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0.58">
            <text:p>62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275">
            <text:p>0,006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0.58">
            <text:p>620,58</text:p>
          </table:table-cell>
          <table:table-cell table:style-name="ce12N2" office:value-type="float" office:value="43.44">
            <text:p>4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5191980059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9">
            <text:p>309849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0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0.35">
            <text:p>44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7744">
            <text:p>0,268</text:p>
          </table:table-cell>
          <table:table-cell table:style-name="ce12N2" office:value-type="float" office:value="39.12">
            <text:p>3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0.07">
            <text:p>3670,07</text:p>
          </table:table-cell>
          <table:table-cell table:style-name="ce12N2" office:value-type="float" office:value="3.66">
            <text:p>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81.77">
            <text:p>81,77</text:p>
          </table:table-cell>
          <table:table-cell table:style-name="ce12N2" office:value-type="float" office:value="4348.58">
            <text:p>4348,58</text:p>
          </table:table-cell>
          <table:table-cell table:style-name="ce12N2" office:value-type="float" office:value="304.41">
            <text:p>3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0181836222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51">
            <text:p>30985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1.22">
            <text:p>1084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912">
            <text:p>0,055</text:p>
          </table:table-cell>
          <table:table-cell table:style-name="ce12N2" office:value-type="float" office:value="37.34">
            <text:p>3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97.1">
            <text:p>8097,10</text:p>
          </table:table-cell>
          <table:table-cell table:style-name="ce12N2" office:value-type="float" office:value="8.1">
            <text:p>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.87">
            <text:p>72,87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247.22">
            <text:p>1247,22</text:p>
          </table:table-cell>
          <table:table-cell table:style-name="ce12N2" office:value-type="float" office:value="9594">
            <text:p>9594,00</text:p>
          </table:table-cell>
          <table:table-cell table:style-name="ce12N2" office:value-type="float" office:value="671.58">
            <text:p>67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7841859688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6">
            <text:p>30987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9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25">
            <text:p>0,212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18">
            <text:p>1233,1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">
            <text:p>11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6">
            <text:p>1326,00</text:p>
          </table:table-cell>
          <table:table-cell table:style-name="ce12N2" office:value-type="float" office:value="92.82">
            <text:p>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911310268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80">
            <text:p>309880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2.3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.43">
            <text:p>2135,4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2">
            <text:p>19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1.12">
            <text:p>2451,12</text:p>
          </table:table-cell>
          <table:table-cell table:style-name="ce12N2" office:value-type="float" office:value="98.04">
            <text:p>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60221460400032855003000222305181177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4">
            <text:p>3101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4">
            <text:p>0,038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3.04">
            <text:p>1903,04</text:p>
          </table:table-cell>
          <table:table-cell table:style-name="ce12N2" office:value-type="float" office:value="1.9">
            <text:p>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3">
            <text:p>17,1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4.85">
            <text:p>2254,85</text:p>
          </table:table-cell>
          <table:table-cell table:style-name="ce12N2" office:value-type="float" office:value="157.84">
            <text:p>15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391658669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1">
            <text:p>3102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6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5.27">
            <text:p>1785,2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07">
            <text:p>16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5.3">
            <text:p>2115,30</text:p>
          </table:table-cell>
          <table:table-cell table:style-name="ce12N2" office:value-type="float" office:value="148.07">
            <text:p>14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628150647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3">
            <text:p>310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5">
            <text:p>0,144</text:p>
          </table:table-cell>
          <table:table-cell table:style-name="ce12N2" office:value-type="float" office:value="24.78">
            <text:p>2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8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37.53">
            <text:p>5137,53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4">
            <text:p>46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426.11">
            <text:p>42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7139710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2">
            <text:p>31025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81597243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4">
            <text:p>31025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01682147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4">
            <text:p>3102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0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.8">
            <text:p>1695,8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140.65">
            <text:p>1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09611178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0">
            <text:p>3103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4">
            <text:p>0,012</text:p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39.48">
            <text:p>13439,48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96">
            <text:p>12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593198683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4">
            <text:p>31032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3">
            <text:p>39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05">
            <text:p>3505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7.6">
            <text:p>3127,60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5">
            <text:p>28,15</text:p>
          </table:table-cell>
          <table:table-cell table:style-name="ce12N2" office:value-type="float" office:value="41.7">
            <text:p>41,7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41.73">
            <text:p>341,73</text:p>
          </table:table-cell>
          <table:table-cell table:style-name="ce12N2" office:value-type="float" office:value="3590">
            <text:p>3590,00</text:p>
          </table:table-cell>
          <table:table-cell table:style-name="ce12N2" office:value-type="float" office:value="143.6">
            <text:p>14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1111795254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7">
            <text:p>310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1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4.91">
            <text:p>178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53">
            <text:p>0,010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4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2.1">
            <text:p>1472,10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5">
            <text:p>1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122.09">
            <text:p>12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1841233645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8">
            <text:p>310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4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6.76">
            <text:p>512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2.78">
            <text:p>4062,7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7">
            <text:p>3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2.9">
            <text:p>312,9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336.97">
            <text:p>3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4741481861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8">
            <text:p>310358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72">
            <text:p>615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63.51">
            <text:p>5063,51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58">
            <text:p>45,5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673.78">
            <text:p>673,78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219.31">
            <text:p>2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01202658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5">
            <text:p>310365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22.07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03">
            <text:p>3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375">
            <text:p>0,854</text:p>
          </table:table-cell>
          <table:table-cell table:style-name="ce12N2" office:value-type="float" office:value="15.79">
            <text:p>15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3.03">
            <text:p>3263,03</text:p>
          </table:table-cell>
          <table:table-cell table:style-name="ce12N2" office:value-type="float" office:value="3.26">
            <text:p>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37">
            <text:p>29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5.03">
            <text:p>125,03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228.36">
            <text:p>22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84554530001785500400002207613466370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7">
            <text:p>3103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2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02">
            <text:p>0,022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4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65.24">
            <text:p>12165,24</text:p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49">
            <text:p>109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1009">
            <text:p>10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24313758644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2">
            <text:p>310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.86">
            <text:p>2456,86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1">
            <text:p>22,1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203.77">
            <text:p>20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511293957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3">
            <text:p>310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7">
            <text:p>0,075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4.8">
            <text:p>3384,80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6">
            <text:p>30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280.74">
            <text:p>28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81753214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8">
            <text:p>31041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3.9">
            <text:p>1591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52">
            <text:p>0,042</text:p>
          </table:table-cell>
          <table:table-cell table:style-name="ce12N2" office:value-type="float" office:value="27.8">
            <text:p>2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85.4">
            <text:p>12985,40</text:p>
          </table:table-cell>
          <table:table-cell table:style-name="ce12N2" office:value-type="float" office:value="12.99">
            <text:p>1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.87">
            <text:p>116,87</text:p>
          </table:table-cell>
          <table:table-cell table:style-name="ce12N2" office:value-type="float" office:value="72.15">
            <text:p>72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08.71">
            <text:p>1008,71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596.21">
            <text:p>59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6091489590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3">
            <text:p>310423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0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93.05">
            <text:p>1393,0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54">
            <text:p>12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115.54">
            <text:p>1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6871130136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5">
            <text:p>3104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38">
            <text:p>0,005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0.06">
            <text:p>1300,06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107.83">
            <text:p>1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01745782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4">
            <text:p>3104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.38">
            <text:p>408,38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541651900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3">
            <text:p>31047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3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37.97">
            <text:p>6403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9304">
            <text:p>0,499</text:p>
          </table:table-cell>
          <table:table-cell table:style-name="ce12N2" office:value-type="float" office:value="410.5">
            <text:p>4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03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01.42">
            <text:p>52901,42</text:p>
          </table:table-cell>
          <table:table-cell table:style-name="ce12N2" office:value-type="float" office:value="52.9">
            <text:p>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1">
            <text:p>476,10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863.05">
            <text:p>1863,05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3881.36">
            <text:p>38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137771912698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2">
            <text:p>3104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82">
            <text:p>381,82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9721198719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6">
            <text:p>3104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64">
            <text:p>0,04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8.88">
            <text:p>3478,88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1">
            <text:p>31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288.54">
            <text:p>28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21803914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8">
            <text:p>3104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3.24">
            <text:p>33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2.79">
            <text:p>2732,79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6">
            <text:p>24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05.24">
            <text:p>105,24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226.66">
            <text:p>2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31677619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6">
            <text:p>31053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3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0.11">
            <text:p>469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04">
            <text:p>0,001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9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8">
            <text:p>3749,68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53.69">
            <text:p>53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386.09">
            <text:p>386,09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172.16">
            <text:p>1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3266140103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4">
            <text:p>310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816">
            <text:p>0,075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5.58">
            <text:p>4775,58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98">
            <text:p>4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396.09">
            <text:p>3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761883841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8">
            <text:p>4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95.29">
            <text:p>595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849.25">
            <text:p>14849,25</text:p>
          </table:table-cell>
          <table:table-cell table:style-name="ce26N2" office:value-type="float" office:value="648170.12">
            <text:p>648170,12</text:p>
          </table:table-cell>
          <table:table-cell table:style-name="ce26N2" office:value-type="float" office:value="43066.35">
            <text:p>43066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3083.26">
            <text:p>663083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6.510202">
            <text:p>16,510</text:p>
          </table:table-cell>
          <table:table-cell table:style-name="ce26N2" office:value-type="float" office:value="647584.83">
            <text:p>647584,83</text:p>
          </table:table-cell>
          <table:table-cell table:style-name="ce26N2" office:value-type="float" office:value="663083.26">
            <text:p>663083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8251.69">
            <text:p>548251,69</text:p>
          </table:table-cell>
          <table:table-cell table:style-name="ce26N2" office:value-type="float" office:value="548.25">
            <text:p>548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34.32">
            <text:p>4934,3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962.8">
            <text:p>3962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6.37">
            <text:p>76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30" meta:object-count="0"/>
    <meta:generator>LibreOffice/4.3.0.4$Windows_x86 LibreOffice_project/62ad5818884a2fc2e5780dd45466868d41009ec0</meta:generator>
  </office:meta>
</office:document-meta>
</file>