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5/05/2026 10:35:1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9">
            <text:p>3059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5.86">
            <text:p>22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6">
            <text:p>0,014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41.06">
            <text:p>141,06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146.64">
            <text:p>14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13196873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9">
            <text:p>3060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3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0.21">
            <text:p>366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6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15.21">
            <text:p>115,21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3581722563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0">
            <text:p>3060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1.64">
            <text:p>41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2">
            <text:p>0,010</text:p>
          </table:table-cell>
          <table:table-cell table:style-name="ce12N2" office:value-type="float" office:value="18.95">
            <text:p>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8.39">
            <text:p>158,39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175.78">
            <text:p>17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091225184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0">
            <text:p>306060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04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28.44">
            <text:p>42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08.9">
            <text:p>2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2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284.08">
            <text:p>2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964256600019155001000404193107316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6">
            <text:p>3061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3.03">
            <text:p>27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5">
            <text:p>0,000</text:p>
          </table:table-cell>
          <table:table-cell table:style-name="ce12N2" office:value-type="float" office:value="500">
            <text:p>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6.03">
            <text:p>86,03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185.29">
            <text:p>18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489115914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0">
            <text:p>30616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7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10.62">
            <text:p>8481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67016">
            <text:p>8,867</text:p>
          </table:table-cell>
          <table:table-cell table:style-name="ce12N2" office:value-type="float" office:value="1910.81">
            <text:p>191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810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17.25">
            <text:p>1617,25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5525.86">
            <text:p>55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714137916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8">
            <text:p>306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1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25">
            <text:p>0,055</text:p>
          </table:table-cell>
          <table:table-cell table:style-name="ce12N2" office:value-type="float" office:value="14.5">
            <text:p>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1011602129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0">
            <text:p>306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166.1">
            <text:p>1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081972692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3">
            <text:p>306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56.5">
            <text:p>5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121851006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9">
            <text:p>30633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150.65">
            <text:p>1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71860491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0">
            <text:p>306340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27">
            <text:p>93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36.62">
            <text:p>3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9150514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7">
            <text:p>306397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6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29">
            <text:p>2472,29</text:p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81.5">
            <text:p>23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">
            <text:p>0,002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50.89">
            <text:p>150,89</text:p>
          </table:table-cell>
          <table:table-cell table:style-name="ce12N2" office:value-type="float" office:value="2321.4">
            <text:p>2321,40</text:p>
          </table:table-cell>
          <table:table-cell table:style-name="ce12N2" office:value-type="float" office:value="162.5">
            <text:p>16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991334000129550010001561111437026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01">
            <text:p>306401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0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6.42">
            <text:p>970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06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862.3">
            <text:p>862,3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619.09">
            <text:p>61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601541002601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19">
            <text:p>30651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3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0.34">
            <text:p>963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2">
            <text:p>0,121</text:p>
          </table:table-cell>
          <table:table-cell table:style-name="ce12N2" office:value-type="float" office:value="84.02">
            <text:p>8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2.54">
            <text:p>802,54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617.95">
            <text:p>61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317177295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1">
            <text:p>30652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87">
            <text:p>247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">
            <text:p>0,09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167.72">
            <text:p>16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35167670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9">
            <text:p>30652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4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2.43">
            <text:p>322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43">
            <text:p>101,43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218.47">
            <text:p>21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4012933423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6">
            <text:p>306566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3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3.58">
            <text:p>191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05579">
            <text:p>10,056</text:p>
          </table:table-cell>
          <table:table-cell table:style-name="ce12N2" office:value-type="float" office:value="44.3">
            <text:p>4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68">
            <text:p>71,6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14.48">
            <text:p>1414,48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710.36">
            <text:p>71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3171687660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3">
            <text:p>30657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68.42">
            <text:p>196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4342">
            <text:p>12,434</text:p>
          </table:table-cell>
          <table:table-cell table:style-name="ce12N2" office:value-type="float" office:value="1442.54">
            <text:p>144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6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65.88">
            <text:p>1465,88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1274.17">
            <text:p>127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715943000036155001000087460108885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4">
            <text:p>30657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28">
            <text:p>0,037</text:p>
          </table:table-cell>
          <table:table-cell table:style-name="ce12N2" office:value-type="float" office:value="10.46">
            <text:p>10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99.23">
            <text:p>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4.922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30/04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5260413576045000150550010000052791001826910</text:p>
          </table:table-cell>
          <table:table-cell table:style-name="ce0" office:value-type="string" calcext:value-type="string">
            <text:p>3526040522209200076357002000474922100647818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6">
            <text:p>30657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23.2">
            <text:p>952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75365">
            <text:p>0,775</text:p>
          </table:table-cell>
          <table:table-cell table:style-name="ce12N2" office:value-type="float" office:value="149.8">
            <text:p>14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2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46.05">
            <text:p>846,05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347.09">
            <text:p>34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505311315725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8">
            <text:p>306578</text:p>
          </table:table-cell>
          <table:table-cell table:style-name="ce0" table:number-columns-spanned="4" table:number-rows-spanned="1" office:value-type="string" calcext:value-type="string">
            <text:p>37.802 - VINICOLOR IND. E COM. DE TINTAS, TEXTURA E GRAFIATO LTDA</text:p>
          </table:table-cell>
          <table:covered-table-cell table:number-columns-repeated="3"/>
          <table:table-cell table:style-name="ce0" office:value-type="string" calcext:value-type="string">
            <text:p>241.8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3754">
            <text:p>0,904</text:p>
          </table:table-cell>
          <table:table-cell table:style-name="ce12N2" office:value-type="float" office:value="1285.52">
            <text:p>1285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380.85">
            <text:p>3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555440001845500100024183013302239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8">
            <text:p>78,00</text:p>
          </table:table-cell>
          <table:table-cell table:style-name="ce26N2" office:value-type="float" office:value="60.1">
            <text:p>60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640.65">
            <text:p>18640,65</text:p>
          </table:table-cell>
          <table:table-cell table:style-name="ce26N2" office:value-type="float" office:value="494561.46">
            <text:p>494561,46</text:p>
          </table:table-cell>
          <table:table-cell table:style-name="ce26N2" office:value-type="float" office:value="32008.57">
            <text:p>32008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7.43">
            <text:p>107,43</text:p>
          </table:table-cell>
          <table:table-cell table:style-name="ce26N2" office:value-type="float" office:value="545437.19">
            <text:p>545437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9.214749">
            <text:p>39,215</text:p>
          </table:table-cell>
          <table:table-cell table:style-name="ce26N2" office:value-type="float" office:value="526856.64">
            <text:p>526856,64</text:p>
          </table:table-cell>
          <table:table-cell table:style-name="ce26N2" office:value-type="float" office:value="545437.19">
            <text:p>545437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266.21">
            <text:p>7266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51">
            <text:p>49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86" meta:object-count="0"/>
    <meta:generator>LibreOffice/4.3.0.4$Windows_x86 LibreOffice_project/62ad5818884a2fc2e5780dd45466868d41009ec0</meta:generator>
  </office:meta>
</office:document-meta>
</file>