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3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09">
            <text:p>30870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03.12">
            <text:p>19600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8224">
            <text:p>1,698</text:p>
          </table:table-cell>
          <table:table-cell table:style-name="ce12N2" office:value-type="float" office:value="3298.68">
            <text:p>329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6.00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394.92">
            <text:p>165394,92</text:p>
          </table:table-cell>
          <table:table-cell table:style-name="ce12N2" office:value-type="float" office:value="165.4">
            <text:p>1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56">
            <text:p>1488,5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1.76">
            <text:p>31,76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13717.99">
            <text:p>137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81761658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1">
            <text:p>309701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5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9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5.27">
            <text:p>1485,27</text:p>
          </table:table-cell>
          <table:table-cell table:style-name="ce12N2" office:value-type="float" office:value="1.49">
            <text:p>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37">
            <text:p>13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123.19">
            <text:p>12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53617362463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0">
            <text:p>30973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08.84">
            <text:p>2037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13">
            <text:p>3,947</text:p>
          </table:table-cell>
          <table:table-cell table:style-name="ce12N2" office:value-type="float" office:value="1579.53">
            <text:p>15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3.7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459.21">
            <text:p>171459,21</text:p>
          </table:table-cell>
          <table:table-cell table:style-name="ce12N2" office:value-type="float" office:value="171.45">
            <text:p>17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3.13">
            <text:p>1543,1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52.11">
            <text:p>552,11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14220.97">
            <text:p>1422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0821939820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8">
            <text:p>3097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63">
            <text:p>0,096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5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5.03">
            <text:p>3425,03</text:p>
          </table:table-cell>
          <table:table-cell table:style-name="ce12N2" office:value-type="float" office:value="3.43">
            <text:p>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3">
            <text:p>30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284.07">
            <text:p>28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81122833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9">
            <text:p>309849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9.0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30.35">
            <text:p>443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4348.58">
            <text:p>434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7744">
            <text:p>0,268</text:p>
          </table:table-cell>
          <table:table-cell table:style-name="ce12N2" office:value-type="float" office:value="39.12">
            <text:p>39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3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70.07">
            <text:p>3670,07</text:p>
          </table:table-cell>
          <table:table-cell table:style-name="ce12N2" office:value-type="float" office:value="3.66">
            <text:p>3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04">
            <text:p>33,04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81.77">
            <text:p>81,77</text:p>
          </table:table-cell>
          <table:table-cell table:style-name="ce12N2" office:value-type="float" office:value="4348.58">
            <text:p>4348,58</text:p>
          </table:table-cell>
          <table:table-cell table:style-name="ce12N2" office:value-type="float" office:value="304.41">
            <text:p>30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90181836222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51">
            <text:p>30985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41.22">
            <text:p>1084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94">
            <text:p>959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912">
            <text:p>0,055</text:p>
          </table:table-cell>
          <table:table-cell table:style-name="ce12N2" office:value-type="float" office:value="37.34">
            <text:p>3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841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097.1">
            <text:p>8097,10</text:p>
          </table:table-cell>
          <table:table-cell table:style-name="ce12N2" office:value-type="float" office:value="8.1">
            <text:p>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.87">
            <text:p>72,87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247.22">
            <text:p>1247,22</text:p>
          </table:table-cell>
          <table:table-cell table:style-name="ce12N2" office:value-type="float" office:value="9594">
            <text:p>9594,00</text:p>
          </table:table-cell>
          <table:table-cell table:style-name="ce12N2" office:value-type="float" office:value="671.58">
            <text:p>67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78418596887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6">
            <text:p>30987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9.1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25">
            <text:p>0,212</text:p>
          </table:table-cell>
          <table:table-cell table:style-name="ce12N2" office:value-type="float" office:value="0.42">
            <text:p>0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3.18">
            <text:p>1233,18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">
            <text:p>11,1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92.82">
            <text:p>9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91131026826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7">
            <text:p>309877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83.2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02.51">
            <text:p>510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102.51">
            <text:p>5102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245">
            <text:p>0,053</text:p>
          </table:table-cell>
          <table:table-cell table:style-name="ce12N2" office:value-type="float" office:value="28.76">
            <text:p>2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0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40.53">
            <text:p>4340,53</text:p>
          </table:table-cell>
          <table:table-cell table:style-name="ce12N2" office:value-type="float" office:value="4.34">
            <text:p>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07">
            <text:p>39,0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02.51">
            <text:p>5102,51</text:p>
          </table:table-cell>
          <table:table-cell table:style-name="ce12N2" office:value-type="float" office:value="319.56">
            <text:p>31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832301087585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9">
            <text:p>30987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0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.48">
            <text:p>10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.98">
            <text:p>99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8E-5">
            <text:p>0,000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.38">
            <text:p>84,38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6">
            <text:p>0,7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99.98">
            <text:p>99,98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04913746976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80">
            <text:p>309880</text:p>
          </table:table-cell>
          <table:table-cell table:style-name="ce0" table:number-columns-spanned="4" table:number-rows-spanned="1" office:value-type="string" calcext:value-type="string">
            <text:p>38.379 - ASSA ABLOY BRASIL INDUSTRIA E COMERCIO LTDA</text:p>
          </table:table-cell>
          <table:covered-table-cell table:number-columns-repeated="3"/>
          <table:table-cell table:style-name="ce0" office:value-type="string" calcext:value-type="string">
            <text:p>222.30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51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5.43">
            <text:p>2135,43</text:p>
          </table:table-cell>
          <table:table-cell table:style-name="ce12N2" office:value-type="float" office:value="2.13">
            <text:p>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22">
            <text:p>19,2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98.04">
            <text:p>9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5260602214604000328550030002223051811771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93">
            <text:p>3098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2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1.48">
            <text:p>125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1.48">
            <text:p>1251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51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6.22">
            <text:p>1056,22</text:p>
          </table:table-cell>
          <table:table-cell table:style-name="ce12N2" office:value-type="float" office:value="1.06">
            <text:p>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51">
            <text:p>9,5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1.48">
            <text:p>1251,48</text:p>
          </table:table-cell>
          <table:table-cell table:style-name="ce12N2" office:value-type="float" office:value="87.6">
            <text:p>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28616446177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3">
            <text:p>309953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4.7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26.66">
            <text:p>1032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0185.74">
            <text:p>10185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9678">
            <text:p>0,370</text:p>
          </table:table-cell>
          <table:table-cell table:style-name="ce12N2" office:value-type="float" office:value="54.21">
            <text:p>54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2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96.48">
            <text:p>8596,48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38">
            <text:p>77,38</text:p>
          </table:table-cell>
          <table:table-cell table:style-name="ce12N2" office:value-type="float" office:value="62.62">
            <text:p>62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40.92">
            <text:p>140,92</text:p>
          </table:table-cell>
          <table:table-cell table:style-name="ce12N2" office:value-type="float" office:value="10185.74">
            <text:p>10185,74</text:p>
          </table:table-cell>
          <table:table-cell table:style-name="ce12N2" office:value-type="float" office:value="713.01">
            <text:p>71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09495280012325500100233472816454839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75">
            <text:p>3099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3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6.32">
            <text:p>148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86.32">
            <text:p>1486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8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54.42">
            <text:p>1254,42</text:p>
          </table:table-cell>
          <table:table-cell table:style-name="ce12N2" office:value-type="float" office:value="1.25">
            <text:p>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29">
            <text:p>11,2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6.32">
            <text:p>1486,32</text:p>
          </table:table-cell>
          <table:table-cell table:style-name="ce12N2" office:value-type="float" office:value="104.04">
            <text:p>10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35012568101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5">
            <text:p>31000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09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2.55">
            <text:p>92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2.55">
            <text:p>922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2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8.61">
            <text:p>778,61</text:p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01">
            <text:p>7,0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2.55">
            <text:p>922,55</text:p>
          </table:table-cell>
          <table:table-cell table:style-name="ce12N2" office:value-type="float" office:value="64.58">
            <text:p>6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09016987877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7">
            <text:p>31000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1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0.28">
            <text:p>272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0.28">
            <text:p>272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4">
            <text:p>0,015</text:p>
          </table:table-cell>
          <table:table-cell table:style-name="ce12N2" office:value-type="float" office:value="9.64">
            <text:p>9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0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95.96">
            <text:p>2295,96</text:p>
          </table:table-cell>
          <table:table-cell table:style-name="ce12N2" office:value-type="float" office:value="2.29">
            <text:p>2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67">
            <text:p>20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0.28">
            <text:p>2720,28</text:p>
          </table:table-cell>
          <table:table-cell table:style-name="ce12N2" office:value-type="float" office:value="190.42">
            <text:p>19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1171322916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8">
            <text:p>31000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1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1.02">
            <text:p>336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61.02">
            <text:p>3361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61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36.62">
            <text:p>2836,62</text:p>
          </table:table-cell>
          <table:table-cell table:style-name="ce12N2" office:value-type="float" office:value="2.84">
            <text:p>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53">
            <text:p>25,5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61.02">
            <text:p>3361,02</text:p>
          </table:table-cell>
          <table:table-cell table:style-name="ce12N2" office:value-type="float" office:value="235.27">
            <text:p>235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14117505032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2">
            <text:p>3100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1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1.41">
            <text:p>87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1.41">
            <text:p>87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17">
            <text:p>0,004</text:p>
          </table:table-cell>
          <table:table-cell table:style-name="ce12N2" office:value-type="float" office:value="2.62">
            <text:p>2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1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5.45">
            <text:p>735,45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1.41">
            <text:p>871,41</text:p>
          </table:table-cell>
          <table:table-cell table:style-name="ce12N2" office:value-type="float" office:value="61">
            <text:p>6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17511172048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3">
            <text:p>3100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39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82.32">
            <text:p>578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82.32">
            <text:p>578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856">
            <text:p>0,018</text:p>
          </table:table-cell>
          <table:table-cell table:style-name="ce12N2" office:value-type="float" office:value="8.93">
            <text:p>8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8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80.16">
            <text:p>4880,16</text:p>
          </table:table-cell>
          <table:table-cell table:style-name="ce12N2" office:value-type="float" office:value="4.88">
            <text:p>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92">
            <text:p>43,9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82.32">
            <text:p>5782,32</text:p>
          </table:table-cell>
          <table:table-cell table:style-name="ce12N2" office:value-type="float" office:value="404.76">
            <text:p>40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39417670120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1">
            <text:p>310061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5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47.76">
            <text:p>13344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">
            <text:p>54,00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96138">
            <text:p>4,596</text:p>
          </table:table-cell>
          <table:table-cell table:style-name="ce12N2" office:value-type="float" office:value="1165.53">
            <text:p>1165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3.44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61.32">
            <text:p>108361,32</text:p>
          </table:table-cell>
          <table:table-cell table:style-name="ce12N2" office:value-type="float" office:value="108.37">
            <text:p>10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5.24">
            <text:p>975,24</text:p>
          </table:table-cell>
          <table:table-cell table:style-name="ce12N2" office:value-type="float" office:value="82.67">
            <text:p>82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053.68">
            <text:p>5053,68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8987.59">
            <text:p>898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5771102022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2">
            <text:p>3100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4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41.32">
            <text:p>4244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41532.48">
            <text:p>4153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877">
            <text:p>0,319</text:p>
          </table:table-cell>
          <table:table-cell table:style-name="ce12N2" office:value-type="float" office:value="82.45">
            <text:p>82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441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52.26">
            <text:p>35052,26</text:p>
          </table:table-cell>
          <table:table-cell table:style-name="ce12N2" office:value-type="float" office:value="35.05">
            <text:p>3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5.47">
            <text:p>315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908.84">
            <text:p>908,84</text:p>
          </table:table-cell>
          <table:table-cell table:style-name="ce12N2" office:value-type="float" office:value="41532.48">
            <text:p>41532,48</text:p>
          </table:table-cell>
          <table:table-cell table:style-name="ce12N2" office:value-type="float" office:value="2907.27">
            <text:p>290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47713453430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1">
            <text:p>3100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51207343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4">
            <text:p>3101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83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4.85">
            <text:p>225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54.85">
            <text:p>2254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84">
            <text:p>0,038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4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03.04">
            <text:p>1903,04</text:p>
          </table:table-cell>
          <table:table-cell table:style-name="ce12N2" office:value-type="float" office:value="1.9">
            <text:p>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13">
            <text:p>17,1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54.85">
            <text:p>2254,85</text:p>
          </table:table-cell>
          <table:table-cell table:style-name="ce12N2" office:value-type="float" office:value="157.84">
            <text:p>15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8391658669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4">
            <text:p>31017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6.2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          </text:p>
          </table:table-cell>
          <table:table-cell table:style-name="ce122" office:value-type="string" calcext:value-type="string">
            <text:p>ADM</text:p>
          </table:table-cell>
          <table:table-cell table:style-name="ce12N2" office:value-type="float" office:value="308.29">
            <text:p>30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8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22.6">
            <text:p>22,60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16.23">
            <text:p>1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9.51">
            <text:p>389,51</text:p>
          </table:table-cell>
          <table:table-cell table:style-name="ce12N2" office:value-type="float" office:value="53.89">
            <text:p>53,89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626510026626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4">
            <text:p>3101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.72">
            <text:p>13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64">
            <text:p>0,06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.56">
            <text:p>1124,56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51.63">
            <text:p>5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41664822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1">
            <text:p>3102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6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5.3">
            <text:p>211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15.3">
            <text:p>211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.15">
            <text:p>3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15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5.27">
            <text:p>1785,27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07">
            <text:p>16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15.3">
            <text:p>2115,30</text:p>
          </table:table-cell>
          <table:table-cell table:style-name="ce12N2" office:value-type="float" office:value="148.07">
            <text:p>148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6281506474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3">
            <text:p>310203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25.85">
            <text:p>462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25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9.27">
            <text:p>3769,27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3">
            <text:p>33,93</text:p>
          </table:table-cell>
          <table:table-cell table:style-name="ce12N2" office:value-type="float" office:value="82.76">
            <text:p>82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59.72">
            <text:p>159,72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312.64">
            <text:p>31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6781651239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4">
            <text:p>310214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6.89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88.56">
            <text:p>2168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803.9">
            <text:p>19803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4.35">
            <text:p>2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688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745.37">
            <text:p>17745,37</text:p>
          </table:table-cell>
          <table:table-cell table:style-name="ce12N2" office:value-type="float" office:value="17.74">
            <text:p>1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.7">
            <text:p>159,70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884.66">
            <text:p>1884,66</text:p>
          </table:table-cell>
          <table:table-cell table:style-name="ce12N2" office:value-type="float" office:value="19803.9">
            <text:p>19803,90</text:p>
          </table:table-cell>
          <table:table-cell table:style-name="ce12N2" office:value-type="float" office:value="1386.27">
            <text:p>138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689612248718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3">
            <text:p>3102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1.0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87.3">
            <text:p>608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87.3">
            <text:p>6087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45">
            <text:p>0,144</text:p>
          </table:table-cell>
          <table:table-cell table:style-name="ce12N2" office:value-type="float" office:value="24.78">
            <text:p>24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87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37.53">
            <text:p>5137,53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.24">
            <text:p>46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87.3">
            <text:p>6087,30</text:p>
          </table:table-cell>
          <table:table-cell table:style-name="ce12N2" office:value-type="float" office:value="426.11">
            <text:p>42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10571397106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2">
            <text:p>31025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7815972433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4">
            <text:p>31025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016821478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4">
            <text:p>31026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0.09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9.3">
            <text:p>200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09.3">
            <text:p>200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96">
            <text:p>0,050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09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5.8">
            <text:p>1695,80</text:p>
          </table:table-cell>
          <table:table-cell table:style-name="ce12N2" office:value-type="float" office:value="1.7">
            <text:p>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6">
            <text:p>15,2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09.3">
            <text:p>2009,30</text:p>
          </table:table-cell>
          <table:table-cell table:style-name="ce12N2" office:value-type="float" office:value="140.65">
            <text:p>14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80096111780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0">
            <text:p>310290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7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44.19">
            <text:p>884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">
            <text:p>2,300</text:p>
          </table:table-cell>
          <table:table-cell table:style-name="ce12N2" office:value-type="float" office:value="124.8">
            <text:p>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44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8.29">
            <text:p>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6">
            <text:p>74,6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56.4">
            <text:p>556,4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408.96">
            <text:p>40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46242510001515500100004717010003502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09">
            <text:p>31030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5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52">
            <text:p>0,016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5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28.41">
            <text:p>2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58118822799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0">
            <text:p>31031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5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52">
            <text:p>0,016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4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40.94">
            <text:p>4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59315705789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2">
            <text:p>310312</text:p>
          </table:table-cell>
          <table:table-cell table:style-name="ce0" table:number-columns-spanned="4" table:number-rows-spanned="1" office:value-type="string" calcext:value-type="string">
            <text:p>541 - FAME FABRICA DE APARELHOS ELETRICOS LTDA</text:p>
          </table:table-cell>
          <table:covered-table-cell table:number-columns-repeated="3"/>
          <table:table-cell table:style-name="ce0" office:value-type="string" calcext:value-type="string">
            <text:p>501.1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.75">
            <text:p>2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.75">
            <text:p>28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75">
            <text:p>28,75</text:p>
          </table:table-cell>
          <table:table-cell table:style-name="ce12N2" office:value-type="float" office:value="2.01">
            <text:p>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203660001955500200050118115813280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0">
            <text:p>3103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0.5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24.04">
            <text:p>1592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24.04">
            <text:p>15924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164">
            <text:p>0,012</text:p>
          </table:table-cell>
          <table:table-cell table:style-name="ce12N2" office:value-type="float" office:value="10.98">
            <text:p>1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24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439.48">
            <text:p>13439,48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.96">
            <text:p>120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24.04">
            <text:p>15924,04</text:p>
          </table:table-cell>
          <table:table-cell table:style-name="ce12N2" office:value-type="float" office:value="1114.68">
            <text:p>111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8059319868301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4">
            <text:p>310324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1.73">
            <text:p>3931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05">
            <text:p>3505,0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1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7.6">
            <text:p>3127,60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5">
            <text:p>28,15</text:p>
          </table:table-cell>
          <table:table-cell table:style-name="ce12N2" office:value-type="float" office:value="41.7">
            <text:p>41,7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341.73">
            <text:p>341,73</text:p>
          </table:table-cell>
          <table:table-cell table:style-name="ce12N2" office:value-type="float" office:value="3590">
            <text:p>3590,00</text:p>
          </table:table-cell>
          <table:table-cell table:style-name="ce12N2" office:value-type="float" office:value="143.6">
            <text:p>14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1111795254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7">
            <text:p>3103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1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4.91">
            <text:p>178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44.24">
            <text:p>1744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553">
            <text:p>0,010</text:p>
          </table:table-cell>
          <table:table-cell table:style-name="ce12N2" office:value-type="float" office:value="3.07">
            <text:p>3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84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2.1">
            <text:p>1472,10</text:p>
          </table:table-cell>
          <table:table-cell table:style-name="ce12N2" office:value-type="float" office:value="1.47">
            <text:p>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25">
            <text:p>13,2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0.67">
            <text:p>40,67</text:p>
          </table:table-cell>
          <table:table-cell table:style-name="ce12N2" office:value-type="float" office:value="1744.24">
            <text:p>1744,24</text:p>
          </table:table-cell>
          <table:table-cell table:style-name="ce12N2" office:value-type="float" office:value="122.09">
            <text:p>12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1841233645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8">
            <text:p>31032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4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26.76">
            <text:p>512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13.86">
            <text:p>4813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26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62.78">
            <text:p>4062,78</text:p>
          </table:table-cell>
          <table:table-cell table:style-name="ce12N2" office:value-type="float" office:value="4.06">
            <text:p>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57">
            <text:p>36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312.9">
            <text:p>312,90</text:p>
          </table:table-cell>
          <table:table-cell table:style-name="ce12N2" office:value-type="float" office:value="4813.86">
            <text:p>4813,86</text:p>
          </table:table-cell>
          <table:table-cell table:style-name="ce12N2" office:value-type="float" office:value="336.97">
            <text:p>33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4741481861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30">
            <text:p>310330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99.48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0.95">
            <text:p>976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13.6">
            <text:p>8513,60</text:p>
          </table:table-cell>
          <table:table-cell table:style-name="ce12N2" office:value-type="float" office:value="510.29">
            <text:p>510,29</text:p>
          </table:table-cell>
          <table:table-cell table:style-name="ce12N3" office:value-type="float" office:value="0.587396">
            <text:p>0,587</text:p>
          </table:table-cell>
          <table:table-cell table:style-name="ce12N2" office:value-type="float" office:value="90.81">
            <text:p>9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60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3.97">
            <text:p>7723,97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737.06">
            <text:p>737,06</text:p>
          </table:table-cell>
          <table:table-cell table:style-name="ce12N2" office:value-type="float" office:value="9023.89">
            <text:p>9023,89</text:p>
          </table:table-cell>
          <table:table-cell table:style-name="ce12N2" office:value-type="float" office:value="512.63">
            <text:p>51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79948213940548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2">
            <text:p>42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95.29">
            <text:p>595,2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2168.64">
            <text:p>12168,64</text:p>
          </table:table-cell>
          <table:table-cell table:style-name="ce26N2" office:value-type="float" office:value="709161.19">
            <text:p>709161,19</text:p>
          </table:table-cell>
          <table:table-cell table:style-name="ce26N2" office:value-type="float" office:value="49031.71">
            <text:p>49031,7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21393.72">
            <text:p>721393,7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89.51">
            <text:p>389,51</text:p>
          </table:table-cell>
          <table:table-cell table:style-name="ce26N2" office:value-type="float" office:value="53.89">
            <text:p>53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5.349742">
            <text:p>15,350</text:p>
          </table:table-cell>
          <table:table-cell table:style-name="ce26N2" office:value-type="float" office:value="708575.9">
            <text:p>708575,90</text:p>
          </table:table-cell>
          <table:table-cell table:style-name="ce26N2" office:value-type="float" office:value="721393.72">
            <text:p>721393,7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98678.98">
            <text:p>598678,98</text:p>
          </table:table-cell>
          <table:table-cell table:style-name="ce26N2" office:value-type="float" office:value="598.66">
            <text:p>598,6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388.17">
            <text:p>5388,17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6736.19">
            <text:p>6736,1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6.7">
            <text:p>76,7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34" meta:object-count="0"/>
    <meta:generator>LibreOffice/4.3.0.4$Windows_x86 LibreOffice_project/62ad5818884a2fc2e5780dd45466868d41009ec0</meta:generator>
  </office:meta>
</office:document-meta>
</file>