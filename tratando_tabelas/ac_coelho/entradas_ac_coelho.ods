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5/06/2026 04:30:2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670">
            <text:p>30767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4636">
            <text:p>5,346</text:p>
          </table:table-cell>
          <table:table-cell table:style-name="ce12N2" office:value-type="float" office:value="70.96">
            <text:p>7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2269.68">
            <text:p>226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381155321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2">
            <text:p>307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">
            <text:p>0,00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184.15">
            <text:p>18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161954616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7">
            <text:p>3078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395.84">
            <text:p>39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431659474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7">
            <text:p>307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3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19.68">
            <text:p>374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8374">
            <text:p>0,138</text:p>
          </table:table-cell>
          <table:table-cell table:style-name="ce12N2" office:value-type="float" office:value="28.67">
            <text:p>28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41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617.82">
            <text:p>617,82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2576.12">
            <text:p>257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3711305727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4">
            <text:p>307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8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09.46">
            <text:p>364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471">
            <text:p>0,077</text:p>
          </table:table-cell>
          <table:table-cell table:style-name="ce12N2" office:value-type="float" office:value="20.56">
            <text:p>2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4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11.41">
            <text:p>211,41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2511.18">
            <text:p>251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8781094873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5">
            <text:p>3079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2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77.64">
            <text:p>584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364">
            <text:p>0,504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4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92.77">
            <text:p>292,77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4072.93">
            <text:p>4072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2771216544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8">
            <text:p>3079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6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68.41">
            <text:p>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6371336743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7">
            <text:p>30800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3.09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01.25">
            <text:p>5220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4">
            <text:p>0,009</text:p>
          </table:table-cell>
          <table:table-cell table:style-name="ce12N2" office:value-type="float" office:value="43.6">
            <text:p>4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201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1.01">
            <text:p>71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626.15">
            <text:p>4626,15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1903">
            <text:p>19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309518666739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9">
            <text:p>30801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1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524.4">
            <text:p>5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41912268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9">
            <text:p>3080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77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2">
            <text:p>0,008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5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292.31">
            <text:p>2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7701138599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4">
            <text:p>30803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4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31.32">
            <text:p>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4781115478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1">
            <text:p>3080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3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86.55">
            <text:p>8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111562759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3">
            <text:p>308063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4">
            <text:p>0,005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716.05">
            <text:p>7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011059403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4">
            <text:p>308064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">
            <text:p>0,016</text:p>
          </table:table-cell>
          <table:table-cell table:style-name="ce12N2" office:value-type="float" office:value="6.78">
            <text:p>6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79.93">
            <text:p>7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41583124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4">
            <text:p>308154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0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39">
            <text:p>3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4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481.93">
            <text:p>48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70373920001805500300001008817243412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5">
            <text:p>3081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3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7034">
            <text:p>1,487</text:p>
          </table:table-cell>
          <table:table-cell table:style-name="ce12N2" office:value-type="float" office:value="568.8">
            <text:p>56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125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1325.02">
            <text:p>132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38111941309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6">
            <text:p>308156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1.51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82.51">
            <text:p>5988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08618">
            <text:p>2,709</text:p>
          </table:table-cell>
          <table:table-cell table:style-name="ce12N2" office:value-type="float" office:value="1274.26">
            <text:p>127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88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24.32">
            <text:p>1324,32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3904.7">
            <text:p>39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15161213309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5">
            <text:p>3081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6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42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77.42">
            <text:p>1977,42</text:p>
          </table:table-cell>
          <table:table-cell table:style-name="ce12N2" office:value-type="float" office:value="1.98">
            <text:p>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">
            <text:p>17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164.01">
            <text:p>16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6431526894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9">
            <text:p>3081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7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365">
            <text:p>0,012</text:p>
          </table:table-cell>
          <table:table-cell table:style-name="ce12N2" office:value-type="float" office:value="3.83">
            <text:p>3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5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78.8">
            <text:p>6878,80</text:p>
          </table:table-cell>
          <table:table-cell table:style-name="ce12N2" office:value-type="float" office:value="6.88">
            <text:p>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91">
            <text:p>61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570.54">
            <text:p>57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726124166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1">
            <text:p>3081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7.69">
            <text:p>566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571.17">
            <text:p>55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0735">
            <text:p>0,231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67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01.94">
            <text:p>4701,94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32">
            <text:p>42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96.52">
            <text:p>96,52</text:p>
          </table:table-cell>
          <table:table-cell table:style-name="ce12N2" office:value-type="float" office:value="5571.17">
            <text:p>5571,17</text:p>
          </table:table-cell>
          <table:table-cell table:style-name="ce12N2" office:value-type="float" office:value="389.98">
            <text:p>38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111109221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7">
            <text:p>3082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6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31.11">
            <text:p>803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34.91">
            <text:p>7934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54">
            <text:p>0,024</text:p>
          </table:table-cell>
          <table:table-cell table:style-name="ce12N2" office:value-type="float" office:value="6.8">
            <text:p>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31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6.86">
            <text:p>6696,86</text:p>
          </table:table-cell>
          <table:table-cell table:style-name="ce12N2" office:value-type="float" office:value="6.7">
            <text:p>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7">
            <text:p>60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6.2">
            <text:p>96,20</text:p>
          </table:table-cell>
          <table:table-cell table:style-name="ce12N2" office:value-type="float" office:value="7934.91">
            <text:p>7934,91</text:p>
          </table:table-cell>
          <table:table-cell table:style-name="ce12N2" office:value-type="float" office:value="555.45">
            <text:p>55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6551218029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8">
            <text:p>308258</text:p>
          </table:table-cell>
          <table:table-cell table:style-name="ce0" table:number-columns-spanned="4" table:number-rows-spanned="1" office:value-type="string" calcext:value-type="string">
            <text:p>12.915 - LPS COMPANY LTDA</text:p>
          </table:table-cell>
          <table:covered-table-cell table:number-columns-repeated="3"/>
          <table:table-cell table:style-name="ce0" office:value-type="string" calcext:value-type="string">
            <text:p>1.094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.11">
            <text:p>118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325">
            <text:p>0,043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.15">
            <text:p>939,1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05.11">
            <text:p>105,11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43.12">
            <text:p>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8890838000452550010010945591682413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0">
            <text:p>30828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2.36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427">
            <text:p>0,424</text:p>
          </table:table-cell>
          <table:table-cell table:style-name="ce12N2" office:value-type="float" office:value="57.42">
            <text:p>5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0.55">
            <text:p>790,55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11">
            <text:p>7,1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65.57">
            <text:p>6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23671142938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5">
            <text:p>3082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4.9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2">
            <text:p>0,015</text:p>
          </table:table-cell>
          <table:table-cell table:style-name="ce12N2" office:value-type="float" office:value="15.4">
            <text:p>1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25">
            <text:p>6325,00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93">
            <text:p>56,9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524.61">
            <text:p>52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49381658004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7">
            <text:p>3082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1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9.3">
            <text:p>2859,30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3">
            <text:p>25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237.15">
            <text:p>237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1501948779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8">
            <text:p>3082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2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2824">
            <text:p>0,083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1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33.92">
            <text:p>9633,92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71">
            <text:p>86,7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799.05">
            <text:p>799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2171247592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5">
            <text:p>308305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68.38">
            <text:p>32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24.64">
            <text:p>2924,64</text:p>
          </table:table-cell>
          <table:table-cell table:style-name="ce12N2" office:value-type="float" office:value="175.48">
            <text:p>175,48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6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68.26">
            <text:p>168,26</text:p>
          </table:table-cell>
          <table:table-cell table:style-name="ce12N2" office:value-type="float" office:value="3100.12">
            <text:p>3100,12</text:p>
          </table:table-cell>
          <table:table-cell table:style-name="ce12N2" office:value-type="float" office:value="124">
            <text:p>1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4855633000140550010000774221452415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76">
            <text:p>30837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13">
            <text:p>0,293</text:p>
          </table:table-cell>
          <table:table-cell table:style-name="ce12N2" office:value-type="float" office:value="411.88">
            <text:p>41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36.9">
            <text:p>6936,90</text:p>
          </table:table-cell>
          <table:table-cell table:style-name="ce12N2" office:value-type="float" office:value="6.93">
            <text:p>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42">
            <text:p>62,4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575.36">
            <text:p>57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261066428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4">
            <text:p>30842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7.65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3.86">
            <text:p>2673,86</text:p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6">
            <text:p>24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201.26">
            <text:p>2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76511772767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7">
            <text:p>308427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8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02.33">
            <text:p>630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5997">
            <text:p>599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9691">
            <text:p>0,597</text:p>
          </table:table-cell>
          <table:table-cell table:style-name="ce12N2" office:value-type="float" office:value="175.47">
            <text:p>175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02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3.22">
            <text:p>5083,22</text:p>
          </table:table-cell>
          <table:table-cell table:style-name="ce12N2" office:value-type="float" office:value="5.08">
            <text:p>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75">
            <text:p>45,7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05.33">
            <text:p>305,33</text:p>
          </table:table-cell>
          <table:table-cell table:style-name="ce12N2" office:value-type="float" office:value="5651.97">
            <text:p>5651,97</text:p>
          </table:table-cell>
          <table:table-cell table:style-name="ce12N2" office:value-type="float" office:value="395.64">
            <text:p>39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85710539132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2">
            <text:p>3084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7">
            <text:p>0,013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2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50.51">
            <text:p>5250,51</text:p>
          </table:table-cell>
          <table:table-cell table:style-name="ce12N2" office:value-type="float" office:value="5.25">
            <text:p>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25">
            <text:p>47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435.48">
            <text:p>43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3791334983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0">
            <text:p>308510</text:p>
          </table:table-cell>
          <table:table-cell table:style-name="ce0" table:number-columns-spanned="4" table:number-rows-spanned="1" office:value-type="string" calcext:value-type="string">
            <text:p>37.802 - VINICOLOR IND. E COM. DE TINTAS, TEXTURA E GRAFIATO LTDA</text:p>
          </table:table-cell>
          <table:covered-table-cell table:number-columns-repeated="3"/>
          <table:table-cell table:style-name="ce0" office:value-type="string" calcext:value-type="string">
            <text:p>243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29.46">
            <text:p>5672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56729.46">
            <text:p>56729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32418">
            <text:p>9,324</text:p>
          </table:table-cell>
          <table:table-cell table:style-name="ce12N2" office:value-type="float" office:value="13236">
            <text:p>1323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72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78.23">
            <text:p>47878,23</text:p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0.94">
            <text:p>430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29.46">
            <text:p>56729,46</text:p>
          </table:table-cell>
          <table:table-cell table:style-name="ce12N2" office:value-type="float" office:value="3971.06">
            <text:p>397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7855544000184550010002435931352228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1">
            <text:p>308511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17.4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.26">
            <text:p>478,26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36">
            <text:p>3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174311178793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7">
            <text:p>3085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6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84">
            <text:p>0,020</text:p>
          </table:table-cell>
          <table:table-cell table:style-name="ce12N2" office:value-type="float" office:value="4.6">
            <text:p>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8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73.52">
            <text:p>6573,52</text:p>
          </table:table-cell>
          <table:table-cell table:style-name="ce12N2" office:value-type="float" office:value="6.57">
            <text:p>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16">
            <text:p>59,1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545.22">
            <text:p>54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66911330680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8">
            <text:p>3085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6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50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9.24">
            <text:p>4009,24</text:p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332.53">
            <text:p>33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66016152277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3">
            <text:p>3085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0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22.22">
            <text:p>2422,22</text:p>
          </table:table-cell>
          <table:table-cell table:style-name="ce12N2" office:value-type="float" office:value="2.42">
            <text:p>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8">
            <text:p>21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200.9">
            <text:p>2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6115175280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1">
            <text:p>308551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3.6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77.24">
            <text:p>1227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2111.92">
            <text:p>12111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3506">
            <text:p>0,534</text:p>
          </table:table-cell>
          <table:table-cell table:style-name="ce12N2" office:value-type="float" office:value="84.88">
            <text:p>84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27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04.57">
            <text:p>10504,57</text:p>
          </table:table-cell>
          <table:table-cell table:style-name="ce12N2" office:value-type="float" office:value="10.53">
            <text:p>1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55">
            <text:p>94,55</text:p>
          </table:table-cell>
          <table:table-cell table:style-name="ce12N2" office:value-type="float" office:value="75.75">
            <text:p>75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65.32">
            <text:p>165,32</text:p>
          </table:table-cell>
          <table:table-cell table:style-name="ce12N2" office:value-type="float" office:value="12111.92">
            <text:p>12111,92</text:p>
          </table:table-cell>
          <table:table-cell table:style-name="ce12N2" office:value-type="float" office:value="536.66">
            <text:p>53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36441866478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3">
            <text:p>308553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420.542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.07">
            <text:p>49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3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5.44">
            <text:p>395,44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18.16">
            <text:p>1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010000014415501000042054215912804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4">
            <text:p>30855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48.91">
            <text:p>11834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6578">
            <text:p>3,366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8.34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268.57">
            <text:p>96268,57</text:p>
          </table:table-cell>
          <table:table-cell table:style-name="ce12N2" office:value-type="float" office:value="96.31">
            <text:p>9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.39">
            <text:p>866,39</text:p>
          </table:table-cell>
          <table:table-cell table:style-name="ce12N2" office:value-type="float" office:value="82.72">
            <text:p>82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283.18">
            <text:p>4283,18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7984.65">
            <text:p>79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51371987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6">
            <text:p>308556</text:p>
          </table:table-cell>
          <table:table-cell table:style-name="ce0" table:number-columns-spanned="4" table:number-rows-spanned="1" office:value-type="string" calcext:value-type="string">
            <text:p>19.264 - PAG EQUIPAMENTOS PARA PINTURAS LTDA</text:p>
          </table:table-cell>
          <table:covered-table-cell table:number-columns-repeated="3"/>
          <table:table-cell table:style-name="ce0" office:value-type="string" calcext:value-type="string">
            <text:p>8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2.65">
            <text:p>1129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0234.48">
            <text:p>10234,48</text:p>
          </table:table-cell>
          <table:table-cell table:style-name="ce12N2" office:value-type="float" office:value="500">
            <text:p>5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93.36">
            <text:p>9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8.69">
            <text:p>9618,69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7">
            <text:p>86,5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558.17">
            <text:p>558,17</text:p>
          </table:table-cell>
          <table:table-cell table:style-name="ce12N2" office:value-type="float" office:value="10734.48">
            <text:p>10734,48</text:p>
          </table:table-cell>
          <table:table-cell table:style-name="ce12N2" office:value-type="float" office:value="751.42">
            <text:p>75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581731000119550010000084661290605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9">
            <text:p>308559</text:p>
          </table:table-cell>
          <table:table-cell table:style-name="ce0" table:number-columns-spanned="4" table:number-rows-spanned="1" office:value-type="string" calcext:value-type="string">
            <text:p>31.254 - NAUBER MAQUINAS E EQUIPAMENTOS</text:p>
          </table:table-cell>
          <table:covered-table-cell table:number-columns-repeated="3"/>
          <table:table-cell table:style-name="ce0" office:value-type="string" calcext:value-type="string">
            <text:p>30.8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29.77">
            <text:p>15729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5565.32">
            <text:p>1556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48">
            <text:p>0,233</text:p>
          </table:table-cell>
          <table:table-cell table:style-name="ce12N2" office:value-type="float" office:value="94.39">
            <text:p>9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729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64.45">
            <text:p>164,45</text:p>
          </table:table-cell>
          <table:table-cell table:style-name="ce12N2" office:value-type="float" office:value="15565.32">
            <text:p>15565,32</text:p>
          </table:table-cell>
          <table:table-cell table:style-name="ce12N2" office:value-type="float" office:value="622.61">
            <text:p>62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633257000198550010000308711583011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1">
            <text:p>3085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7.7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0.26">
            <text:p>910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55">
            <text:p>0,02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0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62.67">
            <text:p>7562,67</text:p>
          </table:table-cell>
          <table:table-cell table:style-name="ce12N2" office:value-type="float" office:value="7.56">
            <text:p>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07">
            <text:p>68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627.25">
            <text:p>62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77711228888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4">
            <text:p>3086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9.74">
            <text:p>161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20.88">
            <text:p>152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504">
            <text:p>0,015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19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3.58">
            <text:p>1283,58</text:p>
          </table:table-cell>
          <table:table-cell table:style-name="ce12N2" office:value-type="float" office:value="1.28">
            <text:p>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55">
            <text:p>11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98.86">
            <text:p>98,86</text:p>
          </table:table-cell>
          <table:table-cell table:style-name="ce12N2" office:value-type="float" office:value="1520.88">
            <text:p>1520,88</text:p>
          </table:table-cell>
          <table:table-cell table:style-name="ce12N2" office:value-type="float" office:value="106.46">
            <text:p>10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412808820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5">
            <text:p>30863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5.9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5677">
            <text:p>0,266</text:p>
          </table:table-cell>
          <table:table-cell table:style-name="ce12N2" office:value-type="float" office:value="169.83">
            <text:p>16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66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49.87">
            <text:p>15049,87</text:p>
          </table:table-cell>
          <table:table-cell table:style-name="ce12N2" office:value-type="float" office:value="15.06">
            <text:p>1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.43">
            <text:p>135,43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1183.1">
            <text:p>118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59571505305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3">
            <text:p>3086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912409708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8">
            <text:p>4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75.48">
            <text:p>675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539.03">
            <text:p>13539,03</text:p>
          </table:table-cell>
          <table:table-cell table:style-name="ce26N2" office:value-type="float" office:value="686642.59">
            <text:p>686642,59</text:p>
          </table:table-cell>
          <table:table-cell table:style-name="ce26N2" office:value-type="float" office:value="44274.86">
            <text:p>44274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00536.65">
            <text:p>700536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6.006356">
            <text:p>26,006</text:p>
          </table:table-cell>
          <table:table-cell table:style-name="ce26N2" office:value-type="float" office:value="686322.14">
            <text:p>686322,14</text:p>
          </table:table-cell>
          <table:table-cell table:style-name="ce26N2" office:value-type="float" office:value="700536.65">
            <text:p>700536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62792.29">
            <text:p>262792,29</text:p>
          </table:table-cell>
          <table:table-cell table:style-name="ce26N2" office:value-type="float" office:value="262.87">
            <text:p>262,8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365.11">
            <text:p>2365,11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7190.68">
            <text:p>17190,6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8.51">
            <text:p>48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30" meta:object-count="0"/>
    <meta:generator>LibreOffice/4.3.0.4$Windows_x86 LibreOffice_project/62ad5818884a2fc2e5780dd45466868d41009ec0</meta:generator>
  </office:meta>
</office:document-meta>
</file>