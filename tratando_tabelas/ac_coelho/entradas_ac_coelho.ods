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6/07/2026 07:40:5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7">
            <text:p>309877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3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245">
            <text:p>0,053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0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.53">
            <text:p>4340,53</text:p>
          </table:table-cell>
          <table:table-cell table:style-name="ce12N2" office:value-type="float" office:value="4.34">
            <text:p>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07">
            <text:p>39,0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2.51">
            <text:p>5102,51</text:p>
          </table:table-cell>
          <table:table-cell table:style-name="ce12N2" office:value-type="float" office:value="319.56">
            <text:p>3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3230108758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9">
            <text:p>309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48">
            <text:p>1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E-5">
            <text:p>0,000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38">
            <text:p>84,3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99.98">
            <text:p>99,9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04913746976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93">
            <text:p>3098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1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22">
            <text:p>1056,2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1">
            <text:p>9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48">
            <text:p>1251,48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2861644617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5">
            <text:p>3099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4.42">
            <text:p>1254,42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6.32">
            <text:p>1486,32</text:p>
          </table:table-cell>
          <table:table-cell table:style-name="ce12N2" office:value-type="float" office:value="104.04">
            <text:p>10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501256810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5">
            <text:p>3100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2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8.61">
            <text:p>778,61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1">
            <text:p>7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55">
            <text:p>922,55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01698787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7">
            <text:p>3100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4">
            <text:p>0,015</text:p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5.96">
            <text:p>2295,96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28">
            <text:p>2720,28</text:p>
          </table:table-cell>
          <table:table-cell table:style-name="ce12N2" office:value-type="float" office:value="190.42">
            <text:p>1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17132291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8">
            <text:p>3100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1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.62">
            <text:p>2836,62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3">
            <text:p>2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1.02">
            <text:p>3361,02</text:p>
          </table:table-cell>
          <table:table-cell table:style-name="ce12N2" office:value-type="float" office:value="235.27">
            <text:p>23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1175050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2">
            <text:p>310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17">
            <text:p>0,004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.45">
            <text:p>735,4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1.41">
            <text:p>871,41</text:p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511172048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3">
            <text:p>3100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3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56">
            <text:p>0,01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0.16">
            <text:p>4880,16</text:p>
          </table:table-cell>
          <table:table-cell table:style-name="ce12N2" office:value-type="float" office:value="4.88">
            <text:p>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2">
            <text:p>43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2.32">
            <text:p>5782,32</text:p>
          </table:table-cell>
          <table:table-cell table:style-name="ce12N2" office:value-type="float" office:value="404.76">
            <text:p>4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3941767012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2">
            <text:p>310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4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41.32">
            <text:p>4244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7">
            <text:p>0,319</text:p>
          </table:table-cell>
          <table:table-cell table:style-name="ce12N2" office:value-type="float" office:value="82.45">
            <text:p>82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44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52.26">
            <text:p>35052,26</text:p>
          </table:table-cell>
          <table:table-cell table:style-name="ce12N2" office:value-type="float" office:value="35.05">
            <text:p>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.47">
            <text:p>315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908.84">
            <text:p>908,84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2907.27">
            <text:p>290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4771345343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1">
            <text:p>3102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6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5.27">
            <text:p>1785,2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148.07">
            <text:p>14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628150647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4">
            <text:p>310214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88.56">
            <text:p>2168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.35">
            <text:p>2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88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45.37">
            <text:p>17745,37</text:p>
          </table:table-cell>
          <table:table-cell table:style-name="ce12N2" office:value-type="float" office:value="17.74">
            <text:p>1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.7">
            <text:p>159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884.66">
            <text:p>1884,66</text:p>
          </table:table-cell>
          <table:table-cell table:style-name="ce12N2" office:value-type="float" office:value="19803.9">
            <text:p>19803,90</text:p>
          </table:table-cell>
          <table:table-cell table:style-name="ce12N2" office:value-type="float" office:value="1386.27">
            <text:p>138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89612248718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2">
            <text:p>31031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501.1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20366000195550020005011811581328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9">
            <text:p>310389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9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486">
            <text:p>0,072</text:p>
          </table:table-cell>
          <table:table-cell table:style-name="ce12N2" office:value-type="float" office:value="64.52">
            <text:p>6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03">
            <text:p>273,03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87">
            <text:p>341,87</text:p>
          </table:table-cell>
          <table:table-cell table:style-name="ce12N2" office:value-type="float" office:value="41.02">
            <text:p>4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591521425696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9">
            <text:p>4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5.29">
            <text:p>595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944.4">
            <text:p>13944,40</text:p>
          </table:table-cell>
          <table:table-cell table:style-name="ce26N2" office:value-type="float" office:value="560301.82">
            <text:p>560301,82</text:p>
          </table:table-cell>
          <table:table-cell table:style-name="ce26N2" office:value-type="float" office:value="37992.31">
            <text:p>37992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4310.11">
            <text:p>574310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4.732456">
            <text:p>14,732</text:p>
          </table:table-cell>
          <table:table-cell table:style-name="ce26N2" office:value-type="float" office:value="559716.53">
            <text:p>559716,53</text:p>
          </table:table-cell>
          <table:table-cell table:style-name="ce26N2" office:value-type="float" office:value="574310.11">
            <text:p>574310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4083.77">
            <text:p>474083,77</text:p>
          </table:table-cell>
          <table:table-cell table:style-name="ce26N2" office:value-type="float" office:value="474.06">
            <text:p>474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66.82">
            <text:p>4266,8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641.51">
            <text:p>364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.74">
            <text:p>69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96" meta:object-count="0"/>
    <meta:generator>LibreOffice/4.3.0.4$Windows_x86 LibreOffice_project/62ad5818884a2fc2e5780dd45466868d41009ec0</meta:generator>
  </office:meta>
</office:document-meta>
</file>