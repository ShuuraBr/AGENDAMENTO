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4">
            <text:p>3084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6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3.86">
            <text:p>2673,86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6">
            <text:p>24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201.26">
            <text:p>2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6511772767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2">
            <text:p>308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7">
            <text:p>0,013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0.51">
            <text:p>5250,51</text:p>
          </table:table-cell>
          <table:table-cell table:style-name="ce12N2" office:value-type="float" office:value="5.25">
            <text:p>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5">
            <text:p>47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435.48">
            <text:p>43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37913349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1">
            <text:p>30851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7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6">
            <text:p>478,26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74311178793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7">
            <text:p>3085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84">
            <text:p>0,020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73.52">
            <text:p>6573,52</text:p>
          </table:table-cell>
          <table:table-cell table:style-name="ce12N2" office:value-type="float" office:value="6.57">
            <text:p>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16">
            <text:p>59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545.22">
            <text:p>54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9113306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8">
            <text:p>3085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5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9.24">
            <text:p>4009,24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332.53">
            <text:p>33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01615227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3">
            <text:p>3085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2.22">
            <text:p>2422,22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8">
            <text:p>21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200.9">
            <text:p>2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11517528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1">
            <text:p>308551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6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77.24">
            <text:p>1227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3506">
            <text:p>0,534</text:p>
          </table:table-cell>
          <table:table-cell table:style-name="ce12N2" office:value-type="float" office:value="84.88">
            <text:p>84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7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04.57">
            <text:p>10504,57</text:p>
          </table:table-cell>
          <table:table-cell table:style-name="ce12N2" office:value-type="float" office:value="10.53">
            <text:p>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55">
            <text:p>94,55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5.32">
            <text:p>165,32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536.66">
            <text:p>53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644186647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9">
            <text:p>308559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29.77">
            <text:p>1572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48">
            <text:p>0,233</text:p>
          </table:table-cell>
          <table:table-cell table:style-name="ce12N2" office:value-type="float" office:value="94.39">
            <text:p>9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2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4.45">
            <text:p>164,45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622.61">
            <text:p>62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633257000198550010000308711583011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4">
            <text:p>3086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9.74">
            <text:p>161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04">
            <text:p>0,01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9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.58">
            <text:p>1283,58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55">
            <text:p>11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8.86">
            <text:p>98,86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106.46">
            <text:p>10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412808820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3">
            <text:p>308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91240970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5">
            <text:p>308725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91">
            <text:p>1531,9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120.02">
            <text:p>12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161001894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6">
            <text:p>3087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15">
            <text:p>157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9.04">
            <text:p>1249,04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1012312806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7">
            <text:p>3087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8.61">
            <text:p>287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1.2">
            <text:p>2281,2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75.69">
            <text:p>175,69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189.2">
            <text:p>1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041134215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7">
            <text:p>308847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25">
            <text:p>33,25</text:p>
          </table:table-cell>
          <table:table-cell table:style-name="ce12N2" office:value-type="float" office:value="52.87">
            <text:p>52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12.48">
            <text:p>412,48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131.32">
            <text:p>1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629244900000247550010000680361106919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5">
            <text:p>308855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3.56">
            <text:p>49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.28">
            <text:p>4316,28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.56">
            <text:p>156,56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337.19">
            <text:p>33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71872600013555001000201141191984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7">
            <text:p>308877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6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4.82">
            <text:p>448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234.98">
            <text:p>423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31.8">
            <text:p>331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17.19">
            <text:p>3917,19</text:p>
          </table:table-cell>
          <table:table-cell table:style-name="ce12N2" office:value-type="float" office:value="3.91">
            <text:p>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49.84">
            <text:p>249,84</text:p>
          </table:table-cell>
          <table:table-cell table:style-name="ce12N2" office:value-type="float" office:value="4234.98">
            <text:p>4234,98</text:p>
          </table:table-cell>
          <table:table-cell table:style-name="ce12N2" office:value-type="float" office:value="169.4">
            <text:p>16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7328359000195550010000860661262992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6">
            <text:p>30888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2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.3">
            <text:p>3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5.69">
            <text:p>335,69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5.38">
            <text:p>35,38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223181702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2">
            <text:p>3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75.48">
            <text:p>6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456.94">
            <text:p>8456,94</text:p>
          </table:table-cell>
          <table:table-cell table:style-name="ce26N2" office:value-type="float" office:value="792877.9">
            <text:p>792877,90</text:p>
          </table:table-cell>
          <table:table-cell table:style-name="ce26N2" office:value-type="float" office:value="53918.62">
            <text:p>53918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01344.84">
            <text:p>801344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0.925963">
            <text:p>10,926</text:p>
          </table:table-cell>
          <table:table-cell table:style-name="ce26N2" office:value-type="float" office:value="792212.42">
            <text:p>792212,42</text:p>
          </table:table-cell>
          <table:table-cell table:style-name="ce26N2" office:value-type="float" office:value="801344.84">
            <text:p>801344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8317.5">
            <text:p>598317,50</text:p>
          </table:table-cell>
          <table:table-cell table:style-name="ce26N2" office:value-type="float" office:value="598.4">
            <text:p>598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84.79">
            <text:p>5384,7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524.55">
            <text:p>11524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.91">
            <text:p>77,9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74" meta:object-count="0"/>
    <meta:generator>LibreOffice/4.3.0.4$Windows_x86 LibreOffice_project/62ad5818884a2fc2e5780dd45466868d41009ec0</meta:generator>
  </office:meta>
</office:document-meta>
</file>