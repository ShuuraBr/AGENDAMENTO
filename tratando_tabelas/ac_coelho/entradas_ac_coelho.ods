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7/05/2026 07:16:1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6">
            <text:p>3073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68">
            <text:p>0,002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19.26">
            <text:p>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71736636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9">
            <text:p>30743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8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76">
            <text:p>0,296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149.08">
            <text:p>14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80631168529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5">
            <text:p>307465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3">
            <text:p>114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9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72.73">
            <text:p>7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2.33">
            <text:p>2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7.724.082</text:p>
          </table:table-cell>
          <table:table-cell table:style-name="ce0" office:value-type="string" calcext:value-type="string">
            <text:p>17.618 - ALFA TRANSPORTES EIRELI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242,3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42260522670837000180550010000233691542222518</text:p>
          </table:table-cell>
          <table:table-cell table:style-name="ce0" office:value-type="string" calcext:value-type="string">
            <text:p>4226058211081800012157000007724082109034863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1">
            <text:p>307471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895.2">
            <text:p>89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4561732534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2">
            <text:p>3075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51937497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8">
            <text:p>3075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31939175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9">
            <text:p>3075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4142536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8">
            <text:p>307598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4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6.29">
            <text:p>152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25">
            <text:p>1478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5">
            <text:p>0,002</text:p>
          </table:table-cell>
          <table:table-cell table:style-name="ce12N2" office:value-type="float" office:value="0.05">
            <text:p>0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8.04">
            <text:p>48,04</text:p>
          </table:table-cell>
          <table:table-cell table:style-name="ce12N2" office:value-type="float" office:value="1478.25">
            <text:p>1478,25</text:p>
          </table:table-cell>
          <table:table-cell table:style-name="ce12N2" office:value-type="float" office:value="103.48">
            <text:p>10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4261131267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1">
            <text:p>3076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9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2.18">
            <text:p>30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8.34">
            <text:p>282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216">
            <text:p>0,009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83.84">
            <text:p>183,84</text:p>
          </table:table-cell>
          <table:table-cell table:style-name="ce12N2" office:value-type="float" office:value="2828.34">
            <text:p>2828,34</text:p>
          </table:table-cell>
          <table:table-cell table:style-name="ce12N2" office:value-type="float" office:value="197.98">
            <text:p>19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9891906994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3">
            <text:p>30761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8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.49">
            <text:p>59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28.54">
            <text:p>528,54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216.84">
            <text:p>2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2091324000204550030000068451624550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3">
            <text:p>307633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7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8.04">
            <text:p>23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87.4">
            <text:p>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2091324000115550010000517391644084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1">
            <text:p>307671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51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5.04">
            <text:p>817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416">
            <text:p>0,064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79.55">
            <text:p>379,55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486.36">
            <text:p>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5111221903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6">
            <text:p>307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5.93">
            <text:p>322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9.04">
            <text:p>302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48">
            <text:p>0,003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96.89">
            <text:p>196,89</text:p>
          </table:table-cell>
          <table:table-cell table:style-name="ce12N2" office:value-type="float" office:value="3029.04">
            <text:p>3029,04</text:p>
          </table:table-cell>
          <table:table-cell table:style-name="ce12N2" office:value-type="float" office:value="212.03">
            <text:p>2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1821645484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7">
            <text:p>307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2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">
            <text:p>0,003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2371024568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5">
            <text:p>3077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68">
            <text:p>0,044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561.74">
            <text:p>56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751334250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2">
            <text:p>30777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.36">
            <text:p>240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9.85">
            <text:p>218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13.51">
            <text:p>213,51</text:p>
          </table:table-cell>
          <table:table-cell table:style-name="ce12N2" office:value-type="float" office:value="2189.85">
            <text:p>2189,85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7551476543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5">
            <text:p>3078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6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3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436.79">
            <text:p>4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634121981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0">
            <text:p>307860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1.9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86">
            <text:p>0,086</text:p>
          </table:table-cell>
          <table:table-cell table:style-name="ce12N2" office:value-type="float" office:value="204.96">
            <text:p>20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4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367.06">
            <text:p>36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1928115996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2">
            <text:p>30789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53">
            <text:p>114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04.63">
            <text:p>110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35">
            <text:p>0,084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.9">
            <text:p>35,90</text:p>
          </table:table-cell>
          <table:table-cell table:style-name="ce12N2" office:value-type="float" office:value="1104.63">
            <text:p>1104,63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7451702070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4">
            <text:p>307904</text:p>
          </table:table-cell>
          <table:table-cell table:style-name="ce0" table:number-columns-spanned="4" table:number-rows-spanned="1" office:value-type="string" calcext:value-type="string">
            <text:p>37.539 - ENERLUX BRASIL COMERCIO DE MATERIAIS ELETRICOS LTDA</text:p>
          </table:table-cell>
          <table:covered-table-cell table:number-columns-repeated="3"/>
          <table:table-cell table:style-name="ce0" office:value-type="string" calcext:value-type="string">
            <text:p>16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3.94">
            <text:p>32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33.94">
            <text:p>323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33.94">
            <text:p>3233,94</text:p>
          </table:table-cell>
          <table:table-cell table:style-name="ce12N2" office:value-type="float" office:value="77.62">
            <text:p>7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8.47">
            <text:p>8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88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5/2026</text:p>
          </table:table-cell>
          <table:table-cell table:style-name="ce12" office:value-type="string" calcext:value-type="string">
            <text:p>88,47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37699169000191550030000001631369511920</text:p>
          </table:table-cell>
          <table:table-cell table:style-name="ce0" office:value-type="string" calcext:value-type="string">
            <text:p>3526051138956500020057005000399888100086157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5">
            <text:p>307905</text:p>
          </table:table-cell>
          <table:table-cell table:style-name="ce0" table:number-columns-spanned="4" table:number-rows-spanned="1" office:value-type="string" calcext:value-type="string">
            <text:p>37.539 - ENERLUX BRASIL COMERCIO DE MATERIAIS ELETRICOS LTDA</text:p>
          </table:table-cell>
          <table:covered-table-cell table:number-columns-repeated="3"/>
          <table:table-cell table:style-name="ce0" office:value-type="string" calcext:value-type="string">
            <text:p>16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88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5/2026</text:p>
          </table:table-cell>
          <table:table-cell table:style-name="ce12" office:value-type="string" calcext:value-type="string">
            <text:p>1,2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37699169000191550030000001681916020040</text:p>
          </table:table-cell>
          <table:table-cell table:style-name="ce0" office:value-type="string" calcext:value-type="string">
            <text:p>3526051138956500020057005000399888100086157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2">
            <text:p>30792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1.82">
            <text:p>421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7.8">
            <text:p>9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1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27.52">
            <text:p>527,52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147.37">
            <text:p>14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1111008326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4">
            <text:p>30793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43.56">
            <text:p>5264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7966.8">
            <text:p>4796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44">
            <text:p>0,011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64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4676.76">
            <text:p>4676,76</text:p>
          </table:table-cell>
          <table:table-cell table:style-name="ce12N2" office:value-type="float" office:value="47966.8">
            <text:p>47966,80</text:p>
          </table:table-cell>
          <table:table-cell table:style-name="ce12N2" office:value-type="float" office:value="3357.66">
            <text:p>335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01610026301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3">
            <text:p>3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486.08">
            <text:p>8486,08</text:p>
          </table:table-cell>
          <table:table-cell table:style-name="ce26N2" office:value-type="float" office:value="298466.4">
            <text:p>298466,40</text:p>
          </table:table-cell>
          <table:table-cell table:style-name="ce26N2" office:value-type="float" office:value="20547.23">
            <text:p>20547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32.05">
            <text:p>332,05</text:p>
          </table:table-cell>
          <table:table-cell table:style-name="ce26N2" office:value-type="float" office:value="306952.48">
            <text:p>306952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7.483976">
            <text:p>7,484</text:p>
          </table:table-cell>
          <table:table-cell table:style-name="ce26N2" office:value-type="float" office:value="298466.4">
            <text:p>298466,40</text:p>
          </table:table-cell>
          <table:table-cell table:style-name="ce26N2" office:value-type="float" office:value="306952.48">
            <text:p>306952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95.24">
            <text:p>695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36">
            <text:p>38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0" meta:object-count="0"/>
    <meta:generator>LibreOffice/4.3.0.4$Windows_x86 LibreOffice_project/62ad5818884a2fc2e5780dd45466868d41009ec0</meta:generator>
  </office:meta>
</office:document-meta>
</file>