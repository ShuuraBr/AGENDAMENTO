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9/06/2026 07:40:3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7">
            <text:p>309397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7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7">
            <text:p>0,087</text:p>
          </table:table-cell>
          <table:table-cell table:style-name="ce12N2" office:value-type="float" office:value="33.1">
            <text:p>3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5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500.85">
            <text:p>5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2296669000169550030000017881782303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5">
            <text:p>309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5.0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76.94">
            <text:p>14947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49322.78">
            <text:p>14932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345977">
            <text:p>4,346</text:p>
          </table:table-cell>
          <table:table-cell table:style-name="ce12N2" office:value-type="float" office:value="1306.75">
            <text:p>130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9.476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046.33">
            <text:p>126046,33</text:p>
          </table:table-cell>
          <table:table-cell table:style-name="ce12N2" office:value-type="float" office:value="126.05">
            <text:p>12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4.42">
            <text:p>1134,42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4.16">
            <text:p>154,16</text:p>
          </table:table-cell>
          <table:table-cell table:style-name="ce12N2" office:value-type="float" office:value="148981.94">
            <text:p>148981,94</text:p>
          </table:table-cell>
          <table:table-cell table:style-name="ce12N2" office:value-type="float" office:value="10428.74">
            <text:p>1042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50191131332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6">
            <text:p>309536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6025">
            <text:p>0,326</text:p>
          </table:table-cell>
          <table:table-cell table:style-name="ce12N2" office:value-type="float" office:value="25.81">
            <text:p>25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6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2">
            <text:p>3322,0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">
            <text:p>29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275.53">
            <text:p>27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417550746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7">
            <text:p>309537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00872">
            <text:p>7,009</text:p>
          </table:table-cell>
          <table:table-cell table:style-name="ce12N2" office:value-type="float" office:value="117.6">
            <text:p>11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2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57.59">
            <text:p>17157,59</text:p>
          </table:table-cell>
          <table:table-cell table:style-name="ce12N2" office:value-type="float" office:value="17.16">
            <text:p>1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42">
            <text:p>154,4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1423.07">
            <text:p>142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61561216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1">
            <text:p>3095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9.1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56.68">
            <text:p>3156,68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261.82">
            <text:p>26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913618038852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3">
            <text:p>30956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2137015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4">
            <text:p>3095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0.87">
            <text:p>152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2">
            <text:p>0,004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.18">
            <text:p>1243,1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103.11">
            <text:p>10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41904117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6">
            <text:p>30956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31819587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7">
            <text:p>3095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1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37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20.32">
            <text:p>4420,3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8">
            <text:p>39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366.63">
            <text:p>36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152214368079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8">
            <text:p>3095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7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85.61">
            <text:p>3785,61</text:p>
          </table:table-cell>
          <table:table-cell table:style-name="ce12N2" office:value-type="float" office:value="3.79">
            <text:p>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07">
            <text:p>34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313.98">
            <text:p>31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7131778819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4">
            <text:p>30959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4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64.62">
            <text:p>2164,62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8">
            <text:p>19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179.54">
            <text:p>17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51886412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7">
            <text:p>30960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6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3.09">
            <text:p>307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96">
            <text:p>0,049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3.19">
            <text:p>2363,19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27">
            <text:p>21,2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273.01">
            <text:p>273,01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196.01">
            <text:p>19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68131832498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8">
            <text:p>309608</text:p>
          </table:table-cell>
          <table:table-cell table:style-name="ce0" table:number-columns-spanned="4" table:number-rows-spanned="1" office:value-type="string" calcext:value-type="string">
            <text:p>26 - TECNOPERFIL PLASTICOS LTDA</text:p>
          </table:table-cell>
          <table:covered-table-cell table:number-columns-repeated="3"/>
          <table:table-cell table:style-name="ce0" office:value-type="string" calcext:value-type="string">
            <text:p>18.0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.87">
            <text:p>195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31.8">
            <text:p>18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498">
            <text:p>0,155</text:p>
          </table:table-cell>
          <table:table-cell table:style-name="ce12N2" office:value-type="float" office:value="32.94">
            <text:p>3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5.99">
            <text:p>1545,99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91">
            <text:p>13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19.07">
            <text:p>119,07</text:p>
          </table:table-cell>
          <table:table-cell table:style-name="ce12N2" office:value-type="float" office:value="1831.8">
            <text:p>1831,80</text:p>
          </table:table-cell>
          <table:table-cell table:style-name="ce12N2" office:value-type="float" office:value="128.23">
            <text:p>1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341857000175550030000180381303298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9">
            <text:p>30960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9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3.24">
            <text:p>86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75.4">
            <text:p>787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07004">
            <text:p>0,707</text:p>
          </table:table-cell>
          <table:table-cell table:style-name="ce12N2" office:value-type="float" office:value="52.22">
            <text:p>5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37.13">
            <text:p>6837,13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53">
            <text:p>61,53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767.84">
            <text:p>767,84</text:p>
          </table:table-cell>
          <table:table-cell table:style-name="ce12N2" office:value-type="float" office:value="7875.4">
            <text:p>7875,40</text:p>
          </table:table-cell>
          <table:table-cell table:style-name="ce12N2" office:value-type="float" office:value="341.36">
            <text:p>34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91951453167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9">
            <text:p>3096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4.93">
            <text:p>211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3.93">
            <text:p>1953,93</text:p>
          </table:table-cell>
          <table:table-cell table:style-name="ce12N2" office:value-type="float" office:value="161">
            <text:p>161,00</text:p>
          </table:table-cell>
          <table:table-cell table:style-name="ce12N3" office:value-type="float" office:value="0.162623">
            <text:p>0,163</text:p>
          </table:table-cell>
          <table:table-cell table:style-name="ce12N2" office:value-type="float" office:value="43.61">
            <text:p>4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2.26">
            <text:p>1702,26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33">
            <text:p>15,3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4.93">
            <text:p>2114,93</text:p>
          </table:table-cell>
          <table:table-cell table:style-name="ce12N2" office:value-type="float" office:value="84.58">
            <text:p>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10714647909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7">
            <text:p>30968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1.59">
            <text:p>240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6">
            <text:p>2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6">
            <text:p>0,001</text:p>
          </table:table-cell>
          <table:table-cell table:style-name="ce12N2" office:value-type="float" office:value="1.92">
            <text:p>1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63.09">
            <text:p>1963,09</text:p>
          </table:table-cell>
          <table:table-cell table:style-name="ce12N2" office:value-type="float" office:value="1.96">
            <text:p>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67">
            <text:p>17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75.59">
            <text:p>75,59</text:p>
          </table:table-cell>
          <table:table-cell table:style-name="ce12N2" office:value-type="float" office:value="2326">
            <text:p>2326,00</text:p>
          </table:table-cell>
          <table:table-cell table:style-name="ce12N2" office:value-type="float" office:value="162.82">
            <text:p>16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714033457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9">
            <text:p>30968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6.35">
            <text:p>369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80">
            <text:p>35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8">
            <text:p>0,002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1.43">
            <text:p>3021,43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19">
            <text:p>27,1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16.35">
            <text:p>116,35</text:p>
          </table:table-cell>
          <table:table-cell table:style-name="ce12N2" office:value-type="float" office:value="3580">
            <text:p>3580,00</text:p>
          </table:table-cell>
          <table:table-cell table:style-name="ce12N2" office:value-type="float" office:value="250.6">
            <text:p>25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171392934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1">
            <text:p>309701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5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.27">
            <text:p>1485,27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123.19">
            <text:p>12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5361736246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7">
            <text:p>3097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072.59">
            <text:p>350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34601.07">
            <text:p>3460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7491">
            <text:p>0,317</text:p>
          </table:table-cell>
          <table:table-cell table:style-name="ce12N2" office:value-type="float" office:value="72.8">
            <text:p>7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0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02.37">
            <text:p>29202,37</text:p>
          </table:table-cell>
          <table:table-cell table:style-name="ce12N2" office:value-type="float" office:value="29.2">
            <text:p>2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.83">
            <text:p>262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1.52">
            <text:p>471,52</text:p>
          </table:table-cell>
          <table:table-cell table:style-name="ce12N2" office:value-type="float" office:value="34601.07">
            <text:p>34601,07</text:p>
          </table:table-cell>
          <table:table-cell table:style-name="ce12N2" office:value-type="float" office:value="2422.05">
            <text:p>242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071268184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7">
            <text:p>309727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6.5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86.26">
            <text:p>658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988.24">
            <text:p>598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8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65.79">
            <text:p>5365,79</text:p>
          </table:table-cell>
          <table:table-cell table:style-name="ce12N2" office:value-type="float" office:value="5.37">
            <text:p>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28">
            <text:p>48,2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98.02">
            <text:p>598,02</text:p>
          </table:table-cell>
          <table:table-cell table:style-name="ce12N2" office:value-type="float" office:value="5988.24">
            <text:p>5988,24</text:p>
          </table:table-cell>
          <table:table-cell table:style-name="ce12N2" office:value-type="float" office:value="419.19">
            <text:p>41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651218293040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9">
            <text:p>309729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6.2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32">
            <text:p>482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654.06">
            <text:p>4654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16">
            <text:p>0,005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86.44">
            <text:p>3486,44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7">
            <text:p>31,3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4654.06">
            <text:p>4654,06</text:p>
          </table:table-cell>
          <table:table-cell table:style-name="ce12N2" office:value-type="float" office:value="310.09">
            <text:p>31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2782366000188550030002762861870235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8">
            <text:p>3097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3">
            <text:p>0,09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5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03">
            <text:p>3425,03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284.07">
            <text:p>28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81122833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4">
            <text:p>30975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91.34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7.47">
            <text:p>292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90.68">
            <text:p>259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6.47">
            <text:p>2186,47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8">
            <text:p>19,68</text:p>
          </table:table-cell>
          <table:table-cell table:style-name="ce12N2" office:value-type="float" office:value="52.78">
            <text:p>52,7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36.79">
            <text:p>336,79</text:p>
          </table:table-cell>
          <table:table-cell table:style-name="ce12N2" office:value-type="float" office:value="2590.68">
            <text:p>2590,68</text:p>
          </table:table-cell>
          <table:table-cell table:style-name="ce12N2" office:value-type="float" office:value="181.35">
            <text:p>18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913411572801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5">
            <text:p>30975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3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52.53">
            <text:p>2295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22669.44">
            <text:p>2266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5356">
            <text:p>0,365</text:p>
          </table:table-cell>
          <table:table-cell table:style-name="ce12N2" office:value-type="float" office:value="89.26">
            <text:p>89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95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296.67">
            <text:p>19296,67</text:p>
          </table:table-cell>
          <table:table-cell table:style-name="ce12N2" office:value-type="float" office:value="19.3">
            <text:p>1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3.67">
            <text:p>173,6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283.09">
            <text:p>283,09</text:p>
          </table:table-cell>
          <table:table-cell table:style-name="ce12N2" office:value-type="float" office:value="22669.44">
            <text:p>22669,44</text:p>
          </table:table-cell>
          <table:table-cell table:style-name="ce12N2" office:value-type="float" office:value="1405.91">
            <text:p>140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3011788581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4">
            <text:p>3097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824">
            <text:p>0,083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4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8.96">
            <text:p>6028,96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6">
            <text:p>54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500.05">
            <text:p>50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161477409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5">
            <text:p>30976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31">
            <text:p>14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448.04">
            <text:p>144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45">
            <text:p>0,008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2.12">
            <text:p>1222,12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8">
            <text:p>10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.27">
            <text:p>4,27</text:p>
          </table:table-cell>
          <table:table-cell table:style-name="ce12N2" office:value-type="float" office:value="1448.04">
            <text:p>1448,04</text:p>
          </table:table-cell>
          <table:table-cell table:style-name="ce12N2" office:value-type="float" office:value="101.38">
            <text:p>10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2817893431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7">
            <text:p>3097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4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8.09">
            <text:p>136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25.92">
            <text:p>132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205">
            <text:p>0,027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9.04">
            <text:p>1119,04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7">
            <text:p>10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2.17">
            <text:p>42,17</text:p>
          </table:table-cell>
          <table:table-cell table:style-name="ce12N2" office:value-type="float" office:value="1325.92">
            <text:p>1325,92</text:p>
          </table:table-cell>
          <table:table-cell table:style-name="ce12N2" office:value-type="float" office:value="92.81">
            <text:p>9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471531125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9">
            <text:p>309849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0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0.35">
            <text:p>443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7744">
            <text:p>0,268</text:p>
          </table:table-cell>
          <table:table-cell table:style-name="ce12N2" office:value-type="float" office:value="39.12">
            <text:p>3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70.07">
            <text:p>3670,07</text:p>
          </table:table-cell>
          <table:table-cell table:style-name="ce12N2" office:value-type="float" office:value="3.66">
            <text:p>3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81.77">
            <text:p>81,77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304.41">
            <text:p>3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0181836222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1">
            <text:p>30985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41.22">
            <text:p>1084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912">
            <text:p>0,055</text:p>
          </table:table-cell>
          <table:table-cell table:style-name="ce12N2" office:value-type="float" office:value="37.34">
            <text:p>3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4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97.1">
            <text:p>8097,10</text:p>
          </table:table-cell>
          <table:table-cell table:style-name="ce12N2" office:value-type="float" office:value="8.1">
            <text:p>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.87">
            <text:p>72,87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247.22">
            <text:p>1247,22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671.58">
            <text:p>67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7841859688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6">
            <text:p>3098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5.23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3.93">
            <text:p>266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1.34">
            <text:p>2501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56">
            <text:p>0,000</text:p>
          </table:table-cell>
          <table:table-cell table:style-name="ce12N2" office:value-type="float" office:value="0.25">
            <text:p>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3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1.04">
            <text:p>2111,04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62.59">
            <text:p>162,59</text:p>
          </table:table-cell>
          <table:table-cell table:style-name="ce12N2" office:value-type="float" office:value="2501.34">
            <text:p>2501,34</text:p>
          </table:table-cell>
          <table:table-cell table:style-name="ce12N2" office:value-type="float" office:value="175.09">
            <text:p>17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523114403532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8">
            <text:p>309868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3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0.52">
            <text:p>35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580.52">
            <text:p>358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0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1.87">
            <text:p>3021,87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">
            <text:p>27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0.52">
            <text:p>3580,52</text:p>
          </table:table-cell>
          <table:table-cell table:style-name="ce12N2" office:value-type="float" office:value="250.63">
            <text:p>25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3961348149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0">
            <text:p>309870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40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7.22">
            <text:p>143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37.22">
            <text:p>143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7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2.98">
            <text:p>1212,98</text:p>
          </table:table-cell>
          <table:table-cell table:style-name="ce12N2" office:value-type="float" office:value="1.21">
            <text:p>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2">
            <text:p>10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37.22">
            <text:p>1437,22</text:p>
          </table:table-cell>
          <table:table-cell table:style-name="ce12N2" office:value-type="float" office:value="100.61">
            <text:p>10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40419549678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6">
            <text:p>30987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1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25">
            <text:p>0,212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3.18">
            <text:p>1233,18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">
            <text:p>11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92.82">
            <text:p>9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1131026826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7">
            <text:p>309877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3.2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245">
            <text:p>0,053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0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0.53">
            <text:p>4340,53</text:p>
          </table:table-cell>
          <table:table-cell table:style-name="ce12N2" office:value-type="float" office:value="4.34">
            <text:p>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07">
            <text:p>39,0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319.56">
            <text:p>3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832301087585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9">
            <text:p>3098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0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48">
            <text:p>10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.98">
            <text:p>99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8E-5">
            <text:p>0,000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.38">
            <text:p>84,38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99.98">
            <text:p>99,9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04913746976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0">
            <text:p>309880</text:p>
          </table:table-cell>
          <table:table-cell table:style-name="ce0" table:number-columns-spanned="4" table:number-rows-spanned="1" office:value-type="string" calcext:value-type="string">
            <text:p>38.379 - ASSA ABLOY BRASIL INDUSTRIA E COMERCIO LTDA</text:p>
          </table:table-cell>
          <table:covered-table-cell table:number-columns-repeated="3"/>
          <table:table-cell table:style-name="ce0" office:value-type="string" calcext:value-type="string">
            <text:p>222.3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.43">
            <text:p>2135,43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2">
            <text:p>19,2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98.04">
            <text:p>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5260602214604000328550030002223051811771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1">
            <text:p>309881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8.1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81.71">
            <text:p>2538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23771.99">
            <text:p>23771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469">
            <text:p>1,185</text:p>
          </table:table-cell>
          <table:table-cell table:style-name="ce12N2" office:value-type="float" office:value="132.14">
            <text:p>13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38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77.31">
            <text:p>20077,31</text:p>
          </table:table-cell>
          <table:table-cell table:style-name="ce12N2" office:value-type="float" office:value="20.09">
            <text:p>2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66">
            <text:p>180,6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609.72">
            <text:p>1609,72</text:p>
          </table:table-cell>
          <table:table-cell table:style-name="ce12N2" office:value-type="float" office:value="23545.24">
            <text:p>23545,24</text:p>
          </table:table-cell>
          <table:table-cell table:style-name="ce12N2" office:value-type="float" office:value="1648.19">
            <text:p>164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7159430000361550010000881351597797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3">
            <text:p>3098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2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1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6.22">
            <text:p>1056,22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1">
            <text:p>9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87.6">
            <text:p>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28616446177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2">
            <text:p>4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1">
            <text:p>16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330.74">
            <text:p>7330,74</text:p>
          </table:table-cell>
          <table:table-cell table:style-name="ce26N2" office:value-type="float" office:value="764480.51">
            <text:p>764480,51</text:p>
          </table:table-cell>
          <table:table-cell table:style-name="ce26N2" office:value-type="float" office:value="52932.5">
            <text:p>52932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72388.84">
            <text:p>772388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1.203634">
            <text:p>21,204</text:p>
          </table:table-cell>
          <table:table-cell table:style-name="ce26N2" office:value-type="float" office:value="764897.1">
            <text:p>764897,10</text:p>
          </table:table-cell>
          <table:table-cell table:style-name="ce26N2" office:value-type="float" office:value="772388.84">
            <text:p>772388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39982.4">
            <text:p>639982,40</text:p>
          </table:table-cell>
          <table:table-cell table:style-name="ce26N2" office:value-type="float" office:value="639.98">
            <text:p>639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759.81">
            <text:p>5759,8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7004.58">
            <text:p>7004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7.16">
            <text:p>77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34" meta:object-count="0"/>
    <meta:generator>LibreOffice/4.3.0.4$Windows_x86 LibreOffice_project/62ad5818884a2fc2e5780dd45466868d41009ec0</meta:generator>
  </office:meta>
</office:document-meta>
</file>