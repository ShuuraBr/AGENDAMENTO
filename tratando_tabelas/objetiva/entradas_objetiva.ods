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6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5">
            <text:p>30984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6.6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24.15">
            <text:p>20462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85523">
            <text:p>13,855</text:p>
          </table:table-cell>
          <table:table-cell table:style-name="ce12N2" office:value-type="float" office:value="22000">
            <text:p>2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4.624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261.68">
            <text:p>167261,68</text:p>
          </table:table-cell>
          <table:table-cell table:style-name="ce12N2" office:value-type="float" office:value="167.26">
            <text:p>16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5.36">
            <text:p>1505,36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6440.95">
            <text:p>6440,95</text:p>
          </table:table-cell>
          <table:table-cell table:style-name="ce12N2" office:value-type="float" office:value="198183.2">
            <text:p>198183,20</text:p>
          </table:table-cell>
          <table:table-cell table:style-name="ce12N2" office:value-type="float" office:value="13872.82">
            <text:p>1387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667407000130550000000166941016452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0">
            <text:p>3099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1">
            <text:p>182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74">
            <text:p>0,041</text:p>
          </table:table-cell>
          <table:table-cell table:style-name="ce12N2" office:value-type="float" office:value="155.34">
            <text:p>1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9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745.87">
            <text:p>15745,87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71">
            <text:p>141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31.08">
            <text:p>13431,08</text:p>
          </table:table-cell>
          <table:table-cell table:style-name="ce12N2" office:value-type="float" office:value="940.18">
            <text:p>94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8125447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1">
            <text:p>3099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635">
            <text:p>0,140</text:p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8.11">
            <text:p>4718,11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6">
            <text:p>42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33">
            <text:p>5590,33</text:p>
          </table:table-cell>
          <table:table-cell table:style-name="ce12N2" office:value-type="float" office:value="391.32">
            <text:p>39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01434461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2">
            <text:p>3099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116852652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3">
            <text:p>3099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9">
            <text:p>0,029</text:p>
          </table:table-cell>
          <table:table-cell table:style-name="ce12N2" office:value-type="float" office:value="4.96">
            <text:p>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6.16">
            <text:p>976,1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6.62">
            <text:p>1156,62</text:p>
          </table:table-cell>
          <table:table-cell table:style-name="ce12N2" office:value-type="float" office:value="80.96">
            <text:p>8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21037109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4">
            <text:p>3099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96">
            <text:p>0,144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0.61">
            <text:p>12420,61</text:p>
          </table:table-cell>
          <table:table-cell table:style-name="ce12N2" office:value-type="float" office:value="12.42">
            <text:p>1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79">
            <text:p>111,7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16.8">
            <text:p>14716,80</text:p>
          </table:table-cell>
          <table:table-cell table:style-name="ce12N2" office:value-type="float" office:value="1030.18">
            <text:p>103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31535591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05">
            <text:p>3099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8.09">
            <text:p>978,09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69">
            <text:p>1122,69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41847623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6">
            <text:p>309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8">
            <text:p>0,001</text:p>
          </table:table-cell>
          <table:table-cell table:style-name="ce12N2" office:value-type="float" office:value="13.61">
            <text:p>1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2.86">
            <text:p>8412,86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2">
            <text:p>75,7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68.14">
            <text:p>9968,14</text:p>
          </table:table-cell>
          <table:table-cell table:style-name="ce12N2" office:value-type="float" office:value="697.77">
            <text:p>6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7138933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7">
            <text:p>309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5948">
            <text:p>0,946</text:p>
          </table:table-cell>
          <table:table-cell table:style-name="ce12N2" office:value-type="float" office:value="145.73">
            <text:p>1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290.64">
            <text:p>25290,64</text:p>
          </table:table-cell>
          <table:table-cell table:style-name="ce12N2" office:value-type="float" office:value="25.29">
            <text:p>2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.61">
            <text:p>227,6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1.58">
            <text:p>29101,58</text:p>
          </table:table-cell>
          <table:table-cell table:style-name="ce12N2" office:value-type="float" office:value="1233.11">
            <text:p>123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8185622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8">
            <text:p>309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202.5">
            <text:p>3802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378235.77">
            <text:p>37823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0591">
            <text:p>1,561</text:p>
          </table:table-cell>
          <table:table-cell table:style-name="ce12N2" office:value-type="float" office:value="1037.64">
            <text:p>1037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0.20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5020.25">
            <text:p>325020,25</text:p>
          </table:table-cell>
          <table:table-cell table:style-name="ce12N2" office:value-type="float" office:value="324.99">
            <text:p>32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5.21">
            <text:p>2925,21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1966.73">
            <text:p>1966,73</text:p>
          </table:table-cell>
          <table:table-cell table:style-name="ce12N2" office:value-type="float" office:value="372611.39">
            <text:p>372611,39</text:p>
          </table:table-cell>
          <table:table-cell table:style-name="ce12N2" office:value-type="float" office:value="20086.7">
            <text:p>200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291486881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19">
            <text:p>309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2">
            <text:p>0,068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958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54.57">
            <text:p>36554,57</text:p>
          </table:table-cell>
          <table:table-cell table:style-name="ce12N2" office:value-type="float" office:value="36.56">
            <text:p>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99">
            <text:p>328,9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958.86">
            <text:p>41958,86</text:p>
          </table:table-cell>
          <table:table-cell table:style-name="ce12N2" office:value-type="float" office:value="1678.35">
            <text:p>167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11600070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0">
            <text:p>309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5.42">
            <text:p>889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54">
            <text:p>0,047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7.66">
            <text:p>7657,66</text:p>
          </table:table-cell>
          <table:table-cell table:style-name="ce12N2" office:value-type="float" office:value="7.66">
            <text:p>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92">
            <text:p>68,9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31.91">
            <text:p>6531,91</text:p>
          </table:table-cell>
          <table:table-cell table:style-name="ce12N2" office:value-type="float" office:value="457.23">
            <text:p>45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232137394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8">
            <text:p>30995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905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53.38">
            <text:p>124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37278">
            <text:p>3,837</text:p>
          </table:table-cell>
          <table:table-cell table:style-name="ce12N2" office:value-type="float" office:value="11760">
            <text:p>11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42.47">
            <text:p>10442,47</text:p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98">
            <text:p>93,9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12372.96">
            <text:p>12372,96</text:p>
          </table:table-cell>
          <table:table-cell table:style-name="ce12N2" office:value-type="float" office:value="866.11">
            <text:p>86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6883820000204550030019059361703715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1">
            <text:p>3099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2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4.38">
            <text:p>1664,38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8">
            <text:p>14,9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2.08">
            <text:p>1972,08</text:p>
          </table:table-cell>
          <table:table-cell table:style-name="ce12N2" office:value-type="float" office:value="138.05">
            <text:p>13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11118983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2">
            <text:p>3099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">
            <text:p>0,033</text:p>
          </table:table-cell>
          <table:table-cell table:style-name="ce12N2" office:value-type="float" office:value="18.15">
            <text:p>18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1.03">
            <text:p>6691,03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2">
            <text:p>60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8">
            <text:p>7928,00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3991705019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3">
            <text:p>3099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">
            <text:p>0,008</text:p>
          </table:table-cell>
          <table:table-cell table:style-name="ce12N2" office:value-type="float" office:value="160">
            <text:p>1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0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937.33">
            <text:p>20937,33</text:p>
          </table:table-cell>
          <table:table-cell table:style-name="ce12N2" office:value-type="float" office:value="20.94">
            <text:p>2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44">
            <text:p>188,4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08">
            <text:p>24808,00</text:p>
          </table:table-cell>
          <table:table-cell table:style-name="ce12N2" office:value-type="float" office:value="1736.56">
            <text:p>173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41835592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4">
            <text:p>309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464">
            <text:p>0,107</text:p>
          </table:table-cell>
          <table:table-cell table:style-name="ce12N2" office:value-type="float" office:value="32.36">
            <text:p>3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02.72">
            <text:p>8602,7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43">
            <text:p>77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74.56">
            <text:p>9874,56</text:p>
          </table:table-cell>
          <table:table-cell table:style-name="ce12N2" office:value-type="float" office:value="394.98">
            <text:p>3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31033592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5">
            <text:p>3099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7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8">
            <text:p>0,150</text:p>
          </table:table-cell>
          <table:table-cell table:style-name="ce12N2" office:value-type="float" office:value="122.31">
            <text:p>122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2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07.25">
            <text:p>38807,25</text:p>
          </table:table-cell>
          <table:table-cell table:style-name="ce12N2" office:value-type="float" office:value="38.81">
            <text:p>3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.27">
            <text:p>349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722.6">
            <text:p>44722,60</text:p>
          </table:table-cell>
          <table:table-cell table:style-name="ce12N2" office:value-type="float" office:value="1959.79">
            <text:p>1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21380843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6">
            <text:p>3099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712">
            <text:p>0,021</text:p>
          </table:table-cell>
          <table:table-cell table:style-name="ce12N2" office:value-type="float" office:value="25.16">
            <text:p>2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4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16.72">
            <text:p>11916,72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26">
            <text:p>107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40.12">
            <text:p>13740,12</text:p>
          </table:table-cell>
          <table:table-cell table:style-name="ce12N2" office:value-type="float" office:value="608.76">
            <text:p>60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01789689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7">
            <text:p>3099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32">
            <text:p>0,144</text:p>
          </table:table-cell>
          <table:table-cell table:style-name="ce12N2" office:value-type="float" office:value="45.26">
            <text:p>4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7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89.46">
            <text:p>14089,46</text:p>
          </table:table-cell>
          <table:table-cell table:style-name="ce12N2" office:value-type="float" office:value="14.09">
            <text:p>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81">
            <text:p>126,8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72.48">
            <text:p>16172,48</text:p>
          </table:table-cell>
          <table:table-cell table:style-name="ce12N2" office:value-type="float" office:value="646.9">
            <text:p>64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11898328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8">
            <text:p>3099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1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5.6">
            <text:p>219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.94">
            <text:p>1739,94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34">
            <text:p>134,00</text:p>
          </table:table-cell>
          <table:table-cell table:style-name="ce12N2" office:value-type="float" office:value="2061.6">
            <text:p>2061,60</text:p>
          </table:table-cell>
          <table:table-cell table:style-name="ce12N2" office:value-type="float" office:value="144.31">
            <text:p>14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0149330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89">
            <text:p>3099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28">
            <text:p>0,008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7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27.13">
            <text:p>8727,13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5">
            <text:p>78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7.34">
            <text:p>10017,34</text:p>
          </table:table-cell>
          <table:table-cell table:style-name="ce12N2" office:value-type="float" office:value="400.68">
            <text:p>40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2172440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3">
            <text:p>3100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7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76">
            <text:p>0,015</text:p>
          </table:table-cell>
          <table:table-cell table:style-name="ce12N2" office:value-type="float" office:value="0.25">
            <text:p>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3.23">
            <text:p>863,23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77">
            <text:p>7,7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.82">
            <text:p>1022,82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71961355438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7">
            <text:p>31017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79.3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100.33">
            <text:p>6110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58758.63">
            <text:p>5875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14225">
            <text:p>1,414</text:p>
          </table:table-cell>
          <table:table-cell table:style-name="ce12N2" office:value-type="float" office:value="515.37">
            <text:p>515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10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844.18">
            <text:p>50844,18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.6">
            <text:p>457,60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341.7">
            <text:p>2341,70</text:p>
          </table:table-cell>
          <table:table-cell table:style-name="ce12N2" office:value-type="float" office:value="53018.85">
            <text:p>53018,85</text:p>
          </table:table-cell>
          <table:table-cell table:style-name="ce12N2" office:value-type="float" office:value="2731.98">
            <text:p>273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990181003285550020012793757425292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4">
            <text:p>310204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2.151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72">
            <text:p>0,133</text:p>
          </table:table-cell>
          <table:table-cell table:style-name="ce12N2" office:value-type="float" office:value="89.76">
            <text:p>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6">
            <text:p>1753,60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2.85">
            <text:p>2012,85</text:p>
          </table:table-cell>
          <table:table-cell table:style-name="ce12N2" office:value-type="float" office:value="80.51">
            <text:p>8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18136504000107550240000221511179630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6">
            <text:p>310216</text:p>
          </table:table-cell>
          <table:table-cell table:style-name="ce0" table:number-columns-spanned="4" table:number-rows-spanned="1" office:value-type="string" calcext:value-type="string">
            <text:p>25.125 - ASTOPEL EMBALAGENS LTDA</text:p>
          </table:table-cell>
          <table:covered-table-cell table:number-columns-repeated="3"/>
          <table:table-cell table:style-name="ce0" office:value-type="string" calcext:value-type="string">
            <text:p>12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">
            <text:p>9,000</text:p>
          </table:table-cell>
          <table:table-cell table:style-name="ce12N2" office:value-type="float" office:value="10000">
            <text:p>1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0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971.19">
            <text:p>51971,19</text:p>
          </table:table-cell>
          <table:table-cell table:style-name="ce12N2" office:value-type="float" office:value="51.97">
            <text:p>51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.74">
            <text:p>467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0">
            <text:p>58000,00</text:p>
          </table:table-cell>
          <table:table-cell table:style-name="ce12N2" office:value-type="float" office:value="4060">
            <text:p>4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29717900010355001000012283121301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7">
            <text:p>31021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1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34">
            <text:p>7,673</text:p>
          </table:table-cell>
          <table:table-cell table:style-name="ce12N2" office:value-type="float" office:value="5390.55">
            <text:p>5390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44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10.36">
            <text:p>37510,36</text:p>
          </table:table-cell>
          <table:table-cell table:style-name="ce12N2" office:value-type="float" office:value="37.5">
            <text:p>3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6">
            <text:p>337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444.88">
            <text:p>44444,88</text:p>
          </table:table-cell>
          <table:table-cell table:style-name="ce12N2" office:value-type="float" office:value="3111.14">
            <text:p>31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111757384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8">
            <text:p>3102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035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9">
            <text:p>0,397</text:p>
          </table:table-cell>
          <table:table-cell table:style-name="ce12N2" office:value-type="float" office:value="347.67">
            <text:p>347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1.09">
            <text:p>2481,09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3">
            <text:p>22,3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9.76">
            <text:p>2939,76</text:p>
          </table:table-cell>
          <table:table-cell table:style-name="ce12N2" office:value-type="float" office:value="205.78">
            <text:p>20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4675270000450550400000620351433429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3">
            <text:p>31027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86.96">
            <text:p>7618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8.715135">
            <text:p>158,715</text:p>
          </table:table-cell>
          <table:table-cell table:style-name="ce12N2" office:value-type="float" office:value="1436.81">
            <text:p>143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8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261.92">
            <text:p>62261,92</text:p>
          </table:table-cell>
          <table:table-cell table:style-name="ce12N2" office:value-type="float" office:value="62.26">
            <text:p>6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0.38">
            <text:p>560,38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72.12">
            <text:p>2672,12</text:p>
          </table:table-cell>
          <table:table-cell table:style-name="ce12N2" office:value-type="float" office:value="73514.84">
            <text:p>73514,84</text:p>
          </table:table-cell>
          <table:table-cell table:style-name="ce12N2" office:value-type="float" office:value="4906.59">
            <text:p>490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371568624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4">
            <text:p>3102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81.59">
            <text:p>1218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106">
            <text:p>0,207</text:p>
          </table:table-cell>
          <table:table-cell table:style-name="ce12N2" office:value-type="float" office:value="157.33">
            <text:p>15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8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49.2">
            <text:p>10049,20</text:p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4">
            <text:p>90,44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45.21">
            <text:p>545,21</text:p>
          </table:table-cell>
          <table:table-cell table:style-name="ce12N2" office:value-type="float" office:value="11636.38">
            <text:p>11636,38</text:p>
          </table:table-cell>
          <table:table-cell table:style-name="ce12N2" office:value-type="float" office:value="562.91">
            <text:p>56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5158626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9">
            <text:p>310279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7.05">
            <text:p>802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4875">
            <text:p>0,735</text:p>
          </table:table-cell>
          <table:table-cell table:style-name="ce12N2" office:value-type="float" office:value="79.24">
            <text:p>7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61.15">
            <text:p>6361,15</text:p>
          </table:table-cell>
          <table:table-cell table:style-name="ce12N2" office:value-type="float" office:value="6.37">
            <text:p>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24">
            <text:p>57,2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89.91">
            <text:p>489,91</text:p>
          </table:table-cell>
          <table:table-cell table:style-name="ce12N2" office:value-type="float" office:value="7537.14">
            <text:p>7537,14</text:p>
          </table:table-cell>
          <table:table-cell table:style-name="ce12N2" office:value-type="float" office:value="527.61">
            <text:p>52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2661217592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80">
            <text:p>31028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2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.13">
            <text:p>88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284">
            <text:p>0,057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9.85">
            <text:p>699,85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9">
            <text:p>53,90</text:p>
          </table:table-cell>
          <table:table-cell table:style-name="ce12N2" office:value-type="float" office:value="829.23">
            <text:p>829,23</text:p>
          </table:table-cell>
          <table:table-cell table:style-name="ce12N2" office:value-type="float" office:value="58.05">
            <text:p>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50238000114550010013725351219649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9">
            <text:p>310299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3.82">
            <text:p>364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4544">
            <text:p>0,315</text:p>
          </table:table-cell>
          <table:table-cell table:style-name="ce12N2" office:value-type="float" office:value="37.08">
            <text:p>3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6.51">
            <text:p>3066,51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6">
            <text:p>27,6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3623.16">
            <text:p>3623,1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7401538682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0">
            <text:p>31030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656">
            <text:p>0,197</text:p>
          </table:table-cell>
          <table:table-cell table:style-name="ce12N2" office:value-type="float" office:value="9.72">
            <text:p>9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14.93">
            <text:p>2214,9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93">
            <text:p>19,93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4.4">
            <text:p>2624,40</text:p>
          </table:table-cell>
          <table:table-cell table:style-name="ce12N2" office:value-type="float" office:value="183.71">
            <text:p>18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8691076041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6">
            <text:p>31031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82.24">
            <text:p>470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46860.88">
            <text:p>4686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976484">
            <text:p>36,976</text:p>
          </table:table-cell>
          <table:table-cell table:style-name="ce12N2" office:value-type="float" office:value="1508.32">
            <text:p>150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4.47">
            <text:p>40804,47</text:p>
          </table:table-cell>
          <table:table-cell table:style-name="ce12N2" office:value-type="float" office:value="40.79">
            <text:p>4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.23">
            <text:p>367,2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33398.05">
            <text:p>33398,05</text:p>
          </table:table-cell>
          <table:table-cell table:style-name="ce12N2" office:value-type="float" office:value="2128.87">
            <text:p>212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11376870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7">
            <text:p>310317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4.1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4.86">
            <text:p>3823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27776">
            <text:p>5,528</text:p>
          </table:table-cell>
          <table:table-cell table:style-name="ce12N2" office:value-type="float" office:value="1100.93">
            <text:p>110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4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53.53">
            <text:p>31253,53</text:p>
          </table:table-cell>
          <table:table-cell table:style-name="ce12N2" office:value-type="float" office:value="31.25">
            <text:p>3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.28">
            <text:p>281,2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03.51">
            <text:p>1203,51</text:p>
          </table:table-cell>
          <table:table-cell table:style-name="ce12N2" office:value-type="float" office:value="37031.35">
            <text:p>37031,35</text:p>
          </table:table-cell>
          <table:table-cell table:style-name="ce12N2" office:value-type="float" office:value="2592.2">
            <text:p>259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037668000154550010012041821780522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45">
            <text:p>31034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6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5.54">
            <text:p>245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41.3">
            <text:p>22441,30</text:p>
          </table:table-cell>
          <table:table-cell table:style-name="ce12N2" office:value-type="float" office:value="929.39">
            <text:p>929,39</text:p>
          </table:table-cell>
          <table:table-cell table:style-name="ce12N3" office:value-type="float" office:value="0.44847">
            <text:p>0,448</text:p>
          </table:table-cell>
          <table:table-cell table:style-name="ce12N2" office:value-type="float" office:value="211.23">
            <text:p>21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5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974.63">
            <text:p>19974,63</text:p>
          </table:table-cell>
          <table:table-cell table:style-name="ce12N2" office:value-type="float" office:value="19.97">
            <text:p>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.78">
            <text:p>179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214.85">
            <text:p>1214,85</text:p>
          </table:table-cell>
          <table:table-cell table:style-name="ce12N2" office:value-type="float" office:value="23370.69">
            <text:p>23370,69</text:p>
          </table:table-cell>
          <table:table-cell table:style-name="ce12N2" office:value-type="float" office:value="1360.07">
            <text:p>136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692163368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7">
            <text:p>310387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8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">
            <text:p>0,038</text:p>
          </table:table-cell>
          <table:table-cell table:style-name="ce12N2" office:value-type="float" office:value="258.4">
            <text:p>25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.8">
            <text:p>11590,80</text:p>
          </table:table-cell>
          <table:table-cell table:style-name="ce12N2" office:value-type="float" office:value="369.75">
            <text:p>3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4887523000152550010000381201003812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4">
            <text:p>3104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1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241.31">
            <text:p>206324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">
            <text:p>208,00</text:p>
          </table:table-cell>
          <table:table-cell table:style-name="ce12N2" office:value-type="float" office:value="2050218.05">
            <text:p>2050218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92.103079">
            <text:p>692,103</text:p>
          </table:table-cell>
          <table:table-cell table:style-name="ce12N2" office:value-type="float" office:value="9038.4">
            <text:p>903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.241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0206.72">
            <text:p>1740206,72</text:p>
          </table:table-cell>
          <table:table-cell table:style-name="ce12N2" office:value-type="float" office:value="1740.22">
            <text:p>17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61.89">
            <text:p>15661,8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3023.26">
            <text:p>13023,26</text:p>
          </table:table-cell>
          <table:table-cell table:style-name="ce12N2" office:value-type="float" office:value="1999450.7">
            <text:p>1999450,70</text:p>
          </table:table-cell>
          <table:table-cell table:style-name="ce12N2" office:value-type="float" office:value="132634.89">
            <text:p>13263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151890466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0">
            <text:p>31050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84.16">
            <text:p>2384,16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4.92">
            <text:p>2824,92</text:p>
          </table:table-cell>
          <table:table-cell table:style-name="ce12N2" office:value-type="float" office:value="197.74">
            <text:p>19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21402749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1">
            <text:p>3105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6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516">
            <text:p>0,060</text:p>
          </table:table-cell>
          <table:table-cell table:style-name="ce12N2" office:value-type="float" office:value="27.9">
            <text:p>2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03.11">
            <text:p>3503,11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53">
            <text:p>31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50.72">
            <text:p>4150,72</text:p>
          </table:table-cell>
          <table:table-cell table:style-name="ce12N2" office:value-type="float" office:value="290.55">
            <text:p>29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31422428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02">
            <text:p>3105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5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012">
            <text:p>0,059</text:p>
          </table:table-cell>
          <table:table-cell table:style-name="ce12N2" office:value-type="float" office:value="27.1">
            <text:p>2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6.92">
            <text:p>466,92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24">
            <text:p>553,24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52841864812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4">
            <text:p>310534</text:p>
          </table:table-cell>
          <table:table-cell table:style-name="ce0" table:number-columns-spanned="4" table:number-rows-spanned="1" office:value-type="string" calcext:value-type="string">
            <text:p>39.171 - BALDEMETAL IND METALURGICA LTDA</text:p>
          </table:table-cell>
          <table:covered-table-cell table:number-columns-repeated="3"/>
          <table:table-cell table:style-name="ce0" office:value-type="string" calcext:value-type="string">
            <text:p>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6304">
            <text:p>5,063</text:p>
          </table:table-cell>
          <table:table-cell table:style-name="ce12N2" office:value-type="float" office:value="1080">
            <text:p>10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2.8">
            <text:p>12712,80</text:p>
          </table:table-cell>
          <table:table-cell table:style-name="ce12N2" office:value-type="float" office:value="889.89">
            <text:p>88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665712600001255500100000010910000015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4">
            <text:p>31055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.5186">
            <text:p>33,519</text:p>
          </table:table-cell>
          <table:table-cell table:style-name="ce12N2" office:value-type="float" office:value="424">
            <text:p>4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6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06.02">
            <text:p>14406,02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65">
            <text:p>129,6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69.27">
            <text:p>17069,27</text:p>
          </table:table-cell>
          <table:table-cell table:style-name="ce12N2" office:value-type="float" office:value="1194.86">
            <text:p>119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0411835813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7">
            <text:p>31056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6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42575">
            <text:p>1,043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4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1.81">
            <text:p>10421,81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.8">
            <text:p>93,8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48.48">
            <text:p>12348,48</text:p>
          </table:table-cell>
          <table:table-cell table:style-name="ce12N2" office:value-type="float" office:value="864.39">
            <text:p>86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69381719822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69">
            <text:p>31056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1.78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1.6">
            <text:p>90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484">
            <text:p>2,885</text:p>
          </table:table-cell>
          <table:table-cell table:style-name="ce12N2" office:value-type="float" office:value="263.04">
            <text:p>26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4.54">
            <text:p>7524,54</text:p>
          </table:table-cell>
          <table:table-cell table:style-name="ce12N2" office:value-type="float" office:value="7.53">
            <text:p>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71">
            <text:p>67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0.2">
            <text:p>190,20</text:p>
          </table:table-cell>
          <table:table-cell table:style-name="ce12N2" office:value-type="float" office:value="8831.4">
            <text:p>8831,40</text:p>
          </table:table-cell>
          <table:table-cell table:style-name="ce12N2" office:value-type="float" office:value="539.9">
            <text:p>53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17821252863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4">
            <text:p>31057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1.9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4.16">
            <text:p>22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2.37">
            <text:p>1792,3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3">
            <text:p>16,1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10.43">
            <text:p>110,43</text:p>
          </table:table-cell>
          <table:table-cell table:style-name="ce12N2" office:value-type="float" office:value="2123.73">
            <text:p>2123,73</text:p>
          </table:table-cell>
          <table:table-cell table:style-name="ce12N2" office:value-type="float" office:value="148.66">
            <text:p>1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19521100003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80">
            <text:p>310580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7.8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8">
            <text:p>90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0248">
            <text:p>0,340</text:p>
          </table:table-cell>
          <table:table-cell table:style-name="ce12N2" office:value-type="float" office:value="84.25">
            <text:p>84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1.24">
            <text:p>7131,24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.18">
            <text:p>64,1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578.41">
            <text:p>578,41</text:p>
          </table:table-cell>
          <table:table-cell table:style-name="ce12N2" office:value-type="float" office:value="8449.59">
            <text:p>8449,59</text:p>
          </table:table-cell>
          <table:table-cell table:style-name="ce12N2" office:value-type="float" office:value="591.47">
            <text:p>59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78521570448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68">
            <text:p>31066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5.9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84.77">
            <text:p>2458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26">
            <text:p>244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7628">
            <text:p>4,976</text:p>
          </table:table-cell>
          <table:table-cell table:style-name="ce12N2" office:value-type="float" office:value="30594.6">
            <text:p>3059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8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75.48">
            <text:p>20575,48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18">
            <text:p>185,1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58.77">
            <text:p>158,77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2">
            <text:p>57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439</text:p>
          </table:table-cell>
          <table:table-cell table:style-name="ce0" office:value-type="string" calcext:value-type="string">
            <text:p>31.661 - DOSANJOS TRANSPORTES LTDA</text:p>
          </table:table-cell>
          <table:table-cell table:style-name="ce0" office:value-type="string" calcext:value-type="string">
            <text:p>07/07/2026</text:p>
          </table:table-cell>
          <table:table-cell table:style-name="ce12" office:value-type="string" calcext:value-type="string">
            <text:p>5.758,2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35260774423880000145550030012259001524427035</text:p>
          </table:table-cell>
          <table:table-cell table:style-name="ce0" office:value-type="string" calcext:value-type="string">
            <text:p>3526075432020300019457001000004439121191324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4">
            <text:p>31067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2.20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9.11">
            <text:p>22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9348">
            <text:p>0,579</text:p>
          </table:table-cell>
          <table:table-cell table:style-name="ce12N2" office:value-type="float" office:value="78.41">
            <text:p>7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9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63.68">
            <text:p>1863,68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73.43">
            <text:p>73,43</text:p>
          </table:table-cell>
          <table:table-cell table:style-name="ce12N2" office:value-type="float" office:value="2185.68">
            <text:p>2185,68</text:p>
          </table:table-cell>
          <table:table-cell table:style-name="ce12N2" office:value-type="float" office:value="132.05">
            <text:p>1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2200131011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6">
            <text:p>31067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3608">
            <text:p>50,361</text:p>
          </table:table-cell>
          <table:table-cell table:style-name="ce12N2" office:value-type="float" office:value="680">
            <text:p>6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2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794.98">
            <text:p>21794,98</text:p>
          </table:table-cell>
          <table:table-cell table:style-name="ce12N2" office:value-type="float" office:value="21.79">
            <text:p>2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.15">
            <text:p>196,1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24.19">
            <text:p>25824,19</text:p>
          </table:table-cell>
          <table:table-cell table:style-name="ce12N2" office:value-type="float" office:value="1807.69">
            <text:p>180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1611783819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5">
            <text:p>310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">
            <text:p>0,056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4">
            <text:p>3320,4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8">
            <text:p>29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4">
            <text:p>3934,40</text:p>
          </table:table-cell>
          <table:table-cell table:style-name="ce12N2" office:value-type="float" office:value="275.41">
            <text:p>27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21933536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96">
            <text:p>3106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6.4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6">
            <text:p>0,002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7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1.75">
            <text:p>2851,75</text:p>
          </table:table-cell>
          <table:table-cell table:style-name="ce12N2" office:value-type="float" office:value="2.85">
            <text:p>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7">
            <text:p>25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8.95">
            <text:p>3378,95</text:p>
          </table:table-cell>
          <table:table-cell table:style-name="ce12N2" office:value-type="float" office:value="236.53">
            <text:p>23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64911020667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00">
            <text:p>31070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29.21">
            <text:p>38829,21</text:p>
          </table:table-cell>
          <table:table-cell table:style-name="ce12N2" office:value-type="float" office:value="2271.96">
            <text:p>2271,96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7289.14">
            <text:p>3728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092937">
            <text:p>18,093</text:p>
          </table:table-cell>
          <table:table-cell table:style-name="ce12N2" office:value-type="float" office:value="305.38">
            <text:p>30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2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8.86">
            <text:p>30488,86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78.42">
            <text:p>78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3350.5">
            <text:p>3350,50</text:p>
          </table:table-cell>
          <table:table-cell table:style-name="ce12N2" office:value-type="float" office:value="35017.18">
            <text:p>35017,18</text:p>
          </table:table-cell>
          <table:table-cell table:style-name="ce12N2" office:value-type="float" office:value="1420.63">
            <text:p>142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61">
            <text:p>2551,61</text:p>
          </table:table-cell>
          <table:table-cell table:style-name="ce12N2" office:value-type="float" office:value="461.53">
            <text:p>461,5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711124270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0">
            <text:p>31071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8.94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54.59">
            <text:p>2485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21827">
            <text:p>3,422</text:p>
          </table:table-cell>
          <table:table-cell table:style-name="ce12N2" office:value-type="float" office:value="759.8">
            <text:p>75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5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60.05">
            <text:p>20860,05</text:p>
          </table:table-cell>
          <table:table-cell table:style-name="ce12N2" office:value-type="float" office:value="20.84">
            <text:p>2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.72">
            <text:p>187,7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38.2">
            <text:p>138,20</text:p>
          </table:table-cell>
          <table:table-cell table:style-name="ce12N2" office:value-type="float" office:value="24716.39">
            <text:p>24716,39</text:p>
          </table:table-cell>
          <table:table-cell table:style-name="ce12N2" office:value-type="float" office:value="1730.15">
            <text:p>173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6220550140009789461008086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1">
            <text:p>3107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62">
            <text:p>22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">
            <text:p>0,008</text:p>
          </table:table-cell>
          <table:table-cell table:style-name="ce12N2" office:value-type="float" office:value="5.64">
            <text:p>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2.25">
            <text:p>1712,25</text:p>
          </table:table-cell>
          <table:table-cell table:style-name="ce12N2" office:value-type="float" office:value="1.71">
            <text:p>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41">
            <text:p>15,41</text:p>
          </table:table-cell>
          <table:table-cell table:style-name="ce12N2" office:value-type="float" office:value="27.45">
            <text:p>27,4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172.82">
            <text:p>172,82</text:p>
          </table:table-cell>
          <table:table-cell table:style-name="ce12N2" office:value-type="float" office:value="2028.8">
            <text:p>2028,80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51887899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2">
            <text:p>3107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8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">
            <text:p>0,006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7.73">
            <text:p>1987,73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9">
            <text:p>17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229.63">
            <text:p>229,63</text:p>
          </table:table-cell>
          <table:table-cell table:style-name="ce12N2" office:value-type="float" office:value="2355.2">
            <text:p>2355,20</text:p>
          </table:table-cell>
          <table:table-cell table:style-name="ce12N2" office:value-type="float" office:value="164.86">
            <text:p>1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8361998071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4">
            <text:p>3107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4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.24">
            <text:p>18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35">
            <text:p>0,036</text:p>
          </table:table-cell>
          <table:table-cell table:style-name="ce12N2" office:value-type="float" office:value="13.85">
            <text:p>13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9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21.63">
            <text:p>1521,6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99.43">
            <text:p>99,43</text:p>
          </table:table-cell>
          <table:table-cell table:style-name="ce12N2" office:value-type="float" office:value="1793.81">
            <text:p>1793,81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483157055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1">
            <text:p>31079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8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54.07">
            <text:p>2615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925">
            <text:p>30925,000</text:p>
          </table:table-cell>
          <table:table-cell table:style-name="ce12N2" office:value-type="float" office:value="3092.5">
            <text:p>309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154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78.58">
            <text:p>21378,58</text:p>
          </table:table-cell>
          <table:table-cell table:style-name="ce12N2" office:value-type="float" office:value="21.38">
            <text:p>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41">
            <text:p>192,4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823.25">
            <text:p>823,25</text:p>
          </table:table-cell>
          <table:table-cell table:style-name="ce12N2" office:value-type="float" office:value="25330.82">
            <text:p>25330,82</text:p>
          </table:table-cell>
          <table:table-cell table:style-name="ce12N2" office:value-type="float" office:value="1773.16">
            <text:p>177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83321584283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4">
            <text:p>310794</text:p>
          </table:table-cell>
          <table:table-cell table:style-name="ce0" table:number-columns-spanned="4" table:number-rows-spanned="1" office:value-type="string" calcext:value-type="string">
            <text:p>13.027 - THELMAR-INDUSTRIA DE ABRACADEIRAS LTDA</text:p>
          </table:table-cell>
          <table:covered-table-cell table:number-columns-repeated="3"/>
          <table:table-cell table:style-name="ce0" office:value-type="string" calcext:value-type="string">
            <text:p>13.111</text:p>
          </table:table-cell>
          <table:table-cell table:style-name="ce9" office:value-type="string" calcext:value-type="string">
            <text:p>10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4.38">
            <text:p>750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2">
            <text:p>0,317</text:p>
          </table:table-cell>
          <table:table-cell table:style-name="ce12N2" office:value-type="float" office:value="295.65">
            <text:p>29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04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44">
            <text:p>6444,00</text:p>
          </table:table-cell>
          <table:table-cell table:style-name="ce12N2" office:value-type="float" office:value="6.45">
            <text:p>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99">
            <text:p>57,99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7191.51">
            <text:p>7191,51</text:p>
          </table:table-cell>
          <table:table-cell table:style-name="ce12N2" office:value-type="float" office:value="503.4">
            <text:p>50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03984342000181551000000131111131179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7">
            <text:p>310797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1.87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">
            <text:p>2910,00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">
            <text:p>0,600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4.72">
            <text:p>2454,72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9">
            <text:p>2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18791882593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1">
            <text:p>31080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184">
            <text:p>0,842</text:p>
          </table:table-cell>
          <table:table-cell table:style-name="ce12N2" office:value-type="float" office:value="218.32">
            <text:p>21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91.86">
            <text:p>8791,86</text:p>
          </table:table-cell>
          <table:table-cell table:style-name="ce12N2" office:value-type="float" office:value="8.79">
            <text:p>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13">
            <text:p>79,1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17.2">
            <text:p>10417,20</text:p>
          </table:table-cell>
          <table:table-cell table:style-name="ce12N2" office:value-type="float" office:value="729.2">
            <text:p>7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613408405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2">
            <text:p>31080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6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3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46">
            <text:p>0,210</text:p>
          </table:table-cell>
          <table:table-cell table:style-name="ce12N2" office:value-type="float" office:value="54.58">
            <text:p>5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7.97">
            <text:p>2197,97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8">
            <text:p>19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4.3">
            <text:p>2604,30</text:p>
          </table:table-cell>
          <table:table-cell table:style-name="ce12N2" office:value-type="float" office:value="182.3">
            <text:p>18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64671910037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5">
            <text:p>31080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8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04">
            <text:p>0,053</text:p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52.05">
            <text:p>3452,05</text:p>
          </table:table-cell>
          <table:table-cell table:style-name="ce12N2" office:value-type="float" office:value="3.45">
            <text:p>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07">
            <text:p>31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2.4">
            <text:p>3962,40</text:p>
          </table:table-cell>
          <table:table-cell table:style-name="ce12N2" office:value-type="float" office:value="158.5">
            <text:p>1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8591754941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07">
            <text:p>31080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4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3.33">
            <text:p>473,33</text:p>
          </table:table-cell>
          <table:table-cell table:style-name="ce12N2" office:value-type="float" office:value="28.02">
            <text:p>28,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9.3">
            <text:p>45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2">
            <text:p>0,022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5.74">
            <text:p>375,74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05">
            <text:p>42,05</text:p>
          </table:table-cell>
          <table:table-cell table:style-name="ce12N2" office:value-type="float" office:value="431.28">
            <text:p>431,28</text:p>
          </table:table-cell>
          <table:table-cell table:style-name="ce12N2" office:value-type="float" office:value="17.25">
            <text:p>1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49361462431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0">
            <text:p>310820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8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0.86">
            <text:p>636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06776">
            <text:p>16,307</text:p>
          </table:table-cell>
          <table:table-cell table:style-name="ce12N2" office:value-type="float" office:value="159.24">
            <text:p>15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0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6.56">
            <text:p>4356,56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21">
            <text:p>39,2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61.95">
            <text:p>5161,95</text:p>
          </table:table-cell>
          <table:table-cell table:style-name="ce12N2" office:value-type="float" office:value="361.34">
            <text:p>36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801.26">
            <text:p>7801,26</text:p>
          </table:table-cell>
          <table:table-cell table:style-name="ce12N2" office:value-type="float" office:value="1198.91">
            <text:p>1198,9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37008145000149550010001086211828479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1">
            <text:p>310821</text:p>
          </table:table-cell>
          <table:table-cell table:style-name="ce0" table:number-columns-spanned="4" table:number-rows-spanned="1" office:value-type="string" calcext:value-type="string">
            <text:p>38.402 - TECESA COMERCIO EXTERIOR LTDA</text:p>
          </table:table-cell>
          <table:covered-table-cell table:number-columns-repeated="3"/>
          <table:table-cell table:style-name="ce0" office:value-type="string" calcext:value-type="string">
            <text:p>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98.68">
            <text:p>1989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24">
            <text:p>138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8786">
            <text:p>7,879</text:p>
          </table:table-cell>
          <table:table-cell table:style-name="ce12N2" office:value-type="float" office:value="872">
            <text:p>8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9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88.45">
            <text:p>12288,45</text:p>
          </table:table-cell>
          <table:table-cell table:style-name="ce12N2" office:value-type="float" office:value="12.28">
            <text:p>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.59">
            <text:p>110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347.84">
            <text:p>1347,84</text:p>
          </table:table-cell>
          <table:table-cell table:style-name="ce12N2" office:value-type="float" office:value="13824">
            <text:p>13824,00</text:p>
          </table:table-cell>
          <table:table-cell table:style-name="ce12N2" office:value-type="float" office:value="552.96">
            <text:p>55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399">
            <text:p>26399,00</text:p>
          </table:table-cell>
          <table:table-cell table:style-name="ce12N2" office:value-type="float" office:value="4726.84">
            <text:p>4726,8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5358276000138550010000006121928729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2">
            <text:p>31082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73.86">
            <text:p>16827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92825">
            <text:p>32,928</text:p>
          </table:table-cell>
          <table:table-cell table:style-name="ce12N2" office:value-type="float" office:value="3047.75">
            <text:p>304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7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548.61">
            <text:p>137548,61</text:p>
          </table:table-cell>
          <table:table-cell table:style-name="ce12N2" office:value-type="float" office:value="137.55">
            <text:p>13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7.94">
            <text:p>1237,94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296.76">
            <text:p>5296,76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11408.4">
            <text:p>114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61942486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3">
            <text:p>310823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04.89">
            <text:p>5900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7181.49">
            <text:p>57181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612303">
            <text:p>19,612</text:p>
          </table:table-cell>
          <table:table-cell table:style-name="ce12N2" office:value-type="float" office:value="3489.36">
            <text:p>348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00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92">
            <text:p>48892,00</text:p>
          </table:table-cell>
          <table:table-cell table:style-name="ce12N2" office:value-type="float" office:value="48.88">
            <text:p>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.05">
            <text:p>440,05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823.4">
            <text:p>1823,40</text:p>
          </table:table-cell>
          <table:table-cell table:style-name="ce12N2" office:value-type="float" office:value="51916.07">
            <text:p>51916,07</text:p>
          </table:table-cell>
          <table:table-cell table:style-name="ce12N2" office:value-type="float" office:value="3306.01">
            <text:p>330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71682680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5">
            <text:p>310825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36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0574">
            <text:p>10,106</text:p>
          </table:table-cell>
          <table:table-cell table:style-name="ce12N2" office:value-type="float" office:value="22132.13">
            <text:p>22132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0.039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069.38">
            <text:p>135069,38</text:p>
          </table:table-cell>
          <table:table-cell table:style-name="ce12N2" office:value-type="float" office:value="135.09">
            <text:p>13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61">
            <text:p>1215,6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39.51">
            <text:p>160039,51</text:p>
          </table:table-cell>
          <table:table-cell table:style-name="ce12N2" office:value-type="float" office:value="11202.77">
            <text:p>1120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361934188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9">
            <text:p>310829</text:p>
          </table:table-cell>
          <table:table-cell table:style-name="ce0" table:number-columns-spanned="4" table:number-rows-spanned="1" office:value-type="string" calcext:value-type="string">
            <text:p>11.789 - POLI-FERR INDUSTRIA E COMERCIO LTDA-EPP</text:p>
          </table:table-cell>
          <table:covered-table-cell table:number-columns-repeated="3"/>
          <table:table-cell table:style-name="ce0" office:value-type="string" calcext:value-type="string">
            <text:p>12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1.2">
            <text:p>1338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2205">
            <text:p>102,221</text:p>
          </table:table-cell>
          <table:table-cell table:style-name="ce12N2" office:value-type="float" office:value="283">
            <text:p>2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79.76">
            <text:p>11579,76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4.22">
            <text:p>104,22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1.2">
            <text:p>421,20</text:p>
          </table:table-cell>
          <table:table-cell table:style-name="ce12N2" office:value-type="float" office:value="12960">
            <text:p>12960,00</text:p>
          </table:table-cell>
          <table:table-cell table:style-name="ce12N2" office:value-type="float" office:value="907.2">
            <text:p>9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99.22">
            <text:p>3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957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3/07/2026</text:p>
          </table:table-cell>
          <table:table-cell table:style-name="ce12" office:value-type="string" calcext:value-type="string">
            <text:p>399,2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5260701115780000188550010000125851498170563</text:p>
          </table:table-cell>
          <table:table-cell table:style-name="ce0" office:value-type="string" calcext:value-type="string">
            <text:p>3526071138956500020057005000402957100089434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1">
            <text:p>310831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59">
            <text:p>5,196</text:p>
          </table:table-cell>
          <table:table-cell table:style-name="ce12N2" office:value-type="float" office:value="584">
            <text:p>58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689.84">
            <text:p>36689,84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0.21">
            <text:p>330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45.98">
            <text:p>40945,98</text:p>
          </table:table-cell>
          <table:table-cell table:style-name="ce12N2" office:value-type="float" office:value="2866.23">
            <text:p>28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191018636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2">
            <text:p>310832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6">
            <text:p>0,196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4.2">
            <text:p>854,20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.3">
            <text:p>953,30</text:p>
          </table:table-cell>
          <table:table-cell table:style-name="ce12N2" office:value-type="float" office:value="66.73">
            <text:p>6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21430410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0">
            <text:p>310840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2.36">
            <text:p>3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4">
            <text:p>0,059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4">
            <text:p>2859,34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44.08">
            <text:p>44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133.42">
            <text:p>13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81820249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3">
            <text:p>310853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175">
            <text:p>2,317</text:p>
          </table:table-cell>
          <table:table-cell table:style-name="ce12N2" office:value-type="float" office:value="710.5">
            <text:p>7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255.92">
            <text:p>17255,92</text:p>
          </table:table-cell>
          <table:table-cell table:style-name="ce12N2" office:value-type="float" office:value="17.23">
            <text:p>1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.27">
            <text:p>155,27</text:p>
          </table:table-cell>
          <table:table-cell table:style-name="ce12N2" office:value-type="float" office:value="49.33">
            <text:p>49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1431.22">
            <text:p>14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0296181000145550010000185271001532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5">
            <text:p>310855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7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">
            <text:p>0,017</text:p>
          </table:table-cell>
          <table:table-cell table:style-name="ce12N2" office:value-type="float" office:value="1000">
            <text:p>1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42.13">
            <text:p>7042,13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8">
            <text:p>63,38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4">
            <text:p>8344,00</text:p>
          </table:table-cell>
          <table:table-cell table:style-name="ce12N2" office:value-type="float" office:value="584.08">
            <text:p>5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7113621171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1">
            <text:p>310861</text:p>
          </table:table-cell>
          <table:table-cell table:style-name="ce0" table:number-columns-spanned="4" table:number-rows-spanned="1" office:value-type="string" calcext:value-type="string">
            <text:p>584 - PONTO DAS DUCHAS COMERCIO E INDUSTRIA LTDA</text:p>
          </table:table-cell>
          <table:covered-table-cell table:number-columns-repeated="3"/>
          <table:table-cell table:style-name="ce0" office:value-type="string" calcext:value-type="string">
            <text:p>5.8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88">
            <text:p>0,449</text:p>
          </table:table-cell>
          <table:table-cell table:style-name="ce12N2" office:value-type="float" office:value="190">
            <text:p>1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05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057">
            <text:p>25057,00</text:p>
          </table:table-cell>
          <table:table-cell table:style-name="ce12N2" office:value-type="float" office:value="739.19">
            <text:p>7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01130182000188550010000058581918971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4">
            <text:p>310864</text:p>
          </table:table-cell>
          <table:table-cell table:style-name="ce0" table:number-columns-spanned="4" table:number-rows-spanned="1" office:value-type="string" calcext:value-type="string">
            <text:p>38.401 - TENDENCIA COMERCIO EXTERIOR LTDA</text:p>
          </table:table-cell>
          <table:covered-table-cell table:number-columns-repeated="3"/>
          <table:table-cell table:style-name="ce0" office:value-type="string" calcext:value-type="string">
            <text:p>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76.93">
            <text:p>1587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1030">
            <text:p>110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7968">
            <text:p>6,797</text:p>
          </table:table-cell>
          <table:table-cell table:style-name="ce12N2" office:value-type="float" office:value="636">
            <text:p>6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7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4.06">
            <text:p>9754,06</text:p>
          </table:table-cell>
          <table:table-cell table:style-name="ce12N2" office:value-type="float" office:value="9.76">
            <text:p>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9">
            <text:p>87,7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75.43">
            <text:p>1075,43</text:p>
          </table:table-cell>
          <table:table-cell table:style-name="ce12N2" office:value-type="float" office:value="11030">
            <text:p>11030,00</text:p>
          </table:table-cell>
          <table:table-cell table:style-name="ce12N2" office:value-type="float" office:value="441.2">
            <text:p>4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063.44">
            <text:p>21063,44</text:p>
          </table:table-cell>
          <table:table-cell table:style-name="ce12N2" office:value-type="float" office:value="3771.5">
            <text:p>3771,5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71331847000288550010000003961930395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65">
            <text:p>31086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5">
            <text:p>0,855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95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18.77">
            <text:p>8418,7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77">
            <text:p>75,7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95.39">
            <text:p>9395,39</text:p>
          </table:table-cell>
          <table:table-cell table:style-name="ce12N2" office:value-type="float" office:value="657.68">
            <text:p>657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365014000162550010000468211093594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1">
            <text:p>31087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3.38">
            <text:p>14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9">
            <text:p>0,054</text:p>
          </table:table-cell>
          <table:table-cell table:style-name="ce12N2" office:value-type="float" office:value="14.22">
            <text:p>14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.62">
            <text:p>1185,62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67">
            <text:p>10,6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89.49">
            <text:p>89,49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97.42">
            <text:p>9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2981570443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4">
            <text:p>310874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90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41.2">
            <text:p>751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005">
            <text:p>0,192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14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46.9">
            <text:p>65346,90</text:p>
          </table:table-cell>
          <table:table-cell table:style-name="ce12N2" office:value-type="float" office:value="65.35">
            <text:p>6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12">
            <text:p>588,1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33.27">
            <text:p>133,27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3000.32">
            <text:p>300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274105100018555055000307906161402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8">
            <text:p>310878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87.55">
            <text:p>8728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92">
            <text:p>92,920</text:p>
          </table:table-cell>
          <table:table-cell table:style-name="ce12N2" office:value-type="float" office:value="20800">
            <text:p>20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.28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49.64">
            <text:p>71349,64</text:p>
          </table:table-cell>
          <table:table-cell table:style-name="ce12N2" office:value-type="float" office:value="71.35">
            <text:p>7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2.15">
            <text:p>642,15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747.55">
            <text:p>2747,55</text:p>
          </table:table-cell>
          <table:table-cell table:style-name="ce12N2" office:value-type="float" office:value="84540">
            <text:p>84540,00</text:p>
          </table:table-cell>
          <table:table-cell table:style-name="ce12N2" office:value-type="float" office:value="5917.8">
            <text:p>591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86175151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9">
            <text:p>310879</text:p>
          </table:table-cell>
          <table:table-cell table:style-name="ce0" table:number-columns-spanned="4" table:number-rows-spanned="1" office:value-type="string" calcext:value-type="string">
            <text:p>8.415 - SIMAPPEL SIMAO PEREIRA IND COM DE PAPEIS LTDA</text:p>
          </table:table-cell>
          <table:covered-table-cell table:number-columns-repeated="3"/>
          <table:table-cell table:style-name="ce0" office:value-type="string" calcext:value-type="string">
            <text:p>21.3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14.13">
            <text:p>746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265.5">
            <text:p>7226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99.89233">
            <text:p>2099,892</text:p>
          </table:table-cell>
          <table:table-cell table:style-name="ce12N2" office:value-type="float" office:value="14310">
            <text:p>143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.6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753.86">
            <text:p>64753,86</text:p>
          </table:table-cell>
          <table:table-cell table:style-name="ce12N2" office:value-type="float" office:value="64.75">
            <text:p>6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2.78">
            <text:p>582,78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348.63">
            <text:p>2348,63</text:p>
          </table:table-cell>
          <table:table-cell table:style-name="ce12N2" office:value-type="float" office:value="72265.5">
            <text:p>72265,50</text:p>
          </table:table-cell>
          <table:table-cell table:style-name="ce12N2" office:value-type="float" office:value="5058.59">
            <text:p>505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036317640001735500100002131418883797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1">
            <text:p>310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7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">
            <text:p>0,017</text:p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8.9">
            <text:p>2368,90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2">
            <text:p>2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196.48">
            <text:p>1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727165890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5">
            <text:p>310885</text:p>
          </table:table-cell>
          <table:table-cell table:style-name="ce0" table:number-columns-spanned="4" table:number-rows-spanned="1" office:value-type="string" calcext:value-type="string">
            <text:p>619 - CAST METAIS E SOLDAS LTDA</text:p>
          </table:table-cell>
          <table:covered-table-cell table:number-columns-repeated="3"/>
          <table:table-cell table:style-name="ce0" office:value-type="string" calcext:value-type="string">
            <text:p>12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31">
            <text:p>0,067</text:p>
          </table:table-cell>
          <table:table-cell table:style-name="ce12N2" office:value-type="float" office:value="119.64">
            <text:p>11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0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21.94">
            <text:p>14521,94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1204.46">
            <text:p>12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4079510001785500100012377318509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2">
            <text:p>3108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9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42.92">
            <text:p>30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8">
            <text:p>0,107</text:p>
          </table:table-cell>
          <table:table-cell table:style-name="ce12N2" office:value-type="float" office:value="51.24">
            <text:p>5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45.6">
            <text:p>24045,60</text:p>
          </table:table-cell>
          <table:table-cell table:style-name="ce12N2" office:value-type="float" office:value="24.05">
            <text:p>2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.41">
            <text:p>216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851.92">
            <text:p>1851,92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1994.37">
            <text:p>199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96911767002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3">
            <text:p>3109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6.96">
            <text:p>710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2">
            <text:p>0,09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2">
            <text:p>5632,00</text:p>
          </table:table-cell>
          <table:table-cell table:style-name="ce12N2" office:value-type="float" office:value="5.63">
            <text:p>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69">
            <text:p>50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33.76">
            <text:p>433,76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467.12">
            <text:p>4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0751355786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4">
            <text:p>310904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334318">
            <text:p>20,334</text:p>
          </table:table-cell>
          <table:table-cell table:style-name="ce12N2" office:value-type="float" office:value="37.1">
            <text:p>37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2.32">
            <text:p>5712,32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1">
            <text:p>51,4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68.34">
            <text:p>6768,34</text:p>
          </table:table-cell>
          <table:table-cell table:style-name="ce12N2" office:value-type="float" office:value="473.79">
            <text:p>47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49916658484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5">
            <text:p>310905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5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84">
            <text:p>0,166</text:p>
          </table:table-cell>
          <table:table-cell table:style-name="ce12N2" office:value-type="float" office:value="28.65">
            <text:p>2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06">
            <text:p>3406,00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66">
            <text:p>30,66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35.68">
            <text:p>4035,68</text:p>
          </table:table-cell>
          <table:table-cell table:style-name="ce12N2" office:value-type="float" office:value="282.5">
            <text:p>28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5121233107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6">
            <text:p>310906</text:p>
          </table:table-cell>
          <table:table-cell table:style-name="ce0" table:number-columns-spanned="4" table:number-rows-spanned="1" office:value-type="string" calcext:value-type="string">
            <text:p>20.496 - REMAS METAIS SANITARIOS LTDA</text:p>
          </table:table-cell>
          <table:covered-table-cell table:number-columns-repeated="3"/>
          <table:table-cell table:style-name="ce0" office:value-type="string" calcext:value-type="string">
            <text:p>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76">
            <text:p>0,003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8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391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35481273000180550010000007951001969221</text:p>
          </table:table-cell>
          <table:table-cell table:style-name="ce0" office:value-type="string" calcext:value-type="string">
            <text:p>3526070522209200076357002000483391100732642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7">
            <text:p>310917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462.8">
            <text:p>10146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1462.8">
            <text:p>10146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5.971584">
            <text:p>575,972</text:p>
          </table:table-cell>
          <table:table-cell table:style-name="ce12N2" office:value-type="float" office:value="19844.37">
            <text:p>1984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1.46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028.18">
            <text:p>81028,18</text:p>
          </table:table-cell>
          <table:table-cell table:style-name="ce12N2" office:value-type="float" office:value="81.02">
            <text:p>8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9.25">
            <text:p>729,25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462.8">
            <text:p>101462,80</text:p>
          </table:table-cell>
          <table:table-cell table:style-name="ce12N2" office:value-type="float" office:value="12175.54">
            <text:p>1217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2181727674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9">
            <text:p>31091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834.56">
            <text:p>7083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7.64155">
            <text:p>337,642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83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938.72">
            <text:p>57938,72</text:p>
          </table:table-cell>
          <table:table-cell table:style-name="ce12N2" office:value-type="float" office:value="57.94">
            <text:p>5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1.45">
            <text:p>521,45</text:p>
          </table:table-cell>
          <table:table-cell table:style-name="ce12N2" office:value-type="float" office:value="44.54">
            <text:p>44,5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184.75">
            <text:p>2184,75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4805.49">
            <text:p>480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291226023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1">
            <text:p>310921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8.25">
            <text:p>89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397">
            <text:p>1,234</text:p>
          </table:table-cell>
          <table:table-cell table:style-name="ce12N2" office:value-type="float" office:value="250.5">
            <text:p>25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4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0.93">
            <text:p>6960,93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5">
            <text:p>62,65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0.46">
            <text:p>700,46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577.35">
            <text:p>57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91890656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3">
            <text:p>310923</text:p>
          </table:table-cell>
          <table:table-cell table:style-name="ce0" table:number-columns-spanned="4" table:number-rows-spanned="1" office:value-type="string" calcext:value-type="string">
            <text:p>19.151 - MARLUVAS EQUIPAMENTOS DE SEGURANCA LTDA</text:p>
          </table:table-cell>
          <table:covered-table-cell table:number-columns-repeated="3"/>
          <table:table-cell table:style-name="ce0" office:value-type="string" calcext:value-type="string">
            <text:p>325.3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421768">
            <text:p>24,422</text:p>
          </table:table-cell>
          <table:table-cell table:style-name="ce12N2" office:value-type="float" office:value="532.91">
            <text:p>53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1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02.09">
            <text:p>20102,09</text:p>
          </table:table-cell>
          <table:table-cell table:style-name="ce12N2" office:value-type="float" office:value="20.09">
            <text:p>2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92">
            <text:p>180,92</text:p>
          </table:table-cell>
          <table:table-cell table:style-name="ce12N2" office:value-type="float" office:value="48">
            <text:p>4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18.34">
            <text:p>23818,34</text:p>
          </table:table-cell>
          <table:table-cell table:style-name="ce12N2" office:value-type="float" office:value="1667.3">
            <text:p>166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19653054003604550010003253461764670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4">
            <text:p>310934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8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006">
            <text:p>0,500</text:p>
          </table:table-cell>
          <table:table-cell table:style-name="ce12N2" office:value-type="float" office:value="156.39">
            <text:p>15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75">
            <text:p>15475,00</text:p>
          </table:table-cell>
          <table:table-cell table:style-name="ce12N2" office:value-type="float" office:value="15.48">
            <text:p>1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28">
            <text:p>139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1283.51">
            <text:p>128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8266132827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9">
            <text:p>310939</text:p>
          </table:table-cell>
          <table:table-cell table:style-name="ce0" table:number-columns-spanned="4" table:number-rows-spanned="1" office:value-type="string" calcext:value-type="string">
            <text:p>31.248 - GV DO BRASIL INDUSTRIA E COMERCIO DE ACO LTDA</text:p>
          </table:table-cell>
          <table:covered-table-cell table:number-columns-repeated="3"/>
          <table:table-cell table:style-name="ce0" office:value-type="string" calcext:value-type="string">
            <text:p>154.27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510.4">
            <text:p>18851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510.4">
            <text:p>18851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7">
            <text:p>0,030</text:p>
          </table:table-cell>
          <table:table-cell table:style-name="ce12N2" office:value-type="float" office:value="40275.78">
            <text:p>4027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8.51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098.07">
            <text:p>159098,07</text:p>
          </table:table-cell>
          <table:table-cell table:style-name="ce12N2" office:value-type="float" office:value="159.1">
            <text:p>1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31.88">
            <text:p>1431,88</text:p>
          </table:table-cell>
          <table:table-cell table:style-name="ce12N2" office:value-type="float" office:value="52.5">
            <text:p>5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510.4">
            <text:p>188510,40</text:p>
          </table:table-cell>
          <table:table-cell table:style-name="ce12N2" office:value-type="float" office:value="13195.73">
            <text:p>13195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2884632000144550020001542751837865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0">
            <text:p>31094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5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5625">
            <text:p>27,563</text:p>
          </table:table-cell>
          <table:table-cell table:style-name="ce12N2" office:value-type="float" office:value="17175">
            <text:p>171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559.02">
            <text:p>81559,02</text:p>
          </table:table-cell>
          <table:table-cell table:style-name="ce12N2" office:value-type="float" office:value="81.56">
            <text:p>8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.03">
            <text:p>734,0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27.5">
            <text:p>102127,50</text:p>
          </table:table-cell>
          <table:table-cell table:style-name="ce12N2" office:value-type="float" office:value="12255.3">
            <text:p>122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57311757686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6">
            <text:p>31094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09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9.21">
            <text:p>2181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220">
            <text:p>14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295.95">
            <text:p>18295,95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66">
            <text:p>164,6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40.91">
            <text:p>140,91</text:p>
          </table:table-cell>
          <table:table-cell table:style-name="ce12N2" office:value-type="float" office:value="21678.3">
            <text:p>21678,30</text:p>
          </table:table-cell>
          <table:table-cell table:style-name="ce12N2" office:value-type="float" office:value="1517.48">
            <text:p>151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0941835726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7">
            <text:p>310947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4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4">
            <text:p>1164,000</text:p>
          </table:table-cell>
          <table:table-cell table:style-name="ce12N2" office:value-type="float" office:value="116.4">
            <text:p>1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62.43">
            <text:p>13862,43</text:p>
          </table:table-cell>
          <table:table-cell table:style-name="ce12N2" office:value-type="float" office:value="13.86">
            <text:p>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76">
            <text:p>124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636.48">
            <text:p>63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58780000129550010002124441267617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8">
            <text:p>3109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115">
            <text:p>0,221</text:p>
          </table:table-cell>
          <table:table-cell table:style-name="ce12N2" office:value-type="float" office:value="13.9">
            <text:p>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0.43">
            <text:p>2880,43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2">
            <text:p>25,9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421849075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0">
            <text:p>310950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59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02">
            <text:p>0,062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.95">
            <text:p>386,95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.5">
            <text:p>458,50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416555000173550000000735941004068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88">
            <text:p>310988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3.68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97.73">
            <text:p>97,73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07.23">
            <text:p>3007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728">
            <text:p>3,173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2.3">
            <text:p>2112,30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1">
            <text:p>19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581.9">
            <text:p>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36801905659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89">
            <text:p>310989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3.68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44.4">
            <text:p>21644,40</text:p>
          </table:table-cell>
          <table:table-cell table:style-name="ce12N2" office:value-type="float" office:value="727.02">
            <text:p>727,0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38.94">
            <text:p>2153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588">
            <text:p>26,588</text:p>
          </table:table-cell>
          <table:table-cell table:style-name="ce12N2" office:value-type="float" office:value="34000">
            <text:p>3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4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09.46">
            <text:p>15109,46</text:p>
          </table:table-cell>
          <table:table-cell table:style-name="ce12N2" office:value-type="float" office:value="15.11">
            <text:p>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99">
            <text:p>135,99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11.92">
            <text:p>20811,92</text:p>
          </table:table-cell>
          <table:table-cell table:style-name="ce12N2" office:value-type="float" office:value="4162.38">
            <text:p>4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974.3">
            <text:p>24974,30</text:p>
          </table:table-cell>
          <table:table-cell table:style-name="ce12N2" office:value-type="float" office:value="832.48">
            <text:p>832,4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36811480557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3">
            <text:p>310993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3.524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97.73">
            <text:p>97,73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07.23">
            <text:p>3007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728">
            <text:p>3,173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2.3">
            <text:p>2112,30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1">
            <text:p>19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9.5">
            <text:p>2909,50</text:p>
          </table:table-cell>
          <table:table-cell table:style-name="ce12N2" office:value-type="float" office:value="581.9">
            <text:p>58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35241208642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4">
            <text:p>310994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63.52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44.4">
            <text:p>21644,40</text:p>
          </table:table-cell>
          <table:table-cell table:style-name="ce12N2" office:value-type="float" office:value="727.02">
            <text:p>727,0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38.94">
            <text:p>2153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588">
            <text:p>26,588</text:p>
          </table:table-cell>
          <table:table-cell table:style-name="ce12N2" office:value-type="float" office:value="34000">
            <text:p>3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4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09.46">
            <text:p>15109,46</text:p>
          </table:table-cell>
          <table:table-cell table:style-name="ce12N2" office:value-type="float" office:value="15.11">
            <text:p>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99">
            <text:p>135,99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11.92">
            <text:p>20811,92</text:p>
          </table:table-cell>
          <table:table-cell table:style-name="ce12N2" office:value-type="float" office:value="4162.38">
            <text:p>4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974.3">
            <text:p>24974,30</text:p>
          </table:table-cell>
          <table:table-cell table:style-name="ce12N2" office:value-type="float" office:value="832.48">
            <text:p>832,4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016378950074985500600146352513256543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8">
            <text:p>310998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45.326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35.72">
            <text:p>886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84538.19">
            <text:p>8453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325382">
            <text:p>49,325</text:p>
          </table:table-cell>
          <table:table-cell table:style-name="ce12N2" office:value-type="float" office:value="462.79">
            <text:p>46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55.48">
            <text:p>73455,48</text:p>
          </table:table-cell>
          <table:table-cell table:style-name="ce12N2" office:value-type="float" office:value="73.42">
            <text:p>7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06">
            <text:p>661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097.53">
            <text:p>4097,53</text:p>
          </table:table-cell>
          <table:table-cell table:style-name="ce12N2" office:value-type="float" office:value="83238.63">
            <text:p>83238,63</text:p>
          </table:table-cell>
          <table:table-cell table:style-name="ce12N2" office:value-type="float" office:value="3595.53">
            <text:p>359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453261905487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0">
            <text:p>311010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60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61.52">
            <text:p>1216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05.45">
            <text:p>1200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8796">
            <text:p>4,888</text:p>
          </table:table-cell>
          <table:table-cell table:style-name="ce12N2" office:value-type="float" office:value="7000">
            <text:p>7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61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87.56">
            <text:p>9587,56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29">
            <text:p>86,29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56.07">
            <text:p>156,07</text:p>
          </table:table-cell>
          <table:table-cell table:style-name="ce12N2" office:value-type="float" office:value="12005.45">
            <text:p>12005,45</text:p>
          </table:table-cell>
          <table:table-cell table:style-name="ce12N2" office:value-type="float" office:value="1440.65">
            <text:p>14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03005123000103550010005606531497148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2">
            <text:p>311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">
            <text:p>0,056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98">
            <text:p>2668,98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2">
            <text:p>24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5001147376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3">
            <text:p>3110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4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48">
            <text:p>109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5.46">
            <text:p>895,46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06">
            <text:p>8,0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4.48">
            <text:p>34,48</text:p>
          </table:table-cell>
          <table:table-cell table:style-name="ce12N2" office:value-type="float" office:value="1061">
            <text:p>1061,00</text:p>
          </table:table-cell>
          <table:table-cell table:style-name="ce12N2" office:value-type="float" office:value="74.27">
            <text:p>7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4051052811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5">
            <text:p>31101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38.91">
            <text:p>5713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8208">
            <text:p>0,708</text:p>
          </table:table-cell>
          <table:table-cell table:style-name="ce12N2" office:value-type="float" office:value="545.73">
            <text:p>545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13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705.85">
            <text:p>46705,85</text:p>
          </table:table-cell>
          <table:table-cell table:style-name="ce12N2" office:value-type="float" office:value="46.72">
            <text:p>4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0.34">
            <text:p>420,3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798.56">
            <text:p>1798,56</text:p>
          </table:table-cell>
          <table:table-cell table:style-name="ce12N2" office:value-type="float" office:value="55340.35">
            <text:p>55340,35</text:p>
          </table:table-cell>
          <table:table-cell table:style-name="ce12N2" office:value-type="float" office:value="3873.84">
            <text:p>38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51117935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6">
            <text:p>31101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4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3.48">
            <text:p>523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625">
            <text:p>0,007</text:p>
          </table:table-cell>
          <table:table-cell table:style-name="ce12N2" office:value-type="float" office:value="53.4">
            <text:p>5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7.89">
            <text:p>4277,89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64.73">
            <text:p>164,73</text:p>
          </table:table-cell>
          <table:table-cell table:style-name="ce12N2" office:value-type="float" office:value="5068.75">
            <text:p>5068,75</text:p>
          </table:table-cell>
          <table:table-cell table:style-name="ce12N2" office:value-type="float" office:value="354.82">
            <text:p>35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398369000800550010006049061200942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6">
            <text:p>31102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8.59">
            <text:p>12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0">
            <text:p>1500,000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.96">
            <text:p>1036,96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3">
            <text:p>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9.93">
            <text:p>39,93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86.01">
            <text:p>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9001584299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2">
            <text:p>31103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2">
            <text:p>5,312</text:p>
          </table:table-cell>
          <table:table-cell table:style-name="ce12N2" office:value-type="float" office:value="2298.78">
            <text:p>2298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6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83.6">
            <text:p>49483,60</text:p>
          </table:table-cell>
          <table:table-cell table:style-name="ce12N2" office:value-type="float" office:value="49.48">
            <text:p>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5">
            <text:p>445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4104.21">
            <text:p>410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2981183537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3">
            <text:p>311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7054">
            <text:p>1,971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88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66.45">
            <text:p>12566,45</text:p>
          </table:table-cell>
          <table:table-cell table:style-name="ce12N2" office:value-type="float" office:value="12.57">
            <text:p>1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.1">
            <text:p>113,1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9.6">
            <text:p>14889,60</text:p>
          </table:table-cell>
          <table:table-cell table:style-name="ce12N2" office:value-type="float" office:value="1042.27">
            <text:p>104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101260426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4">
            <text:p>311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94">
            <text:p>0,169</text:p>
          </table:table-cell>
          <table:table-cell table:style-name="ce12N2" office:value-type="float" office:value="1815">
            <text:p>18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91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651.15">
            <text:p>17651,15</text:p>
          </table:table-cell>
          <table:table-cell table:style-name="ce12N2" office:value-type="float" office:value="17.65">
            <text:p>1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86">
            <text:p>158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914.3">
            <text:p>20914,30</text:p>
          </table:table-cell>
          <table:table-cell table:style-name="ce12N2" office:value-type="float" office:value="1464">
            <text:p>14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9182792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5">
            <text:p>311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7">
            <text:p>0,276</text:p>
          </table:table-cell>
          <table:table-cell table:style-name="ce12N2" office:value-type="float" office:value="179.32">
            <text:p>17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51.5">
            <text:p>4551,50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6">
            <text:p>40,9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92">
            <text:p>5392,92</text:p>
          </table:table-cell>
          <table:table-cell table:style-name="ce12N2" office:value-type="float" office:value="377.5">
            <text:p>3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81480480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6">
            <text:p>3110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9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6736">
            <text:p>0,337</text:p>
          </table:table-cell>
          <table:table-cell table:style-name="ce12N2" office:value-type="float" office:value="87.33">
            <text:p>8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66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16.74">
            <text:p>3516,74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65">
            <text:p>31,6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66.88">
            <text:p>4166,88</text:p>
          </table:table-cell>
          <table:table-cell table:style-name="ce12N2" office:value-type="float" office:value="291.68">
            <text:p>29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71684306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7">
            <text:p>3110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7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424574">
            <text:p>58,425</text:p>
          </table:table-cell>
          <table:table-cell table:style-name="ce12N2" office:value-type="float" office:value="10453.36">
            <text:p>1045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0.032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702.3">
            <text:p>185702,30</text:p>
          </table:table-cell>
          <table:table-cell table:style-name="ce12N2" office:value-type="float" office:value="185.7">
            <text:p>1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1.32">
            <text:p>167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032.91">
            <text:p>220032,91</text:p>
          </table:table-cell>
          <table:table-cell table:style-name="ce12N2" office:value-type="float" office:value="15402.31">
            <text:p>1540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7061777472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1">
            <text:p>31104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6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8.87">
            <text:p>304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68">
            <text:p>0,085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2.18">
            <text:p>2492,18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3">
            <text:p>22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5.97">
            <text:p>95,97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206.7">
            <text:p>20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651905436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2">
            <text:p>31104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7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4.43">
            <text:p>61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56">
            <text:p>1,183</text:p>
          </table:table-cell>
          <table:table-cell table:style-name="ce12N2" office:value-type="float" office:value="222">
            <text:p>2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6.44">
            <text:p>4746,44</text:p>
          </table:table-cell>
          <table:table-cell table:style-name="ce12N2" office:value-type="float" office:value="4.75">
            <text:p>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72">
            <text:p>42,72</text:p>
          </table:table-cell>
          <table:table-cell table:style-name="ce12N2" office:value-type="float" office:value="43.71">
            <text:p>43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530.52">
            <text:p>530,52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393.67">
            <text:p>39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7261363308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3">
            <text:p>311043</text:p>
          </table:table-cell>
          <table:table-cell table:style-name="ce0" table:number-columns-spanned="4" table:number-rows-spanned="1" office:value-type="string" calcext:value-type="string">
            <text:p>681 - UNIAO MUNDIAL INDUSTRIA DE FERRAGENS LTDA</text:p>
          </table:table-cell>
          <table:covered-table-cell table:number-columns-repeated="3"/>
          <table:table-cell table:style-name="ce0" office:value-type="string" calcext:value-type="string">
            <text:p>276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8.35">
            <text:p>1139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06714">
            <text:p>5,407</text:p>
          </table:table-cell>
          <table:table-cell table:style-name="ce12N2" office:value-type="float" office:value="33121.72">
            <text:p>3312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9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82.6">
            <text:p>101182,60</text:p>
          </table:table-cell>
          <table:table-cell table:style-name="ce12N2" office:value-type="float" office:value="101.18">
            <text:p>10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64">
            <text:p>910,64</text:p>
          </table:table-cell>
          <table:table-cell table:style-name="ce12N2" office:value-type="float" office:value="62.84">
            <text:p>62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028.28">
            <text:p>1028,28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2223414000176550010002766191319287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71">
            <text:p>171,00</text:p>
          </table:table-cell>
          <table:table-cell table:style-name="ce26N2" office:value-type="float" office:value="6362.25">
            <text:p>6362,25</text:p>
          </table:table-cell>
          <table:table-cell table:style-name="ce26N2" office:value-type="float" office:value="937.38">
            <text:p>937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0758.43">
            <text:p>100758,43</text:p>
          </table:table-cell>
          <table:table-cell table:style-name="ce26N2" office:value-type="float" office:value="6820253.54">
            <text:p>6820253,54</text:p>
          </table:table-cell>
          <table:table-cell table:style-name="ce26N2" office:value-type="float" office:value="440151.02">
            <text:p>440151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264.85">
            <text:p>6264,85</text:p>
          </table:table-cell>
          <table:table-cell table:style-name="ce26N2" office:value-type="float" office:value="7030433.46">
            <text:p>7030433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7763.91">
            <text:p>107763,91</text:p>
          </table:table-cell>
          <table:table-cell table:style-name="ce26N2" office:value-type="float" office:value="11823.74">
            <text:p>11823,74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9888.42987">
            <text:p>39888,430</text:p>
          </table:table-cell>
          <table:table-cell table:style-name="ce26N2" office:value-type="float" office:value="6923276.16">
            <text:p>6923276,16</text:p>
          </table:table-cell>
          <table:table-cell table:style-name="ce26N2" office:value-type="float" office:value="7030433.46">
            <text:p>7030433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17412.33">
            <text:p>5817412,33</text:p>
          </table:table-cell>
          <table:table-cell table:style-name="ce26N2" office:value-type="float" office:value="5817.32">
            <text:p>5817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2356.76">
            <text:p>52356,7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77228.56">
            <text:p>477228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9.37">
            <text:p>69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48" meta:object-count="0"/>
    <meta:generator>LibreOffice/4.3.0.4$Windows_x86 LibreOffice_project/62ad5818884a2fc2e5780dd45466868d41009ec0</meta:generator>
  </office:meta>
</office:document-meta>
</file>