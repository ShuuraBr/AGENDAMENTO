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2/06/2026 04:30:2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3">
            <text:p>3082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27.59">
            <text:p>3402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27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32.97">
            <text:p>28532,97</text:p>
          </table:table-cell>
          <table:table-cell table:style-name="ce12N2" office:value-type="float" office:value="28.53">
            <text:p>2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8">
            <text:p>256,8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19.75">
            <text:p>219,75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2366.55">
            <text:p>236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51767573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5">
            <text:p>30835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28">
            <text:p>0,663</text:p>
          </table:table-cell>
          <table:table-cell table:style-name="ce12N2" office:value-type="float" office:value="851.2">
            <text:p>85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980">
            <text:p>49980,00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82">
            <text:p>449,8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61063272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8">
            <text:p>308428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784">
            <text:p>0,148</text:p>
          </table:table-cell>
          <table:table-cell table:style-name="ce12N2" office:value-type="float" office:value="23.1">
            <text:p>2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61">
            <text:p>4,6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.2">
            <text:p>607,20</text:p>
          </table:table-cell>
          <table:table-cell table:style-name="ce12N2" office:value-type="float" office:value="42.5">
            <text:p>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761917120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29">
            <text:p>308429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5672">
            <text:p>4,957</text:p>
          </table:table-cell>
          <table:table-cell table:style-name="ce12N2" office:value-type="float" office:value="95.55">
            <text:p>9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8.75">
            <text:p>4658,75</text:p>
          </table:table-cell>
          <table:table-cell table:style-name="ce12N2" office:value-type="float" office:value="4.66">
            <text:p>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.93">
            <text:p>41,93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867.6">
            <text:p>24867,60</text:p>
          </table:table-cell>
          <table:table-cell table:style-name="ce12N2" office:value-type="float" office:value="1740.73">
            <text:p>174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93195041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30">
            <text:p>308430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79.55">
            <text:p>8637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3862">
            <text:p>1,239</text:p>
          </table:table-cell>
          <table:table-cell table:style-name="ce12N2" office:value-type="float" office:value="2195.25">
            <text:p>219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.37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1.96">
            <text:p>72901,96</text:p>
          </table:table-cell>
          <table:table-cell table:style-name="ce12N2" office:value-type="float" office:value="72.91">
            <text:p>7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6.11">
            <text:p>656,1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174.85">
            <text:p>2174,85</text:p>
          </table:table-cell>
          <table:table-cell table:style-name="ce12N2" office:value-type="float" office:value="84204.7">
            <text:p>84204,70</text:p>
          </table:table-cell>
          <table:table-cell table:style-name="ce12N2" office:value-type="float" office:value="3871.9">
            <text:p>38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161511323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53">
            <text:p>30845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8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6.38">
            <text:p>176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72861">
            <text:p>2,673</text:p>
          </table:table-cell>
          <table:table-cell table:style-name="ce12N2" office:value-type="float" office:value="16943.9">
            <text:p>169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6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88.55">
            <text:p>14788,55</text:p>
          </table:table-cell>
          <table:table-cell table:style-name="ce12N2" office:value-type="float" office:value="14.79">
            <text:p>1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.09">
            <text:p>133,09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13.89">
            <text:p>113,89</text:p>
          </table:table-cell>
          <table:table-cell table:style-name="ce12N2" office:value-type="float" office:value="17522.49">
            <text:p>17522,49</text:p>
          </table:table-cell>
          <table:table-cell table:style-name="ce12N2" office:value-type="float" office:value="1226.57">
            <text:p>12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8321826114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489">
            <text:p>30848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9.07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2.43">
            <text:p>449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8314">
            <text:p>0,518</text:p>
          </table:table-cell>
          <table:table-cell table:style-name="ce12N2" office:value-type="float" office:value="2256.02">
            <text:p>2256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92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7.02">
            <text:p>3767,02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99.55">
            <text:p>99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29.01">
            <text:p>29,01</text:p>
          </table:table-cell>
          <table:table-cell table:style-name="ce12N2" office:value-type="float" office:value="4463.42">
            <text:p>4463,42</text:p>
          </table:table-cell>
          <table:table-cell table:style-name="ce12N2" office:value-type="float" office:value="312.44">
            <text:p>31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90761582524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8">
            <text:p>30854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1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992.53">
            <text:p>2559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72308">
            <text:p>4,172</text:p>
          </table:table-cell>
          <table:table-cell table:style-name="ce12N2" office:value-type="float" office:value="2315.2">
            <text:p>23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99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317.73">
            <text:p>215317,73</text:p>
          </table:table-cell>
          <table:table-cell table:style-name="ce12N2" office:value-type="float" office:value="215.35">
            <text:p>21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83">
            <text:p>1937,8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298.56">
            <text:p>1298,56</text:p>
          </table:table-cell>
          <table:table-cell table:style-name="ce12N2" office:value-type="float" office:value="254693.97">
            <text:p>254693,97</text:p>
          </table:table-cell>
          <table:table-cell table:style-name="ce12N2" office:value-type="float" office:value="17429.28">
            <text:p>1742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156518349463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7">
            <text:p>308557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7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5.04">
            <text:p>446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94">
            <text:p>0,011</text:p>
          </table:table-cell>
          <table:table-cell table:style-name="ce12N2" office:value-type="float" office:value="77.4">
            <text:p>7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51">
            <text:p>4006,5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42.82">
            <text:p>142,82</text:p>
          </table:table-cell>
          <table:table-cell table:style-name="ce12N2" office:value-type="float" office:value="4322.22">
            <text:p>4322,22</text:p>
          </table:table-cell>
          <table:table-cell table:style-name="ce12N2" office:value-type="float" office:value="172.89">
            <text:p>17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75812684156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11">
            <text:p>308711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8.6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3303">
            <text:p>3,003</text:p>
          </table:table-cell>
          <table:table-cell table:style-name="ce12N2" office:value-type="float" office:value="379.94">
            <text:p>37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75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080.57">
            <text:p>36080,57</text:p>
          </table:table-cell>
          <table:table-cell table:style-name="ce12N2" office:value-type="float" office:value="36.08">
            <text:p>3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73">
            <text:p>324,7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750.75">
            <text:p>42750,75</text:p>
          </table:table-cell>
          <table:table-cell table:style-name="ce12N2" office:value-type="float" office:value="2992.55">
            <text:p>299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86651322422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9">
            <text:p>308729</text:p>
          </table:table-cell>
          <table:table-cell table:style-name="ce0" table:number-columns-spanned="4" table:number-rows-spanned="1" office:value-type="string" calcext:value-type="string">
            <text:p>7.682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183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19.91">
            <text:p>13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625">
            <text:p>0,113</text:p>
          </table:table-cell>
          <table:table-cell table:style-name="ce12N2" office:value-type="float" office:value="82.4">
            <text:p>8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19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648.51">
            <text:p>648,51</text:p>
          </table:table-cell>
          <table:table-cell table:style-name="ce12N2" office:value-type="float" office:value="12471.4">
            <text:p>12471,40</text:p>
          </table:table-cell>
          <table:table-cell table:style-name="ce12N2" office:value-type="float" office:value="498.86">
            <text:p>49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645865920001000550010001836961537768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56">
            <text:p>30875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6364">
            <text:p>1,764</text:p>
          </table:table-cell>
          <table:table-cell table:style-name="ce12N2" office:value-type="float" office:value="4474.4">
            <text:p>447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98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408.63">
            <text:p>165408,63</text:p>
          </table:table-cell>
          <table:table-cell table:style-name="ce12N2" office:value-type="float" office:value="165.41">
            <text:p>165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68">
            <text:p>1488,68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987.6">
            <text:p>195987,60</text:p>
          </table:table-cell>
          <table:table-cell table:style-name="ce12N2" office:value-type="float" office:value="13719.13">
            <text:p>13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401551016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9">
            <text:p>308889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9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378">
            <text:p>3,384</text:p>
          </table:table-cell>
          <table:table-cell table:style-name="ce12N2" office:value-type="float" office:value="2932">
            <text:p>293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391.96">
            <text:p>17391,96</text:p>
          </table:table-cell>
          <table:table-cell table:style-name="ce12N2" office:value-type="float" office:value="17.39">
            <text:p>1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53">
            <text:p>156,53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7.2">
            <text:p>20607,20</text:p>
          </table:table-cell>
          <table:table-cell table:style-name="ce12N2" office:value-type="float" office:value="1442.5">
            <text:p>144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199231897214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8">
            <text:p>308958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67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.39">
            <text:p>140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.7">
            <text:p>1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4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2.93">
            <text:p>1112,93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1318.68">
            <text:p>1318,68</text:p>
          </table:table-cell>
          <table:table-cell table:style-name="ce12N2" office:value-type="float" office:value="92.31">
            <text:p>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834883000113550010006670801659673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3">
            <text:p>30903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49748">
            <text:p>1,750</text:p>
          </table:table-cell>
          <table:table-cell table:style-name="ce12N2" office:value-type="float" office:value="508.99">
            <text:p>508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7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27.46">
            <text:p>7827,46</text:p>
          </table:table-cell>
          <table:table-cell table:style-name="ce12N2" office:value-type="float" office:value="7.83">
            <text:p>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4.52">
            <text:p>9274,52</text:p>
          </table:table-cell>
          <table:table-cell table:style-name="ce12N2" office:value-type="float" office:value="649.22">
            <text:p>64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11042095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4">
            <text:p>30903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49">
            <text:p>0,013</text:p>
          </table:table-cell>
          <table:table-cell table:style-name="ce12N2" office:value-type="float" office:value="352.5">
            <text:p>35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10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228.63">
            <text:p>26228,63</text:p>
          </table:table-cell>
          <table:table-cell table:style-name="ce12N2" office:value-type="float" office:value="26.23">
            <text:p>26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6.06">
            <text:p>236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06.32">
            <text:p>30106,32</text:p>
          </table:table-cell>
          <table:table-cell table:style-name="ce12N2" office:value-type="float" office:value="1204.25">
            <text:p>120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21093348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5">
            <text:p>3090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7.7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152">
            <text:p>1,522</text:p>
          </table:table-cell>
          <table:table-cell table:style-name="ce12N2" office:value-type="float" office:value="442.6">
            <text:p>44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06.49">
            <text:p>6806,49</text:p>
          </table:table-cell>
          <table:table-cell table:style-name="ce12N2" office:value-type="float" office:value="6.81">
            <text:p>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26">
            <text:p>61,2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64.8">
            <text:p>8064,80</text:p>
          </table:table-cell>
          <table:table-cell table:style-name="ce12N2" office:value-type="float" office:value="564.54">
            <text:p>56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770314507262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93">
            <text:p>309093</text:p>
          </table:table-cell>
          <table:table-cell table:style-name="ce0" table:number-columns-spanned="4" table:number-rows-spanned="1" office:value-type="string" calcext:value-type="string">
            <text:p>13.198 - SDSTK INDUSTRIA E COMERCIO LTDA</text:p>
          </table:table-cell>
          <table:covered-table-cell table:number-columns-repeated="3"/>
          <table:table-cell table:style-name="ce0" office:value-type="string" calcext:value-type="string">
            <text:p>1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52.8">
            <text:p>5252,80</text:p>
          </table:table-cell>
          <table:table-cell table:style-name="ce12N2" office:value-type="float" office:value="168.58">
            <text:p>168,58</text:p>
          </table:table-cell>
          <table:table-cell table:style-name="ce12N3" office:value-type="float" office:value="0.14673">
            <text:p>0,147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14.56">
            <text:p>5014,56</text:p>
          </table:table-cell>
          <table:table-cell table:style-name="ce12N2" office:value-type="float" office:value="5.01">
            <text:p>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14">
            <text:p>45,1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21.38">
            <text:p>5421,38</text:p>
          </table:table-cell>
          <table:table-cell table:style-name="ce12N2" office:value-type="float" office:value="216.85">
            <text:p>2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86786380001035500100001314819236660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2">
            <text:p>309102</text:p>
          </table:table-cell>
          <table:table-cell table:style-name="ce0" table:number-columns-spanned="4" table:number-rows-spanned="1" office:value-type="string" calcext:value-type="string">
            <text:p>780 - INDUSTRIA E COMERCIO RIOMAR CORDAS LTDA</text:p>
          </table:table-cell>
          <table:covered-table-cell table:number-columns-repeated="3"/>
          <table:table-cell table:style-name="ce0" office:value-type="string" calcext:value-type="string">
            <text:p>171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6856">
            <text:p>0,807</text:p>
          </table:table-cell>
          <table:table-cell table:style-name="ce12N2" office:value-type="float" office:value="1731.53">
            <text:p>173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1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59.72">
            <text:p>6659,72</text:p>
          </table:table-cell>
          <table:table-cell table:style-name="ce12N2" office:value-type="float" office:value="6.66">
            <text:p>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94">
            <text:p>59,9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17">
            <text:p>7917,00</text:p>
          </table:table-cell>
          <table:table-cell table:style-name="ce12N2" office:value-type="float" office:value="554.2">
            <text:p>5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298926000103550010001713531525277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1">
            <text:p>309131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7.6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8.9502">
            <text:p>208,950</text:p>
          </table:table-cell>
          <table:table-cell table:style-name="ce12N2" office:value-type="float" office:value="2286.3">
            <text:p>228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0.17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7.87">
            <text:p>109867,87</text:p>
          </table:table-cell>
          <table:table-cell table:style-name="ce12N2" office:value-type="float" office:value="109.87">
            <text:p>10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81">
            <text:p>988,8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179.06">
            <text:p>130179,06</text:p>
          </table:table-cell>
          <table:table-cell table:style-name="ce12N2" office:value-type="float" office:value="9112.53">
            <text:p>91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7699169305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4">
            <text:p>30913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1.3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3.77">
            <text:p>103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496">
            <text:p>0,068</text:p>
          </table:table-cell>
          <table:table-cell table:style-name="ce12N2" office:value-type="float" office:value="8.98">
            <text:p>8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3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.01">
            <text:p>845,01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61">
            <text:p>7,61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2.54">
            <text:p>32,54</text:p>
          </table:table-cell>
          <table:table-cell table:style-name="ce12N2" office:value-type="float" office:value="1001.23">
            <text:p>1001,23</text:p>
          </table:table-cell>
          <table:table-cell table:style-name="ce12N2" office:value-type="float" office:value="70.08">
            <text:p>7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131615703835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5">
            <text:p>30913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9503.43">
            <text:p>12950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77488">
            <text:p>11,677</text:p>
          </table:table-cell>
          <table:table-cell table:style-name="ce12N2" office:value-type="float" office:value="3587.9">
            <text:p>358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9.50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862.14">
            <text:p>109862,14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8.76">
            <text:p>988,7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3.33">
            <text:p>23,33</text:p>
          </table:table-cell>
          <table:table-cell table:style-name="ce12N2" office:value-type="float" office:value="129480.1">
            <text:p>129480,10</text:p>
          </table:table-cell>
          <table:table-cell table:style-name="ce12N2" office:value-type="float" office:value="8419.91">
            <text:p>84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21810491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6">
            <text:p>3091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5108">
            <text:p>1,051</text:p>
          </table:table-cell>
          <table:table-cell table:style-name="ce12N2" office:value-type="float" office:value="228">
            <text:p>2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47.85">
            <text:p>21047,85</text:p>
          </table:table-cell>
          <table:table-cell table:style-name="ce12N2" office:value-type="float" office:value="21.05">
            <text:p>2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43">
            <text:p>18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59.6">
            <text:p>24159,60</text:p>
          </table:table-cell>
          <table:table-cell table:style-name="ce12N2" office:value-type="float" office:value="966.38">
            <text:p>96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31882076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7">
            <text:p>30913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8.81">
            <text:p>49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904">
            <text:p>0,003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.73">
            <text:p>407,73</text:p>
          </table:table-cell>
          <table:table-cell table:style-name="ce12N2" office:value-type="float" office:value="0.41">
            <text:p>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15.7">
            <text:p>15,70</text:p>
          </table:table-cell>
          <table:table-cell table:style-name="ce12N2" office:value-type="float" office:value="483.11">
            <text:p>483,11</text:p>
          </table:table-cell>
          <table:table-cell table:style-name="ce12N2" office:value-type="float" office:value="33.82">
            <text:p>3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9194172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9">
            <text:p>309139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2.53">
            <text:p>71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48">
            <text:p>0,018</text:p>
          </table:table-cell>
          <table:table-cell table:style-name="ce12N2" office:value-type="float" office:value="6.91">
            <text:p>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1.64">
            <text:p>571,64</text:p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5.22">
            <text:p>35,22</text:p>
          </table:table-cell>
          <table:table-cell table:style-name="ce12N2" office:value-type="float" office:value="677.31">
            <text:p>677,31</text:p>
          </table:table-cell>
          <table:table-cell table:style-name="ce12N2" office:value-type="float" office:value="47.41">
            <text:p>4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281901301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0">
            <text:p>30914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">
            <text:p>0,126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98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961.99">
            <text:p>37961,99</text:p>
          </table:table-cell>
          <table:table-cell table:style-name="ce12N2" office:value-type="float" office:value="37.96">
            <text:p>3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1.66">
            <text:p>341,6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80">
            <text:p>44980,00</text:p>
          </table:table-cell>
          <table:table-cell table:style-name="ce12N2" office:value-type="float" office:value="3148.6">
            <text:p>314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11345831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7">
            <text:p>3091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">
            <text:p>0,087</text:p>
          </table:table-cell>
          <table:table-cell table:style-name="ce12N2" office:value-type="float" office:value="94.5">
            <text:p>9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4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14.09">
            <text:p>13014,09</text:p>
          </table:table-cell>
          <table:table-cell table:style-name="ce12N2" office:value-type="float" office:value="13.01">
            <text:p>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.13">
            <text:p>117,1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0">
            <text:p>15420,00</text:p>
          </table:table-cell>
          <table:table-cell table:style-name="ce12N2" office:value-type="float" office:value="1079.4">
            <text:p>107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319222284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8">
            <text:p>3091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6">
            <text:p>0,001</text:p>
          </table:table-cell>
          <table:table-cell table:style-name="ce12N2" office:value-type="float" office:value="33.9">
            <text:p>3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72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603.1">
            <text:p>16603,10</text:p>
          </table:table-cell>
          <table:table-cell table:style-name="ce12N2" office:value-type="float" office:value="16.6">
            <text:p>1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.43">
            <text:p>149,4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2.5">
            <text:p>19672,50</text:p>
          </table:table-cell>
          <table:table-cell table:style-name="ce12N2" office:value-type="float" office:value="1377.08">
            <text:p>137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41896471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49">
            <text:p>3091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88">
            <text:p>0,021</text:p>
          </table:table-cell>
          <table:table-cell table:style-name="ce12N2" office:value-type="float" office:value="22.68">
            <text:p>22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3.38">
            <text:p>3123,38</text:p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1">
            <text:p>28,11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0.8">
            <text:p>3700,80</text:p>
          </table:table-cell>
          <table:table-cell table:style-name="ce12N2" office:value-type="float" office:value="259.06">
            <text:p>25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51442441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8">
            <text:p>309198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21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85.19">
            <text:p>9818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665668">
            <text:p>49,666</text:p>
          </table:table-cell>
          <table:table-cell table:style-name="ce12N2" office:value-type="float" office:value="5370">
            <text:p>53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18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719.97">
            <text:p>82719,97</text:p>
          </table:table-cell>
          <table:table-cell table:style-name="ce12N2" office:value-type="float" office:value="82.72">
            <text:p>8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48">
            <text:p>744,48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16.29">
            <text:p>416,29</text:p>
          </table:table-cell>
          <table:table-cell table:style-name="ce12N2" office:value-type="float" office:value="97768.9">
            <text:p>97768,90</text:p>
          </table:table-cell>
          <table:table-cell table:style-name="ce12N2" office:value-type="float" office:value="6843.83">
            <text:p>68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0642774001209550010002212211275673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99">
            <text:p>30919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8.9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9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92.4">
            <text:p>7592,40</text:p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33">
            <text:p>68,3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96">
            <text:p>8996,00</text:p>
          </table:table-cell>
          <table:table-cell table:style-name="ce12N2" office:value-type="float" office:value="629.72">
            <text:p>62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589201965533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0">
            <text:p>30920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3.4">
            <text:p>327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982.59">
            <text:p>2982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356">
            <text:p>0,054</text:p>
          </table:table-cell>
          <table:table-cell table:style-name="ce12N2" office:value-type="float" office:value="45.16">
            <text:p>4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98.42">
            <text:p>2598,42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38">
            <text:p>23,38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90.81">
            <text:p>290,81</text:p>
          </table:table-cell>
          <table:table-cell table:style-name="ce12N2" office:value-type="float" office:value="2982.59">
            <text:p>2982,59</text:p>
          </table:table-cell>
          <table:table-cell table:style-name="ce12N2" office:value-type="float" office:value="119.31">
            <text:p>11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301883343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1">
            <text:p>309201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7.7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6134">
            <text:p>14,613</text:p>
          </table:table-cell>
          <table:table-cell table:style-name="ce12N2" office:value-type="float" office:value="2584.83">
            <text:p>2584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8.67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601.94">
            <text:p>108601,94</text:p>
          </table:table-cell>
          <table:table-cell table:style-name="ce12N2" office:value-type="float" office:value="108.6">
            <text:p>10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42">
            <text:p>977,4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679.1">
            <text:p>128679,10</text:p>
          </table:table-cell>
          <table:table-cell table:style-name="ce12N2" office:value-type="float" office:value="9007.54">
            <text:p>900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77991450881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5">
            <text:p>3092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6.8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265.37">
            <text:p>66326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">
            <text:p>92,00</text:p>
          </table:table-cell>
          <table:table-cell table:style-name="ce12N2" office:value-type="float" office:value="657872.35">
            <text:p>657872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833163">
            <text:p>15,833</text:p>
          </table:table-cell>
          <table:table-cell table:style-name="ce12N2" office:value-type="float" office:value="3254.08">
            <text:p>325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3.265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9772.64">
            <text:p>559772,64</text:p>
          </table:table-cell>
          <table:table-cell table:style-name="ce12N2" office:value-type="float" office:value="559.79">
            <text:p>55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37.93">
            <text:p>5037,9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93.02">
            <text:p>5393,02</text:p>
          </table:table-cell>
          <table:table-cell table:style-name="ce12N2" office:value-type="float" office:value="647536.65">
            <text:p>647536,65</text:p>
          </table:table-cell>
          <table:table-cell table:style-name="ce12N2" office:value-type="float" office:value="41043">
            <text:p>4104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683617401778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06">
            <text:p>30920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4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7.29">
            <text:p>2667,29</text:p>
          </table:table-cell>
          <table:table-cell table:style-name="ce12N2" office:value-type="float" office:value="127.91">
            <text:p>127,9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58.24">
            <text:p>255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504">
            <text:p>0,915</text:p>
          </table:table-cell>
          <table:table-cell table:style-name="ce12N2" office:value-type="float" office:value="7.84">
            <text:p>7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7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17.3">
            <text:p>2117,30</text:p>
          </table:table-cell>
          <table:table-cell table:style-name="ce12N2" office:value-type="float" office:value="2.12">
            <text:p>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6">
            <text:p>19,06</text:p>
          </table:table-cell>
          <table:table-cell table:style-name="ce12N2" office:value-type="float" office:value="67.51">
            <text:p>67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36.96">
            <text:p>236,96</text:p>
          </table:table-cell>
          <table:table-cell table:style-name="ce12N2" office:value-type="float" office:value="2430.33">
            <text:p>2430,33</text:p>
          </table:table-cell>
          <table:table-cell table:style-name="ce12N2" office:value-type="float" office:value="97.21">
            <text:p>9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41313314001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1">
            <text:p>309211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">
            <text:p>0,000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19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519.99">
            <text:p>35519,99</text:p>
          </table:table-cell>
          <table:table-cell table:style-name="ce12N2" office:value-type="float" office:value="35.52">
            <text:p>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9.68">
            <text:p>319,68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193.54">
            <text:p>38193,54</text:p>
          </table:table-cell>
          <table:table-cell table:style-name="ce12N2" office:value-type="float" office:value="2673.55">
            <text:p>267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913116267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3">
            <text:p>30921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7.9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4856">
            <text:p>5,849</text:p>
          </table:table-cell>
          <table:table-cell table:style-name="ce12N2" office:value-type="float" office:value="288">
            <text:p>28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3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754.24">
            <text:p>24754,24</text:p>
          </table:table-cell>
          <table:table-cell table:style-name="ce12N2" office:value-type="float" office:value="24.75">
            <text:p>2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.79">
            <text:p>222,7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330.54">
            <text:p>29330,54</text:p>
          </table:table-cell>
          <table:table-cell table:style-name="ce12N2" office:value-type="float" office:value="2053.14">
            <text:p>205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01554846000136550010006879671996625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6">
            <text:p>309216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21.019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0.78">
            <text:p>164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59.68">
            <text:p>155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6">
            <text:p>0,006</text:p>
          </table:table-cell>
          <table:table-cell table:style-name="ce12N2" office:value-type="float" office:value="10.26">
            <text:p>1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40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8.79">
            <text:p>1358,79</text:p>
          </table:table-cell>
          <table:table-cell table:style-name="ce12N2" office:value-type="float" office:value="1.36">
            <text:p>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3">
            <text:p>12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81.1">
            <text:p>81,10</text:p>
          </table:table-cell>
          <table:table-cell table:style-name="ce12N2" office:value-type="float" office:value="1559.68">
            <text:p>1559,68</text:p>
          </table:table-cell>
          <table:table-cell table:style-name="ce12N2" office:value-type="float" office:value="62.39">
            <text:p>6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210191431119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18">
            <text:p>30921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3.96">
            <text:p>2193,96</text:p>
          </table:table-cell>
          <table:table-cell table:style-name="ce12N2" office:value-type="float" office:value="108.46">
            <text:p>108,46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69.2">
            <text:p>216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08">
            <text:p>0,109</text:p>
          </table:table-cell>
          <table:table-cell table:style-name="ce12N2" office:value-type="float" office:value="39.2">
            <text:p>3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5.31">
            <text:p>1795,31</text:p>
          </table:table-cell>
          <table:table-cell table:style-name="ce12N2" office:value-type="float" office:value="1.8">
            <text:p>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6">
            <text:p>16,16</text:p>
          </table:table-cell>
          <table:table-cell table:style-name="ce12N2" office:value-type="float" office:value="61.72">
            <text:p>61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3.22">
            <text:p>133,22</text:p>
          </table:table-cell>
          <table:table-cell table:style-name="ce12N2" office:value-type="float" office:value="2060.74">
            <text:p>2060,74</text:p>
          </table:table-cell>
          <table:table-cell table:style-name="ce12N2" office:value-type="float" office:value="82.43">
            <text:p>8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7721335751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22">
            <text:p>30922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6.9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303.56">
            <text:p>94303,56</text:p>
          </table:table-cell>
          <table:table-cell table:style-name="ce12N2" office:value-type="float" office:value="5352.99">
            <text:p>5352,99</text:p>
          </table:table-cell>
          <table:table-cell table:style-name="ce12N2" office:value-type="float" office:value="52">
            <text:p>52,00</text:p>
          </table:table-cell>
          <table:table-cell table:style-name="ce12N2" office:value-type="float" office:value="88332.75">
            <text:p>88332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447424">
            <text:p>10,447</text:p>
          </table:table-cell>
          <table:table-cell table:style-name="ce12N2" office:value-type="float" office:value="3158.95">
            <text:p>315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.30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92.08">
            <text:p>72292,08</text:p>
          </table:table-cell>
          <table:table-cell table:style-name="ce12N2" office:value-type="float" office:value="72.32">
            <text:p>7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0.61">
            <text:p>650,61</text:p>
          </table:table-cell>
          <table:table-cell table:style-name="ce12N2" office:value-type="float" office:value="80.86">
            <text:p>80,8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7734.92">
            <text:p>7734,92</text:p>
          </table:table-cell>
          <table:table-cell table:style-name="ce12N2" office:value-type="float" office:value="82979.76">
            <text:p>82979,76</text:p>
          </table:table-cell>
          <table:table-cell table:style-name="ce12N2" office:value-type="float" office:value="3319.15">
            <text:p>3319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9841.53">
            <text:p>19841,53</text:p>
          </table:table-cell>
          <table:table-cell table:style-name="ce12N2" office:value-type="float" office:value="3588.88">
            <text:p>3588,8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695417344050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3">
            <text:p>309233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21.591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5.59">
            <text:p>98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6.87">
            <text:p>936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72">
            <text:p>0,063</text:p>
          </table:table-cell>
          <table:table-cell table:style-name="ce12N2" office:value-type="float" office:value="39.9">
            <text:p>39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5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6.21">
            <text:p>816,21</text:p>
          </table:table-cell>
          <table:table-cell table:style-name="ce12N2" office:value-type="float" office:value="0.82">
            <text:p>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35">
            <text:p>7,3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8.72">
            <text:p>48,72</text:p>
          </table:table-cell>
          <table:table-cell table:style-name="ce12N2" office:value-type="float" office:value="936.87">
            <text:p>936,87</text:p>
          </table:table-cell>
          <table:table-cell table:style-name="ce12N2" office:value-type="float" office:value="37.47">
            <text:p>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3296273003298550230024215911469016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34">
            <text:p>309234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56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2.04">
            <text:p>127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02">
            <text:p>0,007</text:p>
          </table:table-cell>
          <table:table-cell table:style-name="ce12N2" office:value-type="float" office:value="3.77">
            <text:p>3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7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9.77">
            <text:p>1039,77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6">
            <text:p>9,36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40.04">
            <text:p>40,04</text:p>
          </table:table-cell>
          <table:table-cell table:style-name="ce12N2" office:value-type="float" office:value="1232">
            <text:p>1232,00</text:p>
          </table:table-cell>
          <table:table-cell table:style-name="ce12N2" office:value-type="float" office:value="86.24">
            <text:p>8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5681518696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4">
            <text:p>30924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21.5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7.6">
            <text:p>1007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51546">
            <text:p>2,852</text:p>
          </table:table-cell>
          <table:table-cell table:style-name="ce12N2" office:value-type="float" office:value="9846.72">
            <text:p>984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50.32">
            <text:p>8450,32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05">
            <text:p>76,05</text:p>
          </table:table-cell>
          <table:table-cell table:style-name="ce12N2" office:value-type="float" office:value="97.88">
            <text:p>97,8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65.08">
            <text:p>65,08</text:p>
          </table:table-cell>
          <table:table-cell table:style-name="ce12N2" office:value-type="float" office:value="10012.52">
            <text:p>10012,52</text:p>
          </table:table-cell>
          <table:table-cell table:style-name="ce12N2" office:value-type="float" office:value="700.88">
            <text:p>70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4423880000145550030012215981821558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48">
            <text:p>309248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6.8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17.81">
            <text:p>827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1.06342">
            <text:p>151,063</text:p>
          </table:table-cell>
          <table:table-cell table:style-name="ce12N2" office:value-type="float" office:value="6308.05">
            <text:p>630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1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514.9">
            <text:p>69514,90</text:p>
          </table:table-cell>
          <table:table-cell table:style-name="ce12N2" office:value-type="float" office:value="69.51">
            <text:p>6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62">
            <text:p>625,62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351.76">
            <text:p>351,76</text:p>
          </table:table-cell>
          <table:table-cell table:style-name="ce12N2" office:value-type="float" office:value="82366.05">
            <text:p>82366,05</text:p>
          </table:table-cell>
          <table:table-cell table:style-name="ce12N2" office:value-type="float" office:value="5765.62">
            <text:p>576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21260419000152550010001468611255383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3">
            <text:p>3092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6.9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">
            <text:p>0,038</text:p>
          </table:table-cell>
          <table:table-cell table:style-name="ce12N2" office:value-type="float" office:value="38.5">
            <text:p>3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2.5">
            <text:p>15802,50</text:p>
          </table:table-cell>
          <table:table-cell table:style-name="ce12N2" office:value-type="float" office:value="15.8">
            <text:p>1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22">
            <text:p>142,2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24">
            <text:p>18724,00</text:p>
          </table:table-cell>
          <table:table-cell table:style-name="ce12N2" office:value-type="float" office:value="1310.68">
            <text:p>13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691418704086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5">
            <text:p>30925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69.81">
            <text:p>386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6">
            <text:p>0,040</text:p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6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63.22">
            <text:p>3163,2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7">
            <text:p>28,4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1.81">
            <text:p>121,81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262.36">
            <text:p>26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251070833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6">
            <text:p>30925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0.44">
            <text:p>99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37.2">
            <text:p>93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29">
            <text:p>0,034</text:p>
          </table:table-cell>
          <table:table-cell table:style-name="ce12N2" office:value-type="float" office:value="10.86">
            <text:p>1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0.97">
            <text:p>790,97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.24">
            <text:p>53,24</text:p>
          </table:table-cell>
          <table:table-cell table:style-name="ce12N2" office:value-type="float" office:value="937.2">
            <text:p>937,20</text:p>
          </table:table-cell>
          <table:table-cell table:style-name="ce12N2" office:value-type="float" office:value="65.6">
            <text:p>6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018878901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7">
            <text:p>30925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45">
            <text:p>39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0.1">
            <text:p>38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65">
            <text:p>0,065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.15">
            <text:p>331,15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2.35">
            <text:p>12,35</text:p>
          </table:table-cell>
          <table:table-cell table:style-name="ce12N2" office:value-type="float" office:value="380.1">
            <text:p>380,10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419990376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58">
            <text:p>3092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6.91">
            <text:p>168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18">
            <text:p>16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99">
            <text:p>0,040</text:p>
          </table:table-cell>
          <table:table-cell table:style-name="ce12N2" office:value-type="float" office:value="2.74">
            <text:p>2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02.77">
            <text:p>1402,77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63">
            <text:p>12,63</text:p>
          </table:table-cell>
          <table:table-cell table:style-name="ce12N2" office:value-type="float" office:value="27.71">
            <text:p>27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68.91">
            <text:p>68,91</text:p>
          </table:table-cell>
          <table:table-cell table:style-name="ce12N2" office:value-type="float" office:value="1618">
            <text:p>1618,00</text:p>
          </table:table-cell>
          <table:table-cell table:style-name="ce12N2" office:value-type="float" office:value="72.25">
            <text:p>7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391538489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1">
            <text:p>30926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4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85.79">
            <text:p>1138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239.68">
            <text:p>1123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4124">
            <text:p>0,914</text:p>
          </table:table-cell>
          <table:table-cell table:style-name="ce12N2" office:value-type="float" office:value="673.8">
            <text:p>673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8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86.01">
            <text:p>9486,01</text:p>
          </table:table-cell>
          <table:table-cell table:style-name="ce12N2" office:value-type="float" office:value="9.48">
            <text:p>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37">
            <text:p>85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46.11">
            <text:p>146,11</text:p>
          </table:table-cell>
          <table:table-cell table:style-name="ce12N2" office:value-type="float" office:value="11239.68">
            <text:p>11239,68</text:p>
          </table:table-cell>
          <table:table-cell table:style-name="ce12N2" office:value-type="float" office:value="786.78">
            <text:p>78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6818670001305500100095490716417849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4">
            <text:p>3092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694.92">
            <text:p>1836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">
            <text:p>119,00</text:p>
          </table:table-cell>
          <table:table-cell table:style-name="ce12N2" office:value-type="float" office:value="171758.07">
            <text:p>171758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6.226182">
            <text:p>236,226</text:p>
          </table:table-cell>
          <table:table-cell table:style-name="ce12N2" office:value-type="float" office:value="1004.2">
            <text:p>100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3.6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5514.08">
            <text:p>145514,08</text:p>
          </table:table-cell>
          <table:table-cell table:style-name="ce12N2" office:value-type="float" office:value="145.51">
            <text:p>14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9.64">
            <text:p>1309,64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1936.85">
            <text:p>11936,85</text:p>
          </table:table-cell>
          <table:table-cell table:style-name="ce12N2" office:value-type="float" office:value="171758.07">
            <text:p>171758,07</text:p>
          </table:table-cell>
          <table:table-cell table:style-name="ce12N2" office:value-type="float" office:value="11411.95">
            <text:p>1141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081550885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65">
            <text:p>3092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5.7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5.14">
            <text:p>58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6.72">
            <text:p>566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62">
            <text:p>0,000</text:p>
          </table:table-cell>
          <table:table-cell table:style-name="ce12N2" office:value-type="float" office:value="77">
            <text:p>7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5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.29">
            <text:p>478,29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8.42">
            <text:p>18,42</text:p>
          </table:table-cell>
          <table:table-cell table:style-name="ce12N2" office:value-type="float" office:value="566.72">
            <text:p>566,72</text:p>
          </table:table-cell>
          <table:table-cell table:style-name="ce12N2" office:value-type="float" office:value="39.67">
            <text:p>3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57901655193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2">
            <text:p>309282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96">
            <text:p>0,553</text:p>
          </table:table-cell>
          <table:table-cell table:style-name="ce12N2" office:value-type="float" office:value="127.06">
            <text:p>12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6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66">
            <text:p>8766,00</text:p>
          </table:table-cell>
          <table:table-cell table:style-name="ce12N2" office:value-type="float" office:value="291.9">
            <text:p>29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0703302000197550010000076251584111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3">
            <text:p>309283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34.6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55.51">
            <text:p>10725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101841.47">
            <text:p>10184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4657">
            <text:p>2,005</text:p>
          </table:table-cell>
          <table:table-cell table:style-name="ce12N2" office:value-type="float" office:value="588.37">
            <text:p>588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255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724.29">
            <text:p>88724,29</text:p>
          </table:table-cell>
          <table:table-cell table:style-name="ce12N2" office:value-type="float" office:value="88.7">
            <text:p>8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.53">
            <text:p>798,5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414.04">
            <text:p>5414,04</text:p>
          </table:table-cell>
          <table:table-cell table:style-name="ce12N2" office:value-type="float" office:value="101841.47">
            <text:p>101841,47</text:p>
          </table:table-cell>
          <table:table-cell table:style-name="ce12N2" office:value-type="float" office:value="4073.67">
            <text:p>407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0049792000181550010013346311547439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5">
            <text:p>309285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3.33">
            <text:p>673,33</text:p>
          </table:table-cell>
          <table:table-cell table:style-name="ce12N2" office:value-type="float" office:value="32.29">
            <text:p>32,2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45.8">
            <text:p>64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04094">
            <text:p>8,041</text:p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.49">
            <text:p>534,49</text:p>
          </table:table-cell>
          <table:table-cell table:style-name="ce12N2" office:value-type="float" office:value="0.53">
            <text:p>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48.38">
            <text:p>48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613.51">
            <text:p>613,51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3181135111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6">
            <text:p>30928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8.0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48.3333">
            <text:p>548,333</text:p>
          </table:table-cell>
          <table:table-cell table:style-name="ce12N2" office:value-type="float" office:value="12373.93">
            <text:p>12373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7.585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064.08">
            <text:p>614064,08</text:p>
          </table:table-cell>
          <table:table-cell table:style-name="ce12N2" office:value-type="float" office:value="614.06">
            <text:p>61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26.58">
            <text:p>5526,58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7585.62">
            <text:p>727585,62</text:p>
          </table:table-cell>
          <table:table-cell table:style-name="ce12N2" office:value-type="float" office:value="50930.99">
            <text:p>5093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544042000119550010004780711490599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7">
            <text:p>309287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33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6">
            <text:p>0,666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73.86">
            <text:p>7073,86</text:p>
          </table:table-cell>
          <table:table-cell table:style-name="ce12N2" office:value-type="float" office:value="7.07">
            <text:p>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66">
            <text:p>63,6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81.6">
            <text:p>8381,60</text:p>
          </table:table-cell>
          <table:table-cell table:style-name="ce12N2" office:value-type="float" office:value="586.71">
            <text:p>58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3351371785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88">
            <text:p>3092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8.7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82.58">
            <text:p>160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612">
            <text:p>0,145</text:p>
          </table:table-cell>
          <table:table-cell table:style-name="ce12N2" office:value-type="float" office:value="193.25">
            <text:p>19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46.06">
            <text:p>13146,06</text:p>
          </table:table-cell>
          <table:table-cell table:style-name="ce12N2" office:value-type="float" office:value="13.14">
            <text:p>13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.33">
            <text:p>118,3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06.23">
            <text:p>506,23</text:p>
          </table:table-cell>
          <table:table-cell table:style-name="ce12N2" office:value-type="float" office:value="15576.35">
            <text:p>15576,35</text:p>
          </table:table-cell>
          <table:table-cell table:style-name="ce12N2" office:value-type="float" office:value="1090.36">
            <text:p>109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4683374000300550030006187791889129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0">
            <text:p>309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4.8">
            <text:p>78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68">
            <text:p>0,000</text:p>
          </table:table-cell>
          <table:table-cell table:style-name="ce12N2" office:value-type="float" office:value="11.76">
            <text:p>1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5.6">
            <text:p>675,60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08">
            <text:p>6,0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6.28">
            <text:p>576,28</text:p>
          </table:table-cell>
          <table:table-cell table:style-name="ce12N2" office:value-type="float" office:value="40.34">
            <text:p>4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31896874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1">
            <text:p>309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14">
            <text:p>0,049</text:p>
          </table:table-cell>
          <table:table-cell table:style-name="ce12N2" office:value-type="float" office:value="13.02">
            <text:p>1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3.67">
            <text:p>3283,67</text:p>
          </table:table-cell>
          <table:table-cell table:style-name="ce12N2" office:value-type="float" office:value="3.28">
            <text:p>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55">
            <text:p>29,55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69.14">
            <text:p>3769,14</text:p>
          </table:table-cell>
          <table:table-cell table:style-name="ce12N2" office:value-type="float" office:value="150.77">
            <text:p>15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718724356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2">
            <text:p>309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23">
            <text:p>0,086</text:p>
          </table:table-cell>
          <table:table-cell table:style-name="ce12N2" office:value-type="float" office:value="112.44">
            <text:p>11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87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54.01">
            <text:p>32854,01</text:p>
          </table:table-cell>
          <table:table-cell table:style-name="ce12N2" office:value-type="float" office:value="32.86">
            <text:p>3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.68">
            <text:p>295,6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70.38">
            <text:p>38870,38</text:p>
          </table:table-cell>
          <table:table-cell table:style-name="ce12N2" office:value-type="float" office:value="2667.61">
            <text:p>266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41579617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3">
            <text:p>3092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76">
            <text:p>0,033</text:p>
          </table:table-cell>
          <table:table-cell table:style-name="ce12N2" office:value-type="float" office:value="8.68">
            <text:p>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12">
            <text:p>2189,12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">
            <text:p>19,7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76">
            <text:p>2512,76</text:p>
          </table:table-cell>
          <table:table-cell table:style-name="ce12N2" office:value-type="float" office:value="100.51">
            <text:p>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61520138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4">
            <text:p>309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6.52">
            <text:p>2916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4">
            <text:p>0,000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6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24">
            <text:p>2311,24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78">
            <text:p>178,00</text:p>
          </table:table-cell>
          <table:table-cell table:style-name="ce12N2" office:value-type="float" office:value="2738.52">
            <text:p>2738,52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21439709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5">
            <text:p>309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1">
            <text:p>0,016</text:p>
          </table:table-cell>
          <table:table-cell table:style-name="ce12N2" office:value-type="float" office:value="26.09">
            <text:p>26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3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84.02">
            <text:p>7284,02</text:p>
          </table:table-cell>
          <table:table-cell table:style-name="ce12N2" office:value-type="float" office:value="7.28">
            <text:p>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30.61">
            <text:p>8630,61</text:p>
          </table:table-cell>
          <table:table-cell table:style-name="ce12N2" office:value-type="float" office:value="604.14">
            <text:p>60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51848717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6">
            <text:p>309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24">
            <text:p>392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58.8">
            <text:p>5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2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77.99">
            <text:p>3377,99</text:p>
          </table:table-cell>
          <table:table-cell table:style-name="ce12N2" office:value-type="float" office:value="3.38">
            <text:p>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4">
            <text:p>30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81.39">
            <text:p>2881,39</text:p>
          </table:table-cell>
          <table:table-cell table:style-name="ce12N2" office:value-type="float" office:value="201.7">
            <text:p>20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010058889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7">
            <text:p>3092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616">
            <text:p>0,450</text:p>
          </table:table-cell>
          <table:table-cell table:style-name="ce12N2" office:value-type="float" office:value="212.84">
            <text:p>212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61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316.79">
            <text:p>77316,79</text:p>
          </table:table-cell>
          <table:table-cell table:style-name="ce12N2" office:value-type="float" office:value="77.32">
            <text:p>77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5.85">
            <text:p>695,8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610.28">
            <text:p>91610,28</text:p>
          </table:table-cell>
          <table:table-cell table:style-name="ce12N2" office:value-type="float" office:value="6412.72">
            <text:p>64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91509323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8">
            <text:p>3092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1584">
            <text:p>0,212</text:p>
          </table:table-cell>
          <table:table-cell table:style-name="ce12N2" office:value-type="float" office:value="100.16">
            <text:p>10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11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384.37">
            <text:p>36384,37</text:p>
          </table:table-cell>
          <table:table-cell table:style-name="ce12N2" office:value-type="float" office:value="36.38">
            <text:p>3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.46">
            <text:p>327,4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110.72">
            <text:p>43110,72</text:p>
          </table:table-cell>
          <table:table-cell table:style-name="ce12N2" office:value-type="float" office:value="3017.75">
            <text:p>301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611329675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299">
            <text:p>3092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8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9766">
            <text:p>0,230</text:p>
          </table:table-cell>
          <table:table-cell table:style-name="ce12N2" office:value-type="float" office:value="116.53">
            <text:p>116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681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632.71">
            <text:p>24632,71</text:p>
          </table:table-cell>
          <table:table-cell table:style-name="ce12N2" office:value-type="float" office:value="24.63">
            <text:p>2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.69">
            <text:p>221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681.89">
            <text:p>28681,89</text:p>
          </table:table-cell>
          <table:table-cell table:style-name="ce12N2" office:value-type="float" office:value="1538.41">
            <text:p>15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8558179289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7">
            <text:p>309307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31.49">
            <text:p>4431,49</text:p>
          </table:table-cell>
          <table:table-cell table:style-name="ce12N2" office:value-type="float" office:value="273.96">
            <text:p>273,9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65.96">
            <text:p>45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96768">
            <text:p>1,397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3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94.55">
            <text:p>3594,55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.35">
            <text:p>32,3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9.49">
            <text:p>139,49</text:p>
          </table:table-cell>
          <table:table-cell table:style-name="ce12N2" office:value-type="float" office:value="4292">
            <text:p>4292,00</text:p>
          </table:table-cell>
          <table:table-cell table:style-name="ce12N2" office:value-type="float" office:value="300.44">
            <text:p>30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5081122000180550010000163861000142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08">
            <text:p>30930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7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56">
            <text:p>507,56</text:p>
          </table:table-cell>
          <table:table-cell table:style-name="ce12N2" office:value-type="float" office:value="33.31">
            <text:p>33,3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7.4">
            <text:p>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7">
            <text:p>0,023</text:p>
          </table:table-cell>
          <table:table-cell table:style-name="ce12N2" office:value-type="float" office:value="7.9">
            <text:p>7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6">
            <text:p>395,60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53.47">
            <text:p>53,47</text:p>
          </table:table-cell>
          <table:table-cell table:style-name="ce12N2" office:value-type="float" office:value="454.09">
            <text:p>454,09</text:p>
          </table:table-cell>
          <table:table-cell table:style-name="ce12N2" office:value-type="float" office:value="18.17">
            <text:p>1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75391867126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7">
            <text:p>30931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74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763.95">
            <text:p>897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82.375338">
            <text:p>2282,375</text:p>
          </table:table-cell>
          <table:table-cell table:style-name="ce12N2" office:value-type="float" office:value="486.5">
            <text:p>48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.76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66.1">
            <text:p>74866,10</text:p>
          </table:table-cell>
          <table:table-cell table:style-name="ce12N2" office:value-type="float" office:value="74.87">
            <text:p>7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3.84">
            <text:p>673,84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312.21">
            <text:p>1312,21</text:p>
          </table:table-cell>
          <table:table-cell table:style-name="ce12N2" office:value-type="float" office:value="88451.74">
            <text:p>88451,74</text:p>
          </table:table-cell>
          <table:table-cell table:style-name="ce12N2" office:value-type="float" office:value="5955.92">
            <text:p>595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33064262000250550010002749931858413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8">
            <text:p>30931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8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82">
            <text:p>0,018</text:p>
          </table:table-cell>
          <table:table-cell table:style-name="ce12N2" office:value-type="float" office:value="2.2">
            <text:p>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5.18">
            <text:p>1265,18</text:p>
          </table:table-cell>
          <table:table-cell table:style-name="ce12N2" office:value-type="float" office:value="1.27">
            <text:p>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9">
            <text:p>11,39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.22">
            <text:p>1452,22</text:p>
          </table:table-cell>
          <table:table-cell table:style-name="ce12N2" office:value-type="float" office:value="58.09">
            <text:p>5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569947000003655500100006871111000226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3">
            <text:p>30932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1.65">
            <text:p>278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5">
            <text:p>0,080</text:p>
          </table:table-cell>
          <table:table-cell table:style-name="ce12N2" office:value-type="float" office:value="29.5">
            <text:p>2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1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9.08">
            <text:p>2139,08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5">
            <text:p>19,25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247.12">
            <text:p>247,12</text:p>
          </table:table-cell>
          <table:table-cell table:style-name="ce12N2" office:value-type="float" office:value="2534.53">
            <text:p>2534,53</text:p>
          </table:table-cell>
          <table:table-cell table:style-name="ce12N2" office:value-type="float" office:value="177.42">
            <text:p>17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315822614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25">
            <text:p>30932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22.1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8.28">
            <text:p>215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955">
            <text:p>0,090</text:p>
          </table:table-cell>
          <table:table-cell table:style-name="ce12N2" office:value-type="float" office:value="23.35">
            <text:p>23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89.33">
            <text:p>1689,33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156.65">
            <text:p>156,65</text:p>
          </table:table-cell>
          <table:table-cell table:style-name="ce12N2" office:value-type="float" office:value="2001.63">
            <text:p>2001,63</text:p>
          </table:table-cell>
          <table:table-cell table:style-name="ce12N2" office:value-type="float" office:value="140.12">
            <text:p>14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86740800001015500100092214515802815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31">
            <text:p>309331</text:p>
          </table:table-cell>
          <table:table-cell table:style-name="ce0" table:number-columns-spanned="4" table:number-rows-spanned="1" office:value-type="string" calcext:value-type="string">
            <text:p>5.623 - ELGIN S/A</text:p>
          </table:table-cell>
          <table:covered-table-cell table:number-columns-repeated="3"/>
          <table:table-cell table:style-name="ce0" office:value-type="string" calcext:value-type="string">
            <text:p>649.0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92">
            <text:p>0,004</text:p>
          </table:table-cell>
          <table:table-cell table:style-name="ce12N2" office:value-type="float" office:value="0.69">
            <text:p>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65.56">
            <text:p>2965,56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69">
            <text:p>26,69</text:p>
          </table:table-cell>
          <table:table-cell table:style-name="ce12N2" office:value-type="float" office:value="51">
            <text:p>5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04">
            <text:p>3404,00</text:p>
          </table:table-cell>
          <table:table-cell table:style-name="ce12N2" office:value-type="float" office:value="136.16">
            <text:p>13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5565780001225500100064900816964699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0">
            <text:p>30934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5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7.547153">
            <text:p>227,547</text:p>
          </table:table-cell>
          <table:table-cell table:style-name="ce12N2" office:value-type="float" office:value="765.94">
            <text:p>765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7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98.62">
            <text:p>23698,62</text:p>
          </table:table-cell>
          <table:table-cell table:style-name="ce12N2" office:value-type="float" office:value="23.7">
            <text:p>2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.29">
            <text:p>213,2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079.76">
            <text:p>28079,76</text:p>
          </table:table-cell>
          <table:table-cell table:style-name="ce12N2" office:value-type="float" office:value="1965.58">
            <text:p>196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5915751703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1">
            <text:p>309341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4.4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9">
            <text:p>20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68">
            <text:p>0,227</text:p>
          </table:table-cell>
          <table:table-cell table:style-name="ce12N2" office:value-type="float" office:value="46.8">
            <text:p>4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4.87">
            <text:p>1674,87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07">
            <text:p>15,07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64.5">
            <text:p>64,5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138.92">
            <text:p>13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444610733338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2">
            <text:p>309342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4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604.02">
            <text:p>16660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1359.82">
            <text:p>161359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96618">
            <text:p>26,966</text:p>
          </table:table-cell>
          <table:table-cell table:style-name="ce12N2" office:value-type="float" office:value="2451.32">
            <text:p>245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6.60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183.65">
            <text:p>136183,65</text:p>
          </table:table-cell>
          <table:table-cell table:style-name="ce12N2" office:value-type="float" office:value="136.18">
            <text:p>13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5.65">
            <text:p>1225,65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244.2">
            <text:p>5244,20</text:p>
          </table:table-cell>
          <table:table-cell table:style-name="ce12N2" office:value-type="float" office:value="161359.82">
            <text:p>161359,82</text:p>
          </table:table-cell>
          <table:table-cell table:style-name="ce12N2" office:value-type="float" office:value="11295.19">
            <text:p>1129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4445141008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3">
            <text:p>309343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5.522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6.48">
            <text:p>72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79.64">
            <text:p>697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07">
            <text:p>1,658</text:p>
          </table:table-cell>
          <table:table-cell table:style-name="ce12N2" office:value-type="float" office:value="935.12">
            <text:p>93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73.93">
            <text:p>5573,93</text:p>
          </table:table-cell>
          <table:table-cell table:style-name="ce12N2" office:value-type="float" office:value="5.57">
            <text:p>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.16">
            <text:p>50,1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226.84">
            <text:p>226,84</text:p>
          </table:table-cell>
          <table:table-cell table:style-name="ce12N2" office:value-type="float" office:value="6979.64">
            <text:p>6979,64</text:p>
          </table:table-cell>
          <table:table-cell table:style-name="ce12N2" office:value-type="float" office:value="837.56">
            <text:p>83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330817040022105501800008552217768880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45">
            <text:p>30934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9.8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90948">
            <text:p>5,191</text:p>
          </table:table-cell>
          <table:table-cell table:style-name="ce12N2" office:value-type="float" office:value="473.37">
            <text:p>473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65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19.47">
            <text:p>47819,47</text:p>
          </table:table-cell>
          <table:table-cell table:style-name="ce12N2" office:value-type="float" office:value="47.82">
            <text:p>4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38">
            <text:p>430,3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659.83">
            <text:p>56659,83</text:p>
          </table:table-cell>
          <table:table-cell table:style-name="ce12N2" office:value-type="float" office:value="3966.19">
            <text:p>396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6293564000146550020003398631990171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0">
            <text:p>309390</text:p>
          </table:table-cell>
          <table:table-cell table:style-name="ce0" table:number-columns-spanned="4" table:number-rows-spanned="1" office:value-type="string" calcext:value-type="string">
            <text:p>1.670 - ARQUA IND. BRASILEIRA DE MANGUEIRAS E TERMOPLASTICOS LTDA</text:p>
          </table:table-cell>
          <table:covered-table-cell table:number-columns-repeated="3"/>
          <table:table-cell table:style-name="ce0" office:value-type="string" calcext:value-type="string">
            <text:p>17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30.63">
            <text:p>17630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0258">
            <text:p>0,960</text:p>
          </table:table-cell>
          <table:table-cell table:style-name="ce12N2" office:value-type="float" office:value="660.09">
            <text:p>660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30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411.43">
            <text:p>14411,43</text:p>
          </table:table-cell>
          <table:table-cell table:style-name="ce12N2" office:value-type="float" office:value="14.41">
            <text:p>14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9.7">
            <text:p>129,7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554.96">
            <text:p>554,96</text:p>
          </table:table-cell>
          <table:table-cell table:style-name="ce12N2" office:value-type="float" office:value="17075.67">
            <text:p>17075,67</text:p>
          </table:table-cell>
          <table:table-cell table:style-name="ce12N2" office:value-type="float" office:value="1195.3">
            <text:p>119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81333150001195500100001754014402378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2">
            <text:p>309392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31.15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9.58">
            <text:p>843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136.14">
            <text:p>813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37198">
            <text:p>45,372</text:p>
          </table:table-cell>
          <table:table-cell table:style-name="ce12N2" office:value-type="float" office:value="68.97">
            <text:p>68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9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0.43">
            <text:p>7290,43</text:p>
          </table:table-cell>
          <table:table-cell table:style-name="ce12N2" office:value-type="float" office:value="7.29">
            <text:p>7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61">
            <text:p>65,61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303.44">
            <text:p>303,44</text:p>
          </table:table-cell>
          <table:table-cell table:style-name="ce12N2" office:value-type="float" office:value="8136.14">
            <text:p>8136,14</text:p>
          </table:table-cell>
          <table:table-cell table:style-name="ce12N2" office:value-type="float" office:value="569.53">
            <text:p>56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2803462000172550030001311531226243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4">
            <text:p>309394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0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94.14">
            <text:p>1794,14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7.99">
            <text:p>2007,99</text:p>
          </table:table-cell>
          <table:table-cell table:style-name="ce12N2" office:value-type="float" office:value="140.56">
            <text:p>14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22100192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6">
            <text:p>30939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5.7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8.16">
            <text:p>569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9732">
            <text:p>0,697</text:p>
          </table:table-cell>
          <table:table-cell table:style-name="ce12N2" office:value-type="float" office:value="117">
            <text:p>1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9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5.52">
            <text:p>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67">
            <text:p>49,6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179.36">
            <text:p>179,36</text:p>
          </table:table-cell>
          <table:table-cell table:style-name="ce12N2" office:value-type="float" office:value="5518.8">
            <text:p>5518,80</text:p>
          </table:table-cell>
          <table:table-cell table:style-name="ce12N2" office:value-type="float" office:value="386.32">
            <text:p>38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5094003000155550010001857201114655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11">
            <text:p>309411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.95537">
            <text:p>37,955</text:p>
          </table:table-cell>
          <table:table-cell table:style-name="ce12N2" office:value-type="float" office:value="583">
            <text:p>58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48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48.7">
            <text:p>7548,70</text:p>
          </table:table-cell>
          <table:table-cell table:style-name="ce12N2" office:value-type="float" office:value="288.36">
            <text:p>28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61242541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13">
            <text:p>309413</text:p>
          </table:table-cell>
          <table:table-cell table:style-name="ce0" table:number-columns-spanned="4" table:number-rows-spanned="1" office:value-type="string" calcext:value-type="string">
            <text:p>28.315 - BSB METAIS LTDA</text:p>
          </table:table-cell>
          <table:covered-table-cell table:number-columns-repeated="3"/>
          <table:table-cell table:style-name="ce0" office:value-type="string" calcext:value-type="string">
            <text:p>30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47.9">
            <text:p>93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347.9">
            <text:p>934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5322">
            <text:p>0,653</text:p>
          </table:table-cell>
          <table:table-cell table:style-name="ce12N2" office:value-type="float" office:value="51">
            <text:p>5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4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47.9">
            <text:p>9347,90</text:p>
          </table:table-cell>
          <table:table-cell table:style-name="ce12N2" office:value-type="float" office:value="334.65">
            <text:p>33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510986080001315500000000030317611605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2">
            <text:p>309422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4.43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907.77">
            <text:p>269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060.79">
            <text:p>26060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4.599">
            <text:p>244,599</text:p>
          </table:table-cell>
          <table:table-cell table:style-name="ce12N2" office:value-type="float" office:value="428.7">
            <text:p>42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907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994.65">
            <text:p>21994,65</text:p>
          </table:table-cell>
          <table:table-cell table:style-name="ce12N2" office:value-type="float" office:value="21.99">
            <text:p>2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7.95">
            <text:p>197,95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46.98">
            <text:p>846,98</text:p>
          </table:table-cell>
          <table:table-cell table:style-name="ce12N2" office:value-type="float" office:value="26060.79">
            <text:p>26060,79</text:p>
          </table:table-cell>
          <table:table-cell table:style-name="ce12N2" office:value-type="float" office:value="1824.26">
            <text:p>182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76428620002485500200001443214821014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2">
            <text:p>30943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8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5.06">
            <text:p>266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21105">
            <text:p>2,121</text:p>
          </table:table-cell>
          <table:table-cell table:style-name="ce12N2" office:value-type="float" office:value="334.97">
            <text:p>334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5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56.81">
            <text:p>21356,81</text:p>
          </table:table-cell>
          <table:table-cell table:style-name="ce12N2" office:value-type="float" office:value="21.36">
            <text:p>2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.21">
            <text:p>192,21</text:p>
          </table:table-cell>
          <table:table-cell table:style-name="ce12N2" office:value-type="float" office:value="61.58">
            <text:p>61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1350.01">
            <text:p>1350,01</text:p>
          </table:table-cell>
          <table:table-cell table:style-name="ce12N2" office:value-type="float" office:value="25305.05">
            <text:p>25305,05</text:p>
          </table:table-cell>
          <table:table-cell table:style-name="ce12N2" office:value-type="float" office:value="1771.36">
            <text:p>177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89911022671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33">
            <text:p>309433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8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.2122">
            <text:p>45,212</text:p>
          </table:table-cell>
          <table:table-cell table:style-name="ce12N2" office:value-type="float" office:value="1301">
            <text:p>130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4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40.6">
            <text:p>18340,60</text:p>
          </table:table-cell>
          <table:table-cell table:style-name="ce12N2" office:value-type="float" office:value="700.62">
            <text:p>70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22242808000118550010000028071149866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48">
            <text:p>309448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3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0699">
            <text:p>1,107</text:p>
          </table:table-cell>
          <table:table-cell table:style-name="ce12N2" office:value-type="float" office:value="97.92">
            <text:p>9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51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758.32">
            <text:p>14758,32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.81">
            <text:p>132,81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17.42">
            <text:p>16517,42</text:p>
          </table:table-cell>
          <table:table-cell table:style-name="ce12N2" office:value-type="float" office:value="1156.22">
            <text:p>115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3576045000150550010000053241001921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2">
            <text:p>30945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0.74">
            <text:p>819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190.74">
            <text:p>8190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9683">
            <text:p>3,097</text:p>
          </table:table-cell>
          <table:table-cell table:style-name="ce12N2" office:value-type="float" office:value="380.07">
            <text:p>380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0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12.65">
            <text:p>6912,65</text:p>
          </table:table-cell>
          <table:table-cell table:style-name="ce12N2" office:value-type="float" office:value="6.9">
            <text:p>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21">
            <text:p>62,2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90.74">
            <text:p>8190,74</text:p>
          </table:table-cell>
          <table:table-cell table:style-name="ce12N2" office:value-type="float" office:value="573.35">
            <text:p>573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3471442714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3">
            <text:p>30945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3.6">
            <text:p>117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3.6">
            <text:p>117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56">
            <text:p>16,56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0.72">
            <text:p>990,72</text:p>
          </table:table-cell>
          <table:table-cell table:style-name="ce12N2" office:value-type="float" office:value="0.99">
            <text:p>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92">
            <text:p>8,92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3.6">
            <text:p>1173,60</text:p>
          </table:table-cell>
          <table:table-cell table:style-name="ce12N2" office:value-type="float" office:value="82.15">
            <text:p>8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3571007430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4">
            <text:p>30945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7.99">
            <text:p>2060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549.21">
            <text:p>20549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778458">
            <text:p>9,778</text:p>
          </table:table-cell>
          <table:table-cell table:style-name="ce12N2" office:value-type="float" office:value="348.33">
            <text:p>348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0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15.93">
            <text:p>17415,93</text:p>
          </table:table-cell>
          <table:table-cell table:style-name="ce12N2" office:value-type="float" office:value="17.42">
            <text:p>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75">
            <text:p>156,75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58.78">
            <text:p>58,78</text:p>
          </table:table-cell>
          <table:table-cell table:style-name="ce12N2" office:value-type="float" office:value="20549.21">
            <text:p>20549,21</text:p>
          </table:table-cell>
          <table:table-cell table:style-name="ce12N2" office:value-type="float" office:value="1347.83">
            <text:p>134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35311124449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5">
            <text:p>30945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47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89.81">
            <text:p>366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35701.77">
            <text:p>35701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.814824">
            <text:p>28,815</text:p>
          </table:table-cell>
          <table:table-cell table:style-name="ce12N2" office:value-type="float" office:value="570.23">
            <text:p>57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68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168.05">
            <text:p>30168,05</text:p>
          </table:table-cell>
          <table:table-cell table:style-name="ce12N2" office:value-type="float" office:value="30.16">
            <text:p>3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1.51">
            <text:p>271,51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988.04">
            <text:p>988,04</text:p>
          </table:table-cell>
          <table:table-cell table:style-name="ce12N2" office:value-type="float" office:value="35701.77">
            <text:p>35701,77</text:p>
          </table:table-cell>
          <table:table-cell table:style-name="ce12N2" office:value-type="float" office:value="2459.07">
            <text:p>245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88625300011225500100204740914330026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6">
            <text:p>30945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4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1.17">
            <text:p>13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8.7">
            <text:p>126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3">
            <text:p>0,032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70.75">
            <text:p>1070,7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64">
            <text:p>9,64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82.47">
            <text:p>82,47</text:p>
          </table:table-cell>
          <table:table-cell table:style-name="ce12N2" office:value-type="float" office:value="1268.7">
            <text:p>1268,70</text:p>
          </table:table-cell>
          <table:table-cell table:style-name="ce12N2" office:value-type="float" office:value="88.81">
            <text:p>8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491267961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57">
            <text:p>309457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65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.72">
            <text:p>106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8.8">
            <text:p>99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56">
            <text:p>0,013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2.96">
            <text:p>842,96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59">
            <text:p>7,59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64.92">
            <text:p>64,92</text:p>
          </table:table-cell>
          <table:table-cell table:style-name="ce12N2" office:value-type="float" office:value="998.8">
            <text:p>998,80</text:p>
          </table:table-cell>
          <table:table-cell table:style-name="ce12N2" office:value-type="float" office:value="69.92">
            <text:p>6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9270215000105550060002196501375736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5">
            <text:p>309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4.16">
            <text:p>1230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756">
            <text:p>0,338</text:p>
          </table:table-cell>
          <table:table-cell table:style-name="ce12N2" office:value-type="float" office:value="33.04">
            <text:p>3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50.62">
            <text:p>9750,62</text:p>
          </table:table-cell>
          <table:table-cell table:style-name="ce12N2" office:value-type="float" office:value="9.75">
            <text:p>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.76">
            <text:p>87,76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750.96">
            <text:p>750,96</text:p>
          </table:table-cell>
          <table:table-cell table:style-name="ce12N2" office:value-type="float" office:value="11553.2">
            <text:p>11553,20</text:p>
          </table:table-cell>
          <table:table-cell table:style-name="ce12N2" office:value-type="float" office:value="808.72">
            <text:p>80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71829829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6">
            <text:p>309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952">
            <text:p>0,031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0.97">
            <text:p>1580,97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23">
            <text:p>14,2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3.24">
            <text:p>1873,24</text:p>
          </table:table-cell>
          <table:table-cell table:style-name="ce12N2" office:value-type="float" office:value="131.13">
            <text:p>13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11546280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7">
            <text:p>3094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3.39">
            <text:p>10583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162">
            <text:p>0,134</text:p>
          </table:table-cell>
          <table:table-cell table:style-name="ce12N2" office:value-type="float" office:value="30.56">
            <text:p>3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3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86.97">
            <text:p>8386,97</text:p>
          </table:table-cell>
          <table:table-cell table:style-name="ce12N2" office:value-type="float" office:value="8.39">
            <text:p>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.48">
            <text:p>75,48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645.93">
            <text:p>645,93</text:p>
          </table:table-cell>
          <table:table-cell table:style-name="ce12N2" office:value-type="float" office:value="9937.46">
            <text:p>9937,46</text:p>
          </table:table-cell>
          <table:table-cell table:style-name="ce12N2" office:value-type="float" office:value="695.62">
            <text:p>69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31315605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9">
            <text:p>309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9">
            <text:p>0,000</text:p>
          </table:table-cell>
          <table:table-cell table:style-name="ce12N2" office:value-type="float" office:value="9.15">
            <text:p>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31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819.22">
            <text:p>4819,22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.37">
            <text:p>43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1.7">
            <text:p>5531,70</text:p>
          </table:table-cell>
          <table:table-cell table:style-name="ce12N2" office:value-type="float" office:value="221.27">
            <text:p>22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017898775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0">
            <text:p>309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37.6">
            <text:p>1273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68">
            <text:p>0,052</text:p>
          </table:table-cell>
          <table:table-cell table:style-name="ce12N2" office:value-type="float" office:value="71.68">
            <text:p>7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965.2">
            <text:p>10965,20</text:p>
          </table:table-cell>
          <table:table-cell table:style-name="ce12N2" office:value-type="float" office:value="10.97">
            <text:p>1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.69">
            <text:p>98,6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53.22">
            <text:p>9353,22</text:p>
          </table:table-cell>
          <table:table-cell table:style-name="ce12N2" office:value-type="float" office:value="654.73">
            <text:p>65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61131213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1">
            <text:p>309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7.2">
            <text:p>139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">
            <text:p>0,003</text:p>
          </table:table-cell>
          <table:table-cell table:style-name="ce12N2" office:value-type="float" office:value="7.36">
            <text:p>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2.78">
            <text:p>1202,78</text:p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83">
            <text:p>10,83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5.96">
            <text:p>1025,96</text:p>
          </table:table-cell>
          <table:table-cell table:style-name="ce12N2" office:value-type="float" office:value="71.82">
            <text:p>7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51452877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2">
            <text:p>309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">
            <text:p>0,001</text:p>
          </table:table-cell>
          <table:table-cell table:style-name="ce12N2" office:value-type="float" office:value="27.45">
            <text:p>27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26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0.81">
            <text:p>12430,81</text:p>
          </table:table-cell>
          <table:table-cell table:style-name="ce12N2" office:value-type="float" office:value="12.43">
            <text:p>1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.88">
            <text:p>111,8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68.6">
            <text:p>14268,60</text:p>
          </table:table-cell>
          <table:table-cell table:style-name="ce12N2" office:value-type="float" office:value="570.74">
            <text:p>57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21203983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3">
            <text:p>3094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0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8.68">
            <text:p>514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268">
            <text:p>0,065</text:p>
          </table:table-cell>
          <table:table-cell table:style-name="ce12N2" office:value-type="float" office:value="14.87">
            <text:p>14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0.15">
            <text:p>4080,15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72">
            <text:p>36,7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314.24">
            <text:p>314,24</text:p>
          </table:table-cell>
          <table:table-cell table:style-name="ce12N2" office:value-type="float" office:value="4834.44">
            <text:p>4834,44</text:p>
          </table:table-cell>
          <table:table-cell table:style-name="ce12N2" office:value-type="float" office:value="338.41">
            <text:p>33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141567041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4">
            <text:p>309484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16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207.81">
            <text:p>16920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207.81">
            <text:p>16920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59832">
            <text:p>5,660</text:p>
          </table:table-cell>
          <table:table-cell table:style-name="ce12N2" office:value-type="float" office:value="739.6">
            <text:p>73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9.20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5129.35">
            <text:p>135129,35</text:p>
          </table:table-cell>
          <table:table-cell table:style-name="ce12N2" office:value-type="float" office:value="135.13">
            <text:p>1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6.16">
            <text:p>1216,16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207.81">
            <text:p>169207,81</text:p>
          </table:table-cell>
          <table:table-cell table:style-name="ce12N2" office:value-type="float" office:value="20304.94">
            <text:p>2030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0142240000120550010007167001965167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7">
            <text:p>30948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85.5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021">
            <text:p>16202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2021">
            <text:p>16202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">
            <text:p>0,090</text:p>
          </table:table-cell>
          <table:table-cell table:style-name="ce12N2" office:value-type="float" office:value="5800">
            <text:p>58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2.02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1152.7">
            <text:p>141152,70</text:p>
          </table:table-cell>
          <table:table-cell table:style-name="ce12N2" office:value-type="float" office:value="141.15">
            <text:p>14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0.37">
            <text:p>1270,3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021">
            <text:p>162021,00</text:p>
          </table:table-cell>
          <table:table-cell table:style-name="ce12N2" office:value-type="float" office:value="6480.84">
            <text:p>648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0808396000521550010008855361240578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0">
            <text:p>309490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8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23">
            <text:p>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.4">
            <text:p>170,40</text:p>
          </table:table-cell>
          <table:table-cell table:style-name="ce12N2" office:value-type="float" office:value="11.93">
            <text:p>1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2043201000100550010007584571119030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4">
            <text:p>309494</text:p>
          </table:table-cell>
          <table:table-cell table:style-name="ce0" table:number-columns-spanned="4" table:number-rows-spanned="1" office:value-type="string" calcext:value-type="string">
            <text:p>34.313 - LYNUS INDUSTRIA, COMERCIO, IMPORTACAO E EXPORTACAO LTDA</text:p>
          </table:table-cell>
          <table:covered-table-cell table:number-columns-repeated="3"/>
          <table:table-cell table:style-name="ce0" office:value-type="string" calcext:value-type="string">
            <text:p>238.13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60.54">
            <text:p>1246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437.7">
            <text:p>1243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6958">
            <text:p>1,170</text:p>
          </table:table-cell>
          <table:table-cell table:style-name="ce12N2" office:value-type="float" office:value="135.3">
            <text:p>135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6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5.72">
            <text:p>10835,72</text:p>
          </table:table-cell>
          <table:table-cell table:style-name="ce12N2" office:value-type="float" office:value="10.84">
            <text:p>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.52">
            <text:p>97,5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22.84">
            <text:p>22,84</text:p>
          </table:table-cell>
          <table:table-cell table:style-name="ce12N2" office:value-type="float" office:value="12437.7">
            <text:p>12437,70</text:p>
          </table:table-cell>
          <table:table-cell table:style-name="ce12N2" office:value-type="float" office:value="497.52">
            <text:p>49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71629640001855500200023813714662464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95">
            <text:p>309495</text:p>
          </table:table-cell>
          <table:table-cell table:style-name="ce0" table:number-columns-spanned="4" table:number-rows-spanned="1" office:value-type="string" calcext:value-type="string">
            <text:p>6.638 - MECANICA MABELINI LTDA</text:p>
          </table:table-cell>
          <table:covered-table-cell table:number-columns-repeated="3"/>
          <table:table-cell table:style-name="ce0" office:value-type="string" calcext:value-type="string">
            <text:p>7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08">
            <text:p>0,210</text:p>
          </table:table-cell>
          <table:table-cell table:style-name="ce12N2" office:value-type="float" office:value="2473">
            <text:p>247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65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9.67">
            <text:p>49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65.4">
            <text:p>33665,40</text:p>
          </table:table-cell>
          <table:table-cell table:style-name="ce12N2" office:value-type="float" office:value="1326.41">
            <text:p>13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845890000011055001000007290161218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08">
            <text:p>309508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6.834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.6">
            <text:p>1301,60</text:p>
          </table:table-cell>
          <table:table-cell table:style-name="ce12N2" office:value-type="float" office:value="43.72">
            <text:p>43,72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5.26">
            <text:p>1295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4">
            <text:p>1,564</text:p>
          </table:table-cell>
          <table:table-cell table:style-name="ce12N2" office:value-type="float" office:value="2000">
            <text:p>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0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8.62">
            <text:p>908,62</text:p>
          </table:table-cell>
          <table:table-cell table:style-name="ce12N2" office:value-type="float" office:value="0.91">
            <text:p>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18">
            <text:p>8,18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1.54">
            <text:p>1251,54</text:p>
          </table:table-cell>
          <table:table-cell table:style-name="ce12N2" office:value-type="float" office:value="250.31">
            <text:p>25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01.85">
            <text:p>1501,85</text:p>
          </table:table-cell>
          <table:table-cell table:style-name="ce12N2" office:value-type="float" office:value="50.06">
            <text:p>50,0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1637895007498550060014568341231534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12">
            <text:p>309512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56.83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033">
            <text:p>25033,00</text:p>
          </table:table-cell>
          <table:table-cell table:style-name="ce12N2" office:value-type="float" office:value="840.88">
            <text:p>840,88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873.88">
            <text:p>2587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.5024">
            <text:p>28,502</text:p>
          </table:table-cell>
          <table:table-cell table:style-name="ce12N2" office:value-type="float" office:value="36000">
            <text:p>36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03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173.96">
            <text:p>18173,96</text:p>
          </table:table-cell>
          <table:table-cell table:style-name="ce12N2" office:value-type="float" office:value="18.18">
            <text:p>1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3.56">
            <text:p>163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033">
            <text:p>25033,00</text:p>
          </table:table-cell>
          <table:table-cell table:style-name="ce12N2" office:value-type="float" office:value="5006.6">
            <text:p>500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601637895007498550060014568331402711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19">
            <text:p>119,00</text:p>
          </table:table-cell>
          <table:table-cell table:style-name="ce26N2" office:value-type="float" office:value="6813.52">
            <text:p>6813,52</text:p>
          </table:table-cell>
          <table:table-cell table:style-name="ce26N2" office:value-type="float" office:value="168.58">
            <text:p>16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1792.62">
            <text:p>51792,62</text:p>
          </table:table-cell>
          <table:table-cell table:style-name="ce26N2" office:value-type="float" office:value="4613577.26">
            <text:p>4613577,26</text:p>
          </table:table-cell>
          <table:table-cell table:style-name="ce26N2" office:value-type="float" office:value="309444.61">
            <text:p>309444,6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42960.27">
            <text:p>4742960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343.38">
            <text:p>21343,38</text:p>
          </table:table-cell>
          <table:table-cell table:style-name="ce26N2" office:value-type="float" office:value="3638.94">
            <text:p>3638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327.687649">
            <text:p>4327,688</text:p>
          </table:table-cell>
          <table:table-cell table:style-name="ce26N2" office:value-type="float" office:value="4694173.65">
            <text:p>4694173,65</text:p>
          </table:table-cell>
          <table:table-cell table:style-name="ce26N2" office:value-type="float" office:value="4742960.27">
            <text:p>4742960,2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78744.54">
            <text:p>3878744,54</text:p>
          </table:table-cell>
          <table:table-cell table:style-name="ce26N2" office:value-type="float" office:value="3878.7">
            <text:p>3878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4908.68">
            <text:p>34908,6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95144.64">
            <text:p>195144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.71">
            <text:p>47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16" meta:object-count="0"/>
    <meta:generator>LibreOffice/4.3.0.4$Windows_x86 LibreOffice_project/62ad5818884a2fc2e5780dd45466868d41009ec0</meta:generator>
  </office:meta>
</office:document-meta>
</file>