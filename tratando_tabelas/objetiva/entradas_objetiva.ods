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4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6">
            <text:p>310836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2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31.6">
            <text:p>1128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508">
            <text:p>49,508</text:p>
          </table:table-cell>
          <table:table-cell table:style-name="ce12N2" office:value-type="float" office:value="25000">
            <text:p>2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8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229.59">
            <text:p>92229,59</text:p>
          </table:table-cell>
          <table:table-cell table:style-name="ce12N2" office:value-type="float" office:value="92.23">
            <text:p>9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.07">
            <text:p>830,07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551.6">
            <text:p>3551,6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7649.6">
            <text:p>764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241837853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9">
            <text:p>310859</text:p>
          </table:table-cell>
          <table:table-cell table:style-name="ce0" table:number-columns-spanned="4" table:number-rows-spanned="1" office:value-type="string" calcext:value-type="string">
            <text:p>13.600 - ANJO QUIMICA DO BRASIL LTDA</text:p>
          </table:table-cell>
          <table:covered-table-cell table:number-columns-repeated="3"/>
          <table:table-cell table:style-name="ce0" office:value-type="string" calcext:value-type="string">
            <text:p>481.1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567">
            <text:p>5,457</text:p>
          </table:table-cell>
          <table:table-cell table:style-name="ce12N2" office:value-type="float" office:value="3753">
            <text:p>37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9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87">
            <text:p>42787,00</text:p>
          </table:table-cell>
          <table:table-cell table:style-name="ce12N2" office:value-type="float" office:value="42.79">
            <text:p>4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08">
            <text:p>385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3548.79">
            <text:p>354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92134600015855002000481107191591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2">
            <text:p>31088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125">
            <text:p>0,829</text:p>
          </table:table-cell>
          <table:table-cell table:style-name="ce12N2" office:value-type="float" office:value="279.25">
            <text:p>27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8.17">
            <text:p>6828,17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5">
            <text:p>61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566.34">
            <text:p>5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51118249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6">
            <text:p>3108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9.81">
            <text:p>31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6">
            <text:p>0,014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2.09">
            <text:p>2552,09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7">
            <text:p>22,9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41">
            <text:p>190,41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117.18">
            <text:p>1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41458752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7">
            <text:p>31088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3.77">
            <text:p>37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32">
            <text:p>0,017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2.52">
            <text:p>3062,52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6">
            <text:p>27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28.49">
            <text:p>228,49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140.61">
            <text:p>1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51512384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8">
            <text:p>31088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21967939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9">
            <text:p>31088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572">
            <text:p>0,136</text:p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1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7.89">
            <text:p>11247,89</text:p>
          </table:table-cell>
          <table:table-cell table:style-name="ce12N2" office:value-type="float" office:value="11.25">
            <text:p>1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23">
            <text:p>101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516.43">
            <text:p>5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51165764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0">
            <text:p>31089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01802576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1">
            <text:p>31089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94">
            <text:p>9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58">
            <text:p>0,004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.63">
            <text:p>765,63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6197941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3">
            <text:p>31089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297">
            <text:p>0,092</text:p>
          </table:table-cell>
          <table:table-cell table:style-name="ce12N2" office:value-type="float" office:value="65.7">
            <text:p>6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76.8">
            <text:p>11076,80</text:p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7">
            <text:p>99,70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508.58">
            <text:p>5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71849426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4">
            <text:p>3108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7179511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5">
            <text:p>31089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71.62">
            <text:p>3517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36">
            <text:p>0,009</text:p>
          </table:table-cell>
          <table:table-cell table:style-name="ce12N2" office:value-type="float" office:value="20.97">
            <text:p>2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7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62.45">
            <text:p>27962,45</text:p>
          </table:table-cell>
          <table:table-cell table:style-name="ce12N2" office:value-type="float" office:value="27.96">
            <text:p>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.66">
            <text:p>251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75.14">
            <text:p>3075,14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1283.86">
            <text:p>12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11186594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6">
            <text:p>31089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93">
            <text:p>0,034</text:p>
          </table:table-cell>
          <table:table-cell table:style-name="ce12N2" office:value-type="float" office:value="16.5">
            <text:p>1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11.97">
            <text:p>2811,97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31">
            <text:p>25,3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129.11">
            <text:p>12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41427856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8">
            <text:p>31089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1.77">
            <text:p>4174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74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4.79">
            <text:p>33134,79</text:p>
          </table:table-cell>
          <table:table-cell table:style-name="ce12N2" office:value-type="float" office:value="33.13">
            <text:p>3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21">
            <text:p>298,2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708.27">
            <text:p>3708,27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1521.34">
            <text:p>15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21194405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9">
            <text:p>31089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91715890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0">
            <text:p>31090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5.48">
            <text:p>796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34">
            <text:p>0,007</text:p>
          </table:table-cell>
          <table:table-cell table:style-name="ce12N2" office:value-type="float" office:value="4.52">
            <text:p>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6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3.04">
            <text:p>6323,04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1">
            <text:p>56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7.64">
            <text:p>707,64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290.31">
            <text:p>2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91710227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1">
            <text:p>31090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60.65">
            <text:p>21096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71492">
            <text:p>14,715</text:p>
          </table:table-cell>
          <table:table-cell table:style-name="ce12N2" office:value-type="float" office:value="1036">
            <text:p>10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0.96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656.11">
            <text:p>183656,11</text:p>
          </table:table-cell>
          <table:table-cell table:style-name="ce12N2" office:value-type="float" office:value="183.65">
            <text:p>18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2.9">
            <text:p>1652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52.45">
            <text:p>152,45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8432.33">
            <text:p>84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61092477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2">
            <text:p>31090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090.12">
            <text:p>500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09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761.74">
            <text:p>39761,74</text:p>
          </table:table-cell>
          <table:table-cell table:style-name="ce12N2" office:value-type="float" office:value="39.76">
            <text:p>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.86">
            <text:p>357,8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449.92">
            <text:p>4449,92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1825.61">
            <text:p>182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9192894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3">
            <text:p>31091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3.65475">
            <text:p>63,655</text:p>
          </table:table-cell>
          <table:table-cell table:style-name="ce12N2" office:value-type="float" office:value="1092">
            <text:p>109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0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608.18">
            <text:p>60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71603114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3">
            <text:p>31093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2">
            <text:p>0,009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60.34">
            <text:p>1060,34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4">
            <text:p>9,5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48.68">
            <text:p>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61286122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6">
            <text:p>31093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9.71">
            <text:p>1038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728">
            <text:p>2,8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99.08">
            <text:p>8499,08</text:p>
          </table:table-cell>
          <table:table-cell table:style-name="ce12N2" office:value-type="float" office:value="8.5">
            <text:p>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49">
            <text:p>76,4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634.11">
            <text:p>634,11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390.22">
            <text:p>3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81044274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8">
            <text:p>31093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5">
            <text:p>164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092">
            <text:p>0,4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1.97">
            <text:p>1341,97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08">
            <text:p>12,0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61.62">
            <text:p>6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0116877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4">
            <text:p>31094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5.25">
            <text:p>452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76">
            <text:p>0,206</text:p>
          </table:table-cell>
          <table:table-cell table:style-name="ce12N2" office:value-type="float" office:value="34.58">
            <text:p>3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6.53">
            <text:p>3526,53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54.52">
            <text:p>354,52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284.74">
            <text:p>2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5951580995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5">
            <text:p>310945</text:p>
          </table:table-cell>
          <table:table-cell table:style-name="ce0" table:number-columns-spanned="4" table:number-rows-spanned="1" office:value-type="string" calcext:value-type="string">
            <text:p>9.694 - SFORPLAST INDUSTRIA E COMERCIO LTDA</text:p>
          </table:table-cell>
          <table:covered-table-cell table:number-columns-repeated="3"/>
          <table:table-cell table:style-name="ce0" office:value-type="string" calcext:value-type="string">
            <text:p>9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91.62">
            <text:p>243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62621">
            <text:p>24,626</text:p>
          </table:table-cell>
          <table:table-cell table:style-name="ce12N2" office:value-type="float" office:value="1424.65">
            <text:p>142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3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300.13">
            <text:p>20300,13</text:p>
          </table:table-cell>
          <table:table-cell table:style-name="ce12N2" office:value-type="float" office:value="20.31">
            <text:p>2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7">
            <text:p>182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736.57">
            <text:p>1736,57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1585.87">
            <text:p>15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8698860002405500100009679018251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3">
            <text:p>3109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88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9.94">
            <text:p>4979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">
            <text:p>0,288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9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3.73">
            <text:p>4073,73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6">
            <text:p>36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3.94">
            <text:p>303,94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8841410960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4">
            <text:p>3109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8">
            <text:p>0,173</text:p>
          </table:table-cell>
          <table:table-cell table:style-name="ce12N2" office:value-type="float" office:value="45.8">
            <text:p>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1.01">
            <text:p>3171,01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4">
            <text:p>28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263.01">
            <text:p>26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7114832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8">
            <text:p>310998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45.326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35.72">
            <text:p>886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84538.19">
            <text:p>8453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325382">
            <text:p>49,325</text:p>
          </table:table-cell>
          <table:table-cell table:style-name="ce12N2" office:value-type="float" office:value="462.79">
            <text:p>462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55.48">
            <text:p>73455,48</text:p>
          </table:table-cell>
          <table:table-cell table:style-name="ce12N2" office:value-type="float" office:value="73.42">
            <text:p>7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06">
            <text:p>661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097.53">
            <text:p>4097,53</text:p>
          </table:table-cell>
          <table:table-cell table:style-name="ce12N2" office:value-type="float" office:value="83238.63">
            <text:p>83238,63</text:p>
          </table:table-cell>
          <table:table-cell table:style-name="ce12N2" office:value-type="float" office:value="3595.53">
            <text:p>359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3296273003298550230024453261905487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2">
            <text:p>31103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2">
            <text:p>5,312</text:p>
          </table:table-cell>
          <table:table-cell table:style-name="ce12N2" office:value-type="float" office:value="2298.78">
            <text:p>2298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6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83.6">
            <text:p>49483,60</text:p>
          </table:table-cell>
          <table:table-cell table:style-name="ce12N2" office:value-type="float" office:value="49.48">
            <text:p>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5">
            <text:p>445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4104.21">
            <text:p>410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2981183537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2">
            <text:p>31104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7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4.43">
            <text:p>61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56">
            <text:p>1,183</text:p>
          </table:table-cell>
          <table:table-cell table:style-name="ce12N2" office:value-type="float" office:value="222">
            <text:p>2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6.44">
            <text:p>4746,44</text:p>
          </table:table-cell>
          <table:table-cell table:style-name="ce12N2" office:value-type="float" office:value="4.75">
            <text:p>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72">
            <text:p>42,72</text:p>
          </table:table-cell>
          <table:table-cell table:style-name="ce12N2" office:value-type="float" office:value="43.71">
            <text:p>43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530.52">
            <text:p>530,52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393.67">
            <text:p>39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7261363308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3">
            <text:p>311043</text:p>
          </table:table-cell>
          <table:table-cell table:style-name="ce0" table:number-columns-spanned="4" table:number-rows-spanned="1" office:value-type="string" calcext:value-type="string">
            <text:p>681 - UNIAO MUNDIAL INDUSTRIA DE FERRAGENS LTDA</text:p>
          </table:table-cell>
          <table:covered-table-cell table:number-columns-repeated="3"/>
          <table:table-cell table:style-name="ce0" office:value-type="string" calcext:value-type="string">
            <text:p>276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8.35">
            <text:p>1139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06714">
            <text:p>5,407</text:p>
          </table:table-cell>
          <table:table-cell table:style-name="ce12N2" office:value-type="float" office:value="33121.72">
            <text:p>3312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9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82.6">
            <text:p>101182,60</text:p>
          </table:table-cell>
          <table:table-cell table:style-name="ce12N2" office:value-type="float" office:value="101.18">
            <text:p>10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64">
            <text:p>910,64</text:p>
          </table:table-cell>
          <table:table-cell table:style-name="ce12N2" office:value-type="float" office:value="62.84">
            <text:p>62,8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028.28">
            <text:p>1028,28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2223414000176550010002766191319287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3">
            <text:p>3110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1.58">
            <text:p>1231,5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102.15">
            <text:p>10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31638008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1">
            <text:p>31109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08.24">
            <text:p>14460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0181">
            <text:p>1,120</text:p>
          </table:table-cell>
          <table:table-cell table:style-name="ce12N2" office:value-type="float" office:value="569.29">
            <text:p>56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60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22.72">
            <text:p>121722,72</text:p>
          </table:table-cell>
          <table:table-cell table:style-name="ce12N2" office:value-type="float" office:value="121.87">
            <text:p>12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51">
            <text:p>1095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031.55">
            <text:p>1031,55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9446.96">
            <text:p>944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41585957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5">
            <text:p>3110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4">
            <text:p>0,007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1.05">
            <text:p>821,05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9">
            <text:p>7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2189949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8">
            <text:p>3110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3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99">
            <text:p>1,990</text:p>
          </table:table-cell>
          <table:table-cell table:style-name="ce12N2" office:value-type="float" office:value="670.2">
            <text:p>67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87.62">
            <text:p>16387,62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.49">
            <text:p>147,4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1359.21">
            <text:p>13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310123185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1">
            <text:p>31110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7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936">
            <text:p>0,118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2.87">
            <text:p>1432,87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9">
            <text:p>12,90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118.84">
            <text:p>1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78181805435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4">
            <text:p>31110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90.68">
            <text:p>3279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9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495.8">
            <text:p>27495,80</text:p>
          </table:table-cell>
          <table:table-cell table:style-name="ce12N2" office:value-type="float" office:value="27.5">
            <text:p>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46">
            <text:p>247,4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1.76">
            <text:p>211,76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2280.52">
            <text:p>2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81718434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5">
            <text:p>311105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1.09">
            <text:p>1123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5784">
            <text:p>1,296</text:p>
          </table:table-cell>
          <table:table-cell table:style-name="ce12N2" office:value-type="float" office:value="5792.4">
            <text:p>579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3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17.54">
            <text:p>9417,54</text:p>
          </table:table-cell>
          <table:table-cell table:style-name="ce12N2" office:value-type="float" office:value="9.42">
            <text:p>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76">
            <text:p>84,7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72.53">
            <text:p>72,53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781.1">
            <text:p>78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91502648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4">
            <text:p>31112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75">
            <text:p>16,87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92.24">
            <text:p>12692,24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23">
            <text:p>114,23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1052.7">
            <text:p>105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8611726738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3">
            <text:p>31113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455.18">
            <text:p>10345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5207">
            <text:p>1,952</text:p>
          </table:table-cell>
          <table:table-cell table:style-name="ce12N2" office:value-type="float" office:value="565.64">
            <text:p>56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3.45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577.1">
            <text:p>85577,10</text:p>
          </table:table-cell>
          <table:table-cell table:style-name="ce12N2" office:value-type="float" office:value="85.55">
            <text:p>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0.2">
            <text:p>770,20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5226.19">
            <text:p>5226,19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3929.17">
            <text:p>3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33311575994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4">
            <text:p>311134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46.68">
            <text:p>14146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3928.78">
            <text:p>13928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370918">
            <text:p>32,371</text:p>
          </table:table-cell>
          <table:table-cell table:style-name="ce12N2" office:value-type="float" office:value="708.06">
            <text:p>708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146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3.89">
            <text:p>11853,89</text:p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68">
            <text:p>106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7.9">
            <text:p>217,90</text:p>
          </table:table-cell>
          <table:table-cell table:style-name="ce12N2" office:value-type="float" office:value="12381">
            <text:p>12381,00</text:p>
          </table:table-cell>
          <table:table-cell table:style-name="ce12N2" office:value-type="float" office:value="866.65">
            <text:p>86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61556428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8">
            <text:p>311138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0552">
            <text:p>3,271</text:p>
          </table:table-cell>
          <table:table-cell table:style-name="ce12N2" office:value-type="float" office:value="95.13">
            <text:p>95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4.64">
            <text:p>844,64</text:p>
          </table:table-cell>
          <table:table-cell table:style-name="ce12N2" office:value-type="float" office:value="59.11">
            <text:p>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71228130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3">
            <text:p>3111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69.61">
            <text:p>686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506.58">
            <text:p>650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88">
            <text:p>0,206</text:p>
          </table:table-cell>
          <table:table-cell table:style-name="ce12N2" office:value-type="float" office:value="24.19">
            <text:p>24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6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04.56">
            <text:p>5504,56</text:p>
          </table:table-cell>
          <table:table-cell table:style-name="ce12N2" office:value-type="float" office:value="5.5">
            <text:p>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54">
            <text:p>49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63.03">
            <text:p>363,03</text:p>
          </table:table-cell>
          <table:table-cell table:style-name="ce12N2" office:value-type="float" office:value="6506.58">
            <text:p>6506,58</text:p>
          </table:table-cell>
          <table:table-cell table:style-name="ce12N2" office:value-type="float" office:value="440.94">
            <text:p>4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47103623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9">
            <text:p>3111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72">
            <text:p>0,507</text:p>
          </table:table-cell>
          <table:table-cell table:style-name="ce12N2" office:value-type="float" office:value="281.25">
            <text:p>28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0.89">
            <text:p>2990,89</text:p>
          </table:table-cell>
          <table:table-cell table:style-name="ce12N2" office:value-type="float" office:value="2.99">
            <text:p>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92">
            <text:p>26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248.06">
            <text:p>24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51252168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0">
            <text:p>3111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925">
            <text:p>0,689</text:p>
          </table:table-cell>
          <table:table-cell table:style-name="ce12N2" office:value-type="float" office:value="448.29">
            <text:p>448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93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60.79">
            <text:p>11760,79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5.85">
            <text:p>105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975.45">
            <text:p>97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41269331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2">
            <text:p>31117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3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0.46">
            <text:p>7590,46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1">
            <text:p>68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629.56">
            <text:p>6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61187492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4">
            <text:p>311174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8.7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9624">
            <text:p>8,962</text:p>
          </table:table-cell>
          <table:table-cell table:style-name="ce12N2" office:value-type="float" office:value="2197.32">
            <text:p>219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5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27.44">
            <text:p>21227,44</text:p>
          </table:table-cell>
          <table:table-cell table:style-name="ce12N2" office:value-type="float" office:value="21.21">
            <text:p>2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.04">
            <text:p>191,0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1760.62">
            <text:p>176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8787482000137550010001087591928436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6">
            <text:p>311176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7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36">
            <text:p>6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.18">
            <text:p>6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E-5">
            <text:p>0,000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.7">
            <text:p>56,70</text:p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67.18">
            <text:p>67,18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837457000187550010003674961711965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7">
            <text:p>31117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8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3.84">
            <text:p>267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10.65">
            <text:p>251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">
            <text:p>0,027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3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7.27">
            <text:p>2187,27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3.19">
            <text:p>163,19</text:p>
          </table:table-cell>
          <table:table-cell table:style-name="ce12N2" office:value-type="float" office:value="2510.65">
            <text:p>2510,65</text:p>
          </table:table-cell>
          <table:table-cell table:style-name="ce12N2" office:value-type="float" office:value="100.43">
            <text:p>10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8721410215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0">
            <text:p>31118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7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8.04">
            <text:p>12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96.68">
            <text:p>1196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88">
            <text:p>0,003</text:p>
          </table:table-cell>
          <table:table-cell table:style-name="ce12N2" office:value-type="float" office:value="2.34">
            <text:p>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.54">
            <text:p>1042,54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9">
            <text:p>9,39</text:p>
          </table:table-cell>
          <table:table-cell table:style-name="ce12N2" office:value-type="float" office:value="55.01">
            <text:p>55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1196.68">
            <text:p>1196,68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7771932284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6">
            <text:p>3111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6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.01">
            <text:p>1569,01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2">
            <text:p>14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130.14">
            <text:p>1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41775468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7">
            <text:p>3111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436">
            <text:p>0,065</text:p>
          </table:table-cell>
          <table:table-cell table:style-name="ce12N2" office:value-type="float" office:value="45.03">
            <text:p>45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62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29.68">
            <text:p>14029,68</text:p>
          </table:table-cell>
          <table:table-cell table:style-name="ce12N2" office:value-type="float" office:value="14.03">
            <text:p>1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26">
            <text:p>126,2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1163.63">
            <text:p>116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51784919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8">
            <text:p>3111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3">
            <text:p>0,165</text:p>
          </table:table-cell>
          <table:table-cell table:style-name="ce12N2" office:value-type="float" office:value="78.25">
            <text:p>78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8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25.29">
            <text:p>28425,29</text:p>
          </table:table-cell>
          <table:table-cell table:style-name="ce12N2" office:value-type="float" office:value="28.43">
            <text:p>2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83">
            <text:p>255,8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2357.62">
            <text:p>235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6186110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9">
            <text:p>3111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5464">
            <text:p>0,145</text:p>
          </table:table-cell>
          <table:table-cell table:style-name="ce12N2" office:value-type="float" office:value="68.86">
            <text:p>68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6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014.26">
            <text:p>25014,26</text:p>
          </table:table-cell>
          <table:table-cell table:style-name="ce12N2" office:value-type="float" office:value="25.01">
            <text:p>2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.13">
            <text:p>225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2074.7">
            <text:p>20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711316526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0">
            <text:p>3111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.28">
            <text:p>21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.26">
            <text:p>2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82">
            <text:p>0,000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.02">
            <text:p>169,02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200.26">
            <text:p>200,26</text:p>
          </table:table-cell>
          <table:table-cell table:style-name="ce12N2" office:value-type="float" office:value="14.02">
            <text:p>1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81351500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1">
            <text:p>3111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.55">
            <text:p>42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0.52">
            <text:p>40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64">
            <text:p>0,000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6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.02">
            <text:p>338,02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6.03">
            <text:p>26,03</text:p>
          </table:table-cell>
          <table:table-cell table:style-name="ce12N2" office:value-type="float" office:value="400.52">
            <text:p>400,52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91331890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2">
            <text:p>3111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5.47">
            <text:p>398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946.42">
            <text:p>394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8">
            <text:p>0,005</text:p>
          </table:table-cell>
          <table:table-cell table:style-name="ce12N2" office:value-type="float" office:value="4.41">
            <text:p>4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85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0.69">
            <text:p>3330,69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7">
            <text:p>29,9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3946.42">
            <text:p>3946,42</text:p>
          </table:table-cell>
          <table:table-cell table:style-name="ce12N2" office:value-type="float" office:value="276.24">
            <text:p>27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01580179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3">
            <text:p>3111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792">
            <text:p>0,029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4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4.11">
            <text:p>2484,11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6">
            <text:p>22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1163288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5">
            <text:p>3111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21.16">
            <text:p>5152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1226.98">
            <text:p>51226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29">
            <text:p>0,295</text:p>
          </table:table-cell>
          <table:table-cell table:style-name="ce12N2" office:value-type="float" office:value="192.98">
            <text:p>19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52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369.56">
            <text:p>43369,56</text:p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33">
            <text:p>390,3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94.18">
            <text:p>294,18</text:p>
          </table:table-cell>
          <table:table-cell table:style-name="ce12N2" office:value-type="float" office:value="49097.54">
            <text:p>49097,54</text:p>
          </table:table-cell>
          <table:table-cell table:style-name="ce12N2" office:value-type="float" office:value="3436.84">
            <text:p>34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31793631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6">
            <text:p>3111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8">
            <text:p>0,00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19.81">
            <text:p>3619,81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58">
            <text:p>32,5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300.23">
            <text:p>30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41208427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7">
            <text:p>3111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.13">
            <text:p>89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5">
            <text:p>0,001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2.94">
            <text:p>712,94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4.57">
            <text:p>54,57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53.95">
            <text:p>5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61713105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8">
            <text:p>3111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466.22">
            <text:p>20466,22</text:p>
          </table:table-cell>
          <table:table-cell table:style-name="ce12N2" office:value-type="float" office:value="20.47">
            <text:p>2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2">
            <text:p>184,2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1697.48">
            <text:p>169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7169706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9">
            <text:p>3111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58">
            <text:p>18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2.56">
            <text:p>169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8.48">
            <text:p>1428,48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86">
            <text:p>12,8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0.02">
            <text:p>110,02</text:p>
          </table:table-cell>
          <table:table-cell table:style-name="ce12N2" office:value-type="float" office:value="1692.56">
            <text:p>1692,56</text:p>
          </table:table-cell>
          <table:table-cell table:style-name="ce12N2" office:value-type="float" office:value="118.48">
            <text:p>1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8131508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0">
            <text:p>3112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.83">
            <text:p>6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0.78">
            <text:p>60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6">
            <text:p>0,001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7.05">
            <text:p>507,05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6">
            <text:p>4,5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600.78">
            <text:p>600,78</text:p>
          </table:table-cell>
          <table:table-cell table:style-name="ce12N2" office:value-type="float" office:value="42.05">
            <text:p>4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9127890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1">
            <text:p>3112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1.83">
            <text:p>1551,83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7">
            <text:p>13,9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128.71">
            <text:p>128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017555361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2">
            <text:p>3112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624">
            <text:p>0,044</text:p>
          </table:table-cell>
          <table:table-cell table:style-name="ce12N2" office:value-type="float" office:value="30.02">
            <text:p>30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3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71.22">
            <text:p>7371,22</text:p>
          </table:table-cell>
          <table:table-cell table:style-name="ce12N2" office:value-type="float" office:value="7.37">
            <text:p>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34">
            <text:p>66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611.37">
            <text:p>61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11339007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3">
            <text:p>3112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6">
            <text:p>0,023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9.58">
            <text:p>3879,58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92">
            <text:p>34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321.78">
            <text:p>32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21568192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4">
            <text:p>3112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5.78">
            <text:p>42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9.79">
            <text:p>399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115">
            <text:p>0,010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.41">
            <text:p>337,41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5.99">
            <text:p>25,99</text:p>
          </table:table-cell>
          <table:table-cell table:style-name="ce12N2" office:value-type="float" office:value="399.79">
            <text:p>399,79</text:p>
          </table:table-cell>
          <table:table-cell table:style-name="ce12N2" office:value-type="float" office:value="27.99">
            <text:p>2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31950718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6">
            <text:p>3112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6">
            <text:p>0,023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9.58">
            <text:p>3879,58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92">
            <text:p>34,9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321.78">
            <text:p>32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4129225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7">
            <text:p>3112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24.72">
            <text:p>742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24.72">
            <text:p>7424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9">
            <text:p>0,001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2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66.45">
            <text:p>6466,45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19">
            <text:p>58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74.19">
            <text:p>7374,19</text:p>
          </table:table-cell>
          <table:table-cell table:style-name="ce12N2" office:value-type="float" office:value="299.15">
            <text:p>29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61848831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8">
            <text:p>3112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30.1">
            <text:p>1043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378.03">
            <text:p>10378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581">
            <text:p>0,031</text:p>
          </table:table-cell>
          <table:table-cell table:style-name="ce12N2" office:value-type="float" office:value="13.94">
            <text:p>1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3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60.51">
            <text:p>8960,51</text:p>
          </table:table-cell>
          <table:table-cell table:style-name="ce12N2" office:value-type="float" office:value="8.96">
            <text:p>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64">
            <text:p>80,6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2.07">
            <text:p>52,07</text:p>
          </table:table-cell>
          <table:table-cell table:style-name="ce12N2" office:value-type="float" office:value="8862.26">
            <text:p>8862,26</text:p>
          </table:table-cell>
          <table:table-cell table:style-name="ce12N2" office:value-type="float" office:value="504.19">
            <text:p>50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712084318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9">
            <text:p>31120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32">
            <text:p>0,090</text:p>
          </table:table-cell>
          <table:table-cell table:style-name="ce12N2" office:value-type="float" office:value="3.95">
            <text:p>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8.93">
            <text:p>298,9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13.72">
            <text:p>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816709936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0">
            <text:p>31121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2.67">
            <text:p>1269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18">
            <text:p>119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7">
            <text:p>0,036</text:p>
          </table:table-cell>
          <table:table-cell table:style-name="ce12N2" office:value-type="float" office:value="13.24">
            <text:p>13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92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58.5">
            <text:p>10058,50</text:p>
          </table:table-cell>
          <table:table-cell table:style-name="ce12N2" office:value-type="float" office:value="10.06">
            <text:p>1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53">
            <text:p>90,5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774.67">
            <text:p>774,67</text:p>
          </table:table-cell>
          <table:table-cell table:style-name="ce12N2" office:value-type="float" office:value="11918">
            <text:p>11918,00</text:p>
          </table:table-cell>
          <table:table-cell table:style-name="ce12N2" office:value-type="float" office:value="834.26">
            <text:p>83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91541216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1">
            <text:p>3112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8688">
            <text:p>0,159</text:p>
          </table:table-cell>
          <table:table-cell table:style-name="ce12N2" office:value-type="float" office:value="75.12">
            <text:p>7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3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724.39">
            <text:p>28724,39</text:p>
          </table:table-cell>
          <table:table-cell table:style-name="ce12N2" office:value-type="float" office:value="28.72">
            <text:p>2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.52">
            <text:p>258,5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2382.42">
            <text:p>238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01413130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2">
            <text:p>3112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7.86">
            <text:p>380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5.46">
            <text:p>3575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71">
            <text:p>0,011</text:p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7.6">
            <text:p>3017,60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32.4">
            <text:p>232,40</text:p>
          </table:table-cell>
          <table:table-cell table:style-name="ce12N2" office:value-type="float" office:value="3575.46">
            <text:p>3575,46</text:p>
          </table:table-cell>
          <table:table-cell table:style-name="ce12N2" office:value-type="float" office:value="250.28">
            <text:p>2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111125709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3">
            <text:p>3112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40.85">
            <text:p>1514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773.79">
            <text:p>1477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25307">
            <text:p>1,925</text:p>
          </table:table-cell>
          <table:table-cell table:style-name="ce12N2" office:value-type="float" office:value="36.3">
            <text:p>3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4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20.55">
            <text:p>12820,55</text:p>
          </table:table-cell>
          <table:table-cell table:style-name="ce12N2" office:value-type="float" office:value="12.82">
            <text:p>1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.39">
            <text:p>115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67.06">
            <text:p>367,06</text:p>
          </table:table-cell>
          <table:table-cell table:style-name="ce12N2" office:value-type="float" office:value="14773.79">
            <text:p>14773,79</text:p>
          </table:table-cell>
          <table:table-cell table:style-name="ce12N2" office:value-type="float" office:value="646.46">
            <text:p>6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21136350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4">
            <text:p>3112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5.26">
            <text:p>49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97.5">
            <text:p>489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53">
            <text:p>0,026</text:p>
          </table:table-cell>
          <table:table-cell table:style-name="ce12N2" office:value-type="float" office:value="26.02">
            <text:p>2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5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61.76">
            <text:p>4161,76</text:p>
          </table:table-cell>
          <table:table-cell table:style-name="ce12N2" office:value-type="float" office:value="4.16">
            <text:p>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45">
            <text:p>37,45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67.76">
            <text:p>67,76</text:p>
          </table:table-cell>
          <table:table-cell table:style-name="ce12N2" office:value-type="float" office:value="4897.5">
            <text:p>4897,50</text:p>
          </table:table-cell>
          <table:table-cell table:style-name="ce12N2" office:value-type="float" office:value="311.55">
            <text:p>3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31533488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5">
            <text:p>3112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72">
            <text:p>0,091</text:p>
          </table:table-cell>
          <table:table-cell table:style-name="ce12N2" office:value-type="float" office:value="66.82">
            <text:p>6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97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91.34">
            <text:p>20891,34</text:p>
          </table:table-cell>
          <table:table-cell table:style-name="ce12N2" office:value-type="float" office:value="20.89">
            <text:p>2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02">
            <text:p>188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959.2">
            <text:p>95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51108321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6">
            <text:p>3112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88.47">
            <text:p>2888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737.37">
            <text:p>28737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72632">
            <text:p>1,073</text:p>
          </table:table-cell>
          <table:table-cell table:style-name="ce12N2" office:value-type="float" office:value="176.95">
            <text:p>176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88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373.56">
            <text:p>24373,56</text:p>
          </table:table-cell>
          <table:table-cell table:style-name="ce12N2" office:value-type="float" office:value="24.37">
            <text:p>2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.36">
            <text:p>219,3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51.1">
            <text:p>151,10</text:p>
          </table:table-cell>
          <table:table-cell table:style-name="ce12N2" office:value-type="float" office:value="28737.37">
            <text:p>28737,37</text:p>
          </table:table-cell>
          <table:table-cell table:style-name="ce12N2" office:value-type="float" office:value="1879.43">
            <text:p>187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611124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7">
            <text:p>3112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42">
            <text:p>0,008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06.04">
            <text:p>5206,04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85">
            <text:p>46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431.79">
            <text:p>43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71711649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9">
            <text:p>311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9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2.04">
            <text:p>1682,04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4">
            <text:p>15,1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139.51">
            <text:p>1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01838246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0">
            <text:p>311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24">
            <text:p>0,000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1.65">
            <text:p>2591,65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2">
            <text:p>23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214.95">
            <text:p>21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11804764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1">
            <text:p>311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">
            <text:p>0,002</text:p>
          </table:table-cell>
          <table:table-cell table:style-name="ce12N2" office:value-type="float" office:value="48.8">
            <text:p>4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63.81">
            <text:p>5363,81</text:p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27">
            <text:p>48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246.27">
            <text:p>24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214256620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2">
            <text:p>311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28">
            <text:p>0,046</text:p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26.03">
            <text:p>2726,03</text:p>
          </table:table-cell>
          <table:table-cell table:style-name="ce12N2" office:value-type="float" office:value="2.73">
            <text:p>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53">
            <text:p>24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226.1">
            <text:p>2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417143792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3">
            <text:p>311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8">
            <text:p>0,03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5.04">
            <text:p>2235,04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2">
            <text:p>20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185.38">
            <text:p>18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514369062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4">
            <text:p>311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28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17">
            <text:p>694,17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57.58">
            <text:p>5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61226118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5">
            <text:p>311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2.1">
            <text:p>362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42.08">
            <text:p>354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4">
            <text:p>0,011</text:p>
          </table:table-cell>
          <table:table-cell table:style-name="ce12N2" office:value-type="float" office:value="5.45">
            <text:p>5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89.44">
            <text:p>2989,44</text:p>
          </table:table-cell>
          <table:table-cell table:style-name="ce12N2" office:value-type="float" office:value="2.99">
            <text:p>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9">
            <text:p>26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3542.08">
            <text:p>3542,08</text:p>
          </table:table-cell>
          <table:table-cell table:style-name="ce12N2" office:value-type="float" office:value="247.94">
            <text:p>24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719905049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6">
            <text:p>311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4">
            <text:p>0,006</text:p>
          </table:table-cell>
          <table:table-cell table:style-name="ce12N2" office:value-type="float" office:value="3.95">
            <text:p>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6.83">
            <text:p>1116,83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5">
            <text:p>10,0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92.63">
            <text:p>9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81971825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7">
            <text:p>311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32">
            <text:p>0,036</text:p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39.13">
            <text:p>6339,13</text:p>
          </table:table-cell>
          <table:table-cell table:style-name="ce12N2" office:value-type="float" office:value="6.34">
            <text:p>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05">
            <text:p>57,0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918460909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8">
            <text:p>311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404">
            <text:p>0,026</text:p>
          </table:table-cell>
          <table:table-cell table:style-name="ce12N2" office:value-type="float" office:value="18.17">
            <text:p>18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4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3.06">
            <text:p>1473,06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6">
            <text:p>13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122.18">
            <text:p>12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30176942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0">
            <text:p>31123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">
            <text:p>0,010</text:p>
          </table:table-cell>
          <table:table-cell table:style-name="ce12N2" office:value-type="float" office:value="244">
            <text:p>24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.5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757.35">
            <text:p>59757,35</text:p>
          </table:table-cell>
          <table:table-cell table:style-name="ce12N2" office:value-type="float" office:value="59.76">
            <text:p>5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7.82">
            <text:p>537,8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2743.68">
            <text:p>274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532143448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6">
            <text:p>311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234.71">
            <text:p>66623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">
            <text:p>65,00</text:p>
          </table:table-cell>
          <table:table-cell table:style-name="ce12N2" office:value-type="float" office:value="664454.88">
            <text:p>6644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230666">
            <text:p>32,231</text:p>
          </table:table-cell>
          <table:table-cell table:style-name="ce12N2" office:value-type="float" office:value="1091.22">
            <text:p>109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6.23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5737.83">
            <text:p>565737,83</text:p>
          </table:table-cell>
          <table:table-cell table:style-name="ce12N2" office:value-type="float" office:value="565.74">
            <text:p>56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91.65">
            <text:p>5091,6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779.83">
            <text:p>1779,83</text:p>
          </table:table-cell>
          <table:table-cell table:style-name="ce12N2" office:value-type="float" office:value="660568.58">
            <text:p>660568,58</text:p>
          </table:table-cell>
          <table:table-cell table:style-name="ce12N2" office:value-type="float" office:value="41052.33">
            <text:p>4105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314841044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7">
            <text:p>311237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595.86">
            <text:p>1025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942">
            <text:p>31,942</text:p>
          </table:table-cell>
          <table:table-cell table:style-name="ce12N2" office:value-type="float" office:value="6000">
            <text:p>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5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2.8">
            <text:p>83862,80</text:p>
          </table:table-cell>
          <table:table-cell table:style-name="ce12N2" office:value-type="float" office:value="83.86">
            <text:p>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.77">
            <text:p>754,7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229.41">
            <text:p>3229,41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6955.65">
            <text:p>695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21575113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9">
            <text:p>31123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9.78">
            <text:p>610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67">
            <text:p>5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3">
            <text:p>0,108</text:p>
          </table:table-cell>
          <table:table-cell table:style-name="ce12N2" office:value-type="float" office:value="8.74">
            <text:p>8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0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98.4">
            <text:p>4698,40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29">
            <text:p>42,2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42.78">
            <text:p>542,78</text:p>
          </table:table-cell>
          <table:table-cell table:style-name="ce12N2" office:value-type="float" office:value="5567">
            <text:p>5567,00</text:p>
          </table:table-cell>
          <table:table-cell table:style-name="ce12N2" office:value-type="float" office:value="389.69">
            <text:p>38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51519807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0">
            <text:p>3112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9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6">
            <text:p>0,011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0.84">
            <text:p>2230,84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8">
            <text:p>20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185.03">
            <text:p>18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9741082884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1">
            <text:p>311241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26.32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62">
            <text:p>0,042</text:p>
          </table:table-cell>
          <table:table-cell table:style-name="ce12N2" office:value-type="float" office:value="246.25">
            <text:p>24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7.39">
            <text:p>8227,3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3">
            <text:p>74,0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682.39">
            <text:p>68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263251005398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2">
            <text:p>31124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26.32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28">
            <text:p>0,031</text:p>
          </table:table-cell>
          <table:table-cell table:style-name="ce12N2" office:value-type="float" office:value="157.25">
            <text:p>15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8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96.64">
            <text:p>5896,64</text:p>
          </table:table-cell>
          <table:table-cell table:style-name="ce12N2" office:value-type="float" office:value="5.88">
            <text:p>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05">
            <text:p>53,0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489.07">
            <text:p>4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263261007678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3">
            <text:p>311243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25.0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16.08">
            <text:p>3151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30524.05">
            <text:p>30524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1553">
            <text:p>0,242</text:p>
          </table:table-cell>
          <table:table-cell table:style-name="ce12N2" office:value-type="float" office:value="193.95">
            <text:p>19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16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1.51">
            <text:p>25761,51</text:p>
          </table:table-cell>
          <table:table-cell table:style-name="ce12N2" office:value-type="float" office:value="25.76">
            <text:p>2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85">
            <text:p>231,85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92.03">
            <text:p>992,03</text:p>
          </table:table-cell>
          <table:table-cell table:style-name="ce12N2" office:value-type="float" office:value="30524.05">
            <text:p>30524,05</text:p>
          </table:table-cell>
          <table:table-cell table:style-name="ce12N2" office:value-type="float" office:value="2136.69">
            <text:p>21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4683374000300550030006250661661295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4">
            <text:p>31125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7.63">
            <text:p>142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00.8">
            <text:p>13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4">
            <text:p>0,00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7.84">
            <text:p>1097,84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88">
            <text:p>9,88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26.83">
            <text:p>126,83</text:p>
          </table:table-cell>
          <table:table-cell table:style-name="ce12N2" office:value-type="float" office:value="1300.8">
            <text:p>1300,80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38127057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5">
            <text:p>3112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4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02.59">
            <text:p>159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4929.74">
            <text:p>14929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215732">
            <text:p>61,216</text:p>
          </table:table-cell>
          <table:table-cell table:style-name="ce12N2" office:value-type="float" office:value="48.99">
            <text:p>4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0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1.53">
            <text:p>12831,53</text:p>
          </table:table-cell>
          <table:table-cell table:style-name="ce12N2" office:value-type="float" office:value="12.84">
            <text:p>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.48">
            <text:p>115,48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72.85">
            <text:p>972,85</text:p>
          </table:table-cell>
          <table:table-cell table:style-name="ce12N2" office:value-type="float" office:value="14929.74">
            <text:p>14929,74</text:p>
          </table:table-cell>
          <table:table-cell table:style-name="ce12N2" office:value-type="float" office:value="790.31">
            <text:p>7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481098659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5">
            <text:p>3112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38">
            <text:p>0,008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.61">
            <text:p>431,6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35.8">
            <text:p>3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51371936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6">
            <text:p>3112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20.66">
            <text:p>1522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127.16">
            <text:p>15127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2084">
            <text:p>0,182</text:p>
          </table:table-cell>
          <table:table-cell table:style-name="ce12N2" office:value-type="float" office:value="68.31">
            <text:p>68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22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39.62">
            <text:p>13139,62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26">
            <text:p>11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3.5">
            <text:p>93,50</text:p>
          </table:table-cell>
          <table:table-cell table:style-name="ce12N2" office:value-type="float" office:value="15127.16">
            <text:p>15127,16</text:p>
          </table:table-cell>
          <table:table-cell table:style-name="ce12N2" office:value-type="float" office:value="648.25">
            <text:p>6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51257037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7">
            <text:p>3112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6.98">
            <text:p>446,9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2">
            <text:p>4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37.07">
            <text:p>3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41336564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8">
            <text:p>3112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38">
            <text:p>0,008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.61">
            <text:p>431,6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35.8">
            <text:p>3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91222490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0">
            <text:p>31127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9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69.42">
            <text:p>4486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579.65">
            <text:p>44579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5114">
            <text:p>5,735</text:p>
          </table:table-cell>
          <table:table-cell table:style-name="ce12N2" office:value-type="float" office:value="32123.76">
            <text:p>3212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869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24.12">
            <text:p>37624,12</text:p>
          </table:table-cell>
          <table:table-cell table:style-name="ce12N2" office:value-type="float" office:value="37.62">
            <text:p>3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.62">
            <text:p>338,62</text:p>
          </table:table-cell>
          <table:table-cell table:style-name="ce12N2" office:value-type="float" office:value="98.04">
            <text:p>98,0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89.77">
            <text:p>289,77</text:p>
          </table:table-cell>
          <table:table-cell table:style-name="ce12N2" office:value-type="float" office:value="44579.65">
            <text:p>44579,65</text:p>
          </table:table-cell>
          <table:table-cell table:style-name="ce12N2" office:value-type="float" office:value="3120.58">
            <text:p>31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9421646860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3">
            <text:p>311273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97.1">
            <text:p>5309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425.76">
            <text:p>5142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9675">
            <text:p>17,968</text:p>
          </table:table-cell>
          <table:table-cell table:style-name="ce12N2" office:value-type="float" office:value="2904">
            <text:p>29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09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2.05">
            <text:p>43402,05</text:p>
          </table:table-cell>
          <table:table-cell table:style-name="ce12N2" office:value-type="float" office:value="43.4">
            <text:p>4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62">
            <text:p>390,6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71.34">
            <text:p>1671,34</text:p>
          </table:table-cell>
          <table:table-cell table:style-name="ce12N2" office:value-type="float" office:value="51425.76">
            <text:p>51425,76</text:p>
          </table:table-cell>
          <table:table-cell table:style-name="ce12N2" office:value-type="float" office:value="3599.8">
            <text:p>35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31575113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4">
            <text:p>311274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449.13">
            <text:p>3444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364.77">
            <text:p>33364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81854">
            <text:p>11,819</text:p>
          </table:table-cell>
          <table:table-cell table:style-name="ce12N2" office:value-type="float" office:value="2220">
            <text:p>22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449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029.24">
            <text:p>31029,2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9.26">
            <text:p>279,2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84.36">
            <text:p>1084,36</text:p>
          </table:table-cell>
          <table:table-cell table:style-name="ce12N2" office:value-type="float" office:value="33364.77">
            <text:p>33364,77</text:p>
          </table:table-cell>
          <table:table-cell table:style-name="ce12N2" office:value-type="float" office:value="2335.53">
            <text:p>233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415751136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6">
            <text:p>31127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9.83">
            <text:p>581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02.8">
            <text:p>53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831">
            <text:p>0,098</text:p>
          </table:table-cell>
          <table:table-cell table:style-name="ce12N2" office:value-type="float" office:value="8.23">
            <text:p>8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5.43">
            <text:p>4475,43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7">
            <text:p>40,2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17.03">
            <text:p>517,03</text:p>
          </table:table-cell>
          <table:table-cell table:style-name="ce12N2" office:value-type="float" office:value="5302.8">
            <text:p>5302,80</text:p>
          </table:table-cell>
          <table:table-cell table:style-name="ce12N2" office:value-type="float" office:value="371.2">
            <text:p>37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413080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8">
            <text:p>31127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48.49">
            <text:p>464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79.16">
            <text:p>447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4">
            <text:p>0,002</text:p>
          </table:table-cell>
          <table:table-cell table:style-name="ce12N2" office:value-type="float" office:value="0.82">
            <text:p>0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48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0.26">
            <text:p>3790,26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12">
            <text:p>34,1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9.33">
            <text:p>169,33</text:p>
          </table:table-cell>
          <table:table-cell table:style-name="ce12N2" office:value-type="float" office:value="4479.16">
            <text:p>4479,16</text:p>
          </table:table-cell>
          <table:table-cell table:style-name="ce12N2" office:value-type="float" office:value="302.57">
            <text:p>30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7173807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9">
            <text:p>31127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4.72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7.49">
            <text:p>10033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99480.68">
            <text:p>9948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810542">
            <text:p>14,811</text:p>
          </table:table-cell>
          <table:table-cell table:style-name="ce12N2" office:value-type="float" office:value="1696.89">
            <text:p>1696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33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67.85">
            <text:p>84267,85</text:p>
          </table:table-cell>
          <table:table-cell table:style-name="ce12N2" office:value-type="float" office:value="84.26">
            <text:p>8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8.4">
            <text:p>758,4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56.81">
            <text:p>856,81</text:p>
          </table:table-cell>
          <table:table-cell table:style-name="ce12N2" office:value-type="float" office:value="99480.68">
            <text:p>99480,68</text:p>
          </table:table-cell>
          <table:table-cell table:style-name="ce12N2" office:value-type="float" office:value="6623.46">
            <text:p>662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47291093606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0">
            <text:p>31128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1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5.6">
            <text:p>391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708.6">
            <text:p>37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21">
            <text:p>0,041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3.6">
            <text:p>3173,60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7">
            <text:p>28,57</text:p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07">
            <text:p>207,00</text:p>
          </table:table-cell>
          <table:table-cell table:style-name="ce12N2" office:value-type="float" office:value="3708.6">
            <text:p>3708,60</text:p>
          </table:table-cell>
          <table:table-cell table:style-name="ce12N2" office:value-type="float" office:value="211.49">
            <text:p>21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1211190130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1">
            <text:p>31128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0.97">
            <text:p>8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0.88">
            <text:p>77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308">
            <text:p>0,007</text:p>
          </table:table-cell>
          <table:table-cell table:style-name="ce12N2" office:value-type="float" office:value="3.27">
            <text:p>3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0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0.04">
            <text:p>740,04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0.09">
            <text:p>40,09</text:p>
          </table:table-cell>
          <table:table-cell table:style-name="ce12N2" office:value-type="float" office:value="770.88">
            <text:p>770,88</text:p>
          </table:table-cell>
          <table:table-cell table:style-name="ce12N2" office:value-type="float" office:value="30.84">
            <text:p>3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21454733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2">
            <text:p>311282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.25">
            <text:p>68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.38">
            <text:p>65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88">
            <text:p>0,011</text:p>
          </table:table-cell>
          <table:table-cell table:style-name="ce12N2" office:value-type="float" office:value="6.24">
            <text:p>6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9.74">
            <text:p>549,7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5">
            <text:p>4,95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651.38">
            <text:p>651,38</text:p>
          </table:table-cell>
          <table:table-cell table:style-name="ce12N2" office:value-type="float" office:value="45.6">
            <text:p>4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31486921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19">
            <text:p>31131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76.16">
            <text:p>1097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76.16">
            <text:p>1097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1044">
            <text:p>1,210</text:p>
          </table:table-cell>
          <table:table-cell table:style-name="ce12N2" office:value-type="float" office:value="480.08">
            <text:p>48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97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63.61">
            <text:p>9263,61</text:p>
          </table:table-cell>
          <table:table-cell table:style-name="ce12N2" office:value-type="float" office:value="9.26">
            <text:p>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.37">
            <text:p>8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76.16">
            <text:p>10976,16</text:p>
          </table:table-cell>
          <table:table-cell table:style-name="ce12N2" office:value-type="float" office:value="768.33">
            <text:p>76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8191346712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0">
            <text:p>31132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26">
            <text:p>361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126">
            <text:p>361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72">
            <text:p>3,072</text:p>
          </table:table-cell>
          <table:table-cell table:style-name="ce12N2" office:value-type="float" office:value="1289.45">
            <text:p>1289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1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89.44">
            <text:p>30489,44</text:p>
          </table:table-cell>
          <table:table-cell table:style-name="ce12N2" office:value-type="float" office:value="30.49">
            <text:p>3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.4">
            <text:p>27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126">
            <text:p>36126,00</text:p>
          </table:table-cell>
          <table:table-cell table:style-name="ce12N2" office:value-type="float" office:value="2528.82">
            <text:p>252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814175876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1">
            <text:p>311321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74.4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8.55">
            <text:p>335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53.57">
            <text:p>3153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95">
            <text:p>0,018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8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1.53">
            <text:p>2661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204.98">
            <text:p>204,98</text:p>
          </table:table-cell>
          <table:table-cell table:style-name="ce12N2" office:value-type="float" office:value="3153.57">
            <text:p>3153,57</text:p>
          </table:table-cell>
          <table:table-cell table:style-name="ce12N2" office:value-type="float" office:value="220.75">
            <text:p>22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7834883000113550010006744841659747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2">
            <text:p>311322</text:p>
          </table:table-cell>
          <table:table-cell table:style-name="ce0" table:number-columns-spanned="4" table:number-rows-spanned="1" office:value-type="string" calcext:value-type="string">
            <text:p>12.833 - MULTI- BARRAS INDUSTRIA E COMERCIO EIRELI-EPP</text:p>
          </table:table-cell>
          <table:covered-table-cell table:number-columns-repeated="3"/>
          <table:table-cell table:style-name="ce0" office:value-type="string" calcext:value-type="string">
            <text:p>32.0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186.33">
            <text:p>24218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27405">
            <text:p>22740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7837">
            <text:p>13,784</text:p>
          </table:table-cell>
          <table:table-cell table:style-name="ce12N2" office:value-type="float" office:value="32000">
            <text:p>3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2.186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924.14">
            <text:p>191924,14</text:p>
          </table:table-cell>
          <table:table-cell table:style-name="ce12N2" office:value-type="float" office:value="191.93">
            <text:p>19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7.31">
            <text:p>1727,31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4781.33">
            <text:p>14781,33</text:p>
          </table:table-cell>
          <table:table-cell table:style-name="ce12N2" office:value-type="float" office:value="227405">
            <text:p>227405,00</text:p>
          </table:table-cell>
          <table:table-cell table:style-name="ce12N2" office:value-type="float" office:value="15918.35">
            <text:p>1591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27404236000140550010000320061105223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3">
            <text:p>31132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62.56">
            <text:p>1296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62.56">
            <text:p>1296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24">
            <text:p>1,382</text:p>
          </table:table-cell>
          <table:table-cell table:style-name="ce12N2" office:value-type="float" office:value="635.54">
            <text:p>63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62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40.08">
            <text:p>10940,08</text:p>
          </table:table-cell>
          <table:table-cell table:style-name="ce12N2" office:value-type="float" office:value="10.94">
            <text:p>1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62.56">
            <text:p>12962,56</text:p>
          </table:table-cell>
          <table:table-cell table:style-name="ce12N2" office:value-type="float" office:value="907.38">
            <text:p>907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8171295406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5">
            <text:p>3113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9.32">
            <text:p>310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09.32">
            <text:p>310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896">
            <text:p>0,077</text:p>
          </table:table-cell>
          <table:table-cell table:style-name="ce12N2" office:value-type="float" office:value="44.4">
            <text:p>4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08.84">
            <text:p>2708,84</text:p>
          </table:table-cell>
          <table:table-cell table:style-name="ce12N2" office:value-type="float" office:value="2.71">
            <text:p>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38">
            <text:p>24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9.32">
            <text:p>3109,32</text:p>
          </table:table-cell>
          <table:table-cell table:style-name="ce12N2" office:value-type="float" office:value="124.37">
            <text:p>12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71161852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7">
            <text:p>3113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39.1">
            <text:p>1253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39.1">
            <text:p>1253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6964">
            <text:p>1,470</text:p>
          </table:table-cell>
          <table:table-cell table:style-name="ce12N2" office:value-type="float" office:value="570">
            <text:p>5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3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82.69">
            <text:p>10582,69</text:p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24">
            <text:p>95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39.1">
            <text:p>12539,10</text:p>
          </table:table-cell>
          <table:table-cell table:style-name="ce12N2" office:value-type="float" office:value="877.74">
            <text:p>87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61287323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8">
            <text:p>31133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752.94">
            <text:p>6275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62752.94">
            <text:p>6275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517">
            <text:p>6,152</text:p>
          </table:table-cell>
          <table:table-cell table:style-name="ce12N2" office:value-type="float" office:value="1963.57">
            <text:p>1963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752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216.56">
            <text:p>53216,56</text:p>
          </table:table-cell>
          <table:table-cell table:style-name="ce12N2" office:value-type="float" office:value="53.22">
            <text:p>5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.94">
            <text:p>478,9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752.94">
            <text:p>62752,94</text:p>
          </table:table-cell>
          <table:table-cell table:style-name="ce12N2" office:value-type="float" office:value="4112.1">
            <text:p>411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51102320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1">
            <text:p>311341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13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00">
            <text:p>88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00">
            <text:p>88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6.98">
            <text:p>7426,98</text:p>
          </table:table-cell>
          <table:table-cell table:style-name="ce12N2" office:value-type="float" office:value="7.43">
            <text:p>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84">
            <text:p>66,8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00">
            <text:p>8800,00</text:p>
          </table:table-cell>
          <table:table-cell table:style-name="ce12N2" office:value-type="float" office:value="616">
            <text:p>6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064150000518550010002139011427549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3">
            <text:p>31134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2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8.01">
            <text:p>99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6.6">
            <text:p>96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">
            <text:p>0,017</text:p>
          </table:table-cell>
          <table:table-cell table:style-name="ce12N2" office:value-type="float" office:value="1.14">
            <text:p>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8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.11">
            <text:p>842,1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8">
            <text:p>7,5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1.41">
            <text:p>31,41</text:p>
          </table:table-cell>
          <table:table-cell table:style-name="ce12N2" office:value-type="float" office:value="966.6">
            <text:p>966,60</text:p>
          </table:table-cell>
          <table:table-cell table:style-name="ce12N2" office:value-type="float" office:value="38.66">
            <text:p>3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2215423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4">
            <text:p>31134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03">
            <text:p>110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65.4">
            <text:p>106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87">
            <text:p>0,065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8.18">
            <text:p>928,18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35">
            <text:p>8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4.63">
            <text:p>34,63</text:p>
          </table:table-cell>
          <table:table-cell table:style-name="ce12N2" office:value-type="float" office:value="1065.4">
            <text:p>1065,40</text:p>
          </table:table-cell>
          <table:table-cell table:style-name="ce12N2" office:value-type="float" office:value="42.62">
            <text:p>4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181841383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5">
            <text:p>31134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9.46">
            <text:p>99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8">
            <text:p>9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8">
            <text:p>0,023</text:p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3.32">
            <text:p>843,32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1.46">
            <text:p>31,46</text:p>
          </table:table-cell>
          <table:table-cell table:style-name="ce12N2" office:value-type="float" office:value="968">
            <text:p>968,00</text:p>
          </table:table-cell>
          <table:table-cell table:style-name="ce12N2" office:value-type="float" office:value="38.72">
            <text:p>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241203830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6">
            <text:p>31134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.05">
            <text:p>13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86.25">
            <text:p>128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15">
            <text:p>0,012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8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0.58">
            <text:p>1120,58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41.8">
            <text:p>41,80</text:p>
          </table:table-cell>
          <table:table-cell table:style-name="ce12N2" office:value-type="float" office:value="1286.25">
            <text:p>1286,25</text:p>
          </table:table-cell>
          <table:table-cell table:style-name="ce12N2" office:value-type="float" office:value="51.45">
            <text:p>5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131991439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7">
            <text:p>31134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.03">
            <text:p>4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.4">
            <text:p>4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4">
            <text:p>0,006</text:p>
          </table:table-cell>
          <table:table-cell table:style-name="ce12N2" office:value-type="float" office:value="4.92">
            <text:p>4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.38">
            <text:p>365,38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29">
            <text:p>3,2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3.63">
            <text:p>13,63</text:p>
          </table:table-cell>
          <table:table-cell table:style-name="ce12N2" office:value-type="float" office:value="419.4">
            <text:p>419,40</text:p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341672934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8">
            <text:p>31134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7.3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865">
            <text:p>8686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865">
            <text:p>8686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0.1">
            <text:p>170,100</text:p>
          </table:table-cell>
          <table:table-cell table:style-name="ce12N2" office:value-type="float" office:value="16170">
            <text:p>161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86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70.39">
            <text:p>69370,39</text:p>
          </table:table-cell>
          <table:table-cell table:style-name="ce12N2" office:value-type="float" office:value="69.37">
            <text:p>6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.33">
            <text:p>624,3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865">
            <text:p>86865,00</text:p>
          </table:table-cell>
          <table:table-cell table:style-name="ce12N2" office:value-type="float" office:value="10423.8">
            <text:p>104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73761423554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1">
            <text:p>31135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6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.22">
            <text:p>5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5">
            <text:p>51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8.23">
            <text:p>448,23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514.5">
            <text:p>514,50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651238193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2">
            <text:p>3113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31.1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4.54">
            <text:p>195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17.18">
            <text:p>181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5">
            <text:p>0,073</text:p>
          </table:table-cell>
          <table:table-cell table:style-name="ce12N2" office:value-type="float" office:value="13.3">
            <text:p>1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3.66">
            <text:p>1533,66</text:p>
          </table:table-cell>
          <table:table-cell table:style-name="ce12N2" office:value-type="float" office:value="1.54">
            <text:p>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8">
            <text:p>13,8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37.36">
            <text:p>137,36</text:p>
          </table:table-cell>
          <table:table-cell table:style-name="ce12N2" office:value-type="float" office:value="1817.18">
            <text:p>1817,18</text:p>
          </table:table-cell>
          <table:table-cell table:style-name="ce12N2" office:value-type="float" office:value="127.2">
            <text:p>12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3113815804616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4">
            <text:p>31135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4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91.8">
            <text:p>1119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91.8">
            <text:p>1119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03">
            <text:p>0,152</text:p>
          </table:table-cell>
          <table:table-cell table:style-name="ce12N2" office:value-type="float" office:value="66.7">
            <text:p>66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9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3">
            <text:p>9750,30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5">
            <text:p>87,7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91.8">
            <text:p>11191,80</text:p>
          </table:table-cell>
          <table:table-cell table:style-name="ce12N2" office:value-type="float" office:value="447.67">
            <text:p>44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497511000074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6">
            <text:p>311356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518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18.38">
            <text:p>3561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18.38">
            <text:p>3561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504">
            <text:p>6,350</text:p>
          </table:table-cell>
          <table:table-cell table:style-name="ce12N2" office:value-type="float" office:value="4334.04">
            <text:p>433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61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061.02">
            <text:p>30061,02</text:p>
          </table:table-cell>
          <table:table-cell table:style-name="ce12N2" office:value-type="float" office:value="30.06">
            <text:p>3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.55">
            <text:p>270,5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618.38">
            <text:p>35618,38</text:p>
          </table:table-cell>
          <table:table-cell table:style-name="ce12N2" office:value-type="float" office:value="2493.29">
            <text:p>249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51816531616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7">
            <text:p>31135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519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46">
            <text:p>88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73.46">
            <text:p>8873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553">
            <text:p>1,455</text:p>
          </table:table-cell>
          <table:table-cell table:style-name="ce12N2" office:value-type="float" office:value="1070.01">
            <text:p>1070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8.98">
            <text:p>7488,98</text:p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41">
            <text:p>67,4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73.46">
            <text:p>8873,46</text:p>
          </table:table-cell>
          <table:table-cell table:style-name="ce12N2" office:value-type="float" office:value="621.14">
            <text:p>62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5191767064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8">
            <text:p>311358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75.9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6.76">
            <text:p>167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6.76">
            <text:p>1676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518">
            <text:p>0,065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0.79">
            <text:p>1460,79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5">
            <text:p>13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6.76">
            <text:p>1676,76</text:p>
          </table:table-cell>
          <table:table-cell table:style-name="ce12N2" office:value-type="float" office:value="67.07">
            <text:p>6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6840537000121550010003759431023264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9">
            <text:p>311359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75.9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036">
            <text:p>0,129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1.59">
            <text:p>2921,59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134.14">
            <text:p>13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6840537000121550010003759461024738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60">
            <text:p>311360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75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036">
            <text:p>0,129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1.59">
            <text:p>2921,59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134.14">
            <text:p>13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6840537000121550010003759651363548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65">
            <text:p>31136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081.87">
            <text:p>3608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4148.12">
            <text:p>3414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4142">
            <text:p>1,164</text:p>
          </table:table-cell>
          <table:table-cell table:style-name="ce12N2" office:value-type="float" office:value="126.17">
            <text:p>126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08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49.81">
            <text:p>29749,81</text:p>
          </table:table-cell>
          <table:table-cell table:style-name="ce12N2" office:value-type="float" office:value="29.74">
            <text:p>2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.75">
            <text:p>267,7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1933.75">
            <text:p>1933,75</text:p>
          </table:table-cell>
          <table:table-cell table:style-name="ce12N2" office:value-type="float" office:value="34148.12">
            <text:p>34148,12</text:p>
          </table:table-cell>
          <table:table-cell table:style-name="ce12N2" office:value-type="float" office:value="1365.94">
            <text:p>136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5331392169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80">
            <text:p>311380</text:p>
          </table:table-cell>
          <table:table-cell table:style-name="ce0" table:number-columns-spanned="4" table:number-rows-spanned="1" office:value-type="string" calcext:value-type="string">
            <text:p>15.151 - NOC COMERCIO DE METAIS LTDA</text:p>
          </table:table-cell>
          <table:covered-table-cell table:number-columns-repeated="3"/>
          <table:table-cell table:style-name="ce0" office:value-type="string" calcext:value-type="string">
            <text:p>5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260.75">
            <text:p>4426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260.75">
            <text:p>4426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448">
            <text:p>0,199</text:p>
          </table:table-cell>
          <table:table-cell table:style-name="ce12N2" office:value-type="float" office:value="342.89">
            <text:p>34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26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.5">
            <text:p>49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260.75">
            <text:p>44260,75</text:p>
          </table:table-cell>
          <table:table-cell table:style-name="ce12N2" office:value-type="float" office:value="1310.11">
            <text:p>131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0927514000102550010000051581479099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4">
            <text:p>311394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81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588.96">
            <text:p>21258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12588.96">
            <text:p>21258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78.9965">
            <text:p>2878,997</text:p>
          </table:table-cell>
          <table:table-cell table:style-name="ce12N2" office:value-type="float" office:value="5776.11">
            <text:p>5776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2.58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419.76">
            <text:p>179419,76</text:p>
          </table:table-cell>
          <table:table-cell table:style-name="ce12N2" office:value-type="float" office:value="179.42">
            <text:p>17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4.78">
            <text:p>1614,7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588.96">
            <text:p>212588,96</text:p>
          </table:table-cell>
          <table:table-cell table:style-name="ce12N2" office:value-type="float" office:value="14881.23">
            <text:p>148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544042000119550010004815411875127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9">
            <text:p>31139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16.6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582.66">
            <text:p>5058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256">
            <text:p>5025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288">
            <text:p>9,288</text:p>
          </table:table-cell>
          <table:table-cell table:style-name="ce12N2" office:value-type="float" office:value="24600">
            <text:p>246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58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414.81">
            <text:p>42414,81</text:p>
          </table:table-cell>
          <table:table-cell table:style-name="ce12N2" office:value-type="float" office:value="42.41">
            <text:p>4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.73">
            <text:p>381,7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326.66">
            <text:p>326,66</text:p>
          </table:table-cell>
          <table:table-cell table:style-name="ce12N2" office:value-type="float" office:value="50256">
            <text:p>50256,00</text:p>
          </table:table-cell>
          <table:table-cell table:style-name="ce12N2" office:value-type="float" office:value="3517.92">
            <text:p>351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020.96">
            <text:p>502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62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21/07/2026</text:p>
          </table:table-cell>
          <table:table-cell table:style-name="ce12" office:value-type="string" calcext:value-type="string">
            <text:p>5.020,9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35260756883820000204550030019166471927492231</text:p>
          </table:table-cell>
          <table:table-cell table:style-name="ce0" office:value-type="string" calcext:value-type="string">
            <text:p>3526075432020300019457001000004462117837627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1">
            <text:p>311401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13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94.05">
            <text:p>2579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5068.22">
            <text:p>25068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1496">
            <text:p>1,041</text:p>
          </table:table-cell>
          <table:table-cell table:style-name="ce12N2" office:value-type="float" office:value="1253.02">
            <text:p>125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794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30.59">
            <text:p>21330,59</text:p>
          </table:table-cell>
          <table:table-cell table:style-name="ce12N2" office:value-type="float" office:value="21.33">
            <text:p>2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.98">
            <text:p>191,98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725.83">
            <text:p>725,83</text:p>
          </table:table-cell>
          <table:table-cell table:style-name="ce12N2" office:value-type="float" office:value="25068.22">
            <text:p>25068,22</text:p>
          </table:table-cell>
          <table:table-cell table:style-name="ce12N2" office:value-type="float" office:value="1563.44">
            <text:p>156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064150000518550010002139861154438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2">
            <text:p>311402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9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262.41">
            <text:p>492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48322.2">
            <text:p>4832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5.996052">
            <text:p>265,996</text:p>
          </table:table-cell>
          <table:table-cell table:style-name="ce12N2" office:value-type="float" office:value="1830.66">
            <text:p>1830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262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740.07">
            <text:p>41740,07</text:p>
          </table:table-cell>
          <table:table-cell table:style-name="ce12N2" office:value-type="float" office:value="41.75">
            <text:p>4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.65">
            <text:p>375,6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940.21">
            <text:p>940,21</text:p>
          </table:table-cell>
          <table:table-cell table:style-name="ce12N2" office:value-type="float" office:value="48322.2">
            <text:p>48322,20</text:p>
          </table:table-cell>
          <table:table-cell table:style-name="ce12N2" office:value-type="float" office:value="2260.76">
            <text:p>226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0648380165605500100053935219581573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3">
            <text:p>311403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6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2.2">
            <text:p>368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82.2">
            <text:p>36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82">
            <text:p>0,210</text:p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8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07.68">
            <text:p>3107,68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97">
            <text:p>27,9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82.2">
            <text:p>3682,20</text:p>
          </table:table-cell>
          <table:table-cell table:style-name="ce12N2" office:value-type="float" office:value="257.76">
            <text:p>25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66511824892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4">
            <text:p>311404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7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485.69">
            <text:p>277485,69</text:p>
          </table:table-cell>
          <table:table-cell table:style-name="ce12N2" office:value-type="float" office:value="12000.78">
            <text:p>12000,78</text:p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257207.16">
            <text:p>257207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.55502">
            <text:p>69,555</text:p>
          </table:table-cell>
          <table:table-cell table:style-name="ce12N2" office:value-type="float" office:value="12054.81">
            <text:p>1205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7.485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36.49">
            <text:p>213536,49</text:p>
          </table:table-cell>
          <table:table-cell table:style-name="ce12N2" office:value-type="float" office:value="213.52">
            <text:p>21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1.86">
            <text:p>1921,86</text:p>
          </table:table-cell>
          <table:table-cell table:style-name="ce12N2" office:value-type="float" office:value="78.2">
            <text:p>78,2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2406.05">
            <text:p>22406,05</text:p>
          </table:table-cell>
          <table:table-cell table:style-name="ce12N2" office:value-type="float" office:value="245206.38">
            <text:p>245206,38</text:p>
          </table:table-cell>
          <table:table-cell table:style-name="ce12N2" office:value-type="float" office:value="9904.49">
            <text:p>990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4585.59">
            <text:p>54585,59</text:p>
          </table:table-cell>
          <table:table-cell table:style-name="ce12N2" office:value-type="float" office:value="9873.26">
            <text:p>9873,2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794716302548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6">
            <text:p>311406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6.148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410.24">
            <text:p>5541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410.24">
            <text:p>5541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09696">
            <text:p>5,110</text:p>
          </table:table-cell>
          <table:table-cell table:style-name="ce12N2" office:value-type="float" office:value="3794.98">
            <text:p>379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41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250.61">
            <text:p>44250,61</text:p>
          </table:table-cell>
          <table:table-cell table:style-name="ce12N2" office:value-type="float" office:value="44.25">
            <text:p>4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8.26">
            <text:p>39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410.24">
            <text:p>55410,24</text:p>
          </table:table-cell>
          <table:table-cell table:style-name="ce12N2" office:value-type="float" office:value="6649.23">
            <text:p>664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61.92">
            <text:p>66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814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21/07/2026</text:p>
          </table:table-cell>
          <table:table-cell table:style-name="ce12" office:value-type="string" calcext:value-type="string">
            <text:p>661,92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32260710524837000193550070000261481433697442</text:p>
          </table:table-cell>
          <table:table-cell table:style-name="ce0" office:value-type="string" calcext:value-type="string">
            <text:p>3226072874377700016557001000019814100022754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7">
            <text:p>311407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6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539.77">
            <text:p>23539,77</text:p>
          </table:table-cell>
          <table:table-cell table:style-name="ce12N2" office:value-type="float" office:value="3278.23">
            <text:p>3278,23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6818">
            <text:p>268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7142">
            <text:p>41,714</text:p>
          </table:table-cell>
          <table:table-cell table:style-name="ce12N2" office:value-type="float" office:value="1196.04">
            <text:p>1196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539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66.95">
            <text:p>19866,95</text:p>
          </table:table-cell>
          <table:table-cell table:style-name="ce12N2" office:value-type="float" office:value="19.84">
            <text:p>1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79">
            <text:p>178,7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539.77">
            <text:p>23539,77</text:p>
          </table:table-cell>
          <table:table-cell table:style-name="ce12N2" office:value-type="float" office:value="1647.8">
            <text:p>164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66741193271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9">
            <text:p>311409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81.6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315.65">
            <text:p>17031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0315.65">
            <text:p>170315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94.821756">
            <text:p>3794,822</text:p>
          </table:table-cell>
          <table:table-cell table:style-name="ce12N2" office:value-type="float" office:value="2020.68">
            <text:p>2020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.31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742.15">
            <text:p>143742,15</text:p>
          </table:table-cell>
          <table:table-cell table:style-name="ce12N2" office:value-type="float" office:value="143.74">
            <text:p>14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3.68">
            <text:p>1293,6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315.65">
            <text:p>170315,65</text:p>
          </table:table-cell>
          <table:table-cell table:style-name="ce12N2" office:value-type="float" office:value="11922.1">
            <text:p>1192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544042000119550010004816701881461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1">
            <text:p>311411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53.855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4.11">
            <text:p>117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6.07">
            <text:p>111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84">
            <text:p>0,004</text:p>
          </table:table-cell>
          <table:table-cell table:style-name="ce12N2" office:value-type="float" office:value="2.12">
            <text:p>2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2.32">
            <text:p>972,32</text:p>
          </table:table-cell>
          <table:table-cell table:style-name="ce12N2" office:value-type="float" office:value="0.97">
            <text:p>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5">
            <text:p>8,7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58.04">
            <text:p>58,04</text:p>
          </table:table-cell>
          <table:table-cell table:style-name="ce12N2" office:value-type="float" office:value="1116.07">
            <text:p>1116,07</text:p>
          </table:table-cell>
          <table:table-cell table:style-name="ce12N2" office:value-type="float" office:value="44.64">
            <text:p>4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3296273003298550230024538551601842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2">
            <text:p>3114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5.4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171">
            <text:p>0,062</text:p>
          </table:table-cell>
          <table:table-cell table:style-name="ce12N2" office:value-type="float" office:value="5.66">
            <text:p>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.5">
            <text:p>1566,50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">
            <text:p>14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129.93">
            <text:p>1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54731654840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3">
            <text:p>311413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5.27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9.05">
            <text:p>760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09.05">
            <text:p>760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8465">
            <text:p>0,588</text:p>
          </table:table-cell>
          <table:table-cell table:style-name="ce12N2" office:value-type="float" office:value="59.97">
            <text:p>59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09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30.73">
            <text:p>6430,73</text:p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8">
            <text:p>57,8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9.05">
            <text:p>7609,05</text:p>
          </table:table-cell>
          <table:table-cell table:style-name="ce12N2" office:value-type="float" office:value="522.85">
            <text:p>52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52721564209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4">
            <text:p>311414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62.7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685.18">
            <text:p>6168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741.31">
            <text:p>5274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.901867">
            <text:p>320,902</text:p>
          </table:table-cell>
          <table:table-cell table:style-name="ce12N2" office:value-type="float" office:value="2199.07">
            <text:p>2199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68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119.21">
            <text:p>42119,21</text:p>
          </table:table-cell>
          <table:table-cell table:style-name="ce12N2" office:value-type="float" office:value="42.13">
            <text:p>4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7">
            <text:p>379,0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28.81">
            <text:p>228,81</text:p>
          </table:table-cell>
          <table:table-cell table:style-name="ce12N2" office:value-type="float" office:value="52741.31">
            <text:p>52741,31</text:p>
          </table:table-cell>
          <table:table-cell table:style-name="ce12N2" office:value-type="float" office:value="6328.96">
            <text:p>632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4838.95">
            <text:p>74838,95</text:p>
          </table:table-cell>
          <table:table-cell table:style-name="ce12N2" office:value-type="float" office:value="8715.06">
            <text:p>8715,0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10921911001004550010002627761246663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8">
            <text:p>31141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61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3.76">
            <text:p>9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">
            <text:p>88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">
            <text:p>0,010</text:p>
          </table:table-cell>
          <table:table-cell table:style-name="ce12N2" office:value-type="float" office:value="8.2">
            <text:p>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6.92">
            <text:p>746,92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885">
            <text:p>885,00</text:p>
          </table:table-cell>
          <table:table-cell table:style-name="ce12N2" office:value-type="float" office:value="61.95">
            <text:p>6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6111993682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9">
            <text:p>31141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60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0.53">
            <text:p>448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339.5">
            <text:p>433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57">
            <text:p>0,043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9.63">
            <text:p>3749,6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141.03">
            <text:p>141,03</text:p>
          </table:table-cell>
          <table:table-cell table:style-name="ce12N2" office:value-type="float" office:value="4339.5">
            <text:p>4339,50</text:p>
          </table:table-cell>
          <table:table-cell table:style-name="ce12N2" office:value-type="float" office:value="207.67">
            <text:p>20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60611061181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20">
            <text:p>311420</text:p>
          </table:table-cell>
          <table:table-cell table:style-name="ce0" table:number-columns-spanned="4" table:number-rows-spanned="1" office:value-type="string" calcext:value-type="string">
            <text:p>37.894 - GYPSUM MINERACAO INDUSTRIA E COMERCIO LTDA</text:p>
          </table:table-cell>
          <table:covered-table-cell table:number-columns-repeated="3"/>
          <table:table-cell table:style-name="ce0" office:value-type="string" calcext:value-type="string">
            <text:p>105.7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33.62">
            <text:p>6573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244.42">
            <text:p>55244,42</text:p>
          </table:table-cell>
          <table:table-cell table:style-name="ce12N2" office:value-type="float" office:value="10489.2">
            <text:p>10489,20</text:p>
          </table:table-cell>
          <table:table-cell table:style-name="ce12N3" office:value-type="float" office:value="48.6">
            <text:p>48,600</text:p>
          </table:table-cell>
          <table:table-cell table:style-name="ce12N2" office:value-type="float" office:value="31881.6">
            <text:p>3188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73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56.4">
            <text:p>56756,40</text:p>
          </table:table-cell>
          <table:table-cell table:style-name="ce12N2" office:value-type="float" office:value="56.76">
            <text:p>5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0.81">
            <text:p>510,81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33.62">
            <text:p>65733,62</text:p>
          </table:table-cell>
          <table:table-cell table:style-name="ce12N2" office:value-type="float" office:value="4601.35">
            <text:p>460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24443608001040550010001057671552278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0">
            <text:p>31143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7.56">
            <text:p>179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7.56">
            <text:p>179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376">
            <text:p>0,107</text:p>
          </table:table-cell>
          <table:table-cell table:style-name="ce12N2" office:value-type="float" office:value="12.39">
            <text:p>1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9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7.1">
            <text:p>1517,10</text:p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5">
            <text:p>13,6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7.56">
            <text:p>1797,56</text:p>
          </table:table-cell>
          <table:table-cell table:style-name="ce12N2" office:value-type="float" office:value="125.83">
            <text:p>12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51058980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1">
            <text:p>3114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87.7">
            <text:p>858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587.7">
            <text:p>858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001">
            <text:p>0,140</text:p>
          </table:table-cell>
          <table:table-cell table:style-name="ce12N2" office:value-type="float" office:value="90.77">
            <text:p>9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8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47.8">
            <text:p>7247,80</text:p>
          </table:table-cell>
          <table:table-cell table:style-name="ce12N2" office:value-type="float" office:value="7.25">
            <text:p>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22">
            <text:p>65,2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87.7">
            <text:p>8587,70</text:p>
          </table:table-cell>
          <table:table-cell table:style-name="ce12N2" office:value-type="float" office:value="601.15">
            <text:p>60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61290291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2">
            <text:p>31143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4.9">
            <text:p>136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64.9">
            <text:p>136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8">
            <text:p>0,035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4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1.95">
            <text:p>1151,9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64.9">
            <text:p>1364,90</text:p>
          </table:table-cell>
          <table:table-cell table:style-name="ce12N2" office:value-type="float" office:value="95.54">
            <text:p>9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71940242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3">
            <text:p>31143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6.02">
            <text:p>264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46.02">
            <text:p>2646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96">
            <text:p>0,063</text:p>
          </table:table-cell>
          <table:table-cell table:style-name="ce12N2" office:value-type="float" office:value="12.4">
            <text:p>1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3.18">
            <text:p>2233,18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6.02">
            <text:p>2646,02</text:p>
          </table:table-cell>
          <table:table-cell table:style-name="ce12N2" office:value-type="float" office:value="185.22">
            <text:p>18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812959151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4">
            <text:p>31143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4.32">
            <text:p>1026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0264.32">
            <text:p>1026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2.58968">
            <text:p>132,590</text:p>
          </table:table-cell>
          <table:table-cell table:style-name="ce12N2" office:value-type="float" office:value="144.05">
            <text:p>144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62.81">
            <text:p>8662,81</text:p>
          </table:table-cell>
          <table:table-cell table:style-name="ce12N2" office:value-type="float" office:value="8.67">
            <text:p>8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97">
            <text:p>77,9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64.32">
            <text:p>10264,32</text:p>
          </table:table-cell>
          <table:table-cell table:style-name="ce12N2" office:value-type="float" office:value="718.51">
            <text:p>71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91384841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5">
            <text:p>31143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60.3">
            <text:p>1946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9460.3">
            <text:p>1946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3463">
            <text:p>7,346</text:p>
          </table:table-cell>
          <table:table-cell table:style-name="ce12N2" office:value-type="float" office:value="411.76">
            <text:p>4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6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24">
            <text:p>16424,00</text:p>
          </table:table-cell>
          <table:table-cell table:style-name="ce12N2" office:value-type="float" office:value="16.42">
            <text:p>1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.81">
            <text:p>147,8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60.3">
            <text:p>19460,30</text:p>
          </table:table-cell>
          <table:table-cell table:style-name="ce12N2" office:value-type="float" office:value="1362.23">
            <text:p>136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3012499670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6">
            <text:p>311436</text:p>
          </table:table-cell>
          <table:table-cell table:style-name="ce0" table:number-columns-spanned="4" table:number-rows-spanned="1" office:value-type="string" calcext:value-type="string">
            <text:p>17.073 - INFINITY C.IMP.E EXP.DE EQUIP. DE SEGURANCA LTDA</text:p>
          </table:table-cell>
          <table:covered-table-cell table:number-columns-repeated="3"/>
          <table:table-cell table:style-name="ce0" office:value-type="string" calcext:value-type="string">
            <text:p>5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2">
            <text:p>37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2">
            <text:p>37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">
            <text:p>0,552</text:p>
          </table:table-cell>
          <table:table-cell table:style-name="ce12N2" office:value-type="float" office:value="69.6">
            <text:p>6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7.44">
            <text:p>3507,44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7">
            <text:p>31,57</text:p>
          </table:table-cell>
          <table:table-cell table:style-name="ce12N2" office:value-type="float" office:value="59.85">
            <text:p>59,8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2">
            <text:p>3792,00</text:p>
          </table:table-cell>
          <table:table-cell table:style-name="ce12N2" office:value-type="float" office:value="151.68">
            <text:p>15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2462148000134550010000052301870941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8">
            <text:p>311438</text:p>
          </table:table-cell>
          <table:table-cell table:style-name="ce0" table:number-columns-spanned="4" table:number-rows-spanned="1" office:value-type="string" calcext:value-type="string">
            <text:p>1.942 - NOBRE PAINEIS LTDA</text:p>
          </table:table-cell>
          <table:covered-table-cell table:number-columns-repeated="3"/>
          <table:table-cell table:style-name="ce0" office:value-type="string" calcext:value-type="string">
            <text:p>24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568.01">
            <text:p>17056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70568.01">
            <text:p>170568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7.183944">
            <text:p>67,184</text:p>
          </table:table-cell>
          <table:table-cell table:style-name="ce12N2" office:value-type="float" office:value="41747.8">
            <text:p>4174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.568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568.01">
            <text:p>170568,01</text:p>
          </table:table-cell>
          <table:table-cell table:style-name="ce12N2" office:value-type="float" office:value="170.57">
            <text:p>17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35.11">
            <text:p>1535,1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568.01">
            <text:p>170568,01</text:p>
          </table:table-cell>
          <table:table-cell table:style-name="ce12N2" office:value-type="float" office:value="11939.76">
            <text:p>11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4997181000123550010000249211963016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9">
            <text:p>311439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61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77.7">
            <text:p>2307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81.54">
            <text:p>2278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77592">
            <text:p>9,776</text:p>
          </table:table-cell>
          <table:table-cell table:style-name="ce12N2" office:value-type="float" office:value="14000">
            <text:p>1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07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93.34">
            <text:p>18193,34</text:p>
          </table:table-cell>
          <table:table-cell table:style-name="ce12N2" office:value-type="float" office:value="18.19">
            <text:p>1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.74">
            <text:p>163,74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96.16">
            <text:p>296,16</text:p>
          </table:table-cell>
          <table:table-cell table:style-name="ce12N2" office:value-type="float" office:value="22781.54">
            <text:p>22781,54</text:p>
          </table:table-cell>
          <table:table-cell table:style-name="ce12N2" office:value-type="float" office:value="2733.78">
            <text:p>273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30051230001035500100056156818024190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45">
            <text:p>31144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5.96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421.5">
            <text:p>49421,50</text:p>
          </table:table-cell>
          <table:table-cell table:style-name="ce12N2" office:value-type="float" office:value="1660.23">
            <text:p>1660,23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1081.73">
            <text:p>51081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.5952">
            <text:p>33,595</text:p>
          </table:table-cell>
          <table:table-cell table:style-name="ce12N2" office:value-type="float" office:value="38200">
            <text:p>38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42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880.01">
            <text:p>35880,01</text:p>
          </table:table-cell>
          <table:table-cell table:style-name="ce12N2" office:value-type="float" office:value="35.88">
            <text:p>3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.92">
            <text:p>322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421.5">
            <text:p>49421,50</text:p>
          </table:table-cell>
          <table:table-cell table:style-name="ce12N2" office:value-type="float" office:value="9884.3">
            <text:p>988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59681706690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46">
            <text:p>311446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5.97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68">
            <text:p>36168,00</text:p>
          </table:table-cell>
          <table:table-cell table:style-name="ce12N2" office:value-type="float" office:value="1214.75">
            <text:p>1214,75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382.75">
            <text:p>37382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.3376">
            <text:p>35,338</text:p>
          </table:table-cell>
          <table:table-cell table:style-name="ce12N2" office:value-type="float" office:value="38200">
            <text:p>38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1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257.96">
            <text:p>26257,96</text:p>
          </table:table-cell>
          <table:table-cell table:style-name="ce12N2" office:value-type="float" office:value="26.27">
            <text:p>2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.32">
            <text:p>236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168">
            <text:p>36168,00</text:p>
          </table:table-cell>
          <table:table-cell table:style-name="ce12N2" office:value-type="float" office:value="7233.6">
            <text:p>723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59751466302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76">
            <text:p>31147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3.13">
            <text:p>63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3.2">
            <text:p>61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4">
            <text:p>0,011</text:p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.22">
            <text:p>534,22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19.93">
            <text:p>19,93</text:p>
          </table:table-cell>
          <table:table-cell table:style-name="ce12N2" office:value-type="float" office:value="613.2">
            <text:p>613,20</text:p>
          </table:table-cell>
          <table:table-cell table:style-name="ce12N2" office:value-type="float" office:value="24.53">
            <text:p>24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3512850848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77">
            <text:p>31147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.41">
            <text:p>4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5.6">
            <text:p>45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4">
            <text:p>0,011</text:p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6.92">
            <text:p>396,92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7">
            <text:p>3,5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14.81">
            <text:p>14,81</text:p>
          </table:table-cell>
          <table:table-cell table:style-name="ce12N2" office:value-type="float" office:value="455.6">
            <text:p>455,60</text:p>
          </table:table-cell>
          <table:table-cell table:style-name="ce12N2" office:value-type="float" office:value="18.22">
            <text:p>1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321904928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79">
            <text:p>31147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7.9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6.51">
            <text:p>32766,51</text:p>
          </table:table-cell>
          <table:table-cell table:style-name="ce12N2" office:value-type="float" office:value="1923.61">
            <text:p>1923,6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779.2">
            <text:p>3177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8986">
            <text:p>3,990</text:p>
          </table:table-cell>
          <table:table-cell table:style-name="ce12N2" office:value-type="float" office:value="1287.2">
            <text:p>128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6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010.19">
            <text:p>26010,19</text:p>
          </table:table-cell>
          <table:table-cell table:style-name="ce12N2" office:value-type="float" office:value="26.01">
            <text:p>2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09">
            <text:p>234,09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2910.92">
            <text:p>2910,92</text:p>
          </table:table-cell>
          <table:table-cell table:style-name="ce12N2" office:value-type="float" office:value="29855.59">
            <text:p>29855,59</text:p>
          </table:table-cell>
          <table:table-cell table:style-name="ce12N2" office:value-type="float" office:value="1194.22">
            <text:p>119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79461212323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0">
            <text:p>3114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31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3.98">
            <text:p>3167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30175.74">
            <text:p>3017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7925">
            <text:p>0,538</text:p>
          </table:table-cell>
          <table:table-cell table:style-name="ce12N2" office:value-type="float" office:value="372.49">
            <text:p>372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673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095.1">
            <text:p>26095,10</text:p>
          </table:table-cell>
          <table:table-cell table:style-name="ce12N2" office:value-type="float" office:value="26.1">
            <text:p>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85">
            <text:p>234,85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1498.24">
            <text:p>1498,24</text:p>
          </table:table-cell>
          <table:table-cell table:style-name="ce12N2" office:value-type="float" office:value="30175.75">
            <text:p>30175,75</text:p>
          </table:table-cell>
          <table:table-cell table:style-name="ce12N2" office:value-type="float" office:value="1420.81">
            <text:p>142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317011586317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2">
            <text:p>311482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7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3.22">
            <text:p>329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0.2">
            <text:p>296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">
            <text:p>0,002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9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8.92">
            <text:p>2578,9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21">
            <text:p>23,21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333.02">
            <text:p>333,02</text:p>
          </table:table-cell>
          <table:table-cell table:style-name="ce12N2" office:value-type="float" office:value="2960.2">
            <text:p>2960,20</text:p>
          </table:table-cell>
          <table:table-cell table:style-name="ce12N2" office:value-type="float" office:value="118.41">
            <text:p>11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744516154103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4">
            <text:p>31148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31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6.79">
            <text:p>21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114.84">
            <text:p>21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14">
            <text:p>0,205</text:p>
          </table:table-cell>
          <table:table-cell table:style-name="ce12N2" office:value-type="float" office:value="19.16">
            <text:p>19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4.86">
            <text:p>1784,86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07">
            <text:p>16,0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61.95">
            <text:p>61,95</text:p>
          </table:table-cell>
          <table:table-cell table:style-name="ce12N2" office:value-type="float" office:value="2114.84">
            <text:p>2114,84</text:p>
          </table:table-cell>
          <table:table-cell table:style-name="ce12N2" office:value-type="float" office:value="148.04">
            <text:p>14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31850157046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7">
            <text:p>31148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91.1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54.3">
            <text:p>485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54.3">
            <text:p>485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7475">
            <text:p>0,497</text:p>
          </table:table-cell>
          <table:table-cell table:style-name="ce12N2" office:value-type="float" office:value="167.55">
            <text:p>167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5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96.91">
            <text:p>4096,91</text:p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7">
            <text:p>36,8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4.3">
            <text:p>4854,30</text:p>
          </table:table-cell>
          <table:table-cell table:style-name="ce12N2" office:value-type="float" office:value="339.8">
            <text:p>33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9111218335934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8">
            <text:p>311488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131.635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81.24">
            <text:p>22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09.43">
            <text:p>2209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040713">
            <text:p>6,04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4.71">
            <text:p>1864,71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71.81">
            <text:p>71,81</text:p>
          </table:table-cell>
          <table:table-cell table:style-name="ce12N2" office:value-type="float" office:value="2209.43">
            <text:p>2209,43</text:p>
          </table:table-cell>
          <table:table-cell table:style-name="ce12N2" office:value-type="float" office:value="154.66">
            <text:p>1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1000013163519813376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9">
            <text:p>31148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027.78">
            <text:p>9302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93027.78">
            <text:p>93027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284804">
            <text:p>32,285</text:p>
          </table:table-cell>
          <table:table-cell table:style-name="ce12N2" office:value-type="float" office:value="3721.33">
            <text:p>372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.02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516.73">
            <text:p>78516,73</text:p>
          </table:table-cell>
          <table:table-cell table:style-name="ce12N2" office:value-type="float" office:value="78.5">
            <text:p>7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6.63">
            <text:p>706,6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027.78">
            <text:p>93027,78</text:p>
          </table:table-cell>
          <table:table-cell table:style-name="ce12N2" office:value-type="float" office:value="6507.99">
            <text:p>650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4721257076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92">
            <text:p>3114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6.3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7.06">
            <text:p>28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7.06">
            <text:p>2847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74">
            <text:p>0,008</text:p>
          </table:table-cell>
          <table:table-cell table:style-name="ce12N2" office:value-type="float" office:value="4.56">
            <text:p>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2.82">
            <text:p>2402,82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63">
            <text:p>21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7.06">
            <text:p>2847,06</text:p>
          </table:table-cell>
          <table:table-cell table:style-name="ce12N2" office:value-type="float" office:value="199.29">
            <text:p>19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63461791458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95">
            <text:p>311495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2.6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510.89">
            <text:p>345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68">
            <text:p>340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008">
            <text:p>0,004</text:p>
          </table:table-cell>
          <table:table-cell table:style-name="ce12N2" office:value-type="float" office:value="246.49">
            <text:p>246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510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680.03">
            <text:p>29680,03</text:p>
          </table:table-cell>
          <table:table-cell table:style-name="ce12N2" office:value-type="float" office:value="29.68">
            <text:p>2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.12">
            <text:p>267,1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442.89">
            <text:p>442,89</text:p>
          </table:table-cell>
          <table:table-cell table:style-name="ce12N2" office:value-type="float" office:value="34068">
            <text:p>34068,00</text:p>
          </table:table-cell>
          <table:table-cell table:style-name="ce12N2" office:value-type="float" office:value="1362.72">
            <text:p>136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64.33">
            <text:p>76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4.979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23/07/2026</text:p>
          </table:table-cell>
          <table:table-cell table:style-name="ce12" office:value-type="string" calcext:value-type="string">
            <text:p>764,33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35260705858780000129550010002126411388803587</text:p>
          </table:table-cell>
          <table:table-cell table:style-name="ce0" office:value-type="string" calcext:value-type="string">
            <text:p>3526070522209200076357002000484979100748746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96">
            <text:p>3114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949.14">
            <text:p>9294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92949.14">
            <text:p>9294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6.353566">
            <text:p>86,354</text:p>
          </table:table-cell>
          <table:table-cell table:style-name="ce12N2" office:value-type="float" office:value="4160.79">
            <text:p>416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.94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446.71">
            <text:p>78446,71</text:p>
          </table:table-cell>
          <table:table-cell table:style-name="ce12N2" office:value-type="float" office:value="78.44">
            <text:p>7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6.01">
            <text:p>706,0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949.14">
            <text:p>92949,14</text:p>
          </table:table-cell>
          <table:table-cell table:style-name="ce12N2" office:value-type="float" office:value="6506.47">
            <text:p>6506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861598230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97">
            <text:p>311497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49.82">
            <text:p>83749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3162.6">
            <text:p>8316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2118">
            <text:p>1,221</text:p>
          </table:table-cell>
          <table:table-cell table:style-name="ce12N2" office:value-type="float" office:value="626.04">
            <text:p>626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.749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518.33">
            <text:p>74518,33</text:p>
          </table:table-cell>
          <table:table-cell table:style-name="ce12N2" office:value-type="float" office:value="74.53">
            <text:p>74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0.67">
            <text:p>670,67</text:p>
          </table:table-cell>
          <table:table-cell table:style-name="ce12N2" office:value-type="float" office:value="41.9">
            <text:p>41,9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587.22">
            <text:p>587,22</text:p>
          </table:table-cell>
          <table:table-cell table:style-name="ce12N2" office:value-type="float" office:value="83162.6">
            <text:p>83162,60</text:p>
          </table:table-cell>
          <table:table-cell table:style-name="ce12N2" office:value-type="float" office:value="5821.38">
            <text:p>58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9831164443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98">
            <text:p>311498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97.03">
            <text:p>8249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81812.75">
            <text:p>81812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37285">
            <text:p>1,937</text:p>
          </table:table-cell>
          <table:table-cell table:style-name="ce12N2" office:value-type="float" office:value="403.7">
            <text:p>40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49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308.9">
            <text:p>73308,90</text:p>
          </table:table-cell>
          <table:table-cell table:style-name="ce12N2" office:value-type="float" office:value="73.32">
            <text:p>7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9.78">
            <text:p>659,78</text:p>
          </table:table-cell>
          <table:table-cell table:style-name="ce12N2" office:value-type="float" office:value="41.88">
            <text:p>41,8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684.28">
            <text:p>684,28</text:p>
          </table:table-cell>
          <table:table-cell table:style-name="ce12N2" office:value-type="float" office:value="81812.75">
            <text:p>81812,75</text:p>
          </table:table-cell>
          <table:table-cell table:style-name="ce12N2" office:value-type="float" office:value="5726.85">
            <text:p>57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9851941834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506">
            <text:p>31150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7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03.07">
            <text:p>4010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103.07">
            <text:p>40103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">
            <text:p>45,000</text:p>
          </table:table-cell>
          <table:table-cell table:style-name="ce12N2" office:value-type="float" office:value="480">
            <text:p>4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103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45.99">
            <text:p>33845,99</text:p>
          </table:table-cell>
          <table:table-cell table:style-name="ce12N2" office:value-type="float" office:value="33.84">
            <text:p>3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.62">
            <text:p>304,62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03.07">
            <text:p>40103,07</text:p>
          </table:table-cell>
          <table:table-cell table:style-name="ce12N2" office:value-type="float" office:value="2807.21">
            <text:p>280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75191043591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507">
            <text:p>31150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91.35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03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3.56">
            <text:p>481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813.56">
            <text:p>4813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612">
            <text:p>0,016</text:p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1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48.69">
            <text:p>4148,69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33">
            <text:p>37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3.56">
            <text:p>4813,56</text:p>
          </table:table-cell>
          <table:table-cell table:style-name="ce12N2" office:value-type="float" office:value="242">
            <text:p>24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913551574731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508">
            <text:p>311508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595.86">
            <text:p>1025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942">
            <text:p>31,942</text:p>
          </table:table-cell>
          <table:table-cell table:style-name="ce12N2" office:value-type="float" office:value="6000">
            <text:p>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5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2.8">
            <text:p>83862,80</text:p>
          </table:table-cell>
          <table:table-cell table:style-name="ce12N2" office:value-type="float" office:value="83.86">
            <text:p>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.77">
            <text:p>754,7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3229.41">
            <text:p>3229,41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6955.65">
            <text:p>695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701575113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91">
            <text:p>191,00</text:p>
          </table:table-cell>
          <table:table-cell table:style-name="ce26N2" office:value-type="float" office:value="20077.6">
            <text:p>20077,60</text:p>
          </table:table-cell>
          <table:table-cell table:style-name="ce26N2" office:value-type="float" office:value="10489.2">
            <text:p>10489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5767.58">
            <text:p>105767,58</text:p>
          </table:table-cell>
          <table:table-cell table:style-name="ce26N2" office:value-type="float" office:value="5524005.09">
            <text:p>5524005,09</text:p>
          </table:table-cell>
          <table:table-cell table:style-name="ce26N2" office:value-type="float" office:value="362053.32">
            <text:p>362053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447.21">
            <text:p>6447,21</text:p>
          </table:table-cell>
          <table:table-cell table:style-name="ce26N2" office:value-type="float" office:value="5668223.76">
            <text:p>5668223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9424.54">
            <text:p>129424,54</text:p>
          </table:table-cell>
          <table:table-cell table:style-name="ce26N2" office:value-type="float" office:value="18588.32">
            <text:p>18588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621.903361">
            <text:p>9621,903</text:p>
          </table:table-cell>
          <table:table-cell table:style-name="ce26N2" office:value-type="float" office:value="5553456.26">
            <text:p>5553456,26</text:p>
          </table:table-cell>
          <table:table-cell table:style-name="ce26N2" office:value-type="float" office:value="5668223.76">
            <text:p>5668223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74813.78">
            <text:p>4674813,78</text:p>
          </table:table-cell>
          <table:table-cell table:style-name="ce26N2" office:value-type="float" office:value="4674.88">
            <text:p>4674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2073.18">
            <text:p>42073,1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69203.79">
            <text:p>469203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.25">
            <text:p>42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768" meta:object-count="0"/>
    <meta:generator>LibreOffice/4.3.0.4$Windows_x86 LibreOffice_project/62ad5818884a2fc2e5780dd45466868d41009ec0</meta:generator>
  </office:meta>
</office:document-meta>
</file>