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0/07/2026 07:41:12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0">
            <text:p>3099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74">
            <text:p>0,041</text:p>
          </table:table-cell>
          <table:table-cell table:style-name="ce12N2" office:value-type="float" office:value="155.34">
            <text:p>1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29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45.87">
            <text:p>15745,87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71">
            <text:p>141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31.08">
            <text:p>13431,08</text:p>
          </table:table-cell>
          <table:table-cell table:style-name="ce12N2" office:value-type="float" office:value="940.18">
            <text:p>94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81254471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1">
            <text:p>3099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635">
            <text:p>0,140</text:p>
          </table:table-cell>
          <table:table-cell table:style-name="ce12N2" office:value-type="float" office:value="23.95">
            <text:p>2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8.11">
            <text:p>4718,11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6">
            <text:p>42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391.32">
            <text:p>39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014344613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2">
            <text:p>3099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116852652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3">
            <text:p>3099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9">
            <text:p>0,029</text:p>
          </table:table-cell>
          <table:table-cell table:style-name="ce12N2" office:value-type="float" office:value="4.96">
            <text:p>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6.16">
            <text:p>976,1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79">
            <text:p>8,7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80.96">
            <text:p>8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21037109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4">
            <text:p>3099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96">
            <text:p>0,144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1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20.61">
            <text:p>12420,61</text:p>
          </table:table-cell>
          <table:table-cell table:style-name="ce12N2" office:value-type="float" office:value="12.42">
            <text:p>1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79">
            <text:p>111,7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1030.18">
            <text:p>103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31535591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5">
            <text:p>3099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8.09">
            <text:p>978,09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41847623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8">
            <text:p>30995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53.38">
            <text:p>1245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837278">
            <text:p>3,837</text:p>
          </table:table-cell>
          <table:table-cell table:style-name="ce12N2" office:value-type="float" office:value="11760">
            <text:p>117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5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42.47">
            <text:p>10442,47</text:p>
          </table:table-cell>
          <table:table-cell table:style-name="ce12N2" office:value-type="float" office:value="10.44">
            <text:p>1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98">
            <text:p>93,98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80.42">
            <text:p>80,42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866.11">
            <text:p>86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61703715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1">
            <text:p>31011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9.84">
            <text:p>403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6.6">
            <text:p>6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39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4.35">
            <text:p>3474,35</text:p>
          </table:table-cell>
          <table:table-cell table:style-name="ce12N2" office:value-type="float" office:value="3.47">
            <text:p>3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27">
            <text:p>31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1.84">
            <text:p>51,84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159.52">
            <text:p>15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21711473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2">
            <text:p>31011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97">
            <text:p>80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3.32">
            <text:p>13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.88">
            <text:p>694,88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318884365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1">
            <text:p>31012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88.68">
            <text:p>41088,68</text:p>
          </table:table-cell>
          <table:table-cell table:style-name="ce12N2" office:value-type="float" office:value="2412.77">
            <text:p>2412,77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9851.2">
            <text:p>3985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8586">
            <text:p>6,286</text:p>
          </table:table-cell>
          <table:table-cell table:style-name="ce12N2" office:value-type="float" office:value="2047.2">
            <text:p>204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08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16.37">
            <text:p>32616,37</text:p>
          </table:table-cell>
          <table:table-cell table:style-name="ce12N2" office:value-type="float" office:value="32.62">
            <text:p>3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.55">
            <text:p>293,55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650.25">
            <text:p>3650,25</text:p>
          </table:table-cell>
          <table:table-cell table:style-name="ce12N2" office:value-type="float" office:value="37438.43">
            <text:p>37438,43</text:p>
          </table:table-cell>
          <table:table-cell table:style-name="ce12N2" office:value-type="float" office:value="1497.53">
            <text:p>149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5091541420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4">
            <text:p>310204</text:p>
          </table:table-cell>
          <table:table-cell table:style-name="ce0" table:number-columns-spanned="4" table:number-rows-spanned="1" office:value-type="string" calcext:value-type="string">
            <text:p>21.685 - INDEPENDENCE COMERCIO E IMPORTACAO LTDA</text:p>
          </table:table-cell>
          <table:covered-table-cell table:number-columns-repeated="3"/>
          <table:table-cell table:style-name="ce0" office:value-type="string" calcext:value-type="string">
            <text:p>22.151</text:p>
          </table:table-cell>
          <table:table-cell table:style-name="ce9" office:value-type="string" calcext:value-type="string">
            <text:p>24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272">
            <text:p>0,133</text:p>
          </table:table-cell>
          <table:table-cell table:style-name="ce12N2" office:value-type="float" office:value="89.76">
            <text:p>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12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3.6">
            <text:p>1753,60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78">
            <text:p>15,78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80.51">
            <text:p>8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18136504000107550240000221511179630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7">
            <text:p>31020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6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">
            <text:p>0,060</text:p>
          </table:table-cell>
          <table:table-cell table:style-name="ce12N2" office:value-type="float" office:value="301.5">
            <text:p>30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7.09">
            <text:p>5467,09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21">
            <text:p>49,2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266.23">
            <text:p>26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6631017700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8">
            <text:p>31020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6142">
            <text:p>0,561</text:p>
          </table:table-cell>
          <table:table-cell table:style-name="ce12N2" office:value-type="float" office:value="619.21">
            <text:p>619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15.41">
            <text:p>6615,41</text:p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54">
            <text:p>59,5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548.69">
            <text:p>54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7551163844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5">
            <text:p>310215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8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07.51466">
            <text:p>807,515</text:p>
          </table:table-cell>
          <table:table-cell table:style-name="ce12N2" office:value-type="float" office:value="3713.9">
            <text:p>37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83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221.48">
            <text:p>74221,48</text:p>
          </table:table-cell>
          <table:table-cell table:style-name="ce12N2" office:value-type="float" office:value="74.2">
            <text:p>7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98">
            <text:p>667,98</text:p>
          </table:table-cell>
          <table:table-cell table:style-name="ce12N2" office:value-type="float" office:value="37.5">
            <text:p>37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5798.2">
            <text:p>579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827610000142550010000686801816218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7">
            <text:p>310217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01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6734">
            <text:p>7,673</text:p>
          </table:table-cell>
          <table:table-cell table:style-name="ce12N2" office:value-type="float" office:value="5390.55">
            <text:p>5390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444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510.36">
            <text:p>37510,36</text:p>
          </table:table-cell>
          <table:table-cell table:style-name="ce12N2" office:value-type="float" office:value="37.5">
            <text:p>3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.6">
            <text:p>337,6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3111.14">
            <text:p>31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675270000450550400000620111757384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8">
            <text:p>310218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035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69">
            <text:p>0,397</text:p>
          </table:table-cell>
          <table:table-cell table:style-name="ce12N2" office:value-type="float" office:value="347.67">
            <text:p>347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3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81.09">
            <text:p>2481,09</text:p>
          </table:table-cell>
          <table:table-cell table:style-name="ce12N2" office:value-type="float" office:value="2.48">
            <text:p>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33">
            <text:p>22,3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205.78">
            <text:p>20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675270000450550400000620351433429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3">
            <text:p>310263</text:p>
          </table:table-cell>
          <table:table-cell table:style-name="ce0" table:number-columns-spanned="4" table:number-rows-spanned="1" office:value-type="string" calcext:value-type="string">
            <text:p>8.753 - ANCORA GROUP LTDA</text:p>
          </table:table-cell>
          <table:covered-table-cell table:number-columns-repeated="3"/>
          <table:table-cell table:style-name="ce0" office:value-type="string" calcext:value-type="string">
            <text:p>59.47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672.11">
            <text:p>6567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898">
            <text:p>4,999</text:p>
          </table:table-cell>
          <table:table-cell table:style-name="ce12N2" office:value-type="float" office:value="2976.9">
            <text:p>297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672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785.43">
            <text:p>56785,43</text:p>
          </table:table-cell>
          <table:table-cell table:style-name="ce12N2" office:value-type="float" office:value="56.78">
            <text:p>5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07">
            <text:p>511,07</text:p>
          </table:table-cell>
          <table:table-cell table:style-name="ce12N2" office:value-type="float" office:value="98.58">
            <text:p>98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91.41">
            <text:p>491,41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2607.22">
            <text:p>260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67647412000350550100000594771103372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6">
            <text:p>31029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12.16">
            <text:p>3361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03928">
            <text:p>2,004</text:p>
          </table:table-cell>
          <table:table-cell table:style-name="ce12N2" office:value-type="float" office:value="155.68">
            <text:p>15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1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67.66">
            <text:p>28367,66</text:p>
          </table:table-cell>
          <table:table-cell table:style-name="ce12N2" office:value-type="float" office:value="28.37">
            <text:p>2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32">
            <text:p>255,32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5.39">
            <text:p>25,39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2327.64">
            <text:p>232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211057345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7">
            <text:p>310387</text:p>
          </table:table-cell>
          <table:table-cell table:style-name="ce0" table:number-columns-spanned="4" table:number-rows-spanned="1" office:value-type="string" calcext:value-type="string">
            <text:p>1.695 - METALURGICA RONCONI DE MATAO LTDA - ME</text:p>
          </table:table-cell>
          <table:covered-table-cell table:number-columns-repeated="3"/>
          <table:table-cell table:style-name="ce0" office:value-type="string" calcext:value-type="string">
            <text:p>38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6">
            <text:p>0,038</text:p>
          </table:table-cell>
          <table:table-cell table:style-name="ce12N2" office:value-type="float" office:value="258.4">
            <text:p>25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369.75">
            <text:p>36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48875230001525500100003812010038124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4">
            <text:p>3104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3241.31">
            <text:p>206324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">
            <text:p>208,00</text:p>
          </table:table-cell>
          <table:table-cell table:style-name="ce12N2" office:value-type="float" office:value="2050218.05">
            <text:p>2050218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92.103079">
            <text:p>692,103</text:p>
          </table:table-cell>
          <table:table-cell table:style-name="ce12N2" office:value-type="float" office:value="9038.4">
            <text:p>903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3.241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0206.72">
            <text:p>1740206,72</text:p>
          </table:table-cell>
          <table:table-cell table:style-name="ce12N2" office:value-type="float" office:value="1740.22">
            <text:p>17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61.89">
            <text:p>15661,8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3023.26">
            <text:p>13023,26</text:p>
          </table:table-cell>
          <table:table-cell table:style-name="ce12N2" office:value-type="float" office:value="1999450.7">
            <text:p>1999450,70</text:p>
          </table:table-cell>
          <table:table-cell table:style-name="ce12N2" office:value-type="float" office:value="132634.89">
            <text:p>13263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51890466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4">
            <text:p>31047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293.88">
            <text:p>3329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6196">
            <text:p>0,796</text:p>
          </table:table-cell>
          <table:table-cell table:style-name="ce12N2" office:value-type="float" office:value="1409">
            <text:p>140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29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77.95">
            <text:p>26477,95</text:p>
          </table:table-cell>
          <table:table-cell table:style-name="ce12N2" office:value-type="float" office:value="26.48">
            <text:p>2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32">
            <text:p>238,32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2901.42">
            <text:p>2901,42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1215.69">
            <text:p>121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431589480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0">
            <text:p>31050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04">
            <text:p>0,00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2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84.16">
            <text:p>2384,16</text:p>
          </table:table-cell>
          <table:table-cell table:style-name="ce12N2" office:value-type="float" office:value="2.38">
            <text:p>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46">
            <text:p>21,4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197.74">
            <text:p>19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214027491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1">
            <text:p>31050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516">
            <text:p>0,060</text:p>
          </table:table-cell>
          <table:table-cell table:style-name="ce12N2" office:value-type="float" office:value="27.9">
            <text:p>2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3.11">
            <text:p>3503,11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53">
            <text:p>31,5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290.55">
            <text:p>29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31422428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2">
            <text:p>31050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012">
            <text:p>0,059</text:p>
          </table:table-cell>
          <table:table-cell table:style-name="ce12N2" office:value-type="float" office:value="27.1">
            <text:p>27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6.92">
            <text:p>466,92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38.73">
            <text:p>3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41864812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1">
            <text:p>310551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0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52131">
            <text:p>21,521</text:p>
          </table:table-cell>
          <table:table-cell table:style-name="ce12N2" office:value-type="float" office:value="6563.53">
            <text:p>656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297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40.19">
            <text:p>73440,19</text:p>
          </table:table-cell>
          <table:table-cell table:style-name="ce12N2" office:value-type="float" office:value="73.45">
            <text:p>7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0.97">
            <text:p>660,9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3371.91">
            <text:p>337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01590328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2">
            <text:p>310552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474514">
            <text:p>21,475</text:p>
          </table:table-cell>
          <table:table-cell table:style-name="ce12N2" office:value-type="float" office:value="14482.15">
            <text:p>14482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.2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92.96">
            <text:p>83892,9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5.04">
            <text:p>755,0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3851.83">
            <text:p>385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11596816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7">
            <text:p>31056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6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42575">
            <text:p>1,043</text:p>
          </table:table-cell>
          <table:table-cell table:style-name="ce12N2" office:value-type="float" office:value="943.4">
            <text:p>943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4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21.81">
            <text:p>10421,81</text:p>
          </table:table-cell>
          <table:table-cell table:style-name="ce12N2" office:value-type="float" office:value="10.42">
            <text:p>1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8">
            <text:p>93,8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864.39">
            <text:p>86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642774001209550010002269381719822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8">
            <text:p>310578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8.7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.18105">
            <text:p>150,181</text:p>
          </table:table-cell>
          <table:table-cell table:style-name="ce12N2" office:value-type="float" office:value="722">
            <text:p>7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25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12.3">
            <text:p>40412,30</text:p>
          </table:table-cell>
          <table:table-cell table:style-name="ce12N2" office:value-type="float" office:value="40.41">
            <text:p>4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.71">
            <text:p>363,71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3377.75">
            <text:p>337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33385067000140550010000487461170386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80">
            <text:p>310580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7.8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8">
            <text:p>90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449.59">
            <text:p>8449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0248">
            <text:p>0,340</text:p>
          </table:table-cell>
          <table:table-cell table:style-name="ce12N2" office:value-type="float" office:value="84.25">
            <text:p>84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1.24">
            <text:p>7131,24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.18">
            <text:p>64,18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578.41">
            <text:p>578,41</text:p>
          </table:table-cell>
          <table:table-cell table:style-name="ce12N2" office:value-type="float" office:value="8449.59">
            <text:p>8449,59</text:p>
          </table:table-cell>
          <table:table-cell table:style-name="ce12N2" office:value-type="float" office:value="591.47">
            <text:p>59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785215704489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68">
            <text:p>310668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5.90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84.77">
            <text:p>2458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426">
            <text:p>244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7628">
            <text:p>4,976</text:p>
          </table:table-cell>
          <table:table-cell table:style-name="ce12N2" office:value-type="float" office:value="30594.6">
            <text:p>3059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584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75.48">
            <text:p>20575,48</text:p>
          </table:table-cell>
          <table:table-cell table:style-name="ce12N2" office:value-type="float" office:value="20.58">
            <text:p>2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.18">
            <text:p>185,18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58.77">
            <text:p>158,77</text:p>
          </table:table-cell>
          <table:table-cell table:style-name="ce12N2" office:value-type="float" office:value="25047">
            <text:p>25047,00</text:p>
          </table:table-cell>
          <table:table-cell table:style-name="ce12N2" office:value-type="float" office:value="1753.29">
            <text:p>17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758.2">
            <text:p>575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39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07/07/2026</text:p>
          </table:table-cell>
          <table:table-cell table:style-name="ce12" office:value-type="string" calcext:value-type="string">
            <text:p>5.758,20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35260774423880000145550030012259001524427035</text:p>
          </table:table-cell>
          <table:table-cell table:style-name="ce0" office:value-type="string" calcext:value-type="string">
            <text:p>3526075432020300019457001000004439121191324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5">
            <text:p>3106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6.49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">
            <text:p>0,056</text:p>
          </table:table-cell>
          <table:table-cell table:style-name="ce12N2" office:value-type="float" office:value="22.8">
            <text:p>2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0.4">
            <text:p>3320,40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8">
            <text:p>29,8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275.41">
            <text:p>27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64921933536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6">
            <text:p>3106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6.49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6">
            <text:p>0,002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78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1.75">
            <text:p>2851,75</text:p>
          </table:table-cell>
          <table:table-cell table:style-name="ce12N2" office:value-type="float" office:value="2.85">
            <text:p>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7">
            <text:p>25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236.53">
            <text:p>23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64911020667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4">
            <text:p>31071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8.4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3.24">
            <text:p>189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93.81">
            <text:p>1793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35">
            <text:p>0,036</text:p>
          </table:table-cell>
          <table:table-cell table:style-name="ce12N2" office:value-type="float" office:value="13.85">
            <text:p>13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9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21.63">
            <text:p>1521,63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">
            <text:p>13,7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99.43">
            <text:p>99,43</text:p>
          </table:table-cell>
          <table:table-cell table:style-name="ce12N2" office:value-type="float" office:value="1793.81">
            <text:p>1793,81</text:p>
          </table:table-cell>
          <table:table-cell table:style-name="ce12N2" office:value-type="float" office:value="117.08">
            <text:p>11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84831570555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1">
            <text:p>31079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8.3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54.07">
            <text:p>2615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330.82">
            <text:p>2533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925">
            <text:p>30925,000</text:p>
          </table:table-cell>
          <table:table-cell table:style-name="ce12N2" office:value-type="float" office:value="3092.5">
            <text:p>309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154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78.58">
            <text:p>21378,58</text:p>
          </table:table-cell>
          <table:table-cell table:style-name="ce12N2" office:value-type="float" office:value="21.38">
            <text:p>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.41">
            <text:p>192,4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823.25">
            <text:p>823,25</text:p>
          </table:table-cell>
          <table:table-cell table:style-name="ce12N2" office:value-type="float" office:value="25330.82">
            <text:p>25330,82</text:p>
          </table:table-cell>
          <table:table-cell table:style-name="ce12N2" office:value-type="float" office:value="1773.16">
            <text:p>177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83321584283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7">
            <text:p>310797</text:p>
          </table:table-cell>
          <table:table-cell table:style-name="ce0" table:number-columns-spanned="4" table:number-rows-spanned="1" office:value-type="string" calcext:value-type="string">
            <text:p>14.578 - CARBOGRAFITE EQUIPAMENTOS INDUSTRIAIS LTDA</text:p>
          </table:table-cell>
          <table:covered-table-cell table:number-columns-repeated="3"/>
          <table:table-cell table:style-name="ce0" office:value-type="string" calcext:value-type="string">
            <text:p>811.87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7.99">
            <text:p>29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10">
            <text:p>2910,00</text:p>
          </table:table-cell>
          <table:table-cell table:style-name="ce12N2" office:value-type="float" office:value="7.99">
            <text:p>7,99</text:p>
          </table:table-cell>
          <table:table-cell table:style-name="ce12N3" office:value-type="float" office:value="0.6">
            <text:p>0,600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4.72">
            <text:p>2454,72</text:p>
          </table:table-cell>
          <table:table-cell table:style-name="ce12N2" office:value-type="float" office:value="2.45">
            <text:p>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09">
            <text:p>22,0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7.99">
            <text:p>2917,99</text:p>
          </table:table-cell>
          <table:table-cell table:style-name="ce12N2" office:value-type="float" office:value="204.26">
            <text:p>20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6427615000146550000008118791882593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1">
            <text:p>31080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6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17.2">
            <text:p>1041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17.2">
            <text:p>1041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4184">
            <text:p>0,842</text:p>
          </table:table-cell>
          <table:table-cell table:style-name="ce12N2" office:value-type="float" office:value="218.32">
            <text:p>218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41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91.86">
            <text:p>8791,86</text:p>
          </table:table-cell>
          <table:table-cell table:style-name="ce12N2" office:value-type="float" office:value="8.79">
            <text:p>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.13">
            <text:p>79,1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417.2">
            <text:p>10417,20</text:p>
          </table:table-cell>
          <table:table-cell table:style-name="ce12N2" office:value-type="float" office:value="729.2">
            <text:p>72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646613408405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2">
            <text:p>31080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6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3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04.3">
            <text:p>260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04.3">
            <text:p>260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46">
            <text:p>0,210</text:p>
          </table:table-cell>
          <table:table-cell table:style-name="ce12N2" office:value-type="float" office:value="54.58">
            <text:p>54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0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97.97">
            <text:p>2197,97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8">
            <text:p>19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4.3">
            <text:p>2604,30</text:p>
          </table:table-cell>
          <table:table-cell table:style-name="ce12N2" office:value-type="float" office:value="182.3">
            <text:p>18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646719100373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5">
            <text:p>31080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7.8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62.4">
            <text:p>396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62.4">
            <text:p>396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04">
            <text:p>0,053</text:p>
          </table:table-cell>
          <table:table-cell table:style-name="ce12N2" office:value-type="float" office:value="13.35">
            <text:p>13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6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52.05">
            <text:p>3452,05</text:p>
          </table:table-cell>
          <table:table-cell table:style-name="ce12N2" office:value-type="float" office:value="3.45">
            <text:p>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07">
            <text:p>31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62.4">
            <text:p>3962,40</text:p>
          </table:table-cell>
          <table:table-cell table:style-name="ce12N2" office:value-type="float" office:value="158.5">
            <text:p>15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78591754941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2">
            <text:p>310822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92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273.86">
            <text:p>16827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2977.1">
            <text:p>16297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92825">
            <text:p>32,928</text:p>
          </table:table-cell>
          <table:table-cell table:style-name="ce12N2" office:value-type="float" office:value="3047.75">
            <text:p>3047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8.273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7548.61">
            <text:p>137548,61</text:p>
          </table:table-cell>
          <table:table-cell table:style-name="ce12N2" office:value-type="float" office:value="137.55">
            <text:p>13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7.94">
            <text:p>1237,94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296.76">
            <text:p>5296,76</text:p>
          </table:table-cell>
          <table:table-cell table:style-name="ce12N2" office:value-type="float" office:value="162977.1">
            <text:p>162977,10</text:p>
          </table:table-cell>
          <table:table-cell table:style-name="ce12N2" office:value-type="float" office:value="11408.4">
            <text:p>1140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0808396000521550010008923861942486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3">
            <text:p>310823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92.3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004.89">
            <text:p>5900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57181.49">
            <text:p>57181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612303">
            <text:p>19,612</text:p>
          </table:table-cell>
          <table:table-cell table:style-name="ce12N2" office:value-type="float" office:value="3489.36">
            <text:p>348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.004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892">
            <text:p>48892,00</text:p>
          </table:table-cell>
          <table:table-cell table:style-name="ce12N2" office:value-type="float" office:value="48.88">
            <text:p>4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0.05">
            <text:p>440,05</text:p>
          </table:table-cell>
          <table:table-cell table:style-name="ce12N2" office:value-type="float" office:value="55.14">
            <text:p>55,1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823.4">
            <text:p>1823,40</text:p>
          </table:table-cell>
          <table:table-cell table:style-name="ce12N2" office:value-type="float" office:value="51916.07">
            <text:p>51916,07</text:p>
          </table:table-cell>
          <table:table-cell table:style-name="ce12N2" office:value-type="float" office:value="3306.01">
            <text:p>330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08083960005215500100089238716826801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5">
            <text:p>310825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936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039.51">
            <text:p>16003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160039.51">
            <text:p>160039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10574">
            <text:p>10,106</text:p>
          </table:table-cell>
          <table:table-cell table:style-name="ce12N2" office:value-type="float" office:value="22132.13">
            <text:p>22132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0.039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069.38">
            <text:p>135069,38</text:p>
          </table:table-cell>
          <table:table-cell table:style-name="ce12N2" office:value-type="float" office:value="135.09">
            <text:p>13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5.61">
            <text:p>1215,6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039.51">
            <text:p>160039,51</text:p>
          </table:table-cell>
          <table:table-cell table:style-name="ce12N2" office:value-type="float" office:value="11202.77">
            <text:p>1120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93619341881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9">
            <text:p>310829</text:p>
          </table:table-cell>
          <table:table-cell table:style-name="ce0" table:number-columns-spanned="4" table:number-rows-spanned="1" office:value-type="string" calcext:value-type="string">
            <text:p>11.789 - POLI-FERR INDUSTRIA E COMERCIO LTDA-EPP</text:p>
          </table:table-cell>
          <table:covered-table-cell table:number-columns-repeated="3"/>
          <table:table-cell table:style-name="ce0" office:value-type="string" calcext:value-type="string">
            <text:p>12.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81.2">
            <text:p>1338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2960">
            <text:p>129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2.2205">
            <text:p>102,221</text:p>
          </table:table-cell>
          <table:table-cell table:style-name="ce12N2" office:value-type="float" office:value="283">
            <text:p>28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38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79.76">
            <text:p>11579,76</text:p>
          </table:table-cell>
          <table:table-cell table:style-name="ce12N2" office:value-type="float" office:value="11.58">
            <text:p>1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4.22">
            <text:p>104,22</text:p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1.2">
            <text:p>421,20</text:p>
          </table:table-cell>
          <table:table-cell table:style-name="ce12N2" office:value-type="float" office:value="12960">
            <text:p>12960,00</text:p>
          </table:table-cell>
          <table:table-cell table:style-name="ce12N2" office:value-type="float" office:value="907.2">
            <text:p>9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99.22">
            <text:p>39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957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3/07/2026</text:p>
          </table:table-cell>
          <table:table-cell table:style-name="ce12" office:value-type="string" calcext:value-type="string">
            <text:p>399,22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35260701115780000188550010000125851498170563</text:p>
          </table:table-cell>
          <table:table-cell table:style-name="ce0" office:value-type="string" calcext:value-type="string">
            <text:p>3526071138956500020057005000402957100089434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1">
            <text:p>310831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945.98">
            <text:p>4094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0945.98">
            <text:p>4094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959">
            <text:p>5,196</text:p>
          </table:table-cell>
          <table:table-cell table:style-name="ce12N2" office:value-type="float" office:value="584">
            <text:p>58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94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689.84">
            <text:p>36689,84</text:p>
          </table:table-cell>
          <table:table-cell table:style-name="ce12N2" office:value-type="float" office:value="36.69">
            <text:p>3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0.21">
            <text:p>330,2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945.98">
            <text:p>40945,98</text:p>
          </table:table-cell>
          <table:table-cell table:style-name="ce12N2" office:value-type="float" office:value="2866.23">
            <text:p>286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1910186367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2">
            <text:p>310832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.3">
            <text:p>95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53.3">
            <text:p>95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56">
            <text:p>0,196</text:p>
          </table:table-cell>
          <table:table-cell table:style-name="ce12N2" office:value-type="float" office:value="31.5">
            <text:p>3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4.2">
            <text:p>854,20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3.3">
            <text:p>953,30</text:p>
          </table:table-cell>
          <table:table-cell table:style-name="ce12N2" office:value-type="float" office:value="66.73">
            <text:p>6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2214304103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6">
            <text:p>310836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2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831.6">
            <text:p>1128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9280">
            <text:p>1092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508">
            <text:p>49,508</text:p>
          </table:table-cell>
          <table:table-cell table:style-name="ce12N2" office:value-type="float" office:value="25000">
            <text:p>25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2.8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229.59">
            <text:p>92229,59</text:p>
          </table:table-cell>
          <table:table-cell table:style-name="ce12N2" office:value-type="float" office:value="92.23">
            <text:p>9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0.07">
            <text:p>830,07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3551.6">
            <text:p>3551,60</text:p>
          </table:table-cell>
          <table:table-cell table:style-name="ce12N2" office:value-type="float" office:value="109280">
            <text:p>109280,00</text:p>
          </table:table-cell>
          <table:table-cell table:style-name="ce12N2" office:value-type="float" office:value="7649.6">
            <text:p>764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2418378530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9">
            <text:p>310839</text:p>
          </table:table-cell>
          <table:table-cell table:style-name="ce0" table:number-columns-spanned="4" table:number-rows-spanned="1" office:value-type="string" calcext:value-type="string">
            <text:p>602 - DECORLUX MATERIAL ELETRICO LTDA</text:p>
          </table:table-cell>
          <table:covered-table-cell table:number-columns-repeated="3"/>
          <table:table-cell table:style-name="ce0" office:value-type="string" calcext:value-type="string">
            <text:p>204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604.41">
            <text:p>2860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6454.54">
            <text:p>26454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7.699055">
            <text:p>377,699</text:p>
          </table:table-cell>
          <table:table-cell table:style-name="ce12N2" office:value-type="float" office:value="78.47">
            <text:p>78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604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047.16">
            <text:p>23047,16</text:p>
          </table:table-cell>
          <table:table-cell table:style-name="ce12N2" office:value-type="float" office:value="23.06">
            <text:p>2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.43">
            <text:p>207,4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2149.87">
            <text:p>2149,87</text:p>
          </table:table-cell>
          <table:table-cell table:style-name="ce12N2" office:value-type="float" office:value="26454.54">
            <text:p>26454,54</text:p>
          </table:table-cell>
          <table:table-cell table:style-name="ce12N2" office:value-type="float" office:value="1058.19">
            <text:p>105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2382942000107550010002048841235478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0">
            <text:p>310840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53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2.36">
            <text:p>355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35.55">
            <text:p>3335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4">
            <text:p>0,059</text:p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5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9.34">
            <text:p>2859,34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3">
            <text:p>25,73</text:p>
          </table:table-cell>
          <table:table-cell table:style-name="ce12N2" office:value-type="float" office:value="44.08">
            <text:p>44,0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216.81">
            <text:p>216,81</text:p>
          </table:table-cell>
          <table:table-cell table:style-name="ce12N2" office:value-type="float" office:value="3335.55">
            <text:p>3335,55</text:p>
          </table:table-cell>
          <table:table-cell table:style-name="ce12N2" office:value-type="float" office:value="133.42">
            <text:p>13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5381820249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1">
            <text:p>31084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7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635">
            <text:p>0,038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3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33.65">
            <text:p>7033,65</text:p>
          </table:table-cell>
          <table:table-cell table:style-name="ce12N2" office:value-type="float" office:value="7.03">
            <text:p>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3">
            <text:p>63,3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583.38">
            <text:p>58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79713977900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3">
            <text:p>310853</text:p>
          </table:table-cell>
          <table:table-cell table:style-name="ce0" table:number-columns-spanned="4" table:number-rows-spanned="1" office:value-type="string" calcext:value-type="string">
            <text:p>10.606 - ZMA- PERFIL DE ALUMINIO EIRELI-ME</text:p>
          </table:table-cell>
          <table:covered-table-cell table:number-columns-repeated="3"/>
          <table:table-cell table:style-name="ce0" office:value-type="string" calcext:value-type="string">
            <text:p>18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175">
            <text:p>2,317</text:p>
          </table:table-cell>
          <table:table-cell table:style-name="ce12N2" office:value-type="float" office:value="710.5">
            <text:p>71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44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255.92">
            <text:p>17255,92</text:p>
          </table:table-cell>
          <table:table-cell table:style-name="ce12N2" office:value-type="float" office:value="17.23">
            <text:p>1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5.27">
            <text:p>155,27</text:p>
          </table:table-cell>
          <table:table-cell table:style-name="ce12N2" office:value-type="float" office:value="49.33">
            <text:p>49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1431.22">
            <text:p>143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02961810001455500100001852710015324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4">
            <text:p>310854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5.7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0.66">
            <text:p>184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28.32">
            <text:p>1728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712">
            <text:p>0,153</text:p>
          </table:table-cell>
          <table:table-cell table:style-name="ce12N2" office:value-type="float" office:value="26.6">
            <text:p>2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40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8.66">
            <text:p>1458,66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13">
            <text:p>13,1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12.34">
            <text:p>112,34</text:p>
          </table:table-cell>
          <table:table-cell table:style-name="ce12N2" office:value-type="float" office:value="1728.32">
            <text:p>1728,32</text:p>
          </table:table-cell>
          <table:table-cell table:style-name="ce12N2" office:value-type="float" office:value="120.98">
            <text:p>12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50238000114550010013757071218753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5">
            <text:p>310855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71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4">
            <text:p>834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44">
            <text:p>83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6">
            <text:p>0,017</text:p>
          </table:table-cell>
          <table:table-cell table:style-name="ce12N2" office:value-type="float" office:value="1000">
            <text:p>1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4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42.13">
            <text:p>7042,13</text:p>
          </table:table-cell>
          <table:table-cell table:style-name="ce12N2" office:value-type="float" office:value="7.04">
            <text:p>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38">
            <text:p>63,38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44">
            <text:p>8344,00</text:p>
          </table:table-cell>
          <table:table-cell table:style-name="ce12N2" office:value-type="float" office:value="584.08">
            <text:p>58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7113621171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7">
            <text:p>310857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125">
            <text:p>13,125</text:p>
          </table:table-cell>
          <table:table-cell table:style-name="ce12N2" office:value-type="float" office:value="140">
            <text:p>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696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71.75">
            <text:p>9871,75</text:p>
          </table:table-cell>
          <table:table-cell table:style-name="ce12N2" office:value-type="float" office:value="9.87">
            <text:p>9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.85">
            <text:p>88,8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818.77">
            <text:p>81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6051068935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9">
            <text:p>310859</text:p>
          </table:table-cell>
          <table:table-cell table:style-name="ce0" table:number-columns-spanned="4" table:number-rows-spanned="1" office:value-type="string" calcext:value-type="string">
            <text:p>13.600 - ANJO QUIMICA DO BRASIL LTDA</text:p>
          </table:table-cell>
          <table:covered-table-cell table:number-columns-repeated="3"/>
          <table:table-cell table:style-name="ce0" office:value-type="string" calcext:value-type="string">
            <text:p>481.10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567">
            <text:p>5,457</text:p>
          </table:table-cell>
          <table:table-cell table:style-name="ce12N2" office:value-type="float" office:value="3753">
            <text:p>375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69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787">
            <text:p>42787,00</text:p>
          </table:table-cell>
          <table:table-cell table:style-name="ce12N2" office:value-type="float" office:value="42.79">
            <text:p>42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5.08">
            <text:p>385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3548.79">
            <text:p>354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921346000158550020004811071915915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5">
            <text:p>310865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95.39">
            <text:p>9395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395.39">
            <text:p>9395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55">
            <text:p>0,855</text:p>
          </table:table-cell>
          <table:table-cell table:style-name="ce12N2" office:value-type="float" office:value="150">
            <text:p>1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395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18.77">
            <text:p>8418,77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77">
            <text:p>75,7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95.39">
            <text:p>9395,39</text:p>
          </table:table-cell>
          <table:table-cell table:style-name="ce12N2" office:value-type="float" office:value="657.68">
            <text:p>657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211093594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1">
            <text:p>31087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2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3.38">
            <text:p>14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03.89">
            <text:p>1403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359">
            <text:p>0,054</text:p>
          </table:table-cell>
          <table:table-cell table:style-name="ce12N2" office:value-type="float" office:value="14.22">
            <text:p>14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.62">
            <text:p>1185,62</text:p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67">
            <text:p>10,67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89.49">
            <text:p>89,49</text:p>
          </table:table-cell>
          <table:table-cell table:style-name="ce12N2" office:value-type="float" office:value="1403.89">
            <text:p>1403,89</text:p>
          </table:table-cell>
          <table:table-cell table:style-name="ce12N2" office:value-type="float" office:value="97.42">
            <text:p>9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2981570443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4">
            <text:p>310874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7.906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141.2">
            <text:p>7514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5007.93">
            <text:p>75007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2005">
            <text:p>0,192</text:p>
          </table:table-cell>
          <table:table-cell table:style-name="ce12N2" office:value-type="float" office:value="61.65">
            <text:p>6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14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346.9">
            <text:p>65346,90</text:p>
          </table:table-cell>
          <table:table-cell table:style-name="ce12N2" office:value-type="float" office:value="65.35">
            <text:p>6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12">
            <text:p>588,1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33.27">
            <text:p>133,27</text:p>
          </table:table-cell>
          <table:table-cell table:style-name="ce12N2" office:value-type="float" office:value="75007.93">
            <text:p>75007,93</text:p>
          </table:table-cell>
          <table:table-cell table:style-name="ce12N2" office:value-type="float" office:value="3000.32">
            <text:p>300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2741051000185550550003079061614027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8">
            <text:p>310878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8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287.55">
            <text:p>8728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4540">
            <text:p>845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2.92">
            <text:p>92,920</text:p>
          </table:table-cell>
          <table:table-cell table:style-name="ce12N2" office:value-type="float" office:value="20800">
            <text:p>208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.287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49.64">
            <text:p>71349,64</text:p>
          </table:table-cell>
          <table:table-cell table:style-name="ce12N2" office:value-type="float" office:value="71.35">
            <text:p>7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2.15">
            <text:p>642,15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747.55">
            <text:p>2747,55</text:p>
          </table:table-cell>
          <table:table-cell table:style-name="ce12N2" office:value-type="float" office:value="84540">
            <text:p>84540,00</text:p>
          </table:table-cell>
          <table:table-cell table:style-name="ce12N2" office:value-type="float" office:value="5917.8">
            <text:p>591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8617515106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1">
            <text:p>3108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9.72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6.8">
            <text:p>280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06.8">
            <text:p>280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57">
            <text:p>0,017</text:p>
          </table:table-cell>
          <table:table-cell table:style-name="ce12N2" office:value-type="float" office:value="11.16">
            <text:p>11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0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8.9">
            <text:p>2368,90</text:p>
          </table:table-cell>
          <table:table-cell table:style-name="ce12N2" office:value-type="float" office:value="2.37">
            <text:p>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2">
            <text:p>21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6.8">
            <text:p>2806,80</text:p>
          </table:table-cell>
          <table:table-cell table:style-name="ce12N2" office:value-type="float" office:value="196.48">
            <text:p>19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97271658907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2">
            <text:p>31088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30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29125">
            <text:p>0,829</text:p>
          </table:table-cell>
          <table:table-cell table:style-name="ce12N2" office:value-type="float" office:value="279.25">
            <text:p>279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9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8.17">
            <text:p>6828,17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45">
            <text:p>61,4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566.34">
            <text:p>566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3051118249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5">
            <text:p>310885</text:p>
          </table:table-cell>
          <table:table-cell table:style-name="ce0" table:number-columns-spanned="4" table:number-rows-spanned="1" office:value-type="string" calcext:value-type="string">
            <text:p>619 - CAST METAIS E SOLDAS LTDA</text:p>
          </table:table-cell>
          <table:covered-table-cell table:number-columns-repeated="3"/>
          <table:table-cell table:style-name="ce0" office:value-type="string" calcext:value-type="string">
            <text:p>123.7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31">
            <text:p>0,067</text:p>
          </table:table-cell>
          <table:table-cell table:style-name="ce12N2" office:value-type="float" office:value="119.64">
            <text:p>119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20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21.94">
            <text:p>14521,94</text:p>
          </table:table-cell>
          <table:table-cell table:style-name="ce12N2" office:value-type="float" office:value="14.52">
            <text:p>1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.7">
            <text:p>130,7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1204.46">
            <text:p>1204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40795100017855001000123773185092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6">
            <text:p>31088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19.81">
            <text:p>311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4">
            <text:p>29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6">
            <text:p>0,014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1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2.09">
            <text:p>2552,09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97">
            <text:p>22,9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0.41">
            <text:p>190,41</text:p>
          </table:table-cell>
          <table:table-cell table:style-name="ce12N2" office:value-type="float" office:value="2929.4">
            <text:p>2929,40</text:p>
          </table:table-cell>
          <table:table-cell table:style-name="ce12N2" office:value-type="float" office:value="117.18">
            <text:p>11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41458752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7">
            <text:p>31088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3.77">
            <text:p>374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5.28">
            <text:p>351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632">
            <text:p>0,017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3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62.52">
            <text:p>3062,52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56">
            <text:p>27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28.49">
            <text:p>228,49</text:p>
          </table:table-cell>
          <table:table-cell table:style-name="ce12N2" office:value-type="float" office:value="3515.28">
            <text:p>3515,28</text:p>
          </table:table-cell>
          <table:table-cell table:style-name="ce12N2" office:value-type="float" office:value="140.61">
            <text:p>14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51512384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8">
            <text:p>31088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3.41">
            <text:p>333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2">
            <text:p>0,001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39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507.83">
            <text:p>26507,83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57">
            <text:p>238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966.61">
            <text:p>2966,61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1217.07">
            <text:p>12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219679394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9">
            <text:p>31088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572">
            <text:p>0,136</text:p>
          </table:table-cell>
          <table:table-cell table:style-name="ce12N2" office:value-type="float" office:value="66">
            <text:p>6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91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7.89">
            <text:p>11247,89</text:p>
          </table:table-cell>
          <table:table-cell table:style-name="ce12N2" office:value-type="float" office:value="11.25">
            <text:p>1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.23">
            <text:p>101,2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516.43">
            <text:p>51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51165764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0">
            <text:p>31089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3.41">
            <text:p>333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2">
            <text:p>0,001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39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507.83">
            <text:p>26507,83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57">
            <text:p>238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966.61">
            <text:p>2966,61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1217.07">
            <text:p>12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018025762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1">
            <text:p>31089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5.94">
            <text:p>9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8.82">
            <text:p>878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58">
            <text:p>0,004</text:p>
          </table:table-cell>
          <table:table-cell table:style-name="ce12N2" office:value-type="float" office:value="4.39">
            <text:p>4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.63">
            <text:p>765,63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89">
            <text:p>6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7.12">
            <text:p>57,12</text:p>
          </table:table-cell>
          <table:table-cell table:style-name="ce12N2" office:value-type="float" office:value="878.82">
            <text:p>878,82</text:p>
          </table:table-cell>
          <table:table-cell table:style-name="ce12N2" office:value-type="float" office:value="35.15">
            <text:p>3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61979417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2">
            <text:p>3108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9.9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42.92">
            <text:p>3034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491">
            <text:p>284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68">
            <text:p>0,107</text:p>
          </table:table-cell>
          <table:table-cell table:style-name="ce12N2" office:value-type="float" office:value="51.24">
            <text:p>51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34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045.6">
            <text:p>24045,60</text:p>
          </table:table-cell>
          <table:table-cell table:style-name="ce12N2" office:value-type="float" office:value="24.05">
            <text:p>2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6.41">
            <text:p>216,4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851.92">
            <text:p>1851,92</text:p>
          </table:table-cell>
          <table:table-cell table:style-name="ce12N2" office:value-type="float" office:value="28491">
            <text:p>28491,00</text:p>
          </table:table-cell>
          <table:table-cell table:style-name="ce12N2" office:value-type="float" office:value="1994.37">
            <text:p>199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996911767002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3">
            <text:p>31089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2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2297">
            <text:p>0,092</text:p>
          </table:table-cell>
          <table:table-cell table:style-name="ce12N2" office:value-type="float" office:value="65.7">
            <text:p>6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14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76.8">
            <text:p>11076,80</text:p>
          </table:table-cell>
          <table:table-cell table:style-name="ce12N2" office:value-type="float" office:value="11.08">
            <text:p>1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.7">
            <text:p>99,70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508.58">
            <text:p>50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71849426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4">
            <text:p>3108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1.89">
            <text:p>187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16">
            <text:p>0,008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25">
            <text:p>1531,2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14.25">
            <text:p>114,25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70.31">
            <text:p>7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71795115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5">
            <text:p>31089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71.62">
            <text:p>3517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096.48">
            <text:p>3209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36">
            <text:p>0,009</text:p>
          </table:table-cell>
          <table:table-cell table:style-name="ce12N2" office:value-type="float" office:value="20.97">
            <text:p>20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17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962.45">
            <text:p>27962,45</text:p>
          </table:table-cell>
          <table:table-cell table:style-name="ce12N2" office:value-type="float" office:value="27.96">
            <text:p>2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.66">
            <text:p>251,6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075.14">
            <text:p>3075,14</text:p>
          </table:table-cell>
          <table:table-cell table:style-name="ce12N2" office:value-type="float" office:value="32096.48">
            <text:p>32096,48</text:p>
          </table:table-cell>
          <table:table-cell table:style-name="ce12N2" office:value-type="float" office:value="1283.86">
            <text:p>128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11186594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6">
            <text:p>31089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93">
            <text:p>0,034</text:p>
          </table:table-cell>
          <table:table-cell table:style-name="ce12N2" office:value-type="float" office:value="16.5">
            <text:p>1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11.97">
            <text:p>2811,97</text:p>
          </table:table-cell>
          <table:table-cell table:style-name="ce12N2" office:value-type="float" office:value="2.81">
            <text:p>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31">
            <text:p>25,3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129.11">
            <text:p>12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41427856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8">
            <text:p>31089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41.77">
            <text:p>4174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033.5">
            <text:p>3803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5">
            <text:p>0,001</text:p>
          </table:table-cell>
          <table:table-cell table:style-name="ce12N2" office:value-type="float" office:value="15.25">
            <text:p>1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741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34.79">
            <text:p>33134,79</text:p>
          </table:table-cell>
          <table:table-cell table:style-name="ce12N2" office:value-type="float" office:value="33.13">
            <text:p>3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8.21">
            <text:p>298,21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708.27">
            <text:p>3708,27</text:p>
          </table:table-cell>
          <table:table-cell table:style-name="ce12N2" office:value-type="float" office:value="38033.5">
            <text:p>38033,50</text:p>
          </table:table-cell>
          <table:table-cell table:style-name="ce12N2" office:value-type="float" office:value="1521.34">
            <text:p>152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211944058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9">
            <text:p>31089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1.89">
            <text:p>187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16">
            <text:p>0,008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25">
            <text:p>1531,2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14.25">
            <text:p>114,25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70.31">
            <text:p>7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917158908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0">
            <text:p>31090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5.48">
            <text:p>796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257.84">
            <text:p>725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34">
            <text:p>0,007</text:p>
          </table:table-cell>
          <table:table-cell table:style-name="ce12N2" office:value-type="float" office:value="4.52">
            <text:p>4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65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23.04">
            <text:p>6323,04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91">
            <text:p>56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707.64">
            <text:p>707,64</text:p>
          </table:table-cell>
          <table:table-cell table:style-name="ce12N2" office:value-type="float" office:value="7257.84">
            <text:p>7257,84</text:p>
          </table:table-cell>
          <table:table-cell table:style-name="ce12N2" office:value-type="float" office:value="290.31">
            <text:p>29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917102278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1">
            <text:p>31090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960.65">
            <text:p>21096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0808.2">
            <text:p>21080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71492">
            <text:p>14,715</text:p>
          </table:table-cell>
          <table:table-cell table:style-name="ce12N2" office:value-type="float" office:value="1036">
            <text:p>103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0.960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656.11">
            <text:p>183656,11</text:p>
          </table:table-cell>
          <table:table-cell table:style-name="ce12N2" office:value-type="float" office:value="183.65">
            <text:p>18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2.9">
            <text:p>1652,9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52.45">
            <text:p>152,45</text:p>
          </table:table-cell>
          <table:table-cell table:style-name="ce12N2" office:value-type="float" office:value="210808.2">
            <text:p>210808,20</text:p>
          </table:table-cell>
          <table:table-cell table:style-name="ce12N2" office:value-type="float" office:value="8432.33">
            <text:p>843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610924778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2">
            <text:p>31090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090.12">
            <text:p>5009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640.2">
            <text:p>4564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8">
            <text:p>0,001</text:p>
          </table:table-cell>
          <table:table-cell table:style-name="ce12N2" office:value-type="float" office:value="18.3">
            <text:p>1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090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761.74">
            <text:p>39761,74</text:p>
          </table:table-cell>
          <table:table-cell table:style-name="ce12N2" office:value-type="float" office:value="39.76">
            <text:p>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7.86">
            <text:p>357,8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449.92">
            <text:p>4449,92</text:p>
          </table:table-cell>
          <table:table-cell table:style-name="ce12N2" office:value-type="float" office:value="45640.2">
            <text:p>45640,20</text:p>
          </table:table-cell>
          <table:table-cell table:style-name="ce12N2" office:value-type="float" office:value="1825.61">
            <text:p>182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91928943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3">
            <text:p>31090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0.0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06.96">
            <text:p>710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3.2">
            <text:p>667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22">
            <text:p>0,091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0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32">
            <text:p>5632,00</text:p>
          </table:table-cell>
          <table:table-cell table:style-name="ce12N2" office:value-type="float" office:value="5.63">
            <text:p>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.69">
            <text:p>50,6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33.76">
            <text:p>433,76</text:p>
          </table:table-cell>
          <table:table-cell table:style-name="ce12N2" office:value-type="float" office:value="6673.2">
            <text:p>6673,20</text:p>
          </table:table-cell>
          <table:table-cell table:style-name="ce12N2" office:value-type="float" office:value="467.12">
            <text:p>46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007513557869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4">
            <text:p>310904</text:p>
          </table:table-cell>
          <table:table-cell table:style-name="ce0" table:number-columns-spanned="4" table:number-rows-spanned="1" office:value-type="string" calcext:value-type="string">
            <text:p>19.151 - MARLUVAS EQUIPAMENTOS DE SEGURANCA LTDA</text:p>
          </table:table-cell>
          <table:covered-table-cell table:number-columns-repeated="3"/>
          <table:table-cell table:style-name="ce0" office:value-type="string" calcext:value-type="string">
            <text:p>325.4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68.34">
            <text:p>676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768.34">
            <text:p>676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334318">
            <text:p>20,334</text:p>
          </table:table-cell>
          <table:table-cell table:style-name="ce12N2" office:value-type="float" office:value="37.1">
            <text:p>37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68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2.32">
            <text:p>5712,32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41">
            <text:p>51,4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68.34">
            <text:p>6768,34</text:p>
          </table:table-cell>
          <table:table-cell table:style-name="ce12N2" office:value-type="float" office:value="473.79">
            <text:p>47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196530540036045500100032549916658484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5">
            <text:p>310905</text:p>
          </table:table-cell>
          <table:table-cell table:style-name="ce0" table:number-columns-spanned="4" table:number-rows-spanned="1" office:value-type="string" calcext:value-type="string">
            <text:p>19.151 - MARLUVAS EQUIPAMENTOS DE SEGURANCA LTDA</text:p>
          </table:table-cell>
          <table:covered-table-cell table:number-columns-repeated="3"/>
          <table:table-cell table:style-name="ce0" office:value-type="string" calcext:value-type="string">
            <text:p>325.5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5.68">
            <text:p>403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035.68">
            <text:p>4035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584">
            <text:p>0,166</text:p>
          </table:table-cell>
          <table:table-cell table:style-name="ce12N2" office:value-type="float" office:value="28.65">
            <text:p>28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35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06">
            <text:p>3406,00</text:p>
          </table:table-cell>
          <table:table-cell table:style-name="ce12N2" office:value-type="float" office:value="3.4">
            <text:p>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66">
            <text:p>30,6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35.68">
            <text:p>4035,68</text:p>
          </table:table-cell>
          <table:table-cell table:style-name="ce12N2" office:value-type="float" office:value="282.5">
            <text:p>28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19653054003604550010003255121233107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6">
            <text:p>310906</text:p>
          </table:table-cell>
          <table:table-cell table:style-name="ce0" table:number-columns-spanned="4" table:number-rows-spanned="1" office:value-type="string" calcext:value-type="string">
            <text:p>20.496 - REMAS METAIS SANITARIOS LTDA</text:p>
          </table:table-cell>
          <table:covered-table-cell table:number-columns-repeated="3"/>
          <table:table-cell table:style-name="ce0" office:value-type="string" calcext:value-type="string">
            <text:p>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87.17">
            <text:p>298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87.17">
            <text:p>298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976">
            <text:p>0,003</text:p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8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87.17">
            <text:p>2987,17</text:p>
          </table:table-cell>
          <table:table-cell table:style-name="ce12N2" office:value-type="float" office:value="100.37">
            <text:p>10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7.43">
            <text:p>10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83.391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10/07/2026</text:p>
          </table:table-cell>
          <table:table-cell table:style-name="ce12" office:value-type="string" calcext:value-type="string">
            <text:p>107,43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35260735481273000180550010000007951001969221</text:p>
          </table:table-cell>
          <table:table-cell table:style-name="ce0" office:value-type="string" calcext:value-type="string">
            <text:p>3526070522209200076357002000483391100732642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3">
            <text:p>31091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3.65475">
            <text:p>63,655</text:p>
          </table:table-cell>
          <table:table-cell table:style-name="ce12N2" office:value-type="float" office:value="1092">
            <text:p>109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0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608.18">
            <text:p>60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22242808000118550010000028271603114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9">
            <text:p>310919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52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834.56">
            <text:p>7083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68649.81">
            <text:p>68649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37.64155">
            <text:p>337,642</text:p>
          </table:table-cell>
          <table:table-cell table:style-name="ce12N2" office:value-type="float" office:value="1117.01">
            <text:p>1117,0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.83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938.72">
            <text:p>57938,72</text:p>
          </table:table-cell>
          <table:table-cell table:style-name="ce12N2" office:value-type="float" office:value="57.94">
            <text:p>57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1.45">
            <text:p>521,45</text:p>
          </table:table-cell>
          <table:table-cell table:style-name="ce12N2" office:value-type="float" office:value="44.54">
            <text:p>44,5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184.75">
            <text:p>2184,75</text:p>
          </table:table-cell>
          <table:table-cell table:style-name="ce12N2" office:value-type="float" office:value="68649.81">
            <text:p>68649,81</text:p>
          </table:table-cell>
          <table:table-cell table:style-name="ce12N2" office:value-type="float" office:value="4805.49">
            <text:p>480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5291226023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1">
            <text:p>310921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53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48.25">
            <text:p>894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47.79">
            <text:p>824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397">
            <text:p>1,234</text:p>
          </table:table-cell>
          <table:table-cell table:style-name="ce12N2" office:value-type="float" office:value="250.5">
            <text:p>25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4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0.93">
            <text:p>6960,93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5">
            <text:p>62,65</text:p>
          </table:table-cell>
          <table:table-cell table:style-name="ce12N2" office:value-type="float" office:value="43.83">
            <text:p>43,8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700.46">
            <text:p>700,46</text:p>
          </table:table-cell>
          <table:table-cell table:style-name="ce12N2" office:value-type="float" office:value="8247.79">
            <text:p>8247,79</text:p>
          </table:table-cell>
          <table:table-cell table:style-name="ce12N2" office:value-type="float" office:value="577.35">
            <text:p>57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5391890656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3">
            <text:p>31093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30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2">
            <text:p>0,009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60.34">
            <text:p>1060,34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4">
            <text:p>9,5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48.68">
            <text:p>4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30612861220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4">
            <text:p>310934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8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006">
            <text:p>0,500</text:p>
          </table:table-cell>
          <table:table-cell table:style-name="ce12N2" office:value-type="float" office:value="156.39">
            <text:p>156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3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75">
            <text:p>15475,00</text:p>
          </table:table-cell>
          <table:table-cell table:style-name="ce12N2" office:value-type="float" office:value="15.48">
            <text:p>1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28">
            <text:p>139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1283.51">
            <text:p>128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642774001209550010002282661328272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6">
            <text:p>31093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89.71">
            <text:p>1038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55.6">
            <text:p>975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728">
            <text:p>2,8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89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99.08">
            <text:p>8499,08</text:p>
          </table:table-cell>
          <table:table-cell table:style-name="ce12N2" office:value-type="float" office:value="8.5">
            <text:p>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49">
            <text:p>76,4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634.11">
            <text:p>634,11</text:p>
          </table:table-cell>
          <table:table-cell table:style-name="ce12N2" office:value-type="float" office:value="9755.6">
            <text:p>9755,60</text:p>
          </table:table-cell>
          <table:table-cell table:style-name="ce12N2" office:value-type="float" office:value="390.22">
            <text:p>39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81044274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8">
            <text:p>31093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2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0.5">
            <text:p>164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0.38">
            <text:p>154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3092">
            <text:p>0,4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4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41.97">
            <text:p>1341,97</text:p>
          </table:table-cell>
          <table:table-cell table:style-name="ce12N2" office:value-type="float" office:value="1.34">
            <text:p>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08">
            <text:p>12,08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00.12">
            <text:p>100,12</text:p>
          </table:table-cell>
          <table:table-cell table:style-name="ce12N2" office:value-type="float" office:value="1540.38">
            <text:p>1540,38</text:p>
          </table:table-cell>
          <table:table-cell table:style-name="ce12N2" office:value-type="float" office:value="61.62">
            <text:p>6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01168775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4">
            <text:p>31094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5.25">
            <text:p>452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170.73">
            <text:p>4170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976">
            <text:p>0,206</text:p>
          </table:table-cell>
          <table:table-cell table:style-name="ce12N2" office:value-type="float" office:value="34.58">
            <text:p>34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2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26.53">
            <text:p>3526,53</text:p>
          </table:table-cell>
          <table:table-cell table:style-name="ce12N2" office:value-type="float" office:value="3.53">
            <text:p>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74">
            <text:p>31,7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54.52">
            <text:p>354,52</text:p>
          </table:table-cell>
          <table:table-cell table:style-name="ce12N2" office:value-type="float" office:value="4170.73">
            <text:p>4170,73</text:p>
          </table:table-cell>
          <table:table-cell table:style-name="ce12N2" office:value-type="float" office:value="284.74">
            <text:p>28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59515809959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5">
            <text:p>310945</text:p>
          </table:table-cell>
          <table:table-cell table:style-name="ce0" table:number-columns-spanned="4" table:number-rows-spanned="1" office:value-type="string" calcext:value-type="string">
            <text:p>9.694 - SFORPLAST INDUSTRIA E COMERCIO LTDA</text:p>
          </table:table-cell>
          <table:covered-table-cell table:number-columns-repeated="3"/>
          <table:table-cell table:style-name="ce0" office:value-type="string" calcext:value-type="string">
            <text:p>96.7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391.62">
            <text:p>2439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22655.05">
            <text:p>2265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62621">
            <text:p>24,626</text:p>
          </table:table-cell>
          <table:table-cell table:style-name="ce12N2" office:value-type="float" office:value="1424.65">
            <text:p>142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39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300.13">
            <text:p>20300,13</text:p>
          </table:table-cell>
          <table:table-cell table:style-name="ce12N2" office:value-type="float" office:value="20.31">
            <text:p>2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7">
            <text:p>182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736.57">
            <text:p>1736,57</text:p>
          </table:table-cell>
          <table:table-cell table:style-name="ce12N2" office:value-type="float" office:value="22655.05">
            <text:p>22655,05</text:p>
          </table:table-cell>
          <table:table-cell table:style-name="ce12N2" office:value-type="float" office:value="1585.87">
            <text:p>158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869886000240550010000967901825165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6">
            <text:p>310946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09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819.21">
            <text:p>2181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678.3">
            <text:p>21678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22219">
            <text:p>3,222</text:p>
          </table:table-cell>
          <table:table-cell table:style-name="ce12N2" office:value-type="float" office:value="14220">
            <text:p>142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819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295.95">
            <text:p>18295,95</text:p>
          </table:table-cell>
          <table:table-cell table:style-name="ce12N2" office:value-type="float" office:value="18.3">
            <text:p>1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.66">
            <text:p>164,6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40.91">
            <text:p>140,91</text:p>
          </table:table-cell>
          <table:table-cell table:style-name="ce12N2" office:value-type="float" office:value="21678.3">
            <text:p>21678,30</text:p>
          </table:table-cell>
          <table:table-cell table:style-name="ce12N2" office:value-type="float" office:value="1517.48">
            <text:p>151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09418357264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7">
            <text:p>310947</text:p>
          </table:table-cell>
          <table:table-cell table:style-name="ce0" table:number-columns-spanned="4" table:number-rows-spanned="1" office:value-type="string" calcext:value-type="string">
            <text:p>3.166 - ITW PPF BRASIL ADESIVOS LTDA.</text:p>
          </table:table-cell>
          <table:covered-table-cell table:number-columns-repeated="3"/>
          <table:table-cell table:style-name="ce0" office:value-type="string" calcext:value-type="string">
            <text:p>212.4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11.88">
            <text:p>1591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11.88">
            <text:p>1591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64">
            <text:p>1164,000</text:p>
          </table:table-cell>
          <table:table-cell table:style-name="ce12N2" office:value-type="float" office:value="116.4">
            <text:p>1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1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862.43">
            <text:p>13862,43</text:p>
          </table:table-cell>
          <table:table-cell table:style-name="ce12N2" office:value-type="float" office:value="13.86">
            <text:p>1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.76">
            <text:p>124,7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11.88">
            <text:p>15911,88</text:p>
          </table:table-cell>
          <table:table-cell table:style-name="ce12N2" office:value-type="float" office:value="636.48">
            <text:p>63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5858780000129550010002124441267617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8">
            <text:p>310948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042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7.24">
            <text:p>309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97.24">
            <text:p>309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115">
            <text:p>0,221</text:p>
          </table:table-cell>
          <table:table-cell table:style-name="ce12N2" office:value-type="float" office:value="13.9">
            <text:p>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9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80.43">
            <text:p>2880,43</text:p>
          </table:table-cell>
          <table:table-cell table:style-name="ce12N2" office:value-type="float" office:value="2.88">
            <text:p>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92">
            <text:p>25,9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7.24">
            <text:p>3097,24</text:p>
          </table:table-cell>
          <table:table-cell table:style-name="ce12N2" office:value-type="float" office:value="216.81">
            <text:p>21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04218490755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0">
            <text:p>310950</text:p>
          </table:table-cell>
          <table:table-cell table:style-name="ce0" table:number-columns-spanned="4" table:number-rows-spanned="1" office:value-type="string" calcext:value-type="string">
            <text:p>1.200 - INDUSTRIA DE FERRAM. DIAMANTADAS DO BRASIL LTDA</text:p>
          </table:table-cell>
          <table:covered-table-cell table:number-columns-repeated="3"/>
          <table:table-cell table:style-name="ce0" office:value-type="string" calcext:value-type="string">
            <text:p>73.5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8.5">
            <text:p>45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8.5">
            <text:p>45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202">
            <text:p>0,062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8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6.95">
            <text:p>386,95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31">
            <text:p>3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8.5">
            <text:p>458,50</text:p>
          </table:table-cell>
          <table:table-cell table:style-name="ce12N2" office:value-type="float" office:value="32.1">
            <text:p>3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416555000173550000000735941004068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3">
            <text:p>31095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88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9.94">
            <text:p>4979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76">
            <text:p>467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8">
            <text:p>0,288</text:p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9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3.73">
            <text:p>4073,73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66">
            <text:p>36,6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03.94">
            <text:p>303,94</text:p>
          </table:table-cell>
          <table:table-cell table:style-name="ce12N2" office:value-type="float" office:value="4676">
            <text:p>4676,00</text:p>
          </table:table-cell>
          <table:table-cell table:style-name="ce12N2" office:value-type="float" office:value="187.04">
            <text:p>1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8841410960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4">
            <text:p>31095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4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8">
            <text:p>0,173</text:p>
          </table:table-cell>
          <table:table-cell table:style-name="ce12N2" office:value-type="float" office:value="45.8">
            <text:p>4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71.01">
            <text:p>3171,01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4">
            <text:p>28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263.01">
            <text:p>26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48711483275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8">
            <text:p>310998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45.326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35.72">
            <text:p>8863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84538.19">
            <text:p>8453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325382">
            <text:p>49,325</text:p>
          </table:table-cell>
          <table:table-cell table:style-name="ce12N2" office:value-type="float" office:value="462.79">
            <text:p>462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.63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55.48">
            <text:p>73455,48</text:p>
          </table:table-cell>
          <table:table-cell table:style-name="ce12N2" office:value-type="float" office:value="73.42">
            <text:p>7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.06">
            <text:p>661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4097.53">
            <text:p>4097,53</text:p>
          </table:table-cell>
          <table:table-cell table:style-name="ce12N2" office:value-type="float" office:value="83238.63">
            <text:p>83238,63</text:p>
          </table:table-cell>
          <table:table-cell table:style-name="ce12N2" office:value-type="float" office:value="3595.53">
            <text:p>359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3296273003298550230024453261905487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2">
            <text:p>3110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0.5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2.38">
            <text:p>316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62.38">
            <text:p>316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3">
            <text:p>0,056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2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8.98">
            <text:p>2668,98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2">
            <text:p>24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2.38">
            <text:p>3162,38</text:p>
          </table:table-cell>
          <table:table-cell table:style-name="ce12N2" office:value-type="float" office:value="221.36">
            <text:p>22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05001147376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3">
            <text:p>31101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40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5.48">
            <text:p>109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1">
            <text:p>106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">
            <text:p>0,002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5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95.46">
            <text:p>895,46</text:p>
          </table:table-cell>
          <table:table-cell table:style-name="ce12N2" office:value-type="float" office:value="0.9">
            <text:p>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06">
            <text:p>8,0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34.48">
            <text:p>34,48</text:p>
          </table:table-cell>
          <table:table-cell table:style-name="ce12N2" office:value-type="float" office:value="1061">
            <text:p>1061,00</text:p>
          </table:table-cell>
          <table:table-cell table:style-name="ce12N2" office:value-type="float" office:value="74.27">
            <text:p>7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4051052811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5">
            <text:p>311015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4.9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138.91">
            <text:p>5713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55340.35">
            <text:p>5534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08208">
            <text:p>0,708</text:p>
          </table:table-cell>
          <table:table-cell table:style-name="ce12N2" office:value-type="float" office:value="545.73">
            <text:p>545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.13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705.85">
            <text:p>46705,85</text:p>
          </table:table-cell>
          <table:table-cell table:style-name="ce12N2" office:value-type="float" office:value="46.72">
            <text:p>4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0.34">
            <text:p>420,3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798.56">
            <text:p>1798,56</text:p>
          </table:table-cell>
          <table:table-cell table:style-name="ce12N2" office:value-type="float" office:value="55340.35">
            <text:p>55340,35</text:p>
          </table:table-cell>
          <table:table-cell table:style-name="ce12N2" office:value-type="float" office:value="3873.84">
            <text:p>3873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3983690008005500100060490511179358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6">
            <text:p>311016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4.9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33.48">
            <text:p>523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068.75">
            <text:p>506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625">
            <text:p>0,007</text:p>
          </table:table-cell>
          <table:table-cell table:style-name="ce12N2" office:value-type="float" office:value="53.4">
            <text:p>53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3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77.89">
            <text:p>4277,89</text:p>
          </table:table-cell>
          <table:table-cell table:style-name="ce12N2" office:value-type="float" office:value="4.28">
            <text:p>4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5">
            <text:p>38,5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64.73">
            <text:p>164,73</text:p>
          </table:table-cell>
          <table:table-cell table:style-name="ce12N2" office:value-type="float" office:value="5068.75">
            <text:p>5068,75</text:p>
          </table:table-cell>
          <table:table-cell table:style-name="ce12N2" office:value-type="float" office:value="354.82">
            <text:p>35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3983690008005500100060490612009420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26">
            <text:p>311026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9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8.59">
            <text:p>126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8.66">
            <text:p>1228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0">
            <text:p>1500,000</text:p>
          </table:table-cell>
          <table:table-cell table:style-name="ce12N2" office:value-type="float" office:value="150">
            <text:p>1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8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6.96">
            <text:p>1036,96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3">
            <text:p>9,3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39.93">
            <text:p>39,93</text:p>
          </table:table-cell>
          <table:table-cell table:style-name="ce12N2" office:value-type="float" office:value="1228.66">
            <text:p>1228,66</text:p>
          </table:table-cell>
          <table:table-cell table:style-name="ce12N2" office:value-type="float" office:value="86.01">
            <text:p>8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90015842994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2">
            <text:p>31103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2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12">
            <text:p>5,312</text:p>
          </table:table-cell>
          <table:table-cell table:style-name="ce12N2" office:value-type="float" office:value="2298.78">
            <text:p>2298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6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483.6">
            <text:p>49483,60</text:p>
          </table:table-cell>
          <table:table-cell table:style-name="ce12N2" office:value-type="float" office:value="49.48">
            <text:p>4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5.35">
            <text:p>445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4104.21">
            <text:p>410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2981183537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3">
            <text:p>31103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89.6">
            <text:p>1488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89.6">
            <text:p>1488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7054">
            <text:p>1,971</text:p>
          </table:table-cell>
          <table:table-cell table:style-name="ce12N2" office:value-type="float" office:value="1537.36">
            <text:p>1537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88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566.45">
            <text:p>12566,45</text:p>
          </table:table-cell>
          <table:table-cell table:style-name="ce12N2" office:value-type="float" office:value="12.57">
            <text:p>1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.1">
            <text:p>113,1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9.6">
            <text:p>14889,60</text:p>
          </table:table-cell>
          <table:table-cell table:style-name="ce12N2" office:value-type="float" office:value="1042.27">
            <text:p>104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101260426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4">
            <text:p>31103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914.3">
            <text:p>2091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914.3">
            <text:p>2091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94">
            <text:p>0,169</text:p>
          </table:table-cell>
          <table:table-cell table:style-name="ce12N2" office:value-type="float" office:value="1815">
            <text:p>18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91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651.15">
            <text:p>17651,15</text:p>
          </table:table-cell>
          <table:table-cell table:style-name="ce12N2" office:value-type="float" office:value="17.65">
            <text:p>17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8.86">
            <text:p>158,8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914.3">
            <text:p>20914,30</text:p>
          </table:table-cell>
          <table:table-cell table:style-name="ce12N2" office:value-type="float" office:value="1464">
            <text:p>146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091827926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5">
            <text:p>3110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7">
            <text:p>0,276</text:p>
          </table:table-cell>
          <table:table-cell table:style-name="ce12N2" office:value-type="float" office:value="179.32">
            <text:p>179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9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51.5">
            <text:p>4551,50</text:p>
          </table:table-cell>
          <table:table-cell table:style-name="ce12N2" office:value-type="float" office:value="4.55">
            <text:p>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96">
            <text:p>40,9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377.5">
            <text:p>37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0814804806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6">
            <text:p>31103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66.88">
            <text:p>4166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66.88">
            <text:p>4166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6736">
            <text:p>0,337</text:p>
          </table:table-cell>
          <table:table-cell table:style-name="ce12N2" office:value-type="float" office:value="87.33">
            <text:p>8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66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16.74">
            <text:p>3516,74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65">
            <text:p>31,6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66.88">
            <text:p>4166,88</text:p>
          </table:table-cell>
          <table:table-cell table:style-name="ce12N2" office:value-type="float" office:value="291.68">
            <text:p>29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071684306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7">
            <text:p>31103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032.91">
            <text:p>2200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220032.91">
            <text:p>220032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8.424574">
            <text:p>58,425</text:p>
          </table:table-cell>
          <table:table-cell table:style-name="ce12N2" office:value-type="float" office:value="10453.36">
            <text:p>1045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0.032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5702.3">
            <text:p>185702,30</text:p>
          </table:table-cell>
          <table:table-cell table:style-name="ce12N2" office:value-type="float" office:value="185.7">
            <text:p>18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1.32">
            <text:p>1671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0032.91">
            <text:p>220032,91</text:p>
          </table:table-cell>
          <table:table-cell table:style-name="ce12N2" office:value-type="float" office:value="15402.31">
            <text:p>1540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061777472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1">
            <text:p>311041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06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8.87">
            <text:p>304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2.9">
            <text:p>295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468">
            <text:p>0,085</text:p>
          </table:table-cell>
          <table:table-cell table:style-name="ce12N2" office:value-type="float" office:value="9.4">
            <text:p>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2.18">
            <text:p>2492,18</text:p>
          </table:table-cell>
          <table:table-cell table:style-name="ce12N2" office:value-type="float" office:value="2.49">
            <text:p>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3">
            <text:p>22,4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95.97">
            <text:p>95,97</text:p>
          </table:table-cell>
          <table:table-cell table:style-name="ce12N2" office:value-type="float" office:value="2952.9">
            <text:p>2952,90</text:p>
          </table:table-cell>
          <table:table-cell table:style-name="ce12N2" office:value-type="float" office:value="206.7">
            <text:p>20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0651905436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2">
            <text:p>311042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7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4.43">
            <text:p>615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623.91">
            <text:p>5623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8256">
            <text:p>1,183</text:p>
          </table:table-cell>
          <table:table-cell table:style-name="ce12N2" office:value-type="float" office:value="222">
            <text:p>2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4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46.44">
            <text:p>4746,44</text:p>
          </table:table-cell>
          <table:table-cell table:style-name="ce12N2" office:value-type="float" office:value="4.75">
            <text:p>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72">
            <text:p>42,72</text:p>
          </table:table-cell>
          <table:table-cell table:style-name="ce12N2" office:value-type="float" office:value="43.71">
            <text:p>43,7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530.52">
            <text:p>530,52</text:p>
          </table:table-cell>
          <table:table-cell table:style-name="ce12N2" office:value-type="float" office:value="5623.91">
            <text:p>5623,91</text:p>
          </table:table-cell>
          <table:table-cell table:style-name="ce12N2" office:value-type="float" office:value="393.67">
            <text:p>39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72613633083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3">
            <text:p>311043</text:p>
          </table:table-cell>
          <table:table-cell table:style-name="ce0" table:number-columns-spanned="4" table:number-rows-spanned="1" office:value-type="string" calcext:value-type="string">
            <text:p>681 - UNIAO MUNDIAL INDUSTRIA DE FERRAGENS LTDA</text:p>
          </table:table-cell>
          <table:covered-table-cell table:number-columns-repeated="3"/>
          <table:table-cell table:style-name="ce0" office:value-type="string" calcext:value-type="string">
            <text:p>276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48.35">
            <text:p>11394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">
            <text:p>141,00</text:p>
          </table:table-cell>
          <table:table-cell table:style-name="ce12N2" office:value-type="float" office:value="112920.07">
            <text:p>112920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06714">
            <text:p>5,407</text:p>
          </table:table-cell>
          <table:table-cell table:style-name="ce12N2" office:value-type="float" office:value="33121.72">
            <text:p>33121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3.948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82.6">
            <text:p>101182,60</text:p>
          </table:table-cell>
          <table:table-cell table:style-name="ce12N2" office:value-type="float" office:value="101.18">
            <text:p>10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0.64">
            <text:p>910,64</text:p>
          </table:table-cell>
          <table:table-cell table:style-name="ce12N2" office:value-type="float" office:value="62.84">
            <text:p>62,8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028.28">
            <text:p>1028,28</text:p>
          </table:table-cell>
          <table:table-cell table:style-name="ce12N2" office:value-type="float" office:value="112920.07">
            <text:p>112920,07</text:p>
          </table:table-cell>
          <table:table-cell table:style-name="ce12N2" office:value-type="float" office:value="7904.4">
            <text:p>790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22234140001765500100027661913192871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6">
            <text:p>311046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36.7">
            <text:p>2273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736.7">
            <text:p>2273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6.6846">
            <text:p>56,685</text:p>
          </table:table-cell>
          <table:table-cell table:style-name="ce12N2" office:value-type="float" office:value="1775">
            <text:p>177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73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36.7">
            <text:p>22736,70</text:p>
          </table:table-cell>
          <table:table-cell table:style-name="ce12N2" office:value-type="float" office:value="863.99">
            <text:p>863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22242808000118550010000028261595048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71">
            <text:p>311071</text:p>
          </table:table-cell>
          <table:table-cell table:style-name="ce0" table:number-columns-spanned="4" table:number-rows-spanned="1" office:value-type="string" calcext:value-type="string">
            <text:p>15.652 - ARMACELL BRASIL LTDA</text:p>
          </table:table-cell>
          <table:covered-table-cell table:number-columns-repeated="3"/>
          <table:table-cell table:style-name="ce0" office:value-type="string" calcext:value-type="string">
            <text:p>90.982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957.21">
            <text:p>2895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8045.72">
            <text:p>2804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6.478556">
            <text:p>96,479</text:p>
          </table:table-cell>
          <table:table-cell table:style-name="ce12N2" office:value-type="float" office:value="2940.6">
            <text:p>294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957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69.89">
            <text:p>23669,89</text:p>
          </table:table-cell>
          <table:table-cell table:style-name="ce12N2" office:value-type="float" office:value="23.67">
            <text:p>2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.04">
            <text:p>213,04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911.49">
            <text:p>911,49</text:p>
          </table:table-cell>
          <table:table-cell table:style-name="ce12N2" office:value-type="float" office:value="28045.72">
            <text:p>28045,72</text:p>
          </table:table-cell>
          <table:table-cell table:style-name="ce12N2" office:value-type="float" office:value="1963.2">
            <text:p>196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44258620005405500500009098216681333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73">
            <text:p>3110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25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9.26">
            <text:p>145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9.26">
            <text:p>145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86">
            <text:p>0,011</text:p>
          </table:table-cell>
          <table:table-cell table:style-name="ce12N2" office:value-type="float" office:value="9.93">
            <text:p>9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9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1.58">
            <text:p>1231,58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08">
            <text:p>11,0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9.26">
            <text:p>1459,26</text:p>
          </table:table-cell>
          <table:table-cell table:style-name="ce12N2" office:value-type="float" office:value="102.15">
            <text:p>10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2531638008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1">
            <text:p>31109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25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608.24">
            <text:p>14460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143576.69">
            <text:p>143576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20181">
            <text:p>1,120</text:p>
          </table:table-cell>
          <table:table-cell table:style-name="ce12N2" office:value-type="float" office:value="569.29">
            <text:p>56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4.608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722.72">
            <text:p>121722,72</text:p>
          </table:table-cell>
          <table:table-cell table:style-name="ce12N2" office:value-type="float" office:value="121.87">
            <text:p>12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5.51">
            <text:p>1095,5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031.55">
            <text:p>1031,55</text:p>
          </table:table-cell>
          <table:table-cell table:style-name="ce12N2" office:value-type="float" office:value="143576.69">
            <text:p>143576,69</text:p>
          </table:table-cell>
          <table:table-cell table:style-name="ce12N2" office:value-type="float" office:value="9446.96">
            <text:p>944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2541585957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2">
            <text:p>311092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409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9">
            <text:p>594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49">
            <text:p>594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907">
            <text:p>1,191</text:p>
          </table:table-cell>
          <table:table-cell table:style-name="ce12N2" office:value-type="float" office:value="735.84">
            <text:p>735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4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20.8">
            <text:p>5020,80</text:p>
          </table:table-cell>
          <table:table-cell table:style-name="ce12N2" office:value-type="float" office:value="5.02">
            <text:p>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19">
            <text:p>45,1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49">
            <text:p>5949,00</text:p>
          </table:table-cell>
          <table:table-cell table:style-name="ce12N2" office:value-type="float" office:value="416.43">
            <text:p>41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46752700004505504000006240916110904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3">
            <text:p>311093</text:p>
          </table:table-cell>
          <table:table-cell table:style-name="ce0" table:number-columns-spanned="4" table:number-rows-spanned="1" office:value-type="string" calcext:value-type="string">
            <text:p>706 - IKEDA EMPRESARIAL LTDA</text:p>
          </table:table-cell>
          <table:covered-table-cell table:number-columns-repeated="3"/>
          <table:table-cell table:style-name="ce0" office:value-type="string" calcext:value-type="string">
            <text:p>113.1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68.21">
            <text:p>19168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7998.31">
            <text:p>17998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20274">
            <text:p>3,620</text:p>
          </table:table-cell>
          <table:table-cell table:style-name="ce12N2" office:value-type="float" office:value="138.95">
            <text:p>138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168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127.46">
            <text:p>16127,46</text:p>
          </table:table-cell>
          <table:table-cell table:style-name="ce12N2" office:value-type="float" office:value="16.12">
            <text:p>1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.14">
            <text:p>145,14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169.9">
            <text:p>1169,90</text:p>
          </table:table-cell>
          <table:table-cell table:style-name="ce12N2" office:value-type="float" office:value="17998.31">
            <text:p>17998,31</text:p>
          </table:table-cell>
          <table:table-cell table:style-name="ce12N2" office:value-type="float" office:value="1259.88">
            <text:p>1259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50646610001725500100011313616399673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5">
            <text:p>31109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25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2.84">
            <text:p>97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2.84">
            <text:p>97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4">
            <text:p>0,007</text:p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1.05">
            <text:p>821,05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39">
            <text:p>7,3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2.84">
            <text:p>972,84</text:p>
          </table:table-cell>
          <table:table-cell table:style-name="ce12N2" office:value-type="float" office:value="68.1">
            <text:p>6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2521899490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6">
            <text:p>311096</text:p>
          </table:table-cell>
          <table:table-cell table:style-name="ce0" table:number-columns-spanned="4" table:number-rows-spanned="1" office:value-type="string" calcext:value-type="string">
            <text:p>16.982 - PENINSULA IMPORTACAO E EXPORTACAO EIRELI</text:p>
          </table:table-cell>
          <table:covered-table-cell table:number-columns-repeated="3"/>
          <table:table-cell table:style-name="ce0" office:value-type="string" calcext:value-type="string">
            <text:p>30.5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240.17">
            <text:p>4324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0682.98">
            <text:p>40682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62776">
            <text:p>2,363</text:p>
          </table:table-cell>
          <table:table-cell table:style-name="ce12N2" office:value-type="float" office:value="252.34">
            <text:p>252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240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28.97">
            <text:p>37628,97</text:p>
          </table:table-cell>
          <table:table-cell table:style-name="ce12N2" office:value-type="float" office:value="37.64">
            <text:p>3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8.68">
            <text:p>338,6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557.19">
            <text:p>2557,19</text:p>
          </table:table-cell>
          <table:table-cell table:style-name="ce12N2" office:value-type="float" office:value="40682.98">
            <text:p>40682,98</text:p>
          </table:table-cell>
          <table:table-cell table:style-name="ce12N2" office:value-type="float" office:value="1628.51">
            <text:p>1628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231436000107550010000305751238762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8">
            <text:p>3110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31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7.2">
            <text:p>1941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17.2">
            <text:p>1941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899">
            <text:p>1,990</text:p>
          </table:table-cell>
          <table:table-cell table:style-name="ce12N2" office:value-type="float" office:value="670.2">
            <text:p>67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1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87.62">
            <text:p>16387,62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.49">
            <text:p>147,4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17.2">
            <text:p>19417,20</text:p>
          </table:table-cell>
          <table:table-cell table:style-name="ce12N2" office:value-type="float" office:value="1359.21">
            <text:p>135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31012318517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1">
            <text:p>31110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7.8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7.76">
            <text:p>169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7.76">
            <text:p>169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7936">
            <text:p>0,118</text:p>
          </table:table-cell>
          <table:table-cell table:style-name="ce12N2" office:value-type="float" office:value="5.83">
            <text:p>5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9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32.87">
            <text:p>1432,87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9">
            <text:p>12,90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7.76">
            <text:p>1697,76</text:p>
          </table:table-cell>
          <table:table-cell table:style-name="ce12N2" office:value-type="float" office:value="118.84">
            <text:p>11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781818054352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3">
            <text:p>311103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413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79.52">
            <text:p>587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79.52">
            <text:p>5879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38">
            <text:p>0,794</text:p>
          </table:table-cell>
          <table:table-cell table:style-name="ce12N2" office:value-type="float" office:value="695.34">
            <text:p>69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79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62.17">
            <text:p>4962,17</text:p>
          </table:table-cell>
          <table:table-cell table:style-name="ce12N2" office:value-type="float" office:value="4.96">
            <text:p>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66">
            <text:p>44,6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79.52">
            <text:p>5879,52</text:p>
          </table:table-cell>
          <table:table-cell table:style-name="ce12N2" office:value-type="float" office:value="411.57">
            <text:p>41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46752700004505504000006241311710534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4">
            <text:p>31110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50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90.68">
            <text:p>3279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578.92">
            <text:p>32578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231">
            <text:p>3,323</text:p>
          </table:table-cell>
          <table:table-cell table:style-name="ce12N2" office:value-type="float" office:value="35337.72">
            <text:p>353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79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495.8">
            <text:p>27495,80</text:p>
          </table:table-cell>
          <table:table-cell table:style-name="ce12N2" office:value-type="float" office:value="27.5">
            <text:p>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.46">
            <text:p>247,4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11.76">
            <text:p>211,76</text:p>
          </table:table-cell>
          <table:table-cell table:style-name="ce12N2" office:value-type="float" office:value="32578.92">
            <text:p>32578,92</text:p>
          </table:table-cell>
          <table:table-cell table:style-name="ce12N2" office:value-type="float" office:value="2280.52">
            <text:p>228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5081718434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5">
            <text:p>311105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5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31.09">
            <text:p>1123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58.56">
            <text:p>11158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95784">
            <text:p>1,296</text:p>
          </table:table-cell>
          <table:table-cell table:style-name="ce12N2" office:value-type="float" office:value="5792.4">
            <text:p>579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31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17.54">
            <text:p>9417,54</text:p>
          </table:table-cell>
          <table:table-cell table:style-name="ce12N2" office:value-type="float" office:value="9.42">
            <text:p>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.76">
            <text:p>84,7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72.53">
            <text:p>72,53</text:p>
          </table:table-cell>
          <table:table-cell table:style-name="ce12N2" office:value-type="float" office:value="11158.56">
            <text:p>11158,56</text:p>
          </table:table-cell>
          <table:table-cell table:style-name="ce12N2" office:value-type="float" office:value="781.1">
            <text:p>78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50915026485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6">
            <text:p>311106</text:p>
          </table:table-cell>
          <table:table-cell table:style-name="ce0" table:number-columns-spanned="4" table:number-rows-spanned="1" office:value-type="string" calcext:value-type="string">
            <text:p>9.951 - QUALITRONIX TECNOLOGIA LTDA</text:p>
          </table:table-cell>
          <table:covered-table-cell table:number-columns-repeated="3"/>
          <table:table-cell table:style-name="ce0" office:value-type="string" calcext:value-type="string">
            <text:p>132.26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58.54">
            <text:p>1155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160.75">
            <text:p>1116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154">
            <text:p>0,382</text:p>
          </table:table-cell>
          <table:table-cell table:style-name="ce12N2" office:value-type="float" office:value="79.95">
            <text:p>79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58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00.65">
            <text:p>10000,65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01">
            <text:p>90,01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397.79">
            <text:p>397,79</text:p>
          </table:table-cell>
          <table:table-cell table:style-name="ce12N2" office:value-type="float" office:value="11160.75">
            <text:p>11160,75</text:p>
          </table:table-cell>
          <table:table-cell table:style-name="ce12N2" office:value-type="float" office:value="781.25">
            <text:p>78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028034620001725500300013226616930597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7">
            <text:p>311107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904.42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77.46">
            <text:p>48977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48938.03">
            <text:p>48938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7474">
            <text:p>1,237</text:p>
          </table:table-cell>
          <table:table-cell table:style-name="ce12N2" office:value-type="float" office:value="1403.67">
            <text:p>1403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977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302.47">
            <text:p>41302,47</text:p>
          </table:table-cell>
          <table:table-cell table:style-name="ce12N2" office:value-type="float" office:value="41.3">
            <text:p>4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1.72">
            <text:p>371,7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39.43">
            <text:p>39,43</text:p>
          </table:table-cell>
          <table:table-cell table:style-name="ce12N2" office:value-type="float" office:value="48938.03">
            <text:p>48938,03</text:p>
          </table:table-cell>
          <table:table-cell table:style-name="ce12N2" office:value-type="float" office:value="3425.65">
            <text:p>342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2777131003473550050009044251482238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8">
            <text:p>311108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6.1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045">
            <text:p>5404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045">
            <text:p>5404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374">
            <text:p>19,374</text:p>
          </table:table-cell>
          <table:table-cell table:style-name="ce12N2" office:value-type="float" office:value="9195">
            <text:p>919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04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60.33">
            <text:p>43160,33</text:p>
          </table:table-cell>
          <table:table-cell table:style-name="ce12N2" office:value-type="float" office:value="43.15">
            <text:p>4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8.44">
            <text:p>388,44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045">
            <text:p>54045,00</text:p>
          </table:table-cell>
          <table:table-cell table:style-name="ce12N2" office:value-type="float" office:value="6485.4">
            <text:p>648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611012722763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9">
            <text:p>31110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3639.48">
            <text:p>46363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">
            <text:p>221,00</text:p>
          </table:table-cell>
          <table:table-cell table:style-name="ce12N2" office:value-type="float" office:value="459510.87">
            <text:p>459510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6.58952">
            <text:p>196,590</text:p>
          </table:table-cell>
          <table:table-cell table:style-name="ce12N2" office:value-type="float" office:value="5460.61">
            <text:p>546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3.63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812.41">
            <text:p>388812,41</text:p>
          </table:table-cell>
          <table:table-cell table:style-name="ce12N2" office:value-type="float" office:value="388.9">
            <text:p>38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9.35">
            <text:p>3499,3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4128.61">
            <text:p>4128,61</text:p>
          </table:table-cell>
          <table:table-cell table:style-name="ce12N2" office:value-type="float" office:value="453623.21">
            <text:p>453623,21</text:p>
          </table:table-cell>
          <table:table-cell table:style-name="ce12N2" office:value-type="float" office:value="31017.96">
            <text:p>3101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911693133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0">
            <text:p>31111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4.65">
            <text:p>258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84.65">
            <text:p>2584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895">
            <text:p>0,091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8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4.95">
            <text:p>2184,95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67">
            <text:p>19,6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4.65">
            <text:p>2584,65</text:p>
          </table:table-cell>
          <table:table-cell table:style-name="ce12N2" office:value-type="float" office:value="177">
            <text:p>17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51828096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1">
            <text:p>31111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795.16">
            <text:p>3179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1795.16">
            <text:p>31795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0.036944">
            <text:p>40,037</text:p>
          </table:table-cell>
          <table:table-cell table:style-name="ce12N2" office:value-type="float" office:value="293.6">
            <text:p>29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795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832.5">
            <text:p>26832,50</text:p>
          </table:table-cell>
          <table:table-cell table:style-name="ce12N2" office:value-type="float" office:value="26.84">
            <text:p>2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.48">
            <text:p>241,4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795.16">
            <text:p>31795,16</text:p>
          </table:table-cell>
          <table:table-cell table:style-name="ce12N2" office:value-type="float" office:value="2225.66">
            <text:p>222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614918413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2">
            <text:p>31111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84">
            <text:p>2228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284">
            <text:p>2228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004">
            <text:p>0,150</text:p>
          </table:table-cell>
          <table:table-cell table:style-name="ce12N2" office:value-type="float" office:value="119.1">
            <text:p>119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28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824.7">
            <text:p>18824,70</text:p>
          </table:table-cell>
          <table:table-cell table:style-name="ce12N2" office:value-type="float" office:value="18.82">
            <text:p>1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.42">
            <text:p>169,4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84">
            <text:p>22284,00</text:p>
          </table:table-cell>
          <table:table-cell table:style-name="ce12N2" office:value-type="float" office:value="1546.65">
            <text:p>154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418116198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3">
            <text:p>31111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855.3">
            <text:p>15985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59855.3">
            <text:p>15985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0.436865">
            <text:p>160,437</text:p>
          </table:table-cell>
          <table:table-cell table:style-name="ce12N2" office:value-type="float" office:value="2016.36">
            <text:p>2016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9.855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713.05">
            <text:p>135713,05</text:p>
          </table:table-cell>
          <table:table-cell table:style-name="ce12N2" office:value-type="float" office:value="135.72">
            <text:p>13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1.4">
            <text:p>1221,4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428.8">
            <text:p>150428,80</text:p>
          </table:table-cell>
          <table:table-cell table:style-name="ce12N2" office:value-type="float" office:value="10386.26">
            <text:p>1038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31148012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5">
            <text:p>31111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88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1.14">
            <text:p>208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54.12">
            <text:p>195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96">
            <text:p>0,004</text:p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1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49.22">
            <text:p>1649,22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84">
            <text:p>14,8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27.02">
            <text:p>127,02</text:p>
          </table:table-cell>
          <table:table-cell table:style-name="ce12N2" office:value-type="float" office:value="1954.12">
            <text:p>1954,12</text:p>
          </table:table-cell>
          <table:table-cell table:style-name="ce12N2" office:value-type="float" office:value="136.79">
            <text:p>13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8801381961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7">
            <text:p>31111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55.94">
            <text:p>1125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1255.94">
            <text:p>1125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.41823">
            <text:p>26,418</text:p>
          </table:table-cell>
          <table:table-cell table:style-name="ce12N2" office:value-type="float" office:value="106.73">
            <text:p>106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5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82.28">
            <text:p>9682,28</text:p>
          </table:table-cell>
          <table:table-cell table:style-name="ce12N2" office:value-type="float" office:value="9.68">
            <text:p>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.14">
            <text:p>87,1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70.6">
            <text:p>11170,60</text:p>
          </table:table-cell>
          <table:table-cell table:style-name="ce12N2" office:value-type="float" office:value="585.15">
            <text:p>58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71413802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8">
            <text:p>31111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9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87.2">
            <text:p>1248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87.2">
            <text:p>1248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744">
            <text:p>1,074</text:p>
          </table:table-cell>
          <table:table-cell table:style-name="ce12N2" office:value-type="float" office:value="54.4">
            <text:p>5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8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39.2">
            <text:p>10539,20</text:p>
          </table:table-cell>
          <table:table-cell table:style-name="ce12N2" office:value-type="float" office:value="10.54">
            <text:p>1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4.85">
            <text:p>94,8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87.2">
            <text:p>12487,20</text:p>
          </table:table-cell>
          <table:table-cell table:style-name="ce12N2" office:value-type="float" office:value="874.1">
            <text:p>87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9121317733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0">
            <text:p>31112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7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824">
            <text:p>1208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0824">
            <text:p>1208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2.8868">
            <text:p>42,887</text:p>
          </table:table-cell>
          <table:table-cell table:style-name="ce12N2" office:value-type="float" office:value="8901.2">
            <text:p>890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0.8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970">
            <text:p>101970,00</text:p>
          </table:table-cell>
          <table:table-cell table:style-name="ce12N2" office:value-type="float" office:value="101.97">
            <text:p>10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7.73">
            <text:p>917,73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824">
            <text:p>120824,00</text:p>
          </table:table-cell>
          <table:table-cell table:style-name="ce12N2" office:value-type="float" office:value="8457.68">
            <text:p>8457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74619121252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1">
            <text:p>311121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083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49.69">
            <text:p>4849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53.7">
            <text:p>455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817">
            <text:p>0,128</text:p>
          </table:table-cell>
          <table:table-cell table:style-name="ce12N2" office:value-type="float" office:value="11.36">
            <text:p>11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49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43.2">
            <text:p>3843,20</text:p>
          </table:table-cell>
          <table:table-cell table:style-name="ce12N2" office:value-type="float" office:value="3.84">
            <text:p>3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59">
            <text:p>34,59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95.99">
            <text:p>295,99</text:p>
          </table:table-cell>
          <table:table-cell table:style-name="ce12N2" office:value-type="float" office:value="4553.7">
            <text:p>4553,70</text:p>
          </table:table-cell>
          <table:table-cell table:style-name="ce12N2" office:value-type="float" office:value="318.76">
            <text:p>31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0831895179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2">
            <text:p>311122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80.9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6932.09">
            <text:p>78693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786932.09">
            <text:p>786932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47.9788">
            <text:p>1747,979</text:p>
          </table:table-cell>
          <table:table-cell table:style-name="ce12N2" office:value-type="float" office:value="12648.85">
            <text:p>12648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6.932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4151.01">
            <text:p>664151,01</text:p>
          </table:table-cell>
          <table:table-cell table:style-name="ce12N2" office:value-type="float" office:value="664.15">
            <text:p>66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77.36">
            <text:p>5977,3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6932.09">
            <text:p>786932,09</text:p>
          </table:table-cell>
          <table:table-cell table:style-name="ce12N2" office:value-type="float" office:value="55085.25">
            <text:p>5508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2544042000119550010004809871897674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3">
            <text:p>31112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8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348.9">
            <text:p>9134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91348.9">
            <text:p>9134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83.59936">
            <text:p>783,599</text:p>
          </table:table-cell>
          <table:table-cell table:style-name="ce12N2" office:value-type="float" office:value="5532.81">
            <text:p>5532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.348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071.55">
            <text:p>77071,55</text:p>
          </table:table-cell>
          <table:table-cell table:style-name="ce12N2" office:value-type="float" office:value="77.06">
            <text:p>7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3.64">
            <text:p>693,6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348.9">
            <text:p>91348,90</text:p>
          </table:table-cell>
          <table:table-cell table:style-name="ce12N2" office:value-type="float" office:value="6394.42">
            <text:p>639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8761831636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4">
            <text:p>31112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38.64">
            <text:p>1503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38.64">
            <text:p>1503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875">
            <text:p>16,875</text:p>
          </table:table-cell>
          <table:table-cell table:style-name="ce12N2" office:value-type="float" office:value="180">
            <text:p>1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03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92.24">
            <text:p>12692,24</text:p>
          </table:table-cell>
          <table:table-cell table:style-name="ce12N2" office:value-type="float" office:value="12.69">
            <text:p>1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.23">
            <text:p>114,23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38.64">
            <text:p>15038,64</text:p>
          </table:table-cell>
          <table:table-cell table:style-name="ce12N2" office:value-type="float" office:value="1052.7">
            <text:p>105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8611726738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6">
            <text:p>311126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61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074.32">
            <text:p>4207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802.6">
            <text:p>4180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444438">
            <text:p>6,444</text:p>
          </table:table-cell>
          <table:table-cell table:style-name="ce12N2" office:value-type="float" office:value="27163.92">
            <text:p>27163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07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280.36">
            <text:p>35280,36</text:p>
          </table:table-cell>
          <table:table-cell table:style-name="ce12N2" office:value-type="float" office:value="35.28">
            <text:p>3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7.52">
            <text:p>317,52</text:p>
          </table:table-cell>
          <table:table-cell table:style-name="ce12N2" office:value-type="float" office:value="98.21">
            <text:p>98,21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71.72">
            <text:p>271,72</text:p>
          </table:table-cell>
          <table:table-cell table:style-name="ce12N2" office:value-type="float" office:value="41802.6">
            <text:p>41802,60</text:p>
          </table:table-cell>
          <table:table-cell table:style-name="ce12N2" office:value-type="float" office:value="2926.18">
            <text:p>2926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61410022655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8">
            <text:p>31112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11.1">
            <text:p>721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211.1">
            <text:p>721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7516">
            <text:p>0,675</text:p>
          </table:table-cell>
          <table:table-cell table:style-name="ce12N2" office:value-type="float" office:value="162.75">
            <text:p>162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1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87.8">
            <text:p>6087,80</text:p>
          </table:table-cell>
          <table:table-cell table:style-name="ce12N2" office:value-type="float" office:value="6.09">
            <text:p>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79">
            <text:p>54,79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11.1">
            <text:p>7211,10</text:p>
          </table:table-cell>
          <table:table-cell table:style-name="ce12N2" office:value-type="float" office:value="504.78">
            <text:p>50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2016574911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9">
            <text:p>31112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3.2">
            <text:p>58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3.2">
            <text:p>5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59">
            <text:p>0,007</text:p>
          </table:table-cell>
          <table:table-cell table:style-name="ce12N2" office:value-type="float" office:value="10.09">
            <text:p>10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3.9">
            <text:p>493,90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.92">
            <text:p>553,92</text:p>
          </table:table-cell>
          <table:table-cell table:style-name="ce12N2" office:value-type="float" office:value="38.77">
            <text:p>3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531569115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0">
            <text:p>31113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">
            <text:p>0,015</text:p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0.4">
            <text:p>920,40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28">
            <text:p>8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76.36">
            <text:p>7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6216353203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1">
            <text:p>31113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">
            <text:p>0,015</text:p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0.4">
            <text:p>920,40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28">
            <text:p>8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76.36">
            <text:p>7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781097495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2">
            <text:p>311132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110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82">
            <text:p>658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82">
            <text:p>658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5">
            <text:p>0,025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8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55.04">
            <text:p>5555,04</text:p>
          </table:table-cell>
          <table:table-cell table:style-name="ce12N2" office:value-type="float" office:value="5.56">
            <text:p>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">
            <text:p>50,00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82">
            <text:p>6582,00</text:p>
          </table:table-cell>
          <table:table-cell table:style-name="ce12N2" office:value-type="float" office:value="460.74">
            <text:p>46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11012680670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3">
            <text:p>311133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43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455.18">
            <text:p>103455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98228.99">
            <text:p>98228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5207">
            <text:p>1,952</text:p>
          </table:table-cell>
          <table:table-cell table:style-name="ce12N2" office:value-type="float" office:value="565.64">
            <text:p>565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3.45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577.1">
            <text:p>85577,10</text:p>
          </table:table-cell>
          <table:table-cell table:style-name="ce12N2" office:value-type="float" office:value="85.55">
            <text:p>8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0.2">
            <text:p>770,20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5226.19">
            <text:p>5226,19</text:p>
          </table:table-cell>
          <table:table-cell table:style-name="ce12N2" office:value-type="float" office:value="98228.99">
            <text:p>98228,99</text:p>
          </table:table-cell>
          <table:table-cell table:style-name="ce12N2" office:value-type="float" office:value="3929.17">
            <text:p>392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497920001815500100134333115759949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4">
            <text:p>311134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81.8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46.68">
            <text:p>14146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13928.78">
            <text:p>13928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370918">
            <text:p>32,371</text:p>
          </table:table-cell>
          <table:table-cell table:style-name="ce12N2" office:value-type="float" office:value="708.06">
            <text:p>708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146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3.89">
            <text:p>11853,89</text:p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.68">
            <text:p>106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17.9">
            <text:p>217,90</text:p>
          </table:table-cell>
          <table:table-cell table:style-name="ce12N2" office:value-type="float" office:value="12381">
            <text:p>12381,00</text:p>
          </table:table-cell>
          <table:table-cell table:style-name="ce12N2" office:value-type="float" office:value="866.65">
            <text:p>86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1913681000134550010001818561556428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6">
            <text:p>31113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10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7.7">
            <text:p>511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17.7">
            <text:p>511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116">
            <text:p>0,281</text:p>
          </table:table-cell>
          <table:table-cell table:style-name="ce12N2" office:value-type="float" office:value="21.3">
            <text:p>21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1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59.46">
            <text:p>4759,46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84">
            <text:p>42,8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7.7">
            <text:p>5117,70</text:p>
          </table:table-cell>
          <table:table-cell table:style-name="ce12N2" office:value-type="float" office:value="358.24">
            <text:p>35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109168318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7">
            <text:p>311137</text:p>
          </table:table-cell>
          <table:table-cell table:style-name="ce0" table:number-columns-spanned="4" table:number-rows-spanned="1" office:value-type="string" calcext:value-type="string">
            <text:p>14.587 - GFC INDUSTRIA E COMERCIO TUBOS E CONEXOES LTDA</text:p>
          </table:table-cell>
          <table:covered-table-cell table:number-columns-repeated="3"/>
          <table:table-cell table:style-name="ce0" office:value-type="string" calcext:value-type="string">
            <text:p>116.26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90.8">
            <text:p>366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35535.88">
            <text:p>3553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813182">
            <text:p>6,813</text:p>
          </table:table-cell>
          <table:table-cell table:style-name="ce12N2" office:value-type="float" office:value="3409.36">
            <text:p>340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6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991.4">
            <text:p>29991,40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9.92">
            <text:p>269,92</text:p>
          </table:table-cell>
          <table:table-cell table:style-name="ce12N2" office:value-type="float" office:value="46.67">
            <text:p>46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154.92">
            <text:p>1154,92</text:p>
          </table:table-cell>
          <table:table-cell table:style-name="ce12N2" office:value-type="float" office:value="35535.88">
            <text:p>35535,88</text:p>
          </table:table-cell>
          <table:table-cell table:style-name="ce12N2" office:value-type="float" office:value="2487.52">
            <text:p>248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5338810001605500000011626118027960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8">
            <text:p>311138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81.8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2.04">
            <text:p>144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442.04">
            <text:p>144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0552">
            <text:p>3,271</text:p>
          </table:table-cell>
          <table:table-cell table:style-name="ce12N2" office:value-type="float" office:value="95.13">
            <text:p>95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4.64">
            <text:p>844,64</text:p>
          </table:table-cell>
          <table:table-cell table:style-name="ce12N2" office:value-type="float" office:value="59.11">
            <text:p>5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1913681000134550010001818571228130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9">
            <text:p>311139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21.6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83.32">
            <text:p>628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283.32">
            <text:p>6283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042">
            <text:p>0,304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83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74.03">
            <text:p>5474,03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27">
            <text:p>49,2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83.32">
            <text:p>6283,32</text:p>
          </table:table-cell>
          <table:table-cell table:style-name="ce12N2" office:value-type="float" office:value="251.33">
            <text:p>251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01422400001205500100072161719561683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43">
            <text:p>311143</text:p>
          </table:table-cell>
          <table:table-cell table:style-name="ce0" table:number-columns-spanned="4" table:number-rows-spanned="1" office:value-type="string" calcext:value-type="string">
            <text:p>31.248 - GV DO BRASIL INDUSTRIA E COMERCIO DE ACO LTDA</text:p>
          </table:table-cell>
          <table:covered-table-cell table:number-columns-repeated="3"/>
          <table:table-cell table:style-name="ce0" office:value-type="string" calcext:value-type="string">
            <text:p>6.703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175.2">
            <text:p>18017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175.2">
            <text:p>18017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948">
            <text:p>0,044</text:p>
          </table:table-cell>
          <table:table-cell table:style-name="ce12N2" office:value-type="float" office:value="40573.92">
            <text:p>40573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0.175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2063.37">
            <text:p>152063,37</text:p>
          </table:table-cell>
          <table:table-cell table:style-name="ce12N2" office:value-type="float" office:value="152.06">
            <text:p>15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68.57">
            <text:p>1368,57</text:p>
          </table:table-cell>
          <table:table-cell table:style-name="ce12N2" office:value-type="float" office:value="52.5">
            <text:p>52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175.2">
            <text:p>180175,20</text:p>
          </table:table-cell>
          <table:table-cell table:style-name="ce12N2" office:value-type="float" office:value="12612.26">
            <text:p>1261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2884632000144550050000067031579422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59">
            <text:p>159,00</text:p>
          </table:table-cell>
          <table:table-cell table:style-name="ce26N2" office:value-type="float" office:value="2412.77">
            <text:p>2412,77</text:p>
          </table:table-cell>
          <table:table-cell table:style-name="ce26N2" office:value-type="float" office:value="7.99">
            <text:p>7,9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1303.13">
            <text:p>91303,13</text:p>
          </table:table-cell>
          <table:table-cell table:style-name="ce26N2" office:value-type="float" office:value="7432252.92">
            <text:p>7432252,92</text:p>
          </table:table-cell>
          <table:table-cell table:style-name="ce26N2" office:value-type="float" office:value="477499.43">
            <text:p>477499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264.85">
            <text:p>6264,85</text:p>
          </table:table-cell>
          <table:table-cell table:style-name="ce26N2" office:value-type="float" office:value="7611537.26">
            <text:p>7611537,2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19.83">
            <text:p>719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9928.655711">
            <text:p>39928,656</text:p>
          </table:table-cell>
          <table:table-cell table:style-name="ce26N2" office:value-type="float" office:value="7522638.91">
            <text:p>7522638,91</text:p>
          </table:table-cell>
          <table:table-cell table:style-name="ce26N2" office:value-type="float" office:value="7611537.26">
            <text:p>7611537,2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338057.74">
            <text:p>6338057,74</text:p>
          </table:table-cell>
          <table:table-cell table:style-name="ce26N2" office:value-type="float" office:value="6338.3">
            <text:p>6338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7042.56">
            <text:p>57042,56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19780.83">
            <text:p>419780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9.9">
            <text:p>59,9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656" meta:object-count="0"/>
    <meta:generator>LibreOffice/4.3.0.4$Windows_x86 LibreOffice_project/62ad5818884a2fc2e5780dd45466868d41009ec0</meta:generator>
  </office:meta>
</office:document-meta>
</file>