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4/06/2026 07:16:26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2">
            <text:p>308352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74">
            <text:p>3,740</text:p>
          </table:table-cell>
          <table:table-cell table:style-name="ce12N2" office:value-type="float" office:value="71.4">
            <text:p>7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76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39.73">
            <text:p>15839,73</text:p>
          </table:table-cell>
          <table:table-cell table:style-name="ce12N2" office:value-type="float" office:value="15.84">
            <text:p>1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.56">
            <text:p>142,5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1313.76">
            <text:p>131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8919647395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5">
            <text:p>30835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28">
            <text:p>0,663</text:p>
          </table:table-cell>
          <table:table-cell table:style-name="ce12N2" office:value-type="float" office:value="851.2">
            <text:p>85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.98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49.98">
            <text:p>4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.82">
            <text:p>449,8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61063272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8">
            <text:p>308428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784">
            <text:p>0,148</text:p>
          </table:table-cell>
          <table:table-cell table:style-name="ce12N2" office:value-type="float" office:value="23.1">
            <text:p>2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0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2.46">
            <text:p>512,46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61">
            <text:p>4,6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42.5">
            <text:p>4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7619171203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9">
            <text:p>308429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5672">
            <text:p>4,957</text:p>
          </table:table-cell>
          <table:table-cell table:style-name="ce12N2" office:value-type="float" office:value="95.55">
            <text:p>9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6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58.75">
            <text:p>4658,75</text:p>
          </table:table-cell>
          <table:table-cell table:style-name="ce12N2" office:value-type="float" office:value="4.66">
            <text:p>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93">
            <text:p>41,93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1740.73">
            <text:p>174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9319504129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0">
            <text:p>308430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379.55">
            <text:p>8637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862">
            <text:p>1,239</text:p>
          </table:table-cell>
          <table:table-cell table:style-name="ce12N2" office:value-type="float" office:value="2195.25">
            <text:p>2195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.37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901.96">
            <text:p>72901,96</text:p>
          </table:table-cell>
          <table:table-cell table:style-name="ce12N2" office:value-type="float" office:value="72.91">
            <text:p>7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6.11">
            <text:p>656,1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174.85">
            <text:p>2174,85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3871.9">
            <text:p>387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1615113238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8">
            <text:p>308548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1.5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5992.53">
            <text:p>25599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254693.97">
            <text:p>254693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172308">
            <text:p>4,172</text:p>
          </table:table-cell>
          <table:table-cell table:style-name="ce12N2" office:value-type="float" office:value="2315.2">
            <text:p>23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5.99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5317.73">
            <text:p>215317,73</text:p>
          </table:table-cell>
          <table:table-cell table:style-name="ce12N2" office:value-type="float" office:value="215.35">
            <text:p>21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7.83">
            <text:p>1937,8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298.56">
            <text:p>1298,56</text:p>
          </table:table-cell>
          <table:table-cell table:style-name="ce12N2" office:value-type="float" office:value="254693.97">
            <text:p>254693,97</text:p>
          </table:table-cell>
          <table:table-cell table:style-name="ce12N2" office:value-type="float" office:value="17429.28">
            <text:p>1742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156518349463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7">
            <text:p>308557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5.04">
            <text:p>446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94">
            <text:p>0,011</text:p>
          </table:table-cell>
          <table:table-cell table:style-name="ce12N2" office:value-type="float" office:value="77.4">
            <text:p>7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6.51">
            <text:p>4006,51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6">
            <text:p>36,0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42.82">
            <text:p>142,82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172.89">
            <text:p>17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5812684156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11">
            <text:p>308711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8.66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03303">
            <text:p>3,003</text:p>
          </table:table-cell>
          <table:table-cell table:style-name="ce12N2" office:value-type="float" office:value="379.94">
            <text:p>379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750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080.57">
            <text:p>36080,57</text:p>
          </table:table-cell>
          <table:table-cell table:style-name="ce12N2" office:value-type="float" office:value="36.08">
            <text:p>36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4.73">
            <text:p>324,73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2992.55">
            <text:p>299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3866513224229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9">
            <text:p>308729</text:p>
          </table:table-cell>
          <table:table-cell table:style-name="ce0" table:number-columns-spanned="4" table:number-rows-spanned="1" office:value-type="string" calcext:value-type="string">
            <text:p>7.682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183.6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19.91">
            <text:p>131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471.4">
            <text:p>1247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2625">
            <text:p>0,113</text:p>
          </table:table-cell>
          <table:table-cell table:style-name="ce12N2" office:value-type="float" office:value="82.4">
            <text:p>8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119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648.51">
            <text:p>648,51</text:p>
          </table:table-cell>
          <table:table-cell table:style-name="ce12N2" office:value-type="float" office:value="12471.4">
            <text:p>12471,40</text:p>
          </table:table-cell>
          <table:table-cell table:style-name="ce12N2" office:value-type="float" office:value="498.86">
            <text:p>49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458659200010005500100018369615377680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56">
            <text:p>308756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5.2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6364">
            <text:p>1,764</text:p>
          </table:table-cell>
          <table:table-cell table:style-name="ce12N2" office:value-type="float" office:value="4474.4">
            <text:p>447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5.98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408.63">
            <text:p>165408,63</text:p>
          </table:table-cell>
          <table:table-cell table:style-name="ce12N2" office:value-type="float" office:value="165.41">
            <text:p>165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.68">
            <text:p>1488,68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13719.13">
            <text:p>13719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29952401551016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8">
            <text:p>308958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67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4.39">
            <text:p>140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2.7">
            <text:p>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4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2.93">
            <text:p>1112,93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2">
            <text:p>10,0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5.71">
            <text:p>85,71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92.31">
            <text:p>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34883000113550010006670801659673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93">
            <text:p>309093</text:p>
          </table:table-cell>
          <table:table-cell table:style-name="ce0" table:number-columns-spanned="4" table:number-rows-spanned="1" office:value-type="string" calcext:value-type="string">
            <text:p>13.198 - SDSTK INDUSTRIA E COMERCIO LTDA</text:p>
          </table:table-cell>
          <table:covered-table-cell table:number-columns-repeated="3"/>
          <table:table-cell table:style-name="ce0" office:value-type="string" calcext:value-type="string">
            <text:p>13.1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21.38">
            <text:p>542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252.8">
            <text:p>5252,80</text:p>
          </table:table-cell>
          <table:table-cell table:style-name="ce12N2" office:value-type="float" office:value="168.58">
            <text:p>168,58</text:p>
          </table:table-cell>
          <table:table-cell table:style-name="ce12N3" office:value-type="float" office:value="0.14673">
            <text:p>0,147</text:p>
          </table:table-cell>
          <table:table-cell table:style-name="ce12N2" office:value-type="float" office:value="16.52">
            <text:p>16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21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14.56">
            <text:p>5014,56</text:p>
          </table:table-cell>
          <table:table-cell table:style-name="ce12N2" office:value-type="float" office:value="5.01">
            <text:p>5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14">
            <text:p>45,1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21.38">
            <text:p>5421,38</text:p>
          </table:table-cell>
          <table:table-cell table:style-name="ce12N2" office:value-type="float" office:value="216.85">
            <text:p>21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86786380001035500100001314819236660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2">
            <text:p>309102</text:p>
          </table:table-cell>
          <table:table-cell table:style-name="ce0" table:number-columns-spanned="4" table:number-rows-spanned="1" office:value-type="string" calcext:value-type="string">
            <text:p>780 - INDUSTRIA E COMERCIO RIOMAR CORDAS LTDA</text:p>
          </table:table-cell>
          <table:covered-table-cell table:number-columns-repeated="3"/>
          <table:table-cell table:style-name="ce0" office:value-type="string" calcext:value-type="string">
            <text:p>171.3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17">
            <text:p>791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917">
            <text:p>791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06856">
            <text:p>0,807</text:p>
          </table:table-cell>
          <table:table-cell table:style-name="ce12N2" office:value-type="float" office:value="1731.53">
            <text:p>1731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1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59.72">
            <text:p>6659,72</text:p>
          </table:table-cell>
          <table:table-cell table:style-name="ce12N2" office:value-type="float" office:value="6.66">
            <text:p>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94">
            <text:p>59,9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17">
            <text:p>7917,00</text:p>
          </table:table-cell>
          <table:table-cell table:style-name="ce12N2" office:value-type="float" office:value="554.2">
            <text:p>55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42989260001035500100017135315252776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5">
            <text:p>30913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8.9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9503.43">
            <text:p>12950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129480.1">
            <text:p>12948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677488">
            <text:p>11,677</text:p>
          </table:table-cell>
          <table:table-cell table:style-name="ce12N2" office:value-type="float" office:value="3587.9">
            <text:p>3587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9.503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862.14">
            <text:p>109862,14</text:p>
          </table:table-cell>
          <table:table-cell table:style-name="ce12N2" office:value-type="float" office:value="109.84">
            <text:p>10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8.76">
            <text:p>988,7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23.33">
            <text:p>23,33</text:p>
          </table:table-cell>
          <table:table-cell table:style-name="ce12N2" office:value-type="float" office:value="129480.1">
            <text:p>129480,10</text:p>
          </table:table-cell>
          <table:table-cell table:style-name="ce12N2" office:value-type="float" office:value="8419.91">
            <text:p>84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89221810491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6">
            <text:p>30913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8.9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59.6">
            <text:p>2415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159.6">
            <text:p>2415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5108">
            <text:p>1,051</text:p>
          </table:table-cell>
          <table:table-cell table:style-name="ce12N2" office:value-type="float" office:value="228">
            <text:p>22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15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047.85">
            <text:p>21047,85</text:p>
          </table:table-cell>
          <table:table-cell table:style-name="ce12N2" office:value-type="float" office:value="21.05">
            <text:p>2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.43">
            <text:p>189,4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59.6">
            <text:p>24159,60</text:p>
          </table:table-cell>
          <table:table-cell table:style-name="ce12N2" office:value-type="float" office:value="966.38">
            <text:p>96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892318820766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0">
            <text:p>30914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8.9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80">
            <text:p>4498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980">
            <text:p>449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6">
            <text:p>0,126</text:p>
          </table:table-cell>
          <table:table-cell table:style-name="ce12N2" office:value-type="float" office:value="200">
            <text:p>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98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961.99">
            <text:p>37961,99</text:p>
          </table:table-cell>
          <table:table-cell table:style-name="ce12N2" office:value-type="float" office:value="37.96">
            <text:p>3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1.66">
            <text:p>341,6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80">
            <text:p>44980,00</text:p>
          </table:table-cell>
          <table:table-cell table:style-name="ce12N2" office:value-type="float" office:value="3148.6">
            <text:p>314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892113458315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7">
            <text:p>3091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6.8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20">
            <text:p>154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20">
            <text:p>154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7">
            <text:p>0,087</text:p>
          </table:table-cell>
          <table:table-cell table:style-name="ce12N2" office:value-type="float" office:value="94.5">
            <text:p>9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4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014.09">
            <text:p>13014,09</text:p>
          </table:table-cell>
          <table:table-cell table:style-name="ce12N2" office:value-type="float" office:value="13.01">
            <text:p>1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7.13">
            <text:p>117,1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20">
            <text:p>15420,00</text:p>
          </table:table-cell>
          <table:table-cell table:style-name="ce12N2" office:value-type="float" office:value="1079.4">
            <text:p>107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683319222284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8">
            <text:p>3091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6.8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72.5">
            <text:p>1967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672.5">
            <text:p>19672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6">
            <text:p>0,001</text:p>
          </table:table-cell>
          <table:table-cell table:style-name="ce12N2" office:value-type="float" office:value="33.9">
            <text:p>3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672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603.1">
            <text:p>16603,10</text:p>
          </table:table-cell>
          <table:table-cell table:style-name="ce12N2" office:value-type="float" office:value="16.6">
            <text:p>1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9.43">
            <text:p>149,4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672.5">
            <text:p>19672,50</text:p>
          </table:table-cell>
          <table:table-cell table:style-name="ce12N2" office:value-type="float" office:value="1377.08">
            <text:p>1377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68341896471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9">
            <text:p>3091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6.8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88">
            <text:p>0,021</text:p>
          </table:table-cell>
          <table:table-cell table:style-name="ce12N2" office:value-type="float" office:value="22.68">
            <text:p>22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3.38">
            <text:p>3123,38</text:p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11">
            <text:p>28,1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259.06">
            <text:p>25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683514424412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8">
            <text:p>309198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1.2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185.19">
            <text:p>9818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665668">
            <text:p>49,666</text:p>
          </table:table-cell>
          <table:table-cell table:style-name="ce12N2" office:value-type="float" office:value="5370">
            <text:p>53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185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719.97">
            <text:p>82719,97</text:p>
          </table:table-cell>
          <table:table-cell table:style-name="ce12N2" office:value-type="float" office:value="82.72">
            <text:p>8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4.48">
            <text:p>744,48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16.29">
            <text:p>416,29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6843.83">
            <text:p>6843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427740012095500100022122112756732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9">
            <text:p>30919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8.9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96">
            <text:p>899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96">
            <text:p>89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2">
            <text:p>0,025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99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92.4">
            <text:p>7592,40</text:p>
          </table:table-cell>
          <table:table-cell table:style-name="ce12N2" office:value-type="float" office:value="7.59">
            <text:p>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33">
            <text:p>68,3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96">
            <text:p>8996,00</text:p>
          </table:table-cell>
          <table:table-cell table:style-name="ce12N2" office:value-type="float" office:value="629.72">
            <text:p>62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89201965533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05">
            <text:p>30920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6.8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3265.37">
            <text:p>663265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">
            <text:p>92,00</text:p>
          </table:table-cell>
          <table:table-cell table:style-name="ce12N2" office:value-type="float" office:value="657872.35">
            <text:p>657872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.833163">
            <text:p>15,833</text:p>
          </table:table-cell>
          <table:table-cell table:style-name="ce12N2" office:value-type="float" office:value="3254.08">
            <text:p>325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3.265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9772.64">
            <text:p>559772,64</text:p>
          </table:table-cell>
          <table:table-cell table:style-name="ce12N2" office:value-type="float" office:value="559.79">
            <text:p>55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37.93">
            <text:p>5037,9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393.02">
            <text:p>5393,02</text:p>
          </table:table-cell>
          <table:table-cell table:style-name="ce12N2" office:value-type="float" office:value="647536.65">
            <text:p>647536,65</text:p>
          </table:table-cell>
          <table:table-cell table:style-name="ce12N2" office:value-type="float" office:value="41043">
            <text:p>4104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683617401778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1">
            <text:p>309211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569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193.54">
            <text:p>3819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193.54">
            <text:p>38193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">
            <text:p>0,000</text:p>
          </table:table-cell>
          <table:table-cell table:style-name="ce12N2" office:value-type="float" office:value="4.2">
            <text:p>4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19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519.99">
            <text:p>35519,99</text:p>
          </table:table-cell>
          <table:table-cell table:style-name="ce12N2" office:value-type="float" office:value="35.52">
            <text:p>3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9.68">
            <text:p>319,68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193.54">
            <text:p>38193,54</text:p>
          </table:table-cell>
          <table:table-cell table:style-name="ce12N2" office:value-type="float" office:value="2673.55">
            <text:p>2673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56913116267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34">
            <text:p>309234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568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2.04">
            <text:p>127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32">
            <text:p>12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02">
            <text:p>0,007</text:p>
          </table:table-cell>
          <table:table-cell table:style-name="ce12N2" office:value-type="float" office:value="3.77">
            <text:p>3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72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9.77">
            <text:p>1039,77</text:p>
          </table:table-cell>
          <table:table-cell table:style-name="ce12N2" office:value-type="float" office:value="1.04">
            <text:p>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36">
            <text:p>9,36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0.04">
            <text:p>40,04</text:p>
          </table:table-cell>
          <table:table-cell table:style-name="ce12N2" office:value-type="float" office:value="1232">
            <text:p>1232,00</text:p>
          </table:table-cell>
          <table:table-cell table:style-name="ce12N2" office:value-type="float" office:value="86.24">
            <text:p>8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56815186963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4">
            <text:p>309244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1.59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77.6">
            <text:p>1007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12.52">
            <text:p>10012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51546">
            <text:p>2,852</text:p>
          </table:table-cell>
          <table:table-cell table:style-name="ce12N2" office:value-type="float" office:value="9846.72">
            <text:p>9846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7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50.32">
            <text:p>8450,32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.05">
            <text:p>76,05</text:p>
          </table:table-cell>
          <table:table-cell table:style-name="ce12N2" office:value-type="float" office:value="97.88">
            <text:p>97,8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65.08">
            <text:p>65,08</text:p>
          </table:table-cell>
          <table:table-cell table:style-name="ce12N2" office:value-type="float" office:value="10012.52">
            <text:p>10012,52</text:p>
          </table:table-cell>
          <table:table-cell table:style-name="ce12N2" office:value-type="float" office:value="700.88">
            <text:p>70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44238800001455500300122159818215583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8">
            <text:p>309248</text:p>
          </table:table-cell>
          <table:table-cell table:style-name="ce0" table:number-columns-spanned="4" table:number-rows-spanned="1" office:value-type="string" calcext:value-type="string">
            <text:p>674 - ESFERA ESTAMPARIA DE FERRO E ACO LTDA</text:p>
          </table:table-cell>
          <table:covered-table-cell table:number-columns-repeated="3"/>
          <table:table-cell table:style-name="ce0" office:value-type="string" calcext:value-type="string">
            <text:p>146.8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717.81">
            <text:p>8271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1.06342">
            <text:p>151,063</text:p>
          </table:table-cell>
          <table:table-cell table:style-name="ce12N2" office:value-type="float" office:value="6308.05">
            <text:p>6308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717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514.9">
            <text:p>69514,90</text:p>
          </table:table-cell>
          <table:table-cell table:style-name="ce12N2" office:value-type="float" office:value="69.51">
            <text:p>6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5.62">
            <text:p>625,62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351.76">
            <text:p>351,76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5765.62">
            <text:p>576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212604190001525500100014686112553839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53">
            <text:p>30925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6.91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24">
            <text:p>187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24">
            <text:p>1872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8">
            <text:p>0,038</text:p>
          </table:table-cell>
          <table:table-cell table:style-name="ce12N2" office:value-type="float" office:value="38.5">
            <text:p>38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72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02.5">
            <text:p>15802,50</text:p>
          </table:table-cell>
          <table:table-cell table:style-name="ce12N2" office:value-type="float" office:value="15.8">
            <text:p>1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.22">
            <text:p>142,2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24">
            <text:p>18724,00</text:p>
          </table:table-cell>
          <table:table-cell table:style-name="ce12N2" office:value-type="float" office:value="1310.68">
            <text:p>131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691418704086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2">
            <text:p>309282</text:p>
          </table:table-cell>
          <table:table-cell table:style-name="ce0" table:number-columns-spanned="4" table:number-rows-spanned="1" office:value-type="string" calcext:value-type="string">
            <text:p>15.133 - JSS FERRAGENS E SERVICOS EIRELI</text:p>
          </table:table-cell>
          <table:covered-table-cell table:number-columns-repeated="3"/>
          <table:table-cell table:style-name="ce0" office:value-type="string" calcext:value-type="string">
            <text:p>7.6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52996">
            <text:p>0,553</text:p>
          </table:table-cell>
          <table:table-cell table:style-name="ce12N2" office:value-type="float" office:value="127.06">
            <text:p>12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76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291.9">
            <text:p>29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307033020001975500100000762515841118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6">
            <text:p>309286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8.0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7585.62">
            <text:p>72758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12N2" office:value-type="float" office:value="727585.62">
            <text:p>727585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48.3333">
            <text:p>548,333</text:p>
          </table:table-cell>
          <table:table-cell table:style-name="ce12N2" office:value-type="float" office:value="12373.93">
            <text:p>12373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27.585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4064.08">
            <text:p>614064,08</text:p>
          </table:table-cell>
          <table:table-cell table:style-name="ce12N2" office:value-type="float" office:value="614.06">
            <text:p>614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26.58">
            <text:p>5526,58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7585.62">
            <text:p>727585,62</text:p>
          </table:table-cell>
          <table:table-cell table:style-name="ce12N2" office:value-type="float" office:value="50930.99">
            <text:p>50930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5440420001195500100047807114905994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7">
            <text:p>309287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4.33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81.6">
            <text:p>838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81.6">
            <text:p>838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6">
            <text:p>0,666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8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73.86">
            <text:p>7073,86</text:p>
          </table:table-cell>
          <table:table-cell table:style-name="ce12N2" office:value-type="float" office:value="7.07">
            <text:p>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.66">
            <text:p>63,6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81.6">
            <text:p>8381,60</text:p>
          </table:table-cell>
          <table:table-cell table:style-name="ce12N2" office:value-type="float" office:value="586.71">
            <text:p>586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76428620002485500200001433513717851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8">
            <text:p>309288</text:p>
          </table:table-cell>
          <table:table-cell table:style-name="ce0" table:number-columns-spanned="4" table:number-rows-spanned="1" office:value-type="string" calcext:value-type="string">
            <text:p>781 - TUPY S.A</text:p>
          </table:table-cell>
          <table:covered-table-cell table:number-columns-repeated="3"/>
          <table:table-cell table:style-name="ce0" office:value-type="string" calcext:value-type="string">
            <text:p>618.77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82.58">
            <text:p>1608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15576.35">
            <text:p>15576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4612">
            <text:p>0,145</text:p>
          </table:table-cell>
          <table:table-cell table:style-name="ce12N2" office:value-type="float" office:value="193.25">
            <text:p>193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08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46.06">
            <text:p>13146,06</text:p>
          </table:table-cell>
          <table:table-cell table:style-name="ce12N2" office:value-type="float" office:value="13.14">
            <text:p>13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.33">
            <text:p>118,33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06.23">
            <text:p>506,23</text:p>
          </table:table-cell>
          <table:table-cell table:style-name="ce12N2" office:value-type="float" office:value="15576.35">
            <text:p>15576,35</text:p>
          </table:table-cell>
          <table:table-cell table:style-name="ce12N2" office:value-type="float" office:value="1090.36">
            <text:p>1090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46833740003005500300061877918891290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0">
            <text:p>3092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4.8">
            <text:p>78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4.8">
            <text:p>78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68">
            <text:p>0,000</text:p>
          </table:table-cell>
          <table:table-cell table:style-name="ce12N2" office:value-type="float" office:value="11.76">
            <text:p>1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5.6">
            <text:p>675,60</text:p>
          </table:table-cell>
          <table:table-cell table:style-name="ce12N2" office:value-type="float" office:value="0.68">
            <text:p>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08">
            <text:p>6,0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6.28">
            <text:p>576,28</text:p>
          </table:table-cell>
          <table:table-cell table:style-name="ce12N2" office:value-type="float" office:value="40.34">
            <text:p>4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318968749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1">
            <text:p>3092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9.14">
            <text:p>376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69.14">
            <text:p>3769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14">
            <text:p>0,049</text:p>
          </table:table-cell>
          <table:table-cell table:style-name="ce12N2" office:value-type="float" office:value="13.02">
            <text:p>13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9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83.67">
            <text:p>3283,67</text:p>
          </table:table-cell>
          <table:table-cell table:style-name="ce12N2" office:value-type="float" office:value="3.28">
            <text:p>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55">
            <text:p>29,5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69.14">
            <text:p>3769,14</text:p>
          </table:table-cell>
          <table:table-cell table:style-name="ce12N2" office:value-type="float" office:value="150.77">
            <text:p>150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718724356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2">
            <text:p>3092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870.38">
            <text:p>3887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8870.38">
            <text:p>38870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623">
            <text:p>0,086</text:p>
          </table:table-cell>
          <table:table-cell table:style-name="ce12N2" office:value-type="float" office:value="112.44">
            <text:p>112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870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854.01">
            <text:p>32854,01</text:p>
          </table:table-cell>
          <table:table-cell table:style-name="ce12N2" office:value-type="float" office:value="32.86">
            <text:p>3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5.68">
            <text:p>295,6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870.38">
            <text:p>38870,38</text:p>
          </table:table-cell>
          <table:table-cell table:style-name="ce12N2" office:value-type="float" office:value="2667.61">
            <text:p>266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415796176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3">
            <text:p>3092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12.76">
            <text:p>2512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12.76">
            <text:p>2512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76">
            <text:p>0,033</text:p>
          </table:table-cell>
          <table:table-cell table:style-name="ce12N2" office:value-type="float" office:value="8.68">
            <text:p>8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12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89.12">
            <text:p>2189,12</text:p>
          </table:table-cell>
          <table:table-cell table:style-name="ce12N2" office:value-type="float" office:value="2.19">
            <text:p>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7">
            <text:p>19,7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2.76">
            <text:p>2512,76</text:p>
          </table:table-cell>
          <table:table-cell table:style-name="ce12N2" office:value-type="float" office:value="100.51">
            <text:p>10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615201389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4">
            <text:p>3092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6.52">
            <text:p>2916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38.52">
            <text:p>2738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4">
            <text:p>0,000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16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11.24">
            <text:p>2311,24</text:p>
          </table:table-cell>
          <table:table-cell table:style-name="ce12N2" office:value-type="float" office:value="2.31">
            <text:p>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8">
            <text:p>20,80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78">
            <text:p>178,00</text:p>
          </table:table-cell>
          <table:table-cell table:style-name="ce12N2" office:value-type="float" office:value="2738.52">
            <text:p>2738,52</text:p>
          </table:table-cell>
          <table:table-cell table:style-name="ce12N2" office:value-type="float" office:value="191.7">
            <text:p>19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214397096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5">
            <text:p>3092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30.61">
            <text:p>863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630.61">
            <text:p>8630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51">
            <text:p>0,016</text:p>
          </table:table-cell>
          <table:table-cell table:style-name="ce12N2" office:value-type="float" office:value="26.09">
            <text:p>26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30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84.02">
            <text:p>7284,02</text:p>
          </table:table-cell>
          <table:table-cell table:style-name="ce12N2" office:value-type="float" office:value="7.28">
            <text:p>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56">
            <text:p>65,5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30.61">
            <text:p>8630,61</text:p>
          </table:table-cell>
          <table:table-cell table:style-name="ce12N2" office:value-type="float" office:value="604.14">
            <text:p>60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51848717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6">
            <text:p>3092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4">
            <text:p>39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24">
            <text:p>392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4">
            <text:p>0,001</text:p>
          </table:table-cell>
          <table:table-cell table:style-name="ce12N2" office:value-type="float" office:value="58.8">
            <text:p>5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2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77.99">
            <text:p>3377,99</text:p>
          </table:table-cell>
          <table:table-cell table:style-name="ce12N2" office:value-type="float" office:value="3.38">
            <text:p>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4">
            <text:p>30,4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81.39">
            <text:p>2881,39</text:p>
          </table:table-cell>
          <table:table-cell table:style-name="ce12N2" office:value-type="float" office:value="201.7">
            <text:p>20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6010058889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7">
            <text:p>30929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610.28">
            <text:p>91610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1610.28">
            <text:p>91610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49616">
            <text:p>0,450</text:p>
          </table:table-cell>
          <table:table-cell table:style-name="ce12N2" office:value-type="float" office:value="212.84">
            <text:p>212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.610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316.79">
            <text:p>77316,79</text:p>
          </table:table-cell>
          <table:table-cell table:style-name="ce12N2" office:value-type="float" office:value="77.32">
            <text:p>7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5.85">
            <text:p>695,85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610.28">
            <text:p>91610,28</text:p>
          </table:table-cell>
          <table:table-cell table:style-name="ce12N2" office:value-type="float" office:value="6412.72">
            <text:p>641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915093238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8">
            <text:p>30929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110.72">
            <text:p>4311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3110.72">
            <text:p>43110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1584">
            <text:p>0,212</text:p>
          </table:table-cell>
          <table:table-cell table:style-name="ce12N2" office:value-type="float" office:value="100.16">
            <text:p>100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11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384.37">
            <text:p>36384,37</text:p>
          </table:table-cell>
          <table:table-cell table:style-name="ce12N2" office:value-type="float" office:value="36.38">
            <text:p>3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7.46">
            <text:p>327,4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110.72">
            <text:p>43110,72</text:p>
          </table:table-cell>
          <table:table-cell table:style-name="ce12N2" office:value-type="float" office:value="3017.75">
            <text:p>301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6113296751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9">
            <text:p>30929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681.89">
            <text:p>2868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8681.89">
            <text:p>28681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9766">
            <text:p>0,230</text:p>
          </table:table-cell>
          <table:table-cell table:style-name="ce12N2" office:value-type="float" office:value="116.53">
            <text:p>116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681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632.71">
            <text:p>24632,71</text:p>
          </table:table-cell>
          <table:table-cell table:style-name="ce12N2" office:value-type="float" office:value="24.63">
            <text:p>2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.69">
            <text:p>221,6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681.89">
            <text:p>28681,89</text:p>
          </table:table-cell>
          <table:table-cell table:style-name="ce12N2" office:value-type="float" office:value="1538.41">
            <text:p>153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817928932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07">
            <text:p>309307</text:p>
          </table:table-cell>
          <table:table-cell table:style-name="ce0" table:number-columns-spanned="4" table:number-rows-spanned="1" office:value-type="string" calcext:value-type="string">
            <text:p>33.509 - NEIMAR ANTONIO COLPANI LTDA</text:p>
          </table:table-cell>
          <table:covered-table-cell table:number-columns-repeated="3"/>
          <table:table-cell table:style-name="ce0" office:value-type="string" calcext:value-type="string">
            <text:p>16.3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31.49">
            <text:p>4431,49</text:p>
          </table:table-cell>
          <table:table-cell table:style-name="ce12N2" office:value-type="float" office:value="273.96">
            <text:p>273,96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65.96">
            <text:p>4565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96768">
            <text:p>1,397</text:p>
          </table:table-cell>
          <table:table-cell table:style-name="ce12N2" office:value-type="float" office:value="96">
            <text:p>9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31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94.55">
            <text:p>3594,55</text:p>
          </table:table-cell>
          <table:table-cell table:style-name="ce12N2" office:value-type="float" office:value="3.59">
            <text:p>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35">
            <text:p>32,3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39.49">
            <text:p>139,49</text:p>
          </table:table-cell>
          <table:table-cell table:style-name="ce12N2" office:value-type="float" office:value="4292">
            <text:p>4292,00</text:p>
          </table:table-cell>
          <table:table-cell table:style-name="ce12N2" office:value-type="float" office:value="300.44">
            <text:p>30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50811220001805500100001638610001421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7">
            <text:p>309317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74.9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763.95">
            <text:p>8976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88451.74">
            <text:p>88451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82.375338">
            <text:p>2282,375</text:p>
          </table:table-cell>
          <table:table-cell table:style-name="ce12N2" office:value-type="float" office:value="486.5">
            <text:p>48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.763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866.1">
            <text:p>74866,10</text:p>
          </table:table-cell>
          <table:table-cell table:style-name="ce12N2" office:value-type="float" office:value="74.87">
            <text:p>74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3.84">
            <text:p>673,8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312.21">
            <text:p>1312,21</text:p>
          </table:table-cell>
          <table:table-cell table:style-name="ce12N2" office:value-type="float" office:value="88451.74">
            <text:p>88451,74</text:p>
          </table:table-cell>
          <table:table-cell table:style-name="ce12N2" office:value-type="float" office:value="5955.92">
            <text:p>595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330642620002505500100027499318584132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8">
            <text:p>309318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8.7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82">
            <text:p>0,018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2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5.18">
            <text:p>1265,18</text:p>
          </table:table-cell>
          <table:table-cell table:style-name="ce12N2" office:value-type="float" office:value="1.27">
            <text:p>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39">
            <text:p>11,3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58.09">
            <text:p>5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69947000003655500100006871111000226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23">
            <text:p>309323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2.1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1.65">
            <text:p>2781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34.53">
            <text:p>2534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95">
            <text:p>0,080</text:p>
          </table:table-cell>
          <table:table-cell table:style-name="ce12N2" office:value-type="float" office:value="29.5">
            <text:p>29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81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9.08">
            <text:p>2139,08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25">
            <text:p>19,25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247.12">
            <text:p>247,12</text:p>
          </table:table-cell>
          <table:table-cell table:style-name="ce12N2" office:value-type="float" office:value="2534.53">
            <text:p>2534,53</text:p>
          </table:table-cell>
          <table:table-cell table:style-name="ce12N2" office:value-type="float" office:value="177.42">
            <text:p>17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214315822614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25">
            <text:p>30932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2.1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58.28">
            <text:p>2158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01.63">
            <text:p>2001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955">
            <text:p>0,090</text:p>
          </table:table-cell>
          <table:table-cell table:style-name="ce12N2" office:value-type="float" office:value="23.35">
            <text:p>23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58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9.33">
            <text:p>1689,33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56.65">
            <text:p>156,65</text:p>
          </table:table-cell>
          <table:table-cell table:style-name="ce12N2" office:value-type="float" office:value="2001.63">
            <text:p>2001,63</text:p>
          </table:table-cell>
          <table:table-cell table:style-name="ce12N2" office:value-type="float" office:value="140.12">
            <text:p>14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214515802815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0">
            <text:p>309340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9.85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079.76">
            <text:p>2807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28079.76">
            <text:p>28079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7.547153">
            <text:p>227,547</text:p>
          </table:table-cell>
          <table:table-cell table:style-name="ce12N2" office:value-type="float" office:value="765.94">
            <text:p>765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07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698.62">
            <text:p>23698,62</text:p>
          </table:table-cell>
          <table:table-cell table:style-name="ce12N2" office:value-type="float" office:value="23.7">
            <text:p>23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3.29">
            <text:p>213,29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079.76">
            <text:p>28079,76</text:p>
          </table:table-cell>
          <table:table-cell table:style-name="ce12N2" office:value-type="float" office:value="1965.58">
            <text:p>1965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3985915751703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5">
            <text:p>309345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9.86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659.83">
            <text:p>56659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56659.83">
            <text:p>56659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190948">
            <text:p>5,191</text:p>
          </table:table-cell>
          <table:table-cell table:style-name="ce12N2" office:value-type="float" office:value="473.37">
            <text:p>473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.659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819.47">
            <text:p>47819,47</text:p>
          </table:table-cell>
          <table:table-cell table:style-name="ce12N2" office:value-type="float" office:value="47.82">
            <text:p>47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0.38">
            <text:p>430,38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659.83">
            <text:p>56659,83</text:p>
          </table:table-cell>
          <table:table-cell table:style-name="ce12N2" office:value-type="float" office:value="3966.19">
            <text:p>396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3986319901714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0">
            <text:p>309390</text:p>
          </table:table-cell>
          <table:table-cell table:style-name="ce0" table:number-columns-spanned="4" table:number-rows-spanned="1" office:value-type="string" calcext:value-type="string">
            <text:p>1.670 - ARQUA IND. BRASILEIRA DE MANGUEIRAS E TERMOPLASTICOS LTDA</text:p>
          </table:table-cell>
          <table:covered-table-cell table:number-columns-repeated="3"/>
          <table:table-cell table:style-name="ce0" office:value-type="string" calcext:value-type="string">
            <text:p>17.5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30.63">
            <text:p>17630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7075.67">
            <text:p>17075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60258">
            <text:p>0,960</text:p>
          </table:table-cell>
          <table:table-cell table:style-name="ce12N2" office:value-type="float" office:value="660.09">
            <text:p>660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630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411.43">
            <text:p>14411,43</text:p>
          </table:table-cell>
          <table:table-cell table:style-name="ce12N2" office:value-type="float" office:value="14.41">
            <text:p>1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.7">
            <text:p>129,70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554.96">
            <text:p>554,96</text:p>
          </table:table-cell>
          <table:table-cell table:style-name="ce12N2" office:value-type="float" office:value="17075.67">
            <text:p>17075,67</text:p>
          </table:table-cell>
          <table:table-cell table:style-name="ce12N2" office:value-type="float" office:value="1195.3">
            <text:p>119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081333150001195500100001754014402378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4">
            <text:p>309394</text:p>
          </table:table-cell>
          <table:table-cell table:style-name="ce0" table:number-columns-spanned="4" table:number-rows-spanned="1" office:value-type="string" calcext:value-type="string">
            <text:p>4.463 - SAMER - COMERCIO DE MATERIAL HIDRAULICO LTDA - EPP</text:p>
          </table:table-cell>
          <table:covered-table-cell table:number-columns-repeated="3"/>
          <table:table-cell table:style-name="ce0" office:value-type="string" calcext:value-type="string">
            <text:p>5.3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7.99">
            <text:p>200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07.99">
            <text:p>2007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">
            <text:p>0,011</text:p>
          </table:table-cell>
          <table:table-cell table:style-name="ce12N2" office:value-type="float" office:value="0.15">
            <text:p>0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07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94.14">
            <text:p>1794,14</text:p>
          </table:table-cell>
          <table:table-cell table:style-name="ce12N2" office:value-type="float" office:value="1.79">
            <text:p>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14">
            <text:p>16,1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07.99">
            <text:p>2007,99</text:p>
          </table:table-cell>
          <table:table-cell table:style-name="ce12N2" office:value-type="float" office:value="140.56">
            <text:p>140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35760450001505500100000532210019219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6">
            <text:p>309396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5.7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8.16">
            <text:p>5698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18.8">
            <text:p>551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9732">
            <text:p>0,697</text:p>
          </table:table-cell>
          <table:table-cell table:style-name="ce12N2" office:value-type="float" office:value="117">
            <text:p>11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98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18.8">
            <text:p>5518,80</text:p>
          </table:table-cell>
          <table:table-cell table:style-name="ce12N2" office:value-type="float" office:value="5.52">
            <text:p>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67">
            <text:p>49,67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179.36">
            <text:p>179,36</text:p>
          </table:table-cell>
          <table:table-cell table:style-name="ce12N2" office:value-type="float" office:value="5518.8">
            <text:p>5518,80</text:p>
          </table:table-cell>
          <table:table-cell table:style-name="ce12N2" office:value-type="float" office:value="386.32">
            <text:p>38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5094003000155550010001857201114655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11">
            <text:p>309411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48.7">
            <text:p>754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548.7">
            <text:p>7548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7.95537">
            <text:p>37,955</text:p>
          </table:table-cell>
          <table:table-cell table:style-name="ce12N2" office:value-type="float" office:value="583">
            <text:p>58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48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48.7">
            <text:p>7548,70</text:p>
          </table:table-cell>
          <table:table-cell table:style-name="ce12N2" office:value-type="float" office:value="288.36">
            <text:p>28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61242541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22">
            <text:p>309422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4.43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907.77">
            <text:p>26907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6060.79">
            <text:p>26060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44.599">
            <text:p>244,599</text:p>
          </table:table-cell>
          <table:table-cell table:style-name="ce12N2" office:value-type="float" office:value="428.7">
            <text:p>428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907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994.65">
            <text:p>21994,65</text:p>
          </table:table-cell>
          <table:table-cell table:style-name="ce12N2" office:value-type="float" office:value="21.99">
            <text:p>21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7.95">
            <text:p>197,95</text:p>
          </table:table-cell>
          <table:table-cell table:style-name="ce12N2" office:value-type="float" office:value="44.53">
            <text:p>44,5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846.98">
            <text:p>846,98</text:p>
          </table:table-cell>
          <table:table-cell table:style-name="ce12N2" office:value-type="float" office:value="26060.79">
            <text:p>26060,79</text:p>
          </table:table-cell>
          <table:table-cell table:style-name="ce12N2" office:value-type="float" office:value="1824.26">
            <text:p>182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76428620002485500200001443214821014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2">
            <text:p>309432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28.9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55.06">
            <text:p>2665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5305.05">
            <text:p>25305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121105">
            <text:p>2,121</text:p>
          </table:table-cell>
          <table:table-cell table:style-name="ce12N2" office:value-type="float" office:value="334.97">
            <text:p>334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655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56.81">
            <text:p>21356,81</text:p>
          </table:table-cell>
          <table:table-cell table:style-name="ce12N2" office:value-type="float" office:value="21.36">
            <text:p>2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2.21">
            <text:p>192,21</text:p>
          </table:table-cell>
          <table:table-cell table:style-name="ce12N2" office:value-type="float" office:value="61.58">
            <text:p>61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1350.01">
            <text:p>1350,01</text:p>
          </table:table-cell>
          <table:table-cell table:style-name="ce12N2" office:value-type="float" office:value="25305.05">
            <text:p>25305,05</text:p>
          </table:table-cell>
          <table:table-cell table:style-name="ce12N2" office:value-type="float" office:value="1771.36">
            <text:p>177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09495280012325500100232899110226712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3">
            <text:p>309433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5.2122">
            <text:p>45,212</text:p>
          </table:table-cell>
          <table:table-cell table:style-name="ce12N2" office:value-type="float" office:value="1301">
            <text:p>130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4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700.62">
            <text:p>70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71149866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48">
            <text:p>309448</text:p>
          </table:table-cell>
          <table:table-cell table:style-name="ce0" table:number-columns-spanned="4" table:number-rows-spanned="1" office:value-type="string" calcext:value-type="string">
            <text:p>4.463 - SAMER - COMERCIO DE MATERIAL HIDRAULICO LTDA - EPP</text:p>
          </table:table-cell>
          <table:covered-table-cell table:number-columns-repeated="3"/>
          <table:table-cell table:style-name="ce0" office:value-type="string" calcext:value-type="string">
            <text:p>5.3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517.42">
            <text:p>1651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6517.42">
            <text:p>16517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0699">
            <text:p>1,107</text:p>
          </table:table-cell>
          <table:table-cell table:style-name="ce12N2" office:value-type="float" office:value="97.92">
            <text:p>97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517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758.32">
            <text:p>14758,32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.81">
            <text:p>132,8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517.42">
            <text:p>16517,42</text:p>
          </table:table-cell>
          <table:table-cell table:style-name="ce12N2" office:value-type="float" office:value="1156.22">
            <text:p>1156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35760450001505500100000532410019219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56">
            <text:p>309456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649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51.17">
            <text:p>135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68.7">
            <text:p>1268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13">
            <text:p>0,032</text:p>
          </table:table-cell>
          <table:table-cell table:style-name="ce12N2" office:value-type="float" office:value="3.75">
            <text:p>3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51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70.75">
            <text:p>1070,75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64">
            <text:p>9,64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82.47">
            <text:p>82,47</text:p>
          </table:table-cell>
          <table:table-cell table:style-name="ce12N2" office:value-type="float" office:value="1268.7">
            <text:p>1268,70</text:p>
          </table:table-cell>
          <table:table-cell table:style-name="ce12N2" office:value-type="float" office:value="88.81">
            <text:p>8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64912679617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57">
            <text:p>309457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650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3.72">
            <text:p>106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8.8">
            <text:p>99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56">
            <text:p>0,013</text:p>
          </table:table-cell>
          <table:table-cell table:style-name="ce12N2" office:value-type="float" office:value="3.75">
            <text:p>3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63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2.96">
            <text:p>842,96</text:p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59">
            <text:p>7,59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64.92">
            <text:p>64,92</text:p>
          </table:table-cell>
          <table:table-cell table:style-name="ce12N2" office:value-type="float" office:value="998.8">
            <text:p>998,80</text:p>
          </table:table-cell>
          <table:table-cell table:style-name="ce12N2" office:value-type="float" office:value="69.92">
            <text:p>69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6501375736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5">
            <text:p>3094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04.16">
            <text:p>1230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553.2">
            <text:p>1155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3756">
            <text:p>0,338</text:p>
          </table:table-cell>
          <table:table-cell table:style-name="ce12N2" office:value-type="float" office:value="33.04">
            <text:p>33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30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50.62">
            <text:p>9750,62</text:p>
          </table:table-cell>
          <table:table-cell table:style-name="ce12N2" office:value-type="float" office:value="9.75">
            <text:p>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.76">
            <text:p>87,7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750.96">
            <text:p>750,96</text:p>
          </table:table-cell>
          <table:table-cell table:style-name="ce12N2" office:value-type="float" office:value="11553.2">
            <text:p>11553,20</text:p>
          </table:table-cell>
          <table:table-cell table:style-name="ce12N2" office:value-type="float" office:value="808.72">
            <text:p>80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718298291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6">
            <text:p>3094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3.24">
            <text:p>187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3.24">
            <text:p>187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952">
            <text:p>0,031</text:p>
          </table:table-cell>
          <table:table-cell table:style-name="ce12N2" office:value-type="float" office:value="0.5">
            <text:p>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0.97">
            <text:p>1580,97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23">
            <text:p>14,2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3.24">
            <text:p>1873,24</text:p>
          </table:table-cell>
          <table:table-cell table:style-name="ce12N2" office:value-type="float" office:value="131.13">
            <text:p>13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115462802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7">
            <text:p>3094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83.39">
            <text:p>10583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37.46">
            <text:p>9937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4162">
            <text:p>0,134</text:p>
          </table:table-cell>
          <table:table-cell table:style-name="ce12N2" office:value-type="float" office:value="30.56">
            <text:p>30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583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86.97">
            <text:p>8386,97</text:p>
          </table:table-cell>
          <table:table-cell table:style-name="ce12N2" office:value-type="float" office:value="8.39">
            <text:p>8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48">
            <text:p>75,48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645.93">
            <text:p>645,93</text:p>
          </table:table-cell>
          <table:table-cell table:style-name="ce12N2" office:value-type="float" office:value="9937.46">
            <text:p>9937,46</text:p>
          </table:table-cell>
          <table:table-cell table:style-name="ce12N2" office:value-type="float" office:value="695.62">
            <text:p>69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31315605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9">
            <text:p>3094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31.7">
            <text:p>553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31.7">
            <text:p>5531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9">
            <text:p>0,000</text:p>
          </table:table-cell>
          <table:table-cell table:style-name="ce12N2" office:value-type="float" office:value="9.15">
            <text:p>9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31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19.22">
            <text:p>4819,22</text:p>
          </table:table-cell>
          <table:table-cell table:style-name="ce12N2" office:value-type="float" office:value="4.82">
            <text:p>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37">
            <text:p>43,3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31.7">
            <text:p>5531,70</text:p>
          </table:table-cell>
          <table:table-cell table:style-name="ce12N2" office:value-type="float" office:value="221.27">
            <text:p>22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017898775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0">
            <text:p>3094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37.6">
            <text:p>1273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37.6">
            <text:p>1273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168">
            <text:p>0,052</text:p>
          </table:table-cell>
          <table:table-cell table:style-name="ce12N2" office:value-type="float" office:value="71.68">
            <text:p>71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73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65.2">
            <text:p>10965,20</text:p>
          </table:table-cell>
          <table:table-cell table:style-name="ce12N2" office:value-type="float" office:value="10.97">
            <text:p>1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.69">
            <text:p>98,6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53.22">
            <text:p>9353,22</text:p>
          </table:table-cell>
          <table:table-cell table:style-name="ce12N2" office:value-type="float" office:value="654.73">
            <text:p>65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61131213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1">
            <text:p>3094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7.2">
            <text:p>139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7.2">
            <text:p>139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">
            <text:p>0,003</text:p>
          </table:table-cell>
          <table:table-cell table:style-name="ce12N2" office:value-type="float" office:value="7.36">
            <text:p>7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2.78">
            <text:p>1202,78</text:p>
          </table:table-cell>
          <table:table-cell table:style-name="ce12N2" office:value-type="float" office:value="1.2">
            <text:p>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83">
            <text:p>10,8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5.96">
            <text:p>1025,96</text:p>
          </table:table-cell>
          <table:table-cell table:style-name="ce12N2" office:value-type="float" office:value="71.82">
            <text:p>71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514528778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2">
            <text:p>3094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68.6">
            <text:p>1426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268.6">
            <text:p>14268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7">
            <text:p>0,001</text:p>
          </table:table-cell>
          <table:table-cell table:style-name="ce12N2" office:value-type="float" office:value="27.45">
            <text:p>27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268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30.81">
            <text:p>12430,81</text:p>
          </table:table-cell>
          <table:table-cell table:style-name="ce12N2" office:value-type="float" office:value="12.43">
            <text:p>1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88">
            <text:p>111,8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68.6">
            <text:p>14268,60</text:p>
          </table:table-cell>
          <table:table-cell table:style-name="ce12N2" office:value-type="float" office:value="570.74">
            <text:p>57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212039838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3">
            <text:p>3094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48.68">
            <text:p>514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34.44">
            <text:p>4834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5268">
            <text:p>0,065</text:p>
          </table:table-cell>
          <table:table-cell table:style-name="ce12N2" office:value-type="float" office:value="14.87">
            <text:p>14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4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0.15">
            <text:p>4080,15</text:p>
          </table:table-cell>
          <table:table-cell table:style-name="ce12N2" office:value-type="float" office:value="4.08">
            <text:p>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72">
            <text:p>36,72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314.24">
            <text:p>314,24</text:p>
          </table:table-cell>
          <table:table-cell table:style-name="ce12N2" office:value-type="float" office:value="4834.44">
            <text:p>4834,44</text:p>
          </table:table-cell>
          <table:table-cell table:style-name="ce12N2" office:value-type="float" office:value="338.41">
            <text:p>33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415670413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90">
            <text:p>309490</text:p>
          </table:table-cell>
          <table:table-cell table:style-name="ce0" table:number-columns-spanned="4" table:number-rows-spanned="1" office:value-type="string" calcext:value-type="string">
            <text:p>8.844 - COZIMAX MOVEIS MIRASSOL LTDA</text:p>
          </table:table-cell>
          <table:covered-table-cell table:number-columns-repeated="3"/>
          <table:table-cell table:style-name="ce0" office:value-type="string" calcext:value-type="string">
            <text:p>758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">
            <text:p>0,01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0.17">
            <text:p>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23">
            <text:p>2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11.93">
            <text:p>1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043201000100550010007584571119030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94">
            <text:p>309494</text:p>
          </table:table-cell>
          <table:table-cell table:style-name="ce0" table:number-columns-spanned="4" table:number-rows-spanned="1" office:value-type="string" calcext:value-type="string">
            <text:p>34.313 - LYNUS INDUSTRIA, COMERCIO, IMPORTACAO E EXPORTACAO LTDA</text:p>
          </table:table-cell>
          <table:covered-table-cell table:number-columns-repeated="3"/>
          <table:table-cell table:style-name="ce0" office:value-type="string" calcext:value-type="string">
            <text:p>238.13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60.54">
            <text:p>1246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2437.7">
            <text:p>1243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6958">
            <text:p>1,170</text:p>
          </table:table-cell>
          <table:table-cell table:style-name="ce12N2" office:value-type="float" office:value="135.3">
            <text:p>135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460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35.72">
            <text:p>10835,72</text:p>
          </table:table-cell>
          <table:table-cell table:style-name="ce12N2" office:value-type="float" office:value="10.84">
            <text:p>1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.52">
            <text:p>97,5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22.84">
            <text:p>22,84</text:p>
          </table:table-cell>
          <table:table-cell table:style-name="ce12N2" office:value-type="float" office:value="12437.7">
            <text:p>12437,70</text:p>
          </table:table-cell>
          <table:table-cell table:style-name="ce12N2" office:value-type="float" office:value="497.52">
            <text:p>49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71629640001855500200023813714662464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95">
            <text:p>309495</text:p>
          </table:table-cell>
          <table:table-cell table:style-name="ce0" table:number-columns-spanned="4" table:number-rows-spanned="1" office:value-type="string" calcext:value-type="string">
            <text:p>6.638 - MECANICA MABELINI LTDA</text:p>
          </table:table-cell>
          <table:covered-table-cell table:number-columns-repeated="3"/>
          <table:table-cell table:style-name="ce0" office:value-type="string" calcext:value-type="string">
            <text:p>7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65.4">
            <text:p>3366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33665.4">
            <text:p>33665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008">
            <text:p>0,210</text:p>
          </table:table-cell>
          <table:table-cell table:style-name="ce12N2" office:value-type="float" office:value="2473">
            <text:p>247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665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9.67">
            <text:p>49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665.4">
            <text:p>33665,40</text:p>
          </table:table-cell>
          <table:table-cell table:style-name="ce12N2" office:value-type="float" office:value="1326.41">
            <text:p>132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8458900000110550010000072901612188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33">
            <text:p>309533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2.5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6.81">
            <text:p>2046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86.93">
            <text:p>1986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487">
            <text:p>0,345</text:p>
          </table:table-cell>
          <table:table-cell table:style-name="ce12N2" office:value-type="float" office:value="28.8">
            <text:p>2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46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2">
            <text:p>1702,00</text:p>
          </table:table-cell>
          <table:table-cell table:style-name="ce12N2" office:value-type="float" office:value="1.7">
            <text:p>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32">
            <text:p>15,3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59.88">
            <text:p>59,88</text:p>
          </table:table-cell>
          <table:table-cell table:style-name="ce12N2" office:value-type="float" office:value="1986.93">
            <text:p>1986,93</text:p>
          </table:table-cell>
          <table:table-cell table:style-name="ce12N2" office:value-type="float" office:value="111.45">
            <text:p>11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8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257115722262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34">
            <text:p>309534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0.88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395.29">
            <text:p>4239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121.5">
            <text:p>4212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99.318372">
            <text:p>699,318</text:p>
          </table:table-cell>
          <table:table-cell table:style-name="ce12N2" office:value-type="float" office:value="14370.72">
            <text:p>1437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395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549.49">
            <text:p>35549,49</text:p>
          </table:table-cell>
          <table:table-cell table:style-name="ce12N2" office:value-type="float" office:value="35.55">
            <text:p>3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9.95">
            <text:p>319,95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273.79">
            <text:p>273,79</text:p>
          </table:table-cell>
          <table:table-cell table:style-name="ce12N2" office:value-type="float" office:value="42121.5">
            <text:p>42121,50</text:p>
          </table:table-cell>
          <table:table-cell table:style-name="ce12N2" office:value-type="float" office:value="2948.51">
            <text:p>2948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51.28">
            <text:p>4151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.389</text:p>
          </table:table-cell>
          <table:table-cell table:style-name="ce0" office:value-type="string" calcext:value-type="string">
            <text:p>31.661 - DOSANJOS TRANSPORTES LTDA</text:p>
          </table:table-cell>
          <table:table-cell table:style-name="ce0" office:value-type="string" calcext:value-type="string">
            <text:p>19/06/2026</text:p>
          </table:table-cell>
          <table:table-cell table:style-name="ce12" office:value-type="string" calcext:value-type="string">
            <text:p>4.151,28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35260656883820000204550030019008801269761123</text:p>
          </table:table-cell>
          <table:table-cell table:style-name="ce0" office:value-type="string" calcext:value-type="string">
            <text:p>35260654320203000194570010000043891719642264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46">
            <text:p>309546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76.5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9.46">
            <text:p>200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78.68">
            <text:p>197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216">
            <text:p>0,021</text:p>
          </table:table-cell>
          <table:table-cell table:style-name="ce12N2" office:value-type="float" office:value="1.87">
            <text:p>1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0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5.64">
            <text:p>1685,64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17">
            <text:p>15,1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30.78">
            <text:p>30,78</text:p>
          </table:table-cell>
          <table:table-cell table:style-name="ce12N2" office:value-type="float" office:value="1978.68">
            <text:p>1978,68</text:p>
          </table:table-cell>
          <table:table-cell table:style-name="ce12N2" office:value-type="float" office:value="120.75">
            <text:p>12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330642620002505500100027650413311183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52">
            <text:p>309552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4.36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26.52">
            <text:p>13626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97.6">
            <text:p>1319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4.2">
            <text:p>304,200</text:p>
          </table:table-cell>
          <table:table-cell table:style-name="ce12N2" office:value-type="float" office:value="268.8">
            <text:p>26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626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38.44">
            <text:p>11138,44</text:p>
          </table:table-cell>
          <table:table-cell table:style-name="ce12N2" office:value-type="float" office:value="11.14">
            <text:p>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.25">
            <text:p>100,25</text:p>
          </table:table-cell>
          <table:table-cell table:style-name="ce12N2" office:value-type="float" office:value="44.53">
            <text:p>44,5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428.92">
            <text:p>428,92</text:p>
          </table:table-cell>
          <table:table-cell table:style-name="ce12N2" office:value-type="float" office:value="13197.6">
            <text:p>13197,60</text:p>
          </table:table-cell>
          <table:table-cell table:style-name="ce12N2" office:value-type="float" office:value="923.83">
            <text:p>923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76428620002485500200001436419043301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58">
            <text:p>309558</text:p>
          </table:table-cell>
          <table:table-cell table:style-name="ce0" table:number-columns-spanned="4" table:number-rows-spanned="1" office:value-type="string" calcext:value-type="string">
            <text:p>9.271 - HENKEL LTDA JUNDIAI (CD)</text:p>
          </table:table-cell>
          <table:covered-table-cell table:number-columns-repeated="3"/>
          <table:table-cell table:style-name="ce0" office:value-type="string" calcext:value-type="string">
            <text:p>899.809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847.55">
            <text:p>50847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0847.55">
            <text:p>50847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5513">
            <text:p>0,046</text:p>
          </table:table-cell>
          <table:table-cell table:style-name="ce12N2" office:value-type="float" office:value="871.61">
            <text:p>871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847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040.57">
            <text:p>44040,57</text:p>
          </table:table-cell>
          <table:table-cell table:style-name="ce12N2" office:value-type="float" office:value="44.05">
            <text:p>44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6.36">
            <text:p>396,36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847.55">
            <text:p>50847,55</text:p>
          </table:table-cell>
          <table:table-cell table:style-name="ce12N2" office:value-type="float" office:value="2318">
            <text:p>231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7771310034735500500089980919909662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59">
            <text:p>309559</text:p>
          </table:table-cell>
          <table:table-cell table:style-name="ce0" table:number-columns-spanned="4" table:number-rows-spanned="1" office:value-type="string" calcext:value-type="string">
            <text:p>9.271 - HENKEL LTDA JUNDIAI (CD)</text:p>
          </table:table-cell>
          <table:covered-table-cell table:number-columns-repeated="3"/>
          <table:table-cell table:style-name="ce0" office:value-type="string" calcext:value-type="string">
            <text:p>899.810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7.63">
            <text:p>90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7.63">
            <text:p>907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21">
            <text:p>0,001</text:p>
          </table:table-cell>
          <table:table-cell table:style-name="ce12N2" office:value-type="float" office:value="3.04">
            <text:p>3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7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6.02">
            <text:p>766,02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89">
            <text:p>6,8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7.63">
            <text:p>907,63</text:p>
          </table:table-cell>
          <table:table-cell table:style-name="ce12N2" office:value-type="float" office:value="63.53">
            <text:p>6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7771310034735500500089981010179899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0">
            <text:p>309560</text:p>
          </table:table-cell>
          <table:table-cell table:style-name="ce0" table:number-columns-spanned="4" table:number-rows-spanned="1" office:value-type="string" calcext:value-type="string">
            <text:p>9.271 - HENKEL LTDA JUNDIAI (CD)</text:p>
          </table:table-cell>
          <table:covered-table-cell table:number-columns-repeated="3"/>
          <table:table-cell table:style-name="ce0" office:value-type="string" calcext:value-type="string">
            <text:p>899.821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9.36">
            <text:p>30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9.36">
            <text:p>309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06">
            <text:p>0,001</text:p>
          </table:table-cell>
          <table:table-cell table:style-name="ce12N2" office:value-type="float" office:value="0.76">
            <text:p>0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9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1.08">
            <text:p>261,08</text:p>
          </table:table-cell>
          <table:table-cell table:style-name="ce12N2" office:value-type="float" office:value="0.26">
            <text:p>0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35">
            <text:p>2,3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9.36">
            <text:p>309,36</text:p>
          </table:table-cell>
          <table:table-cell table:style-name="ce12N2" office:value-type="float" office:value="21.66">
            <text:p>2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7771310034735500500089982115822161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2">
            <text:p>30956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99.37">
            <text:p>499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42">
            <text:p>484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48">
            <text:p>0,006</text:p>
          </table:table-cell>
          <table:table-cell table:style-name="ce12N2" office:value-type="float" office:value="29.52">
            <text:p>29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99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6.53">
            <text:p>4086,53</text:p>
          </table:table-cell>
          <table:table-cell table:style-name="ce12N2" office:value-type="float" office:value="4.09">
            <text:p>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78">
            <text:p>36,78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57.37">
            <text:p>157,37</text:p>
          </table:table-cell>
          <table:table-cell table:style-name="ce12N2" office:value-type="float" office:value="4842">
            <text:p>4842,00</text:p>
          </table:table-cell>
          <table:table-cell table:style-name="ce12N2" office:value-type="float" office:value="338.94">
            <text:p>338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114235520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5">
            <text:p>30956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5.9">
            <text:p>845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5.9">
            <text:p>84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13">
            <text:p>0,032</text:p>
          </table:table-cell>
          <table:table-cell table:style-name="ce12N2" office:value-type="float" office:value="10.88">
            <text:p>10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5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3.92">
            <text:p>713,92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43">
            <text:p>6,43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5.9">
            <text:p>845,90</text:p>
          </table:table-cell>
          <table:table-cell table:style-name="ce12N2" office:value-type="float" office:value="59.21">
            <text:p>59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516129107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7">
            <text:p>309597</text:p>
          </table:table-cell>
          <table:table-cell table:style-name="ce0" table:number-columns-spanned="4" table:number-rows-spanned="1" office:value-type="string" calcext:value-type="string">
            <text:p>15.599 - FUNDICAO CLAUDIENSE EIRELI</text:p>
          </table:table-cell>
          <table:covered-table-cell table:number-columns-repeated="3"/>
          <table:table-cell table:style-name="ce0" office:value-type="string" calcext:value-type="string">
            <text:p>2.0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271.3">
            <text:p>12127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113869.75">
            <text:p>113869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39565">
            <text:p>6,396</text:p>
          </table:table-cell>
          <table:table-cell table:style-name="ce12N2" office:value-type="float" office:value="10691">
            <text:p>1069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1.271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8.17">
            <text:p>58,1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7401.55">
            <text:p>7401,55</text:p>
          </table:table-cell>
          <table:table-cell table:style-name="ce12N2" office:value-type="float" office:value="113869.75">
            <text:p>113869,75</text:p>
          </table:table-cell>
          <table:table-cell table:style-name="ce12N2" office:value-type="float" office:value="7970.89">
            <text:p>797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332564950001735500100000201613563014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2">
            <text:p>309602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9.5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4.59">
            <text:p>138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78.32">
            <text:p>1378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1">
            <text:p>0,059</text:p>
          </table:table-cell>
          <table:table-cell table:style-name="ce12N2" office:value-type="float" office:value="15.22">
            <text:p>15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84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63.04">
            <text:p>1163,04</text:p>
          </table:table-cell>
          <table:table-cell table:style-name="ce12N2" office:value-type="float" office:value="1.16">
            <text:p>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47">
            <text:p>10,4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6.27">
            <text:p>6,27</text:p>
          </table:table-cell>
          <table:table-cell table:style-name="ce12N2" office:value-type="float" office:value="1378.32">
            <text:p>1378,32</text:p>
          </table:table-cell>
          <table:table-cell table:style-name="ce12N2" office:value-type="float" office:value="96.48">
            <text:p>9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951615072919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3">
            <text:p>30960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9.5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45.7">
            <text:p>304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045.7">
            <text:p>3045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332">
            <text:p>0,283</text:p>
          </table:table-cell>
          <table:table-cell table:style-name="ce12N2" office:value-type="float" office:value="58.33">
            <text:p>58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4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70.4">
            <text:p>2570,40</text:p>
          </table:table-cell>
          <table:table-cell table:style-name="ce12N2" office:value-type="float" office:value="2.57">
            <text:p>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14">
            <text:p>23,1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45.7">
            <text:p>3045,70</text:p>
          </table:table-cell>
          <table:table-cell table:style-name="ce12N2" office:value-type="float" office:value="213.2">
            <text:p>21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954114568597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4">
            <text:p>309604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9.5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14">
            <text:p>5691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6914">
            <text:p>5691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2.73668">
            <text:p>72,737</text:p>
          </table:table-cell>
          <table:table-cell table:style-name="ce12N2" office:value-type="float" office:value="5030.72">
            <text:p>503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.91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031.5">
            <text:p>48031,50</text:p>
          </table:table-cell>
          <table:table-cell table:style-name="ce12N2" office:value-type="float" office:value="48.03">
            <text:p>48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2.28">
            <text:p>432,2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914">
            <text:p>56914,00</text:p>
          </table:table-cell>
          <table:table-cell table:style-name="ce12N2" office:value-type="float" office:value="3983.98">
            <text:p>398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957416182872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5">
            <text:p>30960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9.5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164.6">
            <text:p>122164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22164.6">
            <text:p>122164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4.0447">
            <text:p>164,045</text:p>
          </table:table-cell>
          <table:table-cell table:style-name="ce12N2" office:value-type="float" office:value="5664.59">
            <text:p>5664,5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2.164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104.1">
            <text:p>103104,10</text:p>
          </table:table-cell>
          <table:table-cell table:style-name="ce12N2" office:value-type="float" office:value="103.1">
            <text:p>103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7.94">
            <text:p>927,9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2164.6">
            <text:p>122164,60</text:p>
          </table:table-cell>
          <table:table-cell table:style-name="ce12N2" office:value-type="float" office:value="8551.52">
            <text:p>855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957516663298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6">
            <text:p>309606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68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6.6">
            <text:p>497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76.6">
            <text:p>497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4">
            <text:p>0,007</text:p>
          </table:table-cell>
          <table:table-cell table:style-name="ce12N2" office:value-type="float" office:value="3.4">
            <text:p>3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7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00.12">
            <text:p>4200,12</text:p>
          </table:table-cell>
          <table:table-cell table:style-name="ce12N2" office:value-type="float" office:value="4.2">
            <text:p>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8">
            <text:p>37,80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76.6">
            <text:p>4976,60</text:p>
          </table:table-cell>
          <table:table-cell table:style-name="ce12N2" office:value-type="float" office:value="348.36">
            <text:p>34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68514954655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20">
            <text:p>309620</text:p>
          </table:table-cell>
          <table:table-cell table:style-name="ce0" table:number-columns-spanned="4" table:number-rows-spanned="1" office:value-type="string" calcext:value-type="string">
            <text:p>19 - TRAMONTINA PLANALTO S/A</text:p>
          </table:table-cell>
          <table:covered-table-cell table:number-columns-repeated="3"/>
          <table:table-cell table:style-name="ce0" office:value-type="string" calcext:value-type="string">
            <text:p>716.8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42.27">
            <text:p>244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442.27">
            <text:p>2442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6E-5">
            <text:p>0,000</text:p>
          </table:table-cell>
          <table:table-cell table:style-name="ce12N2" office:value-type="float" office:value="0.3">
            <text:p>0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42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49.2">
            <text:p>2149,20</text:p>
          </table:table-cell>
          <table:table-cell table:style-name="ce12N2" office:value-type="float" office:value="2.15">
            <text:p>2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34">
            <text:p>19,3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42.27">
            <text:p>2442,27</text:p>
          </table:table-cell>
          <table:table-cell table:style-name="ce12N2" office:value-type="float" office:value="293.07">
            <text:p>29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001422400001205500100071682017261831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22">
            <text:p>309622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266.7">
            <text:p>2526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5266.7">
            <text:p>2526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7.53405">
            <text:p>57,534</text:p>
          </table:table-cell>
          <table:table-cell table:style-name="ce12N2" office:value-type="float" office:value="1858">
            <text:p>185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26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266.7">
            <text:p>25266,70</text:p>
          </table:table-cell>
          <table:table-cell table:style-name="ce12N2" office:value-type="float" office:value="965.19">
            <text:p>96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1116667845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23">
            <text:p>309623</text:p>
          </table:table-cell>
          <table:table-cell table:style-name="ce0" table:number-columns-spanned="4" table:number-rows-spanned="1" office:value-type="string" calcext:value-type="string">
            <text:p>7.484 - AFORT INDUSTRIA DE PLASTICOS LTDA-ME</text:p>
          </table:table-cell>
          <table:covered-table-cell table:number-columns-repeated="3"/>
          <table:table-cell table:style-name="ce0" office:value-type="string" calcext:value-type="string">
            <text:p>278.9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487.05">
            <text:p>2148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0810.7">
            <text:p>20810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7798">
            <text:p>17,780</text:p>
          </table:table-cell>
          <table:table-cell table:style-name="ce12N2" office:value-type="float" office:value="635.45">
            <text:p>635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487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619.43">
            <text:p>16619,43</text:p>
          </table:table-cell>
          <table:table-cell table:style-name="ce12N2" office:value-type="float" office:value="16.62">
            <text:p>1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9.57">
            <text:p>149,57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676.35">
            <text:p>676,35</text:p>
          </table:table-cell>
          <table:table-cell table:style-name="ce12N2" office:value-type="float" office:value="20810.7">
            <text:p>20810,70</text:p>
          </table:table-cell>
          <table:table-cell table:style-name="ce12N2" office:value-type="float" office:value="2497.28">
            <text:p>249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6172898260001155500100027896315670358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24">
            <text:p>309624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3.4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4.76">
            <text:p>48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9.5">
            <text:p>46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5">
            <text:p>0,001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4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6.25">
            <text:p>396,25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57">
            <text:p>3,5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5.26">
            <text:p>15,26</text:p>
          </table:table-cell>
          <table:table-cell table:style-name="ce12N2" office:value-type="float" office:value="469.5">
            <text:p>469,50</text:p>
          </table:table-cell>
          <table:table-cell table:style-name="ce12N2" office:value-type="float" office:value="32.87">
            <text:p>32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3983690008005500100060349212823294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25">
            <text:p>309625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9.3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1.64">
            <text:p>1561,64</text:p>
          </table:table-cell>
          <table:table-cell table:style-name="ce12N2" office:value-type="float" office:value="74.89">
            <text:p>74,89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7.8">
            <text:p>1497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">
            <text:p>0,036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61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9.63">
            <text:p>1239,63</text:p>
          </table:table-cell>
          <table:table-cell table:style-name="ce12N2" office:value-type="float" office:value="1.24">
            <text:p>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16">
            <text:p>11,16</text:p>
          </table:table-cell>
          <table:table-cell table:style-name="ce12N2" office:value-type="float" office:value="48.38">
            <text:p>48,3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38.73">
            <text:p>138,73</text:p>
          </table:table-cell>
          <table:table-cell table:style-name="ce12N2" office:value-type="float" office:value="1422.91">
            <text:p>1422,91</text:p>
          </table:table-cell>
          <table:table-cell table:style-name="ce12N2" office:value-type="float" office:value="56.92">
            <text:p>5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931417831852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26">
            <text:p>309626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3.4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20.82">
            <text:p>18920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325.25">
            <text:p>18325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4">
            <text:p>0,018</text:p>
          </table:table-cell>
          <table:table-cell table:style-name="ce12N2" office:value-type="float" office:value="201.82">
            <text:p>201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920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466.05">
            <text:p>15466,05</text:p>
          </table:table-cell>
          <table:table-cell table:style-name="ce12N2" office:value-type="float" office:value="15.47">
            <text:p>1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.19">
            <text:p>139,1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595.57">
            <text:p>595,57</text:p>
          </table:table-cell>
          <table:table-cell table:style-name="ce12N2" office:value-type="float" office:value="18325.25">
            <text:p>18325,25</text:p>
          </table:table-cell>
          <table:table-cell table:style-name="ce12N2" office:value-type="float" office:value="1282.77">
            <text:p>1282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398369000800550010006034931051095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27">
            <text:p>309627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3.4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83.17">
            <text:p>1338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2961.9">
            <text:p>12961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741">
            <text:p>0,077</text:p>
          </table:table-cell>
          <table:table-cell table:style-name="ce12N2" office:value-type="float" office:value="121.63">
            <text:p>121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383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39.51">
            <text:p>10939,51</text:p>
          </table:table-cell>
          <table:table-cell table:style-name="ce12N2" office:value-type="float" office:value="10.94">
            <text:p>1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.46">
            <text:p>98,4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421.27">
            <text:p>421,27</text:p>
          </table:table-cell>
          <table:table-cell table:style-name="ce12N2" office:value-type="float" office:value="12961.9">
            <text:p>12961,90</text:p>
          </table:table-cell>
          <table:table-cell table:style-name="ce12N2" office:value-type="float" office:value="907.34">
            <text:p>907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3983690008005500100060349110956491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1">
            <text:p>30963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9.8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9023.03">
            <text:p>40902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0">
            <text:p>200,00</text:p>
          </table:table-cell>
          <table:table-cell table:style-name="ce12N2" office:value-type="float" office:value="405954.46">
            <text:p>405954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3.589819">
            <text:p>73,590</text:p>
          </table:table-cell>
          <table:table-cell table:style-name="ce12N2" office:value-type="float" office:value="5710.72">
            <text:p>571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9.023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4222.47">
            <text:p>344222,47</text:p>
          </table:table-cell>
          <table:table-cell table:style-name="ce12N2" office:value-type="float" office:value="344.28">
            <text:p>344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98.02">
            <text:p>3098,02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3068.57">
            <text:p>3068,57</text:p>
          </table:table-cell>
          <table:table-cell table:style-name="ce12N2" office:value-type="float" office:value="401604.51">
            <text:p>401604,51</text:p>
          </table:table-cell>
          <table:table-cell table:style-name="ce12N2" office:value-type="float" office:value="26644.59">
            <text:p>2664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983916369031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2">
            <text:p>309632</text:p>
          </table:table-cell>
          <table:table-cell table:style-name="ce0" table:number-columns-spanned="4" table:number-rows-spanned="1" office:value-type="string" calcext:value-type="string">
            <text:p>2.638 - MORLAN S/A</text:p>
          </table:table-cell>
          <table:covered-table-cell table:number-columns-repeated="3"/>
          <table:table-cell table:style-name="ce0" office:value-type="string" calcext:value-type="string">
            <text:p>794.8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644.6">
            <text:p>50644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8650.6">
            <text:p>4865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1.69744">
            <text:p>31,697</text:p>
          </table:table-cell>
          <table:table-cell table:style-name="ce12N2" office:value-type="float" office:value="3686.7">
            <text:p>3686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644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059.88">
            <text:p>41059,88</text:p>
          </table:table-cell>
          <table:table-cell table:style-name="ce12N2" office:value-type="float" office:value="41.06">
            <text:p>4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9.54">
            <text:p>369,5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994">
            <text:p>1994,00</text:p>
          </table:table-cell>
          <table:table-cell table:style-name="ce12N2" office:value-type="float" office:value="48650.6">
            <text:p>48650,60</text:p>
          </table:table-cell>
          <table:table-cell table:style-name="ce12N2" office:value-type="float" office:value="3405.54">
            <text:p>340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33097950001805500100079483615741004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3">
            <text:p>30963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3.15">
            <text:p>139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08.12">
            <text:p>130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65">
            <text:p>0,003</text:p>
          </table:table-cell>
          <table:table-cell table:style-name="ce12N2" office:value-type="float" office:value="6.46">
            <text:p>6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3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04.02">
            <text:p>1104,02</text:p>
          </table:table-cell>
          <table:table-cell table:style-name="ce12N2" office:value-type="float" office:value="1.1">
            <text:p>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94">
            <text:p>9,9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85.03">
            <text:p>85,03</text:p>
          </table:table-cell>
          <table:table-cell table:style-name="ce12N2" office:value-type="float" office:value="1308.12">
            <text:p>1308,12</text:p>
          </table:table-cell>
          <table:table-cell table:style-name="ce12N2" office:value-type="float" office:value="91.57">
            <text:p>9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511941918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5">
            <text:p>309635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26.44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36.4">
            <text:p>893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36.4">
            <text:p>8936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96">
            <text:p>1,296</text:p>
          </table:table-cell>
          <table:table-cell table:style-name="ce12N2" office:value-type="float" office:value="473.8">
            <text:p>473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93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42.1">
            <text:p>7542,10</text:p>
          </table:table-cell>
          <table:table-cell table:style-name="ce12N2" office:value-type="float" office:value="7.55">
            <text:p>7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.88">
            <text:p>67,8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36.4">
            <text:p>8936,40</text:p>
          </table:table-cell>
          <table:table-cell table:style-name="ce12N2" office:value-type="float" office:value="625.55">
            <text:p>62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801902002501550000008264451850239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6">
            <text:p>30963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9.8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322.8">
            <text:p>11132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1322.8">
            <text:p>11132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1.2427">
            <text:p>81,243</text:p>
          </table:table-cell>
          <table:table-cell table:style-name="ce12N2" office:value-type="float" office:value="8734.38">
            <text:p>8734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1.32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951.9">
            <text:p>93951,90</text:p>
          </table:table-cell>
          <table:table-cell table:style-name="ce12N2" office:value-type="float" office:value="93.95">
            <text:p>9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5.57">
            <text:p>845,5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322.8">
            <text:p>111322,80</text:p>
          </table:table-cell>
          <table:table-cell table:style-name="ce12N2" office:value-type="float" office:value="7792.6">
            <text:p>779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983513601470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7">
            <text:p>309637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40.39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80.7">
            <text:p>1448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4480.7">
            <text:p>14480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81862">
            <text:p>1,482</text:p>
          </table:table-cell>
          <table:table-cell table:style-name="ce12N2" office:value-type="float" office:value="387.37">
            <text:p>387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480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221.34">
            <text:p>12221,34</text:p>
          </table:table-cell>
          <table:table-cell table:style-name="ce12N2" office:value-type="float" office:value="12.22">
            <text:p>1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.99">
            <text:p>109,99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80.7">
            <text:p>14480,70</text:p>
          </table:table-cell>
          <table:table-cell table:style-name="ce12N2" office:value-type="float" office:value="1013.65">
            <text:p>101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403961351912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0">
            <text:p>30964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6.3">
            <text:p>2786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16.24">
            <text:p>2616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3">
            <text:p>0,006</text:p>
          </table:table-cell>
          <table:table-cell table:style-name="ce12N2" office:value-type="float" office:value="12.91">
            <text:p>12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86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08.03">
            <text:p>2208,03</text:p>
          </table:table-cell>
          <table:table-cell table:style-name="ce12N2" office:value-type="float" office:value="2.21">
            <text:p>2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87">
            <text:p>19,8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70.06">
            <text:p>170,06</text:p>
          </table:table-cell>
          <table:table-cell table:style-name="ce12N2" office:value-type="float" office:value="2616.24">
            <text:p>2616,24</text:p>
          </table:table-cell>
          <table:table-cell table:style-name="ce12N2" office:value-type="float" office:value="183.14">
            <text:p>183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9717983447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1">
            <text:p>3096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12.43">
            <text:p>171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07.92">
            <text:p>1607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6">
            <text:p>0,011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12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57.05">
            <text:p>1357,05</text:p>
          </table:table-cell>
          <table:table-cell table:style-name="ce12N2" office:value-type="float" office:value="1.36">
            <text:p>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21">
            <text:p>12,2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04.51">
            <text:p>104,51</text:p>
          </table:table-cell>
          <table:table-cell table:style-name="ce12N2" office:value-type="float" office:value="1607.92">
            <text:p>1607,92</text:p>
          </table:table-cell>
          <table:table-cell table:style-name="ce12N2" office:value-type="float" office:value="112.55">
            <text:p>11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816373249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2">
            <text:p>3096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09.46">
            <text:p>2060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351.61">
            <text:p>19351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65413">
            <text:p>0,565</text:p>
          </table:table-cell>
          <table:table-cell table:style-name="ce12N2" office:value-type="float" office:value="55.34">
            <text:p>5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60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332.28">
            <text:p>16332,28</text:p>
          </table:table-cell>
          <table:table-cell table:style-name="ce12N2" office:value-type="float" office:value="16.33">
            <text:p>1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6.99">
            <text:p>146,9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257.85">
            <text:p>1257,85</text:p>
          </table:table-cell>
          <table:table-cell table:style-name="ce12N2" office:value-type="float" office:value="19351.61">
            <text:p>19351,61</text:p>
          </table:table-cell>
          <table:table-cell table:style-name="ce12N2" office:value-type="float" office:value="1354.61">
            <text:p>135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71392529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3">
            <text:p>3096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72.59">
            <text:p>557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32.48">
            <text:p>5232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66">
            <text:p>0,013</text:p>
          </table:table-cell>
          <table:table-cell table:style-name="ce12N2" office:value-type="float" office:value="25.82">
            <text:p>2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72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16.09">
            <text:p>4416,09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74">
            <text:p>39,7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340.11">
            <text:p>340,11</text:p>
          </table:table-cell>
          <table:table-cell table:style-name="ce12N2" office:value-type="float" office:value="5232.48">
            <text:p>5232,48</text:p>
          </table:table-cell>
          <table:table-cell table:style-name="ce12N2" office:value-type="float" office:value="366.27">
            <text:p>36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2112625766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4">
            <text:p>3096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3.15">
            <text:p>139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08.12">
            <text:p>130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65">
            <text:p>0,003</text:p>
          </table:table-cell>
          <table:table-cell table:style-name="ce12N2" office:value-type="float" office:value="6.46">
            <text:p>6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3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04.02">
            <text:p>1104,02</text:p>
          </table:table-cell>
          <table:table-cell table:style-name="ce12N2" office:value-type="float" office:value="1.1">
            <text:p>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94">
            <text:p>9,9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85.03">
            <text:p>85,03</text:p>
          </table:table-cell>
          <table:table-cell table:style-name="ce12N2" office:value-type="float" office:value="1308.12">
            <text:p>1308,12</text:p>
          </table:table-cell>
          <table:table-cell table:style-name="ce12N2" office:value-type="float" office:value="91.57">
            <text:p>9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613061528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6">
            <text:p>3096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456.24">
            <text:p>1845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329.8">
            <text:p>1732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634">
            <text:p>0,506</text:p>
          </table:table-cell>
          <table:table-cell table:style-name="ce12N2" office:value-type="float" office:value="49.56">
            <text:p>49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45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625.91">
            <text:p>14625,91</text:p>
          </table:table-cell>
          <table:table-cell table:style-name="ce12N2" office:value-type="float" office:value="14.63">
            <text:p>1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1.63">
            <text:p>131,6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126.44">
            <text:p>1126,44</text:p>
          </table:table-cell>
          <table:table-cell table:style-name="ce12N2" office:value-type="float" office:value="17329.8">
            <text:p>17329,80</text:p>
          </table:table-cell>
          <table:table-cell table:style-name="ce12N2" office:value-type="float" office:value="1213.09">
            <text:p>121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9915707100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7">
            <text:p>3096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8.77">
            <text:p>92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2.08">
            <text:p>872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1">
            <text:p>0,002</text:p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8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6.01">
            <text:p>736,01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62">
            <text:p>6,6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56.69">
            <text:p>56,69</text:p>
          </table:table-cell>
          <table:table-cell table:style-name="ce12N2" office:value-type="float" office:value="872.08">
            <text:p>872,08</text:p>
          </table:table-cell>
          <table:table-cell table:style-name="ce12N2" office:value-type="float" office:value="61.05">
            <text:p>6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201727392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8">
            <text:p>3096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2">
            <text:p>196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62">
            <text:p>196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2">
            <text:p>0,000</text:p>
          </table:table-cell>
          <table:table-cell table:style-name="ce12N2" office:value-type="float" office:value="29.4">
            <text:p>2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6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8.99">
            <text:p>1688,99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0.7">
            <text:p>1440,70</text:p>
          </table:table-cell>
          <table:table-cell table:style-name="ce12N2" office:value-type="float" office:value="100.85">
            <text:p>10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916083375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9">
            <text:p>3096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98.85">
            <text:p>399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54.79">
            <text:p>3754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9707">
            <text:p>0,110</text:p>
          </table:table-cell>
          <table:table-cell table:style-name="ce12N2" office:value-type="float" office:value="10.74">
            <text:p>10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98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68.94">
            <text:p>3168,94</text:p>
          </table:table-cell>
          <table:table-cell table:style-name="ce12N2" office:value-type="float" office:value="3.17">
            <text:p>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52">
            <text:p>28,52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244.06">
            <text:p>244,06</text:p>
          </table:table-cell>
          <table:table-cell table:style-name="ce12N2" office:value-type="float" office:value="3754.79">
            <text:p>3754,79</text:p>
          </table:table-cell>
          <table:table-cell table:style-name="ce12N2" office:value-type="float" office:value="262.84">
            <text:p>26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9813994527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51">
            <text:p>30965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2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484.74">
            <text:p>11248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112484.74">
            <text:p>112484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78872">
            <text:p>0,979</text:p>
          </table:table-cell>
          <table:table-cell table:style-name="ce12N2" office:value-type="float" office:value="324.04">
            <text:p>324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2.484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4933.48">
            <text:p>94933,48</text:p>
          </table:table-cell>
          <table:table-cell table:style-name="ce12N2" office:value-type="float" office:value="94.93">
            <text:p>94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4.4">
            <text:p>854,4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484.74">
            <text:p>112484,74</text:p>
          </table:table-cell>
          <table:table-cell table:style-name="ce12N2" office:value-type="float" office:value="7873.94">
            <text:p>7873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23612351090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53">
            <text:p>30965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28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979.98">
            <text:p>18197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181785.3">
            <text:p>18178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59901">
            <text:p>1,060</text:p>
          </table:table-cell>
          <table:table-cell table:style-name="ce12N2" office:value-type="float" office:value="250.33">
            <text:p>250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1.979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423.22">
            <text:p>153423,22</text:p>
          </table:table-cell>
          <table:table-cell table:style-name="ce12N2" office:value-type="float" office:value="153.4">
            <text:p>15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0.81">
            <text:p>1380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94.68">
            <text:p>194,68</text:p>
          </table:table-cell>
          <table:table-cell table:style-name="ce12N2" office:value-type="float" office:value="181785.3">
            <text:p>181785,30</text:p>
          </table:table-cell>
          <table:table-cell table:style-name="ce12N2" office:value-type="float" office:value="12724.97">
            <text:p>12724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28218165381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66">
            <text:p>30966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0.0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94.2">
            <text:p>579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94.2">
            <text:p>579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21184">
            <text:p>2,021</text:p>
          </table:table-cell>
          <table:table-cell table:style-name="ce12N2" office:value-type="float" office:value="423.69">
            <text:p>423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9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90.27">
            <text:p>4890,27</text:p>
          </table:table-cell>
          <table:table-cell table:style-name="ce12N2" office:value-type="float" office:value="4.89">
            <text:p>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.01">
            <text:p>44,01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94.2">
            <text:p>5794,20</text:p>
          </table:table-cell>
          <table:table-cell table:style-name="ce12N2" office:value-type="float" office:value="405.59">
            <text:p>405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001513535959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67">
            <text:p>30966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0.0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466.78">
            <text:p>9046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90466.78">
            <text:p>90466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9.706024">
            <text:p>39,706</text:p>
          </table:table-cell>
          <table:table-cell table:style-name="ce12N2" office:value-type="float" office:value="4426.81">
            <text:p>4426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.466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364.3">
            <text:p>76364,30</text:p>
          </table:table-cell>
          <table:table-cell table:style-name="ce12N2" office:value-type="float" office:value="76.37">
            <text:p>76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7.28">
            <text:p>687,2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466.78">
            <text:p>90466,78</text:p>
          </table:table-cell>
          <table:table-cell table:style-name="ce12N2" office:value-type="float" office:value="6324.19">
            <text:p>632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001411991107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0">
            <text:p>30967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35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347.27">
            <text:p>75347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72660.19">
            <text:p>72660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35828">
            <text:p>0,336</text:p>
          </table:table-cell>
          <table:table-cell table:style-name="ce12N2" office:value-type="float" office:value="136.56">
            <text:p>136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.347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372.48">
            <text:p>61372,48</text:p>
          </table:table-cell>
          <table:table-cell table:style-name="ce12N2" office:value-type="float" office:value="61.38">
            <text:p>6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2.36">
            <text:p>552,3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2687.08">
            <text:p>2687,08</text:p>
          </table:table-cell>
          <table:table-cell table:style-name="ce12N2" office:value-type="float" office:value="72660.19">
            <text:p>72660,19</text:p>
          </table:table-cell>
          <table:table-cell table:style-name="ce12N2" office:value-type="float" office:value="5031.18">
            <text:p>503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35315519558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1">
            <text:p>30967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0.0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577.84">
            <text:p>8157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1577.84">
            <text:p>81577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0.642632">
            <text:p>70,643</text:p>
          </table:table-cell>
          <table:table-cell table:style-name="ce12N2" office:value-type="float" office:value="7076.2">
            <text:p>7076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.577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857.56">
            <text:p>68857,56</text:p>
          </table:table-cell>
          <table:table-cell table:style-name="ce12N2" office:value-type="float" office:value="68.86">
            <text:p>6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9.72">
            <text:p>619,72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577.84">
            <text:p>81577,84</text:p>
          </table:table-cell>
          <table:table-cell table:style-name="ce12N2" office:value-type="float" office:value="5710.45">
            <text:p>571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001613607763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2">
            <text:p>30967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54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7869.85">
            <text:p>21786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">
            <text:p>25,00</text:p>
          </table:table-cell>
          <table:table-cell table:style-name="ce12N2" office:value-type="float" office:value="211738.72">
            <text:p>211738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440671">
            <text:p>4,441</text:p>
          </table:table-cell>
          <table:table-cell table:style-name="ce12N2" office:value-type="float" office:value="518.91">
            <text:p>518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7.86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8899.43">
            <text:p>178899,43</text:p>
          </table:table-cell>
          <table:table-cell table:style-name="ce12N2" office:value-type="float" office:value="178.88">
            <text:p>17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10.1">
            <text:p>1610,1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6131.13">
            <text:p>6131,13</text:p>
          </table:table-cell>
          <table:table-cell table:style-name="ce12N2" office:value-type="float" office:value="211738.72">
            <text:p>211738,72</text:p>
          </table:table-cell>
          <table:table-cell table:style-name="ce12N2" office:value-type="float" office:value="14606.92">
            <text:p>1460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54614174385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5">
            <text:p>3096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81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1.34">
            <text:p>108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1.34">
            <text:p>1081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81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12.62">
            <text:p>912,62</text:p>
          </table:table-cell>
          <table:table-cell table:style-name="ce12N2" office:value-type="float" office:value="0.91">
            <text:p>0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21">
            <text:p>8,2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1.34">
            <text:p>1081,34</text:p>
          </table:table-cell>
          <table:table-cell table:style-name="ce12N2" office:value-type="float" office:value="75.69">
            <text:p>7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81019527396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86">
            <text:p>30968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0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85.92">
            <text:p>158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6">
            <text:p>153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52">
            <text:p>0,004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8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96.35">
            <text:p>1296,35</text:p>
          </table:table-cell>
          <table:table-cell table:style-name="ce12N2" office:value-type="float" office:value="1.3">
            <text:p>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67">
            <text:p>11,6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49.92">
            <text:p>49,92</text:p>
          </table:table-cell>
          <table:table-cell table:style-name="ce12N2" office:value-type="float" office:value="1536">
            <text:p>1536,00</text:p>
          </table:table-cell>
          <table:table-cell table:style-name="ce12N2" office:value-type="float" office:value="107.52">
            <text:p>10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0514623147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88">
            <text:p>30968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0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03.56">
            <text:p>470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55.5">
            <text:p>4555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3">
            <text:p>0,003</text:p>
          </table:table-cell>
          <table:table-cell table:style-name="ce12N2" office:value-type="float" office:value="4.16">
            <text:p>4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0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44.73">
            <text:p>3844,73</text:p>
          </table:table-cell>
          <table:table-cell table:style-name="ce12N2" office:value-type="float" office:value="3.85">
            <text:p>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61">
            <text:p>34,61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48.06">
            <text:p>148,06</text:p>
          </table:table-cell>
          <table:table-cell table:style-name="ce12N2" office:value-type="float" office:value="4555.5">
            <text:p>4555,50</text:p>
          </table:table-cell>
          <table:table-cell table:style-name="ce12N2" office:value-type="float" office:value="318.89">
            <text:p>318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0811090939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91">
            <text:p>30969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1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6.95">
            <text:p>327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173.8">
            <text:p>317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8">
            <text:p>0,002</text:p>
          </table:table-cell>
          <table:table-cell table:style-name="ce12N2" office:value-type="float" office:value="2.56">
            <text:p>2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7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78.6">
            <text:p>2678,60</text:p>
          </table:table-cell>
          <table:table-cell table:style-name="ce12N2" office:value-type="float" office:value="2.68">
            <text:p>2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11">
            <text:p>24,11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03.15">
            <text:p>103,15</text:p>
          </table:table-cell>
          <table:table-cell table:style-name="ce12N2" office:value-type="float" office:value="3173.8">
            <text:p>3173,80</text:p>
          </table:table-cell>
          <table:table-cell table:style-name="ce12N2" office:value-type="float" office:value="222.17">
            <text:p>22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1816394499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92">
            <text:p>309692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202.0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67.27">
            <text:p>5267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237.43">
            <text:p>5237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136">
            <text:p>0,011</text:p>
          </table:table-cell>
          <table:table-cell table:style-name="ce12N2" office:value-type="float" office:value="100.76">
            <text:p>100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67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46.02">
            <text:p>4546,02</text:p>
          </table:table-cell>
          <table:table-cell table:style-name="ce12N2" office:value-type="float" office:value="4.55">
            <text:p>4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92">
            <text:p>40,92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29.84">
            <text:p>29,84</text:p>
          </table:table-cell>
          <table:table-cell table:style-name="ce12N2" office:value-type="float" office:value="3257.78">
            <text:p>3257,78</text:p>
          </table:table-cell>
          <table:table-cell table:style-name="ce12N2" office:value-type="float" office:value="228.05">
            <text:p>22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0376680001545500100120202214254315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98">
            <text:p>30969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7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1.74">
            <text:p>107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38">
            <text:p>10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">
            <text:p>0,002</text:p>
          </table:table-cell>
          <table:table-cell table:style-name="ce12N2" office:value-type="float" office:value="0.04">
            <text:p>0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1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76.04">
            <text:p>876,04</text:p>
          </table:table-cell>
          <table:table-cell table:style-name="ce12N2" office:value-type="float" office:value="0.88">
            <text:p>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88">
            <text:p>7,88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33.74">
            <text:p>33,74</text:p>
          </table:table-cell>
          <table:table-cell table:style-name="ce12N2" office:value-type="float" office:value="1038">
            <text:p>1038,00</text:p>
          </table:table-cell>
          <table:table-cell table:style-name="ce12N2" office:value-type="float" office:value="72.66">
            <text:p>7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7010800228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0">
            <text:p>30970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7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5.81">
            <text:p>225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84.8">
            <text:p>218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">
            <text:p>0,003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55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43.91">
            <text:p>1843,91</text:p>
          </table:table-cell>
          <table:table-cell table:style-name="ce12N2" office:value-type="float" office:value="1.84">
            <text:p>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6">
            <text:p>16,60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71.01">
            <text:p>71,01</text:p>
          </table:table-cell>
          <table:table-cell table:style-name="ce12N2" office:value-type="float" office:value="2184.8">
            <text:p>2184,80</text:p>
          </table:table-cell>
          <table:table-cell table:style-name="ce12N2" office:value-type="float" office:value="152.94">
            <text:p>152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711917369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2">
            <text:p>30970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9.00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92.4">
            <text:p>339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92.4">
            <text:p>339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59.64">
            <text:p>159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92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63.1">
            <text:p>2863,10</text:p>
          </table:table-cell>
          <table:table-cell table:style-name="ce12N2" office:value-type="float" office:value="2.86">
            <text:p>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77">
            <text:p>25,77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92.4">
            <text:p>3392,40</text:p>
          </table:table-cell>
          <table:table-cell table:style-name="ce12N2" office:value-type="float" office:value="237.47">
            <text:p>23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561719009503550210019790031226216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4">
            <text:p>309704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4.8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32.44">
            <text:p>283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32.44">
            <text:p>2832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761">
            <text:p>4,761</text:p>
          </table:table-cell>
          <table:table-cell table:style-name="ce12N2" office:value-type="float" office:value="45">
            <text:p>4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3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90.51">
            <text:p>2390,51</text:p>
          </table:table-cell>
          <table:table-cell table:style-name="ce12N2" office:value-type="float" office:value="2.39">
            <text:p>2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51">
            <text:p>21,51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32.44">
            <text:p>2832,44</text:p>
          </table:table-cell>
          <table:table-cell table:style-name="ce12N2" office:value-type="float" office:value="198.27">
            <text:p>198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1507510091355500100056480118952545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10">
            <text:p>309710</text:p>
          </table:table-cell>
          <table:table-cell table:style-name="ce0" table:number-columns-spanned="4" table:number-rows-spanned="1" office:value-type="string" calcext:value-type="string">
            <text:p>13.118 - FORTLEV INDUST.E COMERC. DE PLASTICOS LTDA</text:p>
          </table:table-cell>
          <table:covered-table-cell table:number-columns-repeated="3"/>
          <table:table-cell table:style-name="ce0" office:value-type="string" calcext:value-type="string">
            <text:p>257.5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47.85">
            <text:p>9947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531.6">
            <text:p>853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514496">
            <text:p>25,514</text:p>
          </table:table-cell>
          <table:table-cell table:style-name="ce12N2" office:value-type="float" office:value="305.6">
            <text:p>30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947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13.34">
            <text:p>6813,34</text:p>
          </table:table-cell>
          <table:table-cell table:style-name="ce12N2" office:value-type="float" office:value="6.81">
            <text:p>6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32">
            <text:p>61,3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31.6">
            <text:p>8531,60</text:p>
          </table:table-cell>
          <table:table-cell table:style-name="ce12N2" office:value-type="float" office:value="1023.79">
            <text:p>1023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2200.19">
            <text:p>12200,19</text:p>
          </table:table-cell>
          <table:table-cell table:style-name="ce12N2" office:value-type="float" office:value="1416.25">
            <text:p>1416,25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10921911001004550010002575911142420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27">
            <text:p>127,00</text:p>
          </table:table-cell>
          <table:table-cell table:style-name="ce26N2" office:value-type="float" office:value="348.85">
            <text:p>348,85</text:p>
          </table:table-cell>
          <table:table-cell table:style-name="ce26N2" office:value-type="float" office:value="168.58">
            <text:p>168,5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6183.74">
            <text:p>46183,74</text:p>
          </table:table-cell>
          <table:table-cell table:style-name="ce26N2" office:value-type="float" office:value="5117114.25">
            <text:p>5117114,25</text:p>
          </table:table-cell>
          <table:table-cell table:style-name="ce26N2" office:value-type="float" office:value="343031.83">
            <text:p>343031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151.28">
            <text:p>4151,28</text:p>
          </table:table-cell>
          <table:table-cell table:style-name="ce26N2" office:value-type="float" office:value="5245723.59">
            <text:p>5245723,5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2200.19">
            <text:p>12200,19</text:p>
          </table:table-cell>
          <table:table-cell table:style-name="ce26N2" office:value-type="float" office:value="1416.25">
            <text:p>1416,25</text:p>
          </table:table-cell>
          <table:table-cell table:style-name="ce26N2" office:value-type="float" office:value="348.51">
            <text:p>348,5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5318.37685">
            <text:p>5318,377</text:p>
          </table:table-cell>
          <table:table-cell table:style-name="ce26N2" office:value-type="float" office:value="5198303.87">
            <text:p>5198303,87</text:p>
          </table:table-cell>
          <table:table-cell table:style-name="ce26N2" office:value-type="float" office:value="5245723.59">
            <text:p>5245723,5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203523.05">
            <text:p>4203523,05</text:p>
          </table:table-cell>
          <table:table-cell table:style-name="ce26N2" office:value-type="float" office:value="4203.57">
            <text:p>4203,5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7831.74">
            <text:p>37831,74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38723.05">
            <text:p>138723,0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1.18">
            <text:p>41,1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544" meta:object-count="0"/>
    <meta:generator>LibreOffice/4.3.0.4$Windows_x86 LibreOffice_project/62ad5818884a2fc2e5780dd45466868d41009ec0</meta:generator>
  </office:meta>
</office:document-meta>
</file>