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0/05/2026 05:30:32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2535">
            <text:p>302535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30.01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3/03/2026</text:p>
          </table:table-cell>
          <table:table-cell table:style-name="ce0" office:value-type="string" calcext:value-type="string">
            <text:p>04/03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">
            <text:p>30,000</text:p>
          </table:table-cell>
          <table:table-cell table:style-name="ce12N2" office:value-type="float" office:value="3425.1">
            <text:p>342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8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21.76">
            <text:p>2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1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301637895007498550060014300181495666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5">
            <text:p>306055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5.9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8.74792">
            <text:p>38,748</text:p>
          </table:table-cell>
          <table:table-cell table:style-name="ce12N2" office:value-type="float" office:value="2302.6">
            <text:p>230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48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1784.05">
            <text:p>178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21260419000152550010001459071219908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97">
            <text:p>30609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4.64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2">
            <text:p>0,011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237.89">
            <text:p>23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464519799933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9">
            <text:p>30612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15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59.85">
            <text:p>377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63164">
            <text:p>4,063</text:p>
          </table:table-cell>
          <table:table-cell table:style-name="ce12N2" office:value-type="float" office:value="21489.76">
            <text:p>214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75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243.86">
            <text:p>243,86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2626.12">
            <text:p>262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1571808125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2">
            <text:p>306202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556">
            <text:p>0,018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23.76">
            <text:p>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7128041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3">
            <text:p>306203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04">
            <text:p>0,020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26.54">
            <text:p>2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911898592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50">
            <text:p>30635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3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3.44">
            <text:p>1893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99997">
            <text:p>2,900</text:p>
          </table:table-cell>
          <table:table-cell table:style-name="ce12N2" office:value-type="float" office:value="11804.18">
            <text:p>11804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33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22.27">
            <text:p>122,27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1316.78">
            <text:p>131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30281564338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1">
            <text:p>306391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6236">
            <text:p>0,496</text:p>
          </table:table-cell>
          <table:table-cell table:style-name="ce12N2" office:value-type="float" office:value="246.07">
            <text:p>246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48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2477.78">
            <text:p>247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423159702000118550010000210081066087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45">
            <text:p>306445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7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09">
            <text:p>25,131</text:p>
          </table:table-cell>
          <table:table-cell table:style-name="ce12N2" office:value-type="float" office:value="134.5">
            <text:p>1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1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840.82">
            <text:p>84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385067000140550010000471651420518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6">
            <text:p>306526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232">
            <text:p>1,523</text:p>
          </table:table-cell>
          <table:table-cell table:style-name="ce12N2" office:value-type="float" office:value="272">
            <text:p>2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465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1642.6">
            <text:p>164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017340084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8">
            <text:p>306528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95">
            <text:p>0,071</text:p>
          </table:table-cell>
          <table:table-cell table:style-name="ce12N2" office:value-type="float" office:value="16.81">
            <text:p>1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4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97.91">
            <text:p>9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11454297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2">
            <text:p>306552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309.56">
            <text:p>98130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946237.05">
            <text:p>946237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3.070619">
            <text:p>53,071</text:p>
          </table:table-cell>
          <table:table-cell table:style-name="ce12N2" office:value-type="float" office:value="6522.54">
            <text:p>652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1.30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5072.51">
            <text:p>35072,51</text:p>
          </table:table-cell>
          <table:table-cell table:style-name="ce12N2" office:value-type="float" office:value="946237.05">
            <text:p>946237,05</text:p>
          </table:table-cell>
          <table:table-cell table:style-name="ce12N2" office:value-type="float" office:value="57537.74">
            <text:p>5753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21683519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4">
            <text:p>30656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7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96.77">
            <text:p>689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34232">
            <text:p>1,334</text:p>
          </table:table-cell>
          <table:table-cell table:style-name="ce12N2" office:value-type="float" office:value="257.3">
            <text:p>257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96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17.09">
            <text:p>217,09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267.19">
            <text:p>26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74314412013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6">
            <text:p>306706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482">
            <text:p>0,019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44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89.38">
            <text:p>89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423159702000118550010000210091159426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8">
            <text:p>30673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517.12">
            <text:p>4651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7684">
            <text:p>3,388</text:p>
          </table:table-cell>
          <table:table-cell table:style-name="ce12N2" office:value-type="float" office:value="521.03">
            <text:p>52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51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35.06">
            <text:p>635,06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2573.89">
            <text:p>257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6191248127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0">
            <text:p>306800</text:p>
          </table:table-cell>
          <table:table-cell table:style-name="ce0" table:number-columns-spanned="4" table:number-rows-spanned="1" office:value-type="string" calcext:value-type="string">
            <text:p>6.059 - TECNO-FLEX INDUSTRIA E COMERCIO LTDA</text:p>
          </table:table-cell>
          <table:covered-table-cell table:number-columns-repeated="3"/>
          <table:table-cell table:style-name="ce0" office:value-type="string" calcext:value-type="string">
            <text:p>50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22.13">
            <text:p>2232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11095">
            <text:p>26,111</text:p>
          </table:table-cell>
          <table:table-cell table:style-name="ce12N2" office:value-type="float" office:value="250.16">
            <text:p>25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322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702.63">
            <text:p>702,63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1513.37">
            <text:p>151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7039802000122550010000508131390370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2">
            <text:p>306812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870.93">
            <text:p>9587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58885">
            <text:p>7,959</text:p>
          </table:table-cell>
          <table:table-cell table:style-name="ce12N2" office:value-type="float" office:value="10340">
            <text:p>103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87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17.73">
            <text:p>3017,73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6499.72">
            <text:p>649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01015665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3">
            <text:p>306813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28.42">
            <text:p>1141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456">
            <text:p>3,275</text:p>
          </table:table-cell>
          <table:table-cell table:style-name="ce12N2" office:value-type="float" office:value="13000">
            <text:p>13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2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592.42">
            <text:p>3592,42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7737.52">
            <text:p>77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11015665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5">
            <text:p>30681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056.53">
            <text:p>9805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6816">
            <text:p>2,468</text:p>
          </table:table-cell>
          <table:table-cell table:style-name="ce12N2" office:value-type="float" office:value="7300">
            <text:p>73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056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86.53">
            <text:p>3086,53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6647.9">
            <text:p>664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21015665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9">
            <text:p>30683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1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3.25">
            <text:p>207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46.71">
            <text:p>1946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64">
            <text:p>0,057</text:p>
          </table:table-cell>
          <table:table-cell table:style-name="ce12N2" office:value-type="float" office:value="41.28">
            <text:p>4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26.54">
            <text:p>126,54</text:p>
          </table:table-cell>
          <table:table-cell table:style-name="ce12N2" office:value-type="float" office:value="1946.71">
            <text:p>1946,71</text:p>
          </table:table-cell>
          <table:table-cell table:style-name="ce12N2" office:value-type="float" office:value="77.87">
            <text:p>7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14431589225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7">
            <text:p>30684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1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1.62">
            <text:p>155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2.78">
            <text:p>1502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5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8.84">
            <text:p>48,84</text:p>
          </table:table-cell>
          <table:table-cell table:style-name="ce12N2" office:value-type="float" office:value="1502.78">
            <text:p>1502,78</text:p>
          </table:table-cell>
          <table:table-cell table:style-name="ce12N2" office:value-type="float" office:value="105.19">
            <text:p>10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14421570254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91">
            <text:p>306891</text:p>
          </table:table-cell>
          <table:table-cell table:style-name="ce0" table:number-columns-spanned="4" table:number-rows-spanned="1" office:value-type="string" calcext:value-type="string">
            <text:p>3.848 - HIDROSSOL IND. E COM. DE PLASTICOS LTDA.</text:p>
          </table:table-cell>
          <table:covered-table-cell table:number-columns-repeated="3"/>
          <table:table-cell table:style-name="ce0" office:value-type="string" calcext:value-type="string">
            <text:p>57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12312">
            <text:p>2,112</text:p>
          </table:table-cell>
          <table:table-cell table:style-name="ce12N2" office:value-type="float" office:value="764.31">
            <text:p>764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0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1323.32">
            <text:p>1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75045140001555500100005752919057529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20">
            <text:p>306920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4.022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71.57">
            <text:p>3837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33615">
            <text:p>2,934</text:p>
          </table:table-cell>
          <table:table-cell table:style-name="ce12N2" office:value-type="float" office:value="3392.82">
            <text:p>339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371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298.71">
            <text:p>298,71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1524.62">
            <text:p>152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2741051000185550550003040221675054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64">
            <text:p>306964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89.83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5">
            <text:p>0,001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6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78.83">
            <text:p>7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777131003473550050008898381431941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6">
            <text:p>30706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55.08">
            <text:p>685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55.08">
            <text:p>685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93292">
            <text:p>1,293</text:p>
          </table:table-cell>
          <table:table-cell table:style-name="ce12N2" office:value-type="float" office:value="376.21">
            <text:p>376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55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55.08">
            <text:p>6855,08</text:p>
          </table:table-cell>
          <table:table-cell table:style-name="ce12N2" office:value-type="float" office:value="479.86">
            <text:p>47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411350633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7">
            <text:p>30706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1.54">
            <text:p>377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71.54">
            <text:p>3771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96">
            <text:p>0,553</text:p>
          </table:table-cell>
          <table:table-cell table:style-name="ce12N2" office:value-type="float" office:value="180">
            <text:p>1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71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71.54">
            <text:p>3771,54</text:p>
          </table:table-cell>
          <table:table-cell table:style-name="ce12N2" office:value-type="float" office:value="264.01">
            <text:p>26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4010051908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8">
            <text:p>30706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9.44">
            <text:p>241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9.44">
            <text:p>241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6456">
            <text:p>0,456</text:p>
          </table:table-cell>
          <table:table-cell table:style-name="ce12N2" office:value-type="float" office:value="132.78">
            <text:p>132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9.44">
            <text:p>2419,44</text:p>
          </table:table-cell>
          <table:table-cell table:style-name="ce12N2" office:value-type="float" office:value="169.36">
            <text:p>16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391018201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9">
            <text:p>30706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6788">
            <text:p>0,347</text:p>
          </table:table-cell>
          <table:table-cell table:style-name="ce12N2" office:value-type="float" office:value="71.76">
            <text:p>7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92.74">
            <text:p>9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421014824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1">
            <text:p>307071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5.06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81.76">
            <text:p>342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33669.3">
            <text:p>3366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15998">
            <text:p>5,316</text:p>
          </table:table-cell>
          <table:table-cell table:style-name="ce12N2" office:value-type="float" office:value="740.61">
            <text:p>74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281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12.46">
            <text:p>612,46</text:p>
          </table:table-cell>
          <table:table-cell table:style-name="ce12N2" office:value-type="float" office:value="33669.3">
            <text:p>33669,30</text:p>
          </table:table-cell>
          <table:table-cell table:style-name="ce12N2" office:value-type="float" office:value="2057.24">
            <text:p>205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850661708155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4">
            <text:p>30707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4.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96.87">
            <text:p>4819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6679.78">
            <text:p>46679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8794">
            <text:p>0,319</text:p>
          </table:table-cell>
          <table:table-cell table:style-name="ce12N2" office:value-type="float" office:value="1291.05">
            <text:p>1291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196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517.09">
            <text:p>1517,09</text:p>
          </table:table-cell>
          <table:table-cell table:style-name="ce12N2" office:value-type="float" office:value="46679.78">
            <text:p>46679,78</text:p>
          </table:table-cell>
          <table:table-cell table:style-name="ce12N2" office:value-type="float" office:value="2909.39">
            <text:p>290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47951293807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1">
            <text:p>3070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3.49">
            <text:p>249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25.11">
            <text:p>2425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18">
            <text:p>0,091</text:p>
          </table:table-cell>
          <table:table-cell table:style-name="ce12N2" office:value-type="float" office:value="25.5">
            <text:p>25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93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2425.11">
            <text:p>2425,11</text:p>
          </table:table-cell>
          <table:table-cell table:style-name="ce12N2" office:value-type="float" office:value="169.75">
            <text:p>16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0511570260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7">
            <text:p>3070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2412">
            <text:p>0,092</text:p>
          </table:table-cell>
          <table:table-cell table:style-name="ce12N2" office:value-type="float" office:value="11.41">
            <text:p>1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99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433.98">
            <text:p>43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1139589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8">
            <text:p>3070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624">
            <text:p>0,006</text:p>
          </table:table-cell>
          <table:table-cell table:style-name="ce12N2" office:value-type="float" office:value="2.96">
            <text:p>2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2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117.08">
            <text:p>11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21799286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9">
            <text:p>3070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158.4">
            <text:p>15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158.4">
            <text:p>1515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">
            <text:p>0,036</text:p>
          </table:table-cell>
          <table:table-cell table:style-name="ce12N2" office:value-type="float" office:value="123.52">
            <text:p>12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15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30.81">
            <text:p>11130,81</text:p>
          </table:table-cell>
          <table:table-cell table:style-name="ce12N2" office:value-type="float" office:value="779.16">
            <text:p>77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317588986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0">
            <text:p>3070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86.95">
            <text:p>1038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53">
            <text:p>975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758">
            <text:p>3,076</text:p>
          </table:table-cell>
          <table:table-cell table:style-name="ce12N2" office:value-type="float" office:value="112.2">
            <text:p>1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8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33.95">
            <text:p>633,95</text:p>
          </table:table-cell>
          <table:table-cell table:style-name="ce12N2" office:value-type="float" office:value="9753">
            <text:p>9753,00</text:p>
          </table:table-cell>
          <table:table-cell table:style-name="ce12N2" office:value-type="float" office:value="390.12">
            <text:p>39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416360108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1">
            <text:p>3070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35">
            <text:p>0,015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366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1355.67">
            <text:p>1355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51165422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2">
            <text:p>3070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00.1">
            <text:p>1210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61.6">
            <text:p>113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504">
            <text:p>0,120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10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38.5">
            <text:p>738,50</text:p>
          </table:table-cell>
          <table:table-cell table:style-name="ce12N2" office:value-type="float" office:value="11361.6">
            <text:p>11361,60</text:p>
          </table:table-cell>
          <table:table-cell table:style-name="ce12N2" office:value-type="float" office:value="795.31">
            <text:p>79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610767865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3">
            <text:p>3070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592">
            <text:p>0,005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8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134.28">
            <text:p>134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718081381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4">
            <text:p>3070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59">
            <text:p>0,058</text:p>
          </table:table-cell>
          <table:table-cell table:style-name="ce12N2" office:value-type="float" office:value="33.61">
            <text:p>3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29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756.6">
            <text:p>7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81507891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5">
            <text:p>3070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26.6">
            <text:p>85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26.6">
            <text:p>852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5">
            <text:p>0,020</text:p>
          </table:table-cell>
          <table:table-cell table:style-name="ce12N2" office:value-type="float" office:value="69.48">
            <text:p>69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61.08">
            <text:p>6261,08</text:p>
          </table:table-cell>
          <table:table-cell table:style-name="ce12N2" office:value-type="float" office:value="438.28">
            <text:p>43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91582957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6">
            <text:p>3070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42.39">
            <text:p>1534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406">
            <text:p>1440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04">
            <text:p>0,074</text:p>
          </table:table-cell>
          <table:table-cell table:style-name="ce12N2" office:value-type="float" office:value="36.36">
            <text:p>36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342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36.39">
            <text:p>936,39</text:p>
          </table:table-cell>
          <table:table-cell table:style-name="ce12N2" office:value-type="float" office:value="14406">
            <text:p>14406,00</text:p>
          </table:table-cell>
          <table:table-cell table:style-name="ce12N2" office:value-type="float" office:value="1008.42">
            <text:p>100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51700246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7">
            <text:p>3070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5.93">
            <text:p>2910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182.8">
            <text:p>2818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334">
            <text:p>0,293</text:p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0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23.13">
            <text:p>923,13</text:p>
          </table:table-cell>
          <table:table-cell table:style-name="ce12N2" office:value-type="float" office:value="28182.8">
            <text:p>28182,80</text:p>
          </table:table-cell>
          <table:table-cell table:style-name="ce12N2" office:value-type="float" office:value="1972.8">
            <text:p>197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612840297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8">
            <text:p>3070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37.54">
            <text:p>453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60.6">
            <text:p>426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814">
            <text:p>0,045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3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276.94">
            <text:p>276,94</text:p>
          </table:table-cell>
          <table:table-cell table:style-name="ce12N2" office:value-type="float" office:value="4260.6">
            <text:p>4260,60</text:p>
          </table:table-cell>
          <table:table-cell table:style-name="ce12N2" office:value-type="float" office:value="298.24">
            <text:p>29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714842720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9">
            <text:p>307099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8.70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08">
            <text:p>559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08">
            <text:p>5590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7024">
            <text:p>0,570</text:p>
          </table:table-cell>
          <table:table-cell table:style-name="ce12N2" office:value-type="float" office:value="230.4">
            <text:p>23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08">
            <text:p>5590,08</text:p>
          </table:table-cell>
          <table:table-cell table:style-name="ce12N2" office:value-type="float" office:value="391.31">
            <text:p>39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87041743852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11">
            <text:p>307111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4.149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352.72">
            <text:p>4635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">
            <text:p>31,00</text:p>
          </table:table-cell>
          <table:table-cell table:style-name="ce12N2" office:value-type="float" office:value="45598.9">
            <text:p>4559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152523">
            <text:p>7,153</text:p>
          </table:table-cell>
          <table:table-cell table:style-name="ce12N2" office:value-type="float" office:value="8613.53">
            <text:p>861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35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53.82">
            <text:p>753,82</text:p>
          </table:table-cell>
          <table:table-cell table:style-name="ce12N2" office:value-type="float" office:value="45598.9">
            <text:p>45598,90</text:p>
          </table:table-cell>
          <table:table-cell table:style-name="ce12N2" office:value-type="float" office:value="1832.5">
            <text:p>183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2741051000185550550003041491306894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8">
            <text:p>30714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6.76">
            <text:p>103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69.54">
            <text:p>96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616">
            <text:p>0,054</text:p>
          </table:table-cell>
          <table:table-cell table:style-name="ce12N2" office:value-type="float" office:value="11.62">
            <text:p>1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3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7.22">
            <text:p>67,22</text:p>
          </table:table-cell>
          <table:table-cell table:style-name="ce12N2" office:value-type="float" office:value="969.54">
            <text:p>969,54</text:p>
          </table:table-cell>
          <table:table-cell table:style-name="ce12N2" office:value-type="float" office:value="67.87">
            <text:p>6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1315702955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9">
            <text:p>30714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6.45">
            <text:p>144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8.17">
            <text:p>1358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04">
            <text:p>0,041</text:p>
          </table:table-cell>
          <table:table-cell table:style-name="ce12N2" office:value-type="float" office:value="28.8">
            <text:p>2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6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88.28">
            <text:p>88,28</text:p>
          </table:table-cell>
          <table:table-cell table:style-name="ce12N2" office:value-type="float" office:value="1358.17">
            <text:p>1358,17</text:p>
          </table:table-cell>
          <table:table-cell table:style-name="ce12N2" office:value-type="float" office:value="54.33">
            <text:p>5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151589236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0">
            <text:p>307150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4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0.72">
            <text:p>37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5.32">
            <text:p>356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65">
            <text:p>0,137</text:p>
          </table:table-cell>
          <table:table-cell table:style-name="ce12N2" office:value-type="float" office:value="171.6">
            <text:p>1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85.4">
            <text:p>185,40</text:p>
          </table:table-cell>
          <table:table-cell table:style-name="ce12N2" office:value-type="float" office:value="3565.32">
            <text:p>3565,32</text:p>
          </table:table-cell>
          <table:table-cell table:style-name="ce12N2" office:value-type="float" office:value="249.57">
            <text:p>24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498719398157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1">
            <text:p>307151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4.9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68.74">
            <text:p>626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71.42">
            <text:p>6071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299.236">
            <text:p>21299,236</text:p>
          </table:table-cell>
          <table:table-cell table:style-name="ce12N2" office:value-type="float" office:value="207.81">
            <text:p>207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6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97.32">
            <text:p>197,32</text:p>
          </table:table-cell>
          <table:table-cell table:style-name="ce12N2" office:value-type="float" office:value="6071.42">
            <text:p>6071,42</text:p>
          </table:table-cell>
          <table:table-cell table:style-name="ce12N2" office:value-type="float" office:value="425">
            <text:p>4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498818391826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4">
            <text:p>307154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4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634.51">
            <text:p>5563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238.98">
            <text:p>52238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199">
            <text:p>1,720</text:p>
          </table:table-cell>
          <table:table-cell table:style-name="ce12N2" office:value-type="float" office:value="50">
            <text:p>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.63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395.53">
            <text:p>3395,53</text:p>
          </table:table-cell>
          <table:table-cell table:style-name="ce12N2" office:value-type="float" office:value="52238.98">
            <text:p>52238,98</text:p>
          </table:table-cell>
          <table:table-cell table:style-name="ce12N2" office:value-type="float" office:value="2089.56">
            <text:p>208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40391839776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5">
            <text:p>30715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9.28">
            <text:p>1230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1656.12">
            <text:p>11656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7161">
            <text:p>0,672</text:p>
          </table:table-cell>
          <table:table-cell table:style-name="ce12N2" office:value-type="float" office:value="143.71">
            <text:p>143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0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53.16">
            <text:p>653,16</text:p>
          </table:table-cell>
          <table:table-cell table:style-name="ce12N2" office:value-type="float" office:value="11656.12">
            <text:p>11656,12</text:p>
          </table:table-cell>
          <table:table-cell table:style-name="ce12N2" office:value-type="float" office:value="815.92">
            <text:p>81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091570355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8">
            <text:p>30715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98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89.75">
            <text:p>288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52.4">
            <text:p>275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73">
            <text:p>0,055</text:p>
          </table:table-cell>
          <table:table-cell table:style-name="ce12N2" office:value-type="float" office:value="32.57">
            <text:p>32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89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37.35">
            <text:p>137,35</text:p>
          </table:table-cell>
          <table:table-cell table:style-name="ce12N2" office:value-type="float" office:value="2752.4">
            <text:p>2752,40</text:p>
          </table:table-cell>
          <table:table-cell table:style-name="ce12N2" office:value-type="float" office:value="192.67">
            <text:p>19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9851651758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0">
            <text:p>30716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9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5.52">
            <text:p>352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377.7">
            <text:p>337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06">
            <text:p>0,035</text:p>
          </table:table-cell>
          <table:table-cell table:style-name="ce12N2" office:value-type="float" office:value="4.21">
            <text:p>4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25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47.82">
            <text:p>147,82</text:p>
          </table:table-cell>
          <table:table-cell table:style-name="ce12N2" office:value-type="float" office:value="3377.7">
            <text:p>3377,70</text:p>
          </table:table-cell>
          <table:table-cell table:style-name="ce12N2" office:value-type="float" office:value="236.44">
            <text:p>23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98718625095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4">
            <text:p>307164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7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85">
            <text:p>3,948</text:p>
          </table:table-cell>
          <table:table-cell table:style-name="ce12N2" office:value-type="float" office:value="1124.8">
            <text:p>1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0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2733.36">
            <text:p>273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827610000142550010000675741814316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4">
            <text:p>30718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4775">
            <text:p>1,648</text:p>
          </table:table-cell>
          <table:table-cell table:style-name="ce12N2" office:value-type="float" office:value="299.7">
            <text:p>29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81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1316.93">
            <text:p>131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41805086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5">
            <text:p>30718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591">
            <text:p>0,659</text:p>
          </table:table-cell>
          <table:table-cell table:style-name="ce12N2" office:value-type="float" office:value="119.88">
            <text:p>119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25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526.77">
            <text:p>52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51093286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6">
            <text:p>3071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62494">
            <text:p>11,625</text:p>
          </table:table-cell>
          <table:table-cell table:style-name="ce12N2" office:value-type="float" office:value="4137.72">
            <text:p>41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32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5341.03">
            <text:p>534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71888472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7">
            <text:p>30718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4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1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281.23">
            <text:p>28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4601465598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8">
            <text:p>30718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86.85">
            <text:p>2378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00">
            <text:p>3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78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48.74">
            <text:p>748,74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1612.67">
            <text:p>161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41584130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9">
            <text:p>30718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49.06">
            <text:p>2404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75">
            <text:p>327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4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72.03">
            <text:p>772,03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1622.23">
            <text:p>162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61568490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4">
            <text:p>30721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0.09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52">
            <text:p>0,367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10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182.74">
            <text:p>18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0098175720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0">
            <text:p>3072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107.95">
            <text:p>10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415303875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3">
            <text:p>30722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3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192.72">
            <text:p>19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01044736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5">
            <text:p>30722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63.62">
            <text:p>6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6142473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6">
            <text:p>3072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8">
            <text:p>0,003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215.89">
            <text:p>215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31559226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7">
            <text:p>3072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52">
            <text:p>0,001</text:p>
          </table:table-cell>
          <table:table-cell table:style-name="ce12N2" office:value-type="float" office:value="9.65">
            <text:p>9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590.32">
            <text:p>59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91857476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8">
            <text:p>307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8">
            <text:p>0,000</text:p>
          </table:table-cell>
          <table:table-cell table:style-name="ce12N2" office:value-type="float" office:value="3.89">
            <text:p>3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05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189.4">
            <text:p>18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21807035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9">
            <text:p>30722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4.3">
            <text:p>316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1.17">
            <text:p>297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656">
            <text:p>0,047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93.13">
            <text:p>193,13</text:p>
          </table:table-cell>
          <table:table-cell table:style-name="ce12N2" office:value-type="float" office:value="2971.17">
            <text:p>2971,17</text:p>
          </table:table-cell>
          <table:table-cell table:style-name="ce12N2" office:value-type="float" office:value="118.85">
            <text:p>11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811277077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0">
            <text:p>3072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205.07">
            <text:p>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11819923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2">
            <text:p>3072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2.45">
            <text:p>424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3.52">
            <text:p>398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056">
            <text:p>0,012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58.93">
            <text:p>258,93</text:p>
          </table:table-cell>
          <table:table-cell table:style-name="ce12N2" office:value-type="float" office:value="3983.52">
            <text:p>3983,52</text:p>
          </table:table-cell>
          <table:table-cell table:style-name="ce12N2" office:value-type="float" office:value="278.85">
            <text:p>27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91687859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3">
            <text:p>3072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63.67">
            <text:p>636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75.28">
            <text:p>59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84">
            <text:p>0,018</text:p>
          </table:table-cell>
          <table:table-cell table:style-name="ce12N2" office:value-type="float" office:value="7.06">
            <text:p>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63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88.39">
            <text:p>388,39</text:p>
          </table:table-cell>
          <table:table-cell table:style-name="ce12N2" office:value-type="float" office:value="5975.28">
            <text:p>5975,28</text:p>
          </table:table-cell>
          <table:table-cell table:style-name="ce12N2" office:value-type="float" office:value="418.27">
            <text:p>41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819941113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4">
            <text:p>3072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4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117.9">
            <text:p>11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51611884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6">
            <text:p>3072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26">
            <text:p>0,001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2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289.07">
            <text:p>28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71533603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7">
            <text:p>3072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2">
            <text:p>0,001</text:p>
          </table:table-cell>
          <table:table-cell table:style-name="ce12N2" office:value-type="float" office:value="15.55">
            <text:p>1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9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797.45">
            <text:p>79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313228677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8">
            <text:p>3072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5.34">
            <text:p>96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6.42">
            <text:p>906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28">
            <text:p>0,005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5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58.92">
            <text:p>58,92</text:p>
          </table:table-cell>
          <table:table-cell table:style-name="ce12N2" office:value-type="float" office:value="906.42">
            <text:p>906,42</text:p>
          </table:table-cell>
          <table:table-cell table:style-name="ce12N2" office:value-type="float" office:value="63.45">
            <text:p>6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710700137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9">
            <text:p>3072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02">
            <text:p>0,060</text:p>
          </table:table-cell>
          <table:table-cell table:style-name="ce12N2" office:value-type="float" office:value="36.35">
            <text:p>36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812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1526.85">
            <text:p>152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01617954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0">
            <text:p>3072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782.27">
            <text:p>43478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433693.99">
            <text:p>433693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679331">
            <text:p>17,679</text:p>
          </table:table-cell>
          <table:table-cell table:style-name="ce12N2" office:value-type="float" office:value="1691.18">
            <text:p>169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4.782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088.28">
            <text:p>1088,28</text:p>
          </table:table-cell>
          <table:table-cell table:style-name="ce12N2" office:value-type="float" office:value="430570.54">
            <text:p>430570,54</text:p>
          </table:table-cell>
          <table:table-cell table:style-name="ce12N2" office:value-type="float" office:value="25868.84">
            <text:p>2586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91906483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1">
            <text:p>3072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">
            <text:p>0,001</text:p>
          </table:table-cell>
          <table:table-cell table:style-name="ce12N2" office:value-type="float" office:value="50.85">
            <text:p>50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508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2065.61">
            <text:p>206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119268481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6">
            <text:p>30724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0.6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71.78">
            <text:p>10637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06243.6">
            <text:p>10624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413816">
            <text:p>7,414</text:p>
          </table:table-cell>
          <table:table-cell table:style-name="ce12N2" office:value-type="float" office:value="3329.13">
            <text:p>3329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.371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28.18">
            <text:p>128,18</text:p>
          </table:table-cell>
          <table:table-cell table:style-name="ce12N2" office:value-type="float" office:value="106243.6">
            <text:p>106243,60</text:p>
          </table:table-cell>
          <table:table-cell table:style-name="ce12N2" office:value-type="float" office:value="6817.63">
            <text:p>681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06791202127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7">
            <text:p>30724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96.46">
            <text:p>1689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364.61">
            <text:p>16364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3408">
            <text:p>0,663</text:p>
          </table:table-cell>
          <table:table-cell table:style-name="ce12N2" office:value-type="float" office:value="243.9">
            <text:p>2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9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531.85">
            <text:p>531,85</text:p>
          </table:table-cell>
          <table:table-cell table:style-name="ce12N2" office:value-type="float" office:value="16364.61">
            <text:p>16364,61</text:p>
          </table:table-cell>
          <table:table-cell table:style-name="ce12N2" office:value-type="float" office:value="1145.52">
            <text:p>114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015711347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8">
            <text:p>30724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63.3">
            <text:p>1026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40.24">
            <text:p>994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9232">
            <text:p>0,389</text:p>
          </table:table-cell>
          <table:table-cell table:style-name="ce12N2" office:value-type="float" office:value="143.1">
            <text:p>14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6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23.06">
            <text:p>323,06</text:p>
          </table:table-cell>
          <table:table-cell table:style-name="ce12N2" office:value-type="float" office:value="9940.24">
            <text:p>9940,24</text:p>
          </table:table-cell>
          <table:table-cell table:style-name="ce12N2" office:value-type="float" office:value="695.82">
            <text:p>695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21571134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9">
            <text:p>30724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2.12">
            <text:p>542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51.45">
            <text:p>5251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632">
            <text:p>0,206</text:p>
          </table:table-cell>
          <table:table-cell table:style-name="ce12N2" office:value-type="float" office:value="75.6">
            <text:p>7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22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70.67">
            <text:p>170,67</text:p>
          </table:table-cell>
          <table:table-cell table:style-name="ce12N2" office:value-type="float" office:value="5251.45">
            <text:p>5251,45</text:p>
          </table:table-cell>
          <table:table-cell table:style-name="ce12N2" office:value-type="float" office:value="367.6">
            <text:p>3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615711347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6">
            <text:p>307266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1.2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002.38">
            <text:p>20500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203736.89">
            <text:p>203736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3.74442">
            <text:p>283,744</text:p>
          </table:table-cell>
          <table:table-cell table:style-name="ce12N2" office:value-type="float" office:value="4482">
            <text:p>448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5.00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265.49">
            <text:p>1265,49</text:p>
          </table:table-cell>
          <table:table-cell table:style-name="ce12N2" office:value-type="float" office:value="203736.89">
            <text:p>203736,89</text:p>
          </table:table-cell>
          <table:table-cell table:style-name="ce12N2" office:value-type="float" office:value="13924.14">
            <text:p>1392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150751009135550010005612691904040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7">
            <text:p>30726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1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44.2">
            <text:p>394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625.47">
            <text:p>3625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969">
            <text:p>0,006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4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87">
            <text:p>54,8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18.73">
            <text:p>318,73</text:p>
          </table:table-cell>
          <table:table-cell table:style-name="ce12N2" office:value-type="float" office:value="3625.47">
            <text:p>3625,47</text:p>
          </table:table-cell>
          <table:table-cell table:style-name="ce12N2" office:value-type="float" office:value="229.32">
            <text:p>22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1610614618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0">
            <text:p>3072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16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6.93">
            <text:p>315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64.25">
            <text:p>296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9">
            <text:p>0,002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6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92.68">
            <text:p>192,68</text:p>
          </table:table-cell>
          <table:table-cell table:style-name="ce12N2" office:value-type="float" office:value="2964.25">
            <text:p>2964,25</text:p>
          </table:table-cell>
          <table:table-cell table:style-name="ce12N2" office:value-type="float" office:value="207.5">
            <text:p>20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1671337729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4">
            <text:p>30727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0.09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5366">
            <text:p>4,054</text:p>
          </table:table-cell>
          <table:table-cell table:style-name="ce12N2" office:value-type="float" office:value="869">
            <text:p>86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9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2043.48">
            <text:p>204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00991380246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9">
            <text:p>307279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3.2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03.95">
            <text:p>2410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912.5">
            <text:p>2291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">
            <text:p>0,520</text:p>
          </table:table-cell>
          <table:table-cell table:style-name="ce12N2" office:value-type="float" office:value="16.25">
            <text:p>1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0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191.45">
            <text:p>1191,45</text:p>
          </table:table-cell>
          <table:table-cell table:style-name="ce12N2" office:value-type="float" office:value="22912.5">
            <text:p>22912,50</text:p>
          </table:table-cell>
          <table:table-cell table:style-name="ce12N2" office:value-type="float" office:value="1603.88">
            <text:p>160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327611000128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1">
            <text:p>3072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1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153.96">
            <text:p>4315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795.6">
            <text:p>4179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4">
            <text:p>0,046</text:p>
          </table:table-cell>
          <table:table-cell table:style-name="ce12N2" office:value-type="float" office:value="17.28">
            <text:p>17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15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358.36">
            <text:p>1358,36</text:p>
          </table:table-cell>
          <table:table-cell table:style-name="ce12N2" office:value-type="float" office:value="41795.6">
            <text:p>41795,60</text:p>
          </table:table-cell>
          <table:table-cell table:style-name="ce12N2" office:value-type="float" office:value="2925.69">
            <text:p>292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151736654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5">
            <text:p>307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052">
            <text:p>0,074</text:p>
          </table:table-cell>
          <table:table-cell table:style-name="ce12N2" office:value-type="float" office:value="87.34">
            <text:p>8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37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1455">
            <text:p>14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8105097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8">
            <text:p>307298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5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0.48">
            <text:p>783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52">
            <text:p>1,152</text:p>
          </table:table-cell>
          <table:table-cell table:style-name="ce12N2" office:value-type="float" office:value="864">
            <text:p>8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46.48">
            <text:p>246,48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530.88">
            <text:p>53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55581194099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6">
            <text:p>307316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4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070.1">
            <text:p>15507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5070.1">
            <text:p>15507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3.6909">
            <text:p>223,691</text:p>
          </table:table-cell>
          <table:table-cell table:style-name="ce12N2" office:value-type="float" office:value="3083.2">
            <text:p>308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.07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5070.1">
            <text:p>155070,10</text:p>
          </table:table-cell>
          <table:table-cell table:style-name="ce12N2" office:value-type="float" office:value="10854.91">
            <text:p>1085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458514328658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4">
            <text:p>3073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6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75">
            <text:p>0,127</text:p>
          </table:table-cell>
          <table:table-cell table:style-name="ce12N2" office:value-type="float" office:value="135.4">
            <text:p>13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75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3343.17">
            <text:p>334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6841818745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7">
            <text:p>307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544">
            <text:p>0,021</text:p>
          </table:table-cell>
          <table:table-cell table:style-name="ce12N2" office:value-type="float" office:value="4.28">
            <text:p>4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2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156.07">
            <text:p>15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041084287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9">
            <text:p>307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46">
            <text:p>0,125</text:p>
          </table:table-cell>
          <table:table-cell table:style-name="ce12N2" office:value-type="float" office:value="28.5">
            <text:p>2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0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1404.34">
            <text:p>140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301349019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5">
            <text:p>30733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7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4.35">
            <text:p>118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47.07">
            <text:p>1147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76">
            <text:p>0,020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4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7.28">
            <text:p>37,28</text:p>
          </table:table-cell>
          <table:table-cell table:style-name="ce12N2" office:value-type="float" office:value="1147.07">
            <text:p>1147,07</text:p>
          </table:table-cell>
          <table:table-cell table:style-name="ce12N2" office:value-type="float" office:value="80.29">
            <text:p>8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7501570337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6">
            <text:p>307336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3.86">
            <text:p>171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1.6">
            <text:p>15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08">
            <text:p>0,094</text:p>
          </table:table-cell>
          <table:table-cell table:style-name="ce12N2" office:value-type="float" office:value="15.68">
            <text:p>1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3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2.26">
            <text:p>152,26</text:p>
          </table:table-cell>
          <table:table-cell table:style-name="ce12N2" office:value-type="float" office:value="1561.6">
            <text:p>1561,60</text:p>
          </table:table-cell>
          <table:table-cell table:style-name="ce12N2" office:value-type="float" office:value="109.31">
            <text:p>10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75515815482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7">
            <text:p>307337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3.6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16.32">
            <text:p>2111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9075.02">
            <text:p>19075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82057">
            <text:p>1,182</text:p>
          </table:table-cell>
          <table:table-cell table:style-name="ce12N2" office:value-type="float" office:value="310.91">
            <text:p>310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11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912.37">
            <text:p>912,37</text:p>
          </table:table-cell>
          <table:table-cell table:style-name="ce12N2" office:value-type="float" office:value="18771.12">
            <text:p>18771,12</text:p>
          </table:table-cell>
          <table:table-cell table:style-name="ce12N2" office:value-type="float" office:value="783.29">
            <text:p>78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298.96">
            <text:p>6298,96</text:p>
          </table:table-cell>
          <table:table-cell table:style-name="ce12N2" office:value-type="float" office:value="1128.93">
            <text:p>1128,93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366013927242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0">
            <text:p>307340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3.6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74.94">
            <text:p>66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45">
            <text:p>63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">
            <text:p>0,144</text:p>
          </table:table-cell>
          <table:table-cell table:style-name="ce12N2" office:value-type="float" office:value="4.5">
            <text:p>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74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29.94">
            <text:p>329,94</text:p>
          </table:table-cell>
          <table:table-cell table:style-name="ce12N2" office:value-type="float" office:value="6345">
            <text:p>6345,00</text:p>
          </table:table-cell>
          <table:table-cell table:style-name="ce12N2" office:value-type="float" office:value="444.15">
            <text:p>44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36781100018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5">
            <text:p>30734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26.85">
            <text:p>1682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6297.19">
            <text:p>16297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502">
            <text:p>0,050</text:p>
          </table:table-cell>
          <table:table-cell table:style-name="ce12N2" office:value-type="float" office:value="107.16">
            <text:p>107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2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529.66">
            <text:p>529,66</text:p>
          </table:table-cell>
          <table:table-cell table:style-name="ce12N2" office:value-type="float" office:value="16297.19">
            <text:p>16297,19</text:p>
          </table:table-cell>
          <table:table-cell table:style-name="ce12N2" office:value-type="float" office:value="1140.81">
            <text:p>114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0411455403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6">
            <text:p>307346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.31">
            <text:p>91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5">
            <text:p>88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">
            <text:p>0,000</text:p>
          </table:table-cell>
          <table:table-cell table:style-name="ce12N2" office:value-type="float" office:value="9.7">
            <text:p>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5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886.5">
            <text:p>886,50</text:p>
          </table:table-cell>
          <table:table-cell table:style-name="ce12N2" office:value-type="float" office:value="62.06">
            <text:p>6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0421111596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9">
            <text:p>30734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3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73">
            <text:p>0,025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7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460.37">
            <text:p>46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351909237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1">
            <text:p>307351</text:p>
          </table:table-cell>
          <table:table-cell table:style-name="ce0" table:number-columns-spanned="4" table:number-rows-spanned="1" office:value-type="string" calcext:value-type="string">
            <text:p>29.857 - J.H. DE OLIVEIRA FABRICACAO DE MANGUEIRAS LTDA</text:p>
          </table:table-cell>
          <table:covered-table-cell table:number-columns-repeated="3"/>
          <table:table-cell table:style-name="ce0" office:value-type="string" calcext:value-type="string">
            <text:p>6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92">
            <text:p>1939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392">
            <text:p>1939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5.7469">
            <text:p>75,747</text:p>
          </table:table-cell>
          <table:table-cell table:style-name="ce12N2" office:value-type="float" office:value="1472">
            <text:p>14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39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92">
            <text:p>19392,00</text:p>
          </table:table-cell>
          <table:table-cell table:style-name="ce12N2" office:value-type="float" office:value="733.02">
            <text:p>73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20482520001165500100000067515047175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4">
            <text:p>30735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46">
            <text:p>0,049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5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920.74">
            <text:p>92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361597315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5">
            <text:p>3073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4">
            <text:p>417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74">
            <text:p>417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26">
            <text:p>0,036</text:p>
          </table:table-cell>
          <table:table-cell table:style-name="ce12N2" office:value-type="float" office:value="24.4">
            <text:p>2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7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74">
            <text:p>4174,00</text:p>
          </table:table-cell>
          <table:table-cell table:style-name="ce12N2" office:value-type="float" office:value="292.18">
            <text:p>29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441969649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3">
            <text:p>3073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1.37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2">
            <text:p>4,42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4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1784.3">
            <text:p>178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13741092917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4">
            <text:p>307374</text:p>
          </table:table-cell>
          <table:table-cell table:style-name="ce0" table:number-columns-spanned="4" table:number-rows-spanned="1" office:value-type="string" calcext:value-type="string">
            <text:p>29.615 - TENASTEEL INDUSTRIA E COMERCIO LTDA</text:p>
          </table:table-cell>
          <table:covered-table-cell table:number-columns-repeated="3"/>
          <table:table-cell table:style-name="ce0" office:value-type="string" calcext:value-type="string">
            <text:p>9.05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57.55">
            <text:p>1955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8801.4">
            <text:p>1880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159">
            <text:p>0,292</text:p>
          </table:table-cell>
          <table:table-cell table:style-name="ce12N2" office:value-type="float" office:value="743.76">
            <text:p>74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557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.42">
            <text:p>47,4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756.15">
            <text:p>756,15</text:p>
          </table:table-cell>
          <table:table-cell table:style-name="ce12N2" office:value-type="float" office:value="18801.4">
            <text:p>18801,40</text:p>
          </table:table-cell>
          <table:table-cell table:style-name="ce12N2" office:value-type="float" office:value="1316.09">
            <text:p>131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14048772000108550040000090551139587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7">
            <text:p>307377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477.2">
            <text:p>1347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477.2">
            <text:p>1347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898">
            <text:p>0,890</text:p>
          </table:table-cell>
          <table:table-cell table:style-name="ce12N2" office:value-type="float" office:value="59.52">
            <text:p>5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47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77.2">
            <text:p>13477,20</text:p>
          </table:table-cell>
          <table:table-cell table:style-name="ce12N2" office:value-type="float" office:value="943.4">
            <text:p>94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22913200355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9">
            <text:p>307379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0.0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18.02">
            <text:p>1811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18.02">
            <text:p>18118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421416">
            <text:p>12,421</text:p>
          </table:table-cell>
          <table:table-cell table:style-name="ce12N2" office:value-type="float" office:value="4128.05">
            <text:p>412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118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18.02">
            <text:p>18118,02</text:p>
          </table:table-cell>
          <table:table-cell table:style-name="ce12N2" office:value-type="float" office:value="2174.16">
            <text:p>217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6006219909902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0">
            <text:p>307380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0.0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53.54">
            <text:p>10015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0153.54">
            <text:p>10015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33.52985">
            <text:p>433,530</text:p>
          </table:table-cell>
          <table:table-cell table:style-name="ce12N2" office:value-type="float" office:value="19912.63">
            <text:p>19912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0.15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53.54">
            <text:p>100153,54</text:p>
          </table:table-cell>
          <table:table-cell table:style-name="ce12N2" office:value-type="float" office:value="12018.43">
            <text:p>1201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6006119037605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3">
            <text:p>3073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26">
            <text:p>0,019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49.29">
            <text:p>4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419457750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4">
            <text:p>3073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84">
            <text:p>0,001</text:p>
          </table:table-cell>
          <table:table-cell table:style-name="ce12N2" office:value-type="float" office:value="30.51">
            <text:p>3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0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1239.37">
            <text:p>123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516079230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5">
            <text:p>3073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32">
            <text:p>0,001</text:p>
          </table:table-cell>
          <table:table-cell table:style-name="ce12N2" office:value-type="float" office:value="23.73">
            <text:p>23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7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963.95">
            <text:p>96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61828839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7">
            <text:p>3073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48">
            <text:p>0,006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1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44.57">
            <text:p>44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81357376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8">
            <text:p>3073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0.29">
            <text:p>0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91827152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0">
            <text:p>307390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2.9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76.69">
            <text:p>6437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61795.15">
            <text:p>61795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230413">
            <text:p>14,230</text:p>
          </table:table-cell>
          <table:table-cell table:style-name="ce12N2" office:value-type="float" office:value="491.4">
            <text:p>49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376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88">
            <text:p>54,8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2581.54">
            <text:p>2581,54</text:p>
          </table:table-cell>
          <table:table-cell table:style-name="ce12N2" office:value-type="float" office:value="59923.43">
            <text:p>59923,43</text:p>
          </table:table-cell>
          <table:table-cell table:style-name="ce12N2" office:value-type="float" office:value="3000.7">
            <text:p>300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29491488662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8">
            <text:p>3073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6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2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24.64">
            <text:p>2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491462833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9">
            <text:p>3073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78">
            <text:p>0,058</text:p>
          </table:table-cell>
          <table:table-cell table:style-name="ce12N2" office:value-type="float" office:value="9.91">
            <text:p>9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147.87">
            <text:p>1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01180872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0">
            <text:p>3074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016">
            <text:p>0,119</text:p>
          </table:table-cell>
          <table:table-cell table:style-name="ce12N2" office:value-type="float" office:value="56.34">
            <text:p>56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209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1554.68">
            <text:p>155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11902782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1">
            <text:p>307401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68.7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7.36">
            <text:p>352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86.1">
            <text:p>338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55">
            <text:p>0,078</text:p>
          </table:table-cell>
          <table:table-cell table:style-name="ce12N2" office:value-type="float" office:value="21.88">
            <text:p>2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2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41.26">
            <text:p>141,26</text:p>
          </table:table-cell>
          <table:table-cell table:style-name="ce12N2" office:value-type="float" office:value="3386.1">
            <text:p>3386,10</text:p>
          </table:table-cell>
          <table:table-cell table:style-name="ce12N2" office:value-type="float" office:value="233.98">
            <text:p>23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33064262000250550010002687471205163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3">
            <text:p>30740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1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9.43">
            <text:p>266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2.39">
            <text:p>2482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436">
            <text:p>0,041</text:p>
          </table:table-cell>
          <table:table-cell table:style-name="ce12N2" office:value-type="float" office:value="24.17">
            <text:p>24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87.04">
            <text:p>187,04</text:p>
          </table:table-cell>
          <table:table-cell table:style-name="ce12N2" office:value-type="float" office:value="2482.39">
            <text:p>2482,39</text:p>
          </table:table-cell>
          <table:table-cell table:style-name="ce12N2" office:value-type="float" office:value="173.77">
            <text:p>17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1011570291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0">
            <text:p>307430</text:p>
          </table:table-cell>
          <table:table-cell table:style-name="ce0" table:number-columns-spanned="4" table:number-rows-spanned="1" office:value-type="string" calcext:value-type="string">
            <text:p>16.329 - CSM-COMPONENTES SISTEMAS E MAQUINAS PARA CONSTRUCAO LTD</text:p>
          </table:table-cell>
          <table:covered-table-cell table:number-columns-repeated="3"/>
          <table:table-cell table:style-name="ce0" office:value-type="string" calcext:value-type="string">
            <text:p>368.7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76">
            <text:p>827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776">
            <text:p>8277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7.053904">
            <text:p>57,054</text:p>
          </table:table-cell>
          <table:table-cell table:style-name="ce12N2" office:value-type="float" office:value="4260">
            <text:p>42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7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82.42">
            <text:p>60782,42</text:p>
          </table:table-cell>
          <table:table-cell table:style-name="ce12N2" office:value-type="float" office:value="4254.77">
            <text:p>425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68405370001215500100036875710455714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4">
            <text:p>30743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4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3.4">
            <text:p>843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05.72">
            <text:p>780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9048">
            <text:p>0,489</text:p>
          </table:table-cell>
          <table:table-cell table:style-name="ce12N2" office:value-type="float" office:value="69.4">
            <text:p>6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627.68">
            <text:p>627,68</text:p>
          </table:table-cell>
          <table:table-cell table:style-name="ce12N2" office:value-type="float" office:value="7805.72">
            <text:p>7805,72</text:p>
          </table:table-cell>
          <table:table-cell table:style-name="ce12N2" office:value-type="float" office:value="312.23">
            <text:p>31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410080034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5">
            <text:p>307435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8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54.54">
            <text:p>1585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86.56">
            <text:p>13786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6">
            <text:p>0,015</text:p>
          </table:table-cell>
          <table:table-cell table:style-name="ce12N2" office:value-type="float" office:value="0.48">
            <text:p>0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85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067.98">
            <text:p>2067,98</text:p>
          </table:table-cell>
          <table:table-cell table:style-name="ce12N2" office:value-type="float" office:value="13786.56">
            <text:p>13786,56</text:p>
          </table:table-cell>
          <table:table-cell table:style-name="ce12N2" office:value-type="float" office:value="965.06">
            <text:p>96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810007985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6">
            <text:p>30743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7.5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3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31996">
            <text:p>7,932</text:p>
          </table:table-cell>
          <table:table-cell table:style-name="ce12N2" office:value-type="float" office:value="1295.38">
            <text:p>129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886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3251.68">
            <text:p>325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75991998297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7">
            <text:p>307437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7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98.4">
            <text:p>1749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7498.4">
            <text:p>1749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1156">
            <text:p>0,712</text:p>
          </table:table-cell>
          <table:table-cell table:style-name="ce12N2" office:value-type="float" office:value="41.14">
            <text:p>41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9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498.4">
            <text:p>17498,40</text:p>
          </table:table-cell>
          <table:table-cell table:style-name="ce12N2" office:value-type="float" office:value="1224.88">
            <text:p>122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710078338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8">
            <text:p>307438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7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5.5">
            <text:p>557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00">
            <text:p>54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4">
            <text:p>1,44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">
            <text:p>5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75.5">
            <text:p>175,50</text:p>
          </table:table-cell>
          <table:table-cell table:style-name="ce12N2" office:value-type="float" office:value="5400">
            <text:p>5400,00</text:p>
          </table:table-cell>
          <table:table-cell table:style-name="ce12N2" office:value-type="float" office:value="378">
            <text:p>37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74011259290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0">
            <text:p>30744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5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34">
            <text:p>0,053</text:p>
          </table:table-cell>
          <table:table-cell table:style-name="ce12N2" office:value-type="float" office:value="26.86">
            <text:p>26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9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594.73">
            <text:p>59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5711504332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1">
            <text:p>30744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7.9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58.25">
            <text:p>5115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158.25">
            <text:p>51158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.6888">
            <text:p>42,689</text:p>
          </table:table-cell>
          <table:table-cell table:style-name="ce12N2" office:value-type="float" office:value="2268.22">
            <text:p>2268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.15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58.25">
            <text:p>51158,25</text:p>
          </table:table-cell>
          <table:table-cell table:style-name="ce12N2" office:value-type="float" office:value="3581.08">
            <text:p>358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797313890493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2">
            <text:p>30744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7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861.5">
            <text:p>5686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861.5">
            <text:p>5686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1.7055">
            <text:p>61,706</text:p>
          </table:table-cell>
          <table:table-cell table:style-name="ce12N2" office:value-type="float" office:value="5025.8">
            <text:p>502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86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861.5">
            <text:p>56861,50</text:p>
          </table:table-cell>
          <table:table-cell table:style-name="ce12N2" office:value-type="float" office:value="3980.31">
            <text:p>398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79831648881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5">
            <text:p>3074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28">
            <text:p>0,002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.21">
            <text:p>234,21</text:p>
          </table:table-cell>
          <table:table-cell table:style-name="ce12N2" office:value-type="float" office:value="16.39">
            <text:p>16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51599363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6">
            <text:p>3074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224">
            <text:p>0,013</text:p>
          </table:table-cell>
          <table:table-cell table:style-name="ce12N2" office:value-type="float" office:value="6.26">
            <text:p>6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67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172.74">
            <text:p>17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617416353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7">
            <text:p>3074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836">
            <text:p>0,198</text:p>
          </table:table-cell>
          <table:table-cell table:style-name="ce12N2" office:value-type="float" office:value="93.9">
            <text:p>9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01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2591.13">
            <text:p>259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71798311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8">
            <text:p>3074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84">
            <text:p>0,002</text:p>
          </table:table-cell>
          <table:table-cell table:style-name="ce12N2" office:value-type="float" office:value="2.69">
            <text:p>2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75.05">
            <text:p>7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811667505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9">
            <text:p>3074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831.73">
            <text:p>450831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">
            <text:p>91,00</text:p>
          </table:table-cell>
          <table:table-cell table:style-name="ce12N2" office:value-type="float" office:value="448672.28">
            <text:p>448672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811394">
            <text:p>17,811</text:p>
          </table:table-cell>
          <table:table-cell table:style-name="ce12N2" office:value-type="float" office:value="1457.6">
            <text:p>145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0.831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159.45">
            <text:p>2159,45</text:p>
          </table:table-cell>
          <table:table-cell table:style-name="ce12N2" office:value-type="float" office:value="442130.72">
            <text:p>442130,72</text:p>
          </table:table-cell>
          <table:table-cell table:style-name="ce12N2" office:value-type="float" office:value="27913.85">
            <text:p>279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91479097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0">
            <text:p>307450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56.8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4.37">
            <text:p>115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3.92">
            <text:p>108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5926">
            <text:p>0,086</text:p>
          </table:table-cell>
          <table:table-cell table:style-name="ce12N2" office:value-type="float" office:value="13.08">
            <text:p>13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70.45">
            <text:p>70,45</text:p>
          </table:table-cell>
          <table:table-cell table:style-name="ce12N2" office:value-type="float" office:value="1083.92">
            <text:p>1083,92</text:p>
          </table:table-cell>
          <table:table-cell table:style-name="ce12N2" office:value-type="float" office:value="75.87">
            <text:p>7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568821219493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1">
            <text:p>307451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56.8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6.84">
            <text:p>303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51.5">
            <text:p>285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6912">
            <text:p>0,277</text:p>
          </table:table-cell>
          <table:table-cell table:style-name="ce12N2" office:value-type="float" office:value="34.44">
            <text:p>3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36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85.34">
            <text:p>185,34</text:p>
          </table:table-cell>
          <table:table-cell table:style-name="ce12N2" office:value-type="float" office:value="2851.5">
            <text:p>2851,50</text:p>
          </table:table-cell>
          <table:table-cell table:style-name="ce12N2" office:value-type="float" office:value="199.6">
            <text:p>19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5688012995634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2">
            <text:p>30745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4.18">
            <text:p>122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2">
            <text:p>0,067</text:p>
          </table:table-cell>
          <table:table-cell table:style-name="ce12N2" office:value-type="float" office:value="11.2">
            <text:p>1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4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8.75">
            <text:p>108,75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78.08">
            <text:p>7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91581555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8">
            <text:p>307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85.24">
            <text:p>1988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671.59">
            <text:p>18671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01827">
            <text:p>5,602</text:p>
          </table:table-cell>
          <table:table-cell table:style-name="ce12N2" office:value-type="float" office:value="34.86">
            <text:p>34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885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213.65">
            <text:p>1213,65</text:p>
          </table:table-cell>
          <table:table-cell table:style-name="ce12N2" office:value-type="float" office:value="18671.59">
            <text:p>18671,59</text:p>
          </table:table-cell>
          <table:table-cell table:style-name="ce12N2" office:value-type="float" office:value="746.86">
            <text:p>74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01191149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9">
            <text:p>30746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398">
            <text:p>0,114</text:p>
          </table:table-cell>
          <table:table-cell table:style-name="ce12N2" office:value-type="float" office:value="32.04">
            <text:p>3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2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141.67">
            <text:p>14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20871140136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3">
            <text:p>307473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5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1.8">
            <text:p>666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661.8">
            <text:p>666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062">
            <text:p>0,461</text:p>
          </table:table-cell>
          <table:table-cell table:style-name="ce12N2" office:value-type="float" office:value="116.46">
            <text:p>11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1.8">
            <text:p>6661,80</text:p>
          </table:table-cell>
          <table:table-cell table:style-name="ce12N2" office:value-type="float" office:value="466.33">
            <text:p>46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510007744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4">
            <text:p>30747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110.54">
            <text:p>5411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654.08">
            <text:p>5265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3968">
            <text:p>0,974</text:p>
          </table:table-cell>
          <table:table-cell table:style-name="ce12N2" office:value-type="float" office:value="2222.66">
            <text:p>2222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11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456.46">
            <text:p>1456,46</text:p>
          </table:table-cell>
          <table:table-cell table:style-name="ce12N2" office:value-type="float" office:value="52654.08">
            <text:p>52654,08</text:p>
          </table:table-cell>
          <table:table-cell table:style-name="ce12N2" office:value-type="float" office:value="3685.78">
            <text:p>368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610041572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2">
            <text:p>3074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6.1">
            <text:p>119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6.1">
            <text:p>119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3">
            <text:p>0,006</text:p>
          </table:table-cell>
          <table:table-cell table:style-name="ce12N2" office:value-type="float" office:value="4.17">
            <text:p>4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8.3">
            <text:p>878,30</text:p>
          </table:table-cell>
          <table:table-cell table:style-name="ce12N2" office:value-type="float" office:value="61.48">
            <text:p>6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316854129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3">
            <text:p>3074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.44">
            <text:p>47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8.44">
            <text:p>47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2">
            <text:p>0,002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.32">
            <text:p>351,32</text:p>
          </table:table-cell>
          <table:table-cell table:style-name="ce12N2" office:value-type="float" office:value="24.59">
            <text:p>2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21970174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4">
            <text:p>307494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7.78">
            <text:p>1960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18693.15">
            <text:p>1869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5932">
            <text:p>0,386</text:p>
          </table:table-cell>
          <table:table-cell table:style-name="ce12N2" office:value-type="float" office:value="107.63">
            <text:p>107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0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914.63">
            <text:p>914,63</text:p>
          </table:table-cell>
          <table:table-cell table:style-name="ce12N2" office:value-type="float" office:value="18693.15">
            <text:p>18693,15</text:p>
          </table:table-cell>
          <table:table-cell table:style-name="ce12N2" office:value-type="float" office:value="747.73">
            <text:p>7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31326491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5">
            <text:p>307495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735.71">
            <text:p>11173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104860.12">
            <text:p>10486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32063">
            <text:p>2,832</text:p>
          </table:table-cell>
          <table:table-cell table:style-name="ce12N2" office:value-type="float" office:value="608.49">
            <text:p>608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.73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">
            <text:p>3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6875.59">
            <text:p>6875,59</text:p>
          </table:table-cell>
          <table:table-cell table:style-name="ce12N2" office:value-type="float" office:value="104860.12">
            <text:p>104860,12</text:p>
          </table:table-cell>
          <table:table-cell table:style-name="ce12N2" office:value-type="float" office:value="4194.4">
            <text:p>41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61601434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6">
            <text:p>307496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3.57">
            <text:p>2163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53.45">
            <text:p>2053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915">
            <text:p>0,040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63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110.12">
            <text:p>110,12</text:p>
          </table:table-cell>
          <table:table-cell table:style-name="ce12N2" office:value-type="float" office:value="2053.45">
            <text:p>2053,45</text:p>
          </table:table-cell>
          <table:table-cell table:style-name="ce12N2" office:value-type="float" office:value="82.14">
            <text:p>8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41489216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03">
            <text:p>307503</text:p>
          </table:table-cell>
          <table:table-cell table:style-name="ce0" table:number-columns-spanned="4" table:number-rows-spanned="1" office:value-type="string" calcext:value-type="string">
            <text:p>5.467 - DVG INDUSTRIAL S.A.</text:p>
          </table:table-cell>
          <table:covered-table-cell table:number-columns-repeated="3"/>
          <table:table-cell table:style-name="ce0" office:value-type="string" calcext:value-type="string">
            <text:p>105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50">
            <text:p>1785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850">
            <text:p>1785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275">
            <text:p>22,275</text:p>
          </table:table-cell>
          <table:table-cell table:style-name="ce12N2" office:value-type="float" office:value="20000">
            <text:p>2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85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850">
            <text:p>17850,00</text:p>
          </table:table-cell>
          <table:table-cell table:style-name="ce12N2" office:value-type="float" office:value="2142">
            <text:p>214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234522380017105500100010523114084967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04">
            <text:p>307504</text:p>
          </table:table-cell>
          <table:table-cell table:style-name="ce0" table:number-columns-spanned="4" table:number-rows-spanned="1" office:value-type="string" calcext:value-type="string">
            <text:p>5.467 - DVG INDUSTRIAL S.A.</text:p>
          </table:table-cell>
          <table:covered-table-cell table:number-columns-repeated="3"/>
          <table:table-cell table:style-name="ce0" office:value-type="string" calcext:value-type="string">
            <text:p>105.2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0">
            <text:p>357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0">
            <text:p>357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55">
            <text:p>4,455</text:p>
          </table:table-cell>
          <table:table-cell table:style-name="ce12N2" office:value-type="float" office:value="4000">
            <text:p>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70">
            <text:p>3570,00</text:p>
          </table:table-cell>
          <table:table-cell table:style-name="ce12N2" office:value-type="float" office:value="428.4">
            <text:p>42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234522380017105500100010523211444196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05">
            <text:p>307505</text:p>
          </table:table-cell>
          <table:table-cell table:style-name="ce0" table:number-columns-spanned="4" table:number-rows-spanned="1" office:value-type="string" calcext:value-type="string">
            <text:p>5.467 - DVG INDUSTRIAL S.A.</text:p>
          </table:table-cell>
          <table:covered-table-cell table:number-columns-repeated="3"/>
          <table:table-cell table:style-name="ce0" office:value-type="string" calcext:value-type="string">
            <text:p>105.2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32">
            <text:p>3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32">
            <text:p>3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903">
            <text:p>6,903</text:p>
          </table:table-cell>
          <table:table-cell table:style-name="ce12N2" office:value-type="float" office:value="8000">
            <text:p>8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2">
            <text:p>3632,00</text:p>
          </table:table-cell>
          <table:table-cell table:style-name="ce12N2" office:value-type="float" office:value="435.84">
            <text:p>43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23452238001710550010001052331059220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150">
            <text:p>15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9354.21">
            <text:p>89354,21</text:p>
          </table:table-cell>
          <table:table-cell table:style-name="ce26N2" office:value-type="float" office:value="4725320.77">
            <text:p>4725320,77</text:p>
          </table:table-cell>
          <table:table-cell table:style-name="ce26N2" office:value-type="float" office:value="306047.81">
            <text:p>306047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856460.9">
            <text:p>4856460,9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298.96">
            <text:p>6298,96</text:p>
          </table:table-cell>
          <table:table-cell table:style-name="ce26N2" office:value-type="float" office:value="1128.93">
            <text:p>1128,9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86864.003274">
            <text:p>86864,003</text:p>
          </table:table-cell>
          <table:table-cell table:style-name="ce26N2" office:value-type="float" office:value="4765977.76">
            <text:p>4765977,76</text:p>
          </table:table-cell>
          <table:table-cell table:style-name="ce26N2" office:value-type="float" office:value="4856460.9">
            <text:p>4856460,9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99686.1">
            <text:p>199686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.9">
            <text:p>46,9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OBJETIV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450" meta:object-count="0"/>
    <meta:generator>LibreOffice/4.3.0.4$Windows_x86 LibreOffice_project/62ad5818884a2fc2e5780dd45466868d41009ec0</meta:generator>
  </office:meta>
</office:document-meta>
</file>