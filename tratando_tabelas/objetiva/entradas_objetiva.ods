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4/05/2026 07:28:1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299145">
            <text:p>299145</text:p>
          </table:table-cell>
          <table:table-cell table:style-name="ce0" table:number-columns-spanned="4" table:number-rows-spanned="1" office:value-type="string" calcext:value-type="string">
            <text:p>5.700 - MARSCHALL IND. COM. IMP. EXP. LTDA</text:p>
          </table:table-cell>
          <table:covered-table-cell table:number-columns-repeated="3"/>
          <table:table-cell table:style-name="ce0" office:value-type="string" calcext:value-type="string">
            <text:p>696.56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1/2026</text:p>
          </table:table-cell>
          <table:table-cell table:style-name="ce0" office:value-type="string" calcext:value-type="string">
            <text:p>12/01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5.43">
            <text:p>122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19">
            <text:p>101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1/2026</text:p>
          </table:table-cell>
          <table:table-cell table:style-name="ce12N2" office:value-type="float" office:value="118.13">
            <text:p>118,13</text:p>
          </table:table-cell>
          <table:table-cell table:style-name="ce12N2" office:value-type="float" office:value="1019">
            <text:p>1019,00</text:p>
          </table:table-cell>
          <table:table-cell table:style-name="ce12N2" office:value-type="float" office:value="40.76">
            <text:p>4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88.19">
            <text:p>488,19</text:p>
          </table:table-cell>
          <table:table-cell table:style-name="ce12N2" office:value-type="float" office:value="88.3">
            <text:p>88,3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102130525000177550030006965601356118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2520">
            <text:p>302520</text:p>
          </table:table-cell>
          <table:table-cell table:style-name="ce0" table:number-columns-spanned="4" table:number-rows-spanned="1" office:value-type="string" calcext:value-type="string">
            <text:p>15.690 - CLI CENTRAL DE LOGISTICA INTEGRADA LTDA</text:p>
          </table:table-cell>
          <table:covered-table-cell table:number-columns-repeated="3"/>
          <table:table-cell table:style-name="ce0" office:value-type="string" calcext:value-type="string">
            <text:p>38.09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4/02/2026</text:p>
          </table:table-cell>
          <table:table-cell table:style-name="ce0" office:value-type="string" calcext:value-type="string">
            <text:p>04/03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24.82">
            <text:p>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213528071000103550040000380921000371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2535">
            <text:p>302535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30.01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3/03/2026</text:p>
          </table:table-cell>
          <table:table-cell table:style-name="ce0" office:value-type="string" calcext:value-type="string">
            <text:p>04/03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">
            <text:p>30,000</text:p>
          </table:table-cell>
          <table:table-cell table:style-name="ce12N2" office:value-type="float" office:value="3425.1">
            <text:p>342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8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21.76">
            <text:p>2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1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301637895007498550060014300181495666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49">
            <text:p>30484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81.4">
            <text:p>1618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193.8">
            <text:p>1519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89666">
            <text:p>5,897</text:p>
          </table:table-cell>
          <table:table-cell table:style-name="ce12N2" office:value-type="float" office:value="76.48">
            <text:p>7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8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987.6">
            <text:p>987,60</text:p>
          </table:table-cell>
          <table:table-cell table:style-name="ce12N2" office:value-type="float" office:value="15193.8">
            <text:p>15193,80</text:p>
          </table:table-cell>
          <table:table-cell table:style-name="ce12N2" office:value-type="float" office:value="607.75">
            <text:p>60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712717871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50">
            <text:p>30485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484">
            <text:p>0,295</text:p>
          </table:table-cell>
          <table:table-cell table:style-name="ce12N2" office:value-type="float" office:value="78.26">
            <text:p>7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42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856.99">
            <text:p>856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81547519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51">
            <text:p>30485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433.96">
            <text:p>3843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433.96">
            <text:p>3843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88">
            <text:p>0,031</text:p>
          </table:table-cell>
          <table:table-cell table:style-name="ce12N2" office:value-type="float" office:value="87.34">
            <text:p>8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43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433.96">
            <text:p>38433,96</text:p>
          </table:table-cell>
          <table:table-cell table:style-name="ce12N2" office:value-type="float" office:value="1537.36">
            <text:p>153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915937857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1">
            <text:p>3052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417.18">
            <text:p>6341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3417.18">
            <text:p>63417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056">
            <text:p>0,070</text:p>
          </table:table-cell>
          <table:table-cell table:style-name="ce12N2" office:value-type="float" office:value="110.71">
            <text:p>11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.417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417.18">
            <text:p>63417,18</text:p>
          </table:table-cell>
          <table:table-cell table:style-name="ce12N2" office:value-type="float" office:value="2536.69">
            <text:p>253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61466193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5">
            <text:p>305685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08.50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5.91">
            <text:p>212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59">
            <text:p>205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7">
            <text:p>0,018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25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6.91">
            <text:p>66,91</text:p>
          </table:table-cell>
          <table:table-cell table:style-name="ce12N2" office:value-type="float" office:value="2059">
            <text:p>2059,00</text:p>
          </table:table-cell>
          <table:table-cell table:style-name="ce12N2" office:value-type="float" office:value="144.13">
            <text:p>14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46833740003005500300060850613647349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4">
            <text:p>305784</text:p>
          </table:table-cell>
          <table:table-cell table:style-name="ce0" table:number-columns-spanned="4" table:number-rows-spanned="1" office:value-type="string" calcext:value-type="string">
            <text:p>6.059 - TECNO-FLEX INDUSTRIA E COMERCIO LTDA</text:p>
          </table:table-cell>
          <table:covered-table-cell table:number-columns-repeated="3"/>
          <table:table-cell table:style-name="ce0" office:value-type="string" calcext:value-type="string">
            <text:p>50.7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22.13">
            <text:p>2232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1.71985">
            <text:p>141,720</text:p>
          </table:table-cell>
          <table:table-cell table:style-name="ce12N2" office:value-type="float" office:value="1211.17">
            <text:p>121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322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702.63">
            <text:p>702,63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1513.37">
            <text:p>151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70398020001225500100005074519243338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9">
            <text:p>305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76.28">
            <text:p>2477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600.28">
            <text:p>2360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2032">
            <text:p>0,292</text:p>
          </table:table-cell>
          <table:table-cell table:style-name="ce12N2" office:value-type="float" office:value="80.42">
            <text:p>8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776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176">
            <text:p>1176,00</text:p>
          </table:table-cell>
          <table:table-cell table:style-name="ce12N2" office:value-type="float" office:value="23600.28">
            <text:p>23600,28</text:p>
          </table:table-cell>
          <table:table-cell table:style-name="ce12N2" office:value-type="float" office:value="1109.25">
            <text:p>110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01009880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0">
            <text:p>305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40.35">
            <text:p>644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47.28">
            <text:p>6047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078">
            <text:p>0,066</text:p>
          </table:table-cell>
          <table:table-cell table:style-name="ce12N2" office:value-type="float" office:value="29.53">
            <text:p>2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4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393.07">
            <text:p>393,07</text:p>
          </table:table-cell>
          <table:table-cell table:style-name="ce12N2" office:value-type="float" office:value="6047.28">
            <text:p>6047,28</text:p>
          </table:table-cell>
          <table:table-cell table:style-name="ce12N2" office:value-type="float" office:value="241.89">
            <text:p>24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914817314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1">
            <text:p>3059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8.35">
            <text:p>834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06.7">
            <text:p>760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425">
            <text:p>0,384</text:p>
          </table:table-cell>
          <table:table-cell table:style-name="ce12N2" office:value-type="float" office:value="7.31">
            <text:p>7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4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41.65">
            <text:p>741,65</text:p>
          </table:table-cell>
          <table:table-cell table:style-name="ce12N2" office:value-type="float" office:value="7606.7">
            <text:p>7606,70</text:p>
          </table:table-cell>
          <table:table-cell table:style-name="ce12N2" office:value-type="float" office:value="304.27">
            <text:p>30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81855789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2">
            <text:p>3059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3.36">
            <text:p>117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73.36">
            <text:p>117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92">
            <text:p>0,003</text:p>
          </table:table-cell>
          <table:table-cell table:style-name="ce12N2" office:value-type="float" office:value="5.48">
            <text:p>5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3.36">
            <text:p>1173,36</text:p>
          </table:table-cell>
          <table:table-cell table:style-name="ce12N2" office:value-type="float" office:value="82.14">
            <text:p>8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71344346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3">
            <text:p>30592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23.46">
            <text:p>692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00.9">
            <text:p>6500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69">
            <text:p>0,075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23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422.56">
            <text:p>422,56</text:p>
          </table:table-cell>
          <table:table-cell table:style-name="ce12N2" office:value-type="float" office:value="6500.9">
            <text:p>6500,90</text:p>
          </table:table-cell>
          <table:table-cell table:style-name="ce12N2" office:value-type="float" office:value="455.06">
            <text:p>45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419019920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4">
            <text:p>3059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9.59">
            <text:p>205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59.59">
            <text:p>2059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501">
            <text:p>0,082</text:p>
          </table:table-cell>
          <table:table-cell table:style-name="ce12N2" office:value-type="float" office:value="17.36">
            <text:p>1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59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77.31">
            <text:p>1577,31</text:p>
          </table:table-cell>
          <table:table-cell table:style-name="ce12N2" office:value-type="float" office:value="103.08">
            <text:p>10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31396025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5">
            <text:p>30592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1.88">
            <text:p>232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21.88">
            <text:p>232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538">
            <text:p>0,033</text:p>
          </table:table-cell>
          <table:table-cell table:style-name="ce12N2" office:value-type="float" office:value="6.6">
            <text:p>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4.96">
            <text:p>1704,96</text:p>
          </table:table-cell>
          <table:table-cell table:style-name="ce12N2" office:value-type="float" office:value="119.35">
            <text:p>119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21490162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7">
            <text:p>3059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.5">
            <text:p>29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3.71">
            <text:p>273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78">
            <text:p>0,006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9">
            <text:p>17,79</text:p>
          </table:table-cell>
          <table:table-cell table:style-name="ce12N2" office:value-type="float" office:value="273.71">
            <text:p>273,71</text:p>
          </table:table-cell>
          <table:table-cell table:style-name="ce12N2" office:value-type="float" office:value="19.16">
            <text:p>1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11892787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9">
            <text:p>305929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09.0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77.5">
            <text:p>1707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6539.96">
            <text:p>16539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227">
            <text:p>0,155</text:p>
          </table:table-cell>
          <table:table-cell table:style-name="ce12N2" office:value-type="float" office:value="210.19">
            <text:p>21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07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">
            <text:p>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37.54">
            <text:p>537,54</text:p>
          </table:table-cell>
          <table:table-cell table:style-name="ce12N2" office:value-type="float" office:value="16539.96">
            <text:p>16539,96</text:p>
          </table:table-cell>
          <table:table-cell table:style-name="ce12N2" office:value-type="float" office:value="1157.8">
            <text:p>115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46833740003005500300060904719988376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4">
            <text:p>305934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57.11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.35">
            <text:p>132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39.66">
            <text:p>123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092">
            <text:p>0,032</text:p>
          </table:table-cell>
          <table:table-cell table:style-name="ce12N2" office:value-type="float" office:value="85">
            <text:p>8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86.69">
            <text:p>86,69</text:p>
          </table:table-cell>
          <table:table-cell table:style-name="ce12N2" office:value-type="float" office:value="1239.66">
            <text:p>1239,66</text:p>
          </table:table-cell>
          <table:table-cell table:style-name="ce12N2" office:value-type="float" office:value="49.59">
            <text:p>4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45990181003285550020012571111437426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9">
            <text:p>305939</text:p>
          </table:table-cell>
          <table:table-cell table:style-name="ce0" table:number-columns-spanned="4" table:number-rows-spanned="1" office:value-type="string" calcext:value-type="string">
            <text:p>16.404 - GARRA DISTRIBUIDORA DE FUNDIDOS EIRELI</text:p>
          </table:table-cell>
          <table:covered-table-cell table:number-columns-repeated="3"/>
          <table:table-cell table:style-name="ce0" office:value-type="string" calcext:value-type="string">
            <text:p>5.7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76.8">
            <text:p>1007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76.8">
            <text:p>1007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6">
            <text:p>0,022</text:p>
          </table:table-cell>
          <table:table-cell table:style-name="ce12N2" office:value-type="float" office:value="45.1">
            <text:p>4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7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76.82">
            <text:p>10076,82</text:p>
          </table:table-cell>
          <table:table-cell table:style-name="ce12N2" office:value-type="float" office:value="397.02">
            <text:p>397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178097140001485500100000577019134007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3">
            <text:p>30595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313408256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5">
            <text:p>306055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5.9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8.74792">
            <text:p>38,748</text:p>
          </table:table-cell>
          <table:table-cell table:style-name="ce12N2" office:value-type="float" office:value="2302.6">
            <text:p>230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48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1784.05">
            <text:p>178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21260419000152550010001459071219908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97">
            <text:p>30609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4.64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2">
            <text:p>0,011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237.89">
            <text:p>23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464519799933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8">
            <text:p>306128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16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810.21">
            <text:p>4381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527.28">
            <text:p>43527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91185">
            <text:p>3,991</text:p>
          </table:table-cell>
          <table:table-cell table:style-name="ce12N2" office:value-type="float" office:value="17360.35">
            <text:p>1736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81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282.93">
            <text:p>282,93</text:p>
          </table:table-cell>
          <table:table-cell table:style-name="ce12N2" office:value-type="float" office:value="43527.28">
            <text:p>43527,28</text:p>
          </table:table-cell>
          <table:table-cell table:style-name="ce12N2" office:value-type="float" office:value="3046.92">
            <text:p>30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1611483685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9">
            <text:p>30612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15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59.85">
            <text:p>377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63164">
            <text:p>4,063</text:p>
          </table:table-cell>
          <table:table-cell table:style-name="ce12N2" office:value-type="float" office:value="21489.76">
            <text:p>214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75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243.86">
            <text:p>243,86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2626.12">
            <text:p>262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1571808125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30">
            <text:p>30613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1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561.01">
            <text:p>2356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408.85">
            <text:p>23408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518132">
            <text:p>3,518</text:p>
          </table:table-cell>
          <table:table-cell table:style-name="ce12N2" office:value-type="float" office:value="16090.4">
            <text:p>1609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561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52.16">
            <text:p>152,16</text:p>
          </table:table-cell>
          <table:table-cell table:style-name="ce12N2" office:value-type="float" office:value="23408.85">
            <text:p>23408,85</text:p>
          </table:table-cell>
          <table:table-cell table:style-name="ce12N2" office:value-type="float" office:value="1638.62">
            <text:p>163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13216604046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35">
            <text:p>306135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63.3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046.03">
            <text:p>10604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">
            <text:p>48,00</text:p>
          </table:table-cell>
          <table:table-cell table:style-name="ce12N2" office:value-type="float" office:value="106046.03">
            <text:p>106046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80643">
            <text:p>1,581</text:p>
          </table:table-cell>
          <table:table-cell table:style-name="ce12N2" office:value-type="float" office:value="1296.04">
            <text:p>1296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.046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046.03">
            <text:p>106046,03</text:p>
          </table:table-cell>
          <table:table-cell table:style-name="ce12N2" office:value-type="float" office:value="7330.95">
            <text:p>733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611441500006785500100126338815909578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2">
            <text:p>3061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.24">
            <text:p>35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.24">
            <text:p>35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6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6.24">
            <text:p>356,24</text:p>
          </table:table-cell>
          <table:table-cell table:style-name="ce12N2" office:value-type="float" office:value="24.94">
            <text:p>2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61296137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6">
            <text:p>30617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2.5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05.47">
            <text:p>720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435.48">
            <text:p>5435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64056">
            <text:p>1,964</text:p>
          </table:table-cell>
          <table:table-cell table:style-name="ce12N2" office:value-type="float" office:value="62.3">
            <text:p>62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05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467.52">
            <text:p>467,52</text:p>
          </table:table-cell>
          <table:table-cell table:style-name="ce12N2" office:value-type="float" office:value="5084.86">
            <text:p>5084,86</text:p>
          </table:table-cell>
          <table:table-cell table:style-name="ce12N2" office:value-type="float" office:value="203.4">
            <text:p>20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267.22">
            <text:p>7267,22</text:p>
          </table:table-cell>
          <table:table-cell table:style-name="ce12N2" office:value-type="float" office:value="1302.47">
            <text:p>1302,47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50940030001555500100018250612477132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2">
            <text:p>306202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556">
            <text:p>0,018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23.76">
            <text:p>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7128041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3">
            <text:p>306203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04">
            <text:p>0,020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26.54">
            <text:p>2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911898592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11">
            <text:p>306211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41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809.9">
            <text:p>2180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669.05">
            <text:p>21669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37741">
            <text:p>2,238</text:p>
          </table:table-cell>
          <table:table-cell table:style-name="ce12N2" office:value-type="float" office:value="11518.84">
            <text:p>11518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809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140.85">
            <text:p>140,85</text:p>
          </table:table-cell>
          <table:table-cell table:style-name="ce12N2" office:value-type="float" office:value="21669.05">
            <text:p>21669,05</text:p>
          </table:table-cell>
          <table:table-cell table:style-name="ce12N2" office:value-type="float" office:value="1516.84">
            <text:p>151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4121320047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1">
            <text:p>3062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4.56">
            <text:p>215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54.56">
            <text:p>215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316">
            <text:p>0,01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5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54.56">
            <text:p>2154,56</text:p>
          </table:table-cell>
          <table:table-cell table:style-name="ce12N2" office:value-type="float" office:value="150.82">
            <text:p>15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371149664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2">
            <text:p>3062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6.2">
            <text:p>316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66.2">
            <text:p>316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37">
            <text:p>0,044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24.94">
            <text:p>2324,94</text:p>
          </table:table-cell>
          <table:table-cell table:style-name="ce12N2" office:value-type="float" office:value="162.75">
            <text:p>16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015357209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3">
            <text:p>3062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0">
            <text:p>395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50">
            <text:p>395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3">
            <text:p>0,049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5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00.49">
            <text:p>2900,49</text:p>
          </table:table-cell>
          <table:table-cell table:style-name="ce12N2" office:value-type="float" office:value="203.03">
            <text:p>20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11554934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4">
            <text:p>3062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24">
            <text:p>0,001</text:p>
          </table:table-cell>
          <table:table-cell table:style-name="ce12N2" office:value-type="float" office:value="1.4">
            <text:p>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1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64.48">
            <text:p>6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311882748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5">
            <text:p>3062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.58">
            <text:p>31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.56">
            <text:p>292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728">
            <text:p>0,287</text:p>
          </table:table-cell>
          <table:table-cell table:style-name="ce12N2" office:value-type="float" office:value="1.96">
            <text:p>1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1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19.02">
            <text:p>19,02</text:p>
          </table:table-cell>
          <table:table-cell table:style-name="ce12N2" office:value-type="float" office:value="292.56">
            <text:p>292,56</text:p>
          </table:table-cell>
          <table:table-cell table:style-name="ce12N2" office:value-type="float" office:value="11.7">
            <text:p>1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216562189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6">
            <text:p>3062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633.28">
            <text:p>5363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633.28">
            <text:p>53633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">
            <text:p>0,064</text:p>
          </table:table-cell>
          <table:table-cell table:style-name="ce12N2" office:value-type="float" office:value="82.5">
            <text:p>8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63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633.28">
            <text:p>53633,28</text:p>
          </table:table-cell>
          <table:table-cell table:style-name="ce12N2" office:value-type="float" office:value="3754.33">
            <text:p>375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519379800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7">
            <text:p>3062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24">
            <text:p>0,001</text:p>
          </table:table-cell>
          <table:table-cell table:style-name="ce12N2" office:value-type="float" office:value="1.4">
            <text:p>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1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64.48">
            <text:p>6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61991708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8">
            <text:p>3062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448.66">
            <text:p>2244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448.66">
            <text:p>22448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">
            <text:p>0,026</text:p>
          </table:table-cell>
          <table:table-cell table:style-name="ce12N2" office:value-type="float" office:value="33.51">
            <text:p>3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448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448.66">
            <text:p>22448,66</text:p>
          </table:table-cell>
          <table:table-cell table:style-name="ce12N2" office:value-type="float" office:value="1571.41">
            <text:p>157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816358232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9">
            <text:p>3062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29.04">
            <text:p>10129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10.84">
            <text:p>951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03804">
            <text:p>0,304</text:p>
          </table:table-cell>
          <table:table-cell table:style-name="ce12N2" office:value-type="float" office:value="29.74">
            <text:p>29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29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618.2">
            <text:p>618,20</text:p>
          </table:table-cell>
          <table:table-cell table:style-name="ce12N2" office:value-type="float" office:value="9510.84">
            <text:p>9510,84</text:p>
          </table:table-cell>
          <table:table-cell table:style-name="ce12N2" office:value-type="float" office:value="665.76">
            <text:p>66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91543074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50">
            <text:p>3062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95">
            <text:p>279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95">
            <text:p>279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6">
            <text:p>0,000</text:p>
          </table:table-cell>
          <table:table-cell table:style-name="ce12N2" office:value-type="float" office:value="6.1">
            <text:p>6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9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95">
            <text:p>2795,00</text:p>
          </table:table-cell>
          <table:table-cell table:style-name="ce12N2" office:value-type="float" office:value="195.65">
            <text:p>19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701451819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51">
            <text:p>3062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4">
            <text:p>335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4">
            <text:p>335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12">
            <text:p>0,000</text:p>
          </table:table-cell>
          <table:table-cell table:style-name="ce12N2" office:value-type="float" office:value="7.32">
            <text:p>7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4">
            <text:p>3354,00</text:p>
          </table:table-cell>
          <table:table-cell table:style-name="ce12N2" office:value-type="float" office:value="234.78">
            <text:p>23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711899653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52">
            <text:p>30625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40.53">
            <text:p>604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40.53">
            <text:p>6040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81591">
            <text:p>1,282</text:p>
          </table:table-cell>
          <table:table-cell table:style-name="ce12N2" office:value-type="float" office:value="57.15">
            <text:p>57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40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40.53">
            <text:p>6040,53</text:p>
          </table:table-cell>
          <table:table-cell table:style-name="ce12N2" office:value-type="float" office:value="283.49">
            <text:p>28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721584226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59">
            <text:p>3062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0.54">
            <text:p>46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0.54">
            <text:p>460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12">
            <text:p>0,001</text:p>
          </table:table-cell>
          <table:table-cell table:style-name="ce12N2" office:value-type="float" office:value="0.7">
            <text:p>0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0.54">
            <text:p>460,54</text:p>
          </table:table-cell>
          <table:table-cell table:style-name="ce12N2" office:value-type="float" office:value="32.24">
            <text:p>3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41083385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73">
            <text:p>306273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6.0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68.78">
            <text:p>1976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088.08">
            <text:p>1608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336646">
            <text:p>30,337</text:p>
          </table:table-cell>
          <table:table-cell table:style-name="ce12N2" office:value-type="float" office:value="263.02">
            <text:p>26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768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88.08">
            <text:p>16088,08</text:p>
          </table:table-cell>
          <table:table-cell table:style-name="ce12N2" office:value-type="float" office:value="1126.17">
            <text:p>112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3949.99">
            <text:p>23949,99</text:p>
          </table:table-cell>
          <table:table-cell table:style-name="ce12N2" office:value-type="float" office:value="3680.7">
            <text:p>3680,7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60021577655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47">
            <text:p>306347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58.79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02.4">
            <text:p>6780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64842.36">
            <text:p>6484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43168">
            <text:p>1,643</text:p>
          </table:table-cell>
          <table:table-cell table:style-name="ce12N2" office:value-type="float" office:value="600.74">
            <text:p>60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80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960.04">
            <text:p>2960,04</text:p>
          </table:table-cell>
          <table:table-cell table:style-name="ce12N2" office:value-type="float" office:value="64842.36">
            <text:p>64842,36</text:p>
          </table:table-cell>
          <table:table-cell table:style-name="ce12N2" office:value-type="float" office:value="2593.71">
            <text:p>259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459901810032855500200125879214905553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49">
            <text:p>30634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61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44.59">
            <text:p>2524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081.56">
            <text:p>25081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67906">
            <text:p>4,068</text:p>
          </table:table-cell>
          <table:table-cell table:style-name="ce12N2" office:value-type="float" office:value="15931.61">
            <text:p>15931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44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63.03">
            <text:p>163,03</text:p>
          </table:table-cell>
          <table:table-cell table:style-name="ce12N2" office:value-type="float" office:value="25081.56">
            <text:p>25081,56</text:p>
          </table:table-cell>
          <table:table-cell table:style-name="ce12N2" office:value-type="float" office:value="1755.71">
            <text:p>175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6161416640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50">
            <text:p>30635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3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3.44">
            <text:p>1893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99997">
            <text:p>2,900</text:p>
          </table:table-cell>
          <table:table-cell table:style-name="ce12N2" office:value-type="float" office:value="11804.18">
            <text:p>11804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33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22.27">
            <text:p>122,27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1316.78">
            <text:p>131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30281564338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63">
            <text:p>3063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2.82">
            <text:p>121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8.8">
            <text:p>113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8">
            <text:p>0,020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74.02">
            <text:p>74,02</text:p>
          </table:table-cell>
          <table:table-cell table:style-name="ce12N2" office:value-type="float" office:value="1138.8">
            <text:p>1138,80</text:p>
          </table:table-cell>
          <table:table-cell table:style-name="ce12N2" office:value-type="float" office:value="45.55">
            <text:p>4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519649826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74">
            <text:p>3063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.59">
            <text:p>35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0.13">
            <text:p>330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6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1.46">
            <text:p>21,46</text:p>
          </table:table-cell>
          <table:table-cell table:style-name="ce12N2" office:value-type="float" office:value="330.13">
            <text:p>330,13</text:p>
          </table:table-cell>
          <table:table-cell table:style-name="ce12N2" office:value-type="float" office:value="13.21">
            <text:p>13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11948470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5">
            <text:p>30638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4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6">
            <text:p>8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6">
            <text:p>8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48">
            <text:p>0,155</text:p>
          </table:table-cell>
          <table:table-cell table:style-name="ce12N2" office:value-type="float" office:value="22.32">
            <text:p>22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6">
            <text:p>816,00</text:p>
          </table:table-cell>
          <table:table-cell table:style-name="ce12N2" office:value-type="float" office:value="57.12">
            <text:p>5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42619763100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6">
            <text:p>30638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4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4">
            <text:p>156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4">
            <text:p>156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67">
            <text:p>0,297</text:p>
          </table:table-cell>
          <table:table-cell table:style-name="ce12N2" office:value-type="float" office:value="42.78">
            <text:p>42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4">
            <text:p>1564,00</text:p>
          </table:table-cell>
          <table:table-cell table:style-name="ce12N2" office:value-type="float" office:value="109.48">
            <text:p>10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43818883216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7">
            <text:p>30638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31.27">
            <text:p>1643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677.2">
            <text:p>1567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648">
            <text:p>0,086</text:p>
          </table:table-cell>
          <table:table-cell table:style-name="ce12N2" office:value-type="float" office:value="70.92">
            <text:p>7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31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754.07">
            <text:p>754,07</text:p>
          </table:table-cell>
          <table:table-cell table:style-name="ce12N2" office:value-type="float" office:value="15677.2">
            <text:p>15677,20</text:p>
          </table:table-cell>
          <table:table-cell table:style-name="ce12N2" office:value-type="float" office:value="1097.4">
            <text:p>109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44513501675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9">
            <text:p>30638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0.1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36.26">
            <text:p>6433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1755.03">
            <text:p>61755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2778">
            <text:p>0,423</text:p>
          </table:table-cell>
          <table:table-cell table:style-name="ce12N2" office:value-type="float" office:value="273.31">
            <text:p>273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336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581.23">
            <text:p>2581,23</text:p>
          </table:table-cell>
          <table:table-cell table:style-name="ce12N2" office:value-type="float" office:value="61755.03">
            <text:p>61755,03</text:p>
          </table:table-cell>
          <table:table-cell table:style-name="ce12N2" office:value-type="float" office:value="3131.52">
            <text:p>313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1019515861022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0">
            <text:p>306390</text:p>
          </table:table-cell>
          <table:table-cell table:style-name="ce0" table:number-columns-spanned="4" table:number-rows-spanned="1" office:value-type="string" calcext:value-type="string">
            <text:p>7.087 - VELLORE S/A</text:p>
          </table:table-cell>
          <table:covered-table-cell table:number-columns-repeated="3"/>
          <table:table-cell table:style-name="ce0" office:value-type="string" calcext:value-type="string">
            <text:p>405.9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45.11">
            <text:p>2034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9419.38">
            <text:p>19419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24">
            <text:p>0,023</text:p>
          </table:table-cell>
          <table:table-cell table:style-name="ce12N2" office:value-type="float" office:value="70.03">
            <text:p>70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345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925.73">
            <text:p>925,73</text:p>
          </table:table-cell>
          <table:table-cell table:style-name="ce12N2" office:value-type="float" office:value="19419.38">
            <text:p>19419,38</text:p>
          </table:table-cell>
          <table:table-cell table:style-name="ce12N2" office:value-type="float" office:value="778.34">
            <text:p>77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17230860001435500100040594414999656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1">
            <text:p>306391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6236">
            <text:p>0,496</text:p>
          </table:table-cell>
          <table:table-cell table:style-name="ce12N2" office:value-type="float" office:value="246.07">
            <text:p>246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48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2477.78">
            <text:p>247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423159702000118550010000210081066087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2">
            <text:p>30639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0.1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380.11">
            <text:p>2838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6647.99">
            <text:p>2664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23892">
            <text:p>0,624</text:p>
          </table:table-cell>
          <table:table-cell table:style-name="ce12N2" office:value-type="float" office:value="487.68">
            <text:p>487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380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732.12">
            <text:p>1732,12</text:p>
          </table:table-cell>
          <table:table-cell table:style-name="ce12N2" office:value-type="float" office:value="26647.99">
            <text:p>26647,99</text:p>
          </table:table-cell>
          <table:table-cell table:style-name="ce12N2" office:value-type="float" office:value="1065.93">
            <text:p>106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1019615892130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05">
            <text:p>306405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5.75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62.7">
            <text:p>166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62.7">
            <text:p>166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494">
            <text:p>0,064</text:p>
          </table:table-cell>
          <table:table-cell table:style-name="ce12N2" office:value-type="float" office:value="17.4">
            <text:p>1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6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62.7">
            <text:p>1662,70</text:p>
          </table:table-cell>
          <table:table-cell table:style-name="ce12N2" office:value-type="float" office:value="116.39">
            <text:p>116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6293564000146550020003357521217195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45">
            <text:p>306445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7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09">
            <text:p>25,131</text:p>
          </table:table-cell>
          <table:table-cell table:style-name="ce12N2" office:value-type="float" office:value="134.5">
            <text:p>1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1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840.82">
            <text:p>84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385067000140550010000471651420518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4">
            <text:p>3064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61.13">
            <text:p>1256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61.13">
            <text:p>12561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34.08">
            <text:p>3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561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61.13">
            <text:p>12561,13</text:p>
          </table:table-cell>
          <table:table-cell table:style-name="ce12N2" office:value-type="float" office:value="879.28">
            <text:p>87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61343662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5">
            <text:p>306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98.12">
            <text:p>209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32.08">
            <text:p>203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806">
            <text:p>0,020</text:p>
          </table:table-cell>
          <table:table-cell table:style-name="ce12N2" office:value-type="float" office:value="4.31">
            <text:p>4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98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66.04">
            <text:p>66,04</text:p>
          </table:table-cell>
          <table:table-cell table:style-name="ce12N2" office:value-type="float" office:value="2032.08">
            <text:p>2032,08</text:p>
          </table:table-cell>
          <table:table-cell table:style-name="ce12N2" office:value-type="float" office:value="142.25">
            <text:p>14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71377675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6">
            <text:p>306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716.86">
            <text:p>3971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716.86">
            <text:p>39716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">
            <text:p>0,046</text:p>
          </table:table-cell>
          <table:table-cell table:style-name="ce12N2" office:value-type="float" office:value="59.29">
            <text:p>5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716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716.86">
            <text:p>39716,86</text:p>
          </table:table-cell>
          <table:table-cell table:style-name="ce12N2" office:value-type="float" office:value="2780.18">
            <text:p>278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819574568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8">
            <text:p>306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49.12">
            <text:p>294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49.12">
            <text:p>2949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68">
            <text:p>0,001</text:p>
          </table:table-cell>
          <table:table-cell table:style-name="ce12N2" office:value-type="float" office:value="18.72">
            <text:p>18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49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49.12">
            <text:p>2949,12</text:p>
          </table:table-cell>
          <table:table-cell table:style-name="ce12N2" office:value-type="float" office:value="117.96">
            <text:p>11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711816650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9">
            <text:p>306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34.08">
            <text:p>453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34.08">
            <text:p>453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12">
            <text:p>0,015</text:p>
          </table:table-cell>
          <table:table-cell table:style-name="ce12N2" office:value-type="float" office:value="15.82">
            <text:p>1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34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34.08">
            <text:p>4534,08</text:p>
          </table:table-cell>
          <table:table-cell table:style-name="ce12N2" office:value-type="float" office:value="181.36">
            <text:p>18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731385987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0">
            <text:p>306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951.23">
            <text:p>16395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3951.23">
            <text:p>163951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33648">
            <text:p>1,934</text:p>
          </table:table-cell>
          <table:table-cell table:style-name="ce12N2" office:value-type="float" office:value="785.8">
            <text:p>78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.951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3951.23">
            <text:p>163951,23</text:p>
          </table:table-cell>
          <table:table-cell table:style-name="ce12N2" office:value-type="float" office:value="6558.05">
            <text:p>655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741345659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1">
            <text:p>306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446.34">
            <text:p>328446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327145.78">
            <text:p>327145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85229">
            <text:p>16,852</text:p>
          </table:table-cell>
          <table:table-cell table:style-name="ce12N2" office:value-type="float" office:value="1217.66">
            <text:p>1217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8.446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300.56">
            <text:p>1300,56</text:p>
          </table:table-cell>
          <table:table-cell table:style-name="ce12N2" office:value-type="float" office:value="326804.92">
            <text:p>326804,92</text:p>
          </table:table-cell>
          <table:table-cell table:style-name="ce12N2" office:value-type="float" office:value="18393.24">
            <text:p>1839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751225448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0">
            <text:p>30649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8.2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089.38">
            <text:p>27089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7089.38">
            <text:p>27089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00842">
            <text:p>3,101</text:p>
          </table:table-cell>
          <table:table-cell table:style-name="ce12N2" office:value-type="float" office:value="1141.39">
            <text:p>1141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089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089.38">
            <text:p>27089,38</text:p>
          </table:table-cell>
          <table:table-cell table:style-name="ce12N2" office:value-type="float" office:value="1896.25">
            <text:p>189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82551388500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1">
            <text:p>30649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8.2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457.73">
            <text:p>12045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20297.26">
            <text:p>120297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5.267434">
            <text:p>65,267</text:p>
          </table:table-cell>
          <table:table-cell table:style-name="ce12N2" office:value-type="float" office:value="1956.94">
            <text:p>1956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0.457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60.47">
            <text:p>160,47</text:p>
          </table:table-cell>
          <table:table-cell table:style-name="ce12N2" office:value-type="float" office:value="120297.26">
            <text:p>120297,26</text:p>
          </table:table-cell>
          <table:table-cell table:style-name="ce12N2" office:value-type="float" office:value="7696.03">
            <text:p>769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825614965642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2">
            <text:p>3064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0.8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40">
            <text:p>275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40">
            <text:p>275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25">
            <text:p>0,054</text:p>
          </table:table-cell>
          <table:table-cell table:style-name="ce12N2" office:value-type="float" office:value="6.1">
            <text:p>6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5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40">
            <text:p>27540,00</text:p>
          </table:table-cell>
          <table:table-cell table:style-name="ce12N2" office:value-type="float" office:value="1927.8">
            <text:p>192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084110919959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9">
            <text:p>3064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5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3">
            <text:p>0,030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5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920.74">
            <text:p>92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5501182688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00">
            <text:p>30650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5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46.02">
            <text:p>394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46.02">
            <text:p>3946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09">
            <text:p>0,009</text:p>
          </table:table-cell>
          <table:table-cell table:style-name="ce12N2" office:value-type="float" office:value="5.26">
            <text:p>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46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46.02">
            <text:p>3946,02</text:p>
          </table:table-cell>
          <table:table-cell table:style-name="ce12N2" office:value-type="float" office:value="276.22">
            <text:p>27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56913042518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04">
            <text:p>30650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2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8.34">
            <text:p>450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08.34">
            <text:p>450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08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08.34">
            <text:p>4508,34</text:p>
          </table:table-cell>
          <table:table-cell table:style-name="ce12N2" office:value-type="float" office:value="315.58">
            <text:p>31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2501407777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2">
            <text:p>306522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3.2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32.76">
            <text:p>363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422.88">
            <text:p>342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216">
            <text:p>0,122</text:p>
          </table:table-cell>
          <table:table-cell table:style-name="ce12N2" office:value-type="float" office:value="81.2">
            <text:p>8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32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09.88">
            <text:p>209,88</text:p>
          </table:table-cell>
          <table:table-cell table:style-name="ce12N2" office:value-type="float" office:value="3422.88">
            <text:p>3422,88</text:p>
          </table:table-cell>
          <table:table-cell table:style-name="ce12N2" office:value-type="float" office:value="239.6">
            <text:p>23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32691833961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4">
            <text:p>30652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1.2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239.12">
            <text:p>18623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">
            <text:p>49,00</text:p>
          </table:table-cell>
          <table:table-cell table:style-name="ce12N2" office:value-type="float" office:value="179628.19">
            <text:p>17962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4.658971">
            <text:p>94,659</text:p>
          </table:table-cell>
          <table:table-cell table:style-name="ce12N2" office:value-type="float" office:value="1871.6">
            <text:p>18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6.239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6610.93">
            <text:p>6610,93</text:p>
          </table:table-cell>
          <table:table-cell table:style-name="ce12N2" office:value-type="float" office:value="179628.19">
            <text:p>179628,19</text:p>
          </table:table-cell>
          <table:table-cell table:style-name="ce12N2" office:value-type="float" office:value="12267.09">
            <text:p>12267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1122315701253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6">
            <text:p>306526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232">
            <text:p>1,523</text:p>
          </table:table-cell>
          <table:table-cell table:style-name="ce12N2" office:value-type="float" office:value="272">
            <text:p>2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465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1642.6">
            <text:p>164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017340084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8">
            <text:p>306528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95">
            <text:p>0,071</text:p>
          </table:table-cell>
          <table:table-cell table:style-name="ce12N2" office:value-type="float" office:value="16.81">
            <text:p>1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4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97.91">
            <text:p>9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11454297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0">
            <text:p>3065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1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05.15">
            <text:p>1080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156.55">
            <text:p>10156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2374">
            <text:p>0,072</text:p>
          </table:table-cell>
          <table:table-cell table:style-name="ce12N2" office:value-type="float" office:value="84.57">
            <text:p>84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05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648.6">
            <text:p>648,60</text:p>
          </table:table-cell>
          <table:table-cell table:style-name="ce12N2" office:value-type="float" office:value="10156.55">
            <text:p>10156,55</text:p>
          </table:table-cell>
          <table:table-cell table:style-name="ce12N2" office:value-type="float" office:value="411.61">
            <text:p>41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1301066071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1">
            <text:p>3065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1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8">
            <text:p>0,001</text:p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05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189.4">
            <text:p>18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1311656025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2">
            <text:p>3065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1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3.38">
            <text:p>94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5.8">
            <text:p>88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4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57.58">
            <text:p>57,58</text:p>
          </table:table-cell>
          <table:table-cell table:style-name="ce12N2" office:value-type="float" office:value="885.8">
            <text:p>885,80</text:p>
          </table:table-cell>
          <table:table-cell table:style-name="ce12N2" office:value-type="float" office:value="62.01">
            <text:p>6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1321201088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3">
            <text:p>3065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1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.11">
            <text:p>17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8.11">
            <text:p>178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8">
            <text:p>0,001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8.11">
            <text:p>178,11</text:p>
          </table:table-cell>
          <table:table-cell table:style-name="ce12N2" office:value-type="float" office:value="12.47">
            <text:p>1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13314663350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4">
            <text:p>3065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1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9.32">
            <text:p>64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9.69">
            <text:p>609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536">
            <text:p>0,005</text:p>
          </table:table-cell>
          <table:table-cell table:style-name="ce12N2" office:value-type="float" office:value="4.74">
            <text:p>4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9.63">
            <text:p>39,63</text:p>
          </table:table-cell>
          <table:table-cell table:style-name="ce12N2" office:value-type="float" office:value="609.69">
            <text:p>609,69</text:p>
          </table:table-cell>
          <table:table-cell table:style-name="ce12N2" office:value-type="float" office:value="24.39">
            <text:p>2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1341814608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3">
            <text:p>306543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2.28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12.75">
            <text:p>2461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3803.41">
            <text:p>23803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6.63313">
            <text:p>86,633</text:p>
          </table:table-cell>
          <table:table-cell table:style-name="ce12N2" office:value-type="float" office:value="170.75">
            <text:p>170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612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1">
            <text:p>44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09.34">
            <text:p>809,34</text:p>
          </table:table-cell>
          <table:table-cell table:style-name="ce12N2" office:value-type="float" office:value="23803.41">
            <text:p>23803,41</text:p>
          </table:table-cell>
          <table:table-cell table:style-name="ce12N2" office:value-type="float" office:value="1666.24">
            <text:p>166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76428620002485500200001228812221200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4">
            <text:p>306544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7.3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312">
            <text:p>4231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42312">
            <text:p>4231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3.13295">
            <text:p>203,133</text:p>
          </table:table-cell>
          <table:table-cell table:style-name="ce12N2" office:value-type="float" office:value="1105.85">
            <text:p>1105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31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312">
            <text:p>42312,00</text:p>
          </table:table-cell>
          <table:table-cell table:style-name="ce12N2" office:value-type="float" office:value="2961.84">
            <text:p>296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2827610000142550010000673301812272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7">
            <text:p>30654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9.4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8.54">
            <text:p>255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78">
            <text:p>24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08">
            <text:p>0,241</text:p>
          </table:table-cell>
          <table:table-cell table:style-name="ce12N2" office:value-type="float" office:value="70.7">
            <text:p>70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5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0.54">
            <text:p>80,54</text:p>
          </table:table-cell>
          <table:table-cell table:style-name="ce12N2" office:value-type="float" office:value="2478">
            <text:p>2478,00</text:p>
          </table:table-cell>
          <table:table-cell table:style-name="ce12N2" office:value-type="float" office:value="173.46">
            <text:p>1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1942115282245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8">
            <text:p>30654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9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49.1">
            <text:p>734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349.1">
            <text:p>734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277">
            <text:p>0,683</text:p>
          </table:table-cell>
          <table:table-cell table:style-name="ce12N2" office:value-type="float" office:value="99.99">
            <text:p>99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4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49.1">
            <text:p>7349,10</text:p>
          </table:table-cell>
          <table:table-cell table:style-name="ce12N2" office:value-type="float" office:value="514.44">
            <text:p>51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194041851497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9">
            <text:p>30654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9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.92">
            <text:p>30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.92">
            <text:p>30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">
            <text:p>0,002</text:p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4.92">
            <text:p>304,92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193801354214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0">
            <text:p>306550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7.2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56.8">
            <text:p>105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556.8">
            <text:p>1055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">
            <text:p>0,036</text:p>
          </table:table-cell>
          <table:table-cell table:style-name="ce12N2" office:value-type="float" office:value="266">
            <text:p>26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5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556.8">
            <text:p>10556,80</text:p>
          </table:table-cell>
          <table:table-cell table:style-name="ce12N2" office:value-type="float" office:value="336.77">
            <text:p>33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48875230001525500100003722010037224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2">
            <text:p>306552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309.56">
            <text:p>98130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946237.05">
            <text:p>946237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3.070619">
            <text:p>53,071</text:p>
          </table:table-cell>
          <table:table-cell table:style-name="ce12N2" office:value-type="float" office:value="6522.54">
            <text:p>652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1.30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5072.51">
            <text:p>35072,51</text:p>
          </table:table-cell>
          <table:table-cell table:style-name="ce12N2" office:value-type="float" office:value="946237.05">
            <text:p>946237,05</text:p>
          </table:table-cell>
          <table:table-cell table:style-name="ce12N2" office:value-type="float" office:value="57537.74">
            <text:p>5753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21683519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3">
            <text:p>306563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5.93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205.07">
            <text:p>53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53205.07">
            <text:p>53205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4.591891">
            <text:p>204,592</text:p>
          </table:table-cell>
          <table:table-cell table:style-name="ce12N2" office:value-type="float" office:value="1037.37">
            <text:p>1037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205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205.07">
            <text:p>53205,07</text:p>
          </table:table-cell>
          <table:table-cell table:style-name="ce12N2" office:value-type="float" office:value="3724.35">
            <text:p>372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6293564000146550020003359371663080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4">
            <text:p>30656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7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96.77">
            <text:p>689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34232">
            <text:p>1,334</text:p>
          </table:table-cell>
          <table:table-cell table:style-name="ce12N2" office:value-type="float" office:value="257.3">
            <text:p>257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96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17.09">
            <text:p>217,09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267.19">
            <text:p>26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74314412013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2">
            <text:p>306572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79.3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64.25">
            <text:p>1576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5568.08">
            <text:p>1556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4.844636">
            <text:p>134,845</text:p>
          </table:table-cell>
          <table:table-cell table:style-name="ce12N2" office:value-type="float" office:value="530.69">
            <text:p>53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764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96.17">
            <text:p>196,17</text:p>
          </table:table-cell>
          <table:table-cell table:style-name="ce12N2" office:value-type="float" office:value="15093.76">
            <text:p>15093,76</text:p>
          </table:table-cell>
          <table:table-cell table:style-name="ce12N2" office:value-type="float" office:value="1056.55">
            <text:p>105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1913681000134550010001793411895829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0">
            <text:p>3066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57">
            <text:p>2755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57">
            <text:p>2755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25">
            <text:p>0,054</text:p>
          </table:table-cell>
          <table:table-cell table:style-name="ce12N2" office:value-type="float" office:value="6.1">
            <text:p>6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55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57">
            <text:p>27557,00</text:p>
          </table:table-cell>
          <table:table-cell table:style-name="ce12N2" office:value-type="float" office:value="1928.99">
            <text:p>1928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3010219260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0">
            <text:p>306670</text:p>
          </table:table-cell>
          <table:table-cell table:style-name="ce0" table:number-columns-spanned="4" table:number-rows-spanned="1" office:value-type="string" calcext:value-type="string">
            <text:p>995 - LUMIBRAS INDUSTRIA METALURGICA LTDA</text:p>
          </table:table-cell>
          <table:covered-table-cell table:number-columns-repeated="3"/>
          <table:table-cell table:style-name="ce0" office:value-type="string" calcext:value-type="string">
            <text:p>87.0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61.95">
            <text:p>986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9027.82">
            <text:p>9027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63256">
            <text:p>2,263</text:p>
          </table:table-cell>
          <table:table-cell table:style-name="ce12N2" office:value-type="float" office:value="404.74">
            <text:p>404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61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82">
            <text:p>41,8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834.13">
            <text:p>834,13</text:p>
          </table:table-cell>
          <table:table-cell table:style-name="ce12N2" office:value-type="float" office:value="9027.82">
            <text:p>9027,82</text:p>
          </table:table-cell>
          <table:table-cell table:style-name="ce12N2" office:value-type="float" office:value="631.95">
            <text:p>63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8477110001845500100008700610078305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3">
            <text:p>3066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8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37.4">
            <text:p>963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37.4">
            <text:p>963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72">
            <text:p>0,033</text:p>
          </table:table-cell>
          <table:table-cell table:style-name="ce12N2" office:value-type="float" office:value="3.1">
            <text:p>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63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37.4">
            <text:p>9637,40</text:p>
          </table:table-cell>
          <table:table-cell table:style-name="ce12N2" office:value-type="float" office:value="674.62">
            <text:p>67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84111330538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4">
            <text:p>3066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57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76.8">
            <text:p>2997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976.8">
            <text:p>2997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8">
            <text:p>0,061</text:p>
          </table:table-cell>
          <table:table-cell table:style-name="ce12N2" office:value-type="float" office:value="61.6">
            <text:p>6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97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976.8">
            <text:p>29976,80</text:p>
          </table:table-cell>
          <table:table-cell table:style-name="ce12N2" office:value-type="float" office:value="2098.38">
            <text:p>209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5721365791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7">
            <text:p>30669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2.4">
            <text:p>267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72.4">
            <text:p>267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828">
            <text:p>0,248</text:p>
          </table:table-cell>
          <table:table-cell table:style-name="ce12N2" office:value-type="float" office:value="36.36">
            <text:p>36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7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72.4">
            <text:p>2672,40</text:p>
          </table:table-cell>
          <table:table-cell table:style-name="ce12N2" office:value-type="float" office:value="187.07">
            <text:p>18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6071017307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6">
            <text:p>306706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482">
            <text:p>0,019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44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89.38">
            <text:p>89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423159702000118550010000210091159426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8">
            <text:p>30673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517.12">
            <text:p>4651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7384">
            <text:p>3,387</text:p>
          </table:table-cell>
          <table:table-cell table:style-name="ce12N2" office:value-type="float" office:value="521.03">
            <text:p>52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51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35.06">
            <text:p>635,06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2573.89">
            <text:p>257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6191248127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3">
            <text:p>306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92">
            <text:p>287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75.53">
            <text:p>175,53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108.02">
            <text:p>10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91705951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4">
            <text:p>3067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7.28">
            <text:p>191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0.26">
            <text:p>18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7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17.02">
            <text:p>117,02</text:p>
          </table:table-cell>
          <table:table-cell table:style-name="ce12N2" office:value-type="float" office:value="1800.26">
            <text:p>1800,26</text:p>
          </table:table-cell>
          <table:table-cell table:style-name="ce12N2" office:value-type="float" office:value="72.01">
            <text:p>7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6012700590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1">
            <text:p>3067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6.2">
            <text:p>245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56.2">
            <text:p>245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556">
            <text:p>0,029</text:p>
          </table:table-cell>
          <table:table-cell table:style-name="ce12N2" office:value-type="float" office:value="0.2">
            <text:p>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56.2">
            <text:p>2456,20</text:p>
          </table:table-cell>
          <table:table-cell table:style-name="ce12N2" office:value-type="float" office:value="171.93">
            <text:p>17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417066680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2">
            <text:p>3067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6.1">
            <text:p>185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56.1">
            <text:p>185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594">
            <text:p>0,022</text:p>
          </table:table-cell>
          <table:table-cell table:style-name="ce12N2" office:value-type="float" office:value="2.7">
            <text:p>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5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6.1">
            <text:p>1856,10</text:p>
          </table:table-cell>
          <table:table-cell table:style-name="ce12N2" office:value-type="float" office:value="129.93">
            <text:p>12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51462846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3">
            <text:p>3067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71.38">
            <text:p>4267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2367.26">
            <text:p>42367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17">
            <text:p>0,112</text:p>
          </table:table-cell>
          <table:table-cell table:style-name="ce12N2" office:value-type="float" office:value="81.82">
            <text:p>8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67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4.12">
            <text:p>304,12</text:p>
          </table:table-cell>
          <table:table-cell table:style-name="ce12N2" office:value-type="float" office:value="42367.26">
            <text:p>42367,26</text:p>
          </table:table-cell>
          <table:table-cell table:style-name="ce12N2" office:value-type="float" office:value="2965.72">
            <text:p>296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61038430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4">
            <text:p>3067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97.35">
            <text:p>999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97.35">
            <text:p>9997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">
            <text:p>0,011</text:p>
          </table:table-cell>
          <table:table-cell table:style-name="ce12N2" office:value-type="float" office:value="14.18">
            <text:p>14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9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97.35">
            <text:p>9997,35</text:p>
          </table:table-cell>
          <table:table-cell table:style-name="ce12N2" office:value-type="float" office:value="699.81">
            <text:p>69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713865155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5">
            <text:p>3067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29.93">
            <text:p>1912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9043.56">
            <text:p>19043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116">
            <text:p>0,021</text:p>
          </table:table-cell>
          <table:table-cell table:style-name="ce12N2" office:value-type="float" office:value="35.5">
            <text:p>35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29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86.37">
            <text:p>86,37</text:p>
          </table:table-cell>
          <table:table-cell table:style-name="ce12N2" office:value-type="float" office:value="19043.56">
            <text:p>19043,56</text:p>
          </table:table-cell>
          <table:table-cell table:style-name="ce12N2" office:value-type="float" office:value="1333.04">
            <text:p>1333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511469941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6">
            <text:p>3067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43.8">
            <text:p>604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43.8">
            <text:p>604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">
            <text:p>0,007</text:p>
          </table:table-cell>
          <table:table-cell table:style-name="ce12N2" office:value-type="float" office:value="9.02">
            <text:p>9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4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43.8">
            <text:p>6043,80</text:p>
          </table:table-cell>
          <table:table-cell table:style-name="ce12N2" office:value-type="float" office:value="423.07">
            <text:p>42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5215032673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7">
            <text:p>3067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83.02">
            <text:p>778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308">
            <text:p>730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228">
            <text:p>3,123</text:p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83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75.02">
            <text:p>475,02</text:p>
          </table:table-cell>
          <table:table-cell table:style-name="ce12N2" office:value-type="float" office:value="7308">
            <text:p>7308,00</text:p>
          </table:table-cell>
          <table:table-cell table:style-name="ce12N2" office:value-type="float" office:value="292.32">
            <text:p>29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5313956497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0">
            <text:p>306800</text:p>
          </table:table-cell>
          <table:table-cell table:style-name="ce0" table:number-columns-spanned="4" table:number-rows-spanned="1" office:value-type="string" calcext:value-type="string">
            <text:p>6.059 - TECNO-FLEX INDUSTRIA E COMERCIO LTDA</text:p>
          </table:table-cell>
          <table:covered-table-cell table:number-columns-repeated="3"/>
          <table:table-cell table:style-name="ce0" office:value-type="string" calcext:value-type="string">
            <text:p>50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22.13">
            <text:p>2232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1.71985">
            <text:p>141,720</text:p>
          </table:table-cell>
          <table:table-cell table:style-name="ce12N2" office:value-type="float" office:value="1211.17">
            <text:p>121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322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702.63">
            <text:p>702,63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1513.37">
            <text:p>151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7039802000122550010000508131390370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0">
            <text:p>306810</text:p>
          </table:table-cell>
          <table:table-cell table:style-name="ce0" table:number-columns-spanned="4" table:number-rows-spanned="1" office:value-type="string" calcext:value-type="string">
            <text:p>7.661 - SEGURIMAX COM. AT. EQUIP. SEG. IMP. EXP</text:p>
          </table:table-cell>
          <table:covered-table-cell table:number-columns-repeated="3"/>
          <table:table-cell table:style-name="ce0" office:value-type="string" calcext:value-type="string">
            <text:p>182.0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921.85">
            <text:p>5092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">
            <text:p>39,00</text:p>
          </table:table-cell>
          <table:table-cell table:style-name="ce12N2" office:value-type="float" office:value="49595.72">
            <text:p>4959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77165">
            <text:p>1,277</text:p>
          </table:table-cell>
          <table:table-cell table:style-name="ce12N2" office:value-type="float" office:value="600.12">
            <text:p>60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92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326.13">
            <text:p>1326,13</text:p>
          </table:table-cell>
          <table:table-cell table:style-name="ce12N2" office:value-type="float" office:value="49595.72">
            <text:p>49595,72</text:p>
          </table:table-cell>
          <table:table-cell table:style-name="ce12N2" office:value-type="float" office:value="1983.81">
            <text:p>1983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21.62">
            <text:p>212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.158</text:p>
          </table:table-cell>
          <table:table-cell table:style-name="ce0" office:value-type="string" calcext:value-type="string">
            <text:p>34.164 - TRANSPORTES MARLIM LTDA</text:p>
          </table:table-cell>
          <table:table-cell table:style-name="ce0" office:value-type="string" calcext:value-type="string">
            <text:p>05/05/2026</text:p>
          </table:table-cell>
          <table:table-cell table:style-name="ce12" office:value-type="string" calcext:value-type="string">
            <text:p>2.121,62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42260417011376000102550010001820191491633781</text:p>
          </table:table-cell>
          <table:table-cell table:style-name="ce0" office:value-type="string" calcext:value-type="string">
            <text:p>4226055815837200012057001000040158100040203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2">
            <text:p>306812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870.93">
            <text:p>9587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58885">
            <text:p>7,959</text:p>
          </table:table-cell>
          <table:table-cell table:style-name="ce12N2" office:value-type="float" office:value="10340">
            <text:p>103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87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17.73">
            <text:p>3017,73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6499.72">
            <text:p>649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01015665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3">
            <text:p>306813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28.42">
            <text:p>1141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456">
            <text:p>3,275</text:p>
          </table:table-cell>
          <table:table-cell table:style-name="ce12N2" office:value-type="float" office:value="13000">
            <text:p>13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2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592.42">
            <text:p>3592,42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7737.52">
            <text:p>77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11015665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4">
            <text:p>306814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47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566.76">
            <text:p>4556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45422.82">
            <text:p>4542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38017">
            <text:p>6,380</text:p>
          </table:table-cell>
          <table:table-cell table:style-name="ce12N2" office:value-type="float" office:value="5848.22">
            <text:p>5848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56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.14">
            <text:p>56,1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43.94">
            <text:p>143,94</text:p>
          </table:table-cell>
          <table:table-cell table:style-name="ce12N2" office:value-type="float" office:value="45422.82">
            <text:p>45422,82</text:p>
          </table:table-cell>
          <table:table-cell table:style-name="ce12N2" office:value-type="float" office:value="3179.62">
            <text:p>31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6818670001305500100094768014210852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5">
            <text:p>30681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056.53">
            <text:p>9805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6816">
            <text:p>2,468</text:p>
          </table:table-cell>
          <table:table-cell table:style-name="ce12N2" office:value-type="float" office:value="7300">
            <text:p>73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056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86.53">
            <text:p>3086,53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6647.9">
            <text:p>664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21015665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7">
            <text:p>30682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3.2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77.95">
            <text:p>6567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">
            <text:p>72,00</text:p>
          </table:table-cell>
          <table:table-cell table:style-name="ce12N2" office:value-type="float" office:value="62405.13">
            <text:p>6240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84279">
            <text:p>1,384</text:p>
          </table:table-cell>
          <table:table-cell table:style-name="ce12N2" office:value-type="float" office:value="794.26">
            <text:p>79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77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272.82">
            <text:p>3272,82</text:p>
          </table:table-cell>
          <table:table-cell table:style-name="ce12N2" office:value-type="float" office:value="62405.13">
            <text:p>62405,13</text:p>
          </table:table-cell>
          <table:table-cell table:style-name="ce12N2" office:value-type="float" office:value="3227.07">
            <text:p>322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32591174401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6">
            <text:p>306836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3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90">
            <text:p>138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890">
            <text:p>138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54">
            <text:p>0,165</text:p>
          </table:table-cell>
          <table:table-cell table:style-name="ce12N2" office:value-type="float" office:value="47.7">
            <text:p>47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8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90">
            <text:p>13890,00</text:p>
          </table:table-cell>
          <table:table-cell table:style-name="ce12N2" office:value-type="float" office:value="972.3">
            <text:p>97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2296669000169550030000013861946977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7">
            <text:p>306837</text:p>
          </table:table-cell>
          <table:table-cell table:style-name="ce0" table:number-columns-spanned="4" table:number-rows-spanned="1" office:value-type="string" calcext:value-type="string">
            <text:p>35.393 - METALURGICA LOTH LTDA</text:p>
          </table:table-cell>
          <table:covered-table-cell table:number-columns-repeated="3"/>
          <table:table-cell table:style-name="ce0" office:value-type="string" calcext:value-type="string">
            <text:p>73.7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8.91">
            <text:p>340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3389.95">
            <text:p>3389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222">
            <text:p>0,332</text:p>
          </table:table-cell>
          <table:table-cell table:style-name="ce12N2" office:value-type="float" office:value="113.08">
            <text:p>113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0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8.96">
            <text:p>18,96</text:p>
          </table:table-cell>
          <table:table-cell table:style-name="ce12N2" office:value-type="float" office:value="3389.95">
            <text:p>3389,95</text:p>
          </table:table-cell>
          <table:table-cell table:style-name="ce12N2" office:value-type="float" office:value="237.3">
            <text:p>23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7275689000107550010000737221752786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9">
            <text:p>30683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1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3.25">
            <text:p>207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46.71">
            <text:p>1946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64">
            <text:p>0,057</text:p>
          </table:table-cell>
          <table:table-cell table:style-name="ce12N2" office:value-type="float" office:value="41.28">
            <text:p>4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26.54">
            <text:p>126,54</text:p>
          </table:table-cell>
          <table:table-cell table:style-name="ce12N2" office:value-type="float" office:value="1946.71">
            <text:p>1946,71</text:p>
          </table:table-cell>
          <table:table-cell table:style-name="ce12N2" office:value-type="float" office:value="77.87">
            <text:p>7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14431589225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0">
            <text:p>306840</text:p>
          </table:table-cell>
          <table:table-cell table:style-name="ce0" table:number-columns-spanned="4" table:number-rows-spanned="1" office:value-type="string" calcext:value-type="string">
            <text:p>36.654 - AZIMUT ALUMINIOS LTDA</text:p>
          </table:table-cell>
          <table:covered-table-cell table:number-columns-repeated="3"/>
          <table:table-cell table:style-name="ce0" office:value-type="string" calcext:value-type="string">
            <text:p>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246.54">
            <text:p>1924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9246.54">
            <text:p>19246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373174">
            <text:p>9,373</text:p>
          </table:table-cell>
          <table:table-cell table:style-name="ce12N2" office:value-type="float" office:value="532.1">
            <text:p>53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246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46.54">
            <text:p>19246,54</text:p>
          </table:table-cell>
          <table:table-cell table:style-name="ce12N2" office:value-type="float" office:value="1347.25">
            <text:p>134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8784921000158550010000000961818500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6">
            <text:p>30684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5.0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072.28">
            <text:p>5207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0612.07">
            <text:p>50612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6244">
            <text:p>0,256</text:p>
          </table:table-cell>
          <table:table-cell table:style-name="ce12N2" office:value-type="float" office:value="212.8">
            <text:p>21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072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460.21">
            <text:p>1460,21</text:p>
          </table:table-cell>
          <table:table-cell table:style-name="ce12N2" office:value-type="float" office:value="48258.35">
            <text:p>48258,35</text:p>
          </table:table-cell>
          <table:table-cell table:style-name="ce12N2" office:value-type="float" office:value="2030.2">
            <text:p>2030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502711396462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7">
            <text:p>30684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1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1.62">
            <text:p>155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2.78">
            <text:p>1502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5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8.84">
            <text:p>48,84</text:p>
          </table:table-cell>
          <table:table-cell table:style-name="ce12N2" office:value-type="float" office:value="1502.78">
            <text:p>1502,78</text:p>
          </table:table-cell>
          <table:table-cell table:style-name="ce12N2" office:value-type="float" office:value="105.19">
            <text:p>10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14421570254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7">
            <text:p>306857</text:p>
          </table:table-cell>
          <table:table-cell table:style-name="ce0" table:number-columns-spanned="4" table:number-rows-spanned="1" office:value-type="string" calcext:value-type="string">
            <text:p>29.857 - J.H. DE OLIVEIRA FABRICACAO DE MANGUEIRAS LTDA</text:p>
          </table:table-cell>
          <table:covered-table-cell table:number-columns-repeated="3"/>
          <table:table-cell table:style-name="ce0" office:value-type="string" calcext:value-type="string">
            <text:p>6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96.8">
            <text:p>359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596.8">
            <text:p>359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501862">
            <text:p>9,502</text:p>
          </table:table-cell>
          <table:table-cell table:style-name="ce12N2" office:value-type="float" office:value="280.1">
            <text:p>280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9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96.8">
            <text:p>3596,80</text:p>
          </table:table-cell>
          <table:table-cell table:style-name="ce12N2" office:value-type="float" office:value="135.97">
            <text:p>135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20482520001165500100000066514772923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9">
            <text:p>306859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38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5">
            <text:p>84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45">
            <text:p>8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.1">
            <text:p>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5">
            <text:p>845,00</text:p>
          </table:table-cell>
          <table:table-cell table:style-name="ce12N2" office:value-type="float" office:value="57.65">
            <text:p>57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2296669000169550030000013851257308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67">
            <text:p>306867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66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647.22">
            <text:p>10264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101741.04">
            <text:p>10174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26.31291">
            <text:p>2726,313</text:p>
          </table:table-cell>
          <table:table-cell table:style-name="ce12N2" office:value-type="float" office:value="418.76">
            <text:p>41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.647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906.18">
            <text:p>906,18</text:p>
          </table:table-cell>
          <table:table-cell table:style-name="ce12N2" office:value-type="float" office:value="101741.04">
            <text:p>101741,04</text:p>
          </table:table-cell>
          <table:table-cell table:style-name="ce12N2" office:value-type="float" office:value="7076.1">
            <text:p>707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330642620002505500100026623910233051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91">
            <text:p>306891</text:p>
          </table:table-cell>
          <table:table-cell table:style-name="ce0" table:number-columns-spanned="4" table:number-rows-spanned="1" office:value-type="string" calcext:value-type="string">
            <text:p>3.848 - HIDROSSOL IND. E COM. DE PLASTICOS LTDA.</text:p>
          </table:table-cell>
          <table:covered-table-cell table:number-columns-repeated="3"/>
          <table:table-cell table:style-name="ce0" office:value-type="string" calcext:value-type="string">
            <text:p>57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12312">
            <text:p>2,112</text:p>
          </table:table-cell>
          <table:table-cell table:style-name="ce12N2" office:value-type="float" office:value="764.31">
            <text:p>764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0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1323.32">
            <text:p>1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75045140001555500100005752919057529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20">
            <text:p>306920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4.022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71.57">
            <text:p>3837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33615">
            <text:p>2,934</text:p>
          </table:table-cell>
          <table:table-cell table:style-name="ce12N2" office:value-type="float" office:value="3392.82">
            <text:p>339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371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298.71">
            <text:p>298,71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1524.62">
            <text:p>152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2741051000185550550003040221675054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3">
            <text:p>3069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92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68.89">
            <text:p>556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29">
            <text:p>522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8">
            <text:p>0,077</text:p>
          </table:table-cell>
          <table:table-cell table:style-name="ce12N2" office:value-type="float" office:value="10.5">
            <text:p>1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68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339.89">
            <text:p>339,89</text:p>
          </table:table-cell>
          <table:table-cell table:style-name="ce12N2" office:value-type="float" office:value="5229">
            <text:p>5229,00</text:p>
          </table:table-cell>
          <table:table-cell table:style-name="ce12N2" office:value-type="float" office:value="366.03">
            <text:p>36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92913466739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4">
            <text:p>30694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9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94">
            <text:p>1289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894">
            <text:p>1289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2">
            <text:p>0,037</text:p>
          </table:table-cell>
          <table:table-cell table:style-name="ce12N2" office:value-type="float" office:value="42">
            <text:p>4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89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94">
            <text:p>12894,00</text:p>
          </table:table-cell>
          <table:table-cell table:style-name="ce12N2" office:value-type="float" office:value="902.58">
            <text:p>90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95710659782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56">
            <text:p>306956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1.1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0.15">
            <text:p>338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73.75">
            <text:p>3273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84">
            <text:p>0,218</text:p>
          </table:table-cell>
          <table:table-cell table:style-name="ce12N2" office:value-type="float" office:value="35.4">
            <text:p>3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0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106.4">
            <text:p>106,40</text:p>
          </table:table-cell>
          <table:table-cell table:style-name="ce12N2" office:value-type="float" office:value="3273.75">
            <text:p>3273,75</text:p>
          </table:table-cell>
          <table:table-cell table:style-name="ce12N2" office:value-type="float" office:value="229.16">
            <text:p>22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11031424740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64">
            <text:p>306964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89.83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5">
            <text:p>0,001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6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78.83">
            <text:p>7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777131003473550050008898381431941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86">
            <text:p>306986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2.2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38.72">
            <text:p>2383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838.72">
            <text:p>2383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91936">
            <text:p>1,192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838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38.72">
            <text:p>23838,72</text:p>
          </table:table-cell>
          <table:table-cell table:style-name="ce12N2" office:value-type="float" office:value="953.55">
            <text:p>953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22761100031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87">
            <text:p>306987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2.2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2.24">
            <text:p>100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2.24">
            <text:p>100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7072">
            <text:p>0,207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0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2.24">
            <text:p>1002,24</text:p>
          </table:table-cell>
          <table:table-cell table:style-name="ce12N2" office:value-type="float" office:value="40.09">
            <text:p>4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228611000311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7">
            <text:p>307047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40.24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63.1">
            <text:p>10016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00163.1">
            <text:p>100163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83468">
            <text:p>7,983</text:p>
          </table:table-cell>
          <table:table-cell table:style-name="ce12N2" office:value-type="float" office:value="16532.87">
            <text:p>16532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0.163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63.1">
            <text:p>100163,10</text:p>
          </table:table-cell>
          <table:table-cell table:style-name="ce12N2" office:value-type="float" office:value="7011.41">
            <text:p>701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40001402441345445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3">
            <text:p>307053</text:p>
          </table:table-cell>
          <table:table-cell table:style-name="ce0" table:number-columns-spanned="4" table:number-rows-spanned="1" office:value-type="string" calcext:value-type="string">
            <text:p>23.993 - KARCHER INDUSTRIA E COMERCIO LIMITADA</text:p>
          </table:table-cell>
          <table:covered-table-cell table:number-columns-repeated="3"/>
          <table:table-cell table:style-name="ce0" office:value-type="string" calcext:value-type="string">
            <text:p>1.612.1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6.29">
            <text:p>339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89">
            <text:p>318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9587">
            <text:p>0,450</text:p>
          </table:table-cell>
          <table:table-cell table:style-name="ce12N2" office:value-type="float" office:value="40.4">
            <text:p>4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6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207.29">
            <text:p>207,29</text:p>
          </table:table-cell>
          <table:table-cell table:style-name="ce12N2" office:value-type="float" office:value="3189">
            <text:p>3189,00</text:p>
          </table:table-cell>
          <table:table-cell table:style-name="ce12N2" office:value-type="float" office:value="160.68">
            <text:p>16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71109600001785500100161219514263370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4">
            <text:p>307054</text:p>
          </table:table-cell>
          <table:table-cell table:style-name="ce0" table:number-columns-spanned="4" table:number-rows-spanned="1" office:value-type="string" calcext:value-type="string">
            <text:p>21.328 - CERAMICA ALMEIDA LTDA</text:p>
          </table:table-cell>
          <table:covered-table-cell table:number-columns-repeated="3"/>
          <table:table-cell table:style-name="ce0" office:value-type="string" calcext:value-type="string">
            <text:p>187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278.36">
            <text:p>6127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0882.62">
            <text:p>60882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120789">
            <text:p>11,121</text:p>
          </table:table-cell>
          <table:table-cell table:style-name="ce12N2" office:value-type="float" office:value="39917.59">
            <text:p>39917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278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.71">
            <text:p>74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395.74">
            <text:p>395,74</text:p>
          </table:table-cell>
          <table:table-cell table:style-name="ce12N2" office:value-type="float" office:value="60882.62">
            <text:p>60882,62</text:p>
          </table:table-cell>
          <table:table-cell table:style-name="ce12N2" office:value-type="float" office:value="4261.79">
            <text:p>426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4676633000351550010001872391119646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8">
            <text:p>30705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5.4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198.37">
            <text:p>38219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381701.86">
            <text:p>38170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8.38815">
            <text:p>58,388</text:p>
          </table:table-cell>
          <table:table-cell table:style-name="ce12N2" office:value-type="float" office:value="2277.92">
            <text:p>227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2.198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496.51">
            <text:p>496,51</text:p>
          </table:table-cell>
          <table:table-cell table:style-name="ce12N2" office:value-type="float" office:value="381701.86">
            <text:p>381701,86</text:p>
          </table:table-cell>
          <table:table-cell table:style-name="ce12N2" office:value-type="float" office:value="26719.13">
            <text:p>2671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549311133567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3">
            <text:p>30706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5.4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999.6">
            <text:p>44899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48999.6">
            <text:p>44899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835">
            <text:p>2,284</text:p>
          </table:table-cell>
          <table:table-cell table:style-name="ce12N2" office:value-type="float" office:value="899.02">
            <text:p>899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8.99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999.6">
            <text:p>448999,60</text:p>
          </table:table-cell>
          <table:table-cell table:style-name="ce12N2" office:value-type="float" office:value="31429.97">
            <text:p>3142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549514312068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4">
            <text:p>307064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4.99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92.36">
            <text:p>439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83.2">
            <text:p>41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4352">
            <text:p>2,244</text:p>
          </table:table-cell>
          <table:table-cell table:style-name="ce12N2" office:value-type="float" office:value="136.8">
            <text:p>13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9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209.16">
            <text:p>209,16</text:p>
          </table:table-cell>
          <table:table-cell table:style-name="ce12N2" office:value-type="float" office:value="4183.2">
            <text:p>4183,20</text:p>
          </table:table-cell>
          <table:table-cell table:style-name="ce12N2" office:value-type="float" office:value="292.82">
            <text:p>29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849971144912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6">
            <text:p>30706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55.08">
            <text:p>685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55.08">
            <text:p>685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93292">
            <text:p>1,293</text:p>
          </table:table-cell>
          <table:table-cell table:style-name="ce12N2" office:value-type="float" office:value="376.21">
            <text:p>376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55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55.08">
            <text:p>6855,08</text:p>
          </table:table-cell>
          <table:table-cell table:style-name="ce12N2" office:value-type="float" office:value="479.86">
            <text:p>47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411350633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7">
            <text:p>30706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1.54">
            <text:p>377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71.54">
            <text:p>3771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96">
            <text:p>0,553</text:p>
          </table:table-cell>
          <table:table-cell table:style-name="ce12N2" office:value-type="float" office:value="180">
            <text:p>1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71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71.54">
            <text:p>3771,54</text:p>
          </table:table-cell>
          <table:table-cell table:style-name="ce12N2" office:value-type="float" office:value="264.01">
            <text:p>26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4010051908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8">
            <text:p>30706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9.44">
            <text:p>241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9.44">
            <text:p>241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6456">
            <text:p>0,456</text:p>
          </table:table-cell>
          <table:table-cell table:style-name="ce12N2" office:value-type="float" office:value="132.78">
            <text:p>132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9.44">
            <text:p>2419,44</text:p>
          </table:table-cell>
          <table:table-cell table:style-name="ce12N2" office:value-type="float" office:value="169.36">
            <text:p>16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391018201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9">
            <text:p>30706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6788">
            <text:p>0,347</text:p>
          </table:table-cell>
          <table:table-cell table:style-name="ce12N2" office:value-type="float" office:value="71.76">
            <text:p>7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92.74">
            <text:p>9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421014824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0">
            <text:p>30707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8.38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016.8">
            <text:p>14401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144016.8">
            <text:p>14401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86501">
            <text:p>11,865</text:p>
          </table:table-cell>
          <table:table-cell table:style-name="ce12N2" office:value-type="float" office:value="3127.43">
            <text:p>3127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4.01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016.8">
            <text:p>144016,80</text:p>
          </table:table-cell>
          <table:table-cell table:style-name="ce12N2" office:value-type="float" office:value="10081.18">
            <text:p>1008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583831606714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1">
            <text:p>307071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5.06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81.76">
            <text:p>342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33669.3">
            <text:p>3366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15998">
            <text:p>5,316</text:p>
          </table:table-cell>
          <table:table-cell table:style-name="ce12N2" office:value-type="float" office:value="740.61">
            <text:p>74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281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12.46">
            <text:p>612,46</text:p>
          </table:table-cell>
          <table:table-cell table:style-name="ce12N2" office:value-type="float" office:value="33669.3">
            <text:p>33669,30</text:p>
          </table:table-cell>
          <table:table-cell table:style-name="ce12N2" office:value-type="float" office:value="2057.24">
            <text:p>205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850661708155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4">
            <text:p>30707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4.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96.87">
            <text:p>4819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6679.78">
            <text:p>46679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8794">
            <text:p>0,319</text:p>
          </table:table-cell>
          <table:table-cell table:style-name="ce12N2" office:value-type="float" office:value="1291.05">
            <text:p>1291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196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517.09">
            <text:p>1517,09</text:p>
          </table:table-cell>
          <table:table-cell table:style-name="ce12N2" office:value-type="float" office:value="46679.78">
            <text:p>46679,78</text:p>
          </table:table-cell>
          <table:table-cell table:style-name="ce12N2" office:value-type="float" office:value="2909.39">
            <text:p>290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47951293807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7">
            <text:p>307077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48.3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285.43">
            <text:p>5528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5274.88">
            <text:p>5527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46736">
            <text:p>16,467</text:p>
          </table:table-cell>
          <table:table-cell table:style-name="ce12N2" office:value-type="float" office:value="19056">
            <text:p>1905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.28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.14">
            <text:p>56,1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0.55">
            <text:p>10,55</text:p>
          </table:table-cell>
          <table:table-cell table:style-name="ce12N2" office:value-type="float" office:value="55274.88">
            <text:p>55274,88</text:p>
          </table:table-cell>
          <table:table-cell table:style-name="ce12N2" office:value-type="float" office:value="3869.23">
            <text:p>386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681867000130550010009483351777182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8">
            <text:p>307078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1.9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.5">
            <text:p>144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41.5">
            <text:p>144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">
            <text:p>0,013</text:p>
          </table:table-cell>
          <table:table-cell table:style-name="ce12N2" office:value-type="float" office:value="14.5">
            <text:p>1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1.5">
            <text:p>1441,50</text:p>
          </table:table-cell>
          <table:table-cell table:style-name="ce12N2" office:value-type="float" office:value="57.66">
            <text:p>5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19651100026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9">
            <text:p>307079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70.41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6.6">
            <text:p>7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6.6">
            <text:p>75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">
            <text:p>0,480</text:p>
          </table:table-cell>
          <table:table-cell table:style-name="ce12N2" office:value-type="float" office:value="31.08">
            <text:p>3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6.6">
            <text:p>756,60</text:p>
          </table:table-cell>
          <table:table-cell table:style-name="ce12N2" office:value-type="float" office:value="52.96">
            <text:p>5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152246000012855005000770414143833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1">
            <text:p>3070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3.49">
            <text:p>249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25.11">
            <text:p>2425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18">
            <text:p>0,091</text:p>
          </table:table-cell>
          <table:table-cell table:style-name="ce12N2" office:value-type="float" office:value="25.5">
            <text:p>25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93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2425.11">
            <text:p>2425,11</text:p>
          </table:table-cell>
          <table:table-cell table:style-name="ce12N2" office:value-type="float" office:value="169.75">
            <text:p>16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0511570260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7">
            <text:p>3070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2412">
            <text:p>0,092</text:p>
          </table:table-cell>
          <table:table-cell table:style-name="ce12N2" office:value-type="float" office:value="11.41">
            <text:p>1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99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433.98">
            <text:p>43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1139589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8">
            <text:p>3070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624">
            <text:p>0,006</text:p>
          </table:table-cell>
          <table:table-cell table:style-name="ce12N2" office:value-type="float" office:value="2.96">
            <text:p>2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2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117.08">
            <text:p>11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21799286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9">
            <text:p>3070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158.4">
            <text:p>15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158.4">
            <text:p>1515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">
            <text:p>0,036</text:p>
          </table:table-cell>
          <table:table-cell table:style-name="ce12N2" office:value-type="float" office:value="123.52">
            <text:p>12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15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30.81">
            <text:p>11130,81</text:p>
          </table:table-cell>
          <table:table-cell table:style-name="ce12N2" office:value-type="float" office:value="779.16">
            <text:p>77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317588986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0">
            <text:p>3070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86.95">
            <text:p>1038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53">
            <text:p>975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758">
            <text:p>3,076</text:p>
          </table:table-cell>
          <table:table-cell table:style-name="ce12N2" office:value-type="float" office:value="112.2">
            <text:p>1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8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33.95">
            <text:p>633,95</text:p>
          </table:table-cell>
          <table:table-cell table:style-name="ce12N2" office:value-type="float" office:value="9753">
            <text:p>9753,00</text:p>
          </table:table-cell>
          <table:table-cell table:style-name="ce12N2" office:value-type="float" office:value="390.12">
            <text:p>39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416360108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1">
            <text:p>3070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35">
            <text:p>0,015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366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1355.67">
            <text:p>1355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51165422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2">
            <text:p>3070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00.1">
            <text:p>1210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61.6">
            <text:p>113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504">
            <text:p>0,120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10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38.5">
            <text:p>738,50</text:p>
          </table:table-cell>
          <table:table-cell table:style-name="ce12N2" office:value-type="float" office:value="11361.6">
            <text:p>11361,60</text:p>
          </table:table-cell>
          <table:table-cell table:style-name="ce12N2" office:value-type="float" office:value="795.31">
            <text:p>79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610767865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3">
            <text:p>3070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592">
            <text:p>0,005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8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134.28">
            <text:p>134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718081381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4">
            <text:p>3070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59">
            <text:p>0,058</text:p>
          </table:table-cell>
          <table:table-cell table:style-name="ce12N2" office:value-type="float" office:value="33.61">
            <text:p>3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29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756.6">
            <text:p>7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81507891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5">
            <text:p>3070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26.6">
            <text:p>85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26.6">
            <text:p>852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5">
            <text:p>0,020</text:p>
          </table:table-cell>
          <table:table-cell table:style-name="ce12N2" office:value-type="float" office:value="69.48">
            <text:p>69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61.08">
            <text:p>6261,08</text:p>
          </table:table-cell>
          <table:table-cell table:style-name="ce12N2" office:value-type="float" office:value="438.28">
            <text:p>43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91582957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6">
            <text:p>3070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42.39">
            <text:p>1534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406">
            <text:p>1440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04">
            <text:p>0,074</text:p>
          </table:table-cell>
          <table:table-cell table:style-name="ce12N2" office:value-type="float" office:value="36.36">
            <text:p>36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342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36.39">
            <text:p>936,39</text:p>
          </table:table-cell>
          <table:table-cell table:style-name="ce12N2" office:value-type="float" office:value="14406">
            <text:p>14406,00</text:p>
          </table:table-cell>
          <table:table-cell table:style-name="ce12N2" office:value-type="float" office:value="1008.42">
            <text:p>100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51700246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7">
            <text:p>3070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5.93">
            <text:p>2910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182.8">
            <text:p>2818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334">
            <text:p>0,293</text:p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0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23.13">
            <text:p>923,13</text:p>
          </table:table-cell>
          <table:table-cell table:style-name="ce12N2" office:value-type="float" office:value="28182.8">
            <text:p>28182,80</text:p>
          </table:table-cell>
          <table:table-cell table:style-name="ce12N2" office:value-type="float" office:value="1972.8">
            <text:p>197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612840297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8">
            <text:p>3070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37.54">
            <text:p>453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60.6">
            <text:p>426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814">
            <text:p>0,045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3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276.94">
            <text:p>276,94</text:p>
          </table:table-cell>
          <table:table-cell table:style-name="ce12N2" office:value-type="float" office:value="4260.6">
            <text:p>4260,60</text:p>
          </table:table-cell>
          <table:table-cell table:style-name="ce12N2" office:value-type="float" office:value="298.24">
            <text:p>29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714842720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9">
            <text:p>307099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8.70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08">
            <text:p>559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08">
            <text:p>5590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7024">
            <text:p>0,570</text:p>
          </table:table-cell>
          <table:table-cell table:style-name="ce12N2" office:value-type="float" office:value="230.4">
            <text:p>23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08">
            <text:p>5590,08</text:p>
          </table:table-cell>
          <table:table-cell table:style-name="ce12N2" office:value-type="float" office:value="391.31">
            <text:p>39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87041743852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11">
            <text:p>307111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4.149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352.72">
            <text:p>4635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">
            <text:p>31,00</text:p>
          </table:table-cell>
          <table:table-cell table:style-name="ce12N2" office:value-type="float" office:value="45598.9">
            <text:p>4559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152523">
            <text:p>7,153</text:p>
          </table:table-cell>
          <table:table-cell table:style-name="ce12N2" office:value-type="float" office:value="8613.53">
            <text:p>861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35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53.82">
            <text:p>753,82</text:p>
          </table:table-cell>
          <table:table-cell table:style-name="ce12N2" office:value-type="float" office:value="45598.9">
            <text:p>45598,90</text:p>
          </table:table-cell>
          <table:table-cell table:style-name="ce12N2" office:value-type="float" office:value="1832.5">
            <text:p>183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2741051000185550550003041491306894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19">
            <text:p>30711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6.6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201.51">
            <text:p>115201,51</text:p>
          </table:table-cell>
          <table:table-cell table:style-name="ce12N2" office:value-type="float" office:value="5458.35">
            <text:p>5458,35</text:p>
          </table:table-cell>
          <table:table-cell table:style-name="ce12N2" office:value-type="float" office:value="70">
            <text:p>70,00</text:p>
          </table:table-cell>
          <table:table-cell table:style-name="ce12N2" office:value-type="float" office:value="109166.42">
            <text:p>109166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38377">
            <text:p>5,738</text:p>
          </table:table-cell>
          <table:table-cell table:style-name="ce12N2" office:value-type="float" office:value="5043.2">
            <text:p>504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5.201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.38">
            <text:p>96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811.13">
            <text:p>9811,13</text:p>
          </table:table-cell>
          <table:table-cell table:style-name="ce12N2" office:value-type="float" office:value="103708.07">
            <text:p>103708,07</text:p>
          </table:table-cell>
          <table:table-cell table:style-name="ce12N2" office:value-type="float" office:value="4377.25">
            <text:p>437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300.9">
            <text:p>9300,90</text:p>
          </table:table-cell>
          <table:table-cell table:style-name="ce12N2" office:value-type="float" office:value="1682.31">
            <text:p>1682,31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66851272645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3">
            <text:p>307123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2.67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35.72">
            <text:p>1123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882.05">
            <text:p>10882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73">
            <text:p>25,137</text:p>
          </table:table-cell>
          <table:table-cell table:style-name="ce12N2" office:value-type="float" office:value="490.74">
            <text:p>49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3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3">
            <text:p>44,5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53.67">
            <text:p>353,67</text:p>
          </table:table-cell>
          <table:table-cell table:style-name="ce12N2" office:value-type="float" office:value="10882.05">
            <text:p>10882,05</text:p>
          </table:table-cell>
          <table:table-cell table:style-name="ce12N2" office:value-type="float" office:value="761.74">
            <text:p>76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7642862000248550020000126701349019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4">
            <text:p>307124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6.7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9.86">
            <text:p>3809,86</text:p>
          </table:table-cell>
          <table:table-cell table:style-name="ce12N2" office:value-type="float" office:value="107.4">
            <text:p>107,40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78.8">
            <text:p>357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9184">
            <text:p>8,918</text:p>
          </table:table-cell>
          <table:table-cell table:style-name="ce12N2" office:value-type="float" office:value="308">
            <text:p>30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0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38.46">
            <text:p>338,46</text:p>
          </table:table-cell>
          <table:table-cell table:style-name="ce12N2" office:value-type="float" office:value="3471.4">
            <text:p>3471,40</text:p>
          </table:table-cell>
          <table:table-cell table:style-name="ce12N2" office:value-type="float" office:value="138.86">
            <text:p>13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67371763048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5">
            <text:p>307125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2.6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1.63">
            <text:p>19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60.69">
            <text:p>1860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">
            <text:p>0,023</text:p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81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20.94">
            <text:p>120,94</text:p>
          </table:table-cell>
          <table:table-cell table:style-name="ce12N2" office:value-type="float" office:value="1860.69">
            <text:p>1860,69</text:p>
          </table:table-cell>
          <table:table-cell table:style-name="ce12N2" office:value-type="float" office:value="74.43">
            <text:p>7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76428620002485500200001268116242455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1">
            <text:p>30713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7.0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5.18">
            <text:p>1325,18</text:p>
          </table:table-cell>
          <table:table-cell table:style-name="ce12N2" office:value-type="float" office:value="63.55">
            <text:p>63,55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71">
            <text:p>127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87">
            <text:p>0,071</text:p>
          </table:table-cell>
          <table:table-cell table:style-name="ce12N2" office:value-type="float" office:value="167.8">
            <text:p>16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.41">
            <text:p>94,4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17.73">
            <text:p>117,73</text:p>
          </table:table-cell>
          <table:table-cell table:style-name="ce12N2" office:value-type="float" office:value="1207.45">
            <text:p>1207,45</text:p>
          </table:table-cell>
          <table:table-cell table:style-name="ce12N2" office:value-type="float" office:value="48.3">
            <text:p>4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70191133141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4">
            <text:p>307134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2.5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49.7">
            <text:p>18949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7706.49">
            <text:p>17706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41169">
            <text:p>1,641</text:p>
          </table:table-cell>
          <table:table-cell table:style-name="ce12N2" office:value-type="float" office:value="416.82">
            <text:p>416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49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">
            <text:p>5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243.21">
            <text:p>1243,21</text:p>
          </table:table-cell>
          <table:table-cell table:style-name="ce12N2" office:value-type="float" office:value="17706.49">
            <text:p>17706,49</text:p>
          </table:table-cell>
          <table:table-cell table:style-name="ce12N2" office:value-type="float" office:value="1239.46">
            <text:p>12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25771477606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8">
            <text:p>307138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2.5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7.95">
            <text:p>42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6.8">
            <text:p>40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3">
            <text:p>0,021</text:p>
          </table:table-cell>
          <table:table-cell table:style-name="ce12N2" office:value-type="float" office:value="8.52">
            <text:p>8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7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21.15">
            <text:p>21,15</text:p>
          </table:table-cell>
          <table:table-cell table:style-name="ce12N2" office:value-type="float" office:value="406.8">
            <text:p>406,80</text:p>
          </table:table-cell>
          <table:table-cell table:style-name="ce12N2" office:value-type="float" office:value="28.48">
            <text:p>2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256611000028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8">
            <text:p>30714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6.76">
            <text:p>103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69.54">
            <text:p>96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616">
            <text:p>0,054</text:p>
          </table:table-cell>
          <table:table-cell table:style-name="ce12N2" office:value-type="float" office:value="11.62">
            <text:p>1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3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7.22">
            <text:p>67,22</text:p>
          </table:table-cell>
          <table:table-cell table:style-name="ce12N2" office:value-type="float" office:value="969.54">
            <text:p>969,54</text:p>
          </table:table-cell>
          <table:table-cell table:style-name="ce12N2" office:value-type="float" office:value="67.87">
            <text:p>6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1315702955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9">
            <text:p>30714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6.45">
            <text:p>144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8.17">
            <text:p>1358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04">
            <text:p>0,041</text:p>
          </table:table-cell>
          <table:table-cell table:style-name="ce12N2" office:value-type="float" office:value="28.8">
            <text:p>2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6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88.28">
            <text:p>88,28</text:p>
          </table:table-cell>
          <table:table-cell table:style-name="ce12N2" office:value-type="float" office:value="1358.17">
            <text:p>1358,17</text:p>
          </table:table-cell>
          <table:table-cell table:style-name="ce12N2" office:value-type="float" office:value="54.33">
            <text:p>5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151589236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0">
            <text:p>307150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4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0.72">
            <text:p>37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5.32">
            <text:p>356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65">
            <text:p>0,137</text:p>
          </table:table-cell>
          <table:table-cell table:style-name="ce12N2" office:value-type="float" office:value="171.6">
            <text:p>1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85.4">
            <text:p>185,40</text:p>
          </table:table-cell>
          <table:table-cell table:style-name="ce12N2" office:value-type="float" office:value="3565.32">
            <text:p>3565,32</text:p>
          </table:table-cell>
          <table:table-cell table:style-name="ce12N2" office:value-type="float" office:value="249.57">
            <text:p>24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498719398157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1">
            <text:p>307151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4.9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68.74">
            <text:p>626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71.42">
            <text:p>6071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299.236">
            <text:p>21299,236</text:p>
          </table:table-cell>
          <table:table-cell table:style-name="ce12N2" office:value-type="float" office:value="207.81">
            <text:p>207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6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97.32">
            <text:p>197,32</text:p>
          </table:table-cell>
          <table:table-cell table:style-name="ce12N2" office:value-type="float" office:value="6071.42">
            <text:p>6071,42</text:p>
          </table:table-cell>
          <table:table-cell table:style-name="ce12N2" office:value-type="float" office:value="425">
            <text:p>4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498818391826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3">
            <text:p>3071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7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903">
            <text:p>4390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903">
            <text:p>4390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">
            <text:p>0,150</text:p>
          </table:table-cell>
          <table:table-cell table:style-name="ce12N2" office:value-type="float" office:value="50">
            <text:p>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90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903">
            <text:p>43903,00</text:p>
          </table:table-cell>
          <table:table-cell table:style-name="ce12N2" office:value-type="float" office:value="3073.21">
            <text:p>3073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73791008430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4">
            <text:p>307154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4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634.51">
            <text:p>5563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238.98">
            <text:p>52238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199">
            <text:p>1,720</text:p>
          </table:table-cell>
          <table:table-cell table:style-name="ce12N2" office:value-type="float" office:value="50">
            <text:p>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.63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395.53">
            <text:p>3395,53</text:p>
          </table:table-cell>
          <table:table-cell table:style-name="ce12N2" office:value-type="float" office:value="52238.98">
            <text:p>52238,98</text:p>
          </table:table-cell>
          <table:table-cell table:style-name="ce12N2" office:value-type="float" office:value="2089.56">
            <text:p>208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40391839776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5">
            <text:p>30715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9.28">
            <text:p>1230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1656.12">
            <text:p>11656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7161">
            <text:p>0,672</text:p>
          </table:table-cell>
          <table:table-cell table:style-name="ce12N2" office:value-type="float" office:value="143.71">
            <text:p>143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0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53.16">
            <text:p>653,16</text:p>
          </table:table-cell>
          <table:table-cell table:style-name="ce12N2" office:value-type="float" office:value="11656.12">
            <text:p>11656,12</text:p>
          </table:table-cell>
          <table:table-cell table:style-name="ce12N2" office:value-type="float" office:value="815.92">
            <text:p>81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091570355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7">
            <text:p>307157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4.3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1785.78">
            <text:p>41178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11785.78">
            <text:p>411785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5.7711">
            <text:p>175,771</text:p>
          </table:table-cell>
          <table:table-cell table:style-name="ce12N2" office:value-type="float" office:value="5413.9">
            <text:p>54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1.785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1785.78">
            <text:p>411785,78</text:p>
          </table:table-cell>
          <table:table-cell table:style-name="ce12N2" office:value-type="float" office:value="28825">
            <text:p>288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43721449861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8">
            <text:p>30715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98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89.75">
            <text:p>288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52.4">
            <text:p>275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73">
            <text:p>0,055</text:p>
          </table:table-cell>
          <table:table-cell table:style-name="ce12N2" office:value-type="float" office:value="32.57">
            <text:p>32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89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37.35">
            <text:p>137,35</text:p>
          </table:table-cell>
          <table:table-cell table:style-name="ce12N2" office:value-type="float" office:value="2752.4">
            <text:p>2752,40</text:p>
          </table:table-cell>
          <table:table-cell table:style-name="ce12N2" office:value-type="float" office:value="192.67">
            <text:p>19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9851651758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0">
            <text:p>30716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9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5.52">
            <text:p>352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377.7">
            <text:p>337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06">
            <text:p>0,035</text:p>
          </table:table-cell>
          <table:table-cell table:style-name="ce12N2" office:value-type="float" office:value="4.21">
            <text:p>4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25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47.82">
            <text:p>147,82</text:p>
          </table:table-cell>
          <table:table-cell table:style-name="ce12N2" office:value-type="float" office:value="3377.7">
            <text:p>3377,70</text:p>
          </table:table-cell>
          <table:table-cell table:style-name="ce12N2" office:value-type="float" office:value="236.44">
            <text:p>23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98718625095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4">
            <text:p>307164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7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85">
            <text:p>3,948</text:p>
          </table:table-cell>
          <table:table-cell table:style-name="ce12N2" office:value-type="float" office:value="1124.8">
            <text:p>1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0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2733.36">
            <text:p>273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827610000142550010000675741814316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6">
            <text:p>307176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6.5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54">
            <text:p>735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67.9">
            <text:p>596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37784">
            <text:p>16,378</text:p>
          </table:table-cell>
          <table:table-cell table:style-name="ce12N2" office:value-type="float" office:value="188.69">
            <text:p>188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5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67.9">
            <text:p>5967,90</text:p>
          </table:table-cell>
          <table:table-cell table:style-name="ce12N2" office:value-type="float" office:value="417.75">
            <text:p>41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19.29">
            <text:p>9019,29</text:p>
          </table:table-cell>
          <table:table-cell table:style-name="ce12N2" office:value-type="float" office:value="1386.1">
            <text:p>1386,1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370081450001495500100010650314022734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7">
            <text:p>307177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0.54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13.72">
            <text:p>1291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913.72">
            <text:p>12913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3926">
            <text:p>2,639</text:p>
          </table:table-cell>
          <table:table-cell table:style-name="ce12N2" office:value-type="float" office:value="472">
            <text:p>4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913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13.72">
            <text:p>12913,72</text:p>
          </table:table-cell>
          <table:table-cell table:style-name="ce12N2" office:value-type="float" office:value="903.96">
            <text:p>90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758019020025015500000082054110772648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8">
            <text:p>307178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0.54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365.48">
            <text:p>10736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7365.48">
            <text:p>107365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9.186876">
            <text:p>29,187</text:p>
          </table:table-cell>
          <table:table-cell table:style-name="ce12N2" office:value-type="float" office:value="6714.4">
            <text:p>671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7.365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365.48">
            <text:p>107365,48</text:p>
          </table:table-cell>
          <table:table-cell table:style-name="ce12N2" office:value-type="float" office:value="7515.58">
            <text:p>751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758019020025015500000082054210024865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9">
            <text:p>307179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0.54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20.8">
            <text:p>1982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820.8">
            <text:p>1982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89504">
            <text:p>8,895</text:p>
          </table:table-cell>
          <table:table-cell table:style-name="ce12N2" office:value-type="float" office:value="2356">
            <text:p>235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82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820.8">
            <text:p>19820,80</text:p>
          </table:table-cell>
          <table:table-cell table:style-name="ce12N2" office:value-type="float" office:value="1387.46">
            <text:p>1387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758019020025015500000082054313473966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4">
            <text:p>30718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4775">
            <text:p>1,648</text:p>
          </table:table-cell>
          <table:table-cell table:style-name="ce12N2" office:value-type="float" office:value="299.7">
            <text:p>29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81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1316.93">
            <text:p>131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41805086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5">
            <text:p>30718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591">
            <text:p>0,659</text:p>
          </table:table-cell>
          <table:table-cell table:style-name="ce12N2" office:value-type="float" office:value="119.88">
            <text:p>119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25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526.77">
            <text:p>52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51093286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6">
            <text:p>3071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62494">
            <text:p>11,625</text:p>
          </table:table-cell>
          <table:table-cell table:style-name="ce12N2" office:value-type="float" office:value="4137.72">
            <text:p>41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32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5341.03">
            <text:p>534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71888472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7">
            <text:p>30718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4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1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281.23">
            <text:p>28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4601465598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8">
            <text:p>30718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86.85">
            <text:p>2378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00">
            <text:p>3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78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48.74">
            <text:p>748,74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1612.67">
            <text:p>161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41584130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9">
            <text:p>30718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49.06">
            <text:p>2404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75">
            <text:p>327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4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72.03">
            <text:p>772,03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1622.23">
            <text:p>162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61568490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92">
            <text:p>307192</text:p>
          </table:table-cell>
          <table:table-cell table:style-name="ce0" table:number-columns-spanned="4" table:number-rows-spanned="1" office:value-type="string" calcext:value-type="string">
            <text:p>27.064 - LINNI INDUSTRIA DE ARTEFATOS DE ALUMINIO LTDA</text:p>
          </table:table-cell>
          <table:covered-table-cell table:number-columns-repeated="3"/>
          <table:table-cell table:style-name="ce0" office:value-type="string" calcext:value-type="string">
            <text:p>3.6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06.25">
            <text:p>2750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27500.44">
            <text:p>27500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18597">
            <text:p>0,719</text:p>
          </table:table-cell>
          <table:table-cell table:style-name="ce12N2" office:value-type="float" office:value="129.21">
            <text:p>129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506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">
            <text:p>4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81">
            <text:p>5,81</text:p>
          </table:table-cell>
          <table:table-cell table:style-name="ce12N2" office:value-type="float" office:value="27500.44">
            <text:p>27500,44</text:p>
          </table:table-cell>
          <table:table-cell table:style-name="ce12N2" office:value-type="float" office:value="5500.02">
            <text:p>550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39982555000111550010000036731973152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03">
            <text:p>307203</text:p>
          </table:table-cell>
          <table:table-cell table:style-name="ce0" table:number-columns-spanned="4" table:number-rows-spanned="1" office:value-type="string" calcext:value-type="string">
            <text:p>31.250 - MONT MAGNO FIXADORES LTDA</text:p>
          </table:table-cell>
          <table:covered-table-cell table:number-columns-repeated="3"/>
          <table:table-cell table:style-name="ce0" office:value-type="string" calcext:value-type="string">
            <text:p>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99.25">
            <text:p>3409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30719.25">
            <text:p>30719,25</text:p>
          </table:table-cell>
          <table:table-cell table:style-name="ce12N2" office:value-type="float" office:value="3380">
            <text:p>3380,00</text:p>
          </table:table-cell>
          <table:table-cell table:style-name="ce12N3" office:value-type="float" office:value="3.438">
            <text:p>3,438</text:p>
          </table:table-cell>
          <table:table-cell table:style-name="ce12N2" office:value-type="float" office:value="2299.75">
            <text:p>2299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099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099.25">
            <text:p>34099,25</text:p>
          </table:table-cell>
          <table:table-cell table:style-name="ce12N2" office:value-type="float" office:value="1374.21">
            <text:p>137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54205780001815500100000280611555342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08">
            <text:p>307208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3.5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8.77">
            <text:p>379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79.2">
            <text:p>367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488">
            <text:p>0,465</text:p>
          </table:table-cell>
          <table:table-cell table:style-name="ce12N2" office:value-type="float" office:value="78">
            <text:p>7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98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19.57">
            <text:p>119,57</text:p>
          </table:table-cell>
          <table:table-cell table:style-name="ce12N2" office:value-type="float" office:value="3679.2">
            <text:p>3679,20</text:p>
          </table:table-cell>
          <table:table-cell table:style-name="ce12N2" office:value-type="float" office:value="257.54">
            <text:p>25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350018557382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1">
            <text:p>30721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81.8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06.74">
            <text:p>3760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363.87">
            <text:p>37363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58732">
            <text:p>6,259</text:p>
          </table:table-cell>
          <table:table-cell table:style-name="ce12N2" office:value-type="float" office:value="19552">
            <text:p>1955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60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42.87">
            <text:p>242,87</text:p>
          </table:table-cell>
          <table:table-cell table:style-name="ce12N2" office:value-type="float" office:value="37363.87">
            <text:p>37363,87</text:p>
          </table:table-cell>
          <table:table-cell table:style-name="ce12N2" office:value-type="float" office:value="2615.47">
            <text:p>261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818321541556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3">
            <text:p>307213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077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85.76">
            <text:p>898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743.23">
            <text:p>8743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472">
            <text:p>0,020</text:p>
          </table:table-cell>
          <table:table-cell table:style-name="ce12N2" office:value-type="float" office:value="47.51">
            <text:p>47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85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42.53">
            <text:p>242,53</text:p>
          </table:table-cell>
          <table:table-cell table:style-name="ce12N2" office:value-type="float" office:value="8743.23">
            <text:p>8743,23</text:p>
          </table:table-cell>
          <table:table-cell table:style-name="ce12N2" office:value-type="float" office:value="612.03">
            <text:p>61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07717420732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4">
            <text:p>30721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0.09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52">
            <text:p>0,367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10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182.74">
            <text:p>18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0098175720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7">
            <text:p>307217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4.610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58.87">
            <text:p>495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02.78">
            <text:p>4802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775">
            <text:p>1,658</text:p>
          </table:table-cell>
          <table:table-cell table:style-name="ce12N2" office:value-type="float" office:value="940">
            <text:p>9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5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56.09">
            <text:p>156,09</text:p>
          </table:table-cell>
          <table:table-cell table:style-name="ce12N2" office:value-type="float" office:value="4802.78">
            <text:p>4802,78</text:p>
          </table:table-cell>
          <table:table-cell table:style-name="ce12N2" office:value-type="float" office:value="576.33">
            <text:p>57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33081704002210550180000846101160176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8">
            <text:p>307218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4.596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86.93">
            <text:p>1288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886.93">
            <text:p>12886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45">
            <text:p>0,054</text:p>
          </table:table-cell>
          <table:table-cell table:style-name="ce12N2" office:value-type="float" office:value="150">
            <text:p>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886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86.93">
            <text:p>12886,93</text:p>
          </table:table-cell>
          <table:table-cell table:style-name="ce12N2" office:value-type="float" office:value="1546.43">
            <text:p>154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330817040022105501800008459612071161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0">
            <text:p>3072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107.95">
            <text:p>10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415303875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3">
            <text:p>30722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3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192.72">
            <text:p>19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01044736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5">
            <text:p>30722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63.62">
            <text:p>6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6142473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6">
            <text:p>3072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8">
            <text:p>0,003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215.89">
            <text:p>215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31559226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7">
            <text:p>3072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52">
            <text:p>0,001</text:p>
          </table:table-cell>
          <table:table-cell table:style-name="ce12N2" office:value-type="float" office:value="9.65">
            <text:p>9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590.32">
            <text:p>59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91857476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8">
            <text:p>307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8">
            <text:p>0,000</text:p>
          </table:table-cell>
          <table:table-cell table:style-name="ce12N2" office:value-type="float" office:value="3.89">
            <text:p>3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05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189.4">
            <text:p>18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21807035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9">
            <text:p>30722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4.3">
            <text:p>316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1.17">
            <text:p>297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656">
            <text:p>0,047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93.13">
            <text:p>193,13</text:p>
          </table:table-cell>
          <table:table-cell table:style-name="ce12N2" office:value-type="float" office:value="2971.17">
            <text:p>2971,17</text:p>
          </table:table-cell>
          <table:table-cell table:style-name="ce12N2" office:value-type="float" office:value="118.85">
            <text:p>11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811277077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0">
            <text:p>3072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205.07">
            <text:p>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11819923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2">
            <text:p>3072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2.45">
            <text:p>424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3.52">
            <text:p>398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056">
            <text:p>0,012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58.93">
            <text:p>258,93</text:p>
          </table:table-cell>
          <table:table-cell table:style-name="ce12N2" office:value-type="float" office:value="3983.52">
            <text:p>3983,52</text:p>
          </table:table-cell>
          <table:table-cell table:style-name="ce12N2" office:value-type="float" office:value="278.85">
            <text:p>27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91687859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3">
            <text:p>3072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63.67">
            <text:p>636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75.28">
            <text:p>59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84">
            <text:p>0,018</text:p>
          </table:table-cell>
          <table:table-cell table:style-name="ce12N2" office:value-type="float" office:value="7.06">
            <text:p>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63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88.39">
            <text:p>388,39</text:p>
          </table:table-cell>
          <table:table-cell table:style-name="ce12N2" office:value-type="float" office:value="5975.28">
            <text:p>5975,28</text:p>
          </table:table-cell>
          <table:table-cell table:style-name="ce12N2" office:value-type="float" office:value="418.27">
            <text:p>41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819941113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4">
            <text:p>3072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4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117.9">
            <text:p>11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51611884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6">
            <text:p>3072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26">
            <text:p>0,001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2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289.07">
            <text:p>28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71533603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7">
            <text:p>3072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2">
            <text:p>0,001</text:p>
          </table:table-cell>
          <table:table-cell table:style-name="ce12N2" office:value-type="float" office:value="15.55">
            <text:p>1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9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797.45">
            <text:p>79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313228677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8">
            <text:p>3072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5.34">
            <text:p>96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6.42">
            <text:p>906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28">
            <text:p>0,005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5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58.92">
            <text:p>58,92</text:p>
          </table:table-cell>
          <table:table-cell table:style-name="ce12N2" office:value-type="float" office:value="906.42">
            <text:p>906,42</text:p>
          </table:table-cell>
          <table:table-cell table:style-name="ce12N2" office:value-type="float" office:value="63.45">
            <text:p>6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710700137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9">
            <text:p>3072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02">
            <text:p>0,060</text:p>
          </table:table-cell>
          <table:table-cell table:style-name="ce12N2" office:value-type="float" office:value="36.35">
            <text:p>36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812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1526.85">
            <text:p>152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01617954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0">
            <text:p>3072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782.27">
            <text:p>43478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433693.99">
            <text:p>433693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679331">
            <text:p>17,679</text:p>
          </table:table-cell>
          <table:table-cell table:style-name="ce12N2" office:value-type="float" office:value="1691.18">
            <text:p>169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4.782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088.28">
            <text:p>1088,28</text:p>
          </table:table-cell>
          <table:table-cell table:style-name="ce12N2" office:value-type="float" office:value="430570.54">
            <text:p>430570,54</text:p>
          </table:table-cell>
          <table:table-cell table:style-name="ce12N2" office:value-type="float" office:value="25868.84">
            <text:p>2586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91906483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1">
            <text:p>3072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">
            <text:p>0,001</text:p>
          </table:table-cell>
          <table:table-cell table:style-name="ce12N2" office:value-type="float" office:value="50.85">
            <text:p>50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508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2065.61">
            <text:p>206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119268481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6">
            <text:p>30724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0.6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71.78">
            <text:p>10637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06243.6">
            <text:p>10624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413816">
            <text:p>7,414</text:p>
          </table:table-cell>
          <table:table-cell table:style-name="ce12N2" office:value-type="float" office:value="3329.13">
            <text:p>3329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.371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28.18">
            <text:p>128,18</text:p>
          </table:table-cell>
          <table:table-cell table:style-name="ce12N2" office:value-type="float" office:value="106243.6">
            <text:p>106243,60</text:p>
          </table:table-cell>
          <table:table-cell table:style-name="ce12N2" office:value-type="float" office:value="6817.63">
            <text:p>681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06791202127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7">
            <text:p>30724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96.46">
            <text:p>1689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364.61">
            <text:p>16364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3408">
            <text:p>0,663</text:p>
          </table:table-cell>
          <table:table-cell table:style-name="ce12N2" office:value-type="float" office:value="243.9">
            <text:p>2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9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531.85">
            <text:p>531,85</text:p>
          </table:table-cell>
          <table:table-cell table:style-name="ce12N2" office:value-type="float" office:value="16364.61">
            <text:p>16364,61</text:p>
          </table:table-cell>
          <table:table-cell table:style-name="ce12N2" office:value-type="float" office:value="1145.52">
            <text:p>114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015711347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8">
            <text:p>30724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63.3">
            <text:p>1026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40.24">
            <text:p>994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9232">
            <text:p>0,389</text:p>
          </table:table-cell>
          <table:table-cell table:style-name="ce12N2" office:value-type="float" office:value="143.1">
            <text:p>14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6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23.06">
            <text:p>323,06</text:p>
          </table:table-cell>
          <table:table-cell table:style-name="ce12N2" office:value-type="float" office:value="9940.24">
            <text:p>9940,24</text:p>
          </table:table-cell>
          <table:table-cell table:style-name="ce12N2" office:value-type="float" office:value="695.82">
            <text:p>695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21571134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9">
            <text:p>30724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2.12">
            <text:p>542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51.45">
            <text:p>5251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632">
            <text:p>0,206</text:p>
          </table:table-cell>
          <table:table-cell table:style-name="ce12N2" office:value-type="float" office:value="75.6">
            <text:p>7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22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70.67">
            <text:p>170,67</text:p>
          </table:table-cell>
          <table:table-cell table:style-name="ce12N2" office:value-type="float" office:value="5251.45">
            <text:p>5251,45</text:p>
          </table:table-cell>
          <table:table-cell table:style-name="ce12N2" office:value-type="float" office:value="367.6">
            <text:p>3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615711347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53">
            <text:p>307253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6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64.83">
            <text:p>7616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76164.83">
            <text:p>76164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0.37785">
            <text:p>170,378</text:p>
          </table:table-cell>
          <table:table-cell table:style-name="ce12N2" office:value-type="float" office:value="292.85">
            <text:p>292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164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">
            <text:p>9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164.83">
            <text:p>76164,83</text:p>
          </table:table-cell>
          <table:table-cell table:style-name="ce12N2" office:value-type="float" office:value="3046.59">
            <text:p>304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05104359000122550010000046661649001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59">
            <text:p>307259</text:p>
          </table:table-cell>
          <table:table-cell table:style-name="ce0" table:number-columns-spanned="4" table:number-rows-spanned="1" office:value-type="string" calcext:value-type="string">
            <text:p>29.857 - J.H. DE OLIVEIRA FABRICACAO DE MANGUEIRAS LTDA</text:p>
          </table:table-cell>
          <table:covered-table-cell table:number-columns-repeated="3"/>
          <table:table-cell table:style-name="ce0" office:value-type="string" calcext:value-type="string">
            <text:p>6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69.3">
            <text:p>786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869.3">
            <text:p>786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5.431875">
            <text:p>35,432</text:p>
          </table:table-cell>
          <table:table-cell table:style-name="ce12N2" office:value-type="float" office:value="564">
            <text:p>5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6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69.3">
            <text:p>7869,30</text:p>
          </table:table-cell>
          <table:table-cell table:style-name="ce12N2" office:value-type="float" office:value="297.46">
            <text:p>297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20482520001165500100000067317929702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6">
            <text:p>307266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1.2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002.38">
            <text:p>20500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203736.89">
            <text:p>203736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3.74442">
            <text:p>283,744</text:p>
          </table:table-cell>
          <table:table-cell table:style-name="ce12N2" office:value-type="float" office:value="4482">
            <text:p>448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5.00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265.49">
            <text:p>1265,49</text:p>
          </table:table-cell>
          <table:table-cell table:style-name="ce12N2" office:value-type="float" office:value="203736.89">
            <text:p>203736,89</text:p>
          </table:table-cell>
          <table:table-cell table:style-name="ce12N2" office:value-type="float" office:value="13924.14">
            <text:p>1392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150751009135550010005612691904040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7">
            <text:p>30726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1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44.2">
            <text:p>394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625.47">
            <text:p>3625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969">
            <text:p>0,006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4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87">
            <text:p>54,8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18.73">
            <text:p>318,73</text:p>
          </table:table-cell>
          <table:table-cell table:style-name="ce12N2" office:value-type="float" office:value="3625.47">
            <text:p>3625,47</text:p>
          </table:table-cell>
          <table:table-cell table:style-name="ce12N2" office:value-type="float" office:value="229.32">
            <text:p>22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1610614618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8">
            <text:p>307268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59.1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390.76">
            <text:p>11639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6390.76">
            <text:p>11639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347337">
            <text:p>24,347</text:p>
          </table:table-cell>
          <table:table-cell table:style-name="ce12N2" office:value-type="float" office:value="25080.72">
            <text:p>2508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6.39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390.76">
            <text:p>116390,76</text:p>
          </table:table-cell>
          <table:table-cell table:style-name="ce12N2" office:value-type="float" office:value="13966.89">
            <text:p>1396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5913211884388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0">
            <text:p>3072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16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6.93">
            <text:p>315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64.25">
            <text:p>296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9">
            <text:p>0,002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6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92.68">
            <text:p>192,68</text:p>
          </table:table-cell>
          <table:table-cell table:style-name="ce12N2" office:value-type="float" office:value="2964.25">
            <text:p>2964,25</text:p>
          </table:table-cell>
          <table:table-cell table:style-name="ce12N2" office:value-type="float" office:value="207.5">
            <text:p>20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1671337729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4">
            <text:p>30727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0.09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5366">
            <text:p>4,054</text:p>
          </table:table-cell>
          <table:table-cell table:style-name="ce12N2" office:value-type="float" office:value="869">
            <text:p>86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9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2043.48">
            <text:p>204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00991380246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9">
            <text:p>307279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3.2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03.95">
            <text:p>2410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912.5">
            <text:p>2291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">
            <text:p>0,520</text:p>
          </table:table-cell>
          <table:table-cell table:style-name="ce12N2" office:value-type="float" office:value="16.25">
            <text:p>1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0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191.45">
            <text:p>1191,45</text:p>
          </table:table-cell>
          <table:table-cell table:style-name="ce12N2" office:value-type="float" office:value="22912.5">
            <text:p>22912,50</text:p>
          </table:table-cell>
          <table:table-cell table:style-name="ce12N2" office:value-type="float" office:value="1603.88">
            <text:p>160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327611000128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87">
            <text:p>307287</text:p>
          </table:table-cell>
          <table:table-cell table:style-name="ce0" table:number-columns-spanned="4" table:number-rows-spanned="1" office:value-type="string" calcext:value-type="string">
            <text:p>4.780 - BIANCO - COMERCIO ATACADISTA DE MATERIAL DE CONSTRUCAO LTDA</text:p>
          </table:table-cell>
          <table:covered-table-cell table:number-columns-repeated="3"/>
          <table:table-cell table:style-name="ce0" office:value-type="string" calcext:value-type="string">
            <text:p>24.813</text:p>
          </table:table-cell>
          <table:table-cell table:style-name="ce9" office:value-type="string" calcext:value-type="string">
            <text:p>7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785.44">
            <text:p>4578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85.44">
            <text:p>45785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03.5">
            <text:p>1303,500</text:p>
          </table:table-cell>
          <table:table-cell table:style-name="ce12N2" office:value-type="float" office:value="651.75">
            <text:p>65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785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85.44">
            <text:p>45785,44</text:p>
          </table:table-cell>
          <table:table-cell table:style-name="ce12N2" office:value-type="float" office:value="5494.25">
            <text:p>549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5105248370001935500700002481316683460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230">
            <text:p>230,00</text:p>
          </table:table-cell>
          <table:table-cell table:style-name="ce26N2" office:value-type="float" office:value="5629.3">
            <text:p>5629,30</text:p>
          </table:table-cell>
          <table:table-cell table:style-name="ce26N2" office:value-type="float" office:value="3380">
            <text:p>338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16117.01">
            <text:p>116117,01</text:p>
          </table:table-cell>
          <table:table-cell table:style-name="ce26N2" office:value-type="float" office:value="7805111.01">
            <text:p>7805111,01</text:p>
          </table:table-cell>
          <table:table-cell table:style-name="ce26N2" office:value-type="float" office:value="504409.31">
            <text:p>504409,3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121.62">
            <text:p>2121,62</text:p>
          </table:table-cell>
          <table:table-cell table:style-name="ce26N2" office:value-type="float" office:value="7945293.93">
            <text:p>7945293,9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0025.59">
            <text:p>50025,59</text:p>
          </table:table-cell>
          <table:table-cell table:style-name="ce26N2" office:value-type="float" office:value="8139.88">
            <text:p>8139,8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91685.821203">
            <text:p>91685,821</text:p>
          </table:table-cell>
          <table:table-cell table:style-name="ce26N2" office:value-type="float" office:value="7823286.34">
            <text:p>7823286,34</text:p>
          </table:table-cell>
          <table:table-cell table:style-name="ce26N2" office:value-type="float" office:value="7945293.93">
            <text:p>7945293,9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59198.3">
            <text:p>359198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6.29">
            <text:p>56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OBJETIV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410" meta:object-count="0"/>
    <meta:generator>LibreOffice/4.3.0.4$Windows_x86 LibreOffice_project/62ad5818884a2fc2e5780dd45466868d41009ec0</meta:generator>
  </office:meta>
</office:document-meta>
</file>