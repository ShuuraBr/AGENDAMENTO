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7/05/2026 07:16:19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4397">
            <text:p>304397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199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36.55">
            <text:p>3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606427740012095500100019933110060851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45">
            <text:p>306445</text:p>
          </table:table-cell>
          <table:table-cell table:style-name="ce0" table:number-columns-spanned="4" table:number-rows-spanned="1" office:value-type="string" calcext:value-type="string">
            <text:p>15.950 - D. PLASTIC IND. E COM. DE ARTIGOS DE PLASTICOS - EIRELI</text:p>
          </table:table-cell>
          <table:covered-table-cell table:number-columns-repeated="3"/>
          <table:table-cell table:style-name="ce0" office:value-type="string" calcext:value-type="string">
            <text:p>47.1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5.1309">
            <text:p>25,131</text:p>
          </table:table-cell>
          <table:table-cell table:style-name="ce12N2" office:value-type="float" office:value="134.5">
            <text:p>13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011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840.82">
            <text:p>840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333850670001405500100004716514205185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64">
            <text:p>306564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5.7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96.77">
            <text:p>6896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79.68">
            <text:p>6679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34232">
            <text:p>1,334</text:p>
          </table:table-cell>
          <table:table-cell table:style-name="ce12N2" office:value-type="float" office:value="257.3">
            <text:p>257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96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217.09">
            <text:p>217,09</text:p>
          </table:table-cell>
          <table:table-cell table:style-name="ce12N2" office:value-type="float" office:value="6679.68">
            <text:p>6679,68</text:p>
          </table:table-cell>
          <table:table-cell table:style-name="ce12N2" office:value-type="float" office:value="267.19">
            <text:p>26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96415200001585500100075574314412013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38">
            <text:p>306738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5.6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517.12">
            <text:p>4651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45882.06">
            <text:p>45882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87684">
            <text:p>3,388</text:p>
          </table:table-cell>
          <table:table-cell table:style-name="ce12N2" office:value-type="float" office:value="521.03">
            <text:p>521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.517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35.06">
            <text:p>635,06</text:p>
          </table:table-cell>
          <table:table-cell table:style-name="ce12N2" office:value-type="float" office:value="45882.06">
            <text:p>45882,06</text:p>
          </table:table-cell>
          <table:table-cell table:style-name="ce12N2" office:value-type="float" office:value="2573.89">
            <text:p>2573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9641520000158550010007556191248127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2">
            <text:p>306812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94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870.93">
            <text:p>9587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2853.2">
            <text:p>9285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958885">
            <text:p>7,959</text:p>
          </table:table-cell>
          <table:table-cell table:style-name="ce12N2" office:value-type="float" office:value="10340">
            <text:p>103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.870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017.73">
            <text:p>3017,73</text:p>
          </table:table-cell>
          <table:table-cell table:style-name="ce12N2" office:value-type="float" office:value="92853.2">
            <text:p>92853,20</text:p>
          </table:table-cell>
          <table:table-cell table:style-name="ce12N2" office:value-type="float" office:value="6499.72">
            <text:p>649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6674070001305500000001594010156650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3">
            <text:p>306813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941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128.42">
            <text:p>11412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0536">
            <text:p>11053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27456">
            <text:p>3,275</text:p>
          </table:table-cell>
          <table:table-cell table:style-name="ce12N2" office:value-type="float" office:value="13000">
            <text:p>13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4.128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592.42">
            <text:p>3592,42</text:p>
          </table:table-cell>
          <table:table-cell table:style-name="ce12N2" office:value-type="float" office:value="110536">
            <text:p>110536,00</text:p>
          </table:table-cell>
          <table:table-cell table:style-name="ce12N2" office:value-type="float" office:value="7737.52">
            <text:p>773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6674070001305500000001594110156650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5">
            <text:p>306815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94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056.53">
            <text:p>98056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94970">
            <text:p>9497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6816">
            <text:p>2,468</text:p>
          </table:table-cell>
          <table:table-cell table:style-name="ce12N2" office:value-type="float" office:value="7300">
            <text:p>73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.056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086.53">
            <text:p>3086,53</text:p>
          </table:table-cell>
          <table:table-cell table:style-name="ce12N2" office:value-type="float" office:value="94970">
            <text:p>94970,00</text:p>
          </table:table-cell>
          <table:table-cell table:style-name="ce12N2" office:value-type="float" office:value="6647.9">
            <text:p>664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6674070001305500000001594210156650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64">
            <text:p>307164</text:p>
          </table:table-cell>
          <table:table-cell table:style-name="ce0" table:number-columns-spanned="4" table:number-rows-spanned="1" office:value-type="string" calcext:value-type="string">
            <text:p>4.879 - AIEDEM COMERCIO DE PERFI DE METAIS LTDA</text:p>
          </table:table-cell>
          <table:covered-table-cell table:number-columns-repeated="3"/>
          <table:table-cell table:style-name="ce0" office:value-type="string" calcext:value-type="string">
            <text:p>67.5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048">
            <text:p>3904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39048">
            <text:p>3904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4785">
            <text:p>3,948</text:p>
          </table:table-cell>
          <table:table-cell table:style-name="ce12N2" office:value-type="float" office:value="1124.8">
            <text:p>112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.04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048">
            <text:p>39048,00</text:p>
          </table:table-cell>
          <table:table-cell table:style-name="ce12N2" office:value-type="float" office:value="2733.36">
            <text:p>273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28276100001425500100006757418143161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98">
            <text:p>307298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5.5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30.48">
            <text:p>7830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584">
            <text:p>758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52">
            <text:p>1,152</text:p>
          </table:table-cell>
          <table:table-cell table:style-name="ce12N2" office:value-type="float" office:value="864">
            <text:p>86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30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246.48">
            <text:p>246,48</text:p>
          </table:table-cell>
          <table:table-cell table:style-name="ce12N2" office:value-type="float" office:value="7584">
            <text:p>7584,00</text:p>
          </table:table-cell>
          <table:table-cell table:style-name="ce12N2" office:value-type="float" office:value="530.88">
            <text:p>530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20641500005185500100020555811940990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3">
            <text:p>3073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4.12">
            <text:p>70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04.12">
            <text:p>704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26">
            <text:p>0,019</text:p>
          </table:table-cell>
          <table:table-cell table:style-name="ce12N2" office:value-type="float" office:value="3.3">
            <text:p>3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4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4.12">
            <text:p>704,12</text:p>
          </table:table-cell>
          <table:table-cell table:style-name="ce12N2" office:value-type="float" office:value="49.29">
            <text:p>49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419457750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4">
            <text:p>3073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05.25">
            <text:p>17705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705.25">
            <text:p>17705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84">
            <text:p>0,001</text:p>
          </table:table-cell>
          <table:table-cell table:style-name="ce12N2" office:value-type="float" office:value="30.51">
            <text:p>30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705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05.25">
            <text:p>17705,25</text:p>
          </table:table-cell>
          <table:table-cell table:style-name="ce12N2" office:value-type="float" office:value="1239.37">
            <text:p>1239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516079230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5">
            <text:p>3073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70.75">
            <text:p>1377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770.75">
            <text:p>13770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32">
            <text:p>0,001</text:p>
          </table:table-cell>
          <table:table-cell table:style-name="ce12N2" office:value-type="float" office:value="23.73">
            <text:p>23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770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770.75">
            <text:p>13770,75</text:p>
          </table:table-cell>
          <table:table-cell table:style-name="ce12N2" office:value-type="float" office:value="963.95">
            <text:p>96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618288396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7">
            <text:p>3073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4.32">
            <text:p>111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4.32">
            <text:p>1114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48">
            <text:p>0,006</text:p>
          </table:table-cell>
          <table:table-cell table:style-name="ce12N2" office:value-type="float" office:value="1.18">
            <text:p>1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14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4.32">
            <text:p>1114,32</text:p>
          </table:table-cell>
          <table:table-cell table:style-name="ce12N2" office:value-type="float" office:value="44.57">
            <text:p>44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813573769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8">
            <text:p>3073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.58">
            <text:p>27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8.58">
            <text:p>278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0.29">
            <text:p>0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8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8.58">
            <text:p>278,58</text:p>
          </table:table-cell>
          <table:table-cell table:style-name="ce12N2" office:value-type="float" office:value="11.14">
            <text:p>1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918271525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8">
            <text:p>30739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2.06">
            <text:p>352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2.06">
            <text:p>352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63">
            <text:p>0,010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2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2.06">
            <text:p>352,06</text:p>
          </table:table-cell>
          <table:table-cell table:style-name="ce12N2" office:value-type="float" office:value="24.64">
            <text:p>24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4914628338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9">
            <text:p>30739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12.36">
            <text:p>211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12.36">
            <text:p>2112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78">
            <text:p>0,058</text:p>
          </table:table-cell>
          <table:table-cell table:style-name="ce12N2" office:value-type="float" office:value="9.91">
            <text:p>9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12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12.36">
            <text:p>2112,36</text:p>
          </table:table-cell>
          <table:table-cell table:style-name="ce12N2" office:value-type="float" office:value="147.87">
            <text:p>14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5011808725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00">
            <text:p>30740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209.66">
            <text:p>22209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209.66">
            <text:p>22209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9016">
            <text:p>0,119</text:p>
          </table:table-cell>
          <table:table-cell table:style-name="ce12N2" office:value-type="float" office:value="56.34">
            <text:p>56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209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209.66">
            <text:p>22209,66</text:p>
          </table:table-cell>
          <table:table-cell table:style-name="ce12N2" office:value-type="float" office:value="1554.68">
            <text:p>155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5119027825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6">
            <text:p>307436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27.5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3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886.3">
            <text:p>47886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47886.3">
            <text:p>47886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931996">
            <text:p>7,932</text:p>
          </table:table-cell>
          <table:table-cell table:style-name="ce12N2" office:value-type="float" office:value="1295.38">
            <text:p>1295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.886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886.3">
            <text:p>47886,30</text:p>
          </table:table-cell>
          <table:table-cell table:style-name="ce12N2" office:value-type="float" office:value="3251.68">
            <text:p>325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2759919982976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5">
            <text:p>30744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8.96">
            <text:p>31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8.96">
            <text:p>31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28">
            <text:p>0,002</text:p>
          </table:table-cell>
          <table:table-cell table:style-name="ce12N2" office:value-type="float" office:value="1.11">
            <text:p>1,1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4.21">
            <text:p>234,21</text:p>
          </table:table-cell>
          <table:table-cell table:style-name="ce12N2" office:value-type="float" office:value="16.39">
            <text:p>16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515993631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6">
            <text:p>30744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67.74">
            <text:p>2467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67.74">
            <text:p>2467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224">
            <text:p>0,013</text:p>
          </table:table-cell>
          <table:table-cell table:style-name="ce12N2" office:value-type="float" office:value="6.26">
            <text:p>6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67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67.74">
            <text:p>2467,74</text:p>
          </table:table-cell>
          <table:table-cell table:style-name="ce12N2" office:value-type="float" office:value="172.74">
            <text:p>172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617416353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7">
            <text:p>3074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16.1">
            <text:p>3701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16.1">
            <text:p>37016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836">
            <text:p>0,198</text:p>
          </table:table-cell>
          <table:table-cell table:style-name="ce12N2" office:value-type="float" office:value="93.9">
            <text:p>9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.016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16.1">
            <text:p>37016,10</text:p>
          </table:table-cell>
          <table:table-cell table:style-name="ce12N2" office:value-type="float" office:value="2591.13">
            <text:p>2591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717983115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8">
            <text:p>3074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2.16">
            <text:p>107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72.16">
            <text:p>1072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384">
            <text:p>0,002</text:p>
          </table:table-cell>
          <table:table-cell table:style-name="ce12N2" office:value-type="float" office:value="2.69">
            <text:p>2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72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2.16">
            <text:p>1072,16</text:p>
          </table:table-cell>
          <table:table-cell table:style-name="ce12N2" office:value-type="float" office:value="75.05">
            <text:p>7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811667505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9">
            <text:p>3074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0831.73">
            <text:p>450831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">
            <text:p>91,00</text:p>
          </table:table-cell>
          <table:table-cell table:style-name="ce12N2" office:value-type="float" office:value="448672.28">
            <text:p>448672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.811394">
            <text:p>17,811</text:p>
          </table:table-cell>
          <table:table-cell table:style-name="ce12N2" office:value-type="float" office:value="1457.6">
            <text:p>1457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0.831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2159.45">
            <text:p>2159,45</text:p>
          </table:table-cell>
          <table:table-cell table:style-name="ce12N2" office:value-type="float" office:value="442130.72">
            <text:p>442130,72</text:p>
          </table:table-cell>
          <table:table-cell table:style-name="ce12N2" office:value-type="float" office:value="27913.85">
            <text:p>2791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914790971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50">
            <text:p>307450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56.8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4.37">
            <text:p>115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83.92">
            <text:p>1083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5926">
            <text:p>0,086</text:p>
          </table:table-cell>
          <table:table-cell table:style-name="ce12N2" office:value-type="float" office:value="13.08">
            <text:p>13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54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70.45">
            <text:p>70,45</text:p>
          </table:table-cell>
          <table:table-cell table:style-name="ce12N2" office:value-type="float" office:value="1083.92">
            <text:p>1083,92</text:p>
          </table:table-cell>
          <table:table-cell table:style-name="ce12N2" office:value-type="float" office:value="75.87">
            <text:p>7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502380001145500100135688212194930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51">
            <text:p>307451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56.8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36.84">
            <text:p>3036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851.5">
            <text:p>2851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6912">
            <text:p>0,277</text:p>
          </table:table-cell>
          <table:table-cell table:style-name="ce12N2" office:value-type="float" office:value="34.44">
            <text:p>34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36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85.34">
            <text:p>185,34</text:p>
          </table:table-cell>
          <table:table-cell table:style-name="ce12N2" office:value-type="float" office:value="2851.5">
            <text:p>2851,50</text:p>
          </table:table-cell>
          <table:table-cell table:style-name="ce12N2" office:value-type="float" office:value="199.6">
            <text:p>19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502380001145500100135688012995634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52">
            <text:p>307452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4.4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24.18">
            <text:p>1224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5.43">
            <text:p>1115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72">
            <text:p>0,067</text:p>
          </table:table-cell>
          <table:table-cell table:style-name="ce12N2" office:value-type="float" office:value="11.2">
            <text:p>1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24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08.75">
            <text:p>108,75</text:p>
          </table:table-cell>
          <table:table-cell table:style-name="ce12N2" office:value-type="float" office:value="1115.43">
            <text:p>1115,43</text:p>
          </table:table-cell>
          <table:table-cell table:style-name="ce12N2" office:value-type="float" office:value="78.08">
            <text:p>78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445915815552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68">
            <text:p>30746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885.24">
            <text:p>19885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671.59">
            <text:p>18671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601827">
            <text:p>5,602</text:p>
          </table:table-cell>
          <table:table-cell table:style-name="ce12N2" office:value-type="float" office:value="34.86">
            <text:p>34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885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213.65">
            <text:p>1213,65</text:p>
          </table:table-cell>
          <table:table-cell table:style-name="ce12N2" office:value-type="float" office:value="18671.59">
            <text:p>18671,59</text:p>
          </table:table-cell>
          <table:table-cell table:style-name="ce12N2" office:value-type="float" office:value="746.86">
            <text:p>74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7011911498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69">
            <text:p>307469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2.08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23.8">
            <text:p>202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23.8">
            <text:p>202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398">
            <text:p>0,114</text:p>
          </table:table-cell>
          <table:table-cell table:style-name="ce12N2" office:value-type="float" office:value="32.04">
            <text:p>32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23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23.8">
            <text:p>2023,80</text:p>
          </table:table-cell>
          <table:table-cell table:style-name="ce12N2" office:value-type="float" office:value="141.67">
            <text:p>141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208711401369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92">
            <text:p>3074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96.1">
            <text:p>119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96.1">
            <text:p>1196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73">
            <text:p>0,006</text:p>
          </table:table-cell>
          <table:table-cell table:style-name="ce12N2" office:value-type="float" office:value="4.17">
            <text:p>4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96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8.3">
            <text:p>878,30</text:p>
          </table:table-cell>
          <table:table-cell table:style-name="ce12N2" office:value-type="float" office:value="61.48">
            <text:p>61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9316854129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93">
            <text:p>30749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8.44">
            <text:p>478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78.44">
            <text:p>478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92">
            <text:p>0,002</text:p>
          </table:table-cell>
          <table:table-cell table:style-name="ce12N2" office:value-type="float" office:value="1.67">
            <text:p>1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8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1.32">
            <text:p>351,32</text:p>
          </table:table-cell>
          <table:table-cell table:style-name="ce12N2" office:value-type="float" office:value="24.59">
            <text:p>24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9219701740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94">
            <text:p>307494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7.3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07.78">
            <text:p>19607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18693.15">
            <text:p>18693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85932">
            <text:p>0,386</text:p>
          </table:table-cell>
          <table:table-cell table:style-name="ce12N2" office:value-type="float" office:value="107.63">
            <text:p>107,6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607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914.63">
            <text:p>914,63</text:p>
          </table:table-cell>
          <table:table-cell table:style-name="ce12N2" office:value-type="float" office:value="18693.15">
            <text:p>18693,15</text:p>
          </table:table-cell>
          <table:table-cell table:style-name="ce12N2" office:value-type="float" office:value="747.73">
            <text:p>747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730313264916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95">
            <text:p>307495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7.3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735.71">
            <text:p>111735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">
            <text:p>25,00</text:p>
          </table:table-cell>
          <table:table-cell table:style-name="ce12N2" office:value-type="float" office:value="104860.12">
            <text:p>104860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32063">
            <text:p>2,832</text:p>
          </table:table-cell>
          <table:table-cell table:style-name="ce12N2" office:value-type="float" office:value="608.49">
            <text:p>608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1.735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6">
            <text:p>3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6875.59">
            <text:p>6875,59</text:p>
          </table:table-cell>
          <table:table-cell table:style-name="ce12N2" office:value-type="float" office:value="104860.12">
            <text:p>104860,12</text:p>
          </table:table-cell>
          <table:table-cell table:style-name="ce12N2" office:value-type="float" office:value="4194.4">
            <text:p>419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730616014347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96">
            <text:p>307496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7.3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63.57">
            <text:p>2163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053.45">
            <text:p>2053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9915">
            <text:p>0,040</text:p>
          </table:table-cell>
          <table:table-cell table:style-name="ce12N2" office:value-type="float" office:value="15.75">
            <text:p>15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63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110.12">
            <text:p>110,12</text:p>
          </table:table-cell>
          <table:table-cell table:style-name="ce12N2" office:value-type="float" office:value="2053.45">
            <text:p>2053,45</text:p>
          </table:table-cell>
          <table:table-cell table:style-name="ce12N2" office:value-type="float" office:value="82.14">
            <text:p>8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730414892166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80">
            <text:p>30758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0.48">
            <text:p>1110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42.7">
            <text:p>1042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4833">
            <text:p>0,295</text:p>
          </table:table-cell>
          <table:table-cell table:style-name="ce12N2" office:value-type="float" office:value="3.82">
            <text:p>3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10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67.78">
            <text:p>67,78</text:p>
          </table:table-cell>
          <table:table-cell table:style-name="ce12N2" office:value-type="float" office:value="1042.7">
            <text:p>1042,70</text:p>
          </table:table-cell>
          <table:table-cell table:style-name="ce12N2" office:value-type="float" office:value="41.71">
            <text:p>41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9117153826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81">
            <text:p>307581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4.4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92.37">
            <text:p>8092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469">
            <text:p>746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45">
            <text:p>0,015</text:p>
          </table:table-cell>
          <table:table-cell table:style-name="ce12N2" office:value-type="float" office:value="17.85">
            <text:p>17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92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623.37">
            <text:p>623,37</text:p>
          </table:table-cell>
          <table:table-cell table:style-name="ce12N2" office:value-type="float" office:value="7469">
            <text:p>7469,00</text:p>
          </table:table-cell>
          <table:table-cell table:style-name="ce12N2" office:value-type="float" office:value="298.76">
            <text:p>298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445815721456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82">
            <text:p>307582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4.4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46.61">
            <text:p>6646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56.14">
            <text:p>6056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1">
            <text:p>0,012</text:p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46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590.47">
            <text:p>590,47</text:p>
          </table:table-cell>
          <table:table-cell table:style-name="ce12N2" office:value-type="float" office:value="6056.14">
            <text:p>6056,14</text:p>
          </table:table-cell>
          <table:table-cell table:style-name="ce12N2" office:value-type="float" office:value="242.25">
            <text:p>242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44571572146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83">
            <text:p>3075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9.54">
            <text:p>929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9.54">
            <text:p>929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48">
            <text:p>0,001</text:p>
          </table:table-cell>
          <table:table-cell table:style-name="ce12N2" office:value-type="float" office:value="0.79">
            <text:p>0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29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9.54">
            <text:p>929,54</text:p>
          </table:table-cell>
          <table:table-cell table:style-name="ce12N2" office:value-type="float" office:value="65.07">
            <text:p>65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9419752477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89">
            <text:p>30758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1.8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8.66">
            <text:p>328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8.6">
            <text:p>308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">
            <text:p>0,001</text:p>
          </table:table-cell>
          <table:table-cell table:style-name="ce12N2" office:value-type="float" office:value="1.4">
            <text:p>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8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20.06">
            <text:p>20,06</text:p>
          </table:table-cell>
          <table:table-cell table:style-name="ce12N2" office:value-type="float" office:value="308.6">
            <text:p>308,60</text:p>
          </table:table-cell>
          <table:table-cell table:style-name="ce12N2" office:value-type="float" office:value="21.6">
            <text:p>2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188712967961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92">
            <text:p>307592</text:p>
          </table:table-cell>
          <table:table-cell table:style-name="ce0" table:number-columns-spanned="4" table:number-rows-spanned="1" office:value-type="string" calcext:value-type="string">
            <text:p>5.700 - MARSCHALL IND. COM. IMP. EXP. LTDA</text:p>
          </table:table-cell>
          <table:covered-table-cell table:number-columns-repeated="3"/>
          <table:table-cell table:style-name="ce0" office:value-type="string" calcext:value-type="string">
            <text:p>723.80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80.35">
            <text:p>578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266.84">
            <text:p>5266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94025">
            <text:p>0,794</text:p>
          </table:table-cell>
          <table:table-cell table:style-name="ce12N2" office:value-type="float" office:value="145.05">
            <text:p>145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80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0.76">
            <text:p>40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513.51">
            <text:p>513,51</text:p>
          </table:table-cell>
          <table:table-cell table:style-name="ce12N2" office:value-type="float" office:value="5266.84">
            <text:p>5266,84</text:p>
          </table:table-cell>
          <table:table-cell table:style-name="ce12N2" office:value-type="float" office:value="210.68">
            <text:p>21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5021305250001775500300072380015315877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00">
            <text:p>307600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74.2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49">
            <text:p>204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84.5">
            <text:p>1984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">
            <text:p>0,003</text:p>
          </table:table-cell>
          <table:table-cell table:style-name="ce12N2" office:value-type="float" office:value="49.5">
            <text:p>49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4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64.5">
            <text:p>64,50</text:p>
          </table:table-cell>
          <table:table-cell table:style-name="ce12N2" office:value-type="float" office:value="1984.5">
            <text:p>1984,50</text:p>
          </table:table-cell>
          <table:table-cell table:style-name="ce12N2" office:value-type="float" office:value="138.92">
            <text:p>138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08083960005215500100087427116974982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06">
            <text:p>30760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1.20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35.21">
            <text:p>2135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68">
            <text:p>206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86">
            <text:p>0,003</text:p>
          </table:table-cell>
          <table:table-cell table:style-name="ce12N2" office:value-type="float" office:value="6.38">
            <text:p>6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35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5.56">
            <text:p>55,5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67.21">
            <text:p>67,21</text:p>
          </table:table-cell>
          <table:table-cell table:style-name="ce12N2" office:value-type="float" office:value="2068">
            <text:p>2068,00</text:p>
          </table:table-cell>
          <table:table-cell table:style-name="ce12N2" office:value-type="float" office:value="144.76">
            <text:p>14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120218675791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07">
            <text:p>30760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1.20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1.72">
            <text:p>1261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22">
            <text:p>122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9">
            <text:p>0,002</text:p>
          </table:table-cell>
          <table:table-cell table:style-name="ce12N2" office:value-type="float" office:value="3.77">
            <text:p>3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61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5.56">
            <text:p>55,5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39.72">
            <text:p>39,72</text:p>
          </table:table-cell>
          <table:table-cell table:style-name="ce12N2" office:value-type="float" office:value="1222">
            <text:p>1222,00</text:p>
          </table:table-cell>
          <table:table-cell table:style-name="ce12N2" office:value-type="float" office:value="85.54">
            <text:p>8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120311469010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12">
            <text:p>307612</text:p>
          </table:table-cell>
          <table:table-cell table:style-name="ce0" table:number-columns-spanned="4" table:number-rows-spanned="1" office:value-type="string" calcext:value-type="string">
            <text:p>571 - MAX METALURGICA</text:p>
          </table:table-cell>
          <table:covered-table-cell table:number-columns-repeated="3"/>
          <table:table-cell table:style-name="ce0" office:value-type="string" calcext:value-type="string">
            <text:p>179.8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56.25">
            <text:p>5256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5125.98">
            <text:p>5125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2.93093">
            <text:p>42,931</text:p>
          </table:table-cell>
          <table:table-cell table:style-name="ce12N2" office:value-type="float" office:value="332.15">
            <text:p>332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56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130.27">
            <text:p>130,27</text:p>
          </table:table-cell>
          <table:table-cell table:style-name="ce12N2" office:value-type="float" office:value="4912.66">
            <text:p>4912,66</text:p>
          </table:table-cell>
          <table:table-cell table:style-name="ce12N2" office:value-type="float" office:value="343.9">
            <text:p>343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19136810001345500100017983414629892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32">
            <text:p>30763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2.1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0955.92">
            <text:p>19095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">
            <text:p>41,00</text:p>
          </table:table-cell>
          <table:table-cell table:style-name="ce12N2" office:value-type="float" office:value="190700.26">
            <text:p>190700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252118">
            <text:p>12,252</text:p>
          </table:table-cell>
          <table:table-cell table:style-name="ce12N2" office:value-type="float" office:value="5183.76">
            <text:p>5183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0.95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255.66">
            <text:p>255,66</text:p>
          </table:table-cell>
          <table:table-cell table:style-name="ce12N2" office:value-type="float" office:value="190700.26">
            <text:p>190700,26</text:p>
          </table:table-cell>
          <table:table-cell table:style-name="ce12N2" office:value-type="float" office:value="12356.96">
            <text:p>1235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215117278369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34">
            <text:p>307634</text:p>
          </table:table-cell>
          <table:table-cell table:style-name="ce0" table:number-columns-spanned="4" table:number-rows-spanned="1" office:value-type="string" calcext:value-type="string">
            <text:p>480 - HAGA S/A INDUSTRIA E COMERCIO LTDA</text:p>
          </table:table-cell>
          <table:covered-table-cell table:number-columns-repeated="3"/>
          <table:table-cell table:style-name="ce0" office:value-type="string" calcext:value-type="string">
            <text:p>108.1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12.92">
            <text:p>441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412.92">
            <text:p>441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0708">
            <text:p>0,121</text:p>
          </table:table-cell>
          <table:table-cell table:style-name="ce12N2" office:value-type="float" office:value="44.16">
            <text:p>44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12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3">
            <text:p>3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12.92">
            <text:p>4412,92</text:p>
          </table:table-cell>
          <table:table-cell table:style-name="ce12N2" office:value-type="float" office:value="308.89">
            <text:p>308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5305409910001665500100010819113638401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35">
            <text:p>307635</text:p>
          </table:table-cell>
          <table:table-cell table:style-name="ce0" table:number-columns-spanned="4" table:number-rows-spanned="1" office:value-type="string" calcext:value-type="string">
            <text:p>38.606 - FIOLUX INDUSTRIA E COMERCIO LTDA</text:p>
          </table:table-cell>
          <table:covered-table-cell table:number-columns-repeated="3"/>
          <table:table-cell table:style-name="ce0" office:value-type="string" calcext:value-type="string">
            <text:p>20.5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71.5">
            <text:p>477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347.6">
            <text:p>434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194">
            <text:p>0,192</text:p>
          </table:table-cell>
          <table:table-cell table:style-name="ce12N2" office:value-type="float" office:value="46.92">
            <text:p>46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71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423.9">
            <text:p>423,90</text:p>
          </table:table-cell>
          <table:table-cell table:style-name="ce12N2" office:value-type="float" office:value="4347.6">
            <text:p>4347,60</text:p>
          </table:table-cell>
          <table:table-cell table:style-name="ce12N2" office:value-type="float" office:value="521.72">
            <text:p>521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22605964209140003425500100002050810093271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43">
            <text:p>307643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7.48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148.94">
            <text:p>25148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25148.94">
            <text:p>25148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605973">
            <text:p>3,606</text:p>
          </table:table-cell>
          <table:table-cell table:style-name="ce12N2" office:value-type="float" office:value="435.56">
            <text:p>435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148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148.94">
            <text:p>25148,94</text:p>
          </table:table-cell>
          <table:table-cell table:style-name="ce12N2" office:value-type="float" office:value="1760.43">
            <text:p>176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62935640001465500200033748612380551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55">
            <text:p>30765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5.48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422">
            <text:p>1342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422">
            <text:p>1342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46">
            <text:p>0,049</text:p>
          </table:table-cell>
          <table:table-cell table:style-name="ce12N2" office:value-type="float" office:value="17.54">
            <text:p>17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42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422">
            <text:p>13422,00</text:p>
          </table:table-cell>
          <table:table-cell table:style-name="ce12N2" office:value-type="float" office:value="939.54">
            <text:p>939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548618322876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59">
            <text:p>307659</text:p>
          </table:table-cell>
          <table:table-cell table:style-name="ce0" table:number-columns-spanned="4" table:number-rows-spanned="1" office:value-type="string" calcext:value-type="string">
            <text:p>24.768 - TOPMAX ACESSORIOS PARA CONSTRUCAO LTDA</text:p>
          </table:table-cell>
          <table:covered-table-cell table:number-columns-repeated="3"/>
          <table:table-cell table:style-name="ce0" office:value-type="string" calcext:value-type="string">
            <text:p>13.4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1.1">
            <text:p>89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91.1">
            <text:p>891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885">
            <text:p>0,029</text:p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1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1.1">
            <text:p>891,10</text:p>
          </table:table-cell>
          <table:table-cell table:style-name="ce12N2" office:value-type="float" office:value="62.37">
            <text:p>62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451237100001475500100001348119313687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69">
            <text:p>30766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4.40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65.92">
            <text:p>986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865.92">
            <text:p>9865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168">
            <text:p>0,012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86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65.92">
            <text:p>9865,92</text:p>
          </table:table-cell>
          <table:table-cell table:style-name="ce12N2" office:value-type="float" office:value="690.61">
            <text:p>69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440511770323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75">
            <text:p>30767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5.75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24.78">
            <text:p>452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24.78">
            <text:p>4524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149">
            <text:p>0,032</text:p>
          </table:table-cell>
          <table:table-cell table:style-name="ce12N2" office:value-type="float" office:value="8.64">
            <text:p>8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24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24.78">
            <text:p>4524,78</text:p>
          </table:table-cell>
          <table:table-cell table:style-name="ce12N2" office:value-type="float" office:value="316.73">
            <text:p>316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575519967283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88">
            <text:p>307688</text:p>
          </table:table-cell>
          <table:table-cell table:style-name="ce0" table:number-columns-spanned="4" table:number-rows-spanned="1" office:value-type="string" calcext:value-type="string">
            <text:p>781 - TUPY S.A</text:p>
          </table:table-cell>
          <table:covered-table-cell table:number-columns-repeated="3"/>
          <table:table-cell table:style-name="ce0" office:value-type="string" calcext:value-type="string">
            <text:p>613.83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018.3">
            <text:p>1301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12608.51">
            <text:p>12608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7304">
            <text:p>0,157</text:p>
          </table:table-cell>
          <table:table-cell table:style-name="ce12N2" office:value-type="float" office:value="172.38">
            <text:p>172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018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409.79">
            <text:p>409,79</text:p>
          </table:table-cell>
          <table:table-cell table:style-name="ce12N2" office:value-type="float" office:value="12608.51">
            <text:p>12608,51</text:p>
          </table:table-cell>
          <table:table-cell table:style-name="ce12N2" office:value-type="float" office:value="882.6">
            <text:p>88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46833740003005500300061383812268207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23">
            <text:p>307723</text:p>
          </table:table-cell>
          <table:table-cell table:style-name="ce0" table:number-columns-spanned="4" table:number-rows-spanned="1" office:value-type="string" calcext:value-type="string">
            <text:p>8.844 - COZIMAX MOVEIS MIRASSOL LTDA</text:p>
          </table:table-cell>
          <table:covered-table-cell table:number-columns-repeated="3"/>
          <table:table-cell table:style-name="ce0" office:value-type="string" calcext:value-type="string">
            <text:p>753.8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9.64">
            <text:p>539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39.64">
            <text:p>539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08">
            <text:p>0,101</text:p>
          </table:table-cell>
          <table:table-cell table:style-name="ce12N2" office:value-type="float" office:value="9.2">
            <text:p>9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9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08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20432010001005500100075388511189148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48">
            <text:p>307748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9.2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2.84">
            <text:p>51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00.2">
            <text:p>400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88">
            <text:p>0,022</text:p>
          </table:table-cell>
          <table:table-cell table:style-name="ce12N2" office:value-type="float" office:value="64">
            <text:p>6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12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7.74">
            <text:p>27,7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32.1">
            <text:p>32,10</text:p>
          </table:table-cell>
          <table:table-cell table:style-name="ce12N2" office:value-type="float" office:value="400.2">
            <text:p>400,20</text:p>
          </table:table-cell>
          <table:table-cell table:style-name="ce12N2" office:value-type="float" office:value="16.01">
            <text:p>16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45.32">
            <text:p>445,32</text:p>
          </table:table-cell>
          <table:table-cell table:style-name="ce12N2" office:value-type="float" office:value="80.54">
            <text:p>80,54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1920511404464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64">
            <text:p>307764</text:p>
          </table:table-cell>
          <table:table-cell table:style-name="ce0" table:number-columns-spanned="4" table:number-rows-spanned="1" office:value-type="string" calcext:value-type="string">
            <text:p>16.982 - PENINSULA IMPORTACAO E EXPORTACAO EIRELI</text:p>
          </table:table-cell>
          <table:covered-table-cell table:number-columns-repeated="3"/>
          <table:table-cell table:style-name="ce0" office:value-type="string" calcext:value-type="string">
            <text:p>28.9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531.53">
            <text:p>5053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47457.12">
            <text:p>47457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5283">
            <text:p>1,253</text:p>
          </table:table-cell>
          <table:table-cell table:style-name="ce12N2" office:value-type="float" office:value="321.52">
            <text:p>321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.531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3074.41">
            <text:p>3074,41</text:p>
          </table:table-cell>
          <table:table-cell table:style-name="ce12N2" office:value-type="float" office:value="47457.12">
            <text:p>47457,12</text:p>
          </table:table-cell>
          <table:table-cell table:style-name="ce12N2" office:value-type="float" office:value="1898.3">
            <text:p>189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02314360001075500100002890810734522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69">
            <text:p>307769</text:p>
          </table:table-cell>
          <table:table-cell table:style-name="ce0" table:number-columns-spanned="4" table:number-rows-spanned="1" office:value-type="string" calcext:value-type="string">
            <text:p>15.036 - MAXI RUBBER INDUSTRIAS QUIMICAS LTDA</text:p>
          </table:table-cell>
          <table:covered-table-cell table:number-columns-repeated="3"/>
          <table:table-cell table:style-name="ce0" office:value-type="string" calcext:value-type="string">
            <text:p>234.243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591.62">
            <text:p>3859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8098.8">
            <text:p>3809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32344">
            <text:p>0,332</text:p>
          </table:table-cell>
          <table:table-cell table:style-name="ce12N2" office:value-type="float" office:value="655.98">
            <text:p>655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59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492.82">
            <text:p>492,82</text:p>
          </table:table-cell>
          <table:table-cell table:style-name="ce12N2" office:value-type="float" office:value="38098.8">
            <text:p>38098,80</text:p>
          </table:table-cell>
          <table:table-cell table:style-name="ce12N2" office:value-type="float" office:value="2666.92">
            <text:p>266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02838220004705500500023424312805182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73">
            <text:p>30777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6.4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65.92">
            <text:p>986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865.92">
            <text:p>9865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9632">
            <text:p>0,150</text:p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86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65.92">
            <text:p>9865,92</text:p>
          </table:table-cell>
          <table:table-cell table:style-name="ce12N2" office:value-type="float" office:value="690.61">
            <text:p>69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647116379570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74">
            <text:p>30777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2.9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401">
            <text:p>1740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401">
            <text:p>1740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4">
            <text:p>0,006</text:p>
          </table:table-cell>
          <table:table-cell table:style-name="ce12N2" office:value-type="float" office:value="1329.5">
            <text:p>1329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40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401">
            <text:p>17401,00</text:p>
          </table:table-cell>
          <table:table-cell table:style-name="ce12N2" office:value-type="float" office:value="1218.07">
            <text:p>1218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295817617073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77">
            <text:p>30777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78.64">
            <text:p>4778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778.64">
            <text:p>4778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04">
            <text:p>0,023</text:p>
          </table:table-cell>
          <table:table-cell table:style-name="ce12N2" office:value-type="float" office:value="26.5">
            <text:p>26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78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08.96">
            <text:p>3508,96</text:p>
          </table:table-cell>
          <table:table-cell table:style-name="ce12N2" office:value-type="float" office:value="245.63">
            <text:p>24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3014628417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78">
            <text:p>30777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61.2">
            <text:p>226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61.2">
            <text:p>226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4">
            <text:p>0,006</text:p>
          </table:table-cell>
          <table:table-cell table:style-name="ce12N2" office:value-type="float" office:value="5.1">
            <text:p>5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6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61.2">
            <text:p>2261,20</text:p>
          </table:table-cell>
          <table:table-cell table:style-name="ce12N2" office:value-type="float" office:value="90.45">
            <text:p>9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919313600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79">
            <text:p>30777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63.92">
            <text:p>7663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196.17">
            <text:p>7196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4698">
            <text:p>0,075</text:p>
          </table:table-cell>
          <table:table-cell table:style-name="ce12N2" office:value-type="float" office:value="11.12">
            <text:p>11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663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467.75">
            <text:p>467,75</text:p>
          </table:table-cell>
          <table:table-cell table:style-name="ce12N2" office:value-type="float" office:value="7196.17">
            <text:p>7196,17</text:p>
          </table:table-cell>
          <table:table-cell table:style-name="ce12N2" office:value-type="float" office:value="503.73">
            <text:p>503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819437739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81">
            <text:p>3077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0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01.39">
            <text:p>2201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67.03">
            <text:p>2067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7">
            <text:p>0,006</text:p>
          </table:table-cell>
          <table:table-cell table:style-name="ce12N2" office:value-type="float" office:value="2.04">
            <text:p>2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01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134.36">
            <text:p>134,36</text:p>
          </table:table-cell>
          <table:table-cell table:style-name="ce12N2" office:value-type="float" office:value="2067.03">
            <text:p>2067,03</text:p>
          </table:table-cell>
          <table:table-cell table:style-name="ce12N2" office:value-type="float" office:value="144.69">
            <text:p>144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713618957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82">
            <text:p>3077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0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99.37">
            <text:p>3999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55.28">
            <text:p>3755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14">
            <text:p>0,011</text:p>
          </table:table-cell>
          <table:table-cell table:style-name="ce12N2" office:value-type="float" office:value="4.36">
            <text:p>4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99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244.09">
            <text:p>244,09</text:p>
          </table:table-cell>
          <table:table-cell table:style-name="ce12N2" office:value-type="float" office:value="3755.28">
            <text:p>3755,28</text:p>
          </table:table-cell>
          <table:table-cell table:style-name="ce12N2" office:value-type="float" office:value="262.87">
            <text:p>262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619748645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83">
            <text:p>3077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0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98.75">
            <text:p>7998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510.56">
            <text:p>7510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28">
            <text:p>0,022</text:p>
          </table:table-cell>
          <table:table-cell table:style-name="ce12N2" office:value-type="float" office:value="8.72">
            <text:p>8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98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488.19">
            <text:p>488,19</text:p>
          </table:table-cell>
          <table:table-cell table:style-name="ce12N2" office:value-type="float" office:value="7510.56">
            <text:p>7510,56</text:p>
          </table:table-cell>
          <table:table-cell table:style-name="ce12N2" office:value-type="float" office:value="525.74">
            <text:p>525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513791767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84">
            <text:p>3077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2.24">
            <text:p>45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2.24">
            <text:p>45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08">
            <text:p>0,001</text:p>
          </table:table-cell>
          <table:table-cell table:style-name="ce12N2" office:value-type="float" office:value="1.02">
            <text:p>1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2.24">
            <text:p>452,24</text:p>
          </table:table-cell>
          <table:table-cell table:style-name="ce12N2" office:value-type="float" office:value="18.09">
            <text:p>1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415792392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85">
            <text:p>3077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20.76">
            <text:p>2720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20.76">
            <text:p>2720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68">
            <text:p>0,008</text:p>
          </table:table-cell>
          <table:table-cell table:style-name="ce12N2" office:value-type="float" office:value="3.62">
            <text:p>3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20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20.76">
            <text:p>2720,76</text:p>
          </table:table-cell>
          <table:table-cell table:style-name="ce12N2" office:value-type="float" office:value="190.45">
            <text:p>19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311747608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86">
            <text:p>3077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10.68">
            <text:p>661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10.68">
            <text:p>6610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88">
            <text:p>0,012</text:p>
          </table:table-cell>
          <table:table-cell table:style-name="ce12N2" office:value-type="float" office:value="19.98">
            <text:p>19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10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10.68">
            <text:p>6610,68</text:p>
          </table:table-cell>
          <table:table-cell table:style-name="ce12N2" office:value-type="float" office:value="462.75">
            <text:p>462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114947646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88">
            <text:p>3077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0.84">
            <text:p>57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0.84">
            <text:p>570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776">
            <text:p>0,014</text:p>
          </table:table-cell>
          <table:table-cell table:style-name="ce12N2" office:value-type="float" office:value="9.48">
            <text:p>9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0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0.84">
            <text:p>570,84</text:p>
          </table:table-cell>
          <table:table-cell table:style-name="ce12N2" office:value-type="float" office:value="39.96">
            <text:p>39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011547699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89">
            <text:p>3077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3.12">
            <text:p>54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43.12">
            <text:p>543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92">
            <text:p>0,002</text:p>
          </table:table-cell>
          <table:table-cell table:style-name="ce12N2" office:value-type="float" office:value="1.67">
            <text:p>1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8.81">
            <text:p>398,81</text:p>
          </table:table-cell>
          <table:table-cell table:style-name="ce12N2" office:value-type="float" office:value="27.92">
            <text:p>2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1918832037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90">
            <text:p>3077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31.93">
            <text:p>323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34.68">
            <text:p>3034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9336">
            <text:p>0,069</text:p>
          </table:table-cell>
          <table:table-cell table:style-name="ce12N2" office:value-type="float" office:value="7.38">
            <text:p>7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31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197.25">
            <text:p>197,25</text:p>
          </table:table-cell>
          <table:table-cell table:style-name="ce12N2" office:value-type="float" office:value="3034.68">
            <text:p>3034,68</text:p>
          </table:table-cell>
          <table:table-cell table:style-name="ce12N2" office:value-type="float" office:value="212.43">
            <text:p>21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1814303930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91">
            <text:p>3077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08.4">
            <text:p>4490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4908.4">
            <text:p>4490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752">
            <text:p>0,028</text:p>
          </table:table-cell>
          <table:table-cell table:style-name="ce12N2" office:value-type="float" office:value="76.12">
            <text:p>76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90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08.4">
            <text:p>44908,40</text:p>
          </table:table-cell>
          <table:table-cell table:style-name="ce12N2" office:value-type="float" office:value="2701.06">
            <text:p>270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1716197743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92">
            <text:p>3077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3.85">
            <text:p>71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0.28">
            <text:p>670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252">
            <text:p>0,007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13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43.57">
            <text:p>43,57</text:p>
          </table:table-cell>
          <table:table-cell table:style-name="ce12N2" office:value-type="float" office:value="670.28">
            <text:p>670,28</text:p>
          </table:table-cell>
          <table:table-cell table:style-name="ce12N2" office:value-type="float" office:value="46.92">
            <text:p>4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1613566160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0">
            <text:p>307810</text:p>
          </table:table-cell>
          <table:table-cell table:style-name="ce0" table:number-columns-spanned="4" table:number-rows-spanned="1" office:value-type="string" calcext:value-type="string">
            <text:p>37.716 - ELLFAS DO BRASIL LTDA</text:p>
          </table:table-cell>
          <table:covered-table-cell table:number-columns-repeated="3"/>
          <table:table-cell table:style-name="ce0" office:value-type="string" calcext:value-type="string">
            <text:p>6.9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89.76">
            <text:p>1778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704">
            <text:p>1670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8967">
            <text:p>1,897</text:p>
          </table:table-cell>
          <table:table-cell table:style-name="ce12N2" office:value-type="float" office:value="600">
            <text:p>6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789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8.5">
            <text:p>48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1085.76">
            <text:p>1085,76</text:p>
          </table:table-cell>
          <table:table-cell table:style-name="ce12N2" office:value-type="float" office:value="16704">
            <text:p>16704,00</text:p>
          </table:table-cell>
          <table:table-cell table:style-name="ce12N2" office:value-type="float" office:value="1169.28">
            <text:p>116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62120480003025500100000694711524554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4">
            <text:p>307814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69.97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137.63">
            <text:p>18013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80111.24">
            <text:p>180111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8.329116">
            <text:p>18,329</text:p>
          </table:table-cell>
          <table:table-cell table:style-name="ce12N2" office:value-type="float" office:value="23989.6">
            <text:p>23989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0.137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26.39">
            <text:p>26,39</text:p>
          </table:table-cell>
          <table:table-cell table:style-name="ce12N2" office:value-type="float" office:value="180111.24">
            <text:p>180111,24</text:p>
          </table:table-cell>
          <table:table-cell table:style-name="ce12N2" office:value-type="float" office:value="12607.79">
            <text:p>12607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6997315665109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5">
            <text:p>30781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68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5.16">
            <text:p>955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55.16">
            <text:p>955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536">
            <text:p>0,003</text:p>
          </table:table-cell>
          <table:table-cell table:style-name="ce12N2" office:value-type="float" office:value="2.16">
            <text:p>2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5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5.16">
            <text:p>955,16</text:p>
          </table:table-cell>
          <table:table-cell table:style-name="ce12N2" office:value-type="float" office:value="66.86">
            <text:p>6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68516254461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20">
            <text:p>307820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5.1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7.6">
            <text:p>65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7.6">
            <text:p>65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296">
            <text:p>0,073</text:p>
          </table:table-cell>
          <table:table-cell table:style-name="ce12N2" office:value-type="float" office:value="28.51">
            <text:p>28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5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7.6">
            <text:p>657,60</text:p>
          </table:table-cell>
          <table:table-cell table:style-name="ce12N2" office:value-type="float" office:value="46.03">
            <text:p>4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569947000003655500100006510811000392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22">
            <text:p>307822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1.6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824.63">
            <text:p>36824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665.5">
            <text:p>35665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427">
            <text:p>0,843</text:p>
          </table:table-cell>
          <table:table-cell table:style-name="ce12N2" office:value-type="float" office:value="445">
            <text:p>44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824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1159.13">
            <text:p>1159,13</text:p>
          </table:table-cell>
          <table:table-cell table:style-name="ce12N2" office:value-type="float" office:value="35665.5">
            <text:p>35665,50</text:p>
          </table:table-cell>
          <table:table-cell table:style-name="ce12N2" office:value-type="float" office:value="2496.59">
            <text:p>2496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3983690008005500100060163716692737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23">
            <text:p>307823</text:p>
          </table:table-cell>
          <table:table-cell table:style-name="ce0" table:number-columns-spanned="4" table:number-rows-spanned="1" office:value-type="string" calcext:value-type="string">
            <text:p>732 - METALURGICA INCA LTDA</text:p>
          </table:table-cell>
          <table:covered-table-cell table:number-columns-repeated="3"/>
          <table:table-cell table:style-name="ce0" office:value-type="string" calcext:value-type="string">
            <text:p>141.5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129.3">
            <text:p>40129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">
            <text:p>26,00</text:p>
          </table:table-cell>
          <table:table-cell table:style-name="ce12N2" office:value-type="float" office:value="39965.83">
            <text:p>39965,8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47756">
            <text:p>4,478</text:p>
          </table:table-cell>
          <table:table-cell table:style-name="ce12N2" office:value-type="float" office:value="6044.42">
            <text:p>6044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129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4.94">
            <text:p>44,9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163.47">
            <text:p>163,47</text:p>
          </table:table-cell>
          <table:table-cell table:style-name="ce12N2" office:value-type="float" office:value="39965.83">
            <text:p>39965,83</text:p>
          </table:table-cell>
          <table:table-cell table:style-name="ce12N2" office:value-type="float" office:value="2797.62">
            <text:p>2797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2041290001065500100014156219390142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24">
            <text:p>3078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8.04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46.8">
            <text:p>454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46.8">
            <text:p>454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029">
            <text:p>0,403</text:p>
          </table:table-cell>
          <table:table-cell table:style-name="ce12N2" office:value-type="float" office:value="20.4">
            <text:p>2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4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46.8">
            <text:p>4546,80</text:p>
          </table:table-cell>
          <table:table-cell table:style-name="ce12N2" office:value-type="float" office:value="318.28">
            <text:p>318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804111753974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26">
            <text:p>307826</text:p>
          </table:table-cell>
          <table:table-cell table:style-name="ce0" table:number-columns-spanned="4" table:number-rows-spanned="1" office:value-type="string" calcext:value-type="string">
            <text:p>570 - TRAMONTINA MULTI S/A</text:p>
          </table:table-cell>
          <table:covered-table-cell table:number-columns-repeated="3"/>
          <table:table-cell table:style-name="ce0" office:value-type="string" calcext:value-type="string">
            <text:p>1.194.4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870.88">
            <text:p>164870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4870.88">
            <text:p>164870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3.62752">
            <text:p>173,628</text:p>
          </table:table-cell>
          <table:table-cell table:style-name="ce12N2" office:value-type="float" office:value="10950.72">
            <text:p>1095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4.870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9">
            <text:p>1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4870.88">
            <text:p>164870,88</text:p>
          </table:table-cell>
          <table:table-cell table:style-name="ce12N2" office:value-type="float" office:value="11540.96">
            <text:p>1154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0376680001545500100119447415950759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27">
            <text:p>307827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5.7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16.05">
            <text:p>371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99.08">
            <text:p>3599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83">
            <text:p>0,017</text:p>
          </table:table-cell>
          <table:table-cell table:style-name="ce12N2" office:value-type="float" office:value="8.41">
            <text:p>8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16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116.97">
            <text:p>116,97</text:p>
          </table:table-cell>
          <table:table-cell table:style-name="ce12N2" office:value-type="float" office:value="3599.08">
            <text:p>3599,08</text:p>
          </table:table-cell>
          <table:table-cell table:style-name="ce12N2" office:value-type="float" office:value="143.96">
            <text:p>143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576915811477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28">
            <text:p>307828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5.7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33.58">
            <text:p>10033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514.1">
            <text:p>9514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5">
            <text:p>0,020</text:p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033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6">
            <text:p>2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519.48">
            <text:p>519,48</text:p>
          </table:table-cell>
          <table:table-cell table:style-name="ce12N2" office:value-type="float" office:value="9514.1">
            <text:p>9514,10</text:p>
          </table:table-cell>
          <table:table-cell table:style-name="ce12N2" office:value-type="float" office:value="380.56">
            <text:p>380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577215721587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46">
            <text:p>307846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235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7.01">
            <text:p>1967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67.01">
            <text:p>1967,0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4063">
            <text:p>0,044</text:p>
          </table:table-cell>
          <table:table-cell table:style-name="ce12N2" office:value-type="float" office:value="10.31">
            <text:p>10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67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67.01">
            <text:p>1967,01</text:p>
          </table:table-cell>
          <table:table-cell table:style-name="ce12N2" office:value-type="float" office:value="137.69">
            <text:p>137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92702150001055500600021923513248320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47">
            <text:p>307847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9.1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393.68">
            <text:p>68393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">
            <text:p>71,00</text:p>
          </table:table-cell>
          <table:table-cell table:style-name="ce12N2" office:value-type="float" office:value="65231.14">
            <text:p>65231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46851">
            <text:p>1,947</text:p>
          </table:table-cell>
          <table:table-cell table:style-name="ce12N2" office:value-type="float" office:value="748.5">
            <text:p>748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8.393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3162.54">
            <text:p>3162,54</text:p>
          </table:table-cell>
          <table:table-cell table:style-name="ce12N2" office:value-type="float" office:value="64947.12">
            <text:p>64947,12</text:p>
          </table:table-cell>
          <table:table-cell table:style-name="ce12N2" office:value-type="float" office:value="3325.85">
            <text:p>3325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911915746736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48">
            <text:p>307848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245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55.7">
            <text:p>285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55.7">
            <text:p>2855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66">
            <text:p>0,006</text:p>
          </table:table-cell>
          <table:table-cell table:style-name="ce12N2" office:value-type="float" office:value="3.06">
            <text:p>3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55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55.7">
            <text:p>2855,70</text:p>
          </table:table-cell>
          <table:table-cell table:style-name="ce12N2" office:value-type="float" office:value="199.9">
            <text:p>199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92702150001055500600021924514889120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49">
            <text:p>307849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0.92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.05">
            <text:p>9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2">
            <text:p>0,002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3.61">
            <text:p>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865920000100550040007409241117179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0">
            <text:p>307850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7.63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55.09">
            <text:p>6555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6555.09">
            <text:p>6555,0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61552">
            <text:p>0,262</text:p>
          </table:table-cell>
          <table:table-cell table:style-name="ce12N2" office:value-type="float" office:value="47.4">
            <text:p>47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55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55.09">
            <text:p>6555,09</text:p>
          </table:table-cell>
          <table:table-cell table:style-name="ce12N2" office:value-type="float" office:value="458.86">
            <text:p>45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62935640001465500200033763512416339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1">
            <text:p>307851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9.1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81">
            <text:p>290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6.44">
            <text:p>276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56">
            <text:p>0,009</text:p>
          </table:table-cell>
          <table:table-cell table:style-name="ce12N2" office:value-type="float" office:value="3.02">
            <text:p>3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14.37">
            <text:p>14,37</text:p>
          </table:table-cell>
          <table:table-cell table:style-name="ce12N2" office:value-type="float" office:value="276.44">
            <text:p>276,44</text:p>
          </table:table-cell>
          <table:table-cell table:style-name="ce12N2" office:value-type="float" office:value="19.35">
            <text:p>19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911818436241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2">
            <text:p>30785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056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140">
            <text:p>11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7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05619648767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3">
            <text:p>307853</text:p>
          </table:table-cell>
          <table:table-cell table:style-name="ce0" table:number-columns-spanned="4" table:number-rows-spanned="1" office:value-type="string" calcext:value-type="string">
            <text:p>570 - TRAMONTINA MULTI S/A</text:p>
          </table:table-cell>
          <table:covered-table-cell table:number-columns-repeated="3"/>
          <table:table-cell table:style-name="ce0" office:value-type="string" calcext:value-type="string">
            <text:p>1.194.4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163.18">
            <text:p>2016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163.18">
            <text:p>20163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27734">
            <text:p>4,277</text:p>
          </table:table-cell>
          <table:table-cell table:style-name="ce12N2" office:value-type="float" office:value="944.34">
            <text:p>944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163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09.57">
            <text:p>11809,57</text:p>
          </table:table-cell>
          <table:table-cell table:style-name="ce12N2" office:value-type="float" office:value="826.67">
            <text:p>826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037668000154550010011944731099026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4">
            <text:p>30785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5.7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75.61">
            <text:p>6275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916.39">
            <text:p>5916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329">
            <text:p>0,033</text:p>
          </table:table-cell>
          <table:table-cell table:style-name="ce12N2" office:value-type="float" office:value="284.1">
            <text:p>284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75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359.22">
            <text:p>359,22</text:p>
          </table:table-cell>
          <table:table-cell table:style-name="ce12N2" office:value-type="float" office:value="5916.39">
            <text:p>5916,39</text:p>
          </table:table-cell>
          <table:table-cell table:style-name="ce12N2" office:value-type="float" office:value="280.59">
            <text:p>280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577315702008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9">
            <text:p>307859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242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2421288442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2">
            <text:p>307862</text:p>
          </table:table-cell>
          <table:table-cell table:style-name="ce0" table:number-columns-spanned="4" table:number-rows-spanned="1" office:value-type="string" calcext:value-type="string">
            <text:p>576 - BRASILUX INDUSTRIA COM IMP E EXP LTDA</text:p>
          </table:table-cell>
          <table:covered-table-cell table:number-columns-repeated="3"/>
          <table:table-cell table:style-name="ce0" office:value-type="string" calcext:value-type="string">
            <text:p>1.450.0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748.12">
            <text:p>107748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8175.96">
            <text:p>98175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9.553028">
            <text:p>19,553</text:p>
          </table:table-cell>
          <table:table-cell table:style-name="ce12N2" office:value-type="float" office:value="2505">
            <text:p>250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7.748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9572.16">
            <text:p>9572,16</text:p>
          </table:table-cell>
          <table:table-cell table:style-name="ce12N2" office:value-type="float" office:value="98175.96">
            <text:p>98175,96</text:p>
          </table:table-cell>
          <table:table-cell table:style-name="ce12N2" office:value-type="float" office:value="6872.32">
            <text:p>687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03741210001015500100145007917252481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4">
            <text:p>30786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2.12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20.11">
            <text:p>7720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477.1">
            <text:p>747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87">
            <text:p>0,031</text:p>
          </table:table-cell>
          <table:table-cell table:style-name="ce12N2" office:value-type="float" office:value="47.04">
            <text:p>47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720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243.01">
            <text:p>243,01</text:p>
          </table:table-cell>
          <table:table-cell table:style-name="ce12N2" office:value-type="float" office:value="7477.1">
            <text:p>7477,10</text:p>
          </table:table-cell>
          <table:table-cell table:style-name="ce12N2" office:value-type="float" office:value="523.4">
            <text:p>52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212811704102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5">
            <text:p>30786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2.14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8.88">
            <text:p>54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31.6">
            <text:p>53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3">
            <text:p>0,003</text:p>
          </table:table-cell>
          <table:table-cell table:style-name="ce12N2" office:value-type="float" office:value="6.72">
            <text:p>6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8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8">
            <text:p>5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17.28">
            <text:p>17,28</text:p>
          </table:table-cell>
          <table:table-cell table:style-name="ce12N2" office:value-type="float" office:value="531.6">
            <text:p>531,60</text:p>
          </table:table-cell>
          <table:table-cell table:style-name="ce12N2" office:value-type="float" office:value="37.21">
            <text:p>37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214218078085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6">
            <text:p>307866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3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3531994832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81">
            <text:p>307881</text:p>
          </table:table-cell>
          <table:table-cell table:style-name="ce0" table:number-columns-spanned="4" table:number-rows-spanned="1" office:value-type="string" calcext:value-type="string">
            <text:p>11.247 - NOVA ROCHA INDUSTRIA DE TINTAS LTDA.</text:p>
          </table:table-cell>
          <table:covered-table-cell table:number-columns-repeated="3"/>
          <table:table-cell table:style-name="ce0" office:value-type="string" calcext:value-type="string">
            <text:p>555.0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5.57">
            <text:p>3925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875.19">
            <text:p>3875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7457">
            <text:p>1,746</text:p>
          </table:table-cell>
          <table:table-cell table:style-name="ce12N2" office:value-type="float" office:value="2500">
            <text:p>25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25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50.38">
            <text:p>50,38</text:p>
          </table:table-cell>
          <table:table-cell table:style-name="ce12N2" office:value-type="float" office:value="3875.19">
            <text:p>3875,19</text:p>
          </table:table-cell>
          <table:table-cell table:style-name="ce12N2" office:value-type="float" office:value="465.02">
            <text:p>465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030051230001035500100055507711820438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91">
            <text:p>307891</text:p>
          </table:table-cell>
          <table:table-cell table:style-name="ce0" table:number-columns-spanned="4" table:number-rows-spanned="1" office:value-type="string" calcext:value-type="string">
            <text:p>6.601 - SIKA SA</text:p>
          </table:table-cell>
          <table:covered-table-cell table:number-columns-repeated="3"/>
          <table:table-cell table:style-name="ce0" office:value-type="string" calcext:value-type="string">
            <text:p>84.903</text:p>
          </table:table-cell>
          <table:table-cell table:style-name="ce9" office:value-type="string" calcext:value-type="string">
            <text:p>1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42.21">
            <text:p>5942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942.21">
            <text:p>5942,2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53376">
            <text:p>1,253</text:p>
          </table:table-cell>
          <table:table-cell table:style-name="ce12N2" office:value-type="float" office:value="923.1">
            <text:p>92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942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42.21">
            <text:p>5942,21</text:p>
          </table:table-cell>
          <table:table-cell table:style-name="ce12N2" office:value-type="float" office:value="713.07">
            <text:p>713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330817040022105501800008490310809314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94">
            <text:p>3078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2.4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63.82">
            <text:p>316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70.72">
            <text:p>2970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344">
            <text:p>0,025</text:p>
          </table:table-cell>
          <table:table-cell table:style-name="ce12N2" office:value-type="float" office:value="14.4">
            <text:p>1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63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193.1">
            <text:p>193,10</text:p>
          </table:table-cell>
          <table:table-cell table:style-name="ce12N2" office:value-type="float" office:value="2970.72">
            <text:p>2970,72</text:p>
          </table:table-cell>
          <table:table-cell table:style-name="ce12N2" office:value-type="float" office:value="118.83">
            <text:p>118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249918035506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95">
            <text:p>3078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2.5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596.51">
            <text:p>18596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437.22">
            <text:p>18437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9456">
            <text:p>0,069</text:p>
          </table:table-cell>
          <table:table-cell table:style-name="ce12N2" office:value-type="float" office:value="62.14">
            <text:p>6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596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159.29">
            <text:p>159,29</text:p>
          </table:table-cell>
          <table:table-cell table:style-name="ce12N2" office:value-type="float" office:value="18437.22">
            <text:p>18437,22</text:p>
          </table:table-cell>
          <table:table-cell table:style-name="ce12N2" office:value-type="float" office:value="737.49">
            <text:p>737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250017591236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96">
            <text:p>30789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2.5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91.6">
            <text:p>419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91.6">
            <text:p>419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2">
            <text:p>0,019</text:p>
          </table:table-cell>
          <table:table-cell table:style-name="ce12N2" office:value-type="float" office:value="22.08">
            <text:p>22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9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77.89">
            <text:p>3077,89</text:p>
          </table:table-cell>
          <table:table-cell table:style-name="ce12N2" office:value-type="float" office:value="215.45">
            <text:p>21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250412875320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99">
            <text:p>307899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72.2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1">
            <text:p>194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41">
            <text:p>194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8">
            <text:p>0,005</text:p>
          </table:table-cell>
          <table:table-cell table:style-name="ce12N2" office:value-type="float" office:value="15.2">
            <text:p>1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4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41">
            <text:p>1941,00</text:p>
          </table:table-cell>
          <table:table-cell table:style-name="ce12N2" office:value-type="float" office:value="135.87">
            <text:p>13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611441500006785500100127222813931105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06">
            <text:p>30790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2.5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664.14">
            <text:p>17664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7561.76">
            <text:p>17561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4">
            <text:p>0,068</text:p>
          </table:table-cell>
          <table:table-cell table:style-name="ce12N2" office:value-type="float" office:value="45.46">
            <text:p>45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664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102.38">
            <text:p>102,38</text:p>
          </table:table-cell>
          <table:table-cell table:style-name="ce12N2" office:value-type="float" office:value="17561.76">
            <text:p>17561,76</text:p>
          </table:table-cell>
          <table:table-cell table:style-name="ce12N2" office:value-type="float" office:value="749.73">
            <text:p>749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25021135587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07">
            <text:p>30790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2.5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54.66">
            <text:p>1125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567.76">
            <text:p>10567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092">
            <text:p>0,081</text:p>
          </table:table-cell>
          <table:table-cell table:style-name="ce12N2" office:value-type="float" office:value="17.49">
            <text:p>17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254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686.9">
            <text:p>686,90</text:p>
          </table:table-cell>
          <table:table-cell table:style-name="ce12N2" office:value-type="float" office:value="10567.76">
            <text:p>10567,76</text:p>
          </table:table-cell>
          <table:table-cell table:style-name="ce12N2" office:value-type="float" office:value="739.74">
            <text:p>739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250117796189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08">
            <text:p>30790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2.5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45.56">
            <text:p>2845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45.56">
            <text:p>2845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888">
            <text:p>0,007</text:p>
          </table:table-cell>
          <table:table-cell table:style-name="ce12N2" office:value-type="float" office:value="4.74">
            <text:p>4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45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45.56">
            <text:p>2845,56</text:p>
          </table:table-cell>
          <table:table-cell table:style-name="ce12N2" office:value-type="float" office:value="113.82">
            <text:p>11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250311497791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09">
            <text:p>30790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2.5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35.2">
            <text:p>1943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435.2">
            <text:p>19435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01">
            <text:p>0,001</text:p>
          </table:table-cell>
          <table:table-cell table:style-name="ce12N2" office:value-type="float" office:value="16.57">
            <text:p>16,5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435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435.2">
            <text:p>19435,20</text:p>
          </table:table-cell>
          <table:table-cell table:style-name="ce12N2" office:value-type="float" office:value="1360.46">
            <text:p>136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250616272957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10">
            <text:p>30791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2.5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6.64">
            <text:p>167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76.64">
            <text:p>1676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68">
            <text:p>0,008</text:p>
          </table:table-cell>
          <table:table-cell table:style-name="ce12N2" office:value-type="float" office:value="8.83">
            <text:p>8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7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1.16">
            <text:p>1231,16</text:p>
          </table:table-cell>
          <table:table-cell table:style-name="ce12N2" office:value-type="float" office:value="86.18">
            <text:p>86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250511910763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15">
            <text:p>30791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9.52">
            <text:p>709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91.74">
            <text:p>691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184">
            <text:p>0,007</text:p>
          </table:table-cell>
          <table:table-cell table:style-name="ce12N2" office:value-type="float" office:value="1.35">
            <text:p>1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9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17.78">
            <text:p>17,78</text:p>
          </table:table-cell>
          <table:table-cell table:style-name="ce12N2" office:value-type="float" office:value="691.74">
            <text:p>691,74</text:p>
          </table:table-cell>
          <table:table-cell table:style-name="ce12N2" office:value-type="float" office:value="48.42">
            <text:p>4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011163363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16">
            <text:p>30791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579.14">
            <text:p>12579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579.14">
            <text:p>12579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523">
            <text:p>0,155</text:p>
          </table:table-cell>
          <table:table-cell table:style-name="ce12N2" office:value-type="float" office:value="15.98">
            <text:p>15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579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579.14">
            <text:p>12579,14</text:p>
          </table:table-cell>
          <table:table-cell table:style-name="ce12N2" office:value-type="float" office:value="880.54">
            <text:p>88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115500653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17">
            <text:p>30791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26.48">
            <text:p>462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26.48">
            <text:p>4626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556">
            <text:p>0,116</text:p>
          </table:table-cell>
          <table:table-cell table:style-name="ce12N2" office:value-type="float" office:value="19.82">
            <text:p>19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26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26.48">
            <text:p>4626,48</text:p>
          </table:table-cell>
          <table:table-cell table:style-name="ce12N2" office:value-type="float" office:value="323.85">
            <text:p>32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219462256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18">
            <text:p>30791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36.09">
            <text:p>733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164.36">
            <text:p>7164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31">
            <text:p>0,032</text:p>
          </table:table-cell>
          <table:table-cell table:style-name="ce12N2" office:value-type="float" office:value="14.57">
            <text:p>14,5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336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171.73">
            <text:p>171,73</text:p>
          </table:table-cell>
          <table:table-cell table:style-name="ce12N2" office:value-type="float" office:value="7164.36">
            <text:p>7164,36</text:p>
          </table:table-cell>
          <table:table-cell table:style-name="ce12N2" office:value-type="float" office:value="365.84">
            <text:p>36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31934407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19">
            <text:p>30791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928.09">
            <text:p>1692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642.24">
            <text:p>1664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1512">
            <text:p>0,112</text:p>
          </table:table-cell>
          <table:table-cell table:style-name="ce12N2" office:value-type="float" office:value="29.84">
            <text:p>29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928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285.85">
            <text:p>285,85</text:p>
          </table:table-cell>
          <table:table-cell table:style-name="ce12N2" office:value-type="float" office:value="16642.24">
            <text:p>16642,24</text:p>
          </table:table-cell>
          <table:table-cell table:style-name="ce12N2" office:value-type="float" office:value="1164.96">
            <text:p>1164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415688157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20">
            <text:p>30792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99.9">
            <text:p>18399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7676.84">
            <text:p>17676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9792">
            <text:p>0,110</text:p>
          </table:table-cell>
          <table:table-cell table:style-name="ce12N2" office:value-type="float" office:value="38.67">
            <text:p>38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99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723.06">
            <text:p>723,06</text:p>
          </table:table-cell>
          <table:table-cell table:style-name="ce12N2" office:value-type="float" office:value="17676.84">
            <text:p>17676,84</text:p>
          </table:table-cell>
          <table:table-cell table:style-name="ce12N2" office:value-type="float" office:value="1062.83">
            <text:p>1062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518683410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21">
            <text:p>30792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5105.76">
            <text:p>445105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">
            <text:p>93,00</text:p>
          </table:table-cell>
          <table:table-cell table:style-name="ce12N2" office:value-type="float" office:value="441507.04">
            <text:p>441507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004156">
            <text:p>12,004</text:p>
          </table:table-cell>
          <table:table-cell table:style-name="ce12N2" office:value-type="float" office:value="1901.11">
            <text:p>1901,1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5.105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3598.72">
            <text:p>3598,72</text:p>
          </table:table-cell>
          <table:table-cell table:style-name="ce12N2" office:value-type="float" office:value="435689.29">
            <text:p>435689,29</text:p>
          </table:table-cell>
          <table:table-cell table:style-name="ce12N2" office:value-type="float" office:value="26553.19">
            <text:p>2655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612198852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23">
            <text:p>307923</text:p>
          </table:table-cell>
          <table:table-cell table:style-name="ce0" table:number-columns-spanned="4" table:number-rows-spanned="1" office:value-type="string" calcext:value-type="string">
            <text:p>24.768 - TOPMAX ACESSORIOS PARA CONSTRUCAO LTDA</text:p>
          </table:table-cell>
          <table:covered-table-cell table:number-columns-repeated="3"/>
          <table:table-cell table:style-name="ce0" office:value-type="string" calcext:value-type="string">
            <text:p>13.6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140.16">
            <text:p>36140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36140.16">
            <text:p>36140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799">
            <text:p>0,980</text:p>
          </table:table-cell>
          <table:table-cell table:style-name="ce12N2" office:value-type="float" office:value="404.02">
            <text:p>404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140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140.16">
            <text:p>36140,16</text:p>
          </table:table-cell>
          <table:table-cell table:style-name="ce12N2" office:value-type="float" office:value="2529.78">
            <text:p>2529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451237100001475500100001362211101925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32">
            <text:p>307932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6.2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058.73">
            <text:p>13058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2215.23">
            <text:p>12215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0482">
            <text:p>0,090</text:p>
          </table:table-cell>
          <table:table-cell table:style-name="ce12N2" office:value-type="float" office:value="214.79">
            <text:p>214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058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843.5">
            <text:p>843,50</text:p>
          </table:table-cell>
          <table:table-cell table:style-name="ce12N2" office:value-type="float" office:value="12215.23">
            <text:p>12215,23</text:p>
          </table:table-cell>
          <table:table-cell table:style-name="ce12N2" office:value-type="float" office:value="562.95">
            <text:p>562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624015701755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33">
            <text:p>307933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920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92018215556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36">
            <text:p>307936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33.4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14.2">
            <text:p>471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714.2">
            <text:p>4714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6836">
            <text:p>0,468</text:p>
          </table:table-cell>
          <table:table-cell table:style-name="ce12N2" office:value-type="float" office:value="66.42">
            <text:p>66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1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14.2">
            <text:p>4714,20</text:p>
          </table:table-cell>
          <table:table-cell table:style-name="ce12N2" office:value-type="float" office:value="329.99">
            <text:p>329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3349115724917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37">
            <text:p>307937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15.2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21.98">
            <text:p>14921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4860.3">
            <text:p>14860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7508">
            <text:p>1,751</text:p>
          </table:table-cell>
          <table:table-cell table:style-name="ce12N2" office:value-type="float" office:value="933.2">
            <text:p>93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921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61.68">
            <text:p>61,68</text:p>
          </table:table-cell>
          <table:table-cell table:style-name="ce12N2" office:value-type="float" office:value="14860.3">
            <text:p>14860,30</text:p>
          </table:table-cell>
          <table:table-cell table:style-name="ce12N2" office:value-type="float" office:value="1040.22">
            <text:p>104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6427740012095500100021520214108742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45">
            <text:p>307945</text:p>
          </table:table-cell>
          <table:table-cell table:style-name="ce0" table:number-columns-spanned="4" table:number-rows-spanned="1" office:value-type="string" calcext:value-type="string">
            <text:p>4.780 - BIANCO - COMERCIO ATACADISTA DE MATERIAL DE CONSTRUCAO LTDA</text:p>
          </table:table-cell>
          <table:covered-table-cell table:number-columns-repeated="3"/>
          <table:table-cell table:style-name="ce0" office:value-type="string" calcext:value-type="string">
            <text:p>25.045</text:p>
          </table:table-cell>
          <table:table-cell table:style-name="ce9" office:value-type="string" calcext:value-type="string">
            <text:p>7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864.64">
            <text:p>26864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864.64">
            <text:p>2686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71072">
            <text:p>1,711</text:p>
          </table:table-cell>
          <table:table-cell table:style-name="ce12N2" office:value-type="float" office:value="549.12">
            <text:p>549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.864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864.64">
            <text:p>26864,64</text:p>
          </table:table-cell>
          <table:table-cell table:style-name="ce12N2" office:value-type="float" office:value="3223.76">
            <text:p>322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22605105248370001935500700002504512528228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47">
            <text:p>307947</text:p>
          </table:table-cell>
          <table:table-cell table:style-name="ce0" table:number-columns-spanned="4" table:number-rows-spanned="1" office:value-type="string" calcext:value-type="string">
            <text:p>629 - PLASTCOR DO BRASIL LTDA</text:p>
          </table:table-cell>
          <table:covered-table-cell table:number-columns-repeated="3"/>
          <table:table-cell table:style-name="ce0" office:value-type="string" calcext:value-type="string">
            <text:p>373.509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01.6">
            <text:p>960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9348.88">
            <text:p>9348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98028">
            <text:p>3,098</text:p>
          </table:table-cell>
          <table:table-cell table:style-name="ce12N2" office:value-type="float" office:value="154.68">
            <text:p>154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60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.67">
            <text:p>60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252.72">
            <text:p>252,72</text:p>
          </table:table-cell>
          <table:table-cell table:style-name="ce12N2" office:value-type="float" office:value="9348.88">
            <text:p>9348,88</text:p>
          </table:table-cell>
          <table:table-cell table:style-name="ce12N2" office:value-type="float" office:value="609.84">
            <text:p>60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47044570001385500400037350919288958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50">
            <text:p>307950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1.8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9.09">
            <text:p>159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48.75">
            <text:p>1548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1">
            <text:p>0,007</text:p>
          </table:table-cell>
          <table:table-cell table:style-name="ce12N2" office:value-type="float" office:value="10.88">
            <text:p>10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99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50.34">
            <text:p>50,34</text:p>
          </table:table-cell>
          <table:table-cell table:style-name="ce12N2" office:value-type="float" office:value="1548.75">
            <text:p>1548,75</text:p>
          </table:table-cell>
          <table:table-cell table:style-name="ce12N2" office:value-type="float" office:value="108.41">
            <text:p>10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3983690008005500100060187414813021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51">
            <text:p>307951</text:p>
          </table:table-cell>
          <table:table-cell table:style-name="ce0" table:number-columns-spanned="4" table:number-rows-spanned="1" office:value-type="string" calcext:value-type="string">
            <text:p>32.363 - TRAMONTINA ELETRIK S.A.</text:p>
          </table:table-cell>
          <table:covered-table-cell table:number-columns-repeated="3"/>
          <table:table-cell table:style-name="ce0" office:value-type="string" calcext:value-type="string">
            <text:p>6.2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454.44">
            <text:p>113454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9883.23">
            <text:p>109883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7.58192">
            <text:p>27,582</text:p>
          </table:table-cell>
          <table:table-cell table:style-name="ce12N2" office:value-type="float" office:value="5167.5">
            <text:p>5167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3.454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3571.21">
            <text:p>3571,21</text:p>
          </table:table-cell>
          <table:table-cell table:style-name="ce12N2" office:value-type="float" office:value="109883.23">
            <text:p>109883,23</text:p>
          </table:table-cell>
          <table:table-cell table:style-name="ce12N2" office:value-type="float" office:value="7691.83">
            <text:p>7691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88674080000373550010000062791575112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52">
            <text:p>307952</text:p>
          </table:table-cell>
          <table:table-cell table:style-name="ce0" table:number-columns-spanned="4" table:number-rows-spanned="1" office:value-type="string" calcext:value-type="string">
            <text:p>32.363 - TRAMONTINA ELETRIK S.A.</text:p>
          </table:table-cell>
          <table:covered-table-cell table:number-columns-repeated="3"/>
          <table:table-cell table:style-name="ce0" office:value-type="string" calcext:value-type="string">
            <text:p>6.2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598.15">
            <text:p>43598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225.81">
            <text:p>42225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78405">
            <text:p>8,784</text:p>
          </table:table-cell>
          <table:table-cell table:style-name="ce12N2" office:value-type="float" office:value="1661">
            <text:p>166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598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1372.34">
            <text:p>1372,34</text:p>
          </table:table-cell>
          <table:table-cell table:style-name="ce12N2" office:value-type="float" office:value="42225.81">
            <text:p>42225,81</text:p>
          </table:table-cell>
          <table:table-cell table:style-name="ce12N2" office:value-type="float" office:value="2955.81">
            <text:p>2955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886740800003735500100000628215751133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53">
            <text:p>307953</text:p>
          </table:table-cell>
          <table:table-cell table:style-name="ce0" table:number-columns-spanned="4" table:number-rows-spanned="1" office:value-type="string" calcext:value-type="string">
            <text:p>32.363 - TRAMONTINA ELETRIK S.A.</text:p>
          </table:table-cell>
          <table:covered-table-cell table:number-columns-repeated="3"/>
          <table:table-cell table:style-name="ce0" office:value-type="string" calcext:value-type="string">
            <text:p>6.2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16.63">
            <text:p>14416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962.84">
            <text:p>13962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131518">
            <text:p>5,132</text:p>
          </table:table-cell>
          <table:table-cell table:style-name="ce12N2" office:value-type="float" office:value="803.25">
            <text:p>803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416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453.79">
            <text:p>453,79</text:p>
          </table:table-cell>
          <table:table-cell table:style-name="ce12N2" office:value-type="float" office:value="13962.84">
            <text:p>13962,84</text:p>
          </table:table-cell>
          <table:table-cell table:style-name="ce12N2" office:value-type="float" office:value="977.4">
            <text:p>97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886740800003735500100000628315751128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54">
            <text:p>307954</text:p>
          </table:table-cell>
          <table:table-cell table:style-name="ce0" table:number-columns-spanned="4" table:number-rows-spanned="1" office:value-type="string" calcext:value-type="string">
            <text:p>32.363 - TRAMONTINA ELETRIK S.A.</text:p>
          </table:table-cell>
          <table:covered-table-cell table:number-columns-repeated="3"/>
          <table:table-cell table:style-name="ce0" office:value-type="string" calcext:value-type="string">
            <text:p>6.2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782.05">
            <text:p>12678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22791.33">
            <text:p>122791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4.850963">
            <text:p>24,851</text:p>
          </table:table-cell>
          <table:table-cell table:style-name="ce12N2" office:value-type="float" office:value="5607.96">
            <text:p>5607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.782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3990.72">
            <text:p>3990,72</text:p>
          </table:table-cell>
          <table:table-cell table:style-name="ce12N2" office:value-type="float" office:value="122791.33">
            <text:p>122791,33</text:p>
          </table:table-cell>
          <table:table-cell table:style-name="ce12N2" office:value-type="float" office:value="8595.4">
            <text:p>859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886740800003735500100000628415751128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55">
            <text:p>307955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4.2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74.76">
            <text:p>847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474.76">
            <text:p>8474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2.4">
            <text:p>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74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74.76">
            <text:p>8474,76</text:p>
          </table:table-cell>
          <table:table-cell table:style-name="ce12N2" office:value-type="float" office:value="593.23">
            <text:p>593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42281574571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56">
            <text:p>307956</text:p>
          </table:table-cell>
          <table:table-cell table:style-name="ce0" table:number-columns-spanned="4" table:number-rows-spanned="1" office:value-type="string" calcext:value-type="string">
            <text:p>16.390 - COLSON DO BRASIL LTDA.</text:p>
          </table:table-cell>
          <table:covered-table-cell table:number-columns-repeated="3"/>
          <table:table-cell table:style-name="ce0" office:value-type="string" calcext:value-type="string">
            <text:p>184.4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525.36">
            <text:p>54525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44813.12">
            <text:p>44813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525808">
            <text:p>7,526</text:p>
          </table:table-cell>
          <table:table-cell table:style-name="ce12N2" office:value-type="float" office:value="751.49">
            <text:p>751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.525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2894.88">
            <text:p>2894,88</text:p>
          </table:table-cell>
          <table:table-cell table:style-name="ce12N2" office:value-type="float" office:value="42977.89">
            <text:p>42977,89</text:p>
          </table:table-cell>
          <table:table-cell table:style-name="ce12N2" office:value-type="float" office:value="1782.08">
            <text:p>1782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8037.94">
            <text:p>38037,94</text:p>
          </table:table-cell>
          <table:table-cell table:style-name="ce12N2" office:value-type="float" office:value="6817.36">
            <text:p>6817,36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50940030001555500100018443411512003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28">
            <text:p>128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6738.92">
            <text:p>66738,92</text:p>
          </table:table-cell>
          <table:table-cell table:style-name="ce26N2" office:value-type="float" office:value="3333951.08">
            <text:p>3333951,08</text:p>
          </table:table-cell>
          <table:table-cell table:style-name="ce26N2" office:value-type="float" office:value="214761.61">
            <text:p>214761,6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446143.88">
            <text:p>3446143,8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8483.26">
            <text:p>38483,26</text:p>
          </table:table-cell>
          <table:table-cell table:style-name="ce26N2" office:value-type="float" office:value="6897.9">
            <text:p>6897,9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470.54966">
            <text:p>470,550</text:p>
          </table:table-cell>
          <table:table-cell table:style-name="ce26N2" office:value-type="float" office:value="3372507.06">
            <text:p>3372507,06</text:p>
          </table:table-cell>
          <table:table-cell table:style-name="ce26N2" office:value-type="float" office:value="3446143.88">
            <text:p>3446143,8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18827.17">
            <text:p>118827,1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2.17">
            <text:p>42,1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OBJETIV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610" meta:object-count="0"/>
    <meta:generator>LibreOffice/4.3.0.4$Windows_x86 LibreOffice_project/62ad5818884a2fc2e5780dd45466868d41009ec0</meta:generator>
  </office:meta>
</office:document-meta>
</file>