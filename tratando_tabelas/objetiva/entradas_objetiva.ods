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3/07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8">
            <text:p>308958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67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4.39">
            <text:p>140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2.7">
            <text:p>1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4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2.93">
            <text:p>1112,93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2">
            <text:p>10,0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85.71">
            <text:p>85,71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92.31">
            <text:p>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834883000113550010006670801659673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3">
            <text:p>309433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5.2122">
            <text:p>45,212</text:p>
          </table:table-cell>
          <table:table-cell table:style-name="ce12N2" office:value-type="float" office:value="1301">
            <text:p>130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4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700.62">
            <text:p>70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71149866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90">
            <text:p>309490</text:p>
          </table:table-cell>
          <table:table-cell table:style-name="ce0" table:number-columns-spanned="4" table:number-rows-spanned="1" office:value-type="string" calcext:value-type="string">
            <text:p>8.844 - COZIMAX MOVEIS MIRASSOL LTDA</text:p>
          </table:table-cell>
          <table:covered-table-cell table:number-columns-repeated="3"/>
          <table:table-cell table:style-name="ce0" office:value-type="string" calcext:value-type="string">
            <text:p>758.4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">
            <text:p>0,01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0.17">
            <text:p>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23">
            <text:p>2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11.93">
            <text:p>1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043201000100550010007584571119030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1">
            <text:p>31011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39.84">
            <text:p>403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88">
            <text:p>398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6.6">
            <text:p>66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39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74.35">
            <text:p>3474,35</text:p>
          </table:table-cell>
          <table:table-cell table:style-name="ce12N2" office:value-type="float" office:value="3.47">
            <text:p>3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27">
            <text:p>31,27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51.84">
            <text:p>51,84</text:p>
          </table:table-cell>
          <table:table-cell table:style-name="ce12N2" office:value-type="float" office:value="3988">
            <text:p>3988,00</text:p>
          </table:table-cell>
          <table:table-cell table:style-name="ce12N2" office:value-type="float" office:value="159.52">
            <text:p>15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21711473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2">
            <text:p>31011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7.97">
            <text:p>807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7.6">
            <text:p>79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3.32">
            <text:p>13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7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4.88">
            <text:p>694,88</text:p>
          </table:table-cell>
          <table:table-cell table:style-name="ce12N2" office:value-type="float" office:value="0.69">
            <text:p>0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25">
            <text:p>6,2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797.6">
            <text:p>797,60</text:p>
          </table:table-cell>
          <table:table-cell table:style-name="ce12N2" office:value-type="float" office:value="31.9">
            <text:p>3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318884365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1">
            <text:p>310121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1.5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088.68">
            <text:p>41088,68</text:p>
          </table:table-cell>
          <table:table-cell table:style-name="ce12N2" office:value-type="float" office:value="2412.77">
            <text:p>2412,77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9851.2">
            <text:p>3985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28586">
            <text:p>6,286</text:p>
          </table:table-cell>
          <table:table-cell table:style-name="ce12N2" office:value-type="float" office:value="2047.2">
            <text:p>204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08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616.37">
            <text:p>32616,37</text:p>
          </table:table-cell>
          <table:table-cell table:style-name="ce12N2" office:value-type="float" office:value="32.62">
            <text:p>32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3.55">
            <text:p>293,55</text:p>
          </table:table-cell>
          <table:table-cell table:style-name="ce12N2" office:value-type="float" office:value="79.03">
            <text:p>79,0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3650.25">
            <text:p>3650,25</text:p>
          </table:table-cell>
          <table:table-cell table:style-name="ce12N2" office:value-type="float" office:value="37438.43">
            <text:p>37438,43</text:p>
          </table:table-cell>
          <table:table-cell table:style-name="ce12N2" office:value-type="float" office:value="1497.53">
            <text:p>149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315091541420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5">
            <text:p>310215</text:p>
          </table:table-cell>
          <table:table-cell table:style-name="ce0" table:number-columns-spanned="4" table:number-rows-spanned="1" office:value-type="string" calcext:value-type="string">
            <text:p>4.879 - AIEDEM COMERCIO DE PERFI DE METAIS LTDA</text:p>
          </table:table-cell>
          <table:covered-table-cell table:number-columns-repeated="3"/>
          <table:table-cell table:style-name="ce0" office:value-type="string" calcext:value-type="string">
            <text:p>68.6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07.51466">
            <text:p>807,515</text:p>
          </table:table-cell>
          <table:table-cell table:style-name="ce12N2" office:value-type="float" office:value="3713.9">
            <text:p>371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83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221.48">
            <text:p>74221,48</text:p>
          </table:table-cell>
          <table:table-cell table:style-name="ce12N2" office:value-type="float" office:value="74.2">
            <text:p>7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7.98">
            <text:p>667,98</text:p>
          </table:table-cell>
          <table:table-cell table:style-name="ce12N2" office:value-type="float" office:value="37.5">
            <text:p>37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5798.2">
            <text:p>579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8276100001425500100006868018162184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63">
            <text:p>310263</text:p>
          </table:table-cell>
          <table:table-cell table:style-name="ce0" table:number-columns-spanned="4" table:number-rows-spanned="1" office:value-type="string" calcext:value-type="string">
            <text:p>8.753 - ANCORA GROUP LTDA</text:p>
          </table:table-cell>
          <table:covered-table-cell table:number-columns-repeated="3"/>
          <table:table-cell table:style-name="ce0" office:value-type="string" calcext:value-type="string">
            <text:p>59.477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672.11">
            <text:p>65672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65180.7">
            <text:p>65180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9898">
            <text:p>4,999</text:p>
          </table:table-cell>
          <table:table-cell table:style-name="ce12N2" office:value-type="float" office:value="2976.9">
            <text:p>2976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.672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785.43">
            <text:p>56785,43</text:p>
          </table:table-cell>
          <table:table-cell table:style-name="ce12N2" office:value-type="float" office:value="56.78">
            <text:p>5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1.07">
            <text:p>511,07</text:p>
          </table:table-cell>
          <table:table-cell table:style-name="ce12N2" office:value-type="float" office:value="98.58">
            <text:p>98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91.41">
            <text:p>491,41</text:p>
          </table:table-cell>
          <table:table-cell table:style-name="ce12N2" office:value-type="float" office:value="65180.7">
            <text:p>65180,70</text:p>
          </table:table-cell>
          <table:table-cell table:style-name="ce12N2" office:value-type="float" office:value="2607.22">
            <text:p>2607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676474120003505501000005947711033727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6">
            <text:p>31029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70.9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612.16">
            <text:p>3361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33586.77">
            <text:p>33586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03928">
            <text:p>2,004</text:p>
          </table:table-cell>
          <table:table-cell table:style-name="ce12N2" office:value-type="float" office:value="155.68">
            <text:p>155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61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367.66">
            <text:p>28367,66</text:p>
          </table:table-cell>
          <table:table-cell table:style-name="ce12N2" office:value-type="float" office:value="28.37">
            <text:p>2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5.32">
            <text:p>255,32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5.39">
            <text:p>25,39</text:p>
          </table:table-cell>
          <table:table-cell table:style-name="ce12N2" office:value-type="float" office:value="33586.77">
            <text:p>33586,77</text:p>
          </table:table-cell>
          <table:table-cell table:style-name="ce12N2" office:value-type="float" office:value="2327.64">
            <text:p>232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7092110573457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78">
            <text:p>310578</text:p>
          </table:table-cell>
          <table:table-cell table:style-name="ce0" table:number-columns-spanned="4" table:number-rows-spanned="1" office:value-type="string" calcext:value-type="string">
            <text:p>15.950 - D. PLASTIC IND. E COM. DE ARTIGOS DE PLASTICOS - EIRELI</text:p>
          </table:table-cell>
          <table:covered-table-cell table:number-columns-repeated="3"/>
          <table:table-cell table:style-name="ce0" office:value-type="string" calcext:value-type="string">
            <text:p>48.7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0.18105">
            <text:p>150,181</text:p>
          </table:table-cell>
          <table:table-cell table:style-name="ce12N2" office:value-type="float" office:value="722">
            <text:p>72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.253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412.3">
            <text:p>40412,30</text:p>
          </table:table-cell>
          <table:table-cell table:style-name="ce12N2" office:value-type="float" office:value="40.41">
            <text:p>4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3.71">
            <text:p>363,71</text:p>
          </table:table-cell>
          <table:table-cell table:style-name="ce12N2" office:value-type="float" office:value="70">
            <text:p>7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3377.75">
            <text:p>337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33385067000140550010000487461170386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6">
            <text:p>310836</text:p>
          </table:table-cell>
          <table:table-cell table:style-name="ce0" table:number-columns-spanned="4" table:number-rows-spanned="1" office:value-type="string" calcext:value-type="string">
            <text:p>26.383 - INDUSTRIA DRYKO LTDA</text:p>
          </table:table-cell>
          <table:covered-table-cell table:number-columns-repeated="3"/>
          <table:table-cell table:style-name="ce0" office:value-type="string" calcext:value-type="string">
            <text:p>96.82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831.6">
            <text:p>11283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9280">
            <text:p>1092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508">
            <text:p>49,508</text:p>
          </table:table-cell>
          <table:table-cell table:style-name="ce12N2" office:value-type="float" office:value="25000">
            <text:p>25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2.83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2229.59">
            <text:p>92229,59</text:p>
          </table:table-cell>
          <table:table-cell table:style-name="ce12N2" office:value-type="float" office:value="92.23">
            <text:p>9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0.07">
            <text:p>830,07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3551.6">
            <text:p>3551,60</text:p>
          </table:table-cell>
          <table:table-cell table:style-name="ce12N2" office:value-type="float" office:value="109280">
            <text:p>109280,00</text:p>
          </table:table-cell>
          <table:table-cell table:style-name="ce12N2" office:value-type="float" office:value="7649.6">
            <text:p>764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30818950005585500500009682418378530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9">
            <text:p>310839</text:p>
          </table:table-cell>
          <table:table-cell table:style-name="ce0" table:number-columns-spanned="4" table:number-rows-spanned="1" office:value-type="string" calcext:value-type="string">
            <text:p>602 - DECORLUX MATERIAL ELETRICO LTDA</text:p>
          </table:table-cell>
          <table:covered-table-cell table:number-columns-repeated="3"/>
          <table:table-cell table:style-name="ce0" office:value-type="string" calcext:value-type="string">
            <text:p>204.8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604.41">
            <text:p>2860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26454.54">
            <text:p>26454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77.699055">
            <text:p>377,699</text:p>
          </table:table-cell>
          <table:table-cell table:style-name="ce12N2" office:value-type="float" office:value="78.47">
            <text:p>78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604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047.16">
            <text:p>23047,16</text:p>
          </table:table-cell>
          <table:table-cell table:style-name="ce12N2" office:value-type="float" office:value="23.06">
            <text:p>2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7.43">
            <text:p>207,4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2149.87">
            <text:p>2149,87</text:p>
          </table:table-cell>
          <table:table-cell table:style-name="ce12N2" office:value-type="float" office:value="26454.54">
            <text:p>26454,54</text:p>
          </table:table-cell>
          <table:table-cell table:style-name="ce12N2" office:value-type="float" office:value="1058.19">
            <text:p>1058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02382942000107550010002048841235478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41">
            <text:p>31084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7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33.95">
            <text:p>833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33.95">
            <text:p>8333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635">
            <text:p>0,038</text:p>
          </table:table-cell>
          <table:table-cell table:style-name="ce12N2" office:value-type="float" office:value="9.75">
            <text:p>9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33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33.65">
            <text:p>7033,65</text:p>
          </table:table-cell>
          <table:table-cell table:style-name="ce12N2" office:value-type="float" office:value="7.03">
            <text:p>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.3">
            <text:p>63,3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33.95">
            <text:p>8333,95</text:p>
          </table:table-cell>
          <table:table-cell table:style-name="ce12N2" office:value-type="float" office:value="583.38">
            <text:p>58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79713977900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4">
            <text:p>310854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75.7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40.66">
            <text:p>1840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28.32">
            <text:p>1728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2712">
            <text:p>0,153</text:p>
          </table:table-cell>
          <table:table-cell table:style-name="ce12N2" office:value-type="float" office:value="26.6">
            <text:p>26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40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58.66">
            <text:p>1458,66</text:p>
          </table:table-cell>
          <table:table-cell table:style-name="ce12N2" office:value-type="float" office:value="1.46">
            <text:p>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13">
            <text:p>13,1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112.34">
            <text:p>112,34</text:p>
          </table:table-cell>
          <table:table-cell table:style-name="ce12N2" office:value-type="float" office:value="1728.32">
            <text:p>1728,32</text:p>
          </table:table-cell>
          <table:table-cell table:style-name="ce12N2" office:value-type="float" office:value="120.98">
            <text:p>12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0050238000114550010013757071218753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7">
            <text:p>310857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6.6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696.73">
            <text:p>11696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696.73">
            <text:p>11696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125">
            <text:p>13,125</text:p>
          </table:table-cell>
          <table:table-cell table:style-name="ce12N2" office:value-type="float" office:value="140">
            <text:p>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696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871.75">
            <text:p>9871,75</text:p>
          </table:table-cell>
          <table:table-cell table:style-name="ce12N2" office:value-type="float" office:value="9.87">
            <text:p>9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.85">
            <text:p>88,85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696.73">
            <text:p>11696,73</text:p>
          </table:table-cell>
          <table:table-cell table:style-name="ce12N2" office:value-type="float" office:value="818.77">
            <text:p>81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660510689351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9">
            <text:p>310859</text:p>
          </table:table-cell>
          <table:table-cell table:style-name="ce0" table:number-columns-spanned="4" table:number-rows-spanned="1" office:value-type="string" calcext:value-type="string">
            <text:p>13.600 - ANJO QUIMICA DO BRASIL LTDA</text:p>
          </table:table-cell>
          <table:covered-table-cell table:number-columns-repeated="3"/>
          <table:table-cell table:style-name="ce0" office:value-type="string" calcext:value-type="string">
            <text:p>481.10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697">
            <text:p>5069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697">
            <text:p>5069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4567">
            <text:p>5,457</text:p>
          </table:table-cell>
          <table:table-cell table:style-name="ce12N2" office:value-type="float" office:value="3753">
            <text:p>375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69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787">
            <text:p>42787,00</text:p>
          </table:table-cell>
          <table:table-cell table:style-name="ce12N2" office:value-type="float" office:value="42.79">
            <text:p>42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5.08">
            <text:p>385,0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697">
            <text:p>50697,00</text:p>
          </table:table-cell>
          <table:table-cell table:style-name="ce12N2" office:value-type="float" office:value="3548.79">
            <text:p>354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29213460001585500200048110719159153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71">
            <text:p>31087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9.2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3.38">
            <text:p>149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03.89">
            <text:p>1403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359">
            <text:p>0,054</text:p>
          </table:table-cell>
          <table:table-cell table:style-name="ce12N2" office:value-type="float" office:value="14.22">
            <text:p>14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9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85.62">
            <text:p>1185,62</text:p>
          </table:table-cell>
          <table:table-cell table:style-name="ce12N2" office:value-type="float" office:value="1.19">
            <text:p>1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67">
            <text:p>10,67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89.49">
            <text:p>89,49</text:p>
          </table:table-cell>
          <table:table-cell table:style-name="ce12N2" office:value-type="float" office:value="1403.89">
            <text:p>1403,89</text:p>
          </table:table-cell>
          <table:table-cell table:style-name="ce12N2" office:value-type="float" office:value="97.42">
            <text:p>9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929815704430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2">
            <text:p>310882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7.30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90.5">
            <text:p>809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90.5">
            <text:p>8090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29125">
            <text:p>0,829</text:p>
          </table:table-cell>
          <table:table-cell table:style-name="ce12N2" office:value-type="float" office:value="279.25">
            <text:p>279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90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28.17">
            <text:p>6828,17</text:p>
          </table:table-cell>
          <table:table-cell table:style-name="ce12N2" office:value-type="float" office:value="6.83">
            <text:p>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45">
            <text:p>61,4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90.5">
            <text:p>8090,50</text:p>
          </table:table-cell>
          <table:table-cell table:style-name="ce12N2" office:value-type="float" office:value="566.34">
            <text:p>566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730511182491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5">
            <text:p>310885</text:p>
          </table:table-cell>
          <table:table-cell table:style-name="ce0" table:number-columns-spanned="4" table:number-rows-spanned="1" office:value-type="string" calcext:value-type="string">
            <text:p>619 - CAST METAIS E SOLDAS LTDA</text:p>
          </table:table-cell>
          <table:covered-table-cell table:number-columns-repeated="3"/>
          <table:table-cell table:style-name="ce0" office:value-type="string" calcext:value-type="string">
            <text:p>123.7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06.6">
            <text:p>1720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206.6">
            <text:p>1720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31">
            <text:p>0,067</text:p>
          </table:table-cell>
          <table:table-cell table:style-name="ce12N2" office:value-type="float" office:value="119.64">
            <text:p>119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20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521.94">
            <text:p>14521,94</text:p>
          </table:table-cell>
          <table:table-cell table:style-name="ce12N2" office:value-type="float" office:value="14.52">
            <text:p>1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0.7">
            <text:p>130,7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206.6">
            <text:p>17206,60</text:p>
          </table:table-cell>
          <table:table-cell table:style-name="ce12N2" office:value-type="float" office:value="1204.46">
            <text:p>1204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34079510001785500100012377318509249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6">
            <text:p>31088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19.81">
            <text:p>311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29.4">
            <text:p>292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6">
            <text:p>0,014</text:p>
          </table:table-cell>
          <table:table-cell table:style-name="ce12N2" office:value-type="float" office:value="14.62">
            <text:p>14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19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52.09">
            <text:p>2552,09</text:p>
          </table:table-cell>
          <table:table-cell table:style-name="ce12N2" office:value-type="float" office:value="2.55">
            <text:p>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97">
            <text:p>22,9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90.41">
            <text:p>190,41</text:p>
          </table:table-cell>
          <table:table-cell table:style-name="ce12N2" office:value-type="float" office:value="2929.4">
            <text:p>2929,40</text:p>
          </table:table-cell>
          <table:table-cell table:style-name="ce12N2" office:value-type="float" office:value="117.18">
            <text:p>117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414587526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7">
            <text:p>31088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3.77">
            <text:p>374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15.28">
            <text:p>351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632">
            <text:p>0,017</text:p>
          </table:table-cell>
          <table:table-cell table:style-name="ce12N2" office:value-type="float" office:value="17.54">
            <text:p>17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43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62.52">
            <text:p>3062,52</text:p>
          </table:table-cell>
          <table:table-cell table:style-name="ce12N2" office:value-type="float" office:value="3.06">
            <text:p>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56">
            <text:p>27,5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28.49">
            <text:p>228,49</text:p>
          </table:table-cell>
          <table:table-cell table:style-name="ce12N2" office:value-type="float" office:value="3515.28">
            <text:p>3515,28</text:p>
          </table:table-cell>
          <table:table-cell table:style-name="ce12N2" office:value-type="float" office:value="140.61">
            <text:p>14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515123843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8">
            <text:p>31088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393.41">
            <text:p>3339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426.8">
            <text:p>3042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2">
            <text:p>0,001</text:p>
          </table:table-cell>
          <table:table-cell table:style-name="ce12N2" office:value-type="float" office:value="12.2">
            <text:p>1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393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507.83">
            <text:p>26507,83</text:p>
          </table:table-cell>
          <table:table-cell table:style-name="ce12N2" office:value-type="float" office:value="26.51">
            <text:p>2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.57">
            <text:p>238,5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966.61">
            <text:p>2966,61</text:p>
          </table:table-cell>
          <table:table-cell table:style-name="ce12N2" office:value-type="float" office:value="30426.8">
            <text:p>30426,80</text:p>
          </table:table-cell>
          <table:table-cell table:style-name="ce12N2" office:value-type="float" office:value="1217.07">
            <text:p>121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219679394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9">
            <text:p>31088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910.8">
            <text:p>1291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10.8">
            <text:p>1291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572">
            <text:p>0,136</text:p>
          </table:table-cell>
          <table:table-cell table:style-name="ce12N2" office:value-type="float" office:value="66">
            <text:p>6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91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47.89">
            <text:p>11247,89</text:p>
          </table:table-cell>
          <table:table-cell table:style-name="ce12N2" office:value-type="float" office:value="11.25">
            <text:p>1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1.23">
            <text:p>101,2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10.8">
            <text:p>12910,80</text:p>
          </table:table-cell>
          <table:table-cell table:style-name="ce12N2" office:value-type="float" office:value="516.43">
            <text:p>516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511657641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0">
            <text:p>310890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393.41">
            <text:p>3339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426.8">
            <text:p>3042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2">
            <text:p>0,001</text:p>
          </table:table-cell>
          <table:table-cell table:style-name="ce12N2" office:value-type="float" office:value="12.2">
            <text:p>1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393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507.83">
            <text:p>26507,83</text:p>
          </table:table-cell>
          <table:table-cell table:style-name="ce12N2" office:value-type="float" office:value="26.51">
            <text:p>2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.57">
            <text:p>238,5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966.61">
            <text:p>2966,61</text:p>
          </table:table-cell>
          <table:table-cell table:style-name="ce12N2" office:value-type="float" office:value="30426.8">
            <text:p>30426,80</text:p>
          </table:table-cell>
          <table:table-cell table:style-name="ce12N2" office:value-type="float" office:value="1217.07">
            <text:p>121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018025762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1">
            <text:p>31089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5.94">
            <text:p>93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8.82">
            <text:p>878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158">
            <text:p>0,004</text:p>
          </table:table-cell>
          <table:table-cell table:style-name="ce12N2" office:value-type="float" office:value="4.39">
            <text:p>4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5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5.63">
            <text:p>765,63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89">
            <text:p>6,8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57.12">
            <text:p>57,12</text:p>
          </table:table-cell>
          <table:table-cell table:style-name="ce12N2" office:value-type="float" office:value="878.82">
            <text:p>878,82</text:p>
          </table:table-cell>
          <table:table-cell table:style-name="ce12N2" office:value-type="float" office:value="35.15">
            <text:p>35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619794177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3">
            <text:p>310893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2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14.41">
            <text:p>1271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2714.41">
            <text:p>12714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2297">
            <text:p>0,092</text:p>
          </table:table-cell>
          <table:table-cell table:style-name="ce12N2" office:value-type="float" office:value="65.7">
            <text:p>65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714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076.8">
            <text:p>11076,80</text:p>
          </table:table-cell>
          <table:table-cell table:style-name="ce12N2" office:value-type="float" office:value="11.08">
            <text:p>1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.7">
            <text:p>99,70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714.41">
            <text:p>12714,41</text:p>
          </table:table-cell>
          <table:table-cell table:style-name="ce12N2" office:value-type="float" office:value="508.58">
            <text:p>50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718494268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4">
            <text:p>31089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1.89">
            <text:p>187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7.64">
            <text:p>1757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16">
            <text:p>0,008</text:p>
          </table:table-cell>
          <table:table-cell table:style-name="ce12N2" office:value-type="float" office:value="8.77">
            <text:p>8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71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1.25">
            <text:p>1531,25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78">
            <text:p>13,7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14.25">
            <text:p>114,25</text:p>
          </table:table-cell>
          <table:table-cell table:style-name="ce12N2" office:value-type="float" office:value="1757.64">
            <text:p>1757,64</text:p>
          </table:table-cell>
          <table:table-cell table:style-name="ce12N2" office:value-type="float" office:value="70.31">
            <text:p>7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71795115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5">
            <text:p>31089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71.62">
            <text:p>3517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2096.48">
            <text:p>32096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836">
            <text:p>0,009</text:p>
          </table:table-cell>
          <table:table-cell table:style-name="ce12N2" office:value-type="float" office:value="20.97">
            <text:p>20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17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962.45">
            <text:p>27962,45</text:p>
          </table:table-cell>
          <table:table-cell table:style-name="ce12N2" office:value-type="float" office:value="27.96">
            <text:p>2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1.66">
            <text:p>251,6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075.14">
            <text:p>3075,14</text:p>
          </table:table-cell>
          <table:table-cell table:style-name="ce12N2" office:value-type="float" office:value="32096.48">
            <text:p>32096,48</text:p>
          </table:table-cell>
          <table:table-cell table:style-name="ce12N2" office:value-type="float" office:value="1283.86">
            <text:p>128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111865940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6">
            <text:p>31089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27.7">
            <text:p>322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27.7">
            <text:p>322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93">
            <text:p>0,034</text:p>
          </table:table-cell>
          <table:table-cell table:style-name="ce12N2" office:value-type="float" office:value="16.5">
            <text:p>16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2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11.97">
            <text:p>2811,97</text:p>
          </table:table-cell>
          <table:table-cell table:style-name="ce12N2" office:value-type="float" office:value="2.81">
            <text:p>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31">
            <text:p>25,3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27.7">
            <text:p>3227,70</text:p>
          </table:table-cell>
          <table:table-cell table:style-name="ce12N2" office:value-type="float" office:value="129.11">
            <text:p>129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414278564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8">
            <text:p>31089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741.77">
            <text:p>41741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033.5">
            <text:p>3803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5">
            <text:p>0,001</text:p>
          </table:table-cell>
          <table:table-cell table:style-name="ce12N2" office:value-type="float" office:value="15.25">
            <text:p>15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741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134.79">
            <text:p>33134,79</text:p>
          </table:table-cell>
          <table:table-cell table:style-name="ce12N2" office:value-type="float" office:value="33.13">
            <text:p>3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8.21">
            <text:p>298,21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708.27">
            <text:p>3708,27</text:p>
          </table:table-cell>
          <table:table-cell table:style-name="ce12N2" office:value-type="float" office:value="38033.5">
            <text:p>38033,50</text:p>
          </table:table-cell>
          <table:table-cell table:style-name="ce12N2" office:value-type="float" office:value="1521.34">
            <text:p>152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211944058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9">
            <text:p>31089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1.89">
            <text:p>187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7.64">
            <text:p>1757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16">
            <text:p>0,008</text:p>
          </table:table-cell>
          <table:table-cell table:style-name="ce12N2" office:value-type="float" office:value="8.77">
            <text:p>8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71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1.25">
            <text:p>1531,25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78">
            <text:p>13,7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14.25">
            <text:p>114,25</text:p>
          </table:table-cell>
          <table:table-cell table:style-name="ce12N2" office:value-type="float" office:value="1757.64">
            <text:p>1757,64</text:p>
          </table:table-cell>
          <table:table-cell table:style-name="ce12N2" office:value-type="float" office:value="70.31">
            <text:p>7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917158908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0">
            <text:p>310900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65.48">
            <text:p>796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257.84">
            <text:p>7257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434">
            <text:p>0,007</text:p>
          </table:table-cell>
          <table:table-cell table:style-name="ce12N2" office:value-type="float" office:value="4.52">
            <text:p>4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65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23.04">
            <text:p>6323,04</text:p>
          </table:table-cell>
          <table:table-cell table:style-name="ce12N2" office:value-type="float" office:value="6.33">
            <text:p>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91">
            <text:p>56,9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707.64">
            <text:p>707,64</text:p>
          </table:table-cell>
          <table:table-cell table:style-name="ce12N2" office:value-type="float" office:value="7257.84">
            <text:p>7257,84</text:p>
          </table:table-cell>
          <table:table-cell table:style-name="ce12N2" office:value-type="float" office:value="290.31">
            <text:p>29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917102278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1">
            <text:p>31090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0960.65">
            <text:p>210960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0808.2">
            <text:p>210808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71492">
            <text:p>14,715</text:p>
          </table:table-cell>
          <table:table-cell table:style-name="ce12N2" office:value-type="float" office:value="1036">
            <text:p>103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0.960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3656.11">
            <text:p>183656,11</text:p>
          </table:table-cell>
          <table:table-cell table:style-name="ce12N2" office:value-type="float" office:value="183.65">
            <text:p>18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52.9">
            <text:p>1652,9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52.45">
            <text:p>152,45</text:p>
          </table:table-cell>
          <table:table-cell table:style-name="ce12N2" office:value-type="float" office:value="210808.2">
            <text:p>210808,20</text:p>
          </table:table-cell>
          <table:table-cell table:style-name="ce12N2" office:value-type="float" office:value="8432.33">
            <text:p>843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610924778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2">
            <text:p>31090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090.12">
            <text:p>5009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640.2">
            <text:p>45640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8">
            <text:p>0,001</text:p>
          </table:table-cell>
          <table:table-cell table:style-name="ce12N2" office:value-type="float" office:value="18.3">
            <text:p>1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090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761.74">
            <text:p>39761,74</text:p>
          </table:table-cell>
          <table:table-cell table:style-name="ce12N2" office:value-type="float" office:value="39.76">
            <text:p>3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7.86">
            <text:p>357,8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4449.92">
            <text:p>4449,92</text:p>
          </table:table-cell>
          <table:table-cell table:style-name="ce12N2" office:value-type="float" office:value="45640.2">
            <text:p>45640,20</text:p>
          </table:table-cell>
          <table:table-cell table:style-name="ce12N2" office:value-type="float" office:value="1825.61">
            <text:p>1825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91928943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13">
            <text:p>310913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04.7">
            <text:p>1600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6004.7">
            <text:p>1600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3.65475">
            <text:p>63,655</text:p>
          </table:table-cell>
          <table:table-cell table:style-name="ce12N2" office:value-type="float" office:value="1092">
            <text:p>109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004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04.7">
            <text:p>16004,70</text:p>
          </table:table-cell>
          <table:table-cell table:style-name="ce12N2" office:value-type="float" office:value="608.18">
            <text:p>608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7222428080001185500100000282716031144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3">
            <text:p>31093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7.30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82">
            <text:p>0,009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60.34">
            <text:p>1060,34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54">
            <text:p>9,54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48.68">
            <text:p>4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730612861220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4">
            <text:p>310934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8.2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35.86">
            <text:p>1833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8335.86">
            <text:p>18335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0006">
            <text:p>0,500</text:p>
          </table:table-cell>
          <table:table-cell table:style-name="ce12N2" office:value-type="float" office:value="156.39">
            <text:p>156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3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475">
            <text:p>15475,00</text:p>
          </table:table-cell>
          <table:table-cell table:style-name="ce12N2" office:value-type="float" office:value="15.48">
            <text:p>1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.28">
            <text:p>139,2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35.86">
            <text:p>18335,86</text:p>
          </table:table-cell>
          <table:table-cell table:style-name="ce12N2" office:value-type="float" office:value="1283.51">
            <text:p>128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6427740012095500100022826613282729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6">
            <text:p>31093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89.71">
            <text:p>10389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55.6">
            <text:p>975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728">
            <text:p>2,8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89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99.08">
            <text:p>8499,08</text:p>
          </table:table-cell>
          <table:table-cell table:style-name="ce12N2" office:value-type="float" office:value="8.5">
            <text:p>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.49">
            <text:p>76,4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634.11">
            <text:p>634,11</text:p>
          </table:table-cell>
          <table:table-cell table:style-name="ce12N2" office:value-type="float" office:value="9755.6">
            <text:p>9755,60</text:p>
          </table:table-cell>
          <table:table-cell table:style-name="ce12N2" office:value-type="float" office:value="390.22">
            <text:p>39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81044274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8">
            <text:p>31093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2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0.5">
            <text:p>164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40.38">
            <text:p>1540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3092">
            <text:p>0,4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40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41.97">
            <text:p>1341,97</text:p>
          </table:table-cell>
          <table:table-cell table:style-name="ce12N2" office:value-type="float" office:value="1.34">
            <text:p>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08">
            <text:p>12,08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00.12">
            <text:p>100,12</text:p>
          </table:table-cell>
          <table:table-cell table:style-name="ce12N2" office:value-type="float" office:value="1540.38">
            <text:p>1540,38</text:p>
          </table:table-cell>
          <table:table-cell table:style-name="ce12N2" office:value-type="float" office:value="61.62">
            <text:p>6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011687755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4">
            <text:p>31094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9.5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25.25">
            <text:p>452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170.73">
            <text:p>4170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976">
            <text:p>0,206</text:p>
          </table:table-cell>
          <table:table-cell table:style-name="ce12N2" office:value-type="float" office:value="34.58">
            <text:p>34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25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26.53">
            <text:p>3526,53</text:p>
          </table:table-cell>
          <table:table-cell table:style-name="ce12N2" office:value-type="float" office:value="3.53">
            <text:p>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74">
            <text:p>31,74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54.52">
            <text:p>354,52</text:p>
          </table:table-cell>
          <table:table-cell table:style-name="ce12N2" office:value-type="float" office:value="4170.73">
            <text:p>4170,73</text:p>
          </table:table-cell>
          <table:table-cell table:style-name="ce12N2" office:value-type="float" office:value="284.74">
            <text:p>284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959515809959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5">
            <text:p>310945</text:p>
          </table:table-cell>
          <table:table-cell table:style-name="ce0" table:number-columns-spanned="4" table:number-rows-spanned="1" office:value-type="string" calcext:value-type="string">
            <text:p>9.694 - SFORPLAST INDUSTRIA E COMERCIO LTDA</text:p>
          </table:table-cell>
          <table:covered-table-cell table:number-columns-repeated="3"/>
          <table:table-cell table:style-name="ce0" office:value-type="string" calcext:value-type="string">
            <text:p>96.7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391.62">
            <text:p>2439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22655.05">
            <text:p>22655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4.62621">
            <text:p>24,626</text:p>
          </table:table-cell>
          <table:table-cell table:style-name="ce12N2" office:value-type="float" office:value="1424.65">
            <text:p>1424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39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300.13">
            <text:p>20300,13</text:p>
          </table:table-cell>
          <table:table-cell table:style-name="ce12N2" office:value-type="float" office:value="20.31">
            <text:p>2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2.7">
            <text:p>182,7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736.57">
            <text:p>1736,57</text:p>
          </table:table-cell>
          <table:table-cell table:style-name="ce12N2" office:value-type="float" office:value="22655.05">
            <text:p>22655,05</text:p>
          </table:table-cell>
          <table:table-cell table:style-name="ce12N2" office:value-type="float" office:value="1585.87">
            <text:p>158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8698860002405500100009679018251652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3">
            <text:p>31095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7.88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79.94">
            <text:p>4979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76">
            <text:p>467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8">
            <text:p>0,288</text:p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79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73.73">
            <text:p>4073,73</text:p>
          </table:table-cell>
          <table:table-cell table:style-name="ce12N2" office:value-type="float" office:value="4.08">
            <text:p>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66">
            <text:p>36,6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03.94">
            <text:p>303,94</text:p>
          </table:table-cell>
          <table:table-cell table:style-name="ce12N2" office:value-type="float" office:value="4676">
            <text:p>4676,00</text:p>
          </table:table-cell>
          <table:table-cell table:style-name="ce12N2" office:value-type="float" office:value="187.04">
            <text:p>18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788414109600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4">
            <text:p>31095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4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7.24">
            <text:p>375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757.24">
            <text:p>3757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28">
            <text:p>0,173</text:p>
          </table:table-cell>
          <table:table-cell table:style-name="ce12N2" office:value-type="float" office:value="45.8">
            <text:p>4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57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71.01">
            <text:p>3171,01</text:p>
          </table:table-cell>
          <table:table-cell table:style-name="ce12N2" office:value-type="float" office:value="3.17">
            <text:p>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54">
            <text:p>28,5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57.24">
            <text:p>3757,24</text:p>
          </table:table-cell>
          <table:table-cell table:style-name="ce12N2" office:value-type="float" office:value="263.01">
            <text:p>263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48711483275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98">
            <text:p>310998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45.326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635.72">
            <text:p>8863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84538.19">
            <text:p>84538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325382">
            <text:p>49,325</text:p>
          </table:table-cell>
          <table:table-cell table:style-name="ce12N2" office:value-type="float" office:value="462.79">
            <text:p>462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.635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455.48">
            <text:p>73455,48</text:p>
          </table:table-cell>
          <table:table-cell table:style-name="ce12N2" office:value-type="float" office:value="73.42">
            <text:p>7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1.06">
            <text:p>661,0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4097.53">
            <text:p>4097,53</text:p>
          </table:table-cell>
          <table:table-cell table:style-name="ce12N2" office:value-type="float" office:value="83238.63">
            <text:p>83238,63</text:p>
          </table:table-cell>
          <table:table-cell table:style-name="ce12N2" office:value-type="float" office:value="3595.53">
            <text:p>3595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532962730032985502300244532619054873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26">
            <text:p>311026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9.9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8.59">
            <text:p>1268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28.66">
            <text:p>1228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00">
            <text:p>1500,000</text:p>
          </table:table-cell>
          <table:table-cell table:style-name="ce12N2" office:value-type="float" office:value="150">
            <text:p>1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68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6.96">
            <text:p>1036,96</text:p>
          </table:table-cell>
          <table:table-cell table:style-name="ce12N2" office:value-type="float" office:value="1.04">
            <text:p>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33">
            <text:p>9,3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39.93">
            <text:p>39,93</text:p>
          </table:table-cell>
          <table:table-cell table:style-name="ce12N2" office:value-type="float" office:value="1228.66">
            <text:p>1228,66</text:p>
          </table:table-cell>
          <table:table-cell table:style-name="ce12N2" office:value-type="float" office:value="86.01">
            <text:p>8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990015842994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2">
            <text:p>31103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2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631.6">
            <text:p>5863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8631.6">
            <text:p>5863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312">
            <text:p>5,312</text:p>
          </table:table-cell>
          <table:table-cell table:style-name="ce12N2" office:value-type="float" office:value="2298.78">
            <text:p>2298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.63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483.6">
            <text:p>49483,60</text:p>
          </table:table-cell>
          <table:table-cell table:style-name="ce12N2" office:value-type="float" office:value="49.48">
            <text:p>4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5.35">
            <text:p>445,3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631.6">
            <text:p>58631,60</text:p>
          </table:table-cell>
          <table:table-cell table:style-name="ce12N2" office:value-type="float" office:value="4104.21">
            <text:p>410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29811835379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42">
            <text:p>311042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5.72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54.43">
            <text:p>615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623.91">
            <text:p>5623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8256">
            <text:p>1,183</text:p>
          </table:table-cell>
          <table:table-cell table:style-name="ce12N2" office:value-type="float" office:value="222">
            <text:p>22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54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46.44">
            <text:p>4746,44</text:p>
          </table:table-cell>
          <table:table-cell table:style-name="ce12N2" office:value-type="float" office:value="4.75">
            <text:p>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72">
            <text:p>42,72</text:p>
          </table:table-cell>
          <table:table-cell table:style-name="ce12N2" office:value-type="float" office:value="43.71">
            <text:p>43,7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530.52">
            <text:p>530,52</text:p>
          </table:table-cell>
          <table:table-cell table:style-name="ce12N2" office:value-type="float" office:value="5623.91">
            <text:p>5623,91</text:p>
          </table:table-cell>
          <table:table-cell table:style-name="ce12N2" office:value-type="float" office:value="393.67">
            <text:p>39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76428620002485500200001572613633083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43">
            <text:p>311043</text:p>
          </table:table-cell>
          <table:table-cell table:style-name="ce0" table:number-columns-spanned="4" table:number-rows-spanned="1" office:value-type="string" calcext:value-type="string">
            <text:p>681 - UNIAO MUNDIAL INDUSTRIA DE FERRAGENS LTDA</text:p>
          </table:table-cell>
          <table:covered-table-cell table:number-columns-repeated="3"/>
          <table:table-cell table:style-name="ce0" office:value-type="string" calcext:value-type="string">
            <text:p>276.6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948.35">
            <text:p>11394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">
            <text:p>141,00</text:p>
          </table:table-cell>
          <table:table-cell table:style-name="ce12N2" office:value-type="float" office:value="112920.07">
            <text:p>112920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406714">
            <text:p>5,407</text:p>
          </table:table-cell>
          <table:table-cell table:style-name="ce12N2" office:value-type="float" office:value="33121.72">
            <text:p>33121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3.948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182.6">
            <text:p>101182,60</text:p>
          </table:table-cell>
          <table:table-cell table:style-name="ce12N2" office:value-type="float" office:value="101.18">
            <text:p>10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0.64">
            <text:p>910,64</text:p>
          </table:table-cell>
          <table:table-cell table:style-name="ce12N2" office:value-type="float" office:value="62.84">
            <text:p>62,8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028.28">
            <text:p>1028,28</text:p>
          </table:table-cell>
          <table:table-cell table:style-name="ce12N2" office:value-type="float" office:value="112920.07">
            <text:p>112920,07</text:p>
          </table:table-cell>
          <table:table-cell table:style-name="ce12N2" office:value-type="float" office:value="7904.4">
            <text:p>790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7322234140001765500100027661913192871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73">
            <text:p>31107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8.25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9.26">
            <text:p>145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59.26">
            <text:p>1459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86">
            <text:p>0,011</text:p>
          </table:table-cell>
          <table:table-cell table:style-name="ce12N2" office:value-type="float" office:value="9.93">
            <text:p>9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9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1.58">
            <text:p>1231,58</text:p>
          </table:table-cell>
          <table:table-cell table:style-name="ce12N2" office:value-type="float" office:value="1.24">
            <text:p>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08">
            <text:p>11,0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59.26">
            <text:p>1459,26</text:p>
          </table:table-cell>
          <table:table-cell table:style-name="ce12N2" office:value-type="float" office:value="102.15">
            <text:p>102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825316380081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1">
            <text:p>311091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8.25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608.24">
            <text:p>14460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143576.69">
            <text:p>143576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20181">
            <text:p>1,120</text:p>
          </table:table-cell>
          <table:table-cell table:style-name="ce12N2" office:value-type="float" office:value="569.29">
            <text:p>56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4.608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722.72">
            <text:p>121722,72</text:p>
          </table:table-cell>
          <table:table-cell table:style-name="ce12N2" office:value-type="float" office:value="121.87">
            <text:p>12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5.51">
            <text:p>1095,5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1031.55">
            <text:p>1031,55</text:p>
          </table:table-cell>
          <table:table-cell table:style-name="ce12N2" office:value-type="float" office:value="143576.69">
            <text:p>143576,69</text:p>
          </table:table-cell>
          <table:table-cell table:style-name="ce12N2" office:value-type="float" office:value="9446.96">
            <text:p>944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825415859573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3">
            <text:p>311093</text:p>
          </table:table-cell>
          <table:table-cell table:style-name="ce0" table:number-columns-spanned="4" table:number-rows-spanned="1" office:value-type="string" calcext:value-type="string">
            <text:p>706 - IKEDA EMPRESARIAL LTDA</text:p>
          </table:table-cell>
          <table:covered-table-cell table:number-columns-repeated="3"/>
          <table:table-cell table:style-name="ce0" office:value-type="string" calcext:value-type="string">
            <text:p>113.1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68.21">
            <text:p>19168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7998.31">
            <text:p>17998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620274">
            <text:p>3,620</text:p>
          </table:table-cell>
          <table:table-cell table:style-name="ce12N2" office:value-type="float" office:value="138.95">
            <text:p>138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168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127.46">
            <text:p>16127,46</text:p>
          </table:table-cell>
          <table:table-cell table:style-name="ce12N2" office:value-type="float" office:value="16.12">
            <text:p>16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5.14">
            <text:p>145,14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1169.9">
            <text:p>1169,90</text:p>
          </table:table-cell>
          <table:table-cell table:style-name="ce12N2" office:value-type="float" office:value="17998.31">
            <text:p>17998,31</text:p>
          </table:table-cell>
          <table:table-cell table:style-name="ce12N2" office:value-type="float" office:value="1259.88">
            <text:p>1259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50646610001725500100011313616399673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5">
            <text:p>311095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8.25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2.84">
            <text:p>97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2.84">
            <text:p>972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24">
            <text:p>0,007</text:p>
          </table:table-cell>
          <table:table-cell table:style-name="ce12N2" office:value-type="float" office:value="6.62">
            <text:p>6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2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1.05">
            <text:p>821,05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39">
            <text:p>7,39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2.84">
            <text:p>972,84</text:p>
          </table:table-cell>
          <table:table-cell table:style-name="ce12N2" office:value-type="float" office:value="68.1">
            <text:p>68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82521899490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6">
            <text:p>311096</text:p>
          </table:table-cell>
          <table:table-cell table:style-name="ce0" table:number-columns-spanned="4" table:number-rows-spanned="1" office:value-type="string" calcext:value-type="string">
            <text:p>16.982 - PENINSULA IMPORTACAO E EXPORTACAO EIRELI</text:p>
          </table:table-cell>
          <table:covered-table-cell table:number-columns-repeated="3"/>
          <table:table-cell table:style-name="ce0" office:value-type="string" calcext:value-type="string">
            <text:p>30.5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240.17">
            <text:p>4324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40682.98">
            <text:p>40682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62776">
            <text:p>2,363</text:p>
          </table:table-cell>
          <table:table-cell table:style-name="ce12N2" office:value-type="float" office:value="252.34">
            <text:p>252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240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28.97">
            <text:p>37628,97</text:p>
          </table:table-cell>
          <table:table-cell table:style-name="ce12N2" office:value-type="float" office:value="37.64">
            <text:p>3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8.68">
            <text:p>338,6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2557.19">
            <text:p>2557,19</text:p>
          </table:table-cell>
          <table:table-cell table:style-name="ce12N2" office:value-type="float" office:value="40682.98">
            <text:p>40682,98</text:p>
          </table:table-cell>
          <table:table-cell table:style-name="ce12N2" office:value-type="float" office:value="1628.51">
            <text:p>1628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02314360001075500100003057512387626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8">
            <text:p>31109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8.31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17.2">
            <text:p>1941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17.2">
            <text:p>1941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899">
            <text:p>1,990</text:p>
          </table:table-cell>
          <table:table-cell table:style-name="ce12N2" office:value-type="float" office:value="670.2">
            <text:p>67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41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387.62">
            <text:p>16387,62</text:p>
          </table:table-cell>
          <table:table-cell table:style-name="ce12N2" office:value-type="float" office:value="16.4">
            <text:p>1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.49">
            <text:p>147,49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17.2">
            <text:p>19417,20</text:p>
          </table:table-cell>
          <table:table-cell table:style-name="ce12N2" office:value-type="float" office:value="1359.21">
            <text:p>1359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831012318517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1">
            <text:p>311101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7.8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97.76">
            <text:p>169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97.76">
            <text:p>1697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7936">
            <text:p>0,118</text:p>
          </table:table-cell>
          <table:table-cell table:style-name="ce12N2" office:value-type="float" office:value="5.83">
            <text:p>5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9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32.87">
            <text:p>1432,87</text:p>
          </table:table-cell>
          <table:table-cell table:style-name="ce12N2" office:value-type="float" office:value="1.43">
            <text:p>1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9">
            <text:p>12,90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97.76">
            <text:p>1697,76</text:p>
          </table:table-cell>
          <table:table-cell table:style-name="ce12N2" office:value-type="float" office:value="118.84">
            <text:p>11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6048030001575500100087781818054352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4">
            <text:p>311104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7.50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90.68">
            <text:p>3279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578.92">
            <text:p>32578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231">
            <text:p>3,323</text:p>
          </table:table-cell>
          <table:table-cell table:style-name="ce12N2" office:value-type="float" office:value="35337.72">
            <text:p>35337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790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495.8">
            <text:p>27495,80</text:p>
          </table:table-cell>
          <table:table-cell table:style-name="ce12N2" office:value-type="float" office:value="27.5">
            <text:p>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7.46">
            <text:p>247,46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211.76">
            <text:p>211,76</text:p>
          </table:table-cell>
          <table:table-cell table:style-name="ce12N2" office:value-type="float" office:value="32578.92">
            <text:p>32578,92</text:p>
          </table:table-cell>
          <table:table-cell table:style-name="ce12N2" office:value-type="float" office:value="2280.52">
            <text:p>228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44238800001455500300122750817184344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5">
            <text:p>311105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7.50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31.09">
            <text:p>11231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58.56">
            <text:p>11158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95784">
            <text:p>1,296</text:p>
          </table:table-cell>
          <table:table-cell table:style-name="ce12N2" office:value-type="float" office:value="5792.4">
            <text:p>579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31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417.54">
            <text:p>9417,54</text:p>
          </table:table-cell>
          <table:table-cell table:style-name="ce12N2" office:value-type="float" office:value="9.42">
            <text:p>9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.76">
            <text:p>84,76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72.53">
            <text:p>72,53</text:p>
          </table:table-cell>
          <table:table-cell table:style-name="ce12N2" office:value-type="float" office:value="11158.56">
            <text:p>11158,56</text:p>
          </table:table-cell>
          <table:table-cell table:style-name="ce12N2" office:value-type="float" office:value="781.1">
            <text:p>78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44238800001455500300122750915026485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7">
            <text:p>311107</text:p>
          </table:table-cell>
          <table:table-cell table:style-name="ce0" table:number-columns-spanned="4" table:number-rows-spanned="1" office:value-type="string" calcext:value-type="string">
            <text:p>9.271 - HENKEL LTDA JUNDIAI (CD)</text:p>
          </table:table-cell>
          <table:covered-table-cell table:number-columns-repeated="3"/>
          <table:table-cell table:style-name="ce0" office:value-type="string" calcext:value-type="string">
            <text:p>904.425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977.46">
            <text:p>48977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48938.03">
            <text:p>48938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7474">
            <text:p>1,237</text:p>
          </table:table-cell>
          <table:table-cell table:style-name="ce12N2" office:value-type="float" office:value="1403.67">
            <text:p>1403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.977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302.47">
            <text:p>41302,47</text:p>
          </table:table-cell>
          <table:table-cell table:style-name="ce12N2" office:value-type="float" office:value="41.3">
            <text:p>4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1.72">
            <text:p>371,72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39.43">
            <text:p>39,43</text:p>
          </table:table-cell>
          <table:table-cell table:style-name="ce12N2" office:value-type="float" office:value="48938.03">
            <text:p>48938,03</text:p>
          </table:table-cell>
          <table:table-cell table:style-name="ce12N2" office:value-type="float" office:value="3425.65">
            <text:p>3425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27771310034735500500090442514822385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5">
            <text:p>31111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88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1.14">
            <text:p>208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54.12">
            <text:p>195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96">
            <text:p>0,004</text:p>
          </table:table-cell>
          <table:table-cell table:style-name="ce12N2" office:value-type="float" office:value="3.04">
            <text:p>3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81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49.22">
            <text:p>1649,22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84">
            <text:p>14,8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127.02">
            <text:p>127,02</text:p>
          </table:table-cell>
          <table:table-cell table:style-name="ce12N2" office:value-type="float" office:value="1954.12">
            <text:p>1954,12</text:p>
          </table:table-cell>
          <table:table-cell table:style-name="ce12N2" office:value-type="float" office:value="136.79">
            <text:p>13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88013819619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8">
            <text:p>31111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91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87.2">
            <text:p>1248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487.2">
            <text:p>1248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744">
            <text:p>1,074</text:p>
          </table:table-cell>
          <table:table-cell table:style-name="ce12N2" office:value-type="float" office:value="54.4">
            <text:p>5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48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39.2">
            <text:p>10539,20</text:p>
          </table:table-cell>
          <table:table-cell table:style-name="ce12N2" office:value-type="float" office:value="10.54">
            <text:p>1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4.85">
            <text:p>94,8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487.2">
            <text:p>12487,20</text:p>
          </table:table-cell>
          <table:table-cell table:style-name="ce12N2" office:value-type="float" office:value="874.1">
            <text:p>87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9121317733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4">
            <text:p>311124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6.8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038.64">
            <text:p>1503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038.64">
            <text:p>1503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.875">
            <text:p>16,875</text:p>
          </table:table-cell>
          <table:table-cell table:style-name="ce12N2" office:value-type="float" office:value="180">
            <text:p>1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03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692.24">
            <text:p>12692,24</text:p>
          </table:table-cell>
          <table:table-cell table:style-name="ce12N2" office:value-type="float" office:value="12.69">
            <text:p>12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.23">
            <text:p>114,23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38.64">
            <text:p>15038,64</text:p>
          </table:table-cell>
          <table:table-cell table:style-name="ce12N2" office:value-type="float" office:value="1052.7">
            <text:p>105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686117267386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8">
            <text:p>31112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3.1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11.1">
            <text:p>721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211.1">
            <text:p>721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7516">
            <text:p>0,675</text:p>
          </table:table-cell>
          <table:table-cell table:style-name="ce12N2" office:value-type="float" office:value="162.75">
            <text:p>162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11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87.8">
            <text:p>6087,80</text:p>
          </table:table-cell>
          <table:table-cell table:style-name="ce12N2" office:value-type="float" office:value="6.09">
            <text:p>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79">
            <text:p>54,79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11.1">
            <text:p>7211,10</text:p>
          </table:table-cell>
          <table:table-cell table:style-name="ce12N2" office:value-type="float" office:value="504.78">
            <text:p>50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312016574911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9">
            <text:p>31112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3.1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3.2">
            <text:p>58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83.2">
            <text:p>58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59">
            <text:p>0,007</text:p>
          </table:table-cell>
          <table:table-cell table:style-name="ce12N2" office:value-type="float" office:value="10.09">
            <text:p>10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3.9">
            <text:p>493,90</text:p>
          </table:table-cell>
          <table:table-cell table:style-name="ce12N2" office:value-type="float" office:value="0.49">
            <text:p>0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44">
            <text:p>4,4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3.92">
            <text:p>553,92</text:p>
          </table:table-cell>
          <table:table-cell table:style-name="ce12N2" office:value-type="float" office:value="38.77">
            <text:p>3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315315691154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0">
            <text:p>311130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3.1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90.8">
            <text:p>109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90.8">
            <text:p>109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">
            <text:p>0,015</text:p>
          </table:table-cell>
          <table:table-cell table:style-name="ce12N2" office:value-type="float" office:value="0.6">
            <text:p>0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9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20.4">
            <text:p>920,40</text:p>
          </table:table-cell>
          <table:table-cell table:style-name="ce12N2" office:value-type="float" office:value="0.92">
            <text:p>0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28">
            <text:p>8,2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0.8">
            <text:p>1090,80</text:p>
          </table:table-cell>
          <table:table-cell table:style-name="ce12N2" office:value-type="float" office:value="76.36">
            <text:p>7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316216353203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1">
            <text:p>31113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3.1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90.8">
            <text:p>109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90.8">
            <text:p>109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">
            <text:p>0,015</text:p>
          </table:table-cell>
          <table:table-cell table:style-name="ce12N2" office:value-type="float" office:value="0.6">
            <text:p>0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9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20.4">
            <text:p>920,40</text:p>
          </table:table-cell>
          <table:table-cell table:style-name="ce12N2" office:value-type="float" office:value="0.92">
            <text:p>0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28">
            <text:p>8,2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0.8">
            <text:p>1090,80</text:p>
          </table:table-cell>
          <table:table-cell table:style-name="ce12N2" office:value-type="float" office:value="76.36">
            <text:p>7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317810974950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3">
            <text:p>311133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43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455.18">
            <text:p>103455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98228.99">
            <text:p>98228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5207">
            <text:p>1,952</text:p>
          </table:table-cell>
          <table:table-cell table:style-name="ce12N2" office:value-type="float" office:value="565.64">
            <text:p>565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3.455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5577.1">
            <text:p>85577,10</text:p>
          </table:table-cell>
          <table:table-cell table:style-name="ce12N2" office:value-type="float" office:value="85.55">
            <text:p>8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0.2">
            <text:p>770,20</text:p>
          </table:table-cell>
          <table:table-cell table:style-name="ce12N2" office:value-type="float" office:value="26">
            <text:p>2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5226.19">
            <text:p>5226,19</text:p>
          </table:table-cell>
          <table:table-cell table:style-name="ce12N2" office:value-type="float" office:value="98228.99">
            <text:p>98228,99</text:p>
          </table:table-cell>
          <table:table-cell table:style-name="ce12N2" office:value-type="float" office:value="3929.17">
            <text:p>3929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00497920001815500100134333115759949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4">
            <text:p>311134</text:p>
          </table:table-cell>
          <table:table-cell table:style-name="ce0" table:number-columns-spanned="4" table:number-rows-spanned="1" office:value-type="string" calcext:value-type="string">
            <text:p>571 - MAX METALURGICA</text:p>
          </table:table-cell>
          <table:covered-table-cell table:number-columns-repeated="3"/>
          <table:table-cell table:style-name="ce0" office:value-type="string" calcext:value-type="string">
            <text:p>181.8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146.68">
            <text:p>14146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">
            <text:p>32,00</text:p>
          </table:table-cell>
          <table:table-cell table:style-name="ce12N2" office:value-type="float" office:value="13928.78">
            <text:p>13928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.370918">
            <text:p>32,371</text:p>
          </table:table-cell>
          <table:table-cell table:style-name="ce12N2" office:value-type="float" office:value="708.06">
            <text:p>708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146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853.89">
            <text:p>11853,89</text:p>
          </table:table-cell>
          <table:table-cell table:style-name="ce12N2" office:value-type="float" office:value="11.86">
            <text:p>1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.68">
            <text:p>106,6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217.9">
            <text:p>217,90</text:p>
          </table:table-cell>
          <table:table-cell table:style-name="ce12N2" office:value-type="float" office:value="12381">
            <text:p>12381,00</text:p>
          </table:table-cell>
          <table:table-cell table:style-name="ce12N2" office:value-type="float" office:value="866.65">
            <text:p>866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19136810001345500100018185615564288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7">
            <text:p>311137</text:p>
          </table:table-cell>
          <table:table-cell table:style-name="ce0" table:number-columns-spanned="4" table:number-rows-spanned="1" office:value-type="string" calcext:value-type="string">
            <text:p>14.587 - GFC INDUSTRIA E COMERCIO TUBOS E CONEXOES LTDA</text:p>
          </table:table-cell>
          <table:covered-table-cell table:number-columns-repeated="3"/>
          <table:table-cell table:style-name="ce0" office:value-type="string" calcext:value-type="string">
            <text:p>116.26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90.8">
            <text:p>3669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35535.88">
            <text:p>3553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813182">
            <text:p>6,813</text:p>
          </table:table-cell>
          <table:table-cell table:style-name="ce12N2" office:value-type="float" office:value="3409.36">
            <text:p>3409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69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991.4">
            <text:p>29991,40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9.92">
            <text:p>269,92</text:p>
          </table:table-cell>
          <table:table-cell table:style-name="ce12N2" office:value-type="float" office:value="46.67">
            <text:p>46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1154.92">
            <text:p>1154,92</text:p>
          </table:table-cell>
          <table:table-cell table:style-name="ce12N2" office:value-type="float" office:value="35535.88">
            <text:p>35535,88</text:p>
          </table:table-cell>
          <table:table-cell table:style-name="ce12N2" office:value-type="float" office:value="2487.52">
            <text:p>248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05338810001605500000011626118027960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8">
            <text:p>311138</text:p>
          </table:table-cell>
          <table:table-cell table:style-name="ce0" table:number-columns-spanned="4" table:number-rows-spanned="1" office:value-type="string" calcext:value-type="string">
            <text:p>571 - MAX METALURGICA</text:p>
          </table:table-cell>
          <table:covered-table-cell table:number-columns-repeated="3"/>
          <table:table-cell table:style-name="ce0" office:value-type="string" calcext:value-type="string">
            <text:p>181.8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2.04">
            <text:p>144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1442.04">
            <text:p>1442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70552">
            <text:p>3,271</text:p>
          </table:table-cell>
          <table:table-cell table:style-name="ce12N2" office:value-type="float" office:value="95.13">
            <text:p>95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42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4.64">
            <text:p>844,64</text:p>
          </table:table-cell>
          <table:table-cell table:style-name="ce12N2" office:value-type="float" office:value="59.11">
            <text:p>59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19136810001345500100018185712281309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63">
            <text:p>31116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64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69.61">
            <text:p>686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6506.58">
            <text:p>6506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88">
            <text:p>0,206</text:p>
          </table:table-cell>
          <table:table-cell table:style-name="ce12N2" office:value-type="float" office:value="24.19">
            <text:p>24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69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04.56">
            <text:p>5504,56</text:p>
          </table:table-cell>
          <table:table-cell table:style-name="ce12N2" office:value-type="float" office:value="5.5">
            <text:p>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54">
            <text:p>49,5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63.03">
            <text:p>363,03</text:p>
          </table:table-cell>
          <table:table-cell table:style-name="ce12N2" office:value-type="float" office:value="6506.58">
            <text:p>6506,58</text:p>
          </table:table-cell>
          <table:table-cell table:style-name="ce12N2" office:value-type="float" office:value="440.94">
            <text:p>44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64710362374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69">
            <text:p>31116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8.6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43.8">
            <text:p>354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543.8">
            <text:p>354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672">
            <text:p>0,507</text:p>
          </table:table-cell>
          <table:table-cell table:style-name="ce12N2" office:value-type="float" office:value="281.25">
            <text:p>281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4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90.89">
            <text:p>2990,89</text:p>
          </table:table-cell>
          <table:table-cell table:style-name="ce12N2" office:value-type="float" office:value="2.99">
            <text:p>2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92">
            <text:p>26,9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43.8">
            <text:p>3543,80</text:p>
          </table:table-cell>
          <table:table-cell table:style-name="ce12N2" office:value-type="float" office:value="248.06">
            <text:p>248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865512521684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0">
            <text:p>31117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8.6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35">
            <text:p>1393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935">
            <text:p>1393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8925">
            <text:p>0,689</text:p>
          </table:table-cell>
          <table:table-cell table:style-name="ce12N2" office:value-type="float" office:value="448.29">
            <text:p>448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93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760.79">
            <text:p>11760,79</text:p>
          </table:table-cell>
          <table:table-cell table:style-name="ce12N2" office:value-type="float" office:value="11.76">
            <text:p>1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5.85">
            <text:p>105,8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35">
            <text:p>13935,00</text:p>
          </table:table-cell>
          <table:table-cell table:style-name="ce12N2" office:value-type="float" office:value="975.45">
            <text:p>97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865412693311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2">
            <text:p>31117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8.6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93.7">
            <text:p>8993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93.7">
            <text:p>8993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6">
            <text:p>0,001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993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90.46">
            <text:p>7590,46</text:p>
          </table:table-cell>
          <table:table-cell table:style-name="ce12N2" office:value-type="float" office:value="7.59">
            <text:p>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31">
            <text:p>68,3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93.7">
            <text:p>8993,70</text:p>
          </table:table-cell>
          <table:table-cell table:style-name="ce12N2" office:value-type="float" office:value="629.56">
            <text:p>62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865611874928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4">
            <text:p>311174</text:p>
          </table:table-cell>
          <table:table-cell table:style-name="ce0" table:number-columns-spanned="4" table:number-rows-spanned="1" office:value-type="string" calcext:value-type="string">
            <text:p>22.431 - PL- INDUSTRIA METALURGICA LTDA</text:p>
          </table:table-cell>
          <table:covered-table-cell table:number-columns-repeated="3"/>
          <table:table-cell table:style-name="ce0" office:value-type="string" calcext:value-type="string">
            <text:p>108.7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151.75">
            <text:p>2515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25151.75">
            <text:p>25151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9624">
            <text:p>8,962</text:p>
          </table:table-cell>
          <table:table-cell table:style-name="ce12N2" office:value-type="float" office:value="2197.32">
            <text:p>2197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151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227.44">
            <text:p>21227,44</text:p>
          </table:table-cell>
          <table:table-cell table:style-name="ce12N2" office:value-type="float" office:value="21.21">
            <text:p>21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1.04">
            <text:p>191,0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151.75">
            <text:p>25151,75</text:p>
          </table:table-cell>
          <table:table-cell table:style-name="ce12N2" office:value-type="float" office:value="1760.62">
            <text:p>176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87874820001375500100010875919284364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6">
            <text:p>311176</text:p>
          </table:table-cell>
          <table:table-cell table:style-name="ce0" table:number-columns-spanned="4" table:number-rows-spanned="1" office:value-type="string" calcext:value-type="string">
            <text:p>543 - ESTEVES S/A.</text:p>
          </table:table-cell>
          <table:covered-table-cell table:number-columns-repeated="3"/>
          <table:table-cell table:style-name="ce0" office:value-type="string" calcext:value-type="string">
            <text:p>367.4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36">
            <text:p>69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.18">
            <text:p>67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E-5">
            <text:p>0,000</text:p>
          </table:table-cell>
          <table:table-cell table:style-name="ce12N2" office:value-type="float" office:value="0.5">
            <text:p>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.7">
            <text:p>56,70</text:p>
          </table:table-cell>
          <table:table-cell table:style-name="ce12N2" office:value-type="float" office:value="0.06">
            <text:p>0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41.56">
            <text:p>41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.18">
            <text:p>2,18</text:p>
          </table:table-cell>
          <table:table-cell table:style-name="ce12N2" office:value-type="float" office:value="67.18">
            <text:p>67,18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837457000187550010003674961711965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7">
            <text:p>311177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5.87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73.84">
            <text:p>2673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510.65">
            <text:p>2510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">
            <text:p>0,027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73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87.27">
            <text:p>2187,27</text:p>
          </table:table-cell>
          <table:table-cell table:style-name="ce12N2" office:value-type="float" office:value="2.19">
            <text:p>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69">
            <text:p>19,69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63.19">
            <text:p>163,19</text:p>
          </table:table-cell>
          <table:table-cell table:style-name="ce12N2" office:value-type="float" office:value="2510.65">
            <text:p>2510,65</text:p>
          </table:table-cell>
          <table:table-cell table:style-name="ce12N2" office:value-type="float" office:value="100.43">
            <text:p>10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7642862000248550020000158721410215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80">
            <text:p>31118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77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8.04">
            <text:p>128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96.68">
            <text:p>1196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888">
            <text:p>0,003</text:p>
          </table:table-cell>
          <table:table-cell table:style-name="ce12N2" office:value-type="float" office:value="2.34">
            <text:p>2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8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42.54">
            <text:p>1042,54</text:p>
          </table:table-cell>
          <table:table-cell table:style-name="ce12N2" office:value-type="float" office:value="1.04">
            <text:p>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39">
            <text:p>9,39</text:p>
          </table:table-cell>
          <table:table-cell table:style-name="ce12N2" office:value-type="float" office:value="55.01">
            <text:p>55,0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91.36">
            <text:p>91,36</text:p>
          </table:table-cell>
          <table:table-cell table:style-name="ce12N2" office:value-type="float" office:value="1196.68">
            <text:p>1196,68</text:p>
          </table:table-cell>
          <table:table-cell table:style-name="ce12N2" office:value-type="float" office:value="47.87">
            <text:p>4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7771932284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82">
            <text:p>311182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74.3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17.11">
            <text:p>4817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79">
            <text:p>457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">
            <text:p>0,040</text:p>
          </table:table-cell>
          <table:table-cell table:style-name="ce12N2" office:value-type="float" office:value="0.07">
            <text:p>0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17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64.57">
            <text:p>3864,57</text:p>
          </table:table-cell>
          <table:table-cell table:style-name="ce12N2" office:value-type="float" office:value="3.86">
            <text:p>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78">
            <text:p>34,7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38.11">
            <text:p>238,11</text:p>
          </table:table-cell>
          <table:table-cell table:style-name="ce12N2" office:value-type="float" office:value="4579">
            <text:p>4579,00</text:p>
          </table:table-cell>
          <table:table-cell table:style-name="ce12N2" office:value-type="float" office:value="320.53">
            <text:p>32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569947000003655500100007437411000376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86">
            <text:p>3111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9.08">
            <text:p>1859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59.08">
            <text:p>1859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96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59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69.01">
            <text:p>1569,01</text:p>
          </table:table-cell>
          <table:table-cell table:style-name="ce12N2" office:value-type="float" office:value="1.57">
            <text:p>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12">
            <text:p>14,1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59.08">
            <text:p>1859,08</text:p>
          </table:table-cell>
          <table:table-cell table:style-name="ce12N2" office:value-type="float" office:value="130.14">
            <text:p>130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417754681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87">
            <text:p>3111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623.33">
            <text:p>1662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623.33">
            <text:p>16623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5436">
            <text:p>0,065</text:p>
          </table:table-cell>
          <table:table-cell table:style-name="ce12N2" office:value-type="float" office:value="45.03">
            <text:p>45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623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29.68">
            <text:p>14029,68</text:p>
          </table:table-cell>
          <table:table-cell table:style-name="ce12N2" office:value-type="float" office:value="14.03">
            <text:p>14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.26">
            <text:p>126,26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623.33">
            <text:p>16623,33</text:p>
          </table:table-cell>
          <table:table-cell table:style-name="ce12N2" office:value-type="float" office:value="1163.63">
            <text:p>1163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517849194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88">
            <text:p>3111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680.25">
            <text:p>3368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680.25">
            <text:p>33680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53">
            <text:p>0,165</text:p>
          </table:table-cell>
          <table:table-cell table:style-name="ce12N2" office:value-type="float" office:value="78.25">
            <text:p>78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680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425.29">
            <text:p>28425,29</text:p>
          </table:table-cell>
          <table:table-cell table:style-name="ce12N2" office:value-type="float" office:value="28.43">
            <text:p>28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5.83">
            <text:p>255,8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680.25">
            <text:p>33680,25</text:p>
          </table:table-cell>
          <table:table-cell table:style-name="ce12N2" office:value-type="float" office:value="2357.62">
            <text:p>2357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61861103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89">
            <text:p>3111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638.62">
            <text:p>2963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638.62">
            <text:p>29638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5464">
            <text:p>0,145</text:p>
          </table:table-cell>
          <table:table-cell table:style-name="ce12N2" office:value-type="float" office:value="68.86">
            <text:p>68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63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014.26">
            <text:p>25014,26</text:p>
          </table:table-cell>
          <table:table-cell table:style-name="ce12N2" office:value-type="float" office:value="25.01">
            <text:p>25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5.13">
            <text:p>225,1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638.62">
            <text:p>29638,62</text:p>
          </table:table-cell>
          <table:table-cell table:style-name="ce12N2" office:value-type="float" office:value="2074.7">
            <text:p>207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711316526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0">
            <text:p>3111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3.28">
            <text:p>21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0.26">
            <text:p>20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82">
            <text:p>0,000</text:p>
          </table:table-cell>
          <table:table-cell table:style-name="ce12N2" office:value-type="float" office:value="0.42">
            <text:p>0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3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9.02">
            <text:p>169,02</text:p>
          </table:table-cell>
          <table:table-cell table:style-name="ce12N2" office:value-type="float" office:value="0.17">
            <text:p>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52">
            <text:p>1,5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3.02">
            <text:p>13,02</text:p>
          </table:table-cell>
          <table:table-cell table:style-name="ce12N2" office:value-type="float" office:value="200.26">
            <text:p>200,26</text:p>
          </table:table-cell>
          <table:table-cell table:style-name="ce12N2" office:value-type="float" office:value="14.02">
            <text:p>14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813515004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1">
            <text:p>3111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.55">
            <text:p>42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0.52">
            <text:p>400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64">
            <text:p>0,000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6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8.02">
            <text:p>338,02</text:p>
          </table:table-cell>
          <table:table-cell table:style-name="ce12N2" office:value-type="float" office:value="0.34">
            <text:p>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04">
            <text:p>3,0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6.03">
            <text:p>26,03</text:p>
          </table:table-cell>
          <table:table-cell table:style-name="ce12N2" office:value-type="float" office:value="400.52">
            <text:p>400,52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913318907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2">
            <text:p>3111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85.47">
            <text:p>398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946.42">
            <text:p>3946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8">
            <text:p>0,005</text:p>
          </table:table-cell>
          <table:table-cell table:style-name="ce12N2" office:value-type="float" office:value="4.41">
            <text:p>4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85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30.69">
            <text:p>3330,69</text:p>
          </table:table-cell>
          <table:table-cell table:style-name="ce12N2" office:value-type="float" office:value="3.33">
            <text:p>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97">
            <text:p>29,9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9.05">
            <text:p>39,05</text:p>
          </table:table-cell>
          <table:table-cell table:style-name="ce12N2" office:value-type="float" office:value="3946.42">
            <text:p>3946,42</text:p>
          </table:table-cell>
          <table:table-cell table:style-name="ce12N2" office:value-type="float" office:value="276.24">
            <text:p>27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015801790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3">
            <text:p>31119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43.36">
            <text:p>294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43.36">
            <text:p>2943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8792">
            <text:p>0,029</text:p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43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84.11">
            <text:p>2484,11</text:p>
          </table:table-cell>
          <table:table-cell table:style-name="ce12N2" office:value-type="float" office:value="2.48">
            <text:p>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36">
            <text:p>22,3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43.36">
            <text:p>2943,36</text:p>
          </table:table-cell>
          <table:table-cell table:style-name="ce12N2" office:value-type="float" office:value="206.04">
            <text:p>206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116328832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5">
            <text:p>3111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521.16">
            <text:p>5152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51226.98">
            <text:p>51226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4829">
            <text:p>0,295</text:p>
          </table:table-cell>
          <table:table-cell table:style-name="ce12N2" office:value-type="float" office:value="192.98">
            <text:p>192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.521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369.56">
            <text:p>43369,56</text:p>
          </table:table-cell>
          <table:table-cell table:style-name="ce12N2" office:value-type="float" office:value="43.37">
            <text:p>43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0.33">
            <text:p>390,33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94.18">
            <text:p>294,18</text:p>
          </table:table-cell>
          <table:table-cell table:style-name="ce12N2" office:value-type="float" office:value="49097.54">
            <text:p>49097,54</text:p>
          </table:table-cell>
          <table:table-cell table:style-name="ce12N2" office:value-type="float" office:value="3436.84">
            <text:p>343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317936317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6">
            <text:p>3111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89">
            <text:p>428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89">
            <text:p>428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58">
            <text:p>0,008</text:p>
          </table:table-cell>
          <table:table-cell table:style-name="ce12N2" office:value-type="float" office:value="4.06">
            <text:p>4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8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19.81">
            <text:p>3619,81</text:p>
          </table:table-cell>
          <table:table-cell table:style-name="ce12N2" office:value-type="float" office:value="3.62">
            <text:p>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58">
            <text:p>32,58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89">
            <text:p>4289,00</text:p>
          </table:table-cell>
          <table:table-cell table:style-name="ce12N2" office:value-type="float" office:value="300.23">
            <text:p>30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412084273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7">
            <text:p>31119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4.13">
            <text:p>89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39.56">
            <text:p>839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75">
            <text:p>0,001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4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2.94">
            <text:p>712,94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42">
            <text:p>6,4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54.57">
            <text:p>54,57</text:p>
          </table:table-cell>
          <table:table-cell table:style-name="ce12N2" office:value-type="float" office:value="839.56">
            <text:p>839,56</text:p>
          </table:table-cell>
          <table:table-cell table:style-name="ce12N2" office:value-type="float" office:value="53.95">
            <text:p>5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617131052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8">
            <text:p>31119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249.78">
            <text:p>24249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249.78">
            <text:p>24249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9016">
            <text:p>0,119</text:p>
          </table:table-cell>
          <table:table-cell table:style-name="ce12N2" office:value-type="float" office:value="56.34">
            <text:p>56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249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466.22">
            <text:p>20466,22</text:p>
          </table:table-cell>
          <table:table-cell table:style-name="ce12N2" office:value-type="float" office:value="20.47">
            <text:p>20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4.2">
            <text:p>184,20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249.78">
            <text:p>24249,78</text:p>
          </table:table-cell>
          <table:table-cell table:style-name="ce12N2" office:value-type="float" office:value="1697.48">
            <text:p>1697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71697067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9">
            <text:p>31119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2.58">
            <text:p>180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92.56">
            <text:p>1692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6">
            <text:p>0,011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0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28.48">
            <text:p>1428,48</text:p>
          </table:table-cell>
          <table:table-cell table:style-name="ce12N2" office:value-type="float" office:value="1.43">
            <text:p>1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86">
            <text:p>12,8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10.02">
            <text:p>110,02</text:p>
          </table:table-cell>
          <table:table-cell table:style-name="ce12N2" office:value-type="float" office:value="1692.56">
            <text:p>1692,56</text:p>
          </table:table-cell>
          <table:table-cell table:style-name="ce12N2" office:value-type="float" office:value="118.48">
            <text:p>11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813150811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0">
            <text:p>31120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9.83">
            <text:p>639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0.78">
            <text:p>600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46">
            <text:p>0,001</text:p>
          </table:table-cell>
          <table:table-cell table:style-name="ce12N2" office:value-type="float" office:value="1.25">
            <text:p>1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9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7.05">
            <text:p>507,05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56">
            <text:p>4,56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9.05">
            <text:p>39,05</text:p>
          </table:table-cell>
          <table:table-cell table:style-name="ce12N2" office:value-type="float" office:value="600.78">
            <text:p>600,78</text:p>
          </table:table-cell>
          <table:table-cell table:style-name="ce12N2" office:value-type="float" office:value="42.05">
            <text:p>4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912789075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1">
            <text:p>31120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8.72">
            <text:p>183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38.72">
            <text:p>1838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184">
            <text:p>0,009</text:p>
          </table:table-cell>
          <table:table-cell table:style-name="ce12N2" office:value-type="float" office:value="6.32">
            <text:p>6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38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51.83">
            <text:p>1551,83</text:p>
          </table:table-cell>
          <table:table-cell table:style-name="ce12N2" office:value-type="float" office:value="1.55">
            <text:p>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97">
            <text:p>13,9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8.72">
            <text:p>1838,72</text:p>
          </table:table-cell>
          <table:table-cell table:style-name="ce12N2" office:value-type="float" office:value="128.71">
            <text:p>128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017555361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2">
            <text:p>31120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33.92">
            <text:p>8733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33.92">
            <text:p>8733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3624">
            <text:p>0,044</text:p>
          </table:table-cell>
          <table:table-cell table:style-name="ce12N2" office:value-type="float" office:value="30.02">
            <text:p>30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733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71.22">
            <text:p>7371,22</text:p>
          </table:table-cell>
          <table:table-cell table:style-name="ce12N2" office:value-type="float" office:value="7.37">
            <text:p>7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.34">
            <text:p>66,3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33.92">
            <text:p>8733,92</text:p>
          </table:table-cell>
          <table:table-cell table:style-name="ce12N2" office:value-type="float" office:value="611.37">
            <text:p>61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113390078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3">
            <text:p>31120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96.8">
            <text:p>459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96.8">
            <text:p>459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96">
            <text:p>0,023</text:p>
          </table:table-cell>
          <table:table-cell table:style-name="ce12N2" office:value-type="float" office:value="15.8">
            <text:p>1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9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79.58">
            <text:p>3879,58</text:p>
          </table:table-cell>
          <table:table-cell table:style-name="ce12N2" office:value-type="float" office:value="3.88">
            <text:p>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92">
            <text:p>34,9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96.8">
            <text:p>4596,80</text:p>
          </table:table-cell>
          <table:table-cell table:style-name="ce12N2" office:value-type="float" office:value="321.78">
            <text:p>321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215681929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4">
            <text:p>31120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5.78">
            <text:p>42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9.79">
            <text:p>399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115">
            <text:p>0,010</text:p>
          </table:table-cell>
          <table:table-cell table:style-name="ce12N2" office:value-type="float" office:value="2.19">
            <text:p>2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5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7.41">
            <text:p>337,41</text:p>
          </table:table-cell>
          <table:table-cell table:style-name="ce12N2" office:value-type="float" office:value="0.34">
            <text:p>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04">
            <text:p>3,04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5.99">
            <text:p>25,99</text:p>
          </table:table-cell>
          <table:table-cell table:style-name="ce12N2" office:value-type="float" office:value="399.79">
            <text:p>399,79</text:p>
          </table:table-cell>
          <table:table-cell table:style-name="ce12N2" office:value-type="float" office:value="27.99">
            <text:p>2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319507183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6">
            <text:p>31120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96.8">
            <text:p>459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96.8">
            <text:p>459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96">
            <text:p>0,023</text:p>
          </table:table-cell>
          <table:table-cell table:style-name="ce12N2" office:value-type="float" office:value="15.8">
            <text:p>1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9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79.58">
            <text:p>3879,58</text:p>
          </table:table-cell>
          <table:table-cell table:style-name="ce12N2" office:value-type="float" office:value="3.88">
            <text:p>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92">
            <text:p>34,92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96.8">
            <text:p>4596,80</text:p>
          </table:table-cell>
          <table:table-cell table:style-name="ce12N2" office:value-type="float" office:value="321.78">
            <text:p>321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412922580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7">
            <text:p>31120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24.72">
            <text:p>742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424.72">
            <text:p>7424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09">
            <text:p>0,001</text:p>
          </table:table-cell>
          <table:table-cell table:style-name="ce12N2" office:value-type="float" office:value="2.64">
            <text:p>2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2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66.45">
            <text:p>6466,45</text:p>
          </table:table-cell>
          <table:table-cell table:style-name="ce12N2" office:value-type="float" office:value="6.46">
            <text:p>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19">
            <text:p>58,1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374.19">
            <text:p>7374,19</text:p>
          </table:table-cell>
          <table:table-cell table:style-name="ce12N2" office:value-type="float" office:value="299.15">
            <text:p>299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618488314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8">
            <text:p>31120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430.1">
            <text:p>10430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378.03">
            <text:p>10378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581">
            <text:p>0,031</text:p>
          </table:table-cell>
          <table:table-cell table:style-name="ce12N2" office:value-type="float" office:value="13.94">
            <text:p>13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430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960.51">
            <text:p>8960,51</text:p>
          </table:table-cell>
          <table:table-cell table:style-name="ce12N2" office:value-type="float" office:value="8.96">
            <text:p>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.64">
            <text:p>80,64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52.07">
            <text:p>52,07</text:p>
          </table:table-cell>
          <table:table-cell table:style-name="ce12N2" office:value-type="float" office:value="8862.26">
            <text:p>8862,26</text:p>
          </table:table-cell>
          <table:table-cell table:style-name="ce12N2" office:value-type="float" office:value="504.19">
            <text:p>504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712084318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9">
            <text:p>31120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3.12">
            <text:p>34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3.12">
            <text:p>34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9532">
            <text:p>0,090</text:p>
          </table:table-cell>
          <table:table-cell table:style-name="ce12N2" office:value-type="float" office:value="3.95">
            <text:p>3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8.93">
            <text:p>298,93</text:p>
          </table:table-cell>
          <table:table-cell table:style-name="ce12N2" office:value-type="float" office:value="0.3">
            <text:p>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69">
            <text:p>2,69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3.12">
            <text:p>343,12</text:p>
          </table:table-cell>
          <table:table-cell table:style-name="ce12N2" office:value-type="float" office:value="13.72">
            <text:p>13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816709936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0">
            <text:p>31121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92.67">
            <text:p>1269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918">
            <text:p>1191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7">
            <text:p>0,036</text:p>
          </table:table-cell>
          <table:table-cell table:style-name="ce12N2" office:value-type="float" office:value="13.24">
            <text:p>13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692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058.5">
            <text:p>10058,50</text:p>
          </table:table-cell>
          <table:table-cell table:style-name="ce12N2" office:value-type="float" office:value="10.06">
            <text:p>10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.53">
            <text:p>90,5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774.67">
            <text:p>774,67</text:p>
          </table:table-cell>
          <table:table-cell table:style-name="ce12N2" office:value-type="float" office:value="11918">
            <text:p>11918,00</text:p>
          </table:table-cell>
          <table:table-cell table:style-name="ce12N2" office:value-type="float" office:value="834.26">
            <text:p>83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91541216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1">
            <text:p>31121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034.64">
            <text:p>3403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034.64">
            <text:p>3403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8688">
            <text:p>0,159</text:p>
          </table:table-cell>
          <table:table-cell table:style-name="ce12N2" office:value-type="float" office:value="75.12">
            <text:p>75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034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724.39">
            <text:p>28724,39</text:p>
          </table:table-cell>
          <table:table-cell table:style-name="ce12N2" office:value-type="float" office:value="28.72">
            <text:p>2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8.52">
            <text:p>258,5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034.64">
            <text:p>34034,64</text:p>
          </table:table-cell>
          <table:table-cell table:style-name="ce12N2" office:value-type="float" office:value="2382.42">
            <text:p>238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014131307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2">
            <text:p>31121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07.86">
            <text:p>3807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5.46">
            <text:p>3575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71">
            <text:p>0,011</text:p>
          </table:table-cell>
          <table:table-cell table:style-name="ce12N2" office:value-type="float" office:value="3.97">
            <text:p>3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07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17.6">
            <text:p>3017,60</text:p>
          </table:table-cell>
          <table:table-cell table:style-name="ce12N2" office:value-type="float" office:value="3.02">
            <text:p>3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32.4">
            <text:p>232,40</text:p>
          </table:table-cell>
          <table:table-cell table:style-name="ce12N2" office:value-type="float" office:value="3575.46">
            <text:p>3575,46</text:p>
          </table:table-cell>
          <table:table-cell table:style-name="ce12N2" office:value-type="float" office:value="250.28">
            <text:p>250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111125709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3">
            <text:p>31121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140.85">
            <text:p>1514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773.79">
            <text:p>14773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25307">
            <text:p>1,925</text:p>
          </table:table-cell>
          <table:table-cell table:style-name="ce12N2" office:value-type="float" office:value="36.3">
            <text:p>36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140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820.55">
            <text:p>12820,55</text:p>
          </table:table-cell>
          <table:table-cell table:style-name="ce12N2" office:value-type="float" office:value="12.82">
            <text:p>1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.39">
            <text:p>115,3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67.06">
            <text:p>367,06</text:p>
          </table:table-cell>
          <table:table-cell table:style-name="ce12N2" office:value-type="float" office:value="14773.79">
            <text:p>14773,79</text:p>
          </table:table-cell>
          <table:table-cell table:style-name="ce12N2" office:value-type="float" office:value="646.46">
            <text:p>64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211363506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4">
            <text:p>31121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65.26">
            <text:p>4965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897.5">
            <text:p>489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53">
            <text:p>0,026</text:p>
          </table:table-cell>
          <table:table-cell table:style-name="ce12N2" office:value-type="float" office:value="26.02">
            <text:p>26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65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61.76">
            <text:p>4161,76</text:p>
          </table:table-cell>
          <table:table-cell table:style-name="ce12N2" office:value-type="float" office:value="4.16">
            <text:p>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45">
            <text:p>37,45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67.76">
            <text:p>67,76</text:p>
          </table:table-cell>
          <table:table-cell table:style-name="ce12N2" office:value-type="float" office:value="4897.5">
            <text:p>4897,50</text:p>
          </table:table-cell>
          <table:table-cell table:style-name="ce12N2" office:value-type="float" office:value="311.55">
            <text:p>31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315334889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5">
            <text:p>31121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979.96">
            <text:p>23979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979.96">
            <text:p>23979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072">
            <text:p>0,091</text:p>
          </table:table-cell>
          <table:table-cell table:style-name="ce12N2" office:value-type="float" office:value="66.82">
            <text:p>66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979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891.34">
            <text:p>20891,34</text:p>
          </table:table-cell>
          <table:table-cell table:style-name="ce12N2" office:value-type="float" office:value="20.89">
            <text:p>2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8.02">
            <text:p>188,0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979.96">
            <text:p>23979,96</text:p>
          </table:table-cell>
          <table:table-cell table:style-name="ce12N2" office:value-type="float" office:value="959.2">
            <text:p>95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511083210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6">
            <text:p>3112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888.47">
            <text:p>2888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8737.37">
            <text:p>28737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72632">
            <text:p>1,073</text:p>
          </table:table-cell>
          <table:table-cell table:style-name="ce12N2" office:value-type="float" office:value="176.95">
            <text:p>176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888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373.56">
            <text:p>24373,56</text:p>
          </table:table-cell>
          <table:table-cell table:style-name="ce12N2" office:value-type="float" office:value="24.37">
            <text:p>2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9.36">
            <text:p>219,36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51.1">
            <text:p>151,10</text:p>
          </table:table-cell>
          <table:table-cell table:style-name="ce12N2" office:value-type="float" office:value="28737.37">
            <text:p>28737,37</text:p>
          </table:table-cell>
          <table:table-cell table:style-name="ce12N2" office:value-type="float" office:value="1879.43">
            <text:p>187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61112475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7">
            <text:p>31121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68.45">
            <text:p>6168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168.45">
            <text:p>6168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42">
            <text:p>0,008</text:p>
          </table:table-cell>
          <table:table-cell table:style-name="ce12N2" office:value-type="float" office:value="6.61">
            <text:p>6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68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06.04">
            <text:p>5206,04</text:p>
          </table:table-cell>
          <table:table-cell table:style-name="ce12N2" office:value-type="float" office:value="5.2">
            <text:p>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.85">
            <text:p>46,8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68.45">
            <text:p>6168,45</text:p>
          </table:table-cell>
          <table:table-cell table:style-name="ce12N2" office:value-type="float" office:value="431.79">
            <text:p>43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71711649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9">
            <text:p>3112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93">
            <text:p>199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93">
            <text:p>199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96">
            <text:p>0,002</text:p>
          </table:table-cell>
          <table:table-cell table:style-name="ce12N2" office:value-type="float" office:value="2.66">
            <text:p>2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9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2.04">
            <text:p>1682,04</text:p>
          </table:table-cell>
          <table:table-cell table:style-name="ce12N2" office:value-type="float" office:value="1.68">
            <text:p>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14">
            <text:p>15,14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93">
            <text:p>1993,00</text:p>
          </table:table-cell>
          <table:table-cell table:style-name="ce12N2" office:value-type="float" office:value="139.51">
            <text:p>13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018382461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0">
            <text:p>31122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70.76">
            <text:p>307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70.76">
            <text:p>3070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24">
            <text:p>0,000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70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91.65">
            <text:p>2591,65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32">
            <text:p>23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70.76">
            <text:p>3070,76</text:p>
          </table:table-cell>
          <table:table-cell table:style-name="ce12N2" office:value-type="float" office:value="214.95">
            <text:p>214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118047640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1">
            <text:p>31122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56.8">
            <text:p>615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56.8">
            <text:p>615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8">
            <text:p>0,002</text:p>
          </table:table-cell>
          <table:table-cell table:style-name="ce12N2" office:value-type="float" office:value="48.8">
            <text:p>4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5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63.81">
            <text:p>5363,81</text:p>
          </table:table-cell>
          <table:table-cell table:style-name="ce12N2" office:value-type="float" office:value="5.36">
            <text:p>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.27">
            <text:p>48,2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56.8">
            <text:p>6156,80</text:p>
          </table:table-cell>
          <table:table-cell table:style-name="ce12N2" office:value-type="float" office:value="246.27">
            <text:p>246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214256620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2">
            <text:p>31122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29.98">
            <text:p>322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29.98">
            <text:p>3229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428">
            <text:p>0,046</text:p>
          </table:table-cell>
          <table:table-cell table:style-name="ce12N2" office:value-type="float" office:value="0.76">
            <text:p>0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29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26.03">
            <text:p>2726,03</text:p>
          </table:table-cell>
          <table:table-cell table:style-name="ce12N2" office:value-type="float" office:value="2.73">
            <text:p>2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53">
            <text:p>24,53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29.98">
            <text:p>3229,98</text:p>
          </table:table-cell>
          <table:table-cell table:style-name="ce12N2" office:value-type="float" office:value="226.1">
            <text:p>22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417143792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3">
            <text:p>31122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48.24">
            <text:p>264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48.24">
            <text:p>2648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68">
            <text:p>0,033</text:p>
          </table:table-cell>
          <table:table-cell table:style-name="ce12N2" office:value-type="float" office:value="3.36">
            <text:p>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48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35.04">
            <text:p>2235,04</text:p>
          </table:table-cell>
          <table:table-cell table:style-name="ce12N2" office:value-type="float" office:value="2.24">
            <text:p>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12">
            <text:p>20,1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48.24">
            <text:p>2648,24</text:p>
          </table:table-cell>
          <table:table-cell table:style-name="ce12N2" office:value-type="float" office:value="185.38">
            <text:p>18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514369062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4">
            <text:p>31122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2.5">
            <text:p>82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22.5">
            <text:p>822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28">
            <text:p>0,001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2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4.17">
            <text:p>694,17</text:p>
          </table:table-cell>
          <table:table-cell table:style-name="ce12N2" office:value-type="float" office:value="0.69">
            <text:p>0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25">
            <text:p>6,25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2.5">
            <text:p>822,50</text:p>
          </table:table-cell>
          <table:table-cell table:style-name="ce12N2" office:value-type="float" office:value="57.58">
            <text:p>57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612261183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5">
            <text:p>31122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22.1">
            <text:p>362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542.08">
            <text:p>3542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604">
            <text:p>0,011</text:p>
          </table:table-cell>
          <table:table-cell table:style-name="ce12N2" office:value-type="float" office:value="5.45">
            <text:p>5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22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89.44">
            <text:p>2989,44</text:p>
          </table:table-cell>
          <table:table-cell table:style-name="ce12N2" office:value-type="float" office:value="2.99">
            <text:p>2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9">
            <text:p>26,9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80.02">
            <text:p>80,02</text:p>
          </table:table-cell>
          <table:table-cell table:style-name="ce12N2" office:value-type="float" office:value="3542.08">
            <text:p>3542,08</text:p>
          </table:table-cell>
          <table:table-cell table:style-name="ce12N2" office:value-type="float" office:value="247.94">
            <text:p>247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719905049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6">
            <text:p>31122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3.3">
            <text:p>132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3.3">
            <text:p>1323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74">
            <text:p>0,006</text:p>
          </table:table-cell>
          <table:table-cell table:style-name="ce12N2" office:value-type="float" office:value="3.95">
            <text:p>3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6.83">
            <text:p>1116,83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5">
            <text:p>10,0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3.3">
            <text:p>1323,30</text:p>
          </table:table-cell>
          <table:table-cell table:style-name="ce12N2" office:value-type="float" office:value="92.63">
            <text:p>92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819718257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7">
            <text:p>31122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76.32">
            <text:p>727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276.32">
            <text:p>7276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432">
            <text:p>0,036</text:p>
          </table:table-cell>
          <table:table-cell table:style-name="ce12N2" office:value-type="float" office:value="14.56">
            <text:p>14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76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39.13">
            <text:p>6339,13</text:p>
          </table:table-cell>
          <table:table-cell table:style-name="ce12N2" office:value-type="float" office:value="6.34">
            <text:p>6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05">
            <text:p>57,0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76.32">
            <text:p>7276,32</text:p>
          </table:table-cell>
          <table:table-cell table:style-name="ce12N2" office:value-type="float" office:value="291.05">
            <text:p>29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918460909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8">
            <text:p>31122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45.38">
            <text:p>174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45.38">
            <text:p>1745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404">
            <text:p>0,026</text:p>
          </table:table-cell>
          <table:table-cell table:style-name="ce12N2" office:value-type="float" office:value="18.17">
            <text:p>18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45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73.06">
            <text:p>1473,06</text:p>
          </table:table-cell>
          <table:table-cell table:style-name="ce12N2" office:value-type="float" office:value="1.47">
            <text:p>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26">
            <text:p>13,2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45.38">
            <text:p>1745,38</text:p>
          </table:table-cell>
          <table:table-cell table:style-name="ce12N2" office:value-type="float" office:value="122.18">
            <text:p>122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3017694282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30">
            <text:p>311230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5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592">
            <text:p>6859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592">
            <text:p>6859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4">
            <text:p>0,010</text:p>
          </table:table-cell>
          <table:table-cell table:style-name="ce12N2" office:value-type="float" office:value="244">
            <text:p>24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.59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757.35">
            <text:p>59757,35</text:p>
          </table:table-cell>
          <table:table-cell table:style-name="ce12N2" office:value-type="float" office:value="59.76">
            <text:p>5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7.82">
            <text:p>537,8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592">
            <text:p>68592,00</text:p>
          </table:table-cell>
          <table:table-cell table:style-name="ce12N2" office:value-type="float" office:value="2743.68">
            <text:p>274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53214344867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36">
            <text:p>31123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234.71">
            <text:p>666234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">
            <text:p>65,00</text:p>
          </table:table-cell>
          <table:table-cell table:style-name="ce12N2" office:value-type="float" office:value="664454.88">
            <text:p>664454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.230666">
            <text:p>32,231</text:p>
          </table:table-cell>
          <table:table-cell table:style-name="ce12N2" office:value-type="float" office:value="1091.22">
            <text:p>109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6.234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5737.83">
            <text:p>565737,83</text:p>
          </table:table-cell>
          <table:table-cell table:style-name="ce12N2" office:value-type="float" office:value="565.74">
            <text:p>565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91.65">
            <text:p>5091,6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779.83">
            <text:p>1779,83</text:p>
          </table:table-cell>
          <table:table-cell table:style-name="ce12N2" office:value-type="float" office:value="660568.58">
            <text:p>660568,58</text:p>
          </table:table-cell>
          <table:table-cell table:style-name="ce12N2" office:value-type="float" office:value="41052.33">
            <text:p>4105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314841044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37">
            <text:p>311237</text:p>
          </table:table-cell>
          <table:table-cell table:style-name="ce0" table:number-columns-spanned="4" table:number-rows-spanned="1" office:value-type="string" calcext:value-type="string">
            <text:p>32.363 - TRAMONTINA ELETRIK S.A.</text:p>
          </table:table-cell>
          <table:covered-table-cell table:number-columns-repeated="3"/>
          <table:table-cell table:style-name="ce0" office:value-type="string" calcext:value-type="string">
            <text:p>6.3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595.86">
            <text:p>10259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366.45">
            <text:p>99366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1.942">
            <text:p>31,942</text:p>
          </table:table-cell>
          <table:table-cell table:style-name="ce12N2" office:value-type="float" office:value="6000">
            <text:p>6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2.59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862.8">
            <text:p>83862,80</text:p>
          </table:table-cell>
          <table:table-cell table:style-name="ce12N2" office:value-type="float" office:value="83.86">
            <text:p>8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4.77">
            <text:p>754,7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229.41">
            <text:p>3229,41</text:p>
          </table:table-cell>
          <table:table-cell table:style-name="ce12N2" office:value-type="float" office:value="99366.45">
            <text:p>99366,45</text:p>
          </table:table-cell>
          <table:table-cell table:style-name="ce12N2" office:value-type="float" office:value="6955.65">
            <text:p>6955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886740800003735500100000636215751136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39">
            <text:p>31123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94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09.78">
            <text:p>6109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67">
            <text:p>556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83">
            <text:p>0,108</text:p>
          </table:table-cell>
          <table:table-cell table:style-name="ce12N2" office:value-type="float" office:value="8.74">
            <text:p>8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09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98.4">
            <text:p>4698,40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29">
            <text:p>42,29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542.78">
            <text:p>542,78</text:p>
          </table:table-cell>
          <table:table-cell table:style-name="ce12N2" office:value-type="float" office:value="5567">
            <text:p>5567,00</text:p>
          </table:table-cell>
          <table:table-cell table:style-name="ce12N2" office:value-type="float" office:value="389.69">
            <text:p>389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94515198079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40">
            <text:p>31124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3.97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8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43.24">
            <text:p>264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43.24">
            <text:p>264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96">
            <text:p>0,011</text:p>
          </table:table-cell>
          <table:table-cell table:style-name="ce12N2" office:value-type="float" office:value="3.34">
            <text:p>3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4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30.84">
            <text:p>2230,84</text:p>
          </table:table-cell>
          <table:table-cell table:style-name="ce12N2" office:value-type="float" office:value="2.23">
            <text:p>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08">
            <text:p>20,0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43.24">
            <text:p>2643,24</text:p>
          </table:table-cell>
          <table:table-cell table:style-name="ce12N2" office:value-type="float" office:value="185.03">
            <text:p>185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397410828849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41">
            <text:p>311241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826.325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8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48.35">
            <text:p>974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9748.35">
            <text:p>9748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62">
            <text:p>0,042</text:p>
          </table:table-cell>
          <table:table-cell table:style-name="ce12N2" office:value-type="float" office:value="246.25">
            <text:p>246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48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27.39">
            <text:p>8227,39</text:p>
          </table:table-cell>
          <table:table-cell table:style-name="ce12N2" office:value-type="float" office:value="8.22">
            <text:p>8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03">
            <text:p>74,03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48.35">
            <text:p>9748,35</text:p>
          </table:table-cell>
          <table:table-cell table:style-name="ce12N2" office:value-type="float" office:value="682.39">
            <text:p>682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01085502500082632510053986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42">
            <text:p>311242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826.326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8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86.7">
            <text:p>698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986.7">
            <text:p>698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128">
            <text:p>0,031</text:p>
          </table:table-cell>
          <table:table-cell table:style-name="ce12N2" office:value-type="float" office:value="157.25">
            <text:p>157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98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96.64">
            <text:p>5896,64</text:p>
          </table:table-cell>
          <table:table-cell table:style-name="ce12N2" office:value-type="float" office:value="5.88">
            <text:p>5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.05">
            <text:p>53,05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86.7">
            <text:p>6986,70</text:p>
          </table:table-cell>
          <table:table-cell table:style-name="ce12N2" office:value-type="float" office:value="489.07">
            <text:p>48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01085502500082632610076784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43">
            <text:p>311243</text:p>
          </table:table-cell>
          <table:table-cell table:style-name="ce0" table:number-columns-spanned="4" table:number-rows-spanned="1" office:value-type="string" calcext:value-type="string">
            <text:p>781 - TUPY S.A</text:p>
          </table:table-cell>
          <table:covered-table-cell table:number-columns-repeated="3"/>
          <table:table-cell table:style-name="ce0" office:value-type="string" calcext:value-type="string">
            <text:p>625.06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16.08">
            <text:p>31516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30524.05">
            <text:p>30524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1553">
            <text:p>0,242</text:p>
          </table:table-cell>
          <table:table-cell table:style-name="ce12N2" office:value-type="float" office:value="193.95">
            <text:p>193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516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761.51">
            <text:p>25761,51</text:p>
          </table:table-cell>
          <table:table-cell table:style-name="ce12N2" office:value-type="float" office:value="25.76">
            <text:p>25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1.85">
            <text:p>231,85</text:p>
          </table:table-cell>
          <table:table-cell table:style-name="ce12N2" office:value-type="float" office:value="6">
            <text:p>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992.03">
            <text:p>992,03</text:p>
          </table:table-cell>
          <table:table-cell table:style-name="ce12N2" office:value-type="float" office:value="30524.05">
            <text:p>30524,05</text:p>
          </table:table-cell>
          <table:table-cell table:style-name="ce12N2" office:value-type="float" office:value="2136.69">
            <text:p>213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46833740003005500300062506616612957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53">
            <text:p>311253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6.8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12.89">
            <text:p>501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12.89">
            <text:p>5012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">
            <text:p>0,0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12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30.76">
            <text:p>4230,76</text:p>
          </table:table-cell>
          <table:table-cell table:style-name="ce12N2" office:value-type="float" office:value="4.23">
            <text:p>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08">
            <text:p>38,08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12.89">
            <text:p>5012,89</text:p>
          </table:table-cell>
          <table:table-cell table:style-name="ce12N2" office:value-type="float" office:value="350.9">
            <text:p>35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685318124142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54">
            <text:p>31125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63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7.63">
            <text:p>142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00.8">
            <text:p>13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4">
            <text:p>0,002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27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97.84">
            <text:p>1097,84</text:p>
          </table:table-cell>
          <table:table-cell table:style-name="ce12N2" office:value-type="float" office:value="1.1">
            <text:p>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88">
            <text:p>9,88</text:p>
          </table:table-cell>
          <table:table-cell table:style-name="ce12N2" office:value-type="float" office:value="54.76">
            <text:p>54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26.83">
            <text:p>126,83</text:p>
          </table:table-cell>
          <table:table-cell table:style-name="ce12N2" office:value-type="float" office:value="1300.8">
            <text:p>1300,80</text:p>
          </table:table-cell>
          <table:table-cell table:style-name="ce12N2" office:value-type="float" office:value="91.06">
            <text:p>9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6381270572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55">
            <text:p>31125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64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02.59">
            <text:p>1590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14929.74">
            <text:p>14929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1.215732">
            <text:p>61,216</text:p>
          </table:table-cell>
          <table:table-cell table:style-name="ce12N2" office:value-type="float" office:value="48.99">
            <text:p>48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02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831.53">
            <text:p>12831,53</text:p>
          </table:table-cell>
          <table:table-cell table:style-name="ce12N2" office:value-type="float" office:value="12.84">
            <text:p>1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.48">
            <text:p>115,48</text:p>
          </table:table-cell>
          <table:table-cell table:style-name="ce12N2" office:value-type="float" office:value="55.14">
            <text:p>55,1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972.85">
            <text:p>972,85</text:p>
          </table:table-cell>
          <table:table-cell table:style-name="ce12N2" office:value-type="float" office:value="14929.74">
            <text:p>14929,74</text:p>
          </table:table-cell>
          <table:table-cell table:style-name="ce12N2" office:value-type="float" office:value="790.31">
            <text:p>79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64810986592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59">
            <text:p>31125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3.3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629.7">
            <text:p>155629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155242.85">
            <text:p>155242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425175">
            <text:p>17,425</text:p>
          </table:table-cell>
          <table:table-cell table:style-name="ce12N2" office:value-type="float" office:value="4543.62">
            <text:p>4543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5.629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2998.97">
            <text:p>132998,97</text:p>
          </table:table-cell>
          <table:table-cell table:style-name="ce12N2" office:value-type="float" office:value="133">
            <text:p>13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6.98">
            <text:p>1196,9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86.85">
            <text:p>386,85</text:p>
          </table:table-cell>
          <table:table-cell table:style-name="ce12N2" office:value-type="float" office:value="155242.85">
            <text:p>155242,85</text:p>
          </table:table-cell>
          <table:table-cell table:style-name="ce12N2" office:value-type="float" office:value="8694.68">
            <text:p>869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339410771119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61">
            <text:p>31126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3.5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5423.11">
            <text:p>8542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85370.45">
            <text:p>85370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15.054388">
            <text:p>815,054</text:p>
          </table:table-cell>
          <table:table-cell table:style-name="ce12N2" office:value-type="float" office:value="5188.43">
            <text:p>5188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5.423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067.54">
            <text:p>72067,54</text:p>
          </table:table-cell>
          <table:table-cell table:style-name="ce12N2" office:value-type="float" office:value="72.07">
            <text:p>72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8.61">
            <text:p>648,61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52.66">
            <text:p>52,66</text:p>
          </table:table-cell>
          <table:table-cell table:style-name="ce12N2" office:value-type="float" office:value="85370.45">
            <text:p>85370,45</text:p>
          </table:table-cell>
          <table:table-cell table:style-name="ce12N2" office:value-type="float" office:value="5975.95">
            <text:p>5975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352213265148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65">
            <text:p>31126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1.41">
            <text:p>51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1.41">
            <text:p>511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738">
            <text:p>0,008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1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1.61">
            <text:p>431,61</text:p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88">
            <text:p>3,88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1.41">
            <text:p>511,41</text:p>
          </table:table-cell>
          <table:table-cell table:style-name="ce12N2" office:value-type="float" office:value="35.8">
            <text:p>3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513719367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66">
            <text:p>3112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20.66">
            <text:p>15220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127.16">
            <text:p>15127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82084">
            <text:p>0,182</text:p>
          </table:table-cell>
          <table:table-cell table:style-name="ce12N2" office:value-type="float" office:value="68.31">
            <text:p>68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220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39.62">
            <text:p>13139,62</text:p>
          </table:table-cell>
          <table:table-cell table:style-name="ce12N2" office:value-type="float" office:value="13.14">
            <text:p>13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.26">
            <text:p>118,2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93.5">
            <text:p>93,50</text:p>
          </table:table-cell>
          <table:table-cell table:style-name="ce12N2" office:value-type="float" office:value="15127.16">
            <text:p>15127,16</text:p>
          </table:table-cell>
          <table:table-cell table:style-name="ce12N2" office:value-type="float" office:value="648.25">
            <text:p>64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512570370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67">
            <text:p>31126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9.61">
            <text:p>52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9.61">
            <text:p>529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7">
            <text:p>0,001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9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6.98">
            <text:p>446,98</text:p>
          </table:table-cell>
          <table:table-cell table:style-name="ce12N2" office:value-type="float" office:value="0.45">
            <text:p>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02">
            <text:p>4,0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9.61">
            <text:p>529,61</text:p>
          </table:table-cell>
          <table:table-cell table:style-name="ce12N2" office:value-type="float" office:value="37.07">
            <text:p>3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41336564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68">
            <text:p>3112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1.41">
            <text:p>51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1.41">
            <text:p>511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738">
            <text:p>0,008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1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1.61">
            <text:p>431,61</text:p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88">
            <text:p>3,88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1.41">
            <text:p>511,41</text:p>
          </table:table-cell>
          <table:table-cell table:style-name="ce12N2" office:value-type="float" office:value="35.8">
            <text:p>3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912224905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0">
            <text:p>311270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7.94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69.42">
            <text:p>44869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4579.65">
            <text:p>44579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735114">
            <text:p>5,735</text:p>
          </table:table-cell>
          <table:table-cell table:style-name="ce12N2" office:value-type="float" office:value="32123.76">
            <text:p>32123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869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24.12">
            <text:p>37624,12</text:p>
          </table:table-cell>
          <table:table-cell table:style-name="ce12N2" office:value-type="float" office:value="37.62">
            <text:p>37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8.62">
            <text:p>338,62</text:p>
          </table:table-cell>
          <table:table-cell table:style-name="ce12N2" office:value-type="float" office:value="98.04">
            <text:p>98,0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89.77">
            <text:p>289,77</text:p>
          </table:table-cell>
          <table:table-cell table:style-name="ce12N2" office:value-type="float" office:value="44579.65">
            <text:p>44579,65</text:p>
          </table:table-cell>
          <table:table-cell table:style-name="ce12N2" office:value-type="float" office:value="3120.58">
            <text:p>312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44238800001455500300122794216468600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3">
            <text:p>311273</text:p>
          </table:table-cell>
          <table:table-cell table:style-name="ce0" table:number-columns-spanned="4" table:number-rows-spanned="1" office:value-type="string" calcext:value-type="string">
            <text:p>32.363 - TRAMONTINA ELETRIK S.A.</text:p>
          </table:table-cell>
          <table:covered-table-cell table:number-columns-repeated="3"/>
          <table:table-cell table:style-name="ce0" office:value-type="string" calcext:value-type="string">
            <text:p>6.3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097.1">
            <text:p>5309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1425.76">
            <text:p>51425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9675">
            <text:p>17,968</text:p>
          </table:table-cell>
          <table:table-cell table:style-name="ce12N2" office:value-type="float" office:value="2904">
            <text:p>290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.09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402.05">
            <text:p>43402,05</text:p>
          </table:table-cell>
          <table:table-cell table:style-name="ce12N2" office:value-type="float" office:value="43.4">
            <text:p>4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0.62">
            <text:p>390,62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671.34">
            <text:p>1671,34</text:p>
          </table:table-cell>
          <table:table-cell table:style-name="ce12N2" office:value-type="float" office:value="51425.76">
            <text:p>51425,76</text:p>
          </table:table-cell>
          <table:table-cell table:style-name="ce12N2" office:value-type="float" office:value="3599.8">
            <text:p>359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886740800003735500100000636315751136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4">
            <text:p>311274</text:p>
          </table:table-cell>
          <table:table-cell table:style-name="ce0" table:number-columns-spanned="4" table:number-rows-spanned="1" office:value-type="string" calcext:value-type="string">
            <text:p>32.363 - TRAMONTINA ELETRIK S.A.</text:p>
          </table:table-cell>
          <table:covered-table-cell table:number-columns-repeated="3"/>
          <table:table-cell table:style-name="ce0" office:value-type="string" calcext:value-type="string">
            <text:p>6.3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449.13">
            <text:p>34449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364.77">
            <text:p>33364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.81854">
            <text:p>11,819</text:p>
          </table:table-cell>
          <table:table-cell table:style-name="ce12N2" office:value-type="float" office:value="2220">
            <text:p>22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449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029.24">
            <text:p>31029,24</text:p>
          </table:table-cell>
          <table:table-cell table:style-name="ce12N2" office:value-type="float" office:value="31.03">
            <text:p>3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9.26">
            <text:p>279,2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084.36">
            <text:p>1084,36</text:p>
          </table:table-cell>
          <table:table-cell table:style-name="ce12N2" office:value-type="float" office:value="33364.77">
            <text:p>33364,77</text:p>
          </table:table-cell>
          <table:table-cell table:style-name="ce12N2" office:value-type="float" office:value="2335.53">
            <text:p>2335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886740800003735500100000636415751136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6">
            <text:p>31127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94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19.83">
            <text:p>5819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302.8">
            <text:p>530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831">
            <text:p>0,098</text:p>
          </table:table-cell>
          <table:table-cell table:style-name="ce12N2" office:value-type="float" office:value="8.23">
            <text:p>8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19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75.43">
            <text:p>4475,43</text:p>
          </table:table-cell>
          <table:table-cell table:style-name="ce12N2" office:value-type="float" office:value="4.47">
            <text:p>4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27">
            <text:p>40,2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517.03">
            <text:p>517,03</text:p>
          </table:table-cell>
          <table:table-cell table:style-name="ce12N2" office:value-type="float" office:value="5302.8">
            <text:p>5302,80</text:p>
          </table:table-cell>
          <table:table-cell table:style-name="ce12N2" office:value-type="float" office:value="371.2">
            <text:p>37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9441308027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8">
            <text:p>31127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94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48.49">
            <text:p>4648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479.16">
            <text:p>4479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4">
            <text:p>0,002</text:p>
          </table:table-cell>
          <table:table-cell table:style-name="ce12N2" office:value-type="float" office:value="0.82">
            <text:p>0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48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90.26">
            <text:p>3790,26</text:p>
          </table:table-cell>
          <table:table-cell table:style-name="ce12N2" office:value-type="float" office:value="3.79">
            <text:p>3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12">
            <text:p>34,12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69.33">
            <text:p>169,33</text:p>
          </table:table-cell>
          <table:table-cell table:style-name="ce12N2" office:value-type="float" office:value="4479.16">
            <text:p>4479,16</text:p>
          </table:table-cell>
          <table:table-cell table:style-name="ce12N2" office:value-type="float" office:value="302.57">
            <text:p>302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9471738077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9">
            <text:p>311279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704.72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337.49">
            <text:p>100337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">
            <text:p>81,00</text:p>
          </table:table-cell>
          <table:table-cell table:style-name="ce12N2" office:value-type="float" office:value="99480.68">
            <text:p>99480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810542">
            <text:p>14,811</text:p>
          </table:table-cell>
          <table:table-cell table:style-name="ce12N2" office:value-type="float" office:value="1696.89">
            <text:p>1696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0.337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267.85">
            <text:p>84267,85</text:p>
          </table:table-cell>
          <table:table-cell table:style-name="ce12N2" office:value-type="float" office:value="84.26">
            <text:p>8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8.4">
            <text:p>758,4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856.81">
            <text:p>856,81</text:p>
          </table:table-cell>
          <table:table-cell table:style-name="ce12N2" office:value-type="float" office:value="99480.68">
            <text:p>99480,68</text:p>
          </table:table-cell>
          <table:table-cell table:style-name="ce12N2" office:value-type="float" office:value="6623.46">
            <text:p>662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7238370001725500000070472910936069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80">
            <text:p>31128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12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15.6">
            <text:p>391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3708.6">
            <text:p>3708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21">
            <text:p>0,041</text:p>
          </table:table-cell>
          <table:table-cell table:style-name="ce12N2" office:value-type="float" office:value="14.52">
            <text:p>14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15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73.6">
            <text:p>3173,60</text:p>
          </table:table-cell>
          <table:table-cell table:style-name="ce12N2" office:value-type="float" office:value="3.17">
            <text:p>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57">
            <text:p>28,57</text:p>
          </table:table-cell>
          <table:table-cell table:style-name="ce12N2" office:value-type="float" office:value="58">
            <text:p>5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07">
            <text:p>207,00</text:p>
          </table:table-cell>
          <table:table-cell table:style-name="ce12N2" office:value-type="float" office:value="3708.6">
            <text:p>3708,60</text:p>
          </table:table-cell>
          <table:table-cell table:style-name="ce12N2" office:value-type="float" office:value="211.49">
            <text:p>21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12111901304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81">
            <text:p>311281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44.0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0.97">
            <text:p>81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70.88">
            <text:p>770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308">
            <text:p>0,007</text:p>
          </table:table-cell>
          <table:table-cell table:style-name="ce12N2" office:value-type="float" office:value="3.27">
            <text:p>3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0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0.04">
            <text:p>740,04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66">
            <text:p>6,6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40.09">
            <text:p>40,09</text:p>
          </table:table-cell>
          <table:table-cell table:style-name="ce12N2" office:value-type="float" office:value="770.88">
            <text:p>770,88</text:p>
          </table:table-cell>
          <table:table-cell table:style-name="ce12N2" office:value-type="float" office:value="30.84">
            <text:p>3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0049792000181550010013440421454733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82">
            <text:p>311282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44.0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5.25">
            <text:p>68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1.38">
            <text:p>651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88">
            <text:p>0,011</text:p>
          </table:table-cell>
          <table:table-cell table:style-name="ce12N2" office:value-type="float" office:value="6.24">
            <text:p>6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5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9.74">
            <text:p>549,74</text:p>
          </table:table-cell>
          <table:table-cell table:style-name="ce12N2" office:value-type="float" office:value="0.55">
            <text:p>0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95">
            <text:p>4,95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3.87">
            <text:p>33,87</text:p>
          </table:table-cell>
          <table:table-cell table:style-name="ce12N2" office:value-type="float" office:value="651.38">
            <text:p>651,38</text:p>
          </table:table-cell>
          <table:table-cell table:style-name="ce12N2" office:value-type="float" office:value="45.6">
            <text:p>4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00497920001815500100134404314869211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19">
            <text:p>31131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8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976.16">
            <text:p>1097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976.16">
            <text:p>1097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1044">
            <text:p>1,210</text:p>
          </table:table-cell>
          <table:table-cell table:style-name="ce12N2" office:value-type="float" office:value="480.08">
            <text:p>480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97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263.61">
            <text:p>9263,61</text:p>
          </table:table-cell>
          <table:table-cell table:style-name="ce12N2" office:value-type="float" office:value="9.26">
            <text:p>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.37">
            <text:p>83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76.16">
            <text:p>10976,16</text:p>
          </table:table-cell>
          <table:table-cell table:style-name="ce12N2" office:value-type="float" office:value="768.33">
            <text:p>768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81913467129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20">
            <text:p>311320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8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126">
            <text:p>3612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126">
            <text:p>3612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72">
            <text:p>3,072</text:p>
          </table:table-cell>
          <table:table-cell table:style-name="ce12N2" office:value-type="float" office:value="1289.45">
            <text:p>1289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12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489.44">
            <text:p>30489,44</text:p>
          </table:table-cell>
          <table:table-cell table:style-name="ce12N2" office:value-type="float" office:value="30.49">
            <text:p>30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4.4">
            <text:p>274,4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126">
            <text:p>36126,00</text:p>
          </table:table-cell>
          <table:table-cell table:style-name="ce12N2" office:value-type="float" office:value="2528.82">
            <text:p>252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8141758761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21">
            <text:p>311321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74.4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8.55">
            <text:p>3358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153.57">
            <text:p>3153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095">
            <text:p>0,018</text:p>
          </table:table-cell>
          <table:table-cell table:style-name="ce12N2" office:value-type="float" office:value="28.8">
            <text:p>2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58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61.53">
            <text:p>2661,53</text:p>
          </table:table-cell>
          <table:table-cell table:style-name="ce12N2" office:value-type="float" office:value="2.67">
            <text:p>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95">
            <text:p>23,95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204.98">
            <text:p>204,98</text:p>
          </table:table-cell>
          <table:table-cell table:style-name="ce12N2" office:value-type="float" office:value="3153.57">
            <text:p>3153,57</text:p>
          </table:table-cell>
          <table:table-cell table:style-name="ce12N2" office:value-type="float" office:value="220.75">
            <text:p>22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78348830001135500100067448416597479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22">
            <text:p>311322</text:p>
          </table:table-cell>
          <table:table-cell table:style-name="ce0" table:number-columns-spanned="4" table:number-rows-spanned="1" office:value-type="string" calcext:value-type="string">
            <text:p>12.833 - MULTI- BARRAS INDUSTRIA E COMERCIO EIRELI-EPP</text:p>
          </table:table-cell>
          <table:covered-table-cell table:number-columns-repeated="3"/>
          <table:table-cell table:style-name="ce0" office:value-type="string" calcext:value-type="string">
            <text:p>32.0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2186.33">
            <text:p>24218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27405">
            <text:p>22740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7837">
            <text:p>13,784</text:p>
          </table:table-cell>
          <table:table-cell table:style-name="ce12N2" office:value-type="float" office:value="32000">
            <text:p>32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2.186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1924.14">
            <text:p>191924,14</text:p>
          </table:table-cell>
          <table:table-cell table:style-name="ce12N2" office:value-type="float" office:value="191.93">
            <text:p>19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27.31">
            <text:p>1727,31</text:p>
          </table:table-cell>
          <table:table-cell table:style-name="ce12N2" office:value-type="float" office:value="7">
            <text:p>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14781.33">
            <text:p>14781,33</text:p>
          </table:table-cell>
          <table:table-cell table:style-name="ce12N2" office:value-type="float" office:value="227405">
            <text:p>227405,00</text:p>
          </table:table-cell>
          <table:table-cell table:style-name="ce12N2" office:value-type="float" office:value="15918.35">
            <text:p>1591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274042360001405500100003200611052239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23">
            <text:p>311323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8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962.56">
            <text:p>12962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62.56">
            <text:p>12962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824">
            <text:p>1,382</text:p>
          </table:table-cell>
          <table:table-cell table:style-name="ce12N2" office:value-type="float" office:value="635.54">
            <text:p>635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962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940.08">
            <text:p>10940,08</text:p>
          </table:table-cell>
          <table:table-cell table:style-name="ce12N2" office:value-type="float" office:value="10.94">
            <text:p>1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.46">
            <text:p>98,4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62.56">
            <text:p>12962,56</text:p>
          </table:table-cell>
          <table:table-cell table:style-name="ce12N2" office:value-type="float" office:value="907.38">
            <text:p>907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81712954068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35">
            <text:p>31133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9.6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09.32">
            <text:p>310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09.32">
            <text:p>3109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6896">
            <text:p>0,077</text:p>
          </table:table-cell>
          <table:table-cell table:style-name="ce12N2" office:value-type="float" office:value="44.4">
            <text:p>4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09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08.84">
            <text:p>2708,84</text:p>
          </table:table-cell>
          <table:table-cell table:style-name="ce12N2" office:value-type="float" office:value="2.71">
            <text:p>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38">
            <text:p>24,3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09.32">
            <text:p>3109,32</text:p>
          </table:table-cell>
          <table:table-cell table:style-name="ce12N2" office:value-type="float" office:value="124.37">
            <text:p>12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961711618527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37">
            <text:p>31133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9.6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39.1">
            <text:p>12539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539.1">
            <text:p>12539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6964">
            <text:p>1,470</text:p>
          </table:table-cell>
          <table:table-cell table:style-name="ce12N2" office:value-type="float" office:value="570">
            <text:p>5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539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82.69">
            <text:p>10582,69</text:p>
          </table:table-cell>
          <table:table-cell table:style-name="ce12N2" office:value-type="float" office:value="10.58">
            <text:p>1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.24">
            <text:p>95,2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539.1">
            <text:p>12539,10</text:p>
          </table:table-cell>
          <table:table-cell table:style-name="ce12N2" office:value-type="float" office:value="877.74">
            <text:p>877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961612873235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38">
            <text:p>311338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9.6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752.94">
            <text:p>62752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62752.94">
            <text:p>62752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1517">
            <text:p>6,152</text:p>
          </table:table-cell>
          <table:table-cell table:style-name="ce12N2" office:value-type="float" office:value="1963.57">
            <text:p>1963,5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2.752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216.56">
            <text:p>53216,56</text:p>
          </table:table-cell>
          <table:table-cell table:style-name="ce12N2" office:value-type="float" office:value="53.22">
            <text:p>53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8.94">
            <text:p>478,9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752.94">
            <text:p>62752,94</text:p>
          </table:table-cell>
          <table:table-cell table:style-name="ce12N2" office:value-type="float" office:value="4112.1">
            <text:p>411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961511023207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41">
            <text:p>311341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13.9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00">
            <text:p>880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00">
            <text:p>88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">
            <text:p>0,004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0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26.98">
            <text:p>7426,98</text:p>
          </table:table-cell>
          <table:table-cell table:style-name="ce12N2" office:value-type="float" office:value="7.43">
            <text:p>7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.84">
            <text:p>66,84</text:p>
          </table:table-cell>
          <table:table-cell table:style-name="ce12N2" office:value-type="float" office:value="60.67">
            <text:p>60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00">
            <text:p>8800,00</text:p>
          </table:table-cell>
          <table:table-cell table:style-name="ce12N2" office:value-type="float" office:value="616">
            <text:p>61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20641500005185500100021390114275490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43">
            <text:p>31134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42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8.01">
            <text:p>998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66.6">
            <text:p>96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">
            <text:p>0,017</text:p>
          </table:table-cell>
          <table:table-cell table:style-name="ce12N2" office:value-type="float" office:value="1.14">
            <text:p>1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98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2.11">
            <text:p>842,11</text:p>
          </table:table-cell>
          <table:table-cell table:style-name="ce12N2" office:value-type="float" office:value="0.84">
            <text:p>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58">
            <text:p>7,58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31.41">
            <text:p>31,41</text:p>
          </table:table-cell>
          <table:table-cell table:style-name="ce12N2" office:value-type="float" office:value="966.6">
            <text:p>966,60</text:p>
          </table:table-cell>
          <table:table-cell table:style-name="ce12N2" office:value-type="float" office:value="38.66">
            <text:p>38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42215423652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44">
            <text:p>31134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41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0.03">
            <text:p>1100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65.4">
            <text:p>1065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487">
            <text:p>0,065</text:p>
          </table:table-cell>
          <table:table-cell table:style-name="ce12N2" office:value-type="float" office:value="2.52">
            <text:p>2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00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28.18">
            <text:p>928,18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35">
            <text:p>8,3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34.63">
            <text:p>34,63</text:p>
          </table:table-cell>
          <table:table-cell table:style-name="ce12N2" office:value-type="float" office:value="1065.4">
            <text:p>1065,40</text:p>
          </table:table-cell>
          <table:table-cell table:style-name="ce12N2" office:value-type="float" office:value="42.62">
            <text:p>42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41818413830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45">
            <text:p>31134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42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9.46">
            <text:p>99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68">
            <text:p>96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8">
            <text:p>0,023</text:p>
          </table:table-cell>
          <table:table-cell table:style-name="ce12N2" office:value-type="float" office:value="1.52">
            <text:p>1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9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3.32">
            <text:p>843,32</text:p>
          </table:table-cell>
          <table:table-cell table:style-name="ce12N2" office:value-type="float" office:value="0.84">
            <text:p>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59">
            <text:p>7,5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31.46">
            <text:p>31,46</text:p>
          </table:table-cell>
          <table:table-cell table:style-name="ce12N2" office:value-type="float" office:value="968">
            <text:p>968,00</text:p>
          </table:table-cell>
          <table:table-cell table:style-name="ce12N2" office:value-type="float" office:value="38.72">
            <text:p>3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42412038305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46">
            <text:p>31134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41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8.05">
            <text:p>132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86.25">
            <text:p>1286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315">
            <text:p>0,012</text:p>
          </table:table-cell>
          <table:table-cell table:style-name="ce12N2" office:value-type="float" office:value="0.96">
            <text:p>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8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0.58">
            <text:p>1120,58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9">
            <text:p>10,09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41.8">
            <text:p>41,80</text:p>
          </table:table-cell>
          <table:table-cell table:style-name="ce12N2" office:value-type="float" office:value="1286.25">
            <text:p>1286,25</text:p>
          </table:table-cell>
          <table:table-cell table:style-name="ce12N2" office:value-type="float" office:value="51.45">
            <text:p>5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41319914395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47">
            <text:p>31134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43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3.03">
            <text:p>433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9.4">
            <text:p>41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94">
            <text:p>0,006</text:p>
          </table:table-cell>
          <table:table-cell table:style-name="ce12N2" office:value-type="float" office:value="4.92">
            <text:p>4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3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5.38">
            <text:p>365,38</text:p>
          </table:table-cell>
          <table:table-cell table:style-name="ce12N2" office:value-type="float" office:value="0.37">
            <text:p>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29">
            <text:p>3,29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13.63">
            <text:p>13,63</text:p>
          </table:table-cell>
          <table:table-cell table:style-name="ce12N2" office:value-type="float" office:value="419.4">
            <text:p>419,40</text:p>
          </table:table-cell>
          <table:table-cell table:style-name="ce12N2" office:value-type="float" office:value="16.78">
            <text:p>1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43416729345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48">
            <text:p>311348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77.3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865">
            <text:p>8686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6865">
            <text:p>8686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0.1">
            <text:p>170,100</text:p>
          </table:table-cell>
          <table:table-cell table:style-name="ce12N2" office:value-type="float" office:value="16170">
            <text:p>161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.86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370.39">
            <text:p>69370,39</text:p>
          </table:table-cell>
          <table:table-cell table:style-name="ce12N2" office:value-type="float" office:value="69.37">
            <text:p>6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4.33">
            <text:p>624,33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865">
            <text:p>86865,00</text:p>
          </table:table-cell>
          <table:table-cell table:style-name="ce12N2" office:value-type="float" office:value="10423.8">
            <text:p>1042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7079339140001545500100087737614235545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51">
            <text:p>31135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46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1.22">
            <text:p>53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4.5">
            <text:p>51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">
            <text:p>0,006</text:p>
          </table:table-cell>
          <table:table-cell table:style-name="ce12N2" office:value-type="float" office:value="0.24">
            <text:p>0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1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8.23">
            <text:p>448,23</text:p>
          </table:table-cell>
          <table:table-cell table:style-name="ce12N2" office:value-type="float" office:value="0.45">
            <text:p>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03">
            <text:p>4,03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16.72">
            <text:p>16,72</text:p>
          </table:table-cell>
          <table:table-cell table:style-name="ce12N2" office:value-type="float" office:value="514.5">
            <text:p>514,50</text:p>
          </table:table-cell>
          <table:table-cell table:style-name="ce12N2" office:value-type="float" office:value="20.58">
            <text:p>2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46512381935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52">
            <text:p>31135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31.1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4.54">
            <text:p>195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17.18">
            <text:p>1817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35">
            <text:p>0,073</text:p>
          </table:table-cell>
          <table:table-cell table:style-name="ce12N2" office:value-type="float" office:value="13.3">
            <text:p>1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54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3.66">
            <text:p>1533,66</text:p>
          </table:table-cell>
          <table:table-cell table:style-name="ce12N2" office:value-type="float" office:value="1.54">
            <text:p>1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8">
            <text:p>13,8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137.36">
            <text:p>137,36</text:p>
          </table:table-cell>
          <table:table-cell table:style-name="ce12N2" office:value-type="float" office:value="1817.18">
            <text:p>1817,18</text:p>
          </table:table-cell>
          <table:table-cell table:style-name="ce12N2" office:value-type="float" office:value="127.2">
            <text:p>12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3113815804616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54">
            <text:p>311354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74.9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91.8">
            <text:p>1119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91.8">
            <text:p>1119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203">
            <text:p>0,152</text:p>
          </table:table-cell>
          <table:table-cell table:style-name="ce12N2" office:value-type="float" office:value="66.7">
            <text:p>66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191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50.3">
            <text:p>9750,30</text:p>
          </table:table-cell>
          <table:table-cell table:style-name="ce12N2" office:value-type="float" office:value="9.75">
            <text:p>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.75">
            <text:p>87,7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91.8">
            <text:p>11191,80</text:p>
          </table:table-cell>
          <table:table-cell table:style-name="ce12N2" office:value-type="float" office:value="447.67">
            <text:p>447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569947000003655500100007497511000074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56">
            <text:p>311356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62.518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618.38">
            <text:p>3561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618.38">
            <text:p>35618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3504">
            <text:p>6,350</text:p>
          </table:table-cell>
          <table:table-cell table:style-name="ce12N2" office:value-type="float" office:value="4334.04">
            <text:p>4334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618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061.02">
            <text:p>30061,02</text:p>
          </table:table-cell>
          <table:table-cell table:style-name="ce12N2" office:value-type="float" office:value="30.06">
            <text:p>30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0.55">
            <text:p>270,5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618.38">
            <text:p>35618,38</text:p>
          </table:table-cell>
          <table:table-cell table:style-name="ce12N2" office:value-type="float" office:value="2493.29">
            <text:p>249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46752700004505504000006251816531616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57">
            <text:p>311357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62.519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73.46">
            <text:p>887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873.46">
            <text:p>8873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553">
            <text:p>1,455</text:p>
          </table:table-cell>
          <table:table-cell table:style-name="ce12N2" office:value-type="float" office:value="1070.01">
            <text:p>1070,0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73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88.98">
            <text:p>7488,98</text:p>
          </table:table-cell>
          <table:table-cell table:style-name="ce12N2" office:value-type="float" office:value="7.49">
            <text:p>7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.41">
            <text:p>67,4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73.46">
            <text:p>8873,46</text:p>
          </table:table-cell>
          <table:table-cell table:style-name="ce12N2" office:value-type="float" office:value="621.14">
            <text:p>62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46752700004505504000006251917670641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58">
            <text:p>311358</text:p>
          </table:table-cell>
          <table:table-cell table:style-name="ce0" table:number-columns-spanned="4" table:number-rows-spanned="1" office:value-type="string" calcext:value-type="string">
            <text:p>16.329 - CSM-COMPONENTES SISTEMAS E MAQUINAS PARA CONSTRUCAO LTD</text:p>
          </table:table-cell>
          <table:covered-table-cell table:number-columns-repeated="3"/>
          <table:table-cell table:style-name="ce0" office:value-type="string" calcext:value-type="string">
            <text:p>375.9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6.76">
            <text:p>1676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76.76">
            <text:p>1676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4518">
            <text:p>0,065</text:p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76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60.79">
            <text:p>1460,79</text:p>
          </table:table-cell>
          <table:table-cell table:style-name="ce12N2" office:value-type="float" office:value="1.46">
            <text:p>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15">
            <text:p>13,1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76.76">
            <text:p>1676,76</text:p>
          </table:table-cell>
          <table:table-cell table:style-name="ce12N2" office:value-type="float" office:value="67.07">
            <text:p>6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68405370001215500100037594310232645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59">
            <text:p>311359</text:p>
          </table:table-cell>
          <table:table-cell table:style-name="ce0" table:number-columns-spanned="4" table:number-rows-spanned="1" office:value-type="string" calcext:value-type="string">
            <text:p>16.329 - CSM-COMPONENTES SISTEMAS E MAQUINAS PARA CONSTRUCAO LTD</text:p>
          </table:table-cell>
          <table:covered-table-cell table:number-columns-repeated="3"/>
          <table:table-cell table:style-name="ce0" office:value-type="string" calcext:value-type="string">
            <text:p>375.9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3.52">
            <text:p>3353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3.52">
            <text:p>3353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9036">
            <text:p>0,129</text:p>
          </table:table-cell>
          <table:table-cell table:style-name="ce12N2" office:value-type="float" office:value="42">
            <text:p>4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53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21.59">
            <text:p>2921,59</text:p>
          </table:table-cell>
          <table:table-cell table:style-name="ce12N2" office:value-type="float" office:value="2.92">
            <text:p>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29">
            <text:p>26,2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3.52">
            <text:p>3353,52</text:p>
          </table:table-cell>
          <table:table-cell table:style-name="ce12N2" office:value-type="float" office:value="134.14">
            <text:p>13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68405370001215500100037594610247383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60">
            <text:p>311360</text:p>
          </table:table-cell>
          <table:table-cell table:style-name="ce0" table:number-columns-spanned="4" table:number-rows-spanned="1" office:value-type="string" calcext:value-type="string">
            <text:p>16.329 - CSM-COMPONENTES SISTEMAS E MAQUINAS PARA CONSTRUCAO LTD</text:p>
          </table:table-cell>
          <table:covered-table-cell table:number-columns-repeated="3"/>
          <table:table-cell table:style-name="ce0" office:value-type="string" calcext:value-type="string">
            <text:p>375.9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3.52">
            <text:p>3353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3.52">
            <text:p>3353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9036">
            <text:p>0,129</text:p>
          </table:table-cell>
          <table:table-cell table:style-name="ce12N2" office:value-type="float" office:value="42">
            <text:p>4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53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21.59">
            <text:p>2921,59</text:p>
          </table:table-cell>
          <table:table-cell table:style-name="ce12N2" office:value-type="float" office:value="2.92">
            <text:p>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29">
            <text:p>26,2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3.52">
            <text:p>3353,52</text:p>
          </table:table-cell>
          <table:table-cell table:style-name="ce12N2" office:value-type="float" office:value="134.14">
            <text:p>13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68405370001215500100037596513635486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65">
            <text:p>31136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5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081.87">
            <text:p>3608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34148.12">
            <text:p>3414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64142">
            <text:p>1,164</text:p>
          </table:table-cell>
          <table:table-cell table:style-name="ce12N2" office:value-type="float" office:value="126.17">
            <text:p>126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081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749.81">
            <text:p>29749,81</text:p>
          </table:table-cell>
          <table:table-cell table:style-name="ce12N2" office:value-type="float" office:value="29.74">
            <text:p>29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7.75">
            <text:p>267,7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1933.75">
            <text:p>1933,75</text:p>
          </table:table-cell>
          <table:table-cell table:style-name="ce12N2" office:value-type="float" office:value="34148.12">
            <text:p>34148,12</text:p>
          </table:table-cell>
          <table:table-cell table:style-name="ce12N2" office:value-type="float" office:value="1365.94">
            <text:p>136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53313921695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80">
            <text:p>311380</text:p>
          </table:table-cell>
          <table:table-cell table:style-name="ce0" table:number-columns-spanned="4" table:number-rows-spanned="1" office:value-type="string" calcext:value-type="string">
            <text:p>15.151 - NOC COMERCIO DE METAIS LTDA</text:p>
          </table:table-cell>
          <table:covered-table-cell table:number-columns-repeated="3"/>
          <table:table-cell table:style-name="ce0" office:value-type="string" calcext:value-type="string">
            <text:p>5.1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260.75">
            <text:p>4426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4260.75">
            <text:p>44260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448">
            <text:p>0,199</text:p>
          </table:table-cell>
          <table:table-cell table:style-name="ce12N2" office:value-type="float" office:value="342.89">
            <text:p>342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260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9.5">
            <text:p>49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260.75">
            <text:p>44260,75</text:p>
          </table:table-cell>
          <table:table-cell table:style-name="ce12N2" office:value-type="float" office:value="1310.11">
            <text:p>131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209275140001025500100000515814790995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81">
            <text:p>311381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54.65">
            <text:p>1495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954.65">
            <text:p>14954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.509405">
            <text:p>32,509</text:p>
          </table:table-cell>
          <table:table-cell table:style-name="ce12N2" office:value-type="float" office:value="973">
            <text:p>97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95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954.65">
            <text:p>14954,65</text:p>
          </table:table-cell>
          <table:table-cell table:style-name="ce12N2" office:value-type="float" office:value="568.27">
            <text:p>568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7222428080001185500100000283016566637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94">
            <text:p>311394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81.5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2588.96">
            <text:p>21258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12588.96">
            <text:p>21258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878.9965">
            <text:p>2878,997</text:p>
          </table:table-cell>
          <table:table-cell table:style-name="ce12N2" office:value-type="float" office:value="5776.11">
            <text:p>5776,1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2.58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9419.76">
            <text:p>179419,76</text:p>
          </table:table-cell>
          <table:table-cell table:style-name="ce12N2" office:value-type="float" office:value="179.42">
            <text:p>179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14.78">
            <text:p>1614,78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2588.96">
            <text:p>212588,96</text:p>
          </table:table-cell>
          <table:table-cell table:style-name="ce12N2" office:value-type="float" office:value="14881.23">
            <text:p>1488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25440420001195500100048154118751273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01">
            <text:p>311401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13.9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794.05">
            <text:p>25794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5068.22">
            <text:p>25068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41496">
            <text:p>1,041</text:p>
          </table:table-cell>
          <table:table-cell table:style-name="ce12N2" office:value-type="float" office:value="1253.02">
            <text:p>1253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794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30.59">
            <text:p>21330,59</text:p>
          </table:table-cell>
          <table:table-cell table:style-name="ce12N2" office:value-type="float" office:value="21.33">
            <text:p>21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1.98">
            <text:p>191,98</text:p>
          </table:table-cell>
          <table:table-cell table:style-name="ce12N2" office:value-type="float" office:value="60.67">
            <text:p>60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725.83">
            <text:p>725,83</text:p>
          </table:table-cell>
          <table:table-cell table:style-name="ce12N2" office:value-type="float" office:value="25068.22">
            <text:p>25068,22</text:p>
          </table:table-cell>
          <table:table-cell table:style-name="ce12N2" office:value-type="float" office:value="1563.44">
            <text:p>156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2064150000518550010002139861154438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02">
            <text:p>311402</text:p>
          </table:table-cell>
          <table:table-cell table:style-name="ce0" table:number-columns-spanned="4" table:number-rows-spanned="1" office:value-type="string" calcext:value-type="string">
            <text:p>17.434 - SAINT-GOBAIN DO BRASIL PRODUTOS INDUSTRIAIS PARA CONST LTDA</text:p>
          </table:table-cell>
          <table:covered-table-cell table:number-columns-repeated="3"/>
          <table:table-cell table:style-name="ce0" office:value-type="string" calcext:value-type="string">
            <text:p>539.3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262.41">
            <text:p>49262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48322.2">
            <text:p>4832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65.996052">
            <text:p>265,996</text:p>
          </table:table-cell>
          <table:table-cell table:style-name="ce12N2" office:value-type="float" office:value="1830.66">
            <text:p>1830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.262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740.07">
            <text:p>41740,07</text:p>
          </table:table-cell>
          <table:table-cell table:style-name="ce12N2" office:value-type="float" office:value="41.75">
            <text:p>4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5.65">
            <text:p>375,65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940.21">
            <text:p>940,21</text:p>
          </table:table-cell>
          <table:table-cell table:style-name="ce12N2" office:value-type="float" office:value="48322.2">
            <text:p>48322,20</text:p>
          </table:table-cell>
          <table:table-cell table:style-name="ce12N2" office:value-type="float" office:value="2260.76">
            <text:p>226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0648380165605500100053935219581573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03">
            <text:p>311403</text:p>
          </table:table-cell>
          <table:table-cell table:style-name="ce0" table:number-columns-spanned="4" table:number-rows-spanned="1" office:value-type="string" calcext:value-type="string">
            <text:p>19.151 - MARLUVAS EQUIPAMENTOS DE SEGURANCA LTDA</text:p>
          </table:table-cell>
          <table:covered-table-cell table:number-columns-repeated="3"/>
          <table:table-cell table:style-name="ce0" office:value-type="string" calcext:value-type="string">
            <text:p>326.6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82.2">
            <text:p>368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682.2">
            <text:p>368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982">
            <text:p>0,210</text:p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82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07.68">
            <text:p>3107,68</text:p>
          </table:table-cell>
          <table:table-cell table:style-name="ce12N2" office:value-type="float" office:value="3.11">
            <text:p>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97">
            <text:p>27,9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82.2">
            <text:p>3682,20</text:p>
          </table:table-cell>
          <table:table-cell table:style-name="ce12N2" office:value-type="float" office:value="257.76">
            <text:p>25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196530540036045500100032665118248920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04">
            <text:p>311404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7.9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7485.69">
            <text:p>277485,69</text:p>
          </table:table-cell>
          <table:table-cell table:style-name="ce12N2" office:value-type="float" office:value="12000.78">
            <text:p>12000,78</text:p>
          </table:table-cell>
          <table:table-cell table:style-name="ce12N2" office:value-type="float" office:value="141">
            <text:p>141,00</text:p>
          </table:table-cell>
          <table:table-cell table:style-name="ce12N2" office:value-type="float" office:value="257207.16">
            <text:p>257207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9.55502">
            <text:p>69,555</text:p>
          </table:table-cell>
          <table:table-cell table:style-name="ce12N2" office:value-type="float" office:value="12054.81">
            <text:p>12054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7.485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536.49">
            <text:p>213536,49</text:p>
          </table:table-cell>
          <table:table-cell table:style-name="ce12N2" office:value-type="float" office:value="213.52">
            <text:p>213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21.86">
            <text:p>1921,86</text:p>
          </table:table-cell>
          <table:table-cell table:style-name="ce12N2" office:value-type="float" office:value="78.2">
            <text:p>78,2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22406.05">
            <text:p>22406,05</text:p>
          </table:table-cell>
          <table:table-cell table:style-name="ce12N2" office:value-type="float" office:value="245206.38">
            <text:p>245206,38</text:p>
          </table:table-cell>
          <table:table-cell table:style-name="ce12N2" office:value-type="float" office:value="9904.49">
            <text:p>9904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4585.59">
            <text:p>54585,59</text:p>
          </table:table-cell>
          <table:table-cell table:style-name="ce12N2" office:value-type="float" office:value="9873.26">
            <text:p>9873,26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794716302548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07">
            <text:p>311407</text:p>
          </table:table-cell>
          <table:table-cell table:style-name="ce0" table:number-columns-spanned="4" table:number-rows-spanned="1" office:value-type="string" calcext:value-type="string">
            <text:p>19.151 - MARLUVAS EQUIPAMENTOS DE SEGURANCA LTDA</text:p>
          </table:table-cell>
          <table:covered-table-cell table:number-columns-repeated="3"/>
          <table:table-cell table:style-name="ce0" office:value-type="string" calcext:value-type="string">
            <text:p>326.6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539.77">
            <text:p>23539,77</text:p>
          </table:table-cell>
          <table:table-cell table:style-name="ce12N2" office:value-type="float" office:value="3278.23">
            <text:p>3278,23</text:p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6818">
            <text:p>2681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1.7142">
            <text:p>41,714</text:p>
          </table:table-cell>
          <table:table-cell table:style-name="ce12N2" office:value-type="float" office:value="1196.04">
            <text:p>1196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539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866.95">
            <text:p>19866,95</text:p>
          </table:table-cell>
          <table:table-cell table:style-name="ce12N2" office:value-type="float" office:value="19.84">
            <text:p>1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8.79">
            <text:p>178,79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539.77">
            <text:p>23539,77</text:p>
          </table:table-cell>
          <table:table-cell table:style-name="ce12N2" office:value-type="float" office:value="1647.8">
            <text:p>1647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196530540036045500100032667411932719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09">
            <text:p>311409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81.6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315.65">
            <text:p>170315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70315.65">
            <text:p>170315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794.821756">
            <text:p>3794,822</text:p>
          </table:table-cell>
          <table:table-cell table:style-name="ce12N2" office:value-type="float" office:value="2020.68">
            <text:p>2020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0.315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3742.15">
            <text:p>143742,15</text:p>
          </table:table-cell>
          <table:table-cell table:style-name="ce12N2" office:value-type="float" office:value="143.74">
            <text:p>14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3.68">
            <text:p>1293,68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315.65">
            <text:p>170315,65</text:p>
          </table:table-cell>
          <table:table-cell table:style-name="ce12N2" office:value-type="float" office:value="11922.1">
            <text:p>1192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25440420001195500100048167018814619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11">
            <text:p>311411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53.855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4.11">
            <text:p>1174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6.07">
            <text:p>1116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584">
            <text:p>0,004</text:p>
          </table:table-cell>
          <table:table-cell table:style-name="ce12N2" office:value-type="float" office:value="2.12">
            <text:p>2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74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2.32">
            <text:p>972,32</text:p>
          </table:table-cell>
          <table:table-cell table:style-name="ce12N2" office:value-type="float" office:value="0.97">
            <text:p>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75">
            <text:p>8,7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58.04">
            <text:p>58,04</text:p>
          </table:table-cell>
          <table:table-cell table:style-name="ce12N2" office:value-type="float" office:value="1116.07">
            <text:p>1116,07</text:p>
          </table:table-cell>
          <table:table-cell table:style-name="ce12N2" office:value-type="float" office:value="44.64">
            <text:p>4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53296273003298550230024538551601842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12">
            <text:p>31141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5.47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6.1">
            <text:p>185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56.1">
            <text:p>185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171">
            <text:p>0,062</text:p>
          </table:table-cell>
          <table:table-cell table:style-name="ce12N2" office:value-type="float" office:value="5.66">
            <text:p>5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56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66.5">
            <text:p>1566,50</text:p>
          </table:table-cell>
          <table:table-cell table:style-name="ce12N2" office:value-type="float" office:value="1.57">
            <text:p>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1">
            <text:p>14,1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56.1">
            <text:p>1856,10</text:p>
          </table:table-cell>
          <table:table-cell table:style-name="ce12N2" office:value-type="float" office:value="129.93">
            <text:p>129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547316548405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13">
            <text:p>311413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705.27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9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09.05">
            <text:p>7609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609.05">
            <text:p>7609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88465">
            <text:p>0,588</text:p>
          </table:table-cell>
          <table:table-cell table:style-name="ce12N2" office:value-type="float" office:value="59.97">
            <text:p>59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609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30.73">
            <text:p>6430,73</text:p>
          </table:table-cell>
          <table:table-cell table:style-name="ce12N2" office:value-type="float" office:value="6.43">
            <text:p>6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88">
            <text:p>57,88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09.05">
            <text:p>7609,05</text:p>
          </table:table-cell>
          <table:table-cell table:style-name="ce12N2" office:value-type="float" office:value="522.85">
            <text:p>522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7238370001725500000070527215642096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14">
            <text:p>311414</text:p>
          </table:table-cell>
          <table:table-cell table:style-name="ce0" table:number-columns-spanned="4" table:number-rows-spanned="1" office:value-type="string" calcext:value-type="string">
            <text:p>13.118 - FORTLEV INDUST.E COMERC. DE PLASTICOS LTDA</text:p>
          </table:table-cell>
          <table:covered-table-cell table:number-columns-repeated="3"/>
          <table:table-cell table:style-name="ce0" office:value-type="string" calcext:value-type="string">
            <text:p>262.7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685.18">
            <text:p>61685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2741.31">
            <text:p>52741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0.901867">
            <text:p>320,902</text:p>
          </table:table-cell>
          <table:table-cell table:style-name="ce12N2" office:value-type="float" office:value="2199.07">
            <text:p>2199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.685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119.21">
            <text:p>42119,21</text:p>
          </table:table-cell>
          <table:table-cell table:style-name="ce12N2" office:value-type="float" office:value="42.13">
            <text:p>4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.07">
            <text:p>379,0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228.81">
            <text:p>228,81</text:p>
          </table:table-cell>
          <table:table-cell table:style-name="ce12N2" office:value-type="float" office:value="52741.31">
            <text:p>52741,31</text:p>
          </table:table-cell>
          <table:table-cell table:style-name="ce12N2" office:value-type="float" office:value="6328.96">
            <text:p>632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4838.95">
            <text:p>74838,95</text:p>
          </table:table-cell>
          <table:table-cell table:style-name="ce12N2" office:value-type="float" office:value="8715.06">
            <text:p>8715,06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109219110010045500100026277612466636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16">
            <text:p>311416</text:p>
          </table:table-cell>
          <table:table-cell table:style-name="ce0" table:number-columns-spanned="4" table:number-rows-spanned="1" office:value-type="string" calcext:value-type="string">
            <text:p>11.247 - NOVA ROCHA INDUSTRIA DE TINTAS LTDA.</text:p>
          </table:table-cell>
          <table:covered-table-cell table:number-columns-repeated="3"/>
          <table:table-cell table:style-name="ce0" office:value-type="string" calcext:value-type="string">
            <text:p>561.5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96.62">
            <text:p>589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711.01">
            <text:p>5711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0716">
            <text:p>0,407</text:p>
          </table:table-cell>
          <table:table-cell table:style-name="ce12N2" office:value-type="float" office:value="272">
            <text:p>27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96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60.82">
            <text:p>4560,82</text:p>
          </table:table-cell>
          <table:table-cell table:style-name="ce12N2" office:value-type="float" office:value="4.56">
            <text:p>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05">
            <text:p>41,05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185.61">
            <text:p>185,61</text:p>
          </table:table-cell>
          <table:table-cell table:style-name="ce12N2" office:value-type="float" office:value="5711.01">
            <text:p>5711,01</text:p>
          </table:table-cell>
          <table:table-cell table:style-name="ce12N2" office:value-type="float" office:value="685.32">
            <text:p>685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030051230001035500100056152213964326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17">
            <text:p>311417</text:p>
          </table:table-cell>
          <table:table-cell table:style-name="ce0" table:number-columns-spanned="4" table:number-rows-spanned="1" office:value-type="string" calcext:value-type="string">
            <text:p>11.247 - NOVA ROCHA INDUSTRIA DE TINTAS LTDA.</text:p>
          </table:table-cell>
          <table:covered-table-cell table:number-columns-repeated="3"/>
          <table:table-cell table:style-name="ce0" office:value-type="string" calcext:value-type="string">
            <text:p>561.5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077.7">
            <text:p>2307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781.54">
            <text:p>22781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77592">
            <text:p>9,776</text:p>
          </table:table-cell>
          <table:table-cell table:style-name="ce12N2" office:value-type="float" office:value="14000">
            <text:p>14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07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193.34">
            <text:p>18193,34</text:p>
          </table:table-cell>
          <table:table-cell table:style-name="ce12N2" office:value-type="float" office:value="18.19">
            <text:p>18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3.74">
            <text:p>163,74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296.16">
            <text:p>296,16</text:p>
          </table:table-cell>
          <table:table-cell table:style-name="ce12N2" office:value-type="float" office:value="22781.54">
            <text:p>22781,54</text:p>
          </table:table-cell>
          <table:table-cell table:style-name="ce12N2" office:value-type="float" office:value="2733.78">
            <text:p>2733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030051230001035500100056152314166991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18">
            <text:p>31141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61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3.76">
            <text:p>91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5">
            <text:p>88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9">
            <text:p>0,010</text:p>
          </table:table-cell>
          <table:table-cell table:style-name="ce12N2" office:value-type="float" office:value="8.2">
            <text:p>8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3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6.92">
            <text:p>746,92</text:p>
          </table:table-cell>
          <table:table-cell table:style-name="ce12N2" office:value-type="float" office:value="0.75">
            <text:p>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72">
            <text:p>6,72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28.76">
            <text:p>28,76</text:p>
          </table:table-cell>
          <table:table-cell table:style-name="ce12N2" office:value-type="float" office:value="885">
            <text:p>885,00</text:p>
          </table:table-cell>
          <table:table-cell table:style-name="ce12N2" office:value-type="float" office:value="61.95">
            <text:p>61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6111993682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19">
            <text:p>31141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60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0.53">
            <text:p>448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339.5">
            <text:p>433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257">
            <text:p>0,043</text:p>
          </table:table-cell>
          <table:table-cell table:style-name="ce12N2" office:value-type="float" office:value="35.26">
            <text:p>3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80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49.63">
            <text:p>3749,63</text:p>
          </table:table-cell>
          <table:table-cell table:style-name="ce12N2" office:value-type="float" office:value="3.75">
            <text:p>3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75">
            <text:p>33,7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141.03">
            <text:p>141,03</text:p>
          </table:table-cell>
          <table:table-cell table:style-name="ce12N2" office:value-type="float" office:value="4339.5">
            <text:p>4339,50</text:p>
          </table:table-cell>
          <table:table-cell table:style-name="ce12N2" office:value-type="float" office:value="207.67">
            <text:p>207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60611061181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20">
            <text:p>311420</text:p>
          </table:table-cell>
          <table:table-cell table:style-name="ce0" table:number-columns-spanned="4" table:number-rows-spanned="1" office:value-type="string" calcext:value-type="string">
            <text:p>37.894 - GYPSUM MINERACAO INDUSTRIA E COMERCIO LTDA</text:p>
          </table:table-cell>
          <table:covered-table-cell table:number-columns-repeated="3"/>
          <table:table-cell table:style-name="ce0" office:value-type="string" calcext:value-type="string">
            <text:p>105.7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733.62">
            <text:p>6573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244.42">
            <text:p>55244,42</text:p>
          </table:table-cell>
          <table:table-cell table:style-name="ce12N2" office:value-type="float" office:value="10489.2">
            <text:p>10489,20</text:p>
          </table:table-cell>
          <table:table-cell table:style-name="ce12N3" office:value-type="float" office:value="48.6">
            <text:p>48,600</text:p>
          </table:table-cell>
          <table:table-cell table:style-name="ce12N2" office:value-type="float" office:value="31881.6">
            <text:p>3188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.733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756.4">
            <text:p>56756,40</text:p>
          </table:table-cell>
          <table:table-cell table:style-name="ce12N2" office:value-type="float" office:value="56.76">
            <text:p>56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0.81">
            <text:p>510,81</text:p>
          </table:table-cell>
          <table:table-cell table:style-name="ce12N2" office:value-type="float" office:value="7">
            <text:p>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733.62">
            <text:p>65733,62</text:p>
          </table:table-cell>
          <table:table-cell table:style-name="ce12N2" office:value-type="float" office:value="4601.35">
            <text:p>4601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7244436080010405500100010576715522789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30">
            <text:p>311430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6.3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97.56">
            <text:p>1797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97.56">
            <text:p>1797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7376">
            <text:p>0,107</text:p>
          </table:table-cell>
          <table:table-cell table:style-name="ce12N2" office:value-type="float" office:value="12.39">
            <text:p>12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97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17.1">
            <text:p>1517,10</text:p>
          </table:table-cell>
          <table:table-cell table:style-name="ce12N2" office:value-type="float" office:value="1.52">
            <text:p>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65">
            <text:p>13,65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97.56">
            <text:p>1797,56</text:p>
          </table:table-cell>
          <table:table-cell table:style-name="ce12N2" office:value-type="float" office:value="125.83">
            <text:p>125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632510589800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31">
            <text:p>31143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6.3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587.7">
            <text:p>858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587.7">
            <text:p>858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001">
            <text:p>0,140</text:p>
          </table:table-cell>
          <table:table-cell table:style-name="ce12N2" office:value-type="float" office:value="90.77">
            <text:p>90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58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47.8">
            <text:p>7247,80</text:p>
          </table:table-cell>
          <table:table-cell table:style-name="ce12N2" office:value-type="float" office:value="7.25">
            <text:p>7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22">
            <text:p>65,22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87.7">
            <text:p>8587,70</text:p>
          </table:table-cell>
          <table:table-cell table:style-name="ce12N2" office:value-type="float" office:value="601.15">
            <text:p>60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632612902919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32">
            <text:p>311432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6.3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4.9">
            <text:p>1364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64.9">
            <text:p>1364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8">
            <text:p>0,035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64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51.95">
            <text:p>1151,95</text:p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64.9">
            <text:p>1364,90</text:p>
          </table:table-cell>
          <table:table-cell table:style-name="ce12N2" office:value-type="float" office:value="95.54">
            <text:p>9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632719402421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33">
            <text:p>311433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6.3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46.02">
            <text:p>2646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646.02">
            <text:p>2646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296">
            <text:p>0,063</text:p>
          </table:table-cell>
          <table:table-cell table:style-name="ce12N2" office:value-type="float" office:value="12.4">
            <text:p>1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46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33.18">
            <text:p>2233,18</text:p>
          </table:table-cell>
          <table:table-cell table:style-name="ce12N2" office:value-type="float" office:value="2.23">
            <text:p>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1">
            <text:p>20,10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46.02">
            <text:p>2646,02</text:p>
          </table:table-cell>
          <table:table-cell table:style-name="ce12N2" office:value-type="float" office:value="185.22">
            <text:p>185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632812959151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34">
            <text:p>311434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6.3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64.32">
            <text:p>1026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0264.32">
            <text:p>1026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2.58968">
            <text:p>132,590</text:p>
          </table:table-cell>
          <table:table-cell table:style-name="ce12N2" office:value-type="float" office:value="144.05">
            <text:p>144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26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662.81">
            <text:p>8662,81</text:p>
          </table:table-cell>
          <table:table-cell table:style-name="ce12N2" office:value-type="float" office:value="8.67">
            <text:p>8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.97">
            <text:p>77,9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64.32">
            <text:p>10264,32</text:p>
          </table:table-cell>
          <table:table-cell table:style-name="ce12N2" office:value-type="float" office:value="718.51">
            <text:p>718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632913848419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35">
            <text:p>311435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6.3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60.3">
            <text:p>1946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9460.3">
            <text:p>19460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3463">
            <text:p>7,346</text:p>
          </table:table-cell>
          <table:table-cell table:style-name="ce12N2" office:value-type="float" office:value="411.76">
            <text:p>41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460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424">
            <text:p>16424,00</text:p>
          </table:table-cell>
          <table:table-cell table:style-name="ce12N2" office:value-type="float" office:value="16.42">
            <text:p>16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.81">
            <text:p>147,81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60.3">
            <text:p>19460,30</text:p>
          </table:table-cell>
          <table:table-cell table:style-name="ce12N2" office:value-type="float" office:value="1362.23">
            <text:p>136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633012499670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36">
            <text:p>311436</text:p>
          </table:table-cell>
          <table:table-cell table:style-name="ce0" table:number-columns-spanned="4" table:number-rows-spanned="1" office:value-type="string" calcext:value-type="string">
            <text:p>17.073 - INFINITY C.IMP.E EXP.DE EQUIP. DE SEGURANCA LTDA</text:p>
          </table:table-cell>
          <table:covered-table-cell table:number-columns-repeated="3"/>
          <table:table-cell table:style-name="ce0" office:value-type="string" calcext:value-type="string">
            <text:p>5.2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2">
            <text:p>379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2">
            <text:p>379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52">
            <text:p>0,552</text:p>
          </table:table-cell>
          <table:table-cell table:style-name="ce12N2" office:value-type="float" office:value="69.6">
            <text:p>6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9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07.44">
            <text:p>3507,44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57">
            <text:p>31,57</text:p>
          </table:table-cell>
          <table:table-cell table:style-name="ce12N2" office:value-type="float" office:value="59.85">
            <text:p>59,8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2">
            <text:p>3792,00</text:p>
          </table:table-cell>
          <table:table-cell table:style-name="ce12N2" office:value-type="float" office:value="151.68">
            <text:p>15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324621480001345500100000523018709419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38">
            <text:p>311438</text:p>
          </table:table-cell>
          <table:table-cell table:style-name="ce0" table:number-columns-spanned="4" table:number-rows-spanned="1" office:value-type="string" calcext:value-type="string">
            <text:p>1.942 - NOBRE PAINEIS LTDA</text:p>
          </table:table-cell>
          <table:covered-table-cell table:number-columns-repeated="3"/>
          <table:table-cell table:style-name="ce0" office:value-type="string" calcext:value-type="string">
            <text:p>24.9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568.01">
            <text:p>170568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70568.01">
            <text:p>170568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7.183944">
            <text:p>67,184</text:p>
          </table:table-cell>
          <table:table-cell table:style-name="ce12N2" office:value-type="float" office:value="41747.8">
            <text:p>4174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0.568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568.01">
            <text:p>170568,01</text:p>
          </table:table-cell>
          <table:table-cell table:style-name="ce12N2" office:value-type="float" office:value="170.57">
            <text:p>17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35.11">
            <text:p>1535,11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568.01">
            <text:p>170568,01</text:p>
          </table:table-cell>
          <table:table-cell table:style-name="ce12N2" office:value-type="float" office:value="11939.76">
            <text:p>1193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49971810001235500100002492119630161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39">
            <text:p>311439</text:p>
          </table:table-cell>
          <table:table-cell table:style-name="ce0" table:number-columns-spanned="4" table:number-rows-spanned="1" office:value-type="string" calcext:value-type="string">
            <text:p>11.247 - NOVA ROCHA INDUSTRIA DE TINTAS LTDA.</text:p>
          </table:table-cell>
          <table:covered-table-cell table:number-columns-repeated="3"/>
          <table:table-cell table:style-name="ce0" office:value-type="string" calcext:value-type="string">
            <text:p>561.5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077.7">
            <text:p>2307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781.54">
            <text:p>22781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77592">
            <text:p>9,776</text:p>
          </table:table-cell>
          <table:table-cell table:style-name="ce12N2" office:value-type="float" office:value="14000">
            <text:p>14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07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193.34">
            <text:p>18193,34</text:p>
          </table:table-cell>
          <table:table-cell table:style-name="ce12N2" office:value-type="float" office:value="18.19">
            <text:p>18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3.74">
            <text:p>163,74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296.16">
            <text:p>296,16</text:p>
          </table:table-cell>
          <table:table-cell table:style-name="ce12N2" office:value-type="float" office:value="22781.54">
            <text:p>22781,54</text:p>
          </table:table-cell>
          <table:table-cell table:style-name="ce12N2" office:value-type="float" office:value="2733.78">
            <text:p>2733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030051230001035500100056156818024190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99">
            <text:p>199,00</text:p>
          </table:table-cell>
          <table:table-cell table:style-name="ce26N2" office:value-type="float" office:value="17691.78">
            <text:p>17691,78</text:p>
          </table:table-cell>
          <table:table-cell table:style-name="ce26N2" office:value-type="float" office:value="10489.2">
            <text:p>10489,2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08352.97">
            <text:p>108352,97</text:p>
          </table:table-cell>
          <table:table-cell table:style-name="ce26N2" office:value-type="float" office:value="5411320.41">
            <text:p>5411320,41</text:p>
          </table:table-cell>
          <table:table-cell table:style-name="ce26N2" office:value-type="float" office:value="336755.21">
            <text:p>336755,2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558153.76">
            <text:p>5558153,7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29424.54">
            <text:p>129424,54</text:p>
          </table:table-cell>
          <table:table-cell table:style-name="ce26N2" office:value-type="float" office:value="18588.32">
            <text:p>18588,3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2124.491694">
            <text:p>12124,492</text:p>
          </table:table-cell>
          <table:table-cell table:style-name="ce26N2" office:value-type="float" office:value="5438415.05">
            <text:p>5438415,05</text:p>
          </table:table-cell>
          <table:table-cell table:style-name="ce26N2" office:value-type="float" office:value="5558153.76">
            <text:p>5558153,7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577065.38">
            <text:p>4577065,38</text:p>
          </table:table-cell>
          <table:table-cell table:style-name="ce26N2" office:value-type="float" office:value="4577.13">
            <text:p>4577,1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1193.48">
            <text:p>41193,48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83175.89">
            <text:p>383175,8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2.6">
            <text:p>42,6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OBJETIV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296" meta:object-count="0"/>
    <meta:generator>LibreOffice/4.3.0.4$Windows_x86 LibreOffice_project/62ad5818884a2fc2e5780dd45466868d41009ec0</meta:generator>
  </office:meta>
</office:document-meta>
</file>