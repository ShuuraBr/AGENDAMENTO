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9/07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3">
            <text:p>3096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15">
            <text:p>139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65">
            <text:p>0,003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4.02">
            <text:p>1104,02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94">
            <text:p>9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85.03">
            <text:p>85,03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91.57">
            <text:p>9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51194191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0">
            <text:p>3096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6.3">
            <text:p>278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6.24">
            <text:p>261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3">
            <text:p>0,006</text:p>
          </table:table-cell>
          <table:table-cell table:style-name="ce12N2" office:value-type="float" office:value="12.91">
            <text:p>12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6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8.03">
            <text:p>2208,03</text:p>
          </table:table-cell>
          <table:table-cell table:style-name="ce12N2" office:value-type="float" office:value="2.21">
            <text:p>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87">
            <text:p>19,8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70.06">
            <text:p>170,06</text:p>
          </table:table-cell>
          <table:table-cell table:style-name="ce12N2" office:value-type="float" office:value="2616.24">
            <text:p>2616,24</text:p>
          </table:table-cell>
          <table:table-cell table:style-name="ce12N2" office:value-type="float" office:value="183.14">
            <text:p>18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71798344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1">
            <text:p>3096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2.43">
            <text:p>17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7.92">
            <text:p>160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7.05">
            <text:p>1357,05</text:p>
          </table:table-cell>
          <table:table-cell table:style-name="ce12N2" office:value-type="float" office:value="1.36">
            <text:p>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1">
            <text:p>12,2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04.51">
            <text:p>104,51</text:p>
          </table:table-cell>
          <table:table-cell table:style-name="ce12N2" office:value-type="float" office:value="1607.92">
            <text:p>1607,92</text:p>
          </table:table-cell>
          <table:table-cell table:style-name="ce12N2" office:value-type="float" office:value="112.55">
            <text:p>11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81637324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2">
            <text:p>3096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9.46">
            <text:p>206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351.61">
            <text:p>1935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5413">
            <text:p>0,565</text:p>
          </table:table-cell>
          <table:table-cell table:style-name="ce12N2" office:value-type="float" office:value="55.34">
            <text:p>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32.28">
            <text:p>16332,28</text:p>
          </table:table-cell>
          <table:table-cell table:style-name="ce12N2" office:value-type="float" office:value="16.33">
            <text:p>1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.99">
            <text:p>146,9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257.85">
            <text:p>1257,85</text:p>
          </table:table-cell>
          <table:table-cell table:style-name="ce12N2" office:value-type="float" office:value="19351.61">
            <text:p>19351,61</text:p>
          </table:table-cell>
          <table:table-cell table:style-name="ce12N2" office:value-type="float" office:value="1354.61">
            <text:p>135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71392529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3">
            <text:p>3096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2.59">
            <text:p>557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32.48">
            <text:p>523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66">
            <text:p>0,013</text:p>
          </table:table-cell>
          <table:table-cell table:style-name="ce12N2" office:value-type="float" office:value="25.82">
            <text:p>2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16.09">
            <text:p>4416,09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74">
            <text:p>39,7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40.11">
            <text:p>340,11</text:p>
          </table:table-cell>
          <table:table-cell table:style-name="ce12N2" office:value-type="float" office:value="5232.48">
            <text:p>5232,48</text:p>
          </table:table-cell>
          <table:table-cell table:style-name="ce12N2" office:value-type="float" office:value="366.27">
            <text:p>36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211262576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4">
            <text:p>3096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15">
            <text:p>139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65">
            <text:p>0,003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4.02">
            <text:p>1104,02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94">
            <text:p>9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85.03">
            <text:p>85,03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91.57">
            <text:p>9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61306152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6">
            <text:p>3096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56.24">
            <text:p>1845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329.8">
            <text:p>1732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634">
            <text:p>0,506</text:p>
          </table:table-cell>
          <table:table-cell table:style-name="ce12N2" office:value-type="float" office:value="49.56">
            <text:p>49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5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25.91">
            <text:p>14625,91</text:p>
          </table:table-cell>
          <table:table-cell table:style-name="ce12N2" office:value-type="float" office:value="14.63">
            <text:p>1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.63">
            <text:p>131,6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126.44">
            <text:p>1126,44</text:p>
          </table:table-cell>
          <table:table-cell table:style-name="ce12N2" office:value-type="float" office:value="17329.8">
            <text:p>17329,80</text:p>
          </table:table-cell>
          <table:table-cell table:style-name="ce12N2" office:value-type="float" office:value="1213.09">
            <text:p>121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91570710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7">
            <text:p>3096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8.77">
            <text:p>92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8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6.01">
            <text:p>736,01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56.69">
            <text:p>56,69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61.05">
            <text:p>6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201727392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8">
            <text:p>3096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2">
            <text:p>19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2">
            <text:p>19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2">
            <text:p>0,000</text:p>
          </table:table-cell>
          <table:table-cell table:style-name="ce12N2" office:value-type="float" office:value="29.4">
            <text:p>2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8.99">
            <text:p>1688,99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0.7">
            <text:p>1440,70</text:p>
          </table:table-cell>
          <table:table-cell table:style-name="ce12N2" office:value-type="float" office:value="100.85">
            <text:p>1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91608337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9">
            <text:p>3096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8.85">
            <text:p>399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54.79">
            <text:p>375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707">
            <text:p>0,110</text:p>
          </table:table-cell>
          <table:table-cell table:style-name="ce12N2" office:value-type="float" office:value="10.74">
            <text:p>1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9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8.94">
            <text:p>3168,94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2">
            <text:p>28,5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44.06">
            <text:p>244,06</text:p>
          </table:table-cell>
          <table:table-cell table:style-name="ce12N2" office:value-type="float" office:value="3754.79">
            <text:p>3754,79</text:p>
          </table:table-cell>
          <table:table-cell table:style-name="ce12N2" office:value-type="float" office:value="262.84">
            <text:p>26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813994527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1">
            <text:p>3097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8.45">
            <text:p>156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2.72">
            <text:p>147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8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.94">
            <text:p>1242,94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9">
            <text:p>11,1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95.73">
            <text:p>95,73</text:p>
          </table:table-cell>
          <table:table-cell table:style-name="ce12N2" office:value-type="float" office:value="1472.72">
            <text:p>1472,72</text:p>
          </table:table-cell>
          <table:table-cell table:style-name="ce12N2" office:value-type="float" office:value="103.09">
            <text:p>10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4815299255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2">
            <text:p>3097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70.3">
            <text:p>1137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257.36">
            <text:p>11257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0218">
            <text:p>0,602</text:p>
          </table:table-cell>
          <table:table-cell table:style-name="ce12N2" office:value-type="float" office:value="27.34">
            <text:p>2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7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07.43">
            <text:p>9807,43</text:p>
          </table:table-cell>
          <table:table-cell table:style-name="ce12N2" office:value-type="float" office:value="9.8">
            <text:p>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.26">
            <text:p>88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12.94">
            <text:p>112,94</text:p>
          </table:table-cell>
          <table:table-cell table:style-name="ce12N2" office:value-type="float" office:value="11257.36">
            <text:p>11257,36</text:p>
          </table:table-cell>
          <table:table-cell table:style-name="ce12N2" office:value-type="float" office:value="450.29">
            <text:p>45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4915188205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3">
            <text:p>3097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46.92">
            <text:p>181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062.21">
            <text:p>18062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297">
            <text:p>0,500</text:p>
          </table:table-cell>
          <table:table-cell table:style-name="ce12N2" office:value-type="float" office:value="75.06">
            <text:p>7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146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92.36">
            <text:p>15692,36</text:p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24">
            <text:p>141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84.71">
            <text:p>84,71</text:p>
          </table:table-cell>
          <table:table-cell table:style-name="ce12N2" office:value-type="float" office:value="17367.14">
            <text:p>17367,14</text:p>
          </table:table-cell>
          <table:table-cell table:style-name="ce12N2" office:value-type="float" office:value="770.35">
            <text:p>77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01143860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4">
            <text:p>3097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875">
            <text:p>0,038</text:p>
          </table:table-cell>
          <table:table-cell table:style-name="ce12N2" office:value-type="float" office:value="16.48">
            <text:p>1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2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47.76">
            <text:p>5847,76</text:p>
          </table:table-cell>
          <table:table-cell table:style-name="ce12N2" office:value-type="float" office:value="5.85">
            <text:p>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63">
            <text:p>52,6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485.01">
            <text:p>48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315588101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5">
            <text:p>3097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0.25">
            <text:p>201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7.56">
            <text:p>188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93.06">
            <text:p>1593,06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34">
            <text:p>14,3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22.69">
            <text:p>122,69</text:p>
          </table:table-cell>
          <table:table-cell table:style-name="ce12N2" office:value-type="float" office:value="1887.56">
            <text:p>1887,56</text:p>
          </table:table-cell>
          <table:table-cell table:style-name="ce12N2" office:value-type="float" office:value="132.13">
            <text:p>13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11987638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6">
            <text:p>3097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.64">
            <text:p>82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4.64">
            <text:p>82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6">
            <text:p>0,002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9.89">
            <text:p>709,89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9">
            <text:p>6,3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5.53">
            <text:p>605,53</text:p>
          </table:table-cell>
          <table:table-cell table:style-name="ce12N2" office:value-type="float" office:value="42.39">
            <text:p>4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210502304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7">
            <text:p>3097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">
            <text:p>0,002</text:p>
          </table:table-cell>
          <table:table-cell table:style-name="ce12N2" office:value-type="float" office:value="4.13">
            <text:p>4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.78">
            <text:p>669,78</text:p>
          </table:table-cell>
          <table:table-cell table:style-name="ce12N2" office:value-type="float" office:value="0.67">
            <text:p>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55.55">
            <text:p>5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61786983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9">
            <text:p>3097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4.14">
            <text:p>624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4.14">
            <text:p>6244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262">
            <text:p>0,047</text:p>
          </table:table-cell>
          <table:table-cell table:style-name="ce12N2" office:value-type="float" office:value="20.93">
            <text:p>2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4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00.76">
            <text:p>5300,76</text:p>
          </table:table-cell>
          <table:table-cell table:style-name="ce12N2" office:value-type="float" office:value="5.3">
            <text:p>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71">
            <text:p>47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58.15">
            <text:p>5758,15</text:p>
          </table:table-cell>
          <table:table-cell table:style-name="ce12N2" office:value-type="float" office:value="403.07">
            <text:p>40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51698337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0">
            <text:p>3097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26.1">
            <text:p>572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46.08">
            <text:p>5646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664">
            <text:p>0,052</text:p>
          </table:table-cell>
          <table:table-cell table:style-name="ce12N2" office:value-type="float" office:value="7.48">
            <text:p>7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2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65.15">
            <text:p>4765,15</text:p>
          </table:table-cell>
          <table:table-cell table:style-name="ce12N2" office:value-type="float" office:value="4.77">
            <text:p>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89">
            <text:p>42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80.02">
            <text:p>80,02</text:p>
          </table:table-cell>
          <table:table-cell table:style-name="ce12N2" office:value-type="float" office:value="5646.08">
            <text:p>5646,08</text:p>
          </table:table-cell>
          <table:table-cell table:style-name="ce12N2" office:value-type="float" office:value="395.22">
            <text:p>39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414787254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1">
            <text:p>3097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1">
            <text:p>0,047</text:p>
          </table:table-cell>
          <table:table-cell table:style-name="ce12N2" office:value-type="float" office:value="237.71">
            <text:p>237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08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84.43">
            <text:p>65384,43</text:p>
          </table:table-cell>
          <table:table-cell table:style-name="ce12N2" office:value-type="float" office:value="65.38">
            <text:p>6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46">
            <text:p>588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3039.24">
            <text:p>3039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71775280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5">
            <text:p>30984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6.6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24.15">
            <text:p>20462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85523">
            <text:p>13,855</text:p>
          </table:table-cell>
          <table:table-cell table:style-name="ce12N2" office:value-type="float" office:value="22000">
            <text:p>2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4.624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7261.68">
            <text:p>167261,68</text:p>
          </table:table-cell>
          <table:table-cell table:style-name="ce12N2" office:value-type="float" office:value="167.26">
            <text:p>16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5.36">
            <text:p>1505,36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440.95">
            <text:p>6440,95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13872.82">
            <text:p>138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667407000130550000000166941016452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0">
            <text:p>3099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74">
            <text:p>0,041</text:p>
          </table:table-cell>
          <table:table-cell table:style-name="ce12N2" office:value-type="float" office:value="155.34">
            <text:p>1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29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45.87">
            <text:p>15745,87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71">
            <text:p>141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31.08">
            <text:p>13431,08</text:p>
          </table:table-cell>
          <table:table-cell table:style-name="ce12N2" office:value-type="float" office:value="940.18">
            <text:p>94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8125447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1">
            <text:p>3099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635">
            <text:p>0,140</text:p>
          </table:table-cell>
          <table:table-cell table:style-name="ce12N2" office:value-type="float" office:value="23.95">
            <text:p>2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8.11">
            <text:p>4718,11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6">
            <text:p>42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391.32">
            <text:p>39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014344613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2">
            <text:p>3099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116852652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3">
            <text:p>3099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9">
            <text:p>0,029</text:p>
          </table:table-cell>
          <table:table-cell table:style-name="ce12N2" office:value-type="float" office:value="4.96">
            <text:p>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6.16">
            <text:p>976,1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80.96">
            <text:p>8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21037109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4">
            <text:p>3099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96">
            <text:p>0,144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1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0.61">
            <text:p>12420,61</text:p>
          </table:table-cell>
          <table:table-cell table:style-name="ce12N2" office:value-type="float" office:value="12.42">
            <text:p>1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79">
            <text:p>111,7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1030.18">
            <text:p>103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31535591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5">
            <text:p>3099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8.09">
            <text:p>978,09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41847623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6">
            <text:p>309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8">
            <text:p>0,001</text:p>
          </table:table-cell>
          <table:table-cell table:style-name="ce12N2" office:value-type="float" office:value="13.61">
            <text:p>1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68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12.86">
            <text:p>8412,86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72">
            <text:p>75,7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697.77">
            <text:p>69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7138933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7">
            <text:p>3099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45948">
            <text:p>0,946</text:p>
          </table:table-cell>
          <table:table-cell table:style-name="ce12N2" office:value-type="float" office:value="145.73">
            <text:p>145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290.64">
            <text:p>25290,64</text:p>
          </table:table-cell>
          <table:table-cell table:style-name="ce12N2" office:value-type="float" office:value="25.29">
            <text:p>2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.61">
            <text:p>227,6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1233.11">
            <text:p>123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8185622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8">
            <text:p>3099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02.5">
            <text:p>3802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378235.77">
            <text:p>37823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0591">
            <text:p>1,561</text:p>
          </table:table-cell>
          <table:table-cell table:style-name="ce12N2" office:value-type="float" office:value="1037.64">
            <text:p>1037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0.20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5020.25">
            <text:p>325020,25</text:p>
          </table:table-cell>
          <table:table-cell table:style-name="ce12N2" office:value-type="float" office:value="324.99">
            <text:p>32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5.21">
            <text:p>2925,2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966.73">
            <text:p>1966,73</text:p>
          </table:table-cell>
          <table:table-cell table:style-name="ce12N2" office:value-type="float" office:value="372611.39">
            <text:p>372611,39</text:p>
          </table:table-cell>
          <table:table-cell table:style-name="ce12N2" office:value-type="float" office:value="20086.7">
            <text:p>2008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91486881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9">
            <text:p>309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2">
            <text:p>0,068</text:p>
          </table:table-cell>
          <table:table-cell table:style-name="ce12N2" office:value-type="float" office:value="180.26">
            <text:p>18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958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554.57">
            <text:p>36554,57</text:p>
          </table:table-cell>
          <table:table-cell table:style-name="ce12N2" office:value-type="float" office:value="36.56">
            <text:p>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99">
            <text:p>328,9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1678.35">
            <text:p>167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11600070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0">
            <text:p>309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54">
            <text:p>0,047</text:p>
          </table:table-cell>
          <table:table-cell table:style-name="ce12N2" office:value-type="float" office:value="6.99">
            <text:p>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7.66">
            <text:p>7657,66</text:p>
          </table:table-cell>
          <table:table-cell table:style-name="ce12N2" office:value-type="float" office:value="7.66">
            <text:p>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92">
            <text:p>68,9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31.91">
            <text:p>6531,91</text:p>
          </table:table-cell>
          <table:table-cell table:style-name="ce12N2" office:value-type="float" office:value="457.23">
            <text:p>45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2137394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5">
            <text:p>30995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40.75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6.5">
            <text:p>727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276.5">
            <text:p>727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72">
            <text:p>0,003</text:p>
          </table:table-cell>
          <table:table-cell table:style-name="ce12N2" office:value-type="float" office:value="202.14">
            <text:p>20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7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1.18">
            <text:p>6141,18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.27">
            <text:p>55,27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76.5">
            <text:p>7276,50</text:p>
          </table:table-cell>
          <table:table-cell table:style-name="ce12N2" office:value-type="float" office:value="509.36">
            <text:p>50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4075718250538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6">
            <text:p>309956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2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40.03">
            <text:p>227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593.17">
            <text:p>22593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21409">
            <text:p>2,221</text:p>
          </table:table-cell>
          <table:table-cell table:style-name="ce12N2" office:value-type="float" office:value="25919.97">
            <text:p>25919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74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68.07">
            <text:p>19068,07</text:p>
          </table:table-cell>
          <table:table-cell table:style-name="ce12N2" office:value-type="float" office:value="19.07">
            <text:p>1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.61">
            <text:p>171,61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46.86">
            <text:p>146,86</text:p>
          </table:table-cell>
          <table:table-cell table:style-name="ce12N2" office:value-type="float" office:value="22593.17">
            <text:p>22593,17</text:p>
          </table:table-cell>
          <table:table-cell table:style-name="ce12N2" office:value-type="float" office:value="1581.52">
            <text:p>158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2118182197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7">
            <text:p>309957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2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80.08">
            <text:p>1868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559.44">
            <text:p>1855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55918">
            <text:p>5,756</text:p>
          </table:table-cell>
          <table:table-cell table:style-name="ce12N2" office:value-type="float" office:value="17640">
            <text:p>176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680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63.71">
            <text:p>15663,71</text:p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.97">
            <text:p>140,97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20.64">
            <text:p>120,64</text:p>
          </table:table-cell>
          <table:table-cell table:style-name="ce12N2" office:value-type="float" office:value="18559.44">
            <text:p>18559,44</text:p>
          </table:table-cell>
          <table:table-cell table:style-name="ce12N2" office:value-type="float" office:value="1299.16">
            <text:p>129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221293188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8">
            <text:p>30995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53.38">
            <text:p>124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837278">
            <text:p>3,837</text:p>
          </table:table-cell>
          <table:table-cell table:style-name="ce12N2" office:value-type="float" office:value="11760">
            <text:p>11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42.47">
            <text:p>10442,47</text:p>
          </table:table-cell>
          <table:table-cell table:style-name="ce12N2" office:value-type="float" office:value="10.44">
            <text:p>1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98">
            <text:p>93,98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80.42">
            <text:p>80,42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866.11">
            <text:p>86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61703715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9">
            <text:p>30995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62.36">
            <text:p>1076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92.86">
            <text:p>10692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47602">
            <text:p>3,348</text:p>
          </table:table-cell>
          <table:table-cell table:style-name="ce12N2" office:value-type="float" office:value="7680">
            <text:p>76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6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24.51">
            <text:p>9024,51</text:p>
          </table:table-cell>
          <table:table-cell table:style-name="ce12N2" office:value-type="float" office:value="9.02">
            <text:p>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22">
            <text:p>81,22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10692.86">
            <text:p>10692,86</text:p>
          </table:table-cell>
          <table:table-cell table:style-name="ce12N2" office:value-type="float" office:value="748.5">
            <text:p>74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516143875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77">
            <text:p>30997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7.8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1626">
            <text:p>5916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90982.32">
            <text:p>59098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281652">
            <text:p>8,282</text:p>
          </table:table-cell>
          <table:table-cell table:style-name="ce12N2" office:value-type="float" office:value="2503.84">
            <text:p>2503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1.6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4863.79">
            <text:p>514863,79</text:p>
          </table:table-cell>
          <table:table-cell table:style-name="ce12N2" office:value-type="float" office:value="514.86">
            <text:p>51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33.77">
            <text:p>4633,7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643.68">
            <text:p>643,68</text:p>
          </table:table-cell>
          <table:table-cell table:style-name="ce12N2" office:value-type="float" office:value="590982.32">
            <text:p>590982,32</text:p>
          </table:table-cell>
          <table:table-cell table:style-name="ce12N2" office:value-type="float" office:value="23639.3">
            <text:p>2363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78111704710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1">
            <text:p>3099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72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4.38">
            <text:p>1664,38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98">
            <text:p>14,9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138.05">
            <text:p>13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11118983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2">
            <text:p>3099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2">
            <text:p>0,033</text:p>
          </table:table-cell>
          <table:table-cell table:style-name="ce12N2" office:value-type="float" office:value="18.15">
            <text:p>18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1.03">
            <text:p>6691,03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2">
            <text:p>60,2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554.96">
            <text:p>55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3991705019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3">
            <text:p>3099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">
            <text:p>0,008</text:p>
          </table:table-cell>
          <table:table-cell table:style-name="ce12N2" office:value-type="float" office:value="160">
            <text:p>1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0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37.33">
            <text:p>20937,33</text:p>
          </table:table-cell>
          <table:table-cell table:style-name="ce12N2" office:value-type="float" office:value="20.94">
            <text:p>2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.44">
            <text:p>188,4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1736.56">
            <text:p>17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41835592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4">
            <text:p>3099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7464">
            <text:p>0,107</text:p>
          </table:table-cell>
          <table:table-cell table:style-name="ce12N2" office:value-type="float" office:value="32.36">
            <text:p>3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02.72">
            <text:p>8602,7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43">
            <text:p>77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394.98">
            <text:p>39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31033592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5">
            <text:p>3099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0048">
            <text:p>0,150</text:p>
          </table:table-cell>
          <table:table-cell table:style-name="ce12N2" office:value-type="float" office:value="122.31">
            <text:p>122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72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07.25">
            <text:p>38807,25</text:p>
          </table:table-cell>
          <table:table-cell table:style-name="ce12N2" office:value-type="float" office:value="38.81">
            <text:p>3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.27">
            <text:p>349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1959.79">
            <text:p>19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21380843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6">
            <text:p>3099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712">
            <text:p>0,021</text:p>
          </table:table-cell>
          <table:table-cell table:style-name="ce12N2" office:value-type="float" office:value="25.16">
            <text:p>2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4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916.72">
            <text:p>11916,72</text:p>
          </table:table-cell>
          <table:table-cell table:style-name="ce12N2" office:value-type="float" office:value="11.9">
            <text:p>1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.26">
            <text:p>107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608.76">
            <text:p>60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01789689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7">
            <text:p>3099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32">
            <text:p>0,144</text:p>
          </table:table-cell>
          <table:table-cell table:style-name="ce12N2" office:value-type="float" office:value="45.26">
            <text:p>4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7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89.46">
            <text:p>14089,46</text:p>
          </table:table-cell>
          <table:table-cell table:style-name="ce12N2" office:value-type="float" office:value="14.09">
            <text:p>1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81">
            <text:p>126,8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646.9">
            <text:p>64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11898328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8">
            <text:p>3099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5.6">
            <text:p>219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.94">
            <text:p>1739,94</text:p>
          </table:table-cell>
          <table:table-cell table:style-name="ce12N2" office:value-type="float" office:value="1.74">
            <text:p>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34">
            <text:p>134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144.31">
            <text:p>14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01493307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9">
            <text:p>3099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8">
            <text:p>0,008</text:p>
          </table:table-cell>
          <table:table-cell table:style-name="ce12N2" office:value-type="float" office:value="15.82">
            <text:p>1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7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27.13">
            <text:p>8727,13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.55">
            <text:p>78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400.68">
            <text:p>40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21724402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3">
            <text:p>3100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76">
            <text:p>0,015</text:p>
          </table:table-cell>
          <table:table-cell table:style-name="ce12N2" office:value-type="float" office:value="0.25">
            <text:p>0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3.23">
            <text:p>863,23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77">
            <text:p>7,7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61355438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6">
            <text:p>310066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110.03">
            <text:p>3411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89.75">
            <text:p>33889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32113">
            <text:p>3,332</text:p>
          </table:table-cell>
          <table:table-cell table:style-name="ce12N2" office:value-type="float" office:value="38879.96">
            <text:p>38879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11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602.1">
            <text:p>28602,10</text:p>
          </table:table-cell>
          <table:table-cell table:style-name="ce12N2" office:value-type="float" office:value="28.6">
            <text:p>2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7.42">
            <text:p>257,42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220.28">
            <text:p>220,28</text:p>
          </table:table-cell>
          <table:table-cell table:style-name="ce12N2" office:value-type="float" office:value="33889.75">
            <text:p>33889,75</text:p>
          </table:table-cell>
          <table:table-cell table:style-name="ce12N2" office:value-type="float" office:value="2372.28">
            <text:p>237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31392072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7">
            <text:p>31006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2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495.32">
            <text:p>194495,32</text:p>
          </table:table-cell>
          <table:table-cell table:style-name="ce12N2" office:value-type="float" office:value="11142.22">
            <text:p>11142,22</text:p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83913.02">
            <text:p>183913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778354">
            <text:p>15,778</text:p>
          </table:table-cell>
          <table:table-cell table:style-name="ce12N2" office:value-type="float" office:value="10538.26">
            <text:p>1053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4.495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517.9">
            <text:p>150517,90</text:p>
          </table:table-cell>
          <table:table-cell table:style-name="ce12N2" office:value-type="float" office:value="150.54">
            <text:p>15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4.63">
            <text:p>1354,63</text:p>
          </table:table-cell>
          <table:table-cell table:style-name="ce12N2" office:value-type="float" office:value="81.51">
            <text:p>81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7526.22">
            <text:p>17526,22</text:p>
          </table:table-cell>
          <table:table-cell table:style-name="ce12N2" office:value-type="float" office:value="172770.8">
            <text:p>172770,80</text:p>
          </table:table-cell>
          <table:table-cell table:style-name="ce12N2" office:value-type="float" office:value="6910.83">
            <text:p>691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210.94">
            <text:p>23210,94</text:p>
          </table:table-cell>
          <table:table-cell table:style-name="ce12N2" office:value-type="float" office:value="4198.3">
            <text:p>4198,3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2791774130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1">
            <text:p>31009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8.9">
            <text:p>342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28.9">
            <text:p>342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.63925">
            <text:p>41,639</text:p>
          </table:table-cell>
          <table:table-cell table:style-name="ce12N2" office:value-type="float" office:value="84">
            <text:p>8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2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5.4">
            <text:p>2885,40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97">
            <text:p>25,9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28.9">
            <text:p>3428,90</text:p>
          </table:table-cell>
          <table:table-cell table:style-name="ce12N2" office:value-type="float" office:value="240.03">
            <text:p>2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78414425486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2">
            <text:p>31009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7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">
            <text:p>0,140</text:p>
          </table:table-cell>
          <table:table-cell table:style-name="ce12N2" office:value-type="float" office:value="30.8">
            <text:p>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08">
            <text:p>808,00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27">
            <text:p>7,2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7.2">
            <text:p>957,20</text:p>
          </table:table-cell>
          <table:table-cell table:style-name="ce12N2" office:value-type="float" office:value="67">
            <text:p>6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7881967211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3">
            <text:p>31009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7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9.48">
            <text:p>225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59.48">
            <text:p>225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3604">
            <text:p>0,504</text:p>
          </table:table-cell>
          <table:table-cell table:style-name="ce12N2" office:value-type="float" office:value="32.27">
            <text:p>32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6.56">
            <text:p>1906,56</text:p>
          </table:table-cell>
          <table:table-cell table:style-name="ce12N2" office:value-type="float" office:value="1.91">
            <text:p>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16">
            <text:p>17,1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9.48">
            <text:p>2259,48</text:p>
          </table:table-cell>
          <table:table-cell table:style-name="ce12N2" office:value-type="float" office:value="158.17">
            <text:p>15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7921297706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5">
            <text:p>31009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8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05.24">
            <text:p>880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805.24">
            <text:p>8805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81">
            <text:p>0,408</text:p>
          </table:table-cell>
          <table:table-cell table:style-name="ce12N2" office:value-type="float" office:value="91.81">
            <text:p>91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05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31.7">
            <text:p>7431,70</text:p>
          </table:table-cell>
          <table:table-cell table:style-name="ce12N2" office:value-type="float" office:value="7.44">
            <text:p>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88">
            <text:p>66,8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05.24">
            <text:p>8805,24</text:p>
          </table:table-cell>
          <table:table-cell table:style-name="ce12N2" office:value-type="float" office:value="616.36">
            <text:p>61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84417292165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6">
            <text:p>31009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3.8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98.96">
            <text:p>1699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998.96">
            <text:p>1699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9527">
            <text:p>0,895</text:p>
          </table:table-cell>
          <table:table-cell table:style-name="ce12N2" office:value-type="float" office:value="200.91">
            <text:p>200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99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347.4">
            <text:p>14347,40</text:p>
          </table:table-cell>
          <table:table-cell table:style-name="ce12N2" office:value-type="float" office:value="14.35">
            <text:p>1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13">
            <text:p>129,1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98.96">
            <text:p>16998,96</text:p>
          </table:table-cell>
          <table:table-cell table:style-name="ce12N2" office:value-type="float" office:value="1189.92">
            <text:p>1189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38921199550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99">
            <text:p>310099</text:p>
          </table:table-cell>
          <table:table-cell table:style-name="ce0" table:number-columns-spanned="4" table:number-rows-spanned="1" office:value-type="string" calcext:value-type="string">
            <text:p>1.200 - INDUSTRIA DE FERRAM. DIAMANTADAS DO BRASIL LTDA</text:p>
          </table:table-cell>
          <table:covered-table-cell table:number-columns-repeated="3"/>
          <table:table-cell table:style-name="ce0" office:value-type="string" calcext:value-type="string">
            <text:p>73.55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40.06">
            <text:p>1044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0440.06">
            <text:p>10440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561">
            <text:p>0,556</text:p>
          </table:table-cell>
          <table:table-cell table:style-name="ce12N2" office:value-type="float" office:value="44.73">
            <text:p>44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440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11.13">
            <text:p>8811,13</text:p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.28">
            <text:p>79,28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440.06">
            <text:p>10440,06</text:p>
          </table:table-cell>
          <table:table-cell table:style-name="ce12N2" office:value-type="float" office:value="730.83">
            <text:p>73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4165550001735500000007355010040683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3">
            <text:p>310103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34.0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1">
            <text:p>0,171</text:p>
          </table:table-cell>
          <table:table-cell table:style-name="ce12N2" office:value-type="float" office:value="314.64">
            <text:p>314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9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12.27">
            <text:p>4612,27</text:p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51">
            <text:p>41,5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94.16">
            <text:p>5294,16</text:p>
          </table:table-cell>
          <table:table-cell table:style-name="ce12N2" office:value-type="float" office:value="211.77">
            <text:p>21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064838016560550010005340961175157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4">
            <text:p>3101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815.18">
            <text:p>12281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815.18">
            <text:p>122815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8599">
            <text:p>2,286</text:p>
          </table:table-cell>
          <table:table-cell table:style-name="ce12N2" office:value-type="float" office:value="494.04">
            <text:p>49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2.81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652.94">
            <text:p>103652,94</text:p>
          </table:table-cell>
          <table:table-cell table:style-name="ce12N2" office:value-type="float" office:value="103.65">
            <text:p>10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2.88">
            <text:p>932,88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815.18">
            <text:p>122815,18</text:p>
          </table:table-cell>
          <table:table-cell table:style-name="ce12N2" office:value-type="float" office:value="8597.06">
            <text:p>859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1971399133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5">
            <text:p>3101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38.2">
            <text:p>7043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38.2">
            <text:p>7043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8">
            <text:p>0,122</text:p>
          </table:table-cell>
          <table:table-cell table:style-name="ce12N2" office:value-type="float" office:value="130.2">
            <text:p>13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43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48.09">
            <text:p>59448,09</text:p>
          </table:table-cell>
          <table:table-cell table:style-name="ce12N2" office:value-type="float" office:value="59.45">
            <text:p>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5.03">
            <text:p>535,0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38.2">
            <text:p>70438,20</text:p>
          </table:table-cell>
          <table:table-cell table:style-name="ce12N2" office:value-type="float" office:value="4930.67">
            <text:p>493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19810765343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6">
            <text:p>31010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1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77.76">
            <text:p>3667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887.2">
            <text:p>3588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4">
            <text:p>0,155</text:p>
          </table:table-cell>
          <table:table-cell table:style-name="ce12N2" office:value-type="float" office:value="80.52">
            <text:p>80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67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64.93">
            <text:p>31264,93</text:p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.38">
            <text:p>281,3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790.56">
            <text:p>790,56</text:p>
          </table:table-cell>
          <table:table-cell table:style-name="ce12N2" office:value-type="float" office:value="35887.2">
            <text:p>35887,20</text:p>
          </table:table-cell>
          <table:table-cell table:style-name="ce12N2" office:value-type="float" office:value="1435.49">
            <text:p>143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19918397267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7">
            <text:p>31010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9.2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584.96">
            <text:p>7258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794.4">
            <text:p>7179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144">
            <text:p>0,141</text:p>
          </table:table-cell>
          <table:table-cell table:style-name="ce12N2" office:value-type="float" office:value="524.8">
            <text:p>5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.584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23.8">
            <text:p>60923,80</text:p>
          </table:table-cell>
          <table:table-cell table:style-name="ce12N2" office:value-type="float" office:value="60.93">
            <text:p>6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8.31">
            <text:p>548,3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790.56">
            <text:p>790,56</text:p>
          </table:table-cell>
          <table:table-cell table:style-name="ce12N2" office:value-type="float" office:value="71794.4">
            <text:p>71794,40</text:p>
          </table:table-cell>
          <table:table-cell table:style-name="ce12N2" office:value-type="float" office:value="4660.74">
            <text:p>466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92001448343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08">
            <text:p>31010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3.7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8.31">
            <text:p>1688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8.31">
            <text:p>1688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76">
            <text:p>0,066</text:p>
          </table:table-cell>
          <table:table-cell table:style-name="ce12N2" office:value-type="float" office:value="30.6">
            <text:p>3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8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24.89">
            <text:p>1424,89</text:p>
          </table:table-cell>
          <table:table-cell table:style-name="ce12N2" office:value-type="float" office:value="1.42">
            <text:p>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82">
            <text:p>12,8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8.31">
            <text:p>1688,31</text:p>
          </table:table-cell>
          <table:table-cell table:style-name="ce12N2" office:value-type="float" office:value="118.18">
            <text:p>11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372510677096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1">
            <text:p>3101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9.84">
            <text:p>403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9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4.35">
            <text:p>3474,35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1.84">
            <text:p>51,84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159.52">
            <text:p>15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21711473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2">
            <text:p>31011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97">
            <text:p>80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3.32">
            <text:p>13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88">
            <text:p>694,88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31888436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3">
            <text:p>31011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381.8">
            <text:p>7038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381.8">
            <text:p>7038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02698">
            <text:p>8,027</text:p>
          </table:table-cell>
          <table:table-cell table:style-name="ce12N2" office:value-type="float" office:value="2746.01">
            <text:p>2746,0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38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418.67">
            <text:p>60418,67</text:p>
          </table:table-cell>
          <table:table-cell table:style-name="ce12N2" office:value-type="float" office:value="60.42">
            <text:p>6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3.77">
            <text:p>543,7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381.8">
            <text:p>70381,80</text:p>
          </table:table-cell>
          <table:table-cell table:style-name="ce12N2" office:value-type="float" office:value="3804.76">
            <text:p>380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6919641166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4">
            <text:p>31011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06.8">
            <text:p>3580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806.8">
            <text:p>3580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2477">
            <text:p>7,248</text:p>
          </table:table-cell>
          <table:table-cell table:style-name="ce12N2" office:value-type="float" office:value="1687.74">
            <text:p>1687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80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194.89">
            <text:p>31194,89</text:p>
          </table:table-cell>
          <table:table-cell table:style-name="ce12N2" office:value-type="float" office:value="31.19">
            <text:p>3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.75">
            <text:p>280,7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06.8">
            <text:p>35806,80</text:p>
          </table:table-cell>
          <table:table-cell table:style-name="ce12N2" office:value-type="float" office:value="1432.27">
            <text:p>143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7715562621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5">
            <text:p>31011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1.36">
            <text:p>716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61.36">
            <text:p>716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4954">
            <text:p>1,450</text:p>
          </table:table-cell>
          <table:table-cell table:style-name="ce12N2" office:value-type="float" office:value="337.55">
            <text:p>337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6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38.98">
            <text:p>6238,98</text:p>
          </table:table-cell>
          <table:table-cell table:style-name="ce12N2" office:value-type="float" office:value="6.24">
            <text:p>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15">
            <text:p>56,1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61.36">
            <text:p>7161,36</text:p>
          </table:table-cell>
          <table:table-cell table:style-name="ce12N2" office:value-type="float" office:value="286.45">
            <text:p>28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781000144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8">
            <text:p>3101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23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14">
            <text:p>881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14">
            <text:p>881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6">
            <text:p>0,067</text:p>
          </table:table-cell>
          <table:table-cell table:style-name="ce12N2" office:value-type="float" office:value="18.3">
            <text:p>1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1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40">
            <text:p>7440,00</text:p>
          </table:table-cell>
          <table:table-cell table:style-name="ce12N2" office:value-type="float" office:value="7.44">
            <text:p>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96">
            <text:p>66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14">
            <text:p>8814,00</text:p>
          </table:table-cell>
          <table:table-cell table:style-name="ce12N2" office:value-type="float" office:value="616.98">
            <text:p>616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2391923668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9">
            <text:p>3101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2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5.5">
            <text:p>191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5.5">
            <text:p>191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2">
            <text:p>0,013</text:p>
          </table:table-cell>
          <table:table-cell table:style-name="ce12N2" office:value-type="float" office:value="3.25">
            <text:p>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16.5">
            <text:p>1616,50</text:p>
          </table:table-cell>
          <table:table-cell table:style-name="ce12N2" office:value-type="float" office:value="1.62">
            <text:p>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55">
            <text:p>14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5.5">
            <text:p>1915,50</text:p>
          </table:table-cell>
          <table:table-cell table:style-name="ce12N2" office:value-type="float" office:value="134.09">
            <text:p>13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24915630564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0">
            <text:p>310120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120.93">
            <text:p>165120,93</text:p>
          </table:table-cell>
          <table:table-cell table:style-name="ce12N2" office:value-type="float" office:value="9999.98">
            <text:p>9999,98</text:p>
          </table:table-cell>
          <table:table-cell table:style-name="ce12N2" office:value-type="float" office:value="93">
            <text:p>93,00</text:p>
          </table:table-cell>
          <table:table-cell table:style-name="ce12N2" office:value-type="float" office:value="155417.94">
            <text:p>155417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191065">
            <text:p>18,191</text:p>
          </table:table-cell>
          <table:table-cell table:style-name="ce12N2" office:value-type="float" office:value="8053.66">
            <text:p>805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5.12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678.95">
            <text:p>126678,95</text:p>
          </table:table-cell>
          <table:table-cell table:style-name="ce12N2" office:value-type="float" office:value="126.65">
            <text:p>12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0.1">
            <text:p>1140,10</text:p>
          </table:table-cell>
          <table:table-cell table:style-name="ce12N2" office:value-type="float" office:value="79">
            <text:p>7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3816.99">
            <text:p>13816,99</text:p>
          </table:table-cell>
          <table:table-cell table:style-name="ce12N2" office:value-type="float" office:value="145417.96">
            <text:p>145417,96</text:p>
          </table:table-cell>
          <table:table-cell table:style-name="ce12N2" office:value-type="float" office:value="5826.78">
            <text:p>582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2541.6">
            <text:p>32541,60</text:p>
          </table:table-cell>
          <table:table-cell table:style-name="ce12N2" office:value-type="float" office:value="5885.98">
            <text:p>5885,9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81745385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1">
            <text:p>31012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88.68">
            <text:p>41088,68</text:p>
          </table:table-cell>
          <table:table-cell table:style-name="ce12N2" office:value-type="float" office:value="2412.77">
            <text:p>2412,77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9851.2">
            <text:p>3985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8586">
            <text:p>6,286</text:p>
          </table:table-cell>
          <table:table-cell table:style-name="ce12N2" office:value-type="float" office:value="2047.2">
            <text:p>204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08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16.37">
            <text:p>32616,37</text:p>
          </table:table-cell>
          <table:table-cell table:style-name="ce12N2" office:value-type="float" office:value="32.62">
            <text:p>3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.55">
            <text:p>293,55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650.25">
            <text:p>3650,25</text:p>
          </table:table-cell>
          <table:table-cell table:style-name="ce12N2" office:value-type="float" office:value="37438.43">
            <text:p>37438,43</text:p>
          </table:table-cell>
          <table:table-cell table:style-name="ce12N2" office:value-type="float" office:value="1497.53">
            <text:p>14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9154142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7">
            <text:p>310127</text:p>
          </table:table-cell>
          <table:table-cell table:style-name="ce0" table:number-columns-spanned="4" table:number-rows-spanned="1" office:value-type="string" calcext:value-type="string">
            <text:p>670 - INDUSTRIA DE FORJADOS SAO ROMAO LTDA</text:p>
          </table:table-cell>
          <table:covered-table-cell table:number-columns-repeated="3"/>
          <table:table-cell table:style-name="ce0" office:value-type="string" calcext:value-type="string">
            <text:p>58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81.97">
            <text:p>1068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0359.9">
            <text:p>1035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3968">
            <text:p>0,284</text:p>
          </table:table-cell>
          <table:table-cell table:style-name="ce12N2" office:value-type="float" office:value="575.61">
            <text:p>575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81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70.77">
            <text:p>9370,77</text:p>
          </table:table-cell>
          <table:table-cell table:style-name="ce12N2" office:value-type="float" office:value="9.37">
            <text:p>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34">
            <text:p>84,3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22.07">
            <text:p>322,07</text:p>
          </table:table-cell>
          <table:table-cell table:style-name="ce12N2" office:value-type="float" office:value="8728.37">
            <text:p>8728,37</text:p>
          </table:table-cell>
          <table:table-cell table:style-name="ce12N2" office:value-type="float" office:value="610.99">
            <text:p>61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67258480001185500100005859510000000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8">
            <text:p>310128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03.74">
            <text:p>610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11.61">
            <text:p>591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29767">
            <text:p>1,230</text:p>
          </table:table-cell>
          <table:table-cell table:style-name="ce12N2" office:value-type="float" office:value="232.54">
            <text:p>23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03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89.26">
            <text:p>4989,26</text:p>
          </table:table-cell>
          <table:table-cell table:style-name="ce12N2" office:value-type="float" office:value="4.99">
            <text:p>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9">
            <text:p>44,9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92.13">
            <text:p>192,13</text:p>
          </table:table-cell>
          <table:table-cell table:style-name="ce12N2" office:value-type="float" office:value="5911.61">
            <text:p>5911,61</text:p>
          </table:table-cell>
          <table:table-cell table:style-name="ce12N2" office:value-type="float" office:value="413.81">
            <text:p>413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886740800003735500100000633515751138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1">
            <text:p>31013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50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9">
            <text:p>309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9">
            <text:p>309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5">
            <text:p>0,011</text:p>
          </table:table-cell>
          <table:table-cell table:style-name="ce12N2" office:value-type="float" office:value="5.74">
            <text:p>5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15.48">
            <text:p>2615,48</text:p>
          </table:table-cell>
          <table:table-cell table:style-name="ce12N2" office:value-type="float" office:value="2.62">
            <text:p>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54">
            <text:p>23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9">
            <text:p>3099,00</text:p>
          </table:table-cell>
          <table:table-cell table:style-name="ce12N2" office:value-type="float" office:value="216.93">
            <text:p>21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50118292506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56">
            <text:p>310156</text:p>
          </table:table-cell>
          <table:table-cell table:style-name="ce0" table:number-columns-spanned="4" table:number-rows-spanned="1" office:value-type="string" calcext:value-type="string">
            <text:p>29.857 - J.H. DE OLIVEIRA FABRICACAO DE MANGUEIRAS LTDA</text:p>
          </table:table-cell>
          <table:covered-table-cell table:number-columns-repeated="3"/>
          <table:table-cell table:style-name="ce0" office:value-type="string" calcext:value-type="string">
            <text:p>7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77.4">
            <text:p>1097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977.4">
            <text:p>1097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.62766">
            <text:p>27,628</text:p>
          </table:table-cell>
          <table:table-cell table:style-name="ce12N2" office:value-type="float" office:value="803">
            <text:p>80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97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77.4">
            <text:p>10977,40</text:p>
          </table:table-cell>
          <table:table-cell table:style-name="ce12N2" office:value-type="float" office:value="417.14">
            <text:p>41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020482520001165500100000072411323843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7">
            <text:p>310177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79.37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100.33">
            <text:p>6110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58758.63">
            <text:p>58758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14225">
            <text:p>1,414</text:p>
          </table:table-cell>
          <table:table-cell table:style-name="ce12N2" office:value-type="float" office:value="515.37">
            <text:p>515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10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44.18">
            <text:p>50844,18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.6">
            <text:p>457,60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341.7">
            <text:p>2341,70</text:p>
          </table:table-cell>
          <table:table-cell table:style-name="ce12N2" office:value-type="float" office:value="53018.85">
            <text:p>53018,85</text:p>
          </table:table-cell>
          <table:table-cell table:style-name="ce12N2" office:value-type="float" office:value="2731.98">
            <text:p>273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45990181003285550020012793757425292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1">
            <text:p>310191</text:p>
          </table:table-cell>
          <table:table-cell table:style-name="ce0" table:number-columns-spanned="4" table:number-rows-spanned="1" office:value-type="string" calcext:value-type="string">
            <text:p>23.993 - KARCHER INDUSTRIA E COMERCIO LIMITADA</text:p>
          </table:table-cell>
          <table:covered-table-cell table:number-columns-repeated="3"/>
          <table:table-cell table:style-name="ce0" office:value-type="string" calcext:value-type="string">
            <text:p>1.632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43.25">
            <text:p>864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578.44">
            <text:p>857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27052">
            <text:p>1,027</text:p>
          </table:table-cell>
          <table:table-cell table:style-name="ce12N2" office:value-type="float" office:value="163.3">
            <text:p>16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4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39.99">
            <text:p>7239,99</text:p>
          </table:table-cell>
          <table:table-cell table:style-name="ce12N2" office:value-type="float" office:value="7.24">
            <text:p>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15">
            <text:p>65,15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8578.44">
            <text:p>8578,44</text:p>
          </table:table-cell>
          <table:table-cell table:style-name="ce12N2" office:value-type="float" office:value="600.49">
            <text:p>60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40.22">
            <text:p>340,22</text:p>
          </table:table-cell>
          <table:table-cell table:style-name="ce12N2" office:value-type="float" office:value="52.81">
            <text:p>52,8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71109600001785500100163288417686378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5">
            <text:p>310195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6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18.09">
            <text:p>86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1537">
            <text:p>0,722</text:p>
          </table:table-cell>
          <table:table-cell table:style-name="ce12N2" office:value-type="float" office:value="134.57">
            <text:p>134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1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8.35">
            <text:p>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11">
            <text:p>75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73.52">
            <text:p>273,52</text:p>
          </table:table-cell>
          <table:table-cell table:style-name="ce12N2" office:value-type="float" office:value="8344.57">
            <text:p>8344,57</text:p>
          </table:table-cell>
          <table:table-cell table:style-name="ce12N2" office:value-type="float" office:value="464.98">
            <text:p>46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5094003000155550010001865531457323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7">
            <text:p>310197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79.50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20.84">
            <text:p>2292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1977.47">
            <text:p>21977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73773">
            <text:p>1,374</text:p>
          </table:table-cell>
          <table:table-cell table:style-name="ce12N2" office:value-type="float" office:value="101.63">
            <text:p>101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920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046.37">
            <text:p>19046,37</text:p>
          </table:table-cell>
          <table:table-cell table:style-name="ce12N2" office:value-type="float" office:value="19.05">
            <text:p>19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.41">
            <text:p>171,41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943.37">
            <text:p>943,37</text:p>
          </table:table-cell>
          <table:table-cell table:style-name="ce12N2" office:value-type="float" office:value="21594.85">
            <text:p>21594,85</text:p>
          </table:table-cell>
          <table:table-cell table:style-name="ce12N2" office:value-type="float" office:value="989.74">
            <text:p>98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459901810032855500200127950115610927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4">
            <text:p>310204</text:p>
          </table:table-cell>
          <table:table-cell table:style-name="ce0" table:number-columns-spanned="4" table:number-rows-spanned="1" office:value-type="string" calcext:value-type="string">
            <text:p>21.685 - INDEPENDENCE COMERCIO E IMPORTACAO LTDA</text:p>
          </table:table-cell>
          <table:covered-table-cell table:number-columns-repeated="3"/>
          <table:table-cell table:style-name="ce0" office:value-type="string" calcext:value-type="string">
            <text:p>22.151</text:p>
          </table:table-cell>
          <table:table-cell table:style-name="ce9" office:value-type="string" calcext:value-type="string">
            <text:p>24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272">
            <text:p>0,133</text:p>
          </table:table-cell>
          <table:table-cell table:style-name="ce12N2" office:value-type="float" office:value="89.76">
            <text:p>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3.6">
            <text:p>1753,60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8">
            <text:p>15,78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80.51">
            <text:p>8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8136504000107550240000221511179630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6">
            <text:p>310206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9.2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452.81">
            <text:p>14445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39905.87">
            <text:p>139905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124165">
            <text:p>21,124</text:p>
          </table:table-cell>
          <table:table-cell table:style-name="ce12N2" office:value-type="float" office:value="2946.85">
            <text:p>2946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4.452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077.07">
            <text:p>118077,07</text:p>
          </table:table-cell>
          <table:table-cell table:style-name="ce12N2" office:value-type="float" office:value="118.09">
            <text:p>1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2.68">
            <text:p>1062,68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546.94">
            <text:p>4546,94</text:p>
          </table:table-cell>
          <table:table-cell table:style-name="ce12N2" office:value-type="float" office:value="139905.87">
            <text:p>139905,87</text:p>
          </table:table-cell>
          <table:table-cell table:style-name="ce12N2" office:value-type="float" office:value="9793.41">
            <text:p>97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92771587449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7">
            <text:p>31020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6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">
            <text:p>0,060</text:p>
          </table:table-cell>
          <table:table-cell table:style-name="ce12N2" office:value-type="float" office:value="301.5">
            <text:p>30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7.09">
            <text:p>5467,09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21">
            <text:p>49,2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266.23">
            <text:p>2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663101770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8">
            <text:p>31020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142">
            <text:p>0,561</text:p>
          </table:table-cell>
          <table:table-cell table:style-name="ce12N2" office:value-type="float" office:value="619.21">
            <text:p>619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15.41">
            <text:p>6615,41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54">
            <text:p>59,5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548.69">
            <text:p>54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755116384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9">
            <text:p>310209</text:p>
          </table:table-cell>
          <table:table-cell table:style-name="ce0" table:number-columns-spanned="4" table:number-rows-spanned="1" office:value-type="string" calcext:value-type="string">
            <text:p>8.501 - WAGO ELETROELETRONICOS LTDA</text:p>
          </table:table-cell>
          <table:covered-table-cell table:number-columns-repeated="3"/>
          <table:table-cell table:style-name="ce0" office:value-type="string" calcext:value-type="string">
            <text:p>231.50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74.77">
            <text:p>4777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3530.55">
            <text:p>43530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355">
            <text:p>1,644</text:p>
          </table:table-cell>
          <table:table-cell table:style-name="ce12N2" office:value-type="float" office:value="214.75">
            <text:p>214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77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23.81">
            <text:p>37923,81</text:p>
          </table:table-cell>
          <table:table-cell table:style-name="ce12N2" office:value-type="float" office:value="37.92">
            <text:p>3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1.31">
            <text:p>341,31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244.22">
            <text:p>4244,22</text:p>
          </table:table-cell>
          <table:table-cell table:style-name="ce12N2" office:value-type="float" office:value="43530.55">
            <text:p>43530,55</text:p>
          </table:table-cell>
          <table:table-cell table:style-name="ce12N2" office:value-type="float" office:value="1741.23">
            <text:p>174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38482700019555003000231504169899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1">
            <text:p>310211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9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98.76">
            <text:p>8279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2798.76">
            <text:p>82798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5.8804">
            <text:p>505,880</text:p>
          </table:table-cell>
          <table:table-cell table:style-name="ce12N2" office:value-type="float" office:value="1453.2">
            <text:p>145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98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880.08">
            <text:p>69880,08</text:p>
          </table:table-cell>
          <table:table-cell table:style-name="ce12N2" office:value-type="float" office:value="69.88">
            <text:p>6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8.92">
            <text:p>628,9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798.76">
            <text:p>82798,76</text:p>
          </table:table-cell>
          <table:table-cell table:style-name="ce12N2" office:value-type="float" office:value="5795.91">
            <text:p>579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969318160045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5">
            <text:p>310215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8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7.51466">
            <text:p>807,515</text:p>
          </table:table-cell>
          <table:table-cell table:style-name="ce12N2" office:value-type="float" office:value="3713.9">
            <text:p>37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8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221.48">
            <text:p>74221,48</text:p>
          </table:table-cell>
          <table:table-cell table:style-name="ce12N2" office:value-type="float" office:value="74.2">
            <text:p>7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98">
            <text:p>667,98</text:p>
          </table:table-cell>
          <table:table-cell table:style-name="ce12N2" office:value-type="float" office:value="37.5">
            <text:p>37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5798.2">
            <text:p>579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827610000142550010000686801816218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6">
            <text:p>310216</text:p>
          </table:table-cell>
          <table:table-cell table:style-name="ce0" table:number-columns-spanned="4" table:number-rows-spanned="1" office:value-type="string" calcext:value-type="string">
            <text:p>25.125 - ASTOPEL EMBALAGENS LTDA</text:p>
          </table:table-cell>
          <table:covered-table-cell table:number-columns-repeated="3"/>
          <table:table-cell table:style-name="ce0" office:value-type="string" calcext:value-type="string">
            <text:p>12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">
            <text:p>9,000</text:p>
          </table:table-cell>
          <table:table-cell table:style-name="ce12N2" office:value-type="float" office:value="10000">
            <text:p>1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00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971.19">
            <text:p>51971,19</text:p>
          </table:table-cell>
          <table:table-cell table:style-name="ce12N2" office:value-type="float" office:value="51.97">
            <text:p>5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7.74">
            <text:p>467,7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4060">
            <text:p>4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297179000103550010000122831213010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7">
            <text:p>310217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1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6734">
            <text:p>7,673</text:p>
          </table:table-cell>
          <table:table-cell table:style-name="ce12N2" office:value-type="float" office:value="5390.55">
            <text:p>5390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444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10.36">
            <text:p>37510,36</text:p>
          </table:table-cell>
          <table:table-cell table:style-name="ce12N2" office:value-type="float" office:value="37.5">
            <text:p>3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.6">
            <text:p>337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3111.14">
            <text:p>31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111757384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8">
            <text:p>310218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35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69">
            <text:p>0,397</text:p>
          </table:table-cell>
          <table:table-cell table:style-name="ce12N2" office:value-type="float" office:value="347.67">
            <text:p>347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81.09">
            <text:p>2481,09</text:p>
          </table:table-cell>
          <table:table-cell table:style-name="ce12N2" office:value-type="float" office:value="2.48">
            <text:p>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33">
            <text:p>22,3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205.78">
            <text:p>20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351433429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9">
            <text:p>310219</text:p>
          </table:table-cell>
          <table:table-cell table:style-name="ce0" table:number-columns-spanned="4" table:number-rows-spanned="1" office:value-type="string" calcext:value-type="string">
            <text:p>17.073 - INFINITY C.IMP.E EXP.DE EQUIP. DE SEGURANCA LTDA</text:p>
          </table:table-cell>
          <table:covered-table-cell table:number-columns-repeated="3"/>
          <table:table-cell table:style-name="ce0" office:value-type="string" calcext:value-type="string">
            <text:p>5.1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932.16">
            <text:p>5493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54932.16">
            <text:p>5493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668688">
            <text:p>4,669</text:p>
          </table:table-cell>
          <table:table-cell table:style-name="ce12N2" office:value-type="float" office:value="1663.98">
            <text:p>1663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93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10.06">
            <text:p>50810,06</text:p>
          </table:table-cell>
          <table:table-cell table:style-name="ce12N2" office:value-type="float" office:value="50.83">
            <text:p>5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.29">
            <text:p>457,29</text:p>
          </table:table-cell>
          <table:table-cell table:style-name="ce12N2" office:value-type="float" office:value="60.85">
            <text:p>60,8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932.16">
            <text:p>54932,16</text:p>
          </table:table-cell>
          <table:table-cell table:style-name="ce12N2" office:value-type="float" office:value="2197.28">
            <text:p>219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32462148000134550010000051121951744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21">
            <text:p>31022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8.42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13.26">
            <text:p>901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29.55">
            <text:p>872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522">
            <text:p>0,005</text:p>
          </table:table-cell>
          <table:table-cell table:style-name="ce12N2" office:value-type="float" office:value="0.65">
            <text:p>0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13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05.18">
            <text:p>7605,18</text:p>
          </table:table-cell>
          <table:table-cell table:style-name="ce12N2" office:value-type="float" office:value="7.61">
            <text:p>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45">
            <text:p>68,4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83.71">
            <text:p>283,71</text:p>
          </table:table-cell>
          <table:table-cell table:style-name="ce12N2" office:value-type="float" office:value="8729.55">
            <text:p>8729,55</text:p>
          </table:table-cell>
          <table:table-cell table:style-name="ce12N2" office:value-type="float" office:value="349.18">
            <text:p>349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842312096784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22">
            <text:p>31022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8.4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12.17">
            <text:p>271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26.8">
            <text:p>26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76">
            <text:p>0,024</text:p>
          </table:table-cell>
          <table:table-cell table:style-name="ce12N2" office:value-type="float" office:value="19.68">
            <text:p>19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12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16.95">
            <text:p>2216,95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95">
            <text:p>19,9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5.37">
            <text:p>85,37</text:p>
          </table:table-cell>
          <table:table-cell table:style-name="ce12N2" office:value-type="float" office:value="2626.8">
            <text:p>2626,80</text:p>
          </table:table-cell>
          <table:table-cell table:style-name="ce12N2" office:value-type="float" office:value="183.88">
            <text:p>18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84261297680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23">
            <text:p>31022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8.4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5.85">
            <text:p>424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12.2">
            <text:p>411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56">
            <text:p>0,041</text:p>
          </table:table-cell>
          <table:table-cell table:style-name="ce12N2" office:value-type="float" office:value="23.04">
            <text:p>2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0.6">
            <text:p>3470,60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23">
            <text:p>31,2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33.65">
            <text:p>133,65</text:p>
          </table:table-cell>
          <table:table-cell table:style-name="ce12N2" office:value-type="float" office:value="4112.2">
            <text:p>4112,20</text:p>
          </table:table-cell>
          <table:table-cell table:style-name="ce12N2" office:value-type="float" office:value="287.85">
            <text:p>287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84451639979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27">
            <text:p>31022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3.51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13.41">
            <text:p>1801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14">
            <text:p>1691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52">
            <text:p>1,452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01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35.47">
            <text:p>14735,47</text:p>
          </table:table-cell>
          <table:table-cell table:style-name="ce12N2" office:value-type="float" office:value="14.74">
            <text:p>1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.62">
            <text:p>132,6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099.41">
            <text:p>1099,41</text:p>
          </table:table-cell>
          <table:table-cell table:style-name="ce12N2" office:value-type="float" office:value="16914">
            <text:p>16914,00</text:p>
          </table:table-cell>
          <table:table-cell table:style-name="ce12N2" office:value-type="float" office:value="676.56">
            <text:p>67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8351810837549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28">
            <text:p>310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3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3.28">
            <text:p>162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23.28">
            <text:p>1623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52">
            <text:p>0,039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2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70.01">
            <text:p>1370,01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33">
            <text:p>12,3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23.28">
            <text:p>1623,28</text:p>
          </table:table-cell>
          <table:table-cell table:style-name="ce12N2" office:value-type="float" office:value="113.63">
            <text:p>11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33711788784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29">
            <text:p>3102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3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39">
            <text:p>2343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39">
            <text:p>234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2">
            <text:p>0,012</text:p>
          </table:table-cell>
          <table:table-cell table:style-name="ce12N2" office:value-type="float" office:value="55.26">
            <text:p>5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43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781.93">
            <text:p>19781,93</text:p>
          </table:table-cell>
          <table:table-cell table:style-name="ce12N2" office:value-type="float" office:value="19.78">
            <text:p>1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8.04">
            <text:p>178,0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39">
            <text:p>23439,00</text:p>
          </table:table-cell>
          <table:table-cell table:style-name="ce12N2" office:value-type="float" office:value="1640.73">
            <text:p>16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3381696327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0">
            <text:p>3102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3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981.54">
            <text:p>4098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0981.54">
            <text:p>40981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5123">
            <text:p>0,345</text:p>
          </table:table-cell>
          <table:table-cell table:style-name="ce12N2" office:value-type="float" office:value="126.48">
            <text:p>12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981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587.4">
            <text:p>34587,40</text:p>
          </table:table-cell>
          <table:table-cell table:style-name="ce12N2" office:value-type="float" office:value="34.59">
            <text:p>3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1.29">
            <text:p>311,2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981.54">
            <text:p>40981,54</text:p>
          </table:table-cell>
          <table:table-cell table:style-name="ce12N2" office:value-type="float" office:value="2868.7">
            <text:p>286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33915192640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1">
            <text:p>3102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3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66.6">
            <text:p>3996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966.6">
            <text:p>3996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12">
            <text:p>0,151</text:p>
          </table:table-cell>
          <table:table-cell table:style-name="ce12N2" office:value-type="float" office:value="111.36">
            <text:p>111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96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818.91">
            <text:p>34818,91</text:p>
          </table:table-cell>
          <table:table-cell table:style-name="ce12N2" office:value-type="float" office:value="34.82">
            <text:p>3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3.37">
            <text:p>313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966.6">
            <text:p>39966,60</text:p>
          </table:table-cell>
          <table:table-cell table:style-name="ce12N2" office:value-type="float" office:value="1598.66">
            <text:p>159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3401990506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2">
            <text:p>3102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117.86">
            <text:p>10411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03974.9">
            <text:p>103974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08314">
            <text:p>0,308</text:p>
          </table:table-cell>
          <table:table-cell table:style-name="ce12N2" office:value-type="float" office:value="343.06">
            <text:p>343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4.11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350.6">
            <text:p>88350,60</text:p>
          </table:table-cell>
          <table:table-cell table:style-name="ce12N2" office:value-type="float" office:value="88.35">
            <text:p>8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5.16">
            <text:p>795,1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42.96">
            <text:p>142,96</text:p>
          </table:table-cell>
          <table:table-cell table:style-name="ce12N2" office:value-type="float" office:value="97615.32">
            <text:p>97615,32</text:p>
          </table:table-cell>
          <table:table-cell table:style-name="ce12N2" office:value-type="float" office:value="6618.86">
            <text:p>661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671366662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3">
            <text:p>3102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15.93">
            <text:p>3571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5525.32">
            <text:p>3552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7675">
            <text:p>0,278</text:p>
          </table:table-cell>
          <table:table-cell table:style-name="ce12N2" office:value-type="float" office:value="113">
            <text:p>11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71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16.61">
            <text:p>30216,61</text:p>
          </table:table-cell>
          <table:table-cell table:style-name="ce12N2" office:value-type="float" office:value="30.21">
            <text:p>3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1.94">
            <text:p>271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32981.49">
            <text:p>32981,49</text:p>
          </table:table-cell>
          <table:table-cell table:style-name="ce12N2" office:value-type="float" office:value="2228.77">
            <text:p>222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6817386503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4">
            <text:p>3102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9.51">
            <text:p>7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2.54">
            <text:p>722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9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.8">
            <text:p>609,80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49">
            <text:p>5,4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6.97">
            <text:p>46,97</text:p>
          </table:table-cell>
          <table:table-cell table:style-name="ce12N2" office:value-type="float" office:value="722.54">
            <text:p>722,54</text:p>
          </table:table-cell>
          <table:table-cell table:style-name="ce12N2" office:value-type="float" office:value="50.58">
            <text:p>5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691290288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5">
            <text:p>31023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565.56">
            <text:p>4356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3565.56">
            <text:p>4356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23">
            <text:p>0,072</text:p>
          </table:table-cell>
          <table:table-cell table:style-name="ce12N2" office:value-type="float" office:value="83.66">
            <text:p>8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56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788.44">
            <text:p>36788,44</text:p>
          </table:table-cell>
          <table:table-cell table:style-name="ce12N2" office:value-type="float" office:value="36.79">
            <text:p>3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1.09">
            <text:p>331,0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247.58">
            <text:p>43247,58</text:p>
          </table:table-cell>
          <table:table-cell table:style-name="ce12N2" office:value-type="float" office:value="3027.33">
            <text:p>302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017330568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6">
            <text:p>3102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44.89">
            <text:p>1274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744.89">
            <text:p>12744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83">
            <text:p>0,026</text:p>
          </table:table-cell>
          <table:table-cell table:style-name="ce12N2" office:value-type="float" office:value="70.13">
            <text:p>7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44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91.03">
            <text:p>10891,03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02">
            <text:p>98,0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25.03">
            <text:p>10625,03</text:p>
          </table:table-cell>
          <table:table-cell table:style-name="ce12N2" office:value-type="float" office:value="743.75">
            <text:p>74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114616809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7">
            <text:p>3102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3.09">
            <text:p>312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2.48">
            <text:p>293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112">
            <text:p>0,023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23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74.94">
            <text:p>2474,94</text:p>
          </table:table-cell>
          <table:table-cell table:style-name="ce12N2" office:value-type="float" office:value="2.47">
            <text:p>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27">
            <text:p>22,2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2932.48">
            <text:p>2932,48</text:p>
          </table:table-cell>
          <table:table-cell table:style-name="ce12N2" office:value-type="float" office:value="205.27">
            <text:p>205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21586851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8">
            <text:p>3102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776.6">
            <text:p>3177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776.6">
            <text:p>3177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2">
            <text:p>0,052</text:p>
          </table:table-cell>
          <table:table-cell table:style-name="ce12N2" office:value-type="float" office:value="55.8">
            <text:p>5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77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818.66">
            <text:p>26818,66</text:p>
          </table:table-cell>
          <table:table-cell table:style-name="ce12N2" office:value-type="float" office:value="26.82">
            <text:p>26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.37">
            <text:p>241,3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76.6">
            <text:p>31776,60</text:p>
          </table:table-cell>
          <table:table-cell table:style-name="ce12N2" office:value-type="float" office:value="2224.36">
            <text:p>2224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316754063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39">
            <text:p>3102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756.14">
            <text:p>5475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4756.14">
            <text:p>5475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05">
            <text:p>0,091</text:p>
          </table:table-cell>
          <table:table-cell table:style-name="ce12N2" office:value-type="float" office:value="106.9">
            <text:p>10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756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243.11">
            <text:p>46243,11</text:p>
          </table:table-cell>
          <table:table-cell table:style-name="ce12N2" office:value-type="float" office:value="46.25">
            <text:p>4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6.19">
            <text:p>416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279.17">
            <text:p>54279,17</text:p>
          </table:table-cell>
          <table:table-cell table:style-name="ce12N2" office:value-type="float" office:value="3799.54">
            <text:p>379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415256796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0">
            <text:p>3102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90.29">
            <text:p>6439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4199.68">
            <text:p>6419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2712">
            <text:p>0,243</text:p>
          </table:table-cell>
          <table:table-cell table:style-name="ce12N2" office:value-type="float" office:value="212.7">
            <text:p>2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390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768.38">
            <text:p>55768,38</text:p>
          </table:table-cell>
          <table:table-cell table:style-name="ce12N2" office:value-type="float" office:value="55.77">
            <text:p>5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1.91">
            <text:p>501,9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62079.82">
            <text:p>62079,82</text:p>
          </table:table-cell>
          <table:table-cell table:style-name="ce12N2" office:value-type="float" office:value="2746.92">
            <text:p>27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7771909470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1">
            <text:p>3102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0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3.85">
            <text:p>7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5.69">
            <text:p>565,69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09">
            <text:p>5,0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3.57">
            <text:p>43,57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46.92">
            <text:p>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088412853288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2">
            <text:p>3102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94.51">
            <text:p>4819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94.51">
            <text:p>4819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17">
            <text:p>0,079</text:p>
          </table:table-cell>
          <table:table-cell table:style-name="ce12N2" office:value-type="float" office:value="84.63">
            <text:p>84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19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674.96">
            <text:p>40674,96</text:p>
          </table:table-cell>
          <table:table-cell table:style-name="ce12N2" office:value-type="float" office:value="40.67">
            <text:p>4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6.07">
            <text:p>366,0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194.51">
            <text:p>48194,51</text:p>
          </table:table-cell>
          <table:table-cell table:style-name="ce12N2" office:value-type="float" office:value="3373.62">
            <text:p>337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561712877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4">
            <text:p>3102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29.18">
            <text:p>7629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629.18">
            <text:p>7629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6515">
            <text:p>0,107</text:p>
          </table:table-cell>
          <table:table-cell table:style-name="ce12N2" office:value-type="float" office:value="24.62">
            <text:p>24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29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0.53">
            <text:p>6530,53</text:p>
          </table:table-cell>
          <table:table-cell table:style-name="ce12N2" office:value-type="float" office:value="6.53">
            <text:p>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78">
            <text:p>58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29.18">
            <text:p>7629,18</text:p>
          </table:table-cell>
          <table:table-cell table:style-name="ce12N2" office:value-type="float" office:value="433">
            <text:p>43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8314361871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5">
            <text:p>3102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57.57">
            <text:p>5435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4244.63">
            <text:p>54244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3515">
            <text:p>0,224</text:p>
          </table:table-cell>
          <table:table-cell table:style-name="ce12N2" office:value-type="float" office:value="128.98">
            <text:p>128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357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19.82">
            <text:p>47119,82</text:p>
          </table:table-cell>
          <table:table-cell table:style-name="ce12N2" office:value-type="float" office:value="47.11">
            <text:p>4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.07">
            <text:p>424,0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12.94">
            <text:p>112,94</text:p>
          </table:table-cell>
          <table:table-cell table:style-name="ce12N2" office:value-type="float" office:value="54244.63">
            <text:p>54244,63</text:p>
          </table:table-cell>
          <table:table-cell table:style-name="ce12N2" office:value-type="float" office:value="2321.97">
            <text:p>232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841830611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6">
            <text:p>31024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4.4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0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12.8">
            <text:p>22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12.8">
            <text:p>22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6048">
            <text:p>0,236</text:p>
          </table:table-cell>
          <table:table-cell table:style-name="ce12N2" office:value-type="float" office:value="108.38">
            <text:p>108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67.54">
            <text:p>1867,54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81">
            <text:p>16,8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2.8">
            <text:p>2212,80</text:p>
          </table:table-cell>
          <table:table-cell table:style-name="ce12N2" office:value-type="float" office:value="154.9">
            <text:p>15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441415150151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7">
            <text:p>31024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4.5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0.54">
            <text:p>122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20.54">
            <text:p>1220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451">
            <text:p>0,084</text:p>
          </table:table-cell>
          <table:table-cell table:style-name="ce12N2" office:value-type="float" office:value="45.63">
            <text:p>45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0.11">
            <text:p>1030,11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7">
            <text:p>9,2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0.54">
            <text:p>1220,54</text:p>
          </table:table-cell>
          <table:table-cell table:style-name="ce12N2" office:value-type="float" office:value="85.44">
            <text:p>8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45521896999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6">
            <text:p>31025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21648153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0">
            <text:p>310260</text:p>
          </table:table-cell>
          <table:table-cell table:style-name="ce0" table:number-columns-spanned="4" table:number-rows-spanned="1" office:value-type="string" calcext:value-type="string">
            <text:p>7.087 - VELLORE S/A</text:p>
          </table:table-cell>
          <table:covered-table-cell table:number-columns-repeated="3"/>
          <table:table-cell table:style-name="ce0" office:value-type="string" calcext:value-type="string">
            <text:p>413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66.95">
            <text:p>2936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27021.78">
            <text:p>27021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884">
            <text:p>1,288</text:p>
          </table:table-cell>
          <table:table-cell table:style-name="ce12N2" office:value-type="float" office:value="781.33">
            <text:p>781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36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375.81">
            <text:p>23375,81</text:p>
          </table:table-cell>
          <table:table-cell table:style-name="ce12N2" office:value-type="float" office:value="23.39">
            <text:p>23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.37">
            <text:p>210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345.17">
            <text:p>2345,17</text:p>
          </table:table-cell>
          <table:table-cell table:style-name="ce12N2" office:value-type="float" office:value="27021.78">
            <text:p>27021,78</text:p>
          </table:table-cell>
          <table:table-cell table:style-name="ce12N2" office:value-type="float" office:value="1263.32">
            <text:p>126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1723086000143550010004138971241076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2">
            <text:p>310262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4.5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524.12">
            <text:p>6452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64402.05">
            <text:p>64402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1889">
            <text:p>1,319</text:p>
          </table:table-cell>
          <table:table-cell table:style-name="ce12N2" office:value-type="float" office:value="288.43">
            <text:p>288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52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707.98">
            <text:p>57707,98</text:p>
          </table:table-cell>
          <table:table-cell table:style-name="ce12N2" office:value-type="float" office:value="57.72">
            <text:p>5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9.38">
            <text:p>519,38</text:p>
          </table:table-cell>
          <table:table-cell table:style-name="ce12N2" office:value-type="float" office:value="41.97">
            <text:p>41,9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2.07">
            <text:p>122,07</text:p>
          </table:table-cell>
          <table:table-cell table:style-name="ce12N2" office:value-type="float" office:value="64402.05">
            <text:p>64402,05</text:p>
          </table:table-cell>
          <table:table-cell table:style-name="ce12N2" office:value-type="float" office:value="4508.08">
            <text:p>450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45123710000147550010000145011179207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3">
            <text:p>310263</text:p>
          </table:table-cell>
          <table:table-cell table:style-name="ce0" table:number-columns-spanned="4" table:number-rows-spanned="1" office:value-type="string" calcext:value-type="string">
            <text:p>8.753 - ANCORA GROUP LTDA</text:p>
          </table:table-cell>
          <table:covered-table-cell table:number-columns-repeated="3"/>
          <table:table-cell table:style-name="ce0" office:value-type="string" calcext:value-type="string">
            <text:p>59.47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72.11">
            <text:p>6567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898">
            <text:p>4,999</text:p>
          </table:table-cell>
          <table:table-cell table:style-name="ce12N2" office:value-type="float" office:value="2976.9">
            <text:p>297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72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785.43">
            <text:p>56785,43</text:p>
          </table:table-cell>
          <table:table-cell table:style-name="ce12N2" office:value-type="float" office:value="56.78">
            <text:p>5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07">
            <text:p>511,07</text:p>
          </table:table-cell>
          <table:table-cell table:style-name="ce12N2" office:value-type="float" office:value="98.58">
            <text:p>98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91.41">
            <text:p>491,41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2607.22">
            <text:p>260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67647412000350550100000594771103372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3">
            <text:p>31027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86.96">
            <text:p>7618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">
            <text:p>85,00</text:p>
          </table:table-cell>
          <table:table-cell table:style-name="ce12N2" office:value-type="float" office:value="73514.84">
            <text:p>7351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8.715135">
            <text:p>158,715</text:p>
          </table:table-cell>
          <table:table-cell table:style-name="ce12N2" office:value-type="float" office:value="1436.81">
            <text:p>143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18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261.92">
            <text:p>62261,92</text:p>
          </table:table-cell>
          <table:table-cell table:style-name="ce12N2" office:value-type="float" office:value="62.26">
            <text:p>6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0.38">
            <text:p>560,38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672.12">
            <text:p>2672,12</text:p>
          </table:table-cell>
          <table:table-cell table:style-name="ce12N2" office:value-type="float" office:value="73514.84">
            <text:p>73514,84</text:p>
          </table:table-cell>
          <table:table-cell table:style-name="ce12N2" office:value-type="float" office:value="4906.59">
            <text:p>490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371568624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4">
            <text:p>3102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81.59">
            <text:p>1218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1636.38">
            <text:p>11636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7106">
            <text:p>0,207</text:p>
          </table:table-cell>
          <table:table-cell table:style-name="ce12N2" office:value-type="float" office:value="157.33">
            <text:p>15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18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49.2">
            <text:p>10049,20</text:p>
          </table:table-cell>
          <table:table-cell table:style-name="ce12N2" office:value-type="float" office:value="10.04">
            <text:p>1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44">
            <text:p>90,44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45.21">
            <text:p>545,21</text:p>
          </table:table-cell>
          <table:table-cell table:style-name="ce12N2" office:value-type="float" office:value="11636.38">
            <text:p>11636,38</text:p>
          </table:table-cell>
          <table:table-cell table:style-name="ce12N2" office:value-type="float" office:value="562.91">
            <text:p>56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5158626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6">
            <text:p>310276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9.5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13.38">
            <text:p>841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97.51">
            <text:p>7997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3132">
            <text:p>0,123</text:p>
          </table:table-cell>
          <table:table-cell table:style-name="ce12N2" office:value-type="float" office:value="51.03">
            <text:p>5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1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77.6">
            <text:p>7677,60</text:p>
          </table:table-cell>
          <table:table-cell table:style-name="ce12N2" office:value-type="float" office:value="7.68">
            <text:p>7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1">
            <text:p>69,1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15.87">
            <text:p>415,87</text:p>
          </table:table-cell>
          <table:table-cell table:style-name="ce12N2" office:value-type="float" office:value="7997.51">
            <text:p>7997,51</text:p>
          </table:table-cell>
          <table:table-cell table:style-name="ce12N2" office:value-type="float" office:value="319.91">
            <text:p>3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950613001560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7">
            <text:p>31027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9.5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.6">
            <text:p>12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.24">
            <text:p>1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64">
            <text:p>0,001</text:p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8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.16">
            <text:p>103,16</text:p>
          </table:table-cell>
          <table:table-cell table:style-name="ce12N2" office:value-type="float" office:value="0.1">
            <text:p>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6.36">
            <text:p>6,36</text:p>
          </table:table-cell>
          <table:table-cell table:style-name="ce12N2" office:value-type="float" office:value="122.24">
            <text:p>122,24</text:p>
          </table:table-cell>
          <table:table-cell table:style-name="ce12N2" office:value-type="float" office:value="8.56">
            <text:p>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95071385173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8">
            <text:p>310278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9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3.61">
            <text:p>28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.59">
            <text:p>26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25">
            <text:p>0,005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3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87">
            <text:p>234,87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4.02">
            <text:p>14,02</text:p>
          </table:table-cell>
          <table:table-cell table:style-name="ce12N2" office:value-type="float" office:value="269.59">
            <text:p>269,59</text:p>
          </table:table-cell>
          <table:table-cell table:style-name="ce12N2" office:value-type="float" office:value="10.78">
            <text:p>1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950813804617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9">
            <text:p>310279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2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7.05">
            <text:p>802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537.14">
            <text:p>753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34875">
            <text:p>0,735</text:p>
          </table:table-cell>
          <table:table-cell table:style-name="ce12N2" office:value-type="float" office:value="79.24">
            <text:p>79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61.15">
            <text:p>6361,15</text:p>
          </table:table-cell>
          <table:table-cell table:style-name="ce12N2" office:value-type="float" office:value="6.37">
            <text:p>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24">
            <text:p>57,2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89.91">
            <text:p>489,91</text:p>
          </table:table-cell>
          <table:table-cell table:style-name="ce12N2" office:value-type="float" office:value="7537.14">
            <text:p>7537,14</text:p>
          </table:table-cell>
          <table:table-cell table:style-name="ce12N2" office:value-type="float" office:value="527.61">
            <text:p>52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50238000114550010013722661217592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80">
            <text:p>310280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2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3.13">
            <text:p>88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9.23">
            <text:p>82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284">
            <text:p>0,057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3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9.85">
            <text:p>699,85</text:p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9">
            <text:p>53,90</text:p>
          </table:table-cell>
          <table:table-cell table:style-name="ce12N2" office:value-type="float" office:value="829.23">
            <text:p>829,23</text:p>
          </table:table-cell>
          <table:table-cell table:style-name="ce12N2" office:value-type="float" office:value="58.05">
            <text:p>5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50238000114550010013725351219649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89">
            <text:p>310289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6.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6.4">
            <text:p>290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06.4">
            <text:p>290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8">
            <text:p>0,138</text:p>
          </table:table-cell>
          <table:table-cell table:style-name="ce12N2" office:value-type="float" office:value="25.2">
            <text:p>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0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2.93">
            <text:p>2452,93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8">
            <text:p>22,08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06.4">
            <text:p>2906,40</text:p>
          </table:table-cell>
          <table:table-cell table:style-name="ce12N2" office:value-type="float" office:value="203.45">
            <text:p>20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366991417667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5">
            <text:p>310295</text:p>
          </table:table-cell>
          <table:table-cell table:style-name="ce0" table:number-columns-spanned="4" table:number-rows-spanned="1" office:value-type="string" calcext:value-type="string">
            <text:p>29.228 - CONDOR PINCEIS LTDA</text:p>
          </table:table-cell>
          <table:covered-table-cell table:number-columns-repeated="3"/>
          <table:table-cell table:style-name="ce0" office:value-type="string" calcext:value-type="string">
            <text:p>109.59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128.65">
            <text:p>27128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6973.16">
            <text:p>26973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2269">
            <text:p>0,452</text:p>
          </table:table-cell>
          <table:table-cell table:style-name="ce12N2" office:value-type="float" office:value="590.7">
            <text:p>59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128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64.67">
            <text:p>22764,67</text:p>
          </table:table-cell>
          <table:table-cell table:style-name="ce12N2" office:value-type="float" office:value="22.76">
            <text:p>2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.89">
            <text:p>204,89</text:p>
          </table:table-cell>
          <table:table-cell table:style-name="ce12N2" office:value-type="float" office:value="31">
            <text:p>3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5.49">
            <text:p>155,49</text:p>
          </table:table-cell>
          <table:table-cell table:style-name="ce12N2" office:value-type="float" office:value="26973.16">
            <text:p>26973,16</text:p>
          </table:table-cell>
          <table:table-cell table:style-name="ce12N2" office:value-type="float" office:value="1888.12">
            <text:p>188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217430000304550050001095991083361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6">
            <text:p>31029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2.16">
            <text:p>3361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3928">
            <text:p>2,004</text:p>
          </table:table-cell>
          <table:table-cell table:style-name="ce12N2" office:value-type="float" office:value="155.68">
            <text:p>15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1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7.66">
            <text:p>28367,66</text:p>
          </table:table-cell>
          <table:table-cell table:style-name="ce12N2" office:value-type="float" office:value="28.37">
            <text:p>2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32">
            <text:p>255,3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5.39">
            <text:p>25,39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2327.64">
            <text:p>232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211057345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7">
            <text:p>3102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0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0.3">
            <text:p>393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0.3">
            <text:p>393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527">
            <text:p>0,075</text:p>
          </table:table-cell>
          <table:table-cell table:style-name="ce12N2" office:value-type="float" office:value="10.34">
            <text:p>10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7.1">
            <text:p>3317,10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5">
            <text:p>29,8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0.3">
            <text:p>3930,30</text:p>
          </table:table-cell>
          <table:table-cell table:style-name="ce12N2" office:value-type="float" office:value="275.12">
            <text:p>27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8038912421113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8">
            <text:p>3102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0.7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93.2">
            <text:p>1369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693.2">
            <text:p>1369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75">
            <text:p>0,166</text:p>
          </table:table-cell>
          <table:table-cell table:style-name="ce12N2" office:value-type="float" office:value="43.5">
            <text:p>4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69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56.6">
            <text:p>11556,60</text:p>
          </table:table-cell>
          <table:table-cell table:style-name="ce12N2" office:value-type="float" office:value="11.56">
            <text:p>1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4.01">
            <text:p>104,0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693.2">
            <text:p>13693,20</text:p>
          </table:table-cell>
          <table:table-cell table:style-name="ce12N2" office:value-type="float" office:value="958.52">
            <text:p>95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807381214268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9">
            <text:p>310299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7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3.82">
            <text:p>364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23.16">
            <text:p>3623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4544">
            <text:p>0,315</text:p>
          </table:table-cell>
          <table:table-cell table:style-name="ce12N2" office:value-type="float" office:value="37.08">
            <text:p>3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6.51">
            <text:p>3066,51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6">
            <text:p>27,60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3623.16">
            <text:p>3623,16</text:p>
          </table:table-cell>
          <table:table-cell table:style-name="ce12N2" office:value-type="float" office:value="244.09">
            <text:p>24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74015386824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00">
            <text:p>31030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8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656">
            <text:p>0,197</text:p>
          </table:table-cell>
          <table:table-cell table:style-name="ce12N2" office:value-type="float" office:value="9.72">
            <text:p>9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2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14.93">
            <text:p>2214,93</text:p>
          </table:table-cell>
          <table:table-cell table:style-name="ce12N2" office:value-type="float" office:value="2.21">
            <text:p>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93">
            <text:p>19,93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183.71">
            <text:p>18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8691076041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01">
            <text:p>3103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3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16">
            <text:p>86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16">
            <text:p>86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875">
            <text:p>0,079</text:p>
          </table:table-cell>
          <table:table-cell table:style-name="ce12N2" office:value-type="float" office:value="32.4">
            <text:p>3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72">
            <text:p>7272,00</text:p>
          </table:table-cell>
          <table:table-cell table:style-name="ce12N2" office:value-type="float" office:value="7.27">
            <text:p>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45">
            <text:p>65,4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16">
            <text:p>8616,00</text:p>
          </table:table-cell>
          <table:table-cell table:style-name="ce12N2" office:value-type="float" office:value="603.12">
            <text:p>6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37118648210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5">
            <text:p>310315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9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45.61">
            <text:p>2804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">
            <text:p>46,00</text:p>
          </table:table-cell>
          <table:table-cell table:style-name="ce12N2" office:value-type="float" office:value="26689.01">
            <text:p>26689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07266">
            <text:p>0,607</text:p>
          </table:table-cell>
          <table:table-cell table:style-name="ce12N2" office:value-type="float" office:value="486.28">
            <text:p>486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045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858.97">
            <text:p>22858,97</text:p>
          </table:table-cell>
          <table:table-cell table:style-name="ce12N2" office:value-type="float" office:value="22.87">
            <text:p>2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5.74">
            <text:p>205,7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356.6">
            <text:p>1356,60</text:p>
          </table:table-cell>
          <table:table-cell table:style-name="ce12N2" office:value-type="float" office:value="26689.01">
            <text:p>26689,01</text:p>
          </table:table-cell>
          <table:table-cell table:style-name="ce12N2" office:value-type="float" office:value="1500.03">
            <text:p>150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950914913069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6">
            <text:p>310316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4.1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82.24">
            <text:p>470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46860.88">
            <text:p>4686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976484">
            <text:p>36,976</text:p>
          </table:table-cell>
          <table:table-cell table:style-name="ce12N2" office:value-type="float" office:value="1508.32">
            <text:p>1508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0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04.47">
            <text:p>40804,47</text:p>
          </table:table-cell>
          <table:table-cell table:style-name="ce12N2" office:value-type="float" office:value="40.79">
            <text:p>4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7.23">
            <text:p>367,2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21.36">
            <text:p>221,36</text:p>
          </table:table-cell>
          <table:table-cell table:style-name="ce12N2" office:value-type="float" office:value="33398.05">
            <text:p>33398,05</text:p>
          </table:table-cell>
          <table:table-cell table:style-name="ce12N2" office:value-type="float" office:value="2128.87">
            <text:p>212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0376680001545500100120418113768707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7">
            <text:p>310317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4.1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34.86">
            <text:p>3823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7031.35">
            <text:p>3703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527776">
            <text:p>5,528</text:p>
          </table:table-cell>
          <table:table-cell table:style-name="ce12N2" office:value-type="float" office:value="1100.93">
            <text:p>110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234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53.53">
            <text:p>31253,53</text:p>
          </table:table-cell>
          <table:table-cell table:style-name="ce12N2" office:value-type="float" office:value="31.25">
            <text:p>3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.28">
            <text:p>281,28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03.51">
            <text:p>1203,51</text:p>
          </table:table-cell>
          <table:table-cell table:style-name="ce12N2" office:value-type="float" office:value="37031.35">
            <text:p>37031,35</text:p>
          </table:table-cell>
          <table:table-cell table:style-name="ce12N2" office:value-type="float" office:value="2592.2">
            <text:p>259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037668000154550010012041821780522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8">
            <text:p>310318</text:p>
          </table:table-cell>
          <table:table-cell table:style-name="ce0" table:number-columns-spanned="4" table:number-rows-spanned="1" office:value-type="string" calcext:value-type="string">
            <text:p>14.578 - CARBOGRAFITE EQUIPAMENTOS INDUSTRIAIS LTDA</text:p>
          </table:table-cell>
          <table:covered-table-cell table:number-columns-repeated="3"/>
          <table:table-cell table:style-name="ce0" office:value-type="string" calcext:value-type="string">
            <text:p>810.65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35.3">
            <text:p>933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221.36">
            <text:p>9221,36</text:p>
          </table:table-cell>
          <table:table-cell table:style-name="ce12N2" office:value-type="float" office:value="7.99">
            <text:p>7,99</text:p>
          </table:table-cell>
          <table:table-cell table:style-name="ce12N3" office:value-type="float" office:value="0.656168">
            <text:p>0,656</text:p>
          </table:table-cell>
          <table:table-cell table:style-name="ce12N2" office:value-type="float" office:value="108">
            <text:p>10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335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88.39">
            <text:p>7988,39</text:p>
          </table:table-cell>
          <table:table-cell table:style-name="ce12N2" office:value-type="float" office:value="7.99">
            <text:p>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.9">
            <text:p>71,90</text:p>
          </table:table-cell>
          <table:table-cell table:style-name="ce12N2" office:value-type="float" office:value="43.83">
            <text:p>43,8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05.95">
            <text:p>105,95</text:p>
          </table:table-cell>
          <table:table-cell table:style-name="ce12N2" office:value-type="float" office:value="9229.35">
            <text:p>9229,35</text:p>
          </table:table-cell>
          <table:table-cell table:style-name="ce12N2" office:value-type="float" office:value="417.91">
            <text:p>41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6427615000146550000008106591329160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9">
            <text:p>310319</text:p>
          </table:table-cell>
          <table:table-cell table:style-name="ce0" table:number-columns-spanned="4" table:number-rows-spanned="1" office:value-type="string" calcext:value-type="string">
            <text:p>13.126 - ALMA TEXTIL LTDA</text:p>
          </table:table-cell>
          <table:covered-table-cell table:number-columns-repeated="3"/>
          <table:table-cell table:style-name="ce0" office:value-type="string" calcext:value-type="string">
            <text:p>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20">
            <text:p>43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320">
            <text:p>43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11.484">
            <text:p>3611,484</text:p>
          </table:table-cell>
          <table:table-cell table:style-name="ce12N2" office:value-type="float" office:value="1951">
            <text:p>195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17.11">
            <text:p>38817,11</text:p>
          </table:table-cell>
          <table:table-cell table:style-name="ce12N2" office:value-type="float" office:value="38.82">
            <text:p>3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.36">
            <text:p>349,36</text:p>
          </table:table-cell>
          <table:table-cell table:style-name="ce12N2" office:value-type="float" office:value="32">
            <text:p>3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320">
            <text:p>43320,00</text:p>
          </table:table-cell>
          <table:table-cell table:style-name="ce12N2" office:value-type="float" office:value="3032.4">
            <text:p>303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796564000194550010000167131260167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37">
            <text:p>310337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6.26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43.56">
            <text:p>1614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39.3">
            <text:p>1603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354">
            <text:p>5,335</text:p>
          </table:table-cell>
          <table:table-cell table:style-name="ce12N2" office:value-type="float" office:value="11520.29">
            <text:p>11520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4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36.77">
            <text:p>13536,77</text:p>
          </table:table-cell>
          <table:table-cell table:style-name="ce12N2" office:value-type="float" office:value="13.54">
            <text:p>1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.83">
            <text:p>121,8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04.26">
            <text:p>104,26</text:p>
          </table:table-cell>
          <table:table-cell table:style-name="ce12N2" office:value-type="float" office:value="16039.3">
            <text:p>16039,30</text:p>
          </table:table-cell>
          <table:table-cell table:style-name="ce12N2" office:value-type="float" office:value="1122.75">
            <text:p>112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670.29">
            <text:p>267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15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30/06/2026</text:p>
          </table:table-cell>
          <table:table-cell table:style-name="ce12" office:value-type="string" calcext:value-type="string">
            <text:p>2.670,29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5260656883820000204550030019062641199292708</text:p>
          </table:table-cell>
          <table:table-cell table:style-name="ce0" office:value-type="string" calcext:value-type="string">
            <text:p>35260654320203000194570010000044151691590607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38">
            <text:p>31033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6.26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67.36">
            <text:p>1186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790.72">
            <text:p>1179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44077">
            <text:p>1,044</text:p>
          </table:table-cell>
          <table:table-cell table:style-name="ce12N2" office:value-type="float" office:value="5760">
            <text:p>5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86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51.07">
            <text:p>9951,07</text:p>
          </table:table-cell>
          <table:table-cell table:style-name="ce12N2" office:value-type="float" office:value="9.95">
            <text:p>9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.56">
            <text:p>89,56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76.64">
            <text:p>76,64</text:p>
          </table:table-cell>
          <table:table-cell table:style-name="ce12N2" office:value-type="float" office:value="11790.72">
            <text:p>11790,72</text:p>
          </table:table-cell>
          <table:table-cell table:style-name="ce12N2" office:value-type="float" office:value="825.35">
            <text:p>82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18.79">
            <text:p>111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16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30/06/2026</text:p>
          </table:table-cell>
          <table:table-cell table:style-name="ce12" office:value-type="string" calcext:value-type="string">
            <text:p>1.118,79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5260656883820000204550030019062651443371095</text:p>
          </table:table-cell>
          <table:table-cell table:style-name="ce0" office:value-type="string" calcext:value-type="string">
            <text:p>3526065432020300019457001000004416194841761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41">
            <text:p>31034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6.22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600.77">
            <text:p>7760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7099.62">
            <text:p>7709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713493">
            <text:p>10,713</text:p>
          </table:table-cell>
          <table:table-cell table:style-name="ce12N2" office:value-type="float" office:value="37215.86">
            <text:p>37215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7.600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070.16">
            <text:p>65070,16</text:p>
          </table:table-cell>
          <table:table-cell table:style-name="ce12N2" office:value-type="float" office:value="65.07">
            <text:p>6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5.63">
            <text:p>585,63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01.15">
            <text:p>501,15</text:p>
          </table:table-cell>
          <table:table-cell table:style-name="ce12N2" office:value-type="float" office:value="77099.62">
            <text:p>77099,62</text:p>
          </table:table-cell>
          <table:table-cell table:style-name="ce12N2" office:value-type="float" office:value="5396.97">
            <text:p>539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276.41">
            <text:p>727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16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30/06/2026</text:p>
          </table:table-cell>
          <table:table-cell table:style-name="ce12" office:value-type="string" calcext:value-type="string">
            <text:p>7.276,4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5260656883820000204550030019062211778186376</text:p>
          </table:table-cell>
          <table:table-cell table:style-name="ce0" office:value-type="string" calcext:value-type="string">
            <text:p>3526065432020300019457001000004416194841761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44">
            <text:p>310344</text:p>
          </table:table-cell>
          <table:table-cell table:style-name="ce0" table:number-columns-spanned="4" table:number-rows-spanned="1" office:value-type="string" calcext:value-type="string">
            <text:p>32.610 - NEWELL BRANDS BRASIL LTDA</text:p>
          </table:table-cell>
          <table:covered-table-cell table:number-columns-repeated="3"/>
          <table:table-cell table:style-name="ce0" office:value-type="string" calcext:value-type="string">
            <text:p>17.97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95.99">
            <text:p>759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95.99">
            <text:p>759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4">
            <text:p>0,003</text:p>
          </table:table-cell>
          <table:table-cell table:style-name="ce12N2" office:value-type="float" office:value="90">
            <text:p>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9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66.16">
            <text:p>6066,16</text:p>
          </table:table-cell>
          <table:table-cell table:style-name="ce12N2" office:value-type="float" office:value="6.07">
            <text:p>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6">
            <text:p>54,60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95.99">
            <text:p>7595,99</text:p>
          </table:table-cell>
          <table:table-cell table:style-name="ce12N2" office:value-type="float" office:value="911.52">
            <text:p>91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605945380016805500200001797012529133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45">
            <text:p>31034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69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85.54">
            <text:p>2458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441.3">
            <text:p>22441,30</text:p>
          </table:table-cell>
          <table:table-cell table:style-name="ce12N2" office:value-type="float" office:value="929.39">
            <text:p>929,39</text:p>
          </table:table-cell>
          <table:table-cell table:style-name="ce12N3" office:value-type="float" office:value="0.44847">
            <text:p>0,448</text:p>
          </table:table-cell>
          <table:table-cell table:style-name="ce12N2" office:value-type="float" office:value="211.23">
            <text:p>21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8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974.63">
            <text:p>19974,63</text:p>
          </table:table-cell>
          <table:table-cell table:style-name="ce12N2" office:value-type="float" office:value="19.97">
            <text:p>1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9.78">
            <text:p>179,7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14.85">
            <text:p>1214,85</text:p>
          </table:table-cell>
          <table:table-cell table:style-name="ce12N2" office:value-type="float" office:value="23370.69">
            <text:p>23370,69</text:p>
          </table:table-cell>
          <table:table-cell table:style-name="ce12N2" office:value-type="float" office:value="1360.07">
            <text:p>13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69216336814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46">
            <text:p>310346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902.391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0.84">
            <text:p>449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0.84">
            <text:p>449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389">
            <text:p>0,004</text:p>
          </table:table-cell>
          <table:table-cell table:style-name="ce12N2" office:value-type="float" office:value="76">
            <text:p>7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0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0.16">
            <text:p>3790,16</text:p>
          </table:table-cell>
          <table:table-cell table:style-name="ce12N2" office:value-type="float" office:value="3.79">
            <text:p>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11">
            <text:p>34,1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0.84">
            <text:p>4490,84</text:p>
          </table:table-cell>
          <table:table-cell table:style-name="ce12N2" office:value-type="float" office:value="314.36">
            <text:p>314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7771310034735500500090239110049966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4">
            <text:p>31035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8.4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2.95">
            <text:p>4102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973.8">
            <text:p>397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33">
            <text:p>0,012</text:p>
          </table:table-cell>
          <table:table-cell table:style-name="ce12N2" office:value-type="float" office:value="18.98">
            <text:p>18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02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43.06">
            <text:p>3443,06</text:p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98">
            <text:p>30,9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29.15">
            <text:p>129,15</text:p>
          </table:table-cell>
          <table:table-cell table:style-name="ce12N2" office:value-type="float" office:value="3973.8">
            <text:p>3973,80</text:p>
          </table:table-cell>
          <table:table-cell table:style-name="ce12N2" office:value-type="float" office:value="179.79">
            <text:p>17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84361219049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9">
            <text:p>31036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2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08.44">
            <text:p>12208,44</text:p>
          </table:table-cell>
          <table:table-cell table:style-name="ce12N2" office:value-type="float" office:value="780.03">
            <text:p>780,03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1972.16">
            <text:p>1197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85">
            <text:p>1,399</text:p>
          </table:table-cell>
          <table:table-cell table:style-name="ce12N2" office:value-type="float" office:value="523.5">
            <text:p>52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20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50.57">
            <text:p>9750,57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75">
            <text:p>87,75</text:p>
          </table:table-cell>
          <table:table-cell table:style-name="ce12N2" office:value-type="float" office:value="79.34">
            <text:p>79,3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016.31">
            <text:p>1016,31</text:p>
          </table:table-cell>
          <table:table-cell table:style-name="ce12N2" office:value-type="float" office:value="11192.13">
            <text:p>11192,13</text:p>
          </table:table-cell>
          <table:table-cell table:style-name="ce12N2" office:value-type="float" office:value="447.68">
            <text:p>447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236415441060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79">
            <text:p>310379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5.7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29.27">
            <text:p>2492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929.27">
            <text:p>24929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66.4">
            <text:p>36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929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39.68">
            <text:p>21039,68</text:p>
          </table:table-cell>
          <table:table-cell table:style-name="ce12N2" office:value-type="float" office:value="21.04">
            <text:p>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36">
            <text:p>189,36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929.27">
            <text:p>24929,27</text:p>
          </table:table-cell>
          <table:table-cell table:style-name="ce12N2" office:value-type="float" office:value="1745.05">
            <text:p>174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576514839380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6">
            <text:p>310386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4.3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04.4">
            <text:p>790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904.4">
            <text:p>790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0256">
            <text:p>0,140</text:p>
          </table:table-cell>
          <table:table-cell table:style-name="ce12N2" office:value-type="float" office:value="41">
            <text:p>4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0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71.12">
            <text:p>6671,12</text:p>
          </table:table-cell>
          <table:table-cell table:style-name="ce12N2" office:value-type="float" office:value="6.67">
            <text:p>6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05">
            <text:p>60,0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04.4">
            <text:p>7904,40</text:p>
          </table:table-cell>
          <table:table-cell table:style-name="ce12N2" office:value-type="float" office:value="553.3">
            <text:p>55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43761035609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7">
            <text:p>310387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8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">
            <text:p>0,038</text:p>
          </table:table-cell>
          <table:table-cell table:style-name="ce12N2" office:value-type="float" office:value="258.4">
            <text:p>25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369.75">
            <text:p>3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48875230001525500100003812010038124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05">
            <text:p>3104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642.91">
            <text:p>71664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">
            <text:p>94,00</text:p>
          </table:table-cell>
          <table:table-cell table:style-name="ce12N2" office:value-type="float" office:value="710981.02">
            <text:p>710981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8.74376">
            <text:p>78,744</text:p>
          </table:table-cell>
          <table:table-cell table:style-name="ce12N2" office:value-type="float" office:value="3252.06">
            <text:p>3252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6.642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4397.64">
            <text:p>604397,64</text:p>
          </table:table-cell>
          <table:table-cell table:style-name="ce12N2" office:value-type="float" office:value="604.35">
            <text:p>60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39.56">
            <text:p>5439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661.89">
            <text:p>5661,89</text:p>
          </table:table-cell>
          <table:table-cell table:style-name="ce12N2" office:value-type="float" office:value="706694.95">
            <text:p>706694,95</text:p>
          </table:table-cell>
          <table:table-cell table:style-name="ce12N2" office:value-type="float" office:value="44978.1">
            <text:p>4497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221672117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4">
            <text:p>3104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3241.31">
            <text:p>206324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">
            <text:p>208,00</text:p>
          </table:table-cell>
          <table:table-cell table:style-name="ce12N2" office:value-type="float" office:value="2050218.05">
            <text:p>205021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92.103079">
            <text:p>692,103</text:p>
          </table:table-cell>
          <table:table-cell table:style-name="ce12N2" office:value-type="float" office:value="9038.4">
            <text:p>903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3.241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0206.72">
            <text:p>1740206,72</text:p>
          </table:table-cell>
          <table:table-cell table:style-name="ce12N2" office:value-type="float" office:value="1740.22">
            <text:p>17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61.89">
            <text:p>15661,8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3023.26">
            <text:p>13023,26</text:p>
          </table:table-cell>
          <table:table-cell table:style-name="ce12N2" office:value-type="float" office:value="1999450.7">
            <text:p>1999450,70</text:p>
          </table:table-cell>
          <table:table-cell table:style-name="ce12N2" office:value-type="float" office:value="132634.89">
            <text:p>13263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51890466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7">
            <text:p>310417</text:p>
          </table:table-cell>
          <table:table-cell table:style-name="ce0" table:number-columns-spanned="4" table:number-rows-spanned="1" office:value-type="string" calcext:value-type="string">
            <text:p>3.848 - HIDROSSOL IND. E COM. DE PLASTICOS LTDA.</text:p>
          </table:table-cell>
          <table:covered-table-cell table:number-columns-repeated="3"/>
          <table:table-cell table:style-name="ce0" office:value-type="string" calcext:value-type="string">
            <text:p>58.1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019.02">
            <text:p>660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66019.02">
            <text:p>660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0452">
            <text:p>5,605</text:p>
          </table:table-cell>
          <table:table-cell table:style-name="ce12N2" office:value-type="float" office:value="2978.93">
            <text:p>2978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.0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156.65">
            <text:p>59156,65</text:p>
          </table:table-cell>
          <table:table-cell table:style-name="ce12N2" office:value-type="float" office:value="59.17">
            <text:p>5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2.41">
            <text:p>532,4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019.02">
            <text:p>66019,02</text:p>
          </table:table-cell>
          <table:table-cell table:style-name="ce12N2" office:value-type="float" office:value="4621.34">
            <text:p>462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504514000155550010000581551905815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1">
            <text:p>310421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1.19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68.09">
            <text:p>3096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30117.29">
            <text:p>30117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88948">
            <text:p>4,589</text:p>
          </table:table-cell>
          <table:table-cell table:style-name="ce12N2" office:value-type="float" office:value="422.54">
            <text:p>42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96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58.05">
            <text:p>25758,05</text:p>
          </table:table-cell>
          <table:table-cell table:style-name="ce12N2" office:value-type="float" office:value="25.77">
            <text:p>2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.87">
            <text:p>231,8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850.8">
            <text:p>850,80</text:p>
          </table:table-cell>
          <table:table-cell table:style-name="ce12N2" office:value-type="float" office:value="30117.29">
            <text:p>30117,29</text:p>
          </table:table-cell>
          <table:table-cell table:style-name="ce12N2" office:value-type="float" office:value="1733.74">
            <text:p>173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11921367116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6">
            <text:p>31044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4.4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09">
            <text:p>0,001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.53">
            <text:p>179,53</text:p>
          </table:table-cell>
          <table:table-cell table:style-name="ce12N2" office:value-type="float" office:value="0.18">
            <text:p>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62">
            <text:p>1,6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2.71">
            <text:p>212,71</text:p>
          </table:table-cell>
          <table:table-cell table:style-name="ce12N2" office:value-type="float" office:value="14.89">
            <text:p>1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44891848323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8">
            <text:p>31044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4.48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4">
            <text:p>0,003</text:p>
          </table:table-cell>
          <table:table-cell table:style-name="ce12N2" office:value-type="float" office:value="5.4">
            <text:p>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7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1.79">
            <text:p>2851,79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7">
            <text:p>25,6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9">
            <text:p>3379,00</text:p>
          </table:table-cell>
          <table:table-cell table:style-name="ce12N2" office:value-type="float" office:value="236.53">
            <text:p>23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44881848989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1">
            <text:p>310471</text:p>
          </table:table-cell>
          <table:table-cell table:style-name="ce0" table:number-columns-spanned="4" table:number-rows-spanned="1" office:value-type="string" calcext:value-type="string">
            <text:p>29.857 - J.H. DE OLIVEIRA FABRICACAO DE MANGUEIRAS LTDA</text:p>
          </table:table-cell>
          <table:covered-table-cell table:number-columns-repeated="3"/>
          <table:table-cell table:style-name="ce0" office:value-type="string" calcext:value-type="string">
            <text:p>7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44.6">
            <text:p>614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44.6">
            <text:p>614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11753">
            <text:p>16,118</text:p>
          </table:table-cell>
          <table:table-cell table:style-name="ce12N2" office:value-type="float" office:value="440">
            <text:p>4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44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44.6">
            <text:p>6144,60</text:p>
          </table:table-cell>
          <table:table-cell table:style-name="ce12N2" office:value-type="float" office:value="235.34">
            <text:p>23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02048252000116550010000007311610863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4">
            <text:p>3104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293.88">
            <text:p>332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6196">
            <text:p>0,796</text:p>
          </table:table-cell>
          <table:table-cell table:style-name="ce12N2" office:value-type="float" office:value="1409">
            <text:p>140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2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77.95">
            <text:p>26477,95</text:p>
          </table:table-cell>
          <table:table-cell table:style-name="ce12N2" office:value-type="float" office:value="26.48">
            <text:p>2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32">
            <text:p>238,32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2901.42">
            <text:p>2901,42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1215.69">
            <text:p>12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31589480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6">
            <text:p>310476</text:p>
          </table:table-cell>
          <table:table-cell table:style-name="ce0" table:number-columns-spanned="4" table:number-rows-spanned="1" office:value-type="string" calcext:value-type="string">
            <text:p>34.321 - SALVABRAS SOLUCOES EM PROTECAO LTDA</text:p>
          </table:table-cell>
          <table:covered-table-cell table:number-columns-repeated="3"/>
          <table:table-cell table:style-name="ce0" office:value-type="string" calcext:value-type="string">
            <text:p>19.4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6198">
            <text:p>7,462</text:p>
          </table:table-cell>
          <table:table-cell table:style-name="ce12N2" office:value-type="float" office:value="1304">
            <text:p>130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9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687.23">
            <text:p>19687,23</text:p>
          </table:table-cell>
          <table:table-cell table:style-name="ce12N2" office:value-type="float" office:value="19.69">
            <text:p>1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.19">
            <text:p>177,19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299.8">
            <text:p>25299,80</text:p>
          </table:table-cell>
          <table:table-cell table:style-name="ce12N2" office:value-type="float" office:value="1711.8">
            <text:p>171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6557984000499550010000194321236381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3">
            <text:p>310483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1.3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65.23">
            <text:p>806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695.01">
            <text:p>7695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1784">
            <text:p>0,192</text:p>
          </table:table-cell>
          <table:table-cell table:style-name="ce12N2" office:value-type="float" office:value="26.1">
            <text:p>26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65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94.4">
            <text:p>6494,40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45">
            <text:p>58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370.22">
            <text:p>370,22</text:p>
          </table:table-cell>
          <table:table-cell table:style-name="ce12N2" office:value-type="float" office:value="7695.01">
            <text:p>7695,01</text:p>
          </table:table-cell>
          <table:table-cell table:style-name="ce12N2" office:value-type="float" office:value="538.65">
            <text:p>538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69947000003655500100007138311000317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7">
            <text:p>31048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7.2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73.43">
            <text:p>1537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373.43">
            <text:p>15373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89066">
            <text:p>2,789</text:p>
          </table:table-cell>
          <table:table-cell table:style-name="ce12N2" office:value-type="float" office:value="242.67">
            <text:p>242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37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75.53">
            <text:p>12975,53</text:p>
          </table:table-cell>
          <table:table-cell table:style-name="ce12N2" office:value-type="float" office:value="12.98">
            <text:p>1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.78">
            <text:p>116,7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373.43">
            <text:p>15373,43</text:p>
          </table:table-cell>
          <table:table-cell table:style-name="ce12N2" office:value-type="float" office:value="1076.15">
            <text:p>1076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723519549667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9">
            <text:p>31048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7.2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64.35">
            <text:p>636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364.35">
            <text:p>6364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46625">
            <text:p>0,647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64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71.1">
            <text:p>5371,10</text:p>
          </table:table-cell>
          <table:table-cell table:style-name="ce12N2" office:value-type="float" office:value="5.38">
            <text:p>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34">
            <text:p>48,3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64.35">
            <text:p>6364,35</text:p>
          </table:table-cell>
          <table:table-cell table:style-name="ce12N2" office:value-type="float" office:value="445.51">
            <text:p>44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72411352880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0">
            <text:p>31049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7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30.92">
            <text:p>853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530.92">
            <text:p>8530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23604">
            <text:p>14,236</text:p>
          </table:table-cell>
          <table:table-cell table:style-name="ce12N2" office:value-type="float" office:value="33.94">
            <text:p>33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30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21.54">
            <text:p>7221,54</text:p>
          </table:table-cell>
          <table:table-cell table:style-name="ce12N2" office:value-type="float" office:value="7.21">
            <text:p>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99">
            <text:p>64,9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30.92">
            <text:p>8530,92</text:p>
          </table:table-cell>
          <table:table-cell table:style-name="ce12N2" office:value-type="float" office:value="573.62">
            <text:p>57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723910192683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1">
            <text:p>31049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7.2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683.37">
            <text:p>11868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18683.37">
            <text:p>118683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4.396032">
            <text:p>44,396</text:p>
          </table:table-cell>
          <table:table-cell table:style-name="ce12N2" office:value-type="float" office:value="4344.34">
            <text:p>4344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8.683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160.9">
            <text:p>100160,90</text:p>
          </table:table-cell>
          <table:table-cell table:style-name="ce12N2" office:value-type="float" office:value="100.18">
            <text:p>10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1.44">
            <text:p>901,4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683.37">
            <text:p>118683,37</text:p>
          </table:table-cell>
          <table:table-cell table:style-name="ce12N2" office:value-type="float" office:value="8307.83">
            <text:p>830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723612191218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2">
            <text:p>31049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7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17.84">
            <text:p>891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917.84">
            <text:p>891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.024832">
            <text:p>42,025</text:p>
          </table:table-cell>
          <table:table-cell table:style-name="ce12N2" office:value-type="float" office:value="43.14">
            <text:p>4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17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27.8">
            <text:p>7527,80</text:p>
          </table:table-cell>
          <table:table-cell table:style-name="ce12N2" office:value-type="float" office:value="7.53">
            <text:p>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75">
            <text:p>67,7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17.84">
            <text:p>8917,84</text:p>
          </table:table-cell>
          <table:table-cell table:style-name="ce12N2" office:value-type="float" office:value="624.25">
            <text:p>62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724017792061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3">
            <text:p>31049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7.2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687.42">
            <text:p>8768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87635.3">
            <text:p>8763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639757">
            <text:p>24,640</text:p>
          </table:table-cell>
          <table:table-cell table:style-name="ce12N2" office:value-type="float" office:value="1402.18">
            <text:p>1402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.687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072.61">
            <text:p>74072,61</text:p>
          </table:table-cell>
          <table:table-cell table:style-name="ce12N2" office:value-type="float" office:value="74.09">
            <text:p>7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.64">
            <text:p>666,6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52.12">
            <text:p>52,12</text:p>
          </table:table-cell>
          <table:table-cell table:style-name="ce12N2" office:value-type="float" office:value="87524.26">
            <text:p>87524,26</text:p>
          </table:table-cell>
          <table:table-cell table:style-name="ce12N2" office:value-type="float" office:value="6017.14">
            <text:p>601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72371119335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4">
            <text:p>31049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7.2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298.03">
            <text:p>6429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">
            <text:p>41,00</text:p>
          </table:table-cell>
          <table:table-cell table:style-name="ce12N2" office:value-type="float" office:value="64078.84">
            <text:p>6407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8.816778">
            <text:p>198,817</text:p>
          </table:table-cell>
          <table:table-cell table:style-name="ce12N2" office:value-type="float" office:value="1316.82">
            <text:p>1316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298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206.64">
            <text:p>54206,64</text:p>
          </table:table-cell>
          <table:table-cell table:style-name="ce12N2" office:value-type="float" office:value="54.18">
            <text:p>5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7.9">
            <text:p>487,9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219.19">
            <text:p>219,19</text:p>
          </table:table-cell>
          <table:table-cell table:style-name="ce12N2" office:value-type="float" office:value="63889.37">
            <text:p>63889,37</text:p>
          </table:table-cell>
          <table:table-cell table:style-name="ce12N2" office:value-type="float" office:value="4361.14">
            <text:p>436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72381402876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7">
            <text:p>31049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27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2.17">
            <text:p>88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3.8">
            <text:p>80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2">
            <text:p>0,000</text:p>
          </table:table-cell>
          <table:table-cell table:style-name="ce12N2" office:value-type="float" office:value="0.64">
            <text:p>0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2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8.39">
            <text:p>678,39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11">
            <text:p>6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8.37">
            <text:p>78,37</text:p>
          </table:table-cell>
          <table:table-cell table:style-name="ce12N2" office:value-type="float" office:value="803.8">
            <text:p>803,80</text:p>
          </table:table-cell>
          <table:table-cell table:style-name="ce12N2" office:value-type="float" office:value="56.27">
            <text:p>5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2721376157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9">
            <text:p>31049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28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0.3">
            <text:p>117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13.2">
            <text:p>111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23">
            <text:p>0,021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0.41">
            <text:p>950,41</text:p>
          </table:table-cell>
          <table:table-cell table:style-name="ce12N2" office:value-type="float" office:value="0.95">
            <text:p>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55">
            <text:p>8,5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57.1">
            <text:p>57,10</text:p>
          </table:table-cell>
          <table:table-cell table:style-name="ce12N2" office:value-type="float" office:value="1113.2">
            <text:p>1113,20</text:p>
          </table:table-cell>
          <table:table-cell table:style-name="ce12N2" office:value-type="float" office:value="65.92">
            <text:p>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2801322203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0">
            <text:p>31050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4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2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84.16">
            <text:p>2384,16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46">
            <text:p>21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197.74">
            <text:p>19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214027491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1">
            <text:p>31050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516">
            <text:p>0,060</text:p>
          </table:table-cell>
          <table:table-cell table:style-name="ce12N2" office:value-type="float" office:value="27.9">
            <text:p>2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3.11">
            <text:p>3503,11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3">
            <text:p>31,5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290.55">
            <text:p>29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31422428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2">
            <text:p>31050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012">
            <text:p>0,059</text:p>
          </table:table-cell>
          <table:table-cell table:style-name="ce12N2" office:value-type="float" office:value="27.1">
            <text:p>2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6.92">
            <text:p>466,92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38.73">
            <text:p>3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41864812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6">
            <text:p>310506</text:p>
          </table:table-cell>
          <table:table-cell table:style-name="ce0" table:number-columns-spanned="4" table:number-rows-spanned="1" office:value-type="string" calcext:value-type="string">
            <text:p>37.371 - JOSE MAURICIO ALVES LTDA</text:p>
          </table:table-cell>
          <table:covered-table-cell table:number-columns-repeated="3"/>
          <table:table-cell table:style-name="ce0" office:value-type="string" calcext:value-type="string">
            <text:p>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05.93">
            <text:p>4260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42605.93">
            <text:p>42605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94215">
            <text:p>2,794</text:p>
          </table:table-cell>
          <table:table-cell table:style-name="ce12N2" office:value-type="float" office:value="245.03">
            <text:p>245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60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605.93">
            <text:p>42605,93</text:p>
          </table:table-cell>
          <table:table-cell table:style-name="ce12N2" office:value-type="float" office:value="613.49">
            <text:p>61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62794901000150550010000000231795261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4">
            <text:p>310534</text:p>
          </table:table-cell>
          <table:table-cell table:style-name="ce0" table:number-columns-spanned="4" table:number-rows-spanned="1" office:value-type="string" calcext:value-type="string">
            <text:p>39.171 - BALDEMETAL IND METALURGICA LTDA</text:p>
          </table:table-cell>
          <table:covered-table-cell table:number-columns-repeated="3"/>
          <table:table-cell table:style-name="ce0" office:value-type="string" calcext:value-type="string">
            <text:p>1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6304">
            <text:p>5,063</text:p>
          </table:table-cell>
          <table:table-cell table:style-name="ce12N2" office:value-type="float" office:value="1080">
            <text:p>10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889.89">
            <text:p>889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665712600001255500100000010910000015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5">
            <text:p>31053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28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46.59">
            <text:p>344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72.46">
            <text:p>327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8">
            <text:p>0,023</text:p>
          </table:table-cell>
          <table:table-cell table:style-name="ce12N2" office:value-type="float" office:value="9.04">
            <text:p>9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46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3.87">
            <text:p>2833,87</text:p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51">
            <text:p>25,5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74.13">
            <text:p>174,13</text:p>
          </table:table-cell>
          <table:table-cell table:style-name="ce12N2" office:value-type="float" office:value="3272.46">
            <text:p>3272,46</text:p>
          </table:table-cell>
          <table:table-cell table:style-name="ce12N2" office:value-type="float" office:value="149.74">
            <text:p>14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2811407661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7">
            <text:p>3105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0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1.56">
            <text:p>322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1.56">
            <text:p>3221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1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18.92">
            <text:p>2718,92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47">
            <text:p>24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1.56">
            <text:p>3221,56</text:p>
          </table:table-cell>
          <table:table-cell table:style-name="ce12N2" office:value-type="float" office:value="225.51">
            <text:p>22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09912360957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8">
            <text:p>3105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0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5.03">
            <text:p>364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30.3">
            <text:p>353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22">
            <text:p>0,039</text:p>
          </table:table-cell>
          <table:table-cell table:style-name="ce12N2" office:value-type="float" office:value="7.79">
            <text:p>7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5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9.5">
            <text:p>2979,50</text:p>
          </table:table-cell>
          <table:table-cell table:style-name="ce12N2" office:value-type="float" office:value="2.98">
            <text:p>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82">
            <text:p>26,8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14.73">
            <text:p>114,73</text:p>
          </table:table-cell>
          <table:table-cell table:style-name="ce12N2" office:value-type="float" office:value="3530.3">
            <text:p>3530,30</text:p>
          </table:table-cell>
          <table:table-cell table:style-name="ce12N2" office:value-type="float" office:value="247.12">
            <text:p>24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04916370235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9">
            <text:p>310539</text:p>
          </table:table-cell>
          <table:table-cell table:style-name="ce0" table:number-columns-spanned="4" table:number-rows-spanned="1" office:value-type="string" calcext:value-type="string">
            <text:p>3.931 - INTELLI IND. TERM. ELETR. LTDA</text:p>
          </table:table-cell>
          <table:covered-table-cell table:number-columns-repeated="3"/>
          <table:table-cell table:style-name="ce0" office:value-type="string" calcext:value-type="string">
            <text:p>695.5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843.2">
            <text:p>3784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652.01">
            <text:p>36652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333">
            <text:p>0,035</text:p>
          </table:table-cell>
          <table:table-cell table:style-name="ce12N2" office:value-type="float" office:value="342.51">
            <text:p>34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84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33.37">
            <text:p>30933,37</text:p>
          </table:table-cell>
          <table:table-cell table:style-name="ce12N2" office:value-type="float" office:value="30.96">
            <text:p>3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3">
            <text:p>278,4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191.19">
            <text:p>1191,19</text:p>
          </table:table-cell>
          <table:table-cell table:style-name="ce12N2" office:value-type="float" office:value="36652.01">
            <text:p>36652,01</text:p>
          </table:table-cell>
          <table:table-cell table:style-name="ce12N2" office:value-type="float" office:value="2565.64">
            <text:p>256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6754545000194550000006955941202607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5">
            <text:p>31054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7.6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266.5">
            <text:p>7126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266.5">
            <text:p>7126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005">
            <text:p>49,005</text:p>
          </table:table-cell>
          <table:table-cell table:style-name="ce12N2" office:value-type="float" office:value="5074.65">
            <text:p>507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.26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149.25">
            <text:p>60149,25</text:p>
          </table:table-cell>
          <table:table-cell table:style-name="ce12N2" office:value-type="float" office:value="60.15">
            <text:p>6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1.34">
            <text:p>541,3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266.5">
            <text:p>71266,50</text:p>
          </table:table-cell>
          <table:table-cell table:style-name="ce12N2" office:value-type="float" office:value="4988.66">
            <text:p>498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76181612145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6">
            <text:p>310546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91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6">
            <text:p>0,021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4">
            <text:p>4074,00</text:p>
          </table:table-cell>
          <table:table-cell table:style-name="ce12N2" office:value-type="float" office:value="4.07">
            <text:p>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7">
            <text:p>36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7">
            <text:p>4827,00</text:p>
          </table:table-cell>
          <table:table-cell table:style-name="ce12N2" office:value-type="float" office:value="337.89">
            <text:p>33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13855500200001991814083019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1">
            <text:p>310551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0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52131">
            <text:p>21,521</text:p>
          </table:table-cell>
          <table:table-cell table:style-name="ce12N2" office:value-type="float" office:value="6563.53">
            <text:p>656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297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40.19">
            <text:p>73440,19</text:p>
          </table:table-cell>
          <table:table-cell table:style-name="ce12N2" office:value-type="float" office:value="73.45">
            <text:p>7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0.97">
            <text:p>660,9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3371.91">
            <text:p>337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01590328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2">
            <text:p>310552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474514">
            <text:p>21,475</text:p>
          </table:table-cell>
          <table:table-cell table:style-name="ce12N2" office:value-type="float" office:value="14482.15">
            <text:p>1448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.2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92.96">
            <text:p>83892,9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5.04">
            <text:p>755,0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3851.83">
            <text:p>385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11596816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4">
            <text:p>31055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3.5186">
            <text:p>33,519</text:p>
          </table:table-cell>
          <table:table-cell table:style-name="ce12N2" office:value-type="float" office:value="424">
            <text:p>42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069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06.02">
            <text:p>14406,02</text:p>
          </table:table-cell>
          <table:table-cell table:style-name="ce12N2" office:value-type="float" office:value="14.41">
            <text:p>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65">
            <text:p>129,6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1194.86">
            <text:p>119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0411835813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0">
            <text:p>31056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7.7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2.73668">
            <text:p>72,737</text:p>
          </table:table-cell>
          <table:table-cell table:style-name="ce12N2" office:value-type="float" office:value="5030.72">
            <text:p>503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91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031.5">
            <text:p>48031,50</text:p>
          </table:table-cell>
          <table:table-cell table:style-name="ce12N2" office:value-type="float" office:value="48.03">
            <text:p>4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2.28">
            <text:p>432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14">
            <text:p>56914,00</text:p>
          </table:table-cell>
          <table:table-cell table:style-name="ce12N2" office:value-type="float" office:value="3983.98">
            <text:p>398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779817565900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1">
            <text:p>31056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7.8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640.96">
            <text:p>7264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2640.96">
            <text:p>72640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739978">
            <text:p>8,740</text:p>
          </table:table-cell>
          <table:table-cell table:style-name="ce12N2" office:value-type="float" office:value="1510.54">
            <text:p>1510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.640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301.76">
            <text:p>61301,76</text:p>
          </table:table-cell>
          <table:table-cell table:style-name="ce12N2" office:value-type="float" office:value="61.3">
            <text:p>6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1.7">
            <text:p>551,7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640.96">
            <text:p>72640,96</text:p>
          </table:table-cell>
          <table:table-cell table:style-name="ce12N2" office:value-type="float" office:value="5084.88">
            <text:p>508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781110416494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2">
            <text:p>310562</text:p>
          </table:table-cell>
          <table:table-cell table:style-name="ce0" table:number-columns-spanned="4" table:number-rows-spanned="1" office:value-type="string" calcext:value-type="string">
            <text:p>6.898 - BETALUB INDUSTRIA DE PROD. DIVER. DE PET. LTDA EPP</text:p>
          </table:table-cell>
          <table:covered-table-cell table:number-columns-repeated="3"/>
          <table:table-cell table:style-name="ce0" office:value-type="string" calcext:value-type="string">
            <text:p>1.49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06.8">
            <text:p>1450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519.4">
            <text:p>1151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47736">
            <text:p>0,848</text:p>
          </table:table-cell>
          <table:table-cell table:style-name="ce12N2" office:value-type="float" office:value="456.91">
            <text:p>456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50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4.12">
            <text:p>10834,1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.5">
            <text:p>97,5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26.4">
            <text:p>3926,40</text:p>
          </table:table-cell>
          <table:table-cell table:style-name="ce12N2" office:value-type="float" office:value="274.85">
            <text:p>27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4936.96">
            <text:p>14936,96</text:p>
          </table:table-cell>
          <table:table-cell table:style-name="ce12N2" office:value-type="float" office:value="2987.4">
            <text:p>2987,4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6260884000108550020000014901430271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3">
            <text:p>31056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7.8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577.84">
            <text:p>8157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1577.84">
            <text:p>8157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0.642632">
            <text:p>70,643</text:p>
          </table:table-cell>
          <table:table-cell table:style-name="ce12N2" office:value-type="float" office:value="7076.2">
            <text:p>7076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.577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857.56">
            <text:p>68857,56</text:p>
          </table:table-cell>
          <table:table-cell table:style-name="ce12N2" office:value-type="float" office:value="68.86">
            <text:p>6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9.72">
            <text:p>619,7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577.84">
            <text:p>81577,84</text:p>
          </table:table-cell>
          <table:table-cell table:style-name="ce12N2" office:value-type="float" office:value="5710.45">
            <text:p>571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5789818383092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7">
            <text:p>31056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6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42575">
            <text:p>1,043</text:p>
          </table:table-cell>
          <table:table-cell table:style-name="ce12N2" office:value-type="float" office:value="943.4">
            <text:p>94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4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21.81">
            <text:p>10421,81</text:p>
          </table:table-cell>
          <table:table-cell table:style-name="ce12N2" office:value-type="float" office:value="10.42">
            <text:p>1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8">
            <text:p>93,8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864.39">
            <text:p>86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69381719822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9">
            <text:p>31056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1.78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1.6">
            <text:p>902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831.4">
            <text:p>8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484">
            <text:p>2,885</text:p>
          </table:table-cell>
          <table:table-cell table:style-name="ce12N2" office:value-type="float" office:value="263.04">
            <text:p>26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24.54">
            <text:p>7524,54</text:p>
          </table:table-cell>
          <table:table-cell table:style-name="ce12N2" office:value-type="float" office:value="7.53">
            <text:p>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71">
            <text:p>67,7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0.2">
            <text:p>190,20</text:p>
          </table:table-cell>
          <table:table-cell table:style-name="ce12N2" office:value-type="float" office:value="8831.4">
            <text:p>8831,40</text:p>
          </table:table-cell>
          <table:table-cell table:style-name="ce12N2" office:value-type="float" office:value="539.9">
            <text:p>53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17821252863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4">
            <text:p>310574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1.9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4.16">
            <text:p>223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3.73">
            <text:p>2123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2.37">
            <text:p>1792,37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13">
            <text:p>16,1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10.43">
            <text:p>110,43</text:p>
          </table:table-cell>
          <table:table-cell table:style-name="ce12N2" office:value-type="float" office:value="2123.73">
            <text:p>2123,73</text:p>
          </table:table-cell>
          <table:table-cell table:style-name="ce12N2" office:value-type="float" office:value="148.66">
            <text:p>14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69947000003655500100007195211000034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8">
            <text:p>310578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8.7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.18105">
            <text:p>150,181</text:p>
          </table:table-cell>
          <table:table-cell table:style-name="ce12N2" office:value-type="float" office:value="722">
            <text:p>7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25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2.3">
            <text:p>40412,30</text:p>
          </table:table-cell>
          <table:table-cell table:style-name="ce12N2" office:value-type="float" office:value="40.41">
            <text:p>4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.71">
            <text:p>363,71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3377.75">
            <text:p>337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33385067000140550010000487461170386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80">
            <text:p>310580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7.8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8">
            <text:p>90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0248">
            <text:p>0,340</text:p>
          </table:table-cell>
          <table:table-cell table:style-name="ce12N2" office:value-type="float" office:value="84.25">
            <text:p>84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1.24">
            <text:p>7131,24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18">
            <text:p>64,18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578.41">
            <text:p>578,41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591.47">
            <text:p>59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78521570448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81">
            <text:p>310581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20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04.78">
            <text:p>490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04.78">
            <text:p>4904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375">
            <text:p>0,030</text:p>
          </table:table-cell>
          <table:table-cell table:style-name="ce12N2" office:value-type="float" office:value="14.7">
            <text:p>1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0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16.96">
            <text:p>3916,96</text:p>
          </table:table-cell>
          <table:table-cell table:style-name="ce12N2" office:value-type="float" office:value="3.92">
            <text:p>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25">
            <text:p>35,2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04.78">
            <text:p>4904,78</text:p>
          </table:table-cell>
          <table:table-cell table:style-name="ce12N2" office:value-type="float" office:value="588.57">
            <text:p>58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0142240000120550010007200771965201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86">
            <text:p>310586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61.696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434">
            <text:p>21434,00</text:p>
          </table:table-cell>
          <table:table-cell table:style-name="ce12N2" office:value-type="float" office:value="719.88">
            <text:p>719,8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153.88">
            <text:p>2215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928">
            <text:p>20,928</text:p>
          </table:table-cell>
          <table:table-cell table:style-name="ce12N2" office:value-type="float" office:value="20200">
            <text:p>20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43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561.08">
            <text:p>15561,08</text:p>
          </table:table-cell>
          <table:table-cell table:style-name="ce12N2" office:value-type="float" office:value="15.57">
            <text:p>1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.05">
            <text:p>140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434">
            <text:p>21434,00</text:p>
          </table:table-cell>
          <table:table-cell table:style-name="ce12N2" office:value-type="float" office:value="4286.8">
            <text:p>428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01637895007498550060014616961223848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87">
            <text:p>310587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61.697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14.4">
            <text:p>11714,40</text:p>
          </table:table-cell>
          <table:table-cell table:style-name="ce12N2" office:value-type="float" office:value="393.49">
            <text:p>393,49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657.34">
            <text:p>1165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076">
            <text:p>14,076</text:p>
          </table:table-cell>
          <table:table-cell table:style-name="ce12N2" office:value-type="float" office:value="18000">
            <text:p>18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71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77.56">
            <text:p>8177,56</text:p>
          </table:table-cell>
          <table:table-cell table:style-name="ce12N2" office:value-type="float" office:value="8.18">
            <text:p>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.6">
            <text:p>73,60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63.85">
            <text:p>11263,85</text:p>
          </table:table-cell>
          <table:table-cell table:style-name="ce12N2" office:value-type="float" office:value="2252.77">
            <text:p>225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3516.62">
            <text:p>13516,62</text:p>
          </table:table-cell>
          <table:table-cell table:style-name="ce12N2" office:value-type="float" office:value="450.55">
            <text:p>450,55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016378950074985500600146169712272624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93">
            <text:p>310593</text:p>
          </table:table-cell>
          <table:table-cell table:style-name="ce0" table:number-columns-spanned="4" table:number-rows-spanned="1" office:value-type="string" calcext:value-type="string">
            <text:p>31.250 - MONT MAGNO FIXADORES LTDA</text:p>
          </table:table-cell>
          <table:covered-table-cell table:number-columns-repeated="3"/>
          <table:table-cell table:style-name="ce0" office:value-type="string" calcext:value-type="string">
            <text:p>2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989.1">
            <text:p>6698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60349.1">
            <text:p>60349,10</text:p>
          </table:table-cell>
          <table:table-cell table:style-name="ce12N2" office:value-type="float" office:value="6640">
            <text:p>6640,00</text:p>
          </table:table-cell>
          <table:table-cell table:style-name="ce12N3" office:value-type="float" office:value="8.36472">
            <text:p>8,365</text:p>
          </table:table-cell>
          <table:table-cell table:style-name="ce12N2" office:value-type="float" office:value="5675.82">
            <text:p>567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.98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349.1">
            <text:p>60349,10</text:p>
          </table:table-cell>
          <table:table-cell table:style-name="ce12N2" office:value-type="float" office:value="2432.06">
            <text:p>243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54205780001815500100000290312268708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25">
            <text:p>310625</text:p>
          </table:table-cell>
          <table:table-cell table:style-name="ce0" table:number-columns-spanned="4" table:number-rows-spanned="1" office:value-type="string" calcext:value-type="string">
            <text:p>37.371 - JOSE MAURICIO ALVES LTDA</text:p>
          </table:table-cell>
          <table:covered-table-cell table:number-columns-repeated="3"/>
          <table:table-cell table:style-name="ce0" office:value-type="string" calcext:value-type="string">
            <text:p>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643.88">
            <text:p>8964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89643.88">
            <text:p>8964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017403">
            <text:p>12,017</text:p>
          </table:table-cell>
          <table:table-cell table:style-name="ce12N2" office:value-type="float" office:value="479.56">
            <text:p>479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.64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643.88">
            <text:p>89643,88</text:p>
          </table:table-cell>
          <table:table-cell table:style-name="ce12N2" office:value-type="float" office:value="1290.86">
            <text:p>129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627949010001505500100000002412335233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09">
            <text:p>209,00</text:p>
          </table:table-cell>
          <table:table-cell table:style-name="ce26N2" office:value-type="float" office:value="25448.37">
            <text:p>25448,37</text:p>
          </table:table-cell>
          <table:table-cell table:style-name="ce26N2" office:value-type="float" office:value="7577.38">
            <text:p>7577,3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7859.03">
            <text:p>107859,03</text:p>
          </table:table-cell>
          <table:table-cell table:style-name="ce26N2" office:value-type="float" office:value="8868451.52">
            <text:p>8868451,52</text:p>
          </table:table-cell>
          <table:table-cell table:style-name="ce26N2" office:value-type="float" office:value="532422.89">
            <text:p>532422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1065.49">
            <text:p>11065,49</text:p>
          </table:table-cell>
          <table:table-cell table:style-name="ce26N2" office:value-type="float" office:value="9118232.64">
            <text:p>9118232,6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4546.34">
            <text:p>84546,34</text:p>
          </table:table-cell>
          <table:table-cell table:style-name="ce26N2" office:value-type="float" office:value="13575.04">
            <text:p>13575,04</text:p>
          </table:table-cell>
          <table:table-cell table:style-name="ce26N2" office:value-type="float" office:value="719.83">
            <text:p>719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7278.22398">
            <text:p>7278,224</text:p>
          </table:table-cell>
          <table:table-cell table:style-name="ce26N2" office:value-type="float" office:value="9014669.56">
            <text:p>9014669,56</text:p>
          </table:table-cell>
          <table:table-cell table:style-name="ce26N2" office:value-type="float" office:value="9118232.64">
            <text:p>9118232,6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448709.71">
            <text:p>7448709,71</text:p>
          </table:table-cell>
          <table:table-cell table:style-name="ce26N2" office:value-type="float" office:value="7448.76">
            <text:p>7448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7038.47">
            <text:p>67038,4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89191.12">
            <text:p>389191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2.47">
            <text:p>72,4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956" meta:object-count="0"/>
    <meta:generator>LibreOffice/4.3.0.4$Windows_x86 LibreOffice_project/62ad5818884a2fc2e5780dd45466868d41009ec0</meta:generator>
  </office:meta>
</office:document-meta>
</file>