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8/06/2026 07:17:5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9">
            <text:p>307899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2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8">
            <text:p>0,005</text:p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135.87">
            <text:p>13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61144150000678550010012722281393110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1">
            <text:p>30808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89.57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7.35">
            <text:p>800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67406">
            <text:p>2,367</text:p>
          </table:table-cell>
          <table:table-cell table:style-name="ce12N2" office:value-type="float" office:value="8064">
            <text:p>80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0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14.36">
            <text:p>6714,36</text:p>
          </table:table-cell>
          <table:table-cell table:style-name="ce12N2" office:value-type="float" office:value="6.71">
            <text:p>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43">
            <text:p>60,4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1.71">
            <text:p>51,71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556.89">
            <text:p>55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8957011178059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3">
            <text:p>30810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4.92">
            <text:p>819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2">
            <text:p>81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876">
            <text:p>1,659</text:p>
          </table:table-cell>
          <table:table-cell table:style-name="ce12N2" office:value-type="float" office:value="10198.2">
            <text:p>1019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9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58.49">
            <text:p>6858,49</text:p>
          </table:table-cell>
          <table:table-cell table:style-name="ce12N2" office:value-type="float" office:value="6.86">
            <text:p>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73">
            <text:p>61,7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2.92">
            <text:p>52,92</text:p>
          </table:table-cell>
          <table:table-cell table:style-name="ce12N2" office:value-type="float" office:value="8349">
            <text:p>8349,00</text:p>
          </table:table-cell>
          <table:table-cell table:style-name="ce12N2" office:value-type="float" office:value="584.43">
            <text:p>58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0281178273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8">
            <text:p>30819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54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44.72">
            <text:p>2124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107.52">
            <text:p>2110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57069">
            <text:p>5,057</text:p>
          </table:table-cell>
          <table:table-cell table:style-name="ce12N2" office:value-type="float" office:value="22015.99">
            <text:p>22015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24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14.22">
            <text:p>17814,22</text:p>
          </table:table-cell>
          <table:table-cell table:style-name="ce12N2" office:value-type="float" office:value="17.81">
            <text:p>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.33">
            <text:p>160,3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7.2">
            <text:p>137,20</text:p>
          </table:table-cell>
          <table:table-cell table:style-name="ce12N2" office:value-type="float" office:value="21107.52">
            <text:p>21107,52</text:p>
          </table:table-cell>
          <table:table-cell table:style-name="ce12N2" office:value-type="float" office:value="1477.53">
            <text:p>147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5461549419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6">
            <text:p>308206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29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18.58">
            <text:p>1051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50.65">
            <text:p>10450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11109">
            <text:p>1,611</text:p>
          </table:table-cell>
          <table:table-cell table:style-name="ce12N2" office:value-type="float" office:value="7024.08">
            <text:p>702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1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20.08">
            <text:p>8820,08</text:p>
          </table:table-cell>
          <table:table-cell table:style-name="ce12N2" office:value-type="float" office:value="8.82">
            <text:p>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.38">
            <text:p>79,38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67.93">
            <text:p>67,93</text:p>
          </table:table-cell>
          <table:table-cell table:style-name="ce12N2" office:value-type="float" office:value="10450.65">
            <text:p>10450,65</text:p>
          </table:table-cell>
          <table:table-cell table:style-name="ce12N2" office:value-type="float" office:value="731.55">
            <text:p>73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29012352403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3">
            <text:p>30826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27.59">
            <text:p>3402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231">
            <text:p>3,323</text:p>
          </table:table-cell>
          <table:table-cell table:style-name="ce12N2" office:value-type="float" office:value="35337.72">
            <text:p>353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027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32.97">
            <text:p>28532,97</text:p>
          </table:table-cell>
          <table:table-cell table:style-name="ce12N2" office:value-type="float" office:value="28.53">
            <text:p>2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.8">
            <text:p>256,80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19.75">
            <text:p>219,75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2366.55">
            <text:p>236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517675730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4">
            <text:p>30826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85.02">
            <text:p>1328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99.23">
            <text:p>13199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1958">
            <text:p>0,752</text:p>
          </table:table-cell>
          <table:table-cell table:style-name="ce12N2" office:value-type="float" office:value="5953.15">
            <text:p>5953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8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39.82">
            <text:p>11139,82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.26">
            <text:p>100,2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85.79">
            <text:p>85,79</text:p>
          </table:table-cell>
          <table:table-cell table:style-name="ce12N2" office:value-type="float" office:value="13199.23">
            <text:p>13199,23</text:p>
          </table:table-cell>
          <table:table-cell table:style-name="ce12N2" office:value-type="float" office:value="923.95">
            <text:p>92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411882852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1">
            <text:p>308341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70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8.39">
            <text:p>511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5.34">
            <text:p>5085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91826">
            <text:p>0,592</text:p>
          </table:table-cell>
          <table:table-cell table:style-name="ce12N2" office:value-type="float" office:value="4084.48">
            <text:p>4084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18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91.91">
            <text:p>4291,91</text:p>
          </table:table-cell>
          <table:table-cell table:style-name="ce12N2" office:value-type="float" office:value="4.29">
            <text:p>4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63">
            <text:p>38,6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3.05">
            <text:p>33,05</text:p>
          </table:table-cell>
          <table:table-cell table:style-name="ce12N2" office:value-type="float" office:value="5085.34">
            <text:p>5085,34</text:p>
          </table:table-cell>
          <table:table-cell table:style-name="ce12N2" office:value-type="float" office:value="355.97">
            <text:p>355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70716833562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5">
            <text:p>30835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28">
            <text:p>0,663</text:p>
          </table:table-cell>
          <table:table-cell table:style-name="ce12N2" office:value-type="float" office:value="851.2">
            <text:p>85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49.98">
            <text:p>4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82">
            <text:p>449,8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61063272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8">
            <text:p>30843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7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15.62">
            <text:p>681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33">
            <text:p>0,753</text:p>
          </table:table-cell>
          <table:table-cell table:style-name="ce12N2" office:value-type="float" office:value="5189.18">
            <text:p>5189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1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5.06">
            <text:p>5715,06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4">
            <text:p>51,44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44.02">
            <text:p>44,02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474.01">
            <text:p>47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7171662897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0">
            <text:p>308440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71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39.07">
            <text:p>1143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65.2">
            <text:p>1136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2008">
            <text:p>3,382</text:p>
          </table:table-cell>
          <table:table-cell table:style-name="ce12N2" office:value-type="float" office:value="11520">
            <text:p>115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439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91.95">
            <text:p>9591,95</text:p>
          </table:table-cell>
          <table:table-cell table:style-name="ce12N2" office:value-type="float" office:value="9.59">
            <text:p>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33">
            <text:p>86,3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73.87">
            <text:p>73,87</text:p>
          </table:table-cell>
          <table:table-cell table:style-name="ce12N2" office:value-type="float" office:value="11365.2">
            <text:p>11365,20</text:p>
          </table:table-cell>
          <table:table-cell table:style-name="ce12N2" office:value-type="float" office:value="795.56">
            <text:p>79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7181828823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7">
            <text:p>308447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81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15.62">
            <text:p>681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33">
            <text:p>0,753</text:p>
          </table:table-cell>
          <table:table-cell table:style-name="ce12N2" office:value-type="float" office:value="5189.18">
            <text:p>5189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1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5.06">
            <text:p>5715,06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4">
            <text:p>51,44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44.02">
            <text:p>44,02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474.01">
            <text:p>47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81217713902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3">
            <text:p>30845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8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36.38">
            <text:p>1763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72861">
            <text:p>2,673</text:p>
          </table:table-cell>
          <table:table-cell table:style-name="ce12N2" office:value-type="float" office:value="16943.9">
            <text:p>169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36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88.55">
            <text:p>14788,55</text:p>
          </table:table-cell>
          <table:table-cell table:style-name="ce12N2" office:value-type="float" office:value="14.79">
            <text:p>1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09">
            <text:p>133,09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13.89">
            <text:p>113,89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1226.57">
            <text:p>12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8321826114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9">
            <text:p>30848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9.07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2.43">
            <text:p>449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8314">
            <text:p>0,518</text:p>
          </table:table-cell>
          <table:table-cell table:style-name="ce12N2" office:value-type="float" office:value="2256.02">
            <text:p>225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7.02">
            <text:p>3767,02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">
            <text:p>33,90</text:p>
          </table:table-cell>
          <table:table-cell table:style-name="ce12N2" office:value-type="float" office:value="99.55">
            <text:p>99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9.01">
            <text:p>29,01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312.44">
            <text:p>31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90761582524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8">
            <text:p>30854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1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992.53">
            <text:p>25599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172308">
            <text:p>4,172</text:p>
          </table:table-cell>
          <table:table-cell table:style-name="ce12N2" office:value-type="float" office:value="2315.2">
            <text:p>23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.99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317.73">
            <text:p>215317,73</text:p>
          </table:table-cell>
          <table:table-cell table:style-name="ce12N2" office:value-type="float" office:value="215.35">
            <text:p>21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83">
            <text:p>1937,8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298.56">
            <text:p>1298,56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17429.28">
            <text:p>1742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15651834946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2">
            <text:p>308622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.05">
            <text:p>263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622.96">
            <text:p>262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9.09">
            <text:p>9,09</text:p>
          </table:table-cell>
          <table:table-cell table:style-name="ce12N2" office:value-type="float" office:value="2632.05">
            <text:p>2632,05</text:p>
          </table:table-cell>
          <table:table-cell table:style-name="ce12N2" office:value-type="float" office:value="184.24">
            <text:p>18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61852688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1">
            <text:p>308711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8.66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3303">
            <text:p>3,003</text:p>
          </table:table-cell>
          <table:table-cell table:style-name="ce12N2" office:value-type="float" office:value="379.94">
            <text:p>37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75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080.57">
            <text:p>36080,57</text:p>
          </table:table-cell>
          <table:table-cell table:style-name="ce12N2" office:value-type="float" office:value="36.08">
            <text:p>3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.73">
            <text:p>324,7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2992.55">
            <text:p>299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86651322422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9">
            <text:p>308729</text:p>
          </table:table-cell>
          <table:table-cell table:style-name="ce0" table:number-columns-spanned="4" table:number-rows-spanned="1" office:value-type="string" calcext:value-type="string">
            <text:p>7.682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183.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19.91">
            <text:p>131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2625">
            <text:p>0,113</text:p>
          </table:table-cell>
          <table:table-cell table:style-name="ce12N2" office:value-type="float" office:value="82.4">
            <text:p>8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1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48.51">
            <text:p>648,51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498.86">
            <text:p>49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45865920001000550010001836961537768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4">
            <text:p>30873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3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6.5">
            <text:p>433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00">
            <text:p>42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2">
            <text:p>0,000</text:p>
          </table:table-cell>
          <table:table-cell table:style-name="ce12N2" office:value-type="float" office:value="185.4">
            <text:p>18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3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44.69">
            <text:p>3544,69</text:p>
          </table:table-cell>
          <table:table-cell table:style-name="ce12N2" office:value-type="float" office:value="3.54">
            <text:p>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136.5">
            <text:p>136,50</text:p>
          </table:table-cell>
          <table:table-cell table:style-name="ce12N2" office:value-type="float" office:value="4200">
            <text:p>4200,00</text:p>
          </table:table-cell>
          <table:table-cell table:style-name="ce12N2" office:value-type="float" office:value="294">
            <text:p>29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3631262305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56">
            <text:p>30875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6364">
            <text:p>1,764</text:p>
          </table:table-cell>
          <table:table-cell table:style-name="ce12N2" office:value-type="float" office:value="4474.4">
            <text:p>447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5.98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408.63">
            <text:p>165408,63</text:p>
          </table:table-cell>
          <table:table-cell table:style-name="ce12N2" office:value-type="float" office:value="165.41">
            <text:p>16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68">
            <text:p>1488,68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13719.13">
            <text:p>1371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40155101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87">
            <text:p>308787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87.86">
            <text:p>568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547.3">
            <text:p>554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8896">
            <text:p>0,889</text:p>
          </table:table-cell>
          <table:table-cell table:style-name="ce12N2" office:value-type="float" office:value="245.6">
            <text:p>24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8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34.6">
            <text:p>4734,60</text:p>
          </table:table-cell>
          <table:table-cell table:style-name="ce12N2" office:value-type="float" office:value="4.73">
            <text:p>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61">
            <text:p>42,61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140.56">
            <text:p>140,56</text:p>
          </table:table-cell>
          <table:table-cell table:style-name="ce12N2" office:value-type="float" office:value="5547.3">
            <text:p>5547,30</text:p>
          </table:table-cell>
          <table:table-cell table:style-name="ce12N2" office:value-type="float" office:value="330.11">
            <text:p>33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2651607305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4">
            <text:p>30879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1.0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33772">
            <text:p>15,338</text:p>
          </table:table-cell>
          <table:table-cell table:style-name="ce12N2" office:value-type="float" office:value="4014.56">
            <text:p>401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.28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002.86">
            <text:p>153002,86</text:p>
          </table:table-cell>
          <table:table-cell table:style-name="ce12N2" office:value-type="float" office:value="153.05">
            <text:p>153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7.02">
            <text:p>1377,0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12690.21">
            <text:p>1269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101419589447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0">
            <text:p>308860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5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51.5">
            <text:p>1635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836.8">
            <text:p>1583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38128">
            <text:p>0,638</text:p>
          </table:table-cell>
          <table:table-cell table:style-name="ce12N2" office:value-type="float" office:value="697.13">
            <text:p>697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5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365.86">
            <text:p>13365,86</text:p>
          </table:table-cell>
          <table:table-cell table:style-name="ce12N2" office:value-type="float" office:value="13.37">
            <text:p>1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29">
            <text:p>120,29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514.7">
            <text:p>514,70</text:p>
          </table:table-cell>
          <table:table-cell table:style-name="ce12N2" office:value-type="float" office:value="15836.8">
            <text:p>15836,80</text:p>
          </table:table-cell>
          <table:table-cell table:style-name="ce12N2" office:value-type="float" office:value="1108.58">
            <text:p>110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5431802276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5">
            <text:p>308865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4.36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5252">
            <text:p>12,525</text:p>
          </table:table-cell>
          <table:table-cell table:style-name="ce12N2" office:value-type="float" office:value="2875.3">
            <text:p>2875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.59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732.5">
            <text:p>58732,50</text:p>
          </table:table-cell>
          <table:table-cell table:style-name="ce12N2" office:value-type="float" office:value="58.74">
            <text:p>5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8.59">
            <text:p>528,5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4871.32">
            <text:p>487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43601662398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2">
            <text:p>308872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9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2.65">
            <text:p>482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93">
            <text:p>459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9">
            <text:p>0,210</text:p>
          </table:table-cell>
          <table:table-cell table:style-name="ce12N2" office:value-type="float" office:value="110">
            <text:p>1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15.59">
            <text:p>4115,59</text:p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04">
            <text:p>37,04</text:p>
          </table:table-cell>
          <table:table-cell table:style-name="ce12N2" office:value-type="float" office:value="41.33">
            <text:p>4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29.65">
            <text:p>229,65</text:p>
          </table:table-cell>
          <table:table-cell table:style-name="ce12N2" office:value-type="float" office:value="4593">
            <text:p>4593,00</text:p>
          </table:table-cell>
          <table:table-cell table:style-name="ce12N2" office:value-type="float" office:value="321.51">
            <text:p>32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451237100001475500100001391811920016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5">
            <text:p>308885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7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5">
            <text:p>0,172</text:p>
          </table:table-cell>
          <table:table-cell table:style-name="ce12N2" office:value-type="float" office:value="13.7">
            <text:p>1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8.43">
            <text:p>998,43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99">
            <text:p>8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82.81">
            <text:p>8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7251574296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9">
            <text:p>308889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19.9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378">
            <text:p>3,384</text:p>
          </table:table-cell>
          <table:table-cell table:style-name="ce12N2" office:value-type="float" office:value="2932">
            <text:p>293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1.96">
            <text:p>17391,96</text:p>
          </table:table-cell>
          <table:table-cell table:style-name="ce12N2" office:value-type="float" office:value="17.39">
            <text:p>1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53">
            <text:p>156,5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1442.5">
            <text:p>14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1992318972141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0">
            <text:p>308960</text:p>
          </table:table-cell>
          <table:table-cell table:style-name="ce0" table:number-columns-spanned="4" table:number-rows-spanned="1" office:value-type="string" calcext:value-type="string">
            <text:p>732 - METALURGICA INCA LTDA</text:p>
          </table:table-cell>
          <table:covered-table-cell table:number-columns-repeated="3"/>
          <table:table-cell table:style-name="ce0" office:value-type="string" calcext:value-type="string">
            <text:p>141.9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38.68">
            <text:p>703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26.16">
            <text:p>702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56">
            <text:p>0,032</text:p>
          </table:table-cell>
          <table:table-cell table:style-name="ce12N2" office:value-type="float" office:value="264.08">
            <text:p>26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3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95.82">
            <text:p>6295,82</text:p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66">
            <text:p>56,66</text:p>
          </table:table-cell>
          <table:table-cell table:style-name="ce12N2" office:value-type="float" office:value="44.97">
            <text:p>44,9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12.52">
            <text:p>12,52</text:p>
          </table:table-cell>
          <table:table-cell table:style-name="ce12N2" office:value-type="float" office:value="7026.16">
            <text:p>7026,16</text:p>
          </table:table-cell>
          <table:table-cell table:style-name="ce12N2" office:value-type="float" office:value="491.84">
            <text:p>49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204129000106550010001419651121064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9">
            <text:p>308979</text:p>
          </table:table-cell>
          <table:table-cell table:style-name="ce0" table:number-columns-spanned="4" table:number-rows-spanned="1" office:value-type="string" calcext:value-type="string">
            <text:p>977 - POLIERG INDUSTRIA E COMERCIO LTDA</text:p>
          </table:table-cell>
          <table:covered-table-cell table:number-columns-repeated="3"/>
          <table:table-cell table:style-name="ce0" office:value-type="string" calcext:value-type="string">
            <text:p>120.7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30">
            <text:p>1643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430">
            <text:p>164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85">
            <text:p>0,408</text:p>
          </table:table-cell>
          <table:table-cell table:style-name="ce12N2" office:value-type="float" office:value="409.5">
            <text:p>40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3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66.1">
            <text:p>14066,10</text:p>
          </table:table-cell>
          <table:table-cell table:style-name="ce12N2" office:value-type="float" office:value="14.07">
            <text:p>1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6">
            <text:p>126,6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88.1">
            <text:p>13288,10</text:p>
          </table:table-cell>
          <table:table-cell table:style-name="ce12N2" office:value-type="float" office:value="930.17">
            <text:p>93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010717000152550030001207581079396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1">
            <text:p>309031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3.5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04.56">
            <text:p>1680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04.56">
            <text:p>1680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75">
            <text:p>18,750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0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182.62">
            <text:p>14182,62</text:p>
          </table:table-cell>
          <table:table-cell table:style-name="ce12N2" office:value-type="float" office:value="14.18">
            <text:p>1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.64">
            <text:p>127,64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04.56">
            <text:p>16804,56</text:p>
          </table:table-cell>
          <table:table-cell table:style-name="ce12N2" office:value-type="float" office:value="1176.32">
            <text:p>117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1507510091355500100056358610450589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3">
            <text:p>30903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49748">
            <text:p>1,750</text:p>
          </table:table-cell>
          <table:table-cell table:style-name="ce12N2" office:value-type="float" office:value="508.99">
            <text:p>508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7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27.46">
            <text:p>7827,46</text:p>
          </table:table-cell>
          <table:table-cell table:style-name="ce12N2" office:value-type="float" office:value="7.83">
            <text:p>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.45">
            <text:p>70,4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649.22">
            <text:p>64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11042095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4">
            <text:p>30903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49">
            <text:p>0,013</text:p>
          </table:table-cell>
          <table:table-cell table:style-name="ce12N2" office:value-type="float" office:value="352.5">
            <text:p>35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10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228.63">
            <text:p>26228,63</text:p>
          </table:table-cell>
          <table:table-cell table:style-name="ce12N2" office:value-type="float" office:value="26.23">
            <text:p>2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6.06">
            <text:p>236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1204.25">
            <text:p>120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21093348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5">
            <text:p>3090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2152">
            <text:p>1,522</text:p>
          </table:table-cell>
          <table:table-cell table:style-name="ce12N2" office:value-type="float" office:value="442.6">
            <text:p>44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6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06.49">
            <text:p>6806,49</text:p>
          </table:table-cell>
          <table:table-cell table:style-name="ce12N2" office:value-type="float" office:value="6.81">
            <text:p>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26">
            <text:p>61,2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564.54">
            <text:p>56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314507262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9">
            <text:p>309039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199.5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35.57">
            <text:p>2163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635.57">
            <text:p>21635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79936">
            <text:p>32,799</text:p>
          </table:table-cell>
          <table:table-cell table:style-name="ce12N2" office:value-type="float" office:value="307.8">
            <text:p>30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63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829.29">
            <text:p>18829,29</text:p>
          </table:table-cell>
          <table:table-cell table:style-name="ce12N2" office:value-type="float" office:value="18.83">
            <text:p>1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.47">
            <text:p>169,47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71.95">
            <text:p>12671,95</text:p>
          </table:table-cell>
          <table:table-cell table:style-name="ce12N2" office:value-type="float" office:value="887.04">
            <text:p>8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0376680001545500100119959017090732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2">
            <text:p>3090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1.38">
            <text:p>75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5.52">
            <text:p>70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52">
            <text:p>0,007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5.43">
            <text:p>595,43</text:p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36">
            <text:p>5,3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45.86">
            <text:p>45,86</text:p>
          </table:table-cell>
          <table:table-cell table:style-name="ce12N2" office:value-type="float" office:value="705.52">
            <text:p>705,52</text:p>
          </table:table-cell>
          <table:table-cell table:style-name="ce12N2" office:value-type="float" office:value="49.39">
            <text:p>4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21010391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4">
            <text:p>3090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4.5">
            <text:p>393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4.5">
            <text:p>393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52">
            <text:p>0,000</text:p>
          </table:table-cell>
          <table:table-cell table:style-name="ce12N2" office:value-type="float" office:value="6.78">
            <text:p>6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0.62">
            <text:p>3320,62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9">
            <text:p>29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4.5">
            <text:p>3934,50</text:p>
          </table:table-cell>
          <table:table-cell table:style-name="ce12N2" office:value-type="float" office:value="275.42">
            <text:p>27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6811466963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5">
            <text:p>3090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.69">
            <text:p>37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2.76">
            <text:p>352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26">
            <text:p>0,004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5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.73">
            <text:p>297,73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68">
            <text:p>2,6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22.93">
            <text:p>22,93</text:p>
          </table:table-cell>
          <table:table-cell table:style-name="ce12N2" office:value-type="float" office:value="352.76">
            <text:p>352,76</text:p>
          </table:table-cell>
          <table:table-cell table:style-name="ce12N2" office:value-type="float" office:value="24.69">
            <text:p>2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11784758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7">
            <text:p>3090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0.64">
            <text:p>191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10.64">
            <text:p>1910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752">
            <text:p>0,008</text:p>
          </table:table-cell>
          <table:table-cell table:style-name="ce12N2" office:value-type="float" office:value="10.75">
            <text:p>10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0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44.78">
            <text:p>1644,78</text:p>
          </table:table-cell>
          <table:table-cell table:style-name="ce12N2" office:value-type="float" office:value="1.64">
            <text:p>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8">
            <text:p>14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2.98">
            <text:p>1402,98</text:p>
          </table:table-cell>
          <table:table-cell table:style-name="ce12N2" office:value-type="float" office:value="98.21">
            <text:p>98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01762169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8">
            <text:p>3090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33.24">
            <text:p>1113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33.24">
            <text:p>1113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12">
            <text:p>0,066</text:p>
          </table:table-cell>
          <table:table-cell table:style-name="ce12N2" office:value-type="float" office:value="71.82">
            <text:p>7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13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96.17">
            <text:p>9396,17</text:p>
          </table:table-cell>
          <table:table-cell table:style-name="ce12N2" office:value-type="float" office:value="9.4">
            <text:p>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.57">
            <text:p>84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33.24">
            <text:p>11133,24</text:p>
          </table:table-cell>
          <table:table-cell table:style-name="ce12N2" office:value-type="float" office:value="779.33">
            <text:p>779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6918104450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9">
            <text:p>3090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16.24">
            <text:p>641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024.64">
            <text:p>602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226">
            <text:p>0,087</text:p>
          </table:table-cell>
          <table:table-cell table:style-name="ce12N2" office:value-type="float" office:value="18.4">
            <text:p>1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1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48.67">
            <text:p>5248,67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24">
            <text:p>4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91.6">
            <text:p>391,60</text:p>
          </table:table-cell>
          <table:table-cell table:style-name="ce12N2" office:value-type="float" office:value="6024.64">
            <text:p>6024,64</text:p>
          </table:table-cell>
          <table:table-cell table:style-name="ce12N2" office:value-type="float" office:value="240.98">
            <text:p>24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31376116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0">
            <text:p>309050</text:p>
          </table:table-cell>
          <table:table-cell table:style-name="ce0" table:number-columns-spanned="4" table:number-rows-spanned="1" office:value-type="string" calcext:value-type="string">
            <text:p>9.315 - BRASIPLA INDUSTRIA E COMERCIO LTDA</text:p>
          </table:table-cell>
          <table:covered-table-cell table:number-columns-repeated="3"/>
          <table:table-cell table:style-name="ce0" office:value-type="string" calcext:value-type="string">
            <text:p>27.6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3.04">
            <text:p>2633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3.04">
            <text:p>2633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">
            <text:p>0,720</text:p>
          </table:table-cell>
          <table:table-cell table:style-name="ce12N2" office:value-type="float" office:value="72">
            <text:p>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3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22.23">
            <text:p>2222,23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3.04">
            <text:p>2633,04</text:p>
          </table:table-cell>
          <table:table-cell table:style-name="ce12N2" office:value-type="float" office:value="184.31">
            <text:p>18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122595300011055001000027678149200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6">
            <text:p>309066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9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0">
            <text:p>70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0">
            <text:p>70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1.58">
            <text:p>5941,58</text:p>
          </table:table-cell>
          <table:table-cell table:style-name="ce12N2" office:value-type="float" office:value="5.94">
            <text:p>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47">
            <text:p>53,47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0">
            <text:p>7040,00</text:p>
          </table:table-cell>
          <table:table-cell table:style-name="ce12N2" office:value-type="float" office:value="492.8">
            <text:p>49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90801321469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7">
            <text:p>309067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2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77.36">
            <text:p>1037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5">
            <text:p>0,003</text:p>
          </table:table-cell>
          <table:table-cell table:style-name="ce12N2" office:value-type="float" office:value="350">
            <text:p>3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7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23.69">
            <text:p>8223,69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01">
            <text:p>74,01</text:p>
          </table:table-cell>
          <table:table-cell table:style-name="ce12N2" office:value-type="float" office:value="41.5">
            <text:p>4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633.36">
            <text:p>633,36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682.08">
            <text:p>6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2441137152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3">
            <text:p>309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3.3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16556">
            <text:p>0,417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6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26.6">
            <text:p>8326,60</text:p>
          </table:table-cell>
          <table:table-cell table:style-name="ce12N2" office:value-type="float" office:value="8.33">
            <text:p>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94">
            <text:p>74,9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690.61">
            <text:p>69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333416664242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7">
            <text:p>309087</text:p>
          </table:table-cell>
          <table:table-cell table:style-name="ce0" table:number-columns-spanned="4" table:number-rows-spanned="1" office:value-type="string" calcext:value-type="string">
            <text:p>38.144 - INDUSTRIA DE PLASTICOS E ACOS FARROUPILHA LTDA</text:p>
          </table:table-cell>
          <table:covered-table-cell table:number-columns-repeated="3"/>
          <table:table-cell table:style-name="ce0" office:value-type="string" calcext:value-type="string">
            <text:p>36.7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24.83">
            <text:p>1752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">
            <text:p>34,00</text:p>
          </table:table-cell>
          <table:table-cell table:style-name="ce12N2" office:value-type="float" office:value="16576.95">
            <text:p>16576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93">
            <text:p>0,063</text:p>
          </table:table-cell>
          <table:table-cell table:style-name="ce12N2" office:value-type="float" office:value="576.02">
            <text:p>57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524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80.51">
            <text:p>14880,51</text:p>
          </table:table-cell>
          <table:table-cell table:style-name="ce12N2" office:value-type="float" office:value="14.9">
            <text:p>1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94">
            <text:p>133,9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947.88">
            <text:p>947,88</text:p>
          </table:table-cell>
          <table:table-cell table:style-name="ce12N2" office:value-type="float" office:value="16576.95">
            <text:p>16576,95</text:p>
          </table:table-cell>
          <table:table-cell table:style-name="ce12N2" office:value-type="float" office:value="1056.79">
            <text:p>105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018897840001135500100003673210009099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9">
            <text:p>309089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2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61.36">
            <text:p>2256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21503.64">
            <text:p>21503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69781">
            <text:p>3,170</text:p>
          </table:table-cell>
          <table:table-cell table:style-name="ce12N2" office:value-type="float" office:value="1245.05">
            <text:p>1245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561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66.61">
            <text:p>18466,61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6.18">
            <text:p>166,18</text:p>
          </table:table-cell>
          <table:table-cell table:style-name="ce12N2" office:value-type="float" office:value="54.69">
            <text:p>54,6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1057.72">
            <text:p>1057,72</text:p>
          </table:table-cell>
          <table:table-cell table:style-name="ce12N2" office:value-type="float" office:value="20360.71">
            <text:p>20360,71</text:p>
          </table:table-cell>
          <table:table-cell table:style-name="ce12N2" office:value-type="float" office:value="1154.76">
            <text:p>115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293813194044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2">
            <text:p>309092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2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039.34">
            <text:p>126039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22072">
            <text:p>1220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697844">
            <text:p>13,698</text:p>
          </table:table-cell>
          <table:table-cell table:style-name="ce12N2" office:value-type="float" office:value="1865.95">
            <text:p>1865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.039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025.72">
            <text:p>103025,72</text:p>
          </table:table-cell>
          <table:table-cell table:style-name="ce12N2" office:value-type="float" office:value="103.03">
            <text:p>10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7.23">
            <text:p>927,23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967.34">
            <text:p>3967,34</text:p>
          </table:table-cell>
          <table:table-cell table:style-name="ce12N2" office:value-type="float" office:value="122072">
            <text:p>122072,00</text:p>
          </table:table-cell>
          <table:table-cell table:style-name="ce12N2" office:value-type="float" office:value="8545.04">
            <text:p>854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293611007793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3">
            <text:p>309093</text:p>
          </table:table-cell>
          <table:table-cell table:style-name="ce0" table:number-columns-spanned="4" table:number-rows-spanned="1" office:value-type="string" calcext:value-type="string">
            <text:p>13.198 - SDSTK INDUSTRIA E COMERCIO LTDA</text:p>
          </table:table-cell>
          <table:covered-table-cell table:number-columns-repeated="3"/>
          <table:table-cell table:style-name="ce0" office:value-type="string" calcext:value-type="string">
            <text:p>13.1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1.38">
            <text:p>54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52.8">
            <text:p>5252,80</text:p>
          </table:table-cell>
          <table:table-cell table:style-name="ce12N2" office:value-type="float" office:value="168.58">
            <text:p>168,58</text:p>
          </table:table-cell>
          <table:table-cell table:style-name="ce12N3" office:value-type="float" office:value="0.14673">
            <text:p>0,147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2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14.56">
            <text:p>5014,56</text:p>
          </table:table-cell>
          <table:table-cell table:style-name="ce12N2" office:value-type="float" office:value="5.01">
            <text:p>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14">
            <text:p>45,1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21.38">
            <text:p>5421,38</text:p>
          </table:table-cell>
          <table:table-cell table:style-name="ce12N2" office:value-type="float" office:value="216.85">
            <text:p>2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86786380001035500100001314819236660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2">
            <text:p>309102</text:p>
          </table:table-cell>
          <table:table-cell table:style-name="ce0" table:number-columns-spanned="4" table:number-rows-spanned="1" office:value-type="string" calcext:value-type="string">
            <text:p>780 - INDUSTRIA E COMERCIO RIOMAR CORDAS LTDA</text:p>
          </table:table-cell>
          <table:covered-table-cell table:number-columns-repeated="3"/>
          <table:table-cell table:style-name="ce0" office:value-type="string" calcext:value-type="string">
            <text:p>171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6856">
            <text:p>0,807</text:p>
          </table:table-cell>
          <table:table-cell table:style-name="ce12N2" office:value-type="float" office:value="1731.53">
            <text:p>173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1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59.72">
            <text:p>6659,72</text:p>
          </table:table-cell>
          <table:table-cell table:style-name="ce12N2" office:value-type="float" office:value="6.66">
            <text:p>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94">
            <text:p>59,9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554.2">
            <text:p>55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298926000103550010001713531525277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5">
            <text:p>309105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96</text:p>
          </table:table-cell>
          <table:table-cell table:style-name="ce9" office:value-type="string" calcext:value-type="string">
            <text:p>13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566.12">
            <text:p>5856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8566.12">
            <text:p>58566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27392">
            <text:p>4,927</text:p>
          </table:table-cell>
          <table:table-cell table:style-name="ce12N2" office:value-type="float" office:value="7499.94">
            <text:p>749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566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428.35">
            <text:p>49428,35</text:p>
          </table:table-cell>
          <table:table-cell table:style-name="ce12N2" office:value-type="float" office:value="49.43">
            <text:p>4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4.84">
            <text:p>444,8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566.12">
            <text:p>58566,12</text:p>
          </table:table-cell>
          <table:table-cell table:style-name="ce12N2" office:value-type="float" office:value="4099.62">
            <text:p>409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30000000961557606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3">
            <text:p>309113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4.2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7.32">
            <text:p>247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60.8">
            <text:p>24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504">
            <text:p>0,350</text:p>
          </table:table-cell>
          <table:table-cell table:style-name="ce12N2" office:value-type="float" office:value="269">
            <text:p>26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7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76.86">
            <text:p>2076,86</text:p>
          </table:table-cell>
          <table:table-cell table:style-name="ce12N2" office:value-type="float" office:value="2.07">
            <text:p>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69">
            <text:p>18,6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2460.8">
            <text:p>2460,80</text:p>
          </table:table-cell>
          <table:table-cell table:style-name="ce12N2" office:value-type="float" office:value="172.25">
            <text:p>17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681867000130550010009542871817698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1">
            <text:p>309131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7.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179.06">
            <text:p>13017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30179.06">
            <text:p>130179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8.9502">
            <text:p>208,950</text:p>
          </table:table-cell>
          <table:table-cell table:style-name="ce12N2" office:value-type="float" office:value="2286.3">
            <text:p>228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0.17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867.87">
            <text:p>109867,87</text:p>
          </table:table-cell>
          <table:table-cell table:style-name="ce12N2" office:value-type="float" office:value="109.87">
            <text:p>109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8.81">
            <text:p>988,8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179.06">
            <text:p>130179,06</text:p>
          </table:table-cell>
          <table:table-cell table:style-name="ce12N2" office:value-type="float" office:value="9112.53">
            <text:p>911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5440420001195500100047769916930532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2">
            <text:p>309132</text:p>
          </table:table-cell>
          <table:table-cell table:style-name="ce0" table:number-columns-spanned="4" table:number-rows-spanned="1" office:value-type="string" calcext:value-type="string">
            <text:p>543 - ESTEVES S/A.</text:p>
          </table:table-cell>
          <table:covered-table-cell table:number-columns-repeated="3"/>
          <table:table-cell table:style-name="ce0" office:value-type="string" calcext:value-type="string">
            <text:p>364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43.9">
            <text:p>284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54.38">
            <text:p>2754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6">
            <text:p>0,002</text:p>
          </table:table-cell>
          <table:table-cell table:style-name="ce12N2" office:value-type="float" office:value="20.34">
            <text:p>20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43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24.62">
            <text:p>2324,62</text:p>
          </table:table-cell>
          <table:table-cell table:style-name="ce12N2" office:value-type="float" office:value="2.32">
            <text:p>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92">
            <text:p>20,92</text:p>
          </table:table-cell>
          <table:table-cell table:style-name="ce12N2" office:value-type="float" office:value="41.56">
            <text:p>41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89.52">
            <text:p>89,52</text:p>
          </table:table-cell>
          <table:table-cell table:style-name="ce12N2" office:value-type="float" office:value="2754.38">
            <text:p>2754,38</text:p>
          </table:table-cell>
          <table:table-cell table:style-name="ce12N2" office:value-type="float" office:value="192.81">
            <text:p>19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837457000187550010003643311507955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4">
            <text:p>30913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1.3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3.77">
            <text:p>103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01.23">
            <text:p>1001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496">
            <text:p>0,068</text:p>
          </table:table-cell>
          <table:table-cell table:style-name="ce12N2" office:value-type="float" office:value="8.98">
            <text:p>8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3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5.01">
            <text:p>845,01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1">
            <text:p>7,6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2.54">
            <text:p>32,54</text:p>
          </table:table-cell>
          <table:table-cell table:style-name="ce12N2" office:value-type="float" office:value="1001.23">
            <text:p>1001,23</text:p>
          </table:table-cell>
          <table:table-cell table:style-name="ce12N2" office:value-type="float" office:value="70.08">
            <text:p>7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13161570383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5">
            <text:p>3091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503.43">
            <text:p>12950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129480.1">
            <text:p>12948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677488">
            <text:p>11,677</text:p>
          </table:table-cell>
          <table:table-cell table:style-name="ce12N2" office:value-type="float" office:value="3587.9">
            <text:p>358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9.50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862.14">
            <text:p>109862,14</text:p>
          </table:table-cell>
          <table:table-cell table:style-name="ce12N2" office:value-type="float" office:value="109.84">
            <text:p>10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8.76">
            <text:p>988,7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23.33">
            <text:p>23,33</text:p>
          </table:table-cell>
          <table:table-cell table:style-name="ce12N2" office:value-type="float" office:value="129480.1">
            <text:p>129480,10</text:p>
          </table:table-cell>
          <table:table-cell table:style-name="ce12N2" office:value-type="float" office:value="8419.91">
            <text:p>84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21810491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6">
            <text:p>30913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108">
            <text:p>1,051</text:p>
          </table:table-cell>
          <table:table-cell table:style-name="ce12N2" office:value-type="float" office:value="228">
            <text:p>2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5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47.85">
            <text:p>21047,85</text:p>
          </table:table-cell>
          <table:table-cell table:style-name="ce12N2" office:value-type="float" office:value="21.05">
            <text:p>2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43">
            <text:p>18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966.38">
            <text:p>96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318820766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7">
            <text:p>30913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8.81">
            <text:p>49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.11">
            <text:p>483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904">
            <text:p>0,003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.73">
            <text:p>407,73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67">
            <text:p>3,67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15.7">
            <text:p>15,70</text:p>
          </table:table-cell>
          <table:table-cell table:style-name="ce12N2" office:value-type="float" office:value="483.11">
            <text:p>483,11</text:p>
          </table:table-cell>
          <table:table-cell table:style-name="ce12N2" office:value-type="float" office:value="33.82">
            <text:p>3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291941728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9">
            <text:p>309139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2.53">
            <text:p>71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.31">
            <text:p>677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48">
            <text:p>0,018</text:p>
          </table:table-cell>
          <table:table-cell table:style-name="ce12N2" office:value-type="float" office:value="6.91">
            <text:p>6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.64">
            <text:p>571,64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5.22">
            <text:p>35,22</text:p>
          </table:table-cell>
          <table:table-cell table:style-name="ce12N2" office:value-type="float" office:value="677.31">
            <text:p>677,31</text:p>
          </table:table-cell>
          <table:table-cell table:style-name="ce12N2" office:value-type="float" office:value="47.41">
            <text:p>4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28190130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0">
            <text:p>30914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">
            <text:p>0,126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61.99">
            <text:p>37961,99</text:p>
          </table:table-cell>
          <table:table-cell table:style-name="ce12N2" office:value-type="float" office:value="37.96">
            <text:p>3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1.66">
            <text:p>341,6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3148.6">
            <text:p>314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11345831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3">
            <text:p>309143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5.06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17.3">
            <text:p>7981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817.3">
            <text:p>7981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972">
            <text:p>11,972</text:p>
          </table:table-cell>
          <table:table-cell table:style-name="ce12N2" office:value-type="float" office:value="4480.35">
            <text:p>448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817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63.8">
            <text:p>67363,80</text:p>
          </table:table-cell>
          <table:table-cell table:style-name="ce12N2" office:value-type="float" office:value="67.37">
            <text:p>6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6.28">
            <text:p>606,2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17.3">
            <text:p>79817,30</text:p>
          </table:table-cell>
          <table:table-cell table:style-name="ce12N2" office:value-type="float" office:value="5587.21">
            <text:p>558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5063185968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4">
            <text:p>309144</text:p>
          </table:table-cell>
          <table:table-cell table:style-name="ce0" table:number-columns-spanned="4" table:number-rows-spanned="1" office:value-type="string" calcext:value-type="string">
            <text:p>11.789 - POLI-FERR INDUSTRIA E COMERCIO LTDA-EPP</text:p>
          </table:table-cell>
          <table:covered-table-cell table:number-columns-repeated="3"/>
          <table:table-cell table:style-name="ce0" office:value-type="string" calcext:value-type="string">
            <text:p>12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29.62">
            <text:p>2012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9496">
            <text:p>194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12.0403">
            <text:p>412,040</text:p>
          </table:table-cell>
          <table:table-cell table:style-name="ce12N2" office:value-type="float" office:value="573.8">
            <text:p>573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12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19.67">
            <text:p>17419,67</text:p>
          </table:table-cell>
          <table:table-cell table:style-name="ce12N2" office:value-type="float" office:value="17.42">
            <text:p>1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78">
            <text:p>156,78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633.62">
            <text:p>633,62</text:p>
          </table:table-cell>
          <table:table-cell table:style-name="ce12N2" office:value-type="float" office:value="19496">
            <text:p>19496,00</text:p>
          </table:table-cell>
          <table:table-cell table:style-name="ce12N2" office:value-type="float" office:value="1364.72">
            <text:p>136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99.8">
            <text:p>59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15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2/06/2026</text:p>
          </table:table-cell>
          <table:table-cell table:style-name="ce12" office:value-type="string" calcext:value-type="string">
            <text:p>599,80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35260601115780000188550010000125401573097206</text:p>
          </table:table-cell>
          <table:table-cell table:style-name="ce0" office:value-type="string" calcext:value-type="string">
            <text:p>3526061138956500020057005000401152100087501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7">
            <text:p>3091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">
            <text:p>0,087</text:p>
          </table:table-cell>
          <table:table-cell table:style-name="ce12N2" office:value-type="float" office:value="94.5">
            <text:p>9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4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14.09">
            <text:p>13014,09</text:p>
          </table:table-cell>
          <table:table-cell table:style-name="ce12N2" office:value-type="float" office:value="13.01">
            <text:p>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.13">
            <text:p>117,1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1079.4">
            <text:p>107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319222284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8">
            <text:p>3091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6">
            <text:p>0,001</text:p>
          </table:table-cell>
          <table:table-cell table:style-name="ce12N2" office:value-type="float" office:value="33.9">
            <text:p>3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7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03.1">
            <text:p>16603,10</text:p>
          </table:table-cell>
          <table:table-cell table:style-name="ce12N2" office:value-type="float" office:value="16.6">
            <text:p>1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.43">
            <text:p>14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1377.08">
            <text:p>137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41896471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9">
            <text:p>3091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51442441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3">
            <text:p>309193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6.0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540.19">
            <text:p>45540,19</text:p>
          </table:table-cell>
          <table:table-cell table:style-name="ce12N2" office:value-type="float" office:value="2966.67">
            <text:p>2966,67</text:p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43427.11">
            <text:p>43427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90594">
            <text:p>4,091</text:p>
          </table:table-cell>
          <table:table-cell table:style-name="ce12N2" office:value-type="float" office:value="1715">
            <text:p>17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540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146.66">
            <text:p>35146,66</text:p>
          </table:table-cell>
          <table:table-cell table:style-name="ce12N2" office:value-type="float" office:value="35.15">
            <text:p>3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.32">
            <text:p>316,32</text:p>
          </table:table-cell>
          <table:table-cell table:style-name="ce12N2" office:value-type="float" office:value="78.51">
            <text:p>78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720.2">
            <text:p>3720,20</text:p>
          </table:table-cell>
          <table:table-cell table:style-name="ce12N2" office:value-type="float" office:value="40460.44">
            <text:p>40460,44</text:p>
          </table:table-cell>
          <table:table-cell table:style-name="ce12N2" office:value-type="float" office:value="1731.37">
            <text:p>173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516.52">
            <text:p>7516,52</text:p>
          </table:table-cell>
          <table:table-cell table:style-name="ce12N2" office:value-type="float" office:value="1359.55">
            <text:p>1359,55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602812352437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4">
            <text:p>309194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2.8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958.86">
            <text:p>5295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1291.85">
            <text:p>51291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2335">
            <text:p>0,532</text:p>
          </table:table-cell>
          <table:table-cell table:style-name="ce12N2" office:value-type="float" office:value="578.8">
            <text:p>57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958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289.03">
            <text:p>43289,03</text:p>
          </table:table-cell>
          <table:table-cell table:style-name="ce12N2" office:value-type="float" office:value="43.29">
            <text:p>4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9.6">
            <text:p>389,6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667.01">
            <text:p>1667,01</text:p>
          </table:table-cell>
          <table:table-cell table:style-name="ce12N2" office:value-type="float" office:value="51291.85">
            <text:p>51291,85</text:p>
          </table:table-cell>
          <table:table-cell table:style-name="ce12N2" office:value-type="float" office:value="3590.43">
            <text:p>359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69.09">
            <text:p>106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144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2/06/2026</text:p>
          </table:table-cell>
          <table:table-cell table:style-name="ce12" office:value-type="string" calcext:value-type="string">
            <text:p>1.069,09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35260660398369000800550010006028041645675538</text:p>
          </table:table-cell>
          <table:table-cell table:style-name="ce0" office:value-type="string" calcext:value-type="string">
            <text:p>3526061138956500020057005000401144100087493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5">
            <text:p>309195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9.378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9.04">
            <text:p>1499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94">
            <text:p>1424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898">
            <text:p>0,024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9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1.7">
            <text:p>1351,70</text:p>
          </table:table-cell>
          <table:table-cell table:style-name="ce12N2" office:value-type="float" office:value="1.35">
            <text:p>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17">
            <text:p>12,1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74.1">
            <text:p>74,10</text:p>
          </table:table-cell>
          <table:table-cell table:style-name="ce12N2" office:value-type="float" office:value="1046.33">
            <text:p>1046,33</text:p>
          </table:table-cell>
          <table:table-cell table:style-name="ce12N2" office:value-type="float" office:value="73.24">
            <text:p>7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8659200001005500400074937812830096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6">
            <text:p>309196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9.41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93.22">
            <text:p>2109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050.59">
            <text:p>20050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0205">
            <text:p>0,180</text:p>
          </table:table-cell>
          <table:table-cell table:style-name="ce12N2" office:value-type="float" office:value="131.97">
            <text:p>131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093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68.08">
            <text:p>17468,08</text:p>
          </table:table-cell>
          <table:table-cell table:style-name="ce12N2" office:value-type="float" office:value="17.47">
            <text:p>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7.21">
            <text:p>157,2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042.63">
            <text:p>1042,63</text:p>
          </table:table-cell>
          <table:table-cell table:style-name="ce12N2" office:value-type="float" office:value="20050.59">
            <text:p>20050,59</text:p>
          </table:table-cell>
          <table:table-cell table:style-name="ce12N2" office:value-type="float" office:value="802.02">
            <text:p>80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865920000100550040007494141653364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7">
            <text:p>309197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9.49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.99">
            <text:p>38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62.16">
            <text:p>36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26">
            <text:p>0,000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0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5.51">
            <text:p>315,51</text:p>
          </table:table-cell>
          <table:table-cell table:style-name="ce12N2" office:value-type="float" office:value="0.32">
            <text:p>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84">
            <text:p>2,8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8.83">
            <text:p>18,83</text:p>
          </table:table-cell>
          <table:table-cell table:style-name="ce12N2" office:value-type="float" office:value="362.16">
            <text:p>362,16</text:p>
          </table:table-cell>
          <table:table-cell table:style-name="ce12N2" office:value-type="float" office:value="14.49">
            <text:p>1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86592000010055004000749495168951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8">
            <text:p>309198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1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85.19">
            <text:p>9818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665668">
            <text:p>49,666</text:p>
          </table:table-cell>
          <table:table-cell table:style-name="ce12N2" office:value-type="float" office:value="5370">
            <text:p>53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18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719.97">
            <text:p>82719,97</text:p>
          </table:table-cell>
          <table:table-cell table:style-name="ce12N2" office:value-type="float" office:value="82.72">
            <text:p>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48">
            <text:p>744,4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16.29">
            <text:p>416,29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6843.83">
            <text:p>68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212211275673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9">
            <text:p>30919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96">
            <text:p>899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96">
            <text:p>89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9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92.4">
            <text:p>7592,40</text:p>
          </table:table-cell>
          <table:table-cell table:style-name="ce12N2" office:value-type="float" office:value="7.59">
            <text:p>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33">
            <text:p>68,3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96">
            <text:p>8996,00</text:p>
          </table:table-cell>
          <table:table-cell table:style-name="ce12N2" office:value-type="float" office:value="629.72">
            <text:p>62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01965533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0">
            <text:p>309200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3.4">
            <text:p>327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982.59">
            <text:p>2982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356">
            <text:p>0,054</text:p>
          </table:table-cell>
          <table:table-cell table:style-name="ce12N2" office:value-type="float" office:value="45.16">
            <text:p>4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98.42">
            <text:p>2598,42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38">
            <text:p>23,38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90.81">
            <text:p>290,81</text:p>
          </table:table-cell>
          <table:table-cell table:style-name="ce12N2" office:value-type="float" office:value="2982.59">
            <text:p>2982,59</text:p>
          </table:table-cell>
          <table:table-cell table:style-name="ce12N2" office:value-type="float" office:value="119.31">
            <text:p>11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301883343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1">
            <text:p>309201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7.7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679.1">
            <text:p>12867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28679.1">
            <text:p>12867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6134">
            <text:p>14,613</text:p>
          </table:table-cell>
          <table:table-cell table:style-name="ce12N2" office:value-type="float" office:value="2584.83">
            <text:p>2584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8.67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601.94">
            <text:p>108601,94</text:p>
          </table:table-cell>
          <table:table-cell table:style-name="ce12N2" office:value-type="float" office:value="108.6">
            <text:p>10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42">
            <text:p>977,4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679.1">
            <text:p>128679,10</text:p>
          </table:table-cell>
          <table:table-cell table:style-name="ce12N2" office:value-type="float" office:value="9007.54">
            <text:p>900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5440420001195500100047779914508816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5">
            <text:p>3092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3265.37">
            <text:p>66326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">
            <text:p>92,00</text:p>
          </table:table-cell>
          <table:table-cell table:style-name="ce12N2" office:value-type="float" office:value="657872.35">
            <text:p>657872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833163">
            <text:p>15,833</text:p>
          </table:table-cell>
          <table:table-cell table:style-name="ce12N2" office:value-type="float" office:value="3254.08">
            <text:p>325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3.265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9772.64">
            <text:p>559772,64</text:p>
          </table:table-cell>
          <table:table-cell table:style-name="ce12N2" office:value-type="float" office:value="559.79">
            <text:p>55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37.93">
            <text:p>5037,9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393.02">
            <text:p>5393,02</text:p>
          </table:table-cell>
          <table:table-cell table:style-name="ce12N2" office:value-type="float" office:value="647536.65">
            <text:p>647536,65</text:p>
          </table:table-cell>
          <table:table-cell table:style-name="ce12N2" office:value-type="float" office:value="41043">
            <text:p>4104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617401778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6">
            <text:p>30920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6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7.29">
            <text:p>2667,29</text:p>
          </table:table-cell>
          <table:table-cell table:style-name="ce12N2" office:value-type="float" office:value="127.91">
            <text:p>127,91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58.24">
            <text:p>255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1504">
            <text:p>0,915</text:p>
          </table:table-cell>
          <table:table-cell table:style-name="ce12N2" office:value-type="float" office:value="7.84">
            <text:p>7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7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7.3">
            <text:p>2117,30</text:p>
          </table:table-cell>
          <table:table-cell table:style-name="ce12N2" office:value-type="float" office:value="2.12">
            <text:p>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06">
            <text:p>19,06</text:p>
          </table:table-cell>
          <table:table-cell table:style-name="ce12N2" office:value-type="float" office:value="67.51">
            <text:p>67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36.96">
            <text:p>236,96</text:p>
          </table:table-cell>
          <table:table-cell table:style-name="ce12N2" office:value-type="float" office:value="2430.33">
            <text:p>2430,33</text:p>
          </table:table-cell>
          <table:table-cell table:style-name="ce12N2" office:value-type="float" office:value="97.21">
            <text:p>9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641313314001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1">
            <text:p>309211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56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">
            <text:p>0,000</text:p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19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519.99">
            <text:p>35519,99</text:p>
          </table:table-cell>
          <table:table-cell table:style-name="ce12N2" office:value-type="float" office:value="35.52">
            <text:p>3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9.68">
            <text:p>319,6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2673.55">
            <text:p>2673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56913116267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2">
            <text:p>309212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3.6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49.01">
            <text:p>25849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035.36">
            <text:p>25035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2">
            <text:p>1,120</text:p>
          </table:table-cell>
          <table:table-cell table:style-name="ce12N2" office:value-type="float" office:value="4.48">
            <text:p>4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849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29.21">
            <text:p>21129,21</text:p>
          </table:table-cell>
          <table:table-cell table:style-name="ce12N2" office:value-type="float" office:value="21.13">
            <text:p>2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0.16">
            <text:p>190,16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813.65">
            <text:p>813,65</text:p>
          </table:table-cell>
          <table:table-cell table:style-name="ce12N2" office:value-type="float" office:value="25035.36">
            <text:p>25035,36</text:p>
          </table:table-cell>
          <table:table-cell table:style-name="ce12N2" office:value-type="float" office:value="1752.48">
            <text:p>175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362313911720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3">
            <text:p>309213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7.9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30.54">
            <text:p>2933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330.54">
            <text:p>29330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84856">
            <text:p>5,849</text:p>
          </table:table-cell>
          <table:table-cell table:style-name="ce12N2" office:value-type="float" office:value="288">
            <text:p>28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33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754.24">
            <text:p>24754,24</text:p>
          </table:table-cell>
          <table:table-cell table:style-name="ce12N2" office:value-type="float" office:value="24.75">
            <text:p>2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.79">
            <text:p>222,7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30.54">
            <text:p>29330,54</text:p>
          </table:table-cell>
          <table:table-cell table:style-name="ce12N2" office:value-type="float" office:value="2053.14">
            <text:p>205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015548460001365500100068796719966250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6">
            <text:p>309216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21.019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0.78">
            <text:p>164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59.68">
            <text:p>155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96">
            <text:p>0,006</text:p>
          </table:table-cell>
          <table:table-cell table:style-name="ce12N2" office:value-type="float" office:value="10.26">
            <text:p>1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40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8.79">
            <text:p>1358,79</text:p>
          </table:table-cell>
          <table:table-cell table:style-name="ce12N2" office:value-type="float" office:value="1.36">
            <text:p>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3">
            <text:p>12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81.1">
            <text:p>81,10</text:p>
          </table:table-cell>
          <table:table-cell table:style-name="ce12N2" office:value-type="float" office:value="1559.68">
            <text:p>1559,68</text:p>
          </table:table-cell>
          <table:table-cell table:style-name="ce12N2" office:value-type="float" office:value="62.39">
            <text:p>6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210191431119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7">
            <text:p>309217</text:p>
          </table:table-cell>
          <table:table-cell table:style-name="ce0" table:number-columns-spanned="4" table:number-rows-spanned="1" office:value-type="string" calcext:value-type="string">
            <text:p>13.118 - FORTLEV INDUST.E COMERC. DE PLASTICOS LTDA</text:p>
          </table:table-cell>
          <table:covered-table-cell table:number-columns-repeated="3"/>
          <table:table-cell table:style-name="ce0" office:value-type="string" calcext:value-type="string">
            <text:p>255.9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215.77">
            <text:p>4021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4490.37">
            <text:p>3449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1.467992">
            <text:p>121,468</text:p>
          </table:table-cell>
          <table:table-cell table:style-name="ce12N2" office:value-type="float" office:value="1176.85">
            <text:p>1176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215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544.02">
            <text:p>27544,02</text:p>
          </table:table-cell>
          <table:table-cell table:style-name="ce12N2" office:value-type="float" office:value="27.54">
            <text:p>2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.89">
            <text:p>247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490.37">
            <text:p>34490,37</text:p>
          </table:table-cell>
          <table:table-cell table:style-name="ce12N2" office:value-type="float" office:value="4138.84">
            <text:p>413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9321.23">
            <text:p>49321,23</text:p>
          </table:table-cell>
          <table:table-cell table:style-name="ce12N2" office:value-type="float" office:value="5725.4">
            <text:p>5725,4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10921911001004550010002559491707926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8">
            <text:p>30921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6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3.96">
            <text:p>2193,96</text:p>
          </table:table-cell>
          <table:table-cell table:style-name="ce12N2" office:value-type="float" office:value="108.46">
            <text:p>108,46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69.2">
            <text:p>216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908">
            <text:p>0,109</text:p>
          </table:table-cell>
          <table:table-cell table:style-name="ce12N2" office:value-type="float" office:value="39.2">
            <text:p>3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5.31">
            <text:p>1795,31</text:p>
          </table:table-cell>
          <table:table-cell table:style-name="ce12N2" office:value-type="float" office:value="1.8">
            <text:p>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16">
            <text:p>16,16</text:p>
          </table:table-cell>
          <table:table-cell table:style-name="ce12N2" office:value-type="float" office:value="61.72">
            <text:p>61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3.22">
            <text:p>133,22</text:p>
          </table:table-cell>
          <table:table-cell table:style-name="ce12N2" office:value-type="float" office:value="2060.74">
            <text:p>2060,74</text:p>
          </table:table-cell>
          <table:table-cell table:style-name="ce12N2" office:value-type="float" office:value="82.43">
            <text:p>8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677213357516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2">
            <text:p>309222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6.9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303.56">
            <text:p>94303,56</text:p>
          </table:table-cell>
          <table:table-cell table:style-name="ce12N2" office:value-type="float" office:value="5352.99">
            <text:p>5352,99</text:p>
          </table:table-cell>
          <table:table-cell table:style-name="ce12N2" office:value-type="float" office:value="52">
            <text:p>52,00</text:p>
          </table:table-cell>
          <table:table-cell table:style-name="ce12N2" office:value-type="float" office:value="88332.75">
            <text:p>88332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447424">
            <text:p>10,447</text:p>
          </table:table-cell>
          <table:table-cell table:style-name="ce12N2" office:value-type="float" office:value="3158.95">
            <text:p>315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4.30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292.08">
            <text:p>72292,08</text:p>
          </table:table-cell>
          <table:table-cell table:style-name="ce12N2" office:value-type="float" office:value="72.32">
            <text:p>7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0.61">
            <text:p>650,61</text:p>
          </table:table-cell>
          <table:table-cell table:style-name="ce12N2" office:value-type="float" office:value="80.86">
            <text:p>80,8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7734.92">
            <text:p>7734,92</text:p>
          </table:table-cell>
          <table:table-cell table:style-name="ce12N2" office:value-type="float" office:value="82979.76">
            <text:p>82979,76</text:p>
          </table:table-cell>
          <table:table-cell table:style-name="ce12N2" office:value-type="float" office:value="3319.15">
            <text:p>3319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9841.53">
            <text:p>19841,53</text:p>
          </table:table-cell>
          <table:table-cell table:style-name="ce12N2" office:value-type="float" office:value="3588.88">
            <text:p>3588,88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695417344050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8">
            <text:p>309228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1.51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3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12.66">
            <text:p>1691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803.44">
            <text:p>16803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8816">
            <text:p>2,888</text:p>
          </table:table-cell>
          <table:table-cell table:style-name="ce12N2" office:value-type="float" office:value="14756.48">
            <text:p>1475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912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181.68">
            <text:p>14181,68</text:p>
          </table:table-cell>
          <table:table-cell table:style-name="ce12N2" office:value-type="float" office:value="14.19">
            <text:p>1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.64">
            <text:p>127,64</text:p>
          </table:table-cell>
          <table:table-cell table:style-name="ce12N2" office:value-type="float" office:value="99.88">
            <text:p>99,8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09.22">
            <text:p>109,22</text:p>
          </table:table-cell>
          <table:table-cell table:style-name="ce12N2" office:value-type="float" office:value="16803.44">
            <text:p>16803,44</text:p>
          </table:table-cell>
          <table:table-cell table:style-name="ce12N2" office:value-type="float" office:value="1176.24">
            <text:p>117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4423880000145550030012215161164283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9">
            <text:p>30922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1.51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3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371.5">
            <text:p>4237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2097.86">
            <text:p>42097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444438">
            <text:p>6,444</text:p>
          </table:table-cell>
          <table:table-cell table:style-name="ce12N2" office:value-type="float" office:value="28096.32">
            <text:p>2809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37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529.52">
            <text:p>35529,52</text:p>
          </table:table-cell>
          <table:table-cell table:style-name="ce12N2" office:value-type="float" office:value="35.52">
            <text:p>3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9.76">
            <text:p>319,76</text:p>
          </table:table-cell>
          <table:table-cell table:style-name="ce12N2" office:value-type="float" office:value="99.88">
            <text:p>99,8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73.64">
            <text:p>273,64</text:p>
          </table:table-cell>
          <table:table-cell table:style-name="ce12N2" office:value-type="float" office:value="42097.86">
            <text:p>42097,86</text:p>
          </table:table-cell>
          <table:table-cell table:style-name="ce12N2" office:value-type="float" office:value="2946.86">
            <text:p>294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4423880000145550030012215151082121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3">
            <text:p>309233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21.591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5.59">
            <text:p>985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6.87">
            <text:p>936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72">
            <text:p>0,063</text:p>
          </table:table-cell>
          <table:table-cell table:style-name="ce12N2" office:value-type="float" office:value="39.9">
            <text:p>39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5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16.21">
            <text:p>816,21</text:p>
          </table:table-cell>
          <table:table-cell table:style-name="ce12N2" office:value-type="float" office:value="0.82">
            <text:p>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35">
            <text:p>7,3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8.72">
            <text:p>48,72</text:p>
          </table:table-cell>
          <table:table-cell table:style-name="ce12N2" office:value-type="float" office:value="936.87">
            <text:p>936,87</text:p>
          </table:table-cell>
          <table:table-cell table:style-name="ce12N2" office:value-type="float" office:value="37.47">
            <text:p>3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215911469016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4">
            <text:p>309234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56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2.04">
            <text:p>127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2">
            <text:p>12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02">
            <text:p>0,007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7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9.77">
            <text:p>1039,77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6">
            <text:p>9,36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0.04">
            <text:p>40,04</text:p>
          </table:table-cell>
          <table:table-cell table:style-name="ce12N2" office:value-type="float" office:value="1232">
            <text:p>1232,00</text:p>
          </table:table-cell>
          <table:table-cell table:style-name="ce12N2" office:value-type="float" office:value="86.24">
            <text:p>8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5681518696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4">
            <text:p>30924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1.59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77.6">
            <text:p>1007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12.52">
            <text:p>1001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51546">
            <text:p>2,852</text:p>
          </table:table-cell>
          <table:table-cell table:style-name="ce12N2" office:value-type="float" office:value="9846.72">
            <text:p>9846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7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50.32">
            <text:p>8450,32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05">
            <text:p>76,05</text:p>
          </table:table-cell>
          <table:table-cell table:style-name="ce12N2" office:value-type="float" office:value="97.88">
            <text:p>97,8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65.08">
            <text:p>65,08</text:p>
          </table:table-cell>
          <table:table-cell table:style-name="ce12N2" office:value-type="float" office:value="10012.52">
            <text:p>10012,52</text:p>
          </table:table-cell>
          <table:table-cell table:style-name="ce12N2" office:value-type="float" office:value="700.88">
            <text:p>70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4423880000145550030012215981821558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8">
            <text:p>309248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17.81">
            <text:p>827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1.06342">
            <text:p>151,063</text:p>
          </table:table-cell>
          <table:table-cell table:style-name="ce12N2" office:value-type="float" office:value="6308.05">
            <text:p>630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1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514.9">
            <text:p>69514,90</text:p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62">
            <text:p>625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51.76">
            <text:p>351,76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5765.62">
            <text:p>576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21260419000152550010001468611255383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3">
            <text:p>3092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6.9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24">
            <text:p>187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24">
            <text:p>187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">
            <text:p>0,038</text:p>
          </table:table-cell>
          <table:table-cell table:style-name="ce12N2" office:value-type="float" office:value="38.5">
            <text:p>3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02.5">
            <text:p>15802,50</text:p>
          </table:table-cell>
          <table:table-cell table:style-name="ce12N2" office:value-type="float" office:value="15.8">
            <text:p>1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22">
            <text:p>142,2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24">
            <text:p>18724,00</text:p>
          </table:table-cell>
          <table:table-cell table:style-name="ce12N2" office:value-type="float" office:value="1310.68">
            <text:p>131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691418704086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5">
            <text:p>30925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2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69.81">
            <text:p>386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48">
            <text:p>37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6">
            <text:p>0,040</text:p>
          </table:table-cell>
          <table:table-cell table:style-name="ce12N2" office:value-type="float" office:value="32.8">
            <text:p>3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6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63.22">
            <text:p>3163,2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47">
            <text:p>28,4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21.81">
            <text:p>121,81</text:p>
          </table:table-cell>
          <table:table-cell table:style-name="ce12N2" office:value-type="float" office:value="3748">
            <text:p>3748,00</text:p>
          </table:table-cell>
          <table:table-cell table:style-name="ce12N2" office:value-type="float" office:value="262.36">
            <text:p>26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2510708332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6">
            <text:p>30925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3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0.44">
            <text:p>99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37.2">
            <text:p>93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29">
            <text:p>0,034</text:p>
          </table:table-cell>
          <table:table-cell table:style-name="ce12N2" office:value-type="float" office:value="10.86">
            <text:p>10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90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0.97">
            <text:p>790,97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3.24">
            <text:p>53,24</text:p>
          </table:table-cell>
          <table:table-cell table:style-name="ce12N2" office:value-type="float" office:value="937.2">
            <text:p>937,20</text:p>
          </table:table-cell>
          <table:table-cell table:style-name="ce12N2" office:value-type="float" office:value="65.6">
            <text:p>6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301887890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7">
            <text:p>30925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45">
            <text:p>39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0.1">
            <text:p>38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65">
            <text:p>0,065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.15">
            <text:p>331,15</text:p>
          </table:table-cell>
          <table:table-cell table:style-name="ce12N2" office:value-type="float" office:value="0.33">
            <text:p>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98">
            <text:p>2,9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2.35">
            <text:p>12,35</text:p>
          </table:table-cell>
          <table:table-cell table:style-name="ce12N2" office:value-type="float" office:value="380.1">
            <text:p>380,10</text:p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3419990376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8">
            <text:p>30925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3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6.91">
            <text:p>168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18">
            <text:p>161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9">
            <text:p>0,040</text:p>
          </table:table-cell>
          <table:table-cell table:style-name="ce12N2" office:value-type="float" office:value="2.74">
            <text:p>2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2.77">
            <text:p>1402,77</text:p>
          </table:table-cell>
          <table:table-cell table:style-name="ce12N2" office:value-type="float" office:value="1.4">
            <text:p>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63">
            <text:p>12,63</text:p>
          </table:table-cell>
          <table:table-cell table:style-name="ce12N2" office:value-type="float" office:value="27.71">
            <text:p>27,7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68.91">
            <text:p>68,91</text:p>
          </table:table-cell>
          <table:table-cell table:style-name="ce12N2" office:value-type="float" office:value="1618">
            <text:p>1618,00</text:p>
          </table:table-cell>
          <table:table-cell table:style-name="ce12N2" office:value-type="float" office:value="72.25">
            <text:p>7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3915384899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1">
            <text:p>309261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4.9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85.79">
            <text:p>1138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239.68">
            <text:p>1123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14124">
            <text:p>0,914</text:p>
          </table:table-cell>
          <table:table-cell table:style-name="ce12N2" office:value-type="float" office:value="673.8">
            <text:p>673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8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86.01">
            <text:p>9486,01</text:p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.37">
            <text:p>85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46.11">
            <text:p>146,11</text:p>
          </table:table-cell>
          <table:table-cell table:style-name="ce12N2" office:value-type="float" office:value="11239.68">
            <text:p>11239,68</text:p>
          </table:table-cell>
          <table:table-cell table:style-name="ce12N2" office:value-type="float" office:value="786.78">
            <text:p>78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6818670001305500100095490716417849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4">
            <text:p>30926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0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694.92">
            <text:p>18369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">
            <text:p>119,00</text:p>
          </table:table-cell>
          <table:table-cell table:style-name="ce12N2" office:value-type="float" office:value="171758.07">
            <text:p>171758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36.226182">
            <text:p>236,226</text:p>
          </table:table-cell>
          <table:table-cell table:style-name="ce12N2" office:value-type="float" office:value="1004.2">
            <text:p>1004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3.69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514.08">
            <text:p>145514,08</text:p>
          </table:table-cell>
          <table:table-cell table:style-name="ce12N2" office:value-type="float" office:value="145.51">
            <text:p>14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9.64">
            <text:p>1309,64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1936.85">
            <text:p>11936,85</text:p>
          </table:table-cell>
          <table:table-cell table:style-name="ce12N2" office:value-type="float" office:value="171758.07">
            <text:p>171758,07</text:p>
          </table:table-cell>
          <table:table-cell table:style-name="ce12N2" office:value-type="float" office:value="11411.95">
            <text:p>1141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081550885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5">
            <text:p>30926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9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5.14">
            <text:p>585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6.72">
            <text:p>566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62">
            <text:p>0,000</text:p>
          </table:table-cell>
          <table:table-cell table:style-name="ce12N2" office:value-type="float" office:value="77">
            <text:p>7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5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.29">
            <text:p>478,29</text:p>
          </table:table-cell>
          <table:table-cell table:style-name="ce12N2" office:value-type="float" office:value="0.48">
            <text:p>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8.42">
            <text:p>18,42</text:p>
          </table:table-cell>
          <table:table-cell table:style-name="ce12N2" office:value-type="float" office:value="566.72">
            <text:p>566,72</text:p>
          </table:table-cell>
          <table:table-cell table:style-name="ce12N2" office:value-type="float" office:value="39.67">
            <text:p>3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9016551935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9">
            <text:p>309269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7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29.49">
            <text:p>922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9229.49">
            <text:p>9229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57">
            <text:p>0,010</text:p>
          </table:table-cell>
          <table:table-cell table:style-name="ce12N2" office:value-type="float" office:value="9.32">
            <text:p>9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29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29.49">
            <text:p>9229,49</text:p>
          </table:table-cell>
          <table:table-cell table:style-name="ce12N2" office:value-type="float" office:value="369.17">
            <text:p>36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05104359000122550010000047451406886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78">
            <text:p>309278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7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8">
            <text:p>355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58">
            <text:p>355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24593">
            <text:p>8,246</text:p>
          </table:table-cell>
          <table:table-cell table:style-name="ce12N2" office:value-type="float" office:value="240">
            <text:p>2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5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8">
            <text:p>3558,00</text:p>
          </table:table-cell>
          <table:table-cell table:style-name="ce12N2" office:value-type="float" office:value="135.92">
            <text:p>13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7981849406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1">
            <text:p>309281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87">
            <text:p>858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587">
            <text:p>858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37648">
            <text:p>20,376</text:p>
          </table:table-cell>
          <table:table-cell table:style-name="ce12N2" office:value-type="float" office:value="628">
            <text:p>6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8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87">
            <text:p>8587,00</text:p>
          </table:table-cell>
          <table:table-cell table:style-name="ce12N2" office:value-type="float" office:value="328.02">
            <text:p>32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21606637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2">
            <text:p>309282</text:p>
          </table:table-cell>
          <table:table-cell table:style-name="ce0" table:number-columns-spanned="4" table:number-rows-spanned="1" office:value-type="string" calcext:value-type="string">
            <text:p>15.133 - JSS FERRAGENS E SERVICOS EIRELI</text:p>
          </table:table-cell>
          <table:covered-table-cell table:number-columns-repeated="3"/>
          <table:table-cell table:style-name="ce0" office:value-type="string" calcext:value-type="string">
            <text:p>7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2996">
            <text:p>0,553</text:p>
          </table:table-cell>
          <table:table-cell table:style-name="ce12N2" office:value-type="float" office:value="127.06">
            <text:p>12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6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291.9">
            <text:p>29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0703302000197550010000076251584111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3">
            <text:p>309283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255.51">
            <text:p>10725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101841.47">
            <text:p>101841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04657">
            <text:p>2,005</text:p>
          </table:table-cell>
          <table:table-cell table:style-name="ce12N2" office:value-type="float" office:value="588.37">
            <text:p>588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7.255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724.29">
            <text:p>88724,29</text:p>
          </table:table-cell>
          <table:table-cell table:style-name="ce12N2" office:value-type="float" office:value="88.7">
            <text:p>8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.53">
            <text:p>798,5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414.04">
            <text:p>5414,04</text:p>
          </table:table-cell>
          <table:table-cell table:style-name="ce12N2" office:value-type="float" office:value="101841.47">
            <text:p>101841,47</text:p>
          </table:table-cell>
          <table:table-cell table:style-name="ce12N2" office:value-type="float" office:value="4073.67">
            <text:p>407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311547439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5">
            <text:p>309285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3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3.33">
            <text:p>673,33</text:p>
          </table:table-cell>
          <table:table-cell table:style-name="ce12N2" office:value-type="float" office:value="32.29">
            <text:p>32,2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45.8">
            <text:p>64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04094">
            <text:p>8,041</text:p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3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4.49">
            <text:p>534,49</text:p>
          </table:table-cell>
          <table:table-cell table:style-name="ce12N2" office:value-type="float" office:value="0.53">
            <text:p>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48.38">
            <text:p>48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9.82">
            <text:p>59,82</text:p>
          </table:table-cell>
          <table:table-cell table:style-name="ce12N2" office:value-type="float" office:value="613.51">
            <text:p>613,51</text:p>
          </table:table-cell>
          <table:table-cell table:style-name="ce12N2" office:value-type="float" office:value="24.54">
            <text:p>2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3181135111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6">
            <text:p>309286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8.0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585.62">
            <text:p>72758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727585.62">
            <text:p>727585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48.3333">
            <text:p>548,333</text:p>
          </table:table-cell>
          <table:table-cell table:style-name="ce12N2" office:value-type="float" office:value="12373.93">
            <text:p>12373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7.58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4064.08">
            <text:p>614064,08</text:p>
          </table:table-cell>
          <table:table-cell table:style-name="ce12N2" office:value-type="float" office:value="614.06">
            <text:p>61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26.58">
            <text:p>5526,5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7585.62">
            <text:p>727585,62</text:p>
          </table:table-cell>
          <table:table-cell table:style-name="ce12N2" office:value-type="float" office:value="50930.99">
            <text:p>5093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544042000119550010004780711490599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7">
            <text:p>309287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4.33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1.6">
            <text:p>838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1.6">
            <text:p>838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6">
            <text:p>0,666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8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73.86">
            <text:p>7073,86</text:p>
          </table:table-cell>
          <table:table-cell table:style-name="ce12N2" office:value-type="float" office:value="7.07">
            <text:p>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66">
            <text:p>63,6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81.6">
            <text:p>8381,60</text:p>
          </table:table-cell>
          <table:table-cell table:style-name="ce12N2" office:value-type="float" office:value="586.71">
            <text:p>58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642862000248550020000143351371785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8">
            <text:p>309288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18.77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82.58">
            <text:p>160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15576.35">
            <text:p>15576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612">
            <text:p>0,145</text:p>
          </table:table-cell>
          <table:table-cell table:style-name="ce12N2" office:value-type="float" office:value="193.25">
            <text:p>193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46.06">
            <text:p>13146,06</text:p>
          </table:table-cell>
          <table:table-cell table:style-name="ce12N2" office:value-type="float" office:value="13.14">
            <text:p>1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.33">
            <text:p>118,33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06.23">
            <text:p>506,23</text:p>
          </table:table-cell>
          <table:table-cell table:style-name="ce12N2" office:value-type="float" office:value="15576.35">
            <text:p>15576,35</text:p>
          </table:table-cell>
          <table:table-cell table:style-name="ce12N2" office:value-type="float" office:value="1090.36">
            <text:p>109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6833740003005500300061877918891290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0">
            <text:p>3092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4.8">
            <text:p>78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4.8">
            <text:p>78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68">
            <text:p>0,000</text:p>
          </table:table-cell>
          <table:table-cell table:style-name="ce12N2" office:value-type="float" office:value="11.76">
            <text:p>1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5.6">
            <text:p>675,60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08">
            <text:p>6,0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6.28">
            <text:p>576,28</text:p>
          </table:table-cell>
          <table:table-cell table:style-name="ce12N2" office:value-type="float" office:value="40.34">
            <text:p>4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31896874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1">
            <text:p>3092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14">
            <text:p>0,049</text:p>
          </table:table-cell>
          <table:table-cell table:style-name="ce12N2" office:value-type="float" office:value="13.02">
            <text:p>1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9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3.67">
            <text:p>3283,67</text:p>
          </table:table-cell>
          <table:table-cell table:style-name="ce12N2" office:value-type="float" office:value="3.28">
            <text:p>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55">
            <text:p>29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150.77">
            <text:p>15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718724356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2">
            <text:p>3092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623">
            <text:p>0,086</text:p>
          </table:table-cell>
          <table:table-cell table:style-name="ce12N2" office:value-type="float" office:value="112.44">
            <text:p>11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870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54.01">
            <text:p>32854,01</text:p>
          </table:table-cell>
          <table:table-cell table:style-name="ce12N2" office:value-type="float" office:value="32.86">
            <text:p>3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.68">
            <text:p>295,6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2667.61">
            <text:p>266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41579617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3">
            <text:p>3092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76">
            <text:p>0,033</text:p>
          </table:table-cell>
          <table:table-cell table:style-name="ce12N2" office:value-type="float" office:value="8.68">
            <text:p>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12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9.12">
            <text:p>2189,12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">
            <text:p>19,7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100.51">
            <text:p>1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61520138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4">
            <text:p>309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6.52">
            <text:p>291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38.52">
            <text:p>2738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4">
            <text:p>0,000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6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1.24">
            <text:p>2311,24</text:p>
          </table:table-cell>
          <table:table-cell table:style-name="ce12N2" office:value-type="float" office:value="2.31">
            <text:p>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8">
            <text:p>20,80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78">
            <text:p>178,00</text:p>
          </table:table-cell>
          <table:table-cell table:style-name="ce12N2" office:value-type="float" office:value="2738.52">
            <text:p>2738,52</text:p>
          </table:table-cell>
          <table:table-cell table:style-name="ce12N2" office:value-type="float" office:value="191.7">
            <text:p>19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21439709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5">
            <text:p>309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1">
            <text:p>0,016</text:p>
          </table:table-cell>
          <table:table-cell table:style-name="ce12N2" office:value-type="float" office:value="26.09">
            <text:p>26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30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84.02">
            <text:p>7284,02</text:p>
          </table:table-cell>
          <table:table-cell table:style-name="ce12N2" office:value-type="float" office:value="7.28">
            <text:p>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56">
            <text:p>65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604.14">
            <text:p>60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51848717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6">
            <text:p>309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4">
            <text:p>39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24">
            <text:p>39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4">
            <text:p>0,001</text:p>
          </table:table-cell>
          <table:table-cell table:style-name="ce12N2" office:value-type="float" office:value="58.8">
            <text:p>5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77.99">
            <text:p>3377,99</text:p>
          </table:table-cell>
          <table:table-cell table:style-name="ce12N2" office:value-type="float" office:value="3.38">
            <text:p>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4">
            <text:p>30,4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81.39">
            <text:p>2881,39</text:p>
          </table:table-cell>
          <table:table-cell table:style-name="ce12N2" office:value-type="float" office:value="201.7">
            <text:p>20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6010058889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7">
            <text:p>3092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9616">
            <text:p>0,450</text:p>
          </table:table-cell>
          <table:table-cell table:style-name="ce12N2" office:value-type="float" office:value="212.84">
            <text:p>212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.61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316.79">
            <text:p>77316,79</text:p>
          </table:table-cell>
          <table:table-cell table:style-name="ce12N2" office:value-type="float" office:value="77.32">
            <text:p>7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5.85">
            <text:p>695,8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6412.72">
            <text:p>641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915093238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8">
            <text:p>3092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1584">
            <text:p>0,212</text:p>
          </table:table-cell>
          <table:table-cell table:style-name="ce12N2" office:value-type="float" office:value="100.16">
            <text:p>10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11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384.37">
            <text:p>36384,37</text:p>
          </table:table-cell>
          <table:table-cell table:style-name="ce12N2" office:value-type="float" office:value="36.38">
            <text:p>3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7.46">
            <text:p>327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3017.75">
            <text:p>301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6113296751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9">
            <text:p>3092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9766">
            <text:p>0,230</text:p>
          </table:table-cell>
          <table:table-cell table:style-name="ce12N2" office:value-type="float" office:value="116.53">
            <text:p>116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68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632.71">
            <text:p>24632,71</text:p>
          </table:table-cell>
          <table:table-cell table:style-name="ce12N2" office:value-type="float" office:value="24.63">
            <text:p>2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.69">
            <text:p>221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1538.41">
            <text:p>153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81792893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0">
            <text:p>309300</text:p>
          </table:table-cell>
          <table:table-cell table:style-name="ce0" table:number-columns-spanned="4" table:number-rows-spanned="1" office:value-type="string" calcext:value-type="string">
            <text:p>4.780 - BIANCO - COMERCIO ATACADISTA DE MATERIAL DE CONSTRUCAO LTDA</text:p>
          </table:table-cell>
          <table:covered-table-cell table:number-columns-repeated="3"/>
          <table:table-cell table:style-name="ce0" office:value-type="string" calcext:value-type="string">
            <text:p>557.4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986.32">
            <text:p>5098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986.32">
            <text:p>5098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721408">
            <text:p>5,721</text:p>
          </table:table-cell>
          <table:table-cell table:style-name="ce12N2" office:value-type="float" office:value="34440">
            <text:p>344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98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17.68">
            <text:p>40717,68</text:p>
          </table:table-cell>
          <table:table-cell table:style-name="ce12N2" office:value-type="float" office:value="40.72">
            <text:p>4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6.46">
            <text:p>366,4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986.32">
            <text:p>50986,32</text:p>
          </table:table-cell>
          <table:table-cell table:style-name="ce12N2" office:value-type="float" office:value="6118.36">
            <text:p>611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338.19">
            <text:p>1033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9.388</text:p>
          </table:table-cell>
          <table:table-cell table:style-name="ce0" office:value-type="string" calcext:value-type="string">
            <text:p>38.002 - TRANSPORTE MARTINS LTDA</text:p>
          </table:table-cell>
          <table:table-cell table:style-name="ce0" office:value-type="string" calcext:value-type="string">
            <text:p>16/06/2026</text:p>
          </table:table-cell>
          <table:table-cell table:style-name="ce12" office:value-type="string" calcext:value-type="string">
            <text:p>10.338,19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2260610524837000193550010005574871642384970</text:p>
          </table:table-cell>
          <table:table-cell table:style-name="ce0" office:value-type="string" calcext:value-type="string">
            <text:p>3226062874377700016557001000019388100022278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7">
            <text:p>309307</text:p>
          </table:table-cell>
          <table:table-cell table:style-name="ce0" table:number-columns-spanned="4" table:number-rows-spanned="1" office:value-type="string" calcext:value-type="string">
            <text:p>33.509 - NEIMAR ANTONIO COLPANI LTDA</text:p>
          </table:table-cell>
          <table:covered-table-cell table:number-columns-repeated="3"/>
          <table:table-cell table:style-name="ce0" office:value-type="string" calcext:value-type="string">
            <text:p>16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1.49">
            <text:p>4431,49</text:p>
          </table:table-cell>
          <table:table-cell table:style-name="ce12N2" office:value-type="float" office:value="273.96">
            <text:p>273,96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65.96">
            <text:p>456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96768">
            <text:p>1,397</text:p>
          </table:table-cell>
          <table:table-cell table:style-name="ce12N2" office:value-type="float" office:value="96">
            <text:p>9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94.55">
            <text:p>3594,55</text:p>
          </table:table-cell>
          <table:table-cell table:style-name="ce12N2" office:value-type="float" office:value="3.59">
            <text:p>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35">
            <text:p>32,3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9.49">
            <text:p>139,49</text:p>
          </table:table-cell>
          <table:table-cell table:style-name="ce12N2" office:value-type="float" office:value="4292">
            <text:p>4292,00</text:p>
          </table:table-cell>
          <table:table-cell table:style-name="ce12N2" office:value-type="float" office:value="300.44">
            <text:p>30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5081122000180550010000163861000142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8">
            <text:p>30930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5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7.56">
            <text:p>507,56</text:p>
          </table:table-cell>
          <table:table-cell table:style-name="ce12N2" office:value-type="float" office:value="33.31">
            <text:p>33,3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7.4">
            <text:p>48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7">
            <text:p>0,023</text:p>
          </table:table-cell>
          <table:table-cell table:style-name="ce12N2" office:value-type="float" office:value="7.9">
            <text:p>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7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5.6">
            <text:p>395,6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3.47">
            <text:p>53,47</text:p>
          </table:table-cell>
          <table:table-cell table:style-name="ce12N2" office:value-type="float" office:value="454.09">
            <text:p>454,09</text:p>
          </table:table-cell>
          <table:table-cell table:style-name="ce12N2" office:value-type="float" office:value="18.17">
            <text:p>1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53918671263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2">
            <text:p>309312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71.3">
            <text:p>517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171.3">
            <text:p>5171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95256">
            <text:p>9,953</text:p>
          </table:table-cell>
          <table:table-cell table:style-name="ce12N2" office:value-type="float" office:value="332">
            <text:p>33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71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71.3">
            <text:p>5171,30</text:p>
          </table:table-cell>
          <table:table-cell table:style-name="ce12N2" office:value-type="float" office:value="197.54">
            <text:p>19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3181711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7">
            <text:p>309317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74.9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763.95">
            <text:p>8976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88451.74">
            <text:p>88451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82.375338">
            <text:p>2282,375</text:p>
          </table:table-cell>
          <table:table-cell table:style-name="ce12N2" office:value-type="float" office:value="486.5">
            <text:p>48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.76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866.1">
            <text:p>74866,10</text:p>
          </table:table-cell>
          <table:table-cell table:style-name="ce12N2" office:value-type="float" office:value="74.87">
            <text:p>7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3.84">
            <text:p>673,8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12.21">
            <text:p>1312,21</text:p>
          </table:table-cell>
          <table:table-cell table:style-name="ce12N2" office:value-type="float" office:value="88451.74">
            <text:p>88451,74</text:p>
          </table:table-cell>
          <table:table-cell table:style-name="ce12N2" office:value-type="float" office:value="5955.92">
            <text:p>595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330642620002505500100027499318584132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8">
            <text:p>309318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8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82">
            <text:p>0,018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5.18">
            <text:p>1265,18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39">
            <text:p>11,3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58.09">
            <text:p>5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87111100022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3">
            <text:p>30932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1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1.65">
            <text:p>278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34.53">
            <text:p>2534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5">
            <text:p>0,080</text:p>
          </table:table-cell>
          <table:table-cell table:style-name="ce12N2" office:value-type="float" office:value="29.5">
            <text:p>2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1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9.08">
            <text:p>2139,08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25">
            <text:p>19,25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47.12">
            <text:p>247,12</text:p>
          </table:table-cell>
          <table:table-cell table:style-name="ce12N2" office:value-type="float" office:value="2534.53">
            <text:p>2534,53</text:p>
          </table:table-cell>
          <table:table-cell table:style-name="ce12N2" office:value-type="float" office:value="177.42">
            <text:p>17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14315822614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5">
            <text:p>30932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1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8.28">
            <text:p>215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01.63">
            <text:p>2001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55">
            <text:p>0,090</text:p>
          </table:table-cell>
          <table:table-cell table:style-name="ce12N2" office:value-type="float" office:value="23.35">
            <text:p>23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58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9.33">
            <text:p>1689,33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56.65">
            <text:p>156,65</text:p>
          </table:table-cell>
          <table:table-cell table:style-name="ce12N2" office:value-type="float" office:value="2001.63">
            <text:p>2001,63</text:p>
          </table:table-cell>
          <table:table-cell table:style-name="ce12N2" office:value-type="float" office:value="140.12">
            <text:p>14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14515802815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31">
            <text:p>309331</text:p>
          </table:table-cell>
          <table:table-cell table:style-name="ce0" table:number-columns-spanned="4" table:number-rows-spanned="1" office:value-type="string" calcext:value-type="string">
            <text:p>5.623 - ELGIN S/A</text:p>
          </table:table-cell>
          <table:covered-table-cell table:number-columns-repeated="3"/>
          <table:table-cell table:style-name="ce0" office:value-type="string" calcext:value-type="string">
            <text:p>649.0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4">
            <text:p>340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04">
            <text:p>34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92">
            <text:p>0,004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0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65.56">
            <text:p>2965,56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69">
            <text:p>26,69</text:p>
          </table:table-cell>
          <table:table-cell table:style-name="ce12N2" office:value-type="float" office:value="51">
            <text:p>5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04">
            <text:p>3404,00</text:p>
          </table:table-cell>
          <table:table-cell table:style-name="ce12N2" office:value-type="float" office:value="136.16">
            <text:p>13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5565780001225500100064900816964699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0">
            <text:p>30934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5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7.547153">
            <text:p>227,547</text:p>
          </table:table-cell>
          <table:table-cell table:style-name="ce12N2" office:value-type="float" office:value="765.94">
            <text:p>765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07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98.62">
            <text:p>23698,62</text:p>
          </table:table-cell>
          <table:table-cell table:style-name="ce12N2" office:value-type="float" office:value="23.7">
            <text:p>2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.29">
            <text:p>213,29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1965.58">
            <text:p>196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5915751703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1">
            <text:p>309341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4.4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9">
            <text:p>204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84.5">
            <text:p>198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68">
            <text:p>0,227</text:p>
          </table:table-cell>
          <table:table-cell table:style-name="ce12N2" office:value-type="float" office:value="46.8">
            <text:p>4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4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74.87">
            <text:p>1674,87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07">
            <text:p>15,07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64.5">
            <text:p>64,50</text:p>
          </table:table-cell>
          <table:table-cell table:style-name="ce12N2" office:value-type="float" office:value="1984.5">
            <text:p>1984,50</text:p>
          </table:table-cell>
          <table:table-cell table:style-name="ce12N2" office:value-type="float" office:value="138.92">
            <text:p>13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444610733338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2">
            <text:p>309342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4.4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6604.02">
            <text:p>16660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1359.82">
            <text:p>161359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96618">
            <text:p>26,966</text:p>
          </table:table-cell>
          <table:table-cell table:style-name="ce12N2" office:value-type="float" office:value="2451.32">
            <text:p>245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6.604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183.65">
            <text:p>136183,65</text:p>
          </table:table-cell>
          <table:table-cell table:style-name="ce12N2" office:value-type="float" office:value="136.18">
            <text:p>136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5.65">
            <text:p>1225,65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5244.2">
            <text:p>5244,20</text:p>
          </table:table-cell>
          <table:table-cell table:style-name="ce12N2" office:value-type="float" office:value="161359.82">
            <text:p>161359,82</text:p>
          </table:table-cell>
          <table:table-cell table:style-name="ce12N2" office:value-type="float" office:value="11295.19">
            <text:p>1129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44451410082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3">
            <text:p>309343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5.522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06.48">
            <text:p>720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79.64">
            <text:p>6979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807">
            <text:p>1,658</text:p>
          </table:table-cell>
          <table:table-cell table:style-name="ce12N2" office:value-type="float" office:value="935.12">
            <text:p>935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0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73.93">
            <text:p>5573,93</text:p>
          </table:table-cell>
          <table:table-cell table:style-name="ce12N2" office:value-type="float" office:value="5.57">
            <text:p>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.16">
            <text:p>50,1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226.84">
            <text:p>226,84</text:p>
          </table:table-cell>
          <table:table-cell table:style-name="ce12N2" office:value-type="float" office:value="6979.64">
            <text:p>6979,64</text:p>
          </table:table-cell>
          <table:table-cell table:style-name="ce12N2" office:value-type="float" office:value="837.56">
            <text:p>83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30817040022105501800008552217768880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5">
            <text:p>309345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90948">
            <text:p>5,191</text:p>
          </table:table-cell>
          <table:table-cell table:style-name="ce12N2" office:value-type="float" office:value="473.37">
            <text:p>473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65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19.47">
            <text:p>47819,47</text:p>
          </table:table-cell>
          <table:table-cell table:style-name="ce12N2" office:value-type="float" office:value="47.82">
            <text:p>4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0.38">
            <text:p>430,38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3966.19">
            <text:p>396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631990171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0">
            <text:p>309390</text:p>
          </table:table-cell>
          <table:table-cell table:style-name="ce0" table:number-columns-spanned="4" table:number-rows-spanned="1" office:value-type="string" calcext:value-type="string">
            <text:p>1.670 - ARQUA IND. BRASILEIRA DE MANGUEIRAS E TERMOPLASTICOS LTDA</text:p>
          </table:table-cell>
          <table:covered-table-cell table:number-columns-repeated="3"/>
          <table:table-cell table:style-name="ce0" office:value-type="string" calcext:value-type="string">
            <text:p>17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30.63">
            <text:p>17630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7075.67">
            <text:p>17075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60258">
            <text:p>0,960</text:p>
          </table:table-cell>
          <table:table-cell table:style-name="ce12N2" office:value-type="float" office:value="660.09">
            <text:p>660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30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11.43">
            <text:p>14411,43</text:p>
          </table:table-cell>
          <table:table-cell table:style-name="ce12N2" office:value-type="float" office:value="14.41">
            <text:p>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7">
            <text:p>129,7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554.96">
            <text:p>554,96</text:p>
          </table:table-cell>
          <table:table-cell table:style-name="ce12N2" office:value-type="float" office:value="17075.67">
            <text:p>17075,67</text:p>
          </table:table-cell>
          <table:table-cell table:style-name="ce12N2" office:value-type="float" office:value="1195.3">
            <text:p>119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81333150001195500100001754014402378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2">
            <text:p>309392</text:p>
          </table:table-cell>
          <table:table-cell table:style-name="ce0" table:number-columns-spanned="4" table:number-rows-spanned="1" office:value-type="string" calcext:value-type="string">
            <text:p>9.951 - QUALITRONIX TECNOLOGIA LTDA</text:p>
          </table:table-cell>
          <table:covered-table-cell table:number-columns-repeated="3"/>
          <table:table-cell table:style-name="ce0" office:value-type="string" calcext:value-type="string">
            <text:p>131.15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9.58">
            <text:p>8439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136.14">
            <text:p>813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37198">
            <text:p>45,372</text:p>
          </table:table-cell>
          <table:table-cell table:style-name="ce12N2" office:value-type="float" office:value="68.97">
            <text:p>68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9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.43">
            <text:p>7290,43</text:p>
          </table:table-cell>
          <table:table-cell table:style-name="ce12N2" office:value-type="float" office:value="7.29">
            <text:p>7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61">
            <text:p>65,61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303.44">
            <text:p>303,44</text:p>
          </table:table-cell>
          <table:table-cell table:style-name="ce12N2" office:value-type="float" office:value="8136.14">
            <text:p>8136,14</text:p>
          </table:table-cell>
          <table:table-cell table:style-name="ce12N2" office:value-type="float" office:value="569.53">
            <text:p>56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2803462000172550030001311531226243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3">
            <text:p>309393</text:p>
          </table:table-cell>
          <table:table-cell table:style-name="ce0" table:number-columns-spanned="4" table:number-rows-spanned="1" office:value-type="string" calcext:value-type="string">
            <text:p>8.415 - SIMAPPEL SIMAO PEREIRA IND COM DE PAPEIS LTDA</text:p>
          </table:table-cell>
          <table:covered-table-cell table:number-columns-repeated="3"/>
          <table:table-cell table:style-name="ce0" office:value-type="string" calcext:value-type="string">
            <text:p>21.1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111.35">
            <text:p>7211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841.5">
            <text:p>6984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29.45569">
            <text:p>2029,456</text:p>
          </table:table-cell>
          <table:table-cell table:style-name="ce12N2" office:value-type="float" office:value="13830">
            <text:p>138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.111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581.82">
            <text:p>62581,82</text:p>
          </table:table-cell>
          <table:table-cell table:style-name="ce12N2" office:value-type="float" office:value="62.58">
            <text:p>6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3.24">
            <text:p>563,2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2269.85">
            <text:p>2269,85</text:p>
          </table:table-cell>
          <table:table-cell table:style-name="ce12N2" office:value-type="float" office:value="69841.5">
            <text:p>69841,50</text:p>
          </table:table-cell>
          <table:table-cell table:style-name="ce12N2" office:value-type="float" office:value="4888.91">
            <text:p>488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36317640001735500100002118818883776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4">
            <text:p>309394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3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7.99">
            <text:p>200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7.99">
            <text:p>200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">
            <text:p>0,011</text:p>
          </table:table-cell>
          <table:table-cell table:style-name="ce12N2" office:value-type="float" office:value="0.15">
            <text:p>0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4.14">
            <text:p>1794,14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14">
            <text:p>16,1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7.99">
            <text:p>2007,99</text:p>
          </table:table-cell>
          <table:table-cell table:style-name="ce12N2" office:value-type="float" office:value="140.56">
            <text:p>14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3576045000150550010000053221001921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6">
            <text:p>30939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5.7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8.16">
            <text:p>569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18.8">
            <text:p>551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9732">
            <text:p>0,697</text:p>
          </table:table-cell>
          <table:table-cell table:style-name="ce12N2" office:value-type="float" office:value="117">
            <text:p>1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98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18.8">
            <text:p>5518,80</text:p>
          </table:table-cell>
          <table:table-cell table:style-name="ce12N2" office:value-type="float" office:value="5.52">
            <text:p>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67">
            <text:p>49,6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179.36">
            <text:p>179,36</text:p>
          </table:table-cell>
          <table:table-cell table:style-name="ce12N2" office:value-type="float" office:value="5518.8">
            <text:p>5518,80</text:p>
          </table:table-cell>
          <table:table-cell table:style-name="ce12N2" office:value-type="float" office:value="386.32">
            <text:p>38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5094003000155550010001857201114655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06">
            <text:p>309406</text:p>
          </table:table-cell>
          <table:table-cell table:style-name="ce0" table:number-columns-spanned="4" table:number-rows-spanned="1" office:value-type="string" calcext:value-type="string">
            <text:p>27.064 - LINNI INDUSTRIA DE ARTEFATOS DE ALUMINIO LTDA</text:p>
          </table:table-cell>
          <table:covered-table-cell table:number-columns-repeated="3"/>
          <table:table-cell table:style-name="ce0" office:value-type="string" calcext:value-type="string">
            <text:p>3.7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38">
            <text:p>793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38">
            <text:p>79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0">
            <text:p>200,0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38">
            <text:p>7938,00</text:p>
          </table:table-cell>
          <table:table-cell table:style-name="ce12N2" office:value-type="float" office:value="1587.6">
            <text:p>15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39982555000111550010000037421144289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46">
            <text:p>146,00</text:p>
          </table:table-cell>
          <table:table-cell table:style-name="ce26N2" office:value-type="float" office:value="8895.59">
            <text:p>8895,59</text:p>
          </table:table-cell>
          <table:table-cell table:style-name="ce26N2" office:value-type="float" office:value="168.58">
            <text:p>168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6043.54">
            <text:p>66043,54</text:p>
          </table:table-cell>
          <table:table-cell table:style-name="ce26N2" office:value-type="float" office:value="5159668.6">
            <text:p>5159668,60</text:p>
          </table:table-cell>
          <table:table-cell table:style-name="ce26N2" office:value-type="float" office:value="346077.15">
            <text:p>346077,1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007.08">
            <text:p>12007,08</text:p>
          </table:table-cell>
          <table:table-cell table:style-name="ce26N2" office:value-type="float" office:value="5320707.43">
            <text:p>5320707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6679.28">
            <text:p>76679,28</text:p>
          </table:table-cell>
          <table:table-cell table:style-name="ce26N2" office:value-type="float" office:value="10673.83">
            <text:p>10673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6854.984439">
            <text:p>6854,984</text:p>
          </table:table-cell>
          <table:table-cell table:style-name="ce26N2" office:value-type="float" office:value="5252717.07">
            <text:p>5252717,07</text:p>
          </table:table-cell>
          <table:table-cell table:style-name="ce26N2" office:value-type="float" office:value="5320707.43">
            <text:p>5320707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384775.6">
            <text:p>4384775,60</text:p>
          </table:table-cell>
          <table:table-cell table:style-name="ce26N2" office:value-type="float" office:value="4384.84">
            <text:p>4384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9462.97">
            <text:p>39462,97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35139.06">
            <text:p>335139,0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8.75">
            <text:p>48,7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798" meta:object-count="0"/>
    <meta:generator>LibreOffice/4.3.0.4$Windows_x86 LibreOffice_project/62ad5818884a2fc2e5780dd45466868d41009ec0</meta:generator>
  </office:meta>
</office:document-meta>
</file>