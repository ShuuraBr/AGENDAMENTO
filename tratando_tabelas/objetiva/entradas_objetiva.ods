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6">
            <text:p>309956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40.03">
            <text:p>22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21409">
            <text:p>2,221</text:p>
          </table:table-cell>
          <table:table-cell table:style-name="ce12N2" office:value-type="float" office:value="25919.97">
            <text:p>25919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8.07">
            <text:p>19068,07</text:p>
          </table:table-cell>
          <table:table-cell table:style-name="ce12N2" office:value-type="float" office:value="19.07">
            <text:p>1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.61">
            <text:p>171,61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6.86">
            <text:p>146,86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1581.52">
            <text:p>158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211818219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9">
            <text:p>3099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62.36">
            <text:p>107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47602">
            <text:p>3,348</text:p>
          </table:table-cell>
          <table:table-cell table:style-name="ce12N2" office:value-type="float" office:value="7680">
            <text:p>7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6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24.51">
            <text:p>9024,51</text:p>
          </table:table-cell>
          <table:table-cell table:style-name="ce12N2" office:value-type="float" office:value="9.02">
            <text:p>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22">
            <text:p>81,2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516143875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1">
            <text:p>3099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2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4.38">
            <text:p>1664,38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138.05">
            <text:p>13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11118983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2">
            <text:p>3099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">
            <text:p>0,033</text:p>
          </table:table-cell>
          <table:table-cell table:style-name="ce12N2" office:value-type="float" office:value="18.15">
            <text:p>1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1.03">
            <text:p>6691,03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2">
            <text:p>60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3991705019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3">
            <text:p>3099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">
            <text:p>0,008</text:p>
          </table:table-cell>
          <table:table-cell table:style-name="ce12N2" office:value-type="float" office:value="160">
            <text:p>1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37.33">
            <text:p>20937,33</text:p>
          </table:table-cell>
          <table:table-cell table:style-name="ce12N2" office:value-type="float" office:value="20.94">
            <text:p>2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44">
            <text:p>188,4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1736.56">
            <text:p>17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41835592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4">
            <text:p>309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464">
            <text:p>0,107</text:p>
          </table:table-cell>
          <table:table-cell table:style-name="ce12N2" office:value-type="float" office:value="32.36">
            <text:p>3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2.72">
            <text:p>8602,7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3">
            <text:p>77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394.98">
            <text:p>3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31033592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5">
            <text:p>3099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8">
            <text:p>0,150</text:p>
          </table:table-cell>
          <table:table-cell table:style-name="ce12N2" office:value-type="float" office:value="122.31">
            <text:p>122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07.25">
            <text:p>38807,25</text:p>
          </table:table-cell>
          <table:table-cell table:style-name="ce12N2" office:value-type="float" office:value="38.81">
            <text:p>3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27">
            <text:p>349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1959.79">
            <text:p>1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21380843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6">
            <text:p>3099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712">
            <text:p>0,021</text:p>
          </table:table-cell>
          <table:table-cell table:style-name="ce12N2" office:value-type="float" office:value="25.16">
            <text:p>2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16.72">
            <text:p>11916,72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26">
            <text:p>107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608.76">
            <text:p>60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01789689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7">
            <text:p>3099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32">
            <text:p>0,144</text:p>
          </table:table-cell>
          <table:table-cell table:style-name="ce12N2" office:value-type="float" office:value="45.26">
            <text:p>4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7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89.46">
            <text:p>14089,46</text:p>
          </table:table-cell>
          <table:table-cell table:style-name="ce12N2" office:value-type="float" office:value="14.09">
            <text:p>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81">
            <text:p>126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646.9">
            <text:p>64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11898328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8">
            <text:p>3099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5.6">
            <text:p>219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.94">
            <text:p>1739,94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4">
            <text:p>134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144.31">
            <text:p>14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0149330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9">
            <text:p>3099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8">
            <text:p>0,008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27.13">
            <text:p>8727,13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5">
            <text:p>78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400.68">
            <text:p>40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2172440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3">
            <text:p>3100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76">
            <text:p>0,015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3.23">
            <text:p>863,23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77">
            <text:p>7,7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61355438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7">
            <text:p>31006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495.32">
            <text:p>194495,32</text:p>
          </table:table-cell>
          <table:table-cell table:style-name="ce12N2" office:value-type="float" office:value="11142.22">
            <text:p>11142,22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83913.02">
            <text:p>183913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778354">
            <text:p>15,778</text:p>
          </table:table-cell>
          <table:table-cell table:style-name="ce12N2" office:value-type="float" office:value="10538.26">
            <text:p>1053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.49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517.9">
            <text:p>150517,90</text:p>
          </table:table-cell>
          <table:table-cell table:style-name="ce12N2" office:value-type="float" office:value="150.54">
            <text:p>15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4.63">
            <text:p>1354,63</text:p>
          </table:table-cell>
          <table:table-cell table:style-name="ce12N2" office:value-type="float" office:value="81.51">
            <text:p>81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7526.22">
            <text:p>17526,22</text:p>
          </table:table-cell>
          <table:table-cell table:style-name="ce12N2" office:value-type="float" office:value="172770.8">
            <text:p>172770,80</text:p>
          </table:table-cell>
          <table:table-cell table:style-name="ce12N2" office:value-type="float" office:value="6910.83">
            <text:p>691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210.94">
            <text:p>23210,94</text:p>
          </table:table-cell>
          <table:table-cell table:style-name="ce12N2" office:value-type="float" office:value="4198.3">
            <text:p>419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2791774130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1">
            <text:p>31009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63925">
            <text:p>41,639</text:p>
          </table:table-cell>
          <table:table-cell table:style-name="ce12N2" office:value-type="float" office:value="84">
            <text:p>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5.4">
            <text:p>2885,40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7">
            <text:p>25,9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240.03">
            <text:p>2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841442548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2">
            <text:p>31009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">
            <text:p>0,140</text:p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8">
            <text:p>808,00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881967211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3">
            <text:p>31009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04">
            <text:p>0,504</text:p>
          </table:table-cell>
          <table:table-cell table:style-name="ce12N2" office:value-type="float" office:value="32.27">
            <text:p>32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.56">
            <text:p>1906,56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158.17">
            <text:p>15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921297706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5">
            <text:p>31009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8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1">
            <text:p>0,408</text:p>
          </table:table-cell>
          <table:table-cell table:style-name="ce12N2" office:value-type="float" office:value="91.81">
            <text:p>91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0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31.7">
            <text:p>7431,70</text:p>
          </table:table-cell>
          <table:table-cell table:style-name="ce12N2" office:value-type="float" office:value="7.44">
            <text:p>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88">
            <text:p>66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616.36">
            <text:p>61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84417292165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6">
            <text:p>31009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8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527">
            <text:p>0,895</text:p>
          </table:table-cell>
          <table:table-cell table:style-name="ce12N2" office:value-type="float" office:value="200.91">
            <text:p>200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9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47.4">
            <text:p>14347,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13">
            <text:p>129,1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1189.92">
            <text:p>118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8921199550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3">
            <text:p>310103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4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1">
            <text:p>0,171</text:p>
          </table:table-cell>
          <table:table-cell table:style-name="ce12N2" office:value-type="float" office:value="314.64">
            <text:p>314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12.27">
            <text:p>4612,27</text:p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211.77">
            <text:p>21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064838016560550010005340961175157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4">
            <text:p>3101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8599">
            <text:p>2,286</text:p>
          </table:table-cell>
          <table:table-cell table:style-name="ce12N2" office:value-type="float" office:value="494.04">
            <text:p>49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2.81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52.94">
            <text:p>103652,94</text:p>
          </table:table-cell>
          <table:table-cell table:style-name="ce12N2" office:value-type="float" office:value="103.65">
            <text:p>10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2.88">
            <text:p>932,8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8597.06">
            <text:p>859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71399133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5">
            <text:p>3101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8">
            <text:p>0,122</text:p>
          </table:table-cell>
          <table:table-cell table:style-name="ce12N2" office:value-type="float" office:value="130.2">
            <text:p>13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43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48.09">
            <text:p>59448,09</text:p>
          </table:table-cell>
          <table:table-cell table:style-name="ce12N2" office:value-type="float" office:value="59.45">
            <text:p>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5.03">
            <text:p>535,0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4930.67">
            <text:p>493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810765343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6">
            <text:p>3101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77.76">
            <text:p>3667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887.2">
            <text:p>358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4">
            <text:p>0,155</text:p>
          </table:table-cell>
          <table:table-cell table:style-name="ce12N2" office:value-type="float" office:value="80.52">
            <text:p>80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7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64.93">
            <text:p>31264,93</text:p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38">
            <text:p>281,3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790.56">
            <text:p>790,56</text:p>
          </table:table-cell>
          <table:table-cell table:style-name="ce12N2" office:value-type="float" office:value="35887.2">
            <text:p>35887,20</text:p>
          </table:table-cell>
          <table:table-cell table:style-name="ce12N2" office:value-type="float" office:value="1435.49">
            <text:p>143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91839726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7">
            <text:p>3101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2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584.96">
            <text:p>7258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794.4">
            <text:p>717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44">
            <text:p>0,141</text:p>
          </table:table-cell>
          <table:table-cell table:style-name="ce12N2" office:value-type="float" office:value="524.8">
            <text:p>5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.58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23.8">
            <text:p>60923,80</text:p>
          </table:table-cell>
          <table:table-cell table:style-name="ce12N2" office:value-type="float" office:value="60.93">
            <text:p>6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.31">
            <text:p>548,3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790.56">
            <text:p>790,56</text:p>
          </table:table-cell>
          <table:table-cell table:style-name="ce12N2" office:value-type="float" office:value="71794.4">
            <text:p>71794,40</text:p>
          </table:table-cell>
          <table:table-cell table:style-name="ce12N2" office:value-type="float" office:value="4660.74">
            <text:p>466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200144834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0">
            <text:p>31012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120.93">
            <text:p>165120,93</text:p>
          </table:table-cell>
          <table:table-cell table:style-name="ce12N2" office:value-type="float" office:value="9999.98">
            <text:p>9999,98</text:p>
          </table:table-cell>
          <table:table-cell table:style-name="ce12N2" office:value-type="float" office:value="93">
            <text:p>93,00</text:p>
          </table:table-cell>
          <table:table-cell table:style-name="ce12N2" office:value-type="float" office:value="155417.94">
            <text:p>155417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191065">
            <text:p>18,191</text:p>
          </table:table-cell>
          <table:table-cell table:style-name="ce12N2" office:value-type="float" office:value="8053.66">
            <text:p>805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5.12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678.95">
            <text:p>126678,95</text:p>
          </table:table-cell>
          <table:table-cell table:style-name="ce12N2" office:value-type="float" office:value="126.65">
            <text:p>12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0.1">
            <text:p>1140,10</text:p>
          </table:table-cell>
          <table:table-cell table:style-name="ce12N2" office:value-type="float" office:value="79">
            <text:p>7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3816.99">
            <text:p>13816,99</text:p>
          </table:table-cell>
          <table:table-cell table:style-name="ce12N2" office:value-type="float" office:value="145417.96">
            <text:p>145417,96</text:p>
          </table:table-cell>
          <table:table-cell table:style-name="ce12N2" office:value-type="float" office:value="5826.78">
            <text:p>582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2541.6">
            <text:p>32541,60</text:p>
          </table:table-cell>
          <table:table-cell table:style-name="ce12N2" office:value-type="float" office:value="5885.98">
            <text:p>5885,9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8174538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7">
            <text:p>310127</text:p>
          </table:table-cell>
          <table:table-cell table:style-name="ce0" table:number-columns-spanned="4" table:number-rows-spanned="1" office:value-type="string" calcext:value-type="string">
            <text:p>670 - INDUSTRIA DE FORJADOS SAO ROMAO LTDA</text:p>
          </table:table-cell>
          <table:covered-table-cell table:number-columns-repeated="3"/>
          <table:table-cell table:style-name="ce0" office:value-type="string" calcext:value-type="string">
            <text:p>58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81.97">
            <text:p>1068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0359.9">
            <text:p>1035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3968">
            <text:p>0,284</text:p>
          </table:table-cell>
          <table:table-cell table:style-name="ce12N2" office:value-type="float" office:value="575.61">
            <text:p>575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81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70.77">
            <text:p>9370,77</text:p>
          </table:table-cell>
          <table:table-cell table:style-name="ce12N2" office:value-type="float" office:value="9.37">
            <text:p>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34">
            <text:p>84,3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22.07">
            <text:p>322,07</text:p>
          </table:table-cell>
          <table:table-cell table:style-name="ce12N2" office:value-type="float" office:value="8728.37">
            <text:p>8728,37</text:p>
          </table:table-cell>
          <table:table-cell table:style-name="ce12N2" office:value-type="float" office:value="610.99">
            <text:p>61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67258480001185500100005859510000000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8">
            <text:p>310128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3.74">
            <text:p>610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11.61">
            <text:p>591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29767">
            <text:p>1,230</text:p>
          </table:table-cell>
          <table:table-cell table:style-name="ce12N2" office:value-type="float" office:value="232.54">
            <text:p>23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03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89.26">
            <text:p>4989,26</text:p>
          </table:table-cell>
          <table:table-cell table:style-name="ce12N2" office:value-type="float" office:value="4.99">
            <text:p>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">
            <text:p>44,9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92.13">
            <text:p>192,13</text:p>
          </table:table-cell>
          <table:table-cell table:style-name="ce12N2" office:value-type="float" office:value="5911.61">
            <text:p>5911,61</text:p>
          </table:table-cell>
          <table:table-cell table:style-name="ce12N2" office:value-type="float" office:value="413.81">
            <text:p>41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886740800003735500100000633515751138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7">
            <text:p>31017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37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100.33">
            <text:p>6110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58758.63">
            <text:p>5875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14225">
            <text:p>1,414</text:p>
          </table:table-cell>
          <table:table-cell table:style-name="ce12N2" office:value-type="float" office:value="515.37">
            <text:p>515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10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44.18">
            <text:p>50844,18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6">
            <text:p>457,60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341.7">
            <text:p>2341,70</text:p>
          </table:table-cell>
          <table:table-cell table:style-name="ce12N2" office:value-type="float" office:value="53018.85">
            <text:p>53018,85</text:p>
          </table:table-cell>
          <table:table-cell table:style-name="ce12N2" office:value-type="float" office:value="2731.98">
            <text:p>273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3757425292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1">
            <text:p>310191</text:p>
          </table:table-cell>
          <table:table-cell table:style-name="ce0" table:number-columns-spanned="4" table:number-rows-spanned="1" office:value-type="string" calcext:value-type="string">
            <text:p>23.993 - KARCHER INDUSTRIA E COMERCIO LIMITADA</text:p>
          </table:table-cell>
          <table:covered-table-cell table:number-columns-repeated="3"/>
          <table:table-cell table:style-name="ce0" office:value-type="string" calcext:value-type="string">
            <text:p>1.632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3.25">
            <text:p>864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578.44">
            <text:p>85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27052">
            <text:p>1,027</text:p>
          </table:table-cell>
          <table:table-cell table:style-name="ce12N2" office:value-type="float" office:value="163.3">
            <text:p>16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39.99">
            <text:p>7239,99</text:p>
          </table:table-cell>
          <table:table-cell table:style-name="ce12N2" office:value-type="float" office:value="7.24">
            <text:p>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15">
            <text:p>65,15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8578.44">
            <text:p>8578,44</text:p>
          </table:table-cell>
          <table:table-cell table:style-name="ce12N2" office:value-type="float" office:value="600.49">
            <text:p>60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40.22">
            <text:p>340,22</text:p>
          </table:table-cell>
          <table:table-cell table:style-name="ce12N2" office:value-type="float" office:value="52.81">
            <text:p>52,8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71109600001785500100163288417686378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5">
            <text:p>310195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6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8.09">
            <text:p>86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1537">
            <text:p>0,722</text:p>
          </table:table-cell>
          <table:table-cell table:style-name="ce12N2" office:value-type="float" office:value="134.57">
            <text:p>13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1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8.35">
            <text:p>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11">
            <text:p>75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73.52">
            <text:p>273,52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464.98">
            <text:p>46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65531457323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7">
            <text:p>31019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50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20.84">
            <text:p>2292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1977.47">
            <text:p>21977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73773">
            <text:p>1,374</text:p>
          </table:table-cell>
          <table:table-cell table:style-name="ce12N2" office:value-type="float" office:value="101.63">
            <text:p>10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92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46.37">
            <text:p>19046,37</text:p>
          </table:table-cell>
          <table:table-cell table:style-name="ce12N2" office:value-type="float" office:value="19.05">
            <text:p>1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.41">
            <text:p>171,41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943.37">
            <text:p>943,37</text:p>
          </table:table-cell>
          <table:table-cell table:style-name="ce12N2" office:value-type="float" office:value="21594.85">
            <text:p>21594,85</text:p>
          </table:table-cell>
          <table:table-cell table:style-name="ce12N2" office:value-type="float" office:value="989.74">
            <text:p>98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5011561092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4">
            <text:p>310204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2.151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72">
            <text:p>0,133</text:p>
          </table:table-cell>
          <table:table-cell table:style-name="ce12N2" office:value-type="float" office:value="89.76">
            <text:p>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6">
            <text:p>1753,60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80.51">
            <text:p>8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813650400010755024000022151117963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6">
            <text:p>31020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9.2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452.81">
            <text:p>1444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39905.87">
            <text:p>139905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124165">
            <text:p>21,124</text:p>
          </table:table-cell>
          <table:table-cell table:style-name="ce12N2" office:value-type="float" office:value="2946.85">
            <text:p>2946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452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077.07">
            <text:p>118077,07</text:p>
          </table:table-cell>
          <table:table-cell table:style-name="ce12N2" office:value-type="float" office:value="118.09">
            <text:p>1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.68">
            <text:p>1062,68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546.94">
            <text:p>4546,94</text:p>
          </table:table-cell>
          <table:table-cell table:style-name="ce12N2" office:value-type="float" office:value="139905.87">
            <text:p>139905,87</text:p>
          </table:table-cell>
          <table:table-cell table:style-name="ce12N2" office:value-type="float" office:value="9793.41">
            <text:p>97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92771587449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9">
            <text:p>310209</text:p>
          </table:table-cell>
          <table:table-cell table:style-name="ce0" table:number-columns-spanned="4" table:number-rows-spanned="1" office:value-type="string" calcext:value-type="string">
            <text:p>8.501 - WAGO ELETROELETRONICOS LTDA</text:p>
          </table:table-cell>
          <table:covered-table-cell table:number-columns-repeated="3"/>
          <table:table-cell table:style-name="ce0" office:value-type="string" calcext:value-type="string">
            <text:p>231.5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74.77">
            <text:p>4777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3530.55">
            <text:p>43530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355">
            <text:p>1,644</text:p>
          </table:table-cell>
          <table:table-cell table:style-name="ce12N2" office:value-type="float" office:value="214.75">
            <text:p>214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77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23.81">
            <text:p>37923,81</text:p>
          </table:table-cell>
          <table:table-cell table:style-name="ce12N2" office:value-type="float" office:value="37.92">
            <text:p>3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31">
            <text:p>341,3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244.22">
            <text:p>4244,22</text:p>
          </table:table-cell>
          <table:table-cell table:style-name="ce12N2" office:value-type="float" office:value="43530.55">
            <text:p>43530,55</text:p>
          </table:table-cell>
          <table:table-cell table:style-name="ce12N2" office:value-type="float" office:value="1741.23">
            <text:p>174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38482700019555003000231504169899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6">
            <text:p>310216</text:p>
          </table:table-cell>
          <table:table-cell table:style-name="ce0" table:number-columns-spanned="4" table:number-rows-spanned="1" office:value-type="string" calcext:value-type="string">
            <text:p>25.125 - ASTOPEL EMBALAGENS LTDA</text:p>
          </table:table-cell>
          <table:covered-table-cell table:number-columns-repeated="3"/>
          <table:table-cell table:style-name="ce0" office:value-type="string" calcext:value-type="string">
            <text:p>12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">
            <text:p>9,000</text:p>
          </table:table-cell>
          <table:table-cell table:style-name="ce12N2" office:value-type="float" office:value="10000">
            <text:p>1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0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971.19">
            <text:p>51971,19</text:p>
          </table:table-cell>
          <table:table-cell table:style-name="ce12N2" office:value-type="float" office:value="51.97">
            <text:p>5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.74">
            <text:p>467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4060">
            <text:p>4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297179000103550010000122831213010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7">
            <text:p>31021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1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6734">
            <text:p>7,673</text:p>
          </table:table-cell>
          <table:table-cell table:style-name="ce12N2" office:value-type="float" office:value="5390.55">
            <text:p>5390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44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10.36">
            <text:p>37510,36</text:p>
          </table:table-cell>
          <table:table-cell table:style-name="ce12N2" office:value-type="float" office:value="37.5">
            <text:p>3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6">
            <text:p>337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3111.14">
            <text:p>31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111757384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8">
            <text:p>3102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35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9">
            <text:p>0,397</text:p>
          </table:table-cell>
          <table:table-cell table:style-name="ce12N2" office:value-type="float" office:value="347.67">
            <text:p>34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1.09">
            <text:p>2481,09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3">
            <text:p>22,3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205.78">
            <text:p>20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351433429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9">
            <text:p>310219</text:p>
          </table:table-cell>
          <table:table-cell table:style-name="ce0" table:number-columns-spanned="4" table:number-rows-spanned="1" office:value-type="string" calcext:value-type="string">
            <text:p>17.073 - INFINITY C.IMP.E EXP.DE EQUIP. DE SEGURANCA LTDA</text:p>
          </table:table-cell>
          <table:covered-table-cell table:number-columns-repeated="3"/>
          <table:table-cell table:style-name="ce0" office:value-type="string" calcext:value-type="string">
            <text:p>5.1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68688">
            <text:p>4,669</text:p>
          </table:table-cell>
          <table:table-cell table:style-name="ce12N2" office:value-type="float" office:value="1663.98">
            <text:p>1663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93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10.06">
            <text:p>50810,06</text:p>
          </table:table-cell>
          <table:table-cell table:style-name="ce12N2" office:value-type="float" office:value="50.83">
            <text:p>5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29">
            <text:p>457,29</text:p>
          </table:table-cell>
          <table:table-cell table:style-name="ce12N2" office:value-type="float" office:value="60.85">
            <text:p>60,8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2197.28">
            <text:p>219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2462148000134550010000051121951744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7">
            <text:p>31022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3.51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13.41">
            <text:p>1801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14">
            <text:p>169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52">
            <text:p>1,45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1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35.47">
            <text:p>14735,47</text:p>
          </table:table-cell>
          <table:table-cell table:style-name="ce12N2" office:value-type="float" office:value="14.74">
            <text:p>1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.62">
            <text:p>132,6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99.41">
            <text:p>1099,41</text:p>
          </table:table-cell>
          <table:table-cell table:style-name="ce12N2" office:value-type="float" office:value="16914">
            <text:p>16914,00</text:p>
          </table:table-cell>
          <table:table-cell table:style-name="ce12N2" office:value-type="float" office:value="676.56">
            <text:p>67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351810837549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8">
            <text:p>310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52">
            <text:p>0,039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2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0.01">
            <text:p>1370,01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113.63">
            <text:p>11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71178878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9">
            <text:p>310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55.26">
            <text:p>5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3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81.93">
            <text:p>19781,93</text:p>
          </table:table-cell>
          <table:table-cell table:style-name="ce12N2" office:value-type="float" office:value="19.78">
            <text:p>1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.04">
            <text:p>178,0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1640.73">
            <text:p>16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81696327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0">
            <text:p>310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5123">
            <text:p>0,345</text:p>
          </table:table-cell>
          <table:table-cell table:style-name="ce12N2" office:value-type="float" office:value="126.48">
            <text:p>12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8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587.4">
            <text:p>34587,40</text:p>
          </table:table-cell>
          <table:table-cell table:style-name="ce12N2" office:value-type="float" office:value="34.59">
            <text:p>3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.29">
            <text:p>311,2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2868.7">
            <text:p>286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91519264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1">
            <text:p>310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12">
            <text:p>0,151</text:p>
          </table:table-cell>
          <table:table-cell table:style-name="ce12N2" office:value-type="float" office:value="111.36">
            <text:p>11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96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18.91">
            <text:p>34818,91</text:p>
          </table:table-cell>
          <table:table-cell table:style-name="ce12N2" office:value-type="float" office:value="34.82">
            <text:p>3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.37">
            <text:p>31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1598.66">
            <text:p>159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401990506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2">
            <text:p>310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117.86">
            <text:p>10411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03974.9">
            <text:p>103974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8314">
            <text:p>0,308</text:p>
          </table:table-cell>
          <table:table-cell table:style-name="ce12N2" office:value-type="float" office:value="343.06">
            <text:p>34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4.11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350.6">
            <text:p>88350,60</text:p>
          </table:table-cell>
          <table:table-cell table:style-name="ce12N2" office:value-type="float" office:value="88.35">
            <text:p>8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5.16">
            <text:p>795,1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2.96">
            <text:p>142,96</text:p>
          </table:table-cell>
          <table:table-cell table:style-name="ce12N2" office:value-type="float" office:value="97615.32">
            <text:p>97615,32</text:p>
          </table:table-cell>
          <table:table-cell table:style-name="ce12N2" office:value-type="float" office:value="6618.86">
            <text:p>661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71366662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3">
            <text:p>310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15.93">
            <text:p>3571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5525.32">
            <text:p>355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7675">
            <text:p>0,278</text:p>
          </table:table-cell>
          <table:table-cell table:style-name="ce12N2" office:value-type="float" office:value="113">
            <text:p>11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71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6.61">
            <text:p>30216,61</text:p>
          </table:table-cell>
          <table:table-cell table:style-name="ce12N2" office:value-type="float" office:value="30.21">
            <text:p>3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94">
            <text:p>271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32981.49">
            <text:p>32981,49</text:p>
          </table:table-cell>
          <table:table-cell table:style-name="ce12N2" office:value-type="float" office:value="2228.77">
            <text:p>22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817386503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4">
            <text:p>310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9.51">
            <text:p>7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2.54">
            <text:p>722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.8">
            <text:p>609,8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6.97">
            <text:p>46,97</text:p>
          </table:table-cell>
          <table:table-cell table:style-name="ce12N2" office:value-type="float" office:value="722.54">
            <text:p>722,54</text:p>
          </table:table-cell>
          <table:table-cell table:style-name="ce12N2" office:value-type="float" office:value="50.58">
            <text:p>5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91290288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5">
            <text:p>310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565.56">
            <text:p>4356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3565.56">
            <text:p>4356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3">
            <text:p>0,072</text:p>
          </table:table-cell>
          <table:table-cell table:style-name="ce12N2" office:value-type="float" office:value="83.66">
            <text:p>8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56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88.44">
            <text:p>36788,44</text:p>
          </table:table-cell>
          <table:table-cell table:style-name="ce12N2" office:value-type="float" office:value="36.79">
            <text:p>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.09">
            <text:p>331,0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47.58">
            <text:p>43247,58</text:p>
          </table:table-cell>
          <table:table-cell table:style-name="ce12N2" office:value-type="float" office:value="3027.33">
            <text:p>302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01733056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6">
            <text:p>310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44.89">
            <text:p>1274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44.89">
            <text:p>12744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83">
            <text:p>0,026</text:p>
          </table:table-cell>
          <table:table-cell table:style-name="ce12N2" office:value-type="float" office:value="70.13">
            <text:p>7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4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91.03">
            <text:p>10891,03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02">
            <text:p>98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5.03">
            <text:p>10625,03</text:p>
          </table:table-cell>
          <table:table-cell table:style-name="ce12N2" office:value-type="float" office:value="743.75">
            <text:p>7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114616809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7">
            <text:p>310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3.09">
            <text:p>312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2.48">
            <text:p>29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112">
            <text:p>0,023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74.94">
            <text:p>2474,94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27">
            <text:p>22,2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2932.48">
            <text:p>2932,48</text:p>
          </table:table-cell>
          <table:table-cell table:style-name="ce12N2" office:value-type="float" office:value="205.27">
            <text:p>20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21586851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8">
            <text:p>310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2">
            <text:p>0,052</text:p>
          </table:table-cell>
          <table:table-cell table:style-name="ce12N2" office:value-type="float" office:value="55.8">
            <text:p>5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77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818.66">
            <text:p>26818,66</text:p>
          </table:table-cell>
          <table:table-cell table:style-name="ce12N2" office:value-type="float" office:value="26.82">
            <text:p>2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.37">
            <text:p>241,3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2224.36">
            <text:p>222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316754063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9">
            <text:p>310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56.14">
            <text:p>5475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756.14">
            <text:p>547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05">
            <text:p>0,091</text:p>
          </table:table-cell>
          <table:table-cell table:style-name="ce12N2" office:value-type="float" office:value="106.9">
            <text:p>10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75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243.11">
            <text:p>46243,11</text:p>
          </table:table-cell>
          <table:table-cell table:style-name="ce12N2" office:value-type="float" office:value="46.25">
            <text:p>4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6.19">
            <text:p>416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79.17">
            <text:p>54279,17</text:p>
          </table:table-cell>
          <table:table-cell table:style-name="ce12N2" office:value-type="float" office:value="3799.54">
            <text:p>379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415256796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0">
            <text:p>310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90.29">
            <text:p>6439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4199.68">
            <text:p>6419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2712">
            <text:p>0,243</text:p>
          </table:table-cell>
          <table:table-cell table:style-name="ce12N2" office:value-type="float" office:value="212.7">
            <text:p>2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90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768.38">
            <text:p>55768,38</text:p>
          </table:table-cell>
          <table:table-cell table:style-name="ce12N2" office:value-type="float" office:value="55.77">
            <text:p>5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1.91">
            <text:p>501,9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62079.82">
            <text:p>62079,82</text:p>
          </table:table-cell>
          <table:table-cell table:style-name="ce12N2" office:value-type="float" office:value="2746.92">
            <text:p>27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7190947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1">
            <text:p>310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.85">
            <text:p>7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5.69">
            <text:p>565,69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9">
            <text:p>5,0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3.57">
            <text:p>43,57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8841285328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2">
            <text:p>3102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17">
            <text:p>0,079</text:p>
          </table:table-cell>
          <table:table-cell table:style-name="ce12N2" office:value-type="float" office:value="84.63">
            <text:p>84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19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74.96">
            <text:p>40674,9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6.07">
            <text:p>366,0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3373.62">
            <text:p>337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61712877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4">
            <text:p>3102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6515">
            <text:p>0,107</text:p>
          </table:table-cell>
          <table:table-cell table:style-name="ce12N2" office:value-type="float" office:value="24.62">
            <text:p>2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29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0.53">
            <text:p>6530,53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78">
            <text:p>58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433">
            <text:p>4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831436187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5">
            <text:p>3102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57.57">
            <text:p>5435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4244.63">
            <text:p>5424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515">
            <text:p>0,224</text:p>
          </table:table-cell>
          <table:table-cell table:style-name="ce12N2" office:value-type="float" office:value="128.98">
            <text:p>12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357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19.82">
            <text:p>47119,82</text:p>
          </table:table-cell>
          <table:table-cell table:style-name="ce12N2" office:value-type="float" office:value="47.11">
            <text:p>4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07">
            <text:p>424,0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12.94">
            <text:p>112,94</text:p>
          </table:table-cell>
          <table:table-cell table:style-name="ce12N2" office:value-type="float" office:value="54244.63">
            <text:p>54244,63</text:p>
          </table:table-cell>
          <table:table-cell table:style-name="ce12N2" office:value-type="float" office:value="2321.97">
            <text:p>232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841830611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0">
            <text:p>310260</text:p>
          </table:table-cell>
          <table:table-cell table:style-name="ce0" table:number-columns-spanned="4" table:number-rows-spanned="1" office:value-type="string" calcext:value-type="string">
            <text:p>7.087 - VELLORE S/A</text:p>
          </table:table-cell>
          <table:covered-table-cell table:number-columns-repeated="3"/>
          <table:table-cell table:style-name="ce0" office:value-type="string" calcext:value-type="string">
            <text:p>413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66.95">
            <text:p>2936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7021.78">
            <text:p>27021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884">
            <text:p>1,288</text:p>
          </table:table-cell>
          <table:table-cell table:style-name="ce12N2" office:value-type="float" office:value="781.33">
            <text:p>78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6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375.81">
            <text:p>23375,81</text:p>
          </table:table-cell>
          <table:table-cell table:style-name="ce12N2" office:value-type="float" office:value="23.39">
            <text:p>2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.37">
            <text:p>210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345.17">
            <text:p>2345,17</text:p>
          </table:table-cell>
          <table:table-cell table:style-name="ce12N2" office:value-type="float" office:value="27021.78">
            <text:p>27021,78</text:p>
          </table:table-cell>
          <table:table-cell table:style-name="ce12N2" office:value-type="float" office:value="1263.32">
            <text:p>126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1723086000143550010004138971241076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3">
            <text:p>31027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86.96">
            <text:p>7618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8.715135">
            <text:p>158,715</text:p>
          </table:table-cell>
          <table:table-cell table:style-name="ce12N2" office:value-type="float" office:value="1436.81">
            <text:p>143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18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261.92">
            <text:p>62261,92</text:p>
          </table:table-cell>
          <table:table-cell table:style-name="ce12N2" office:value-type="float" office:value="62.26">
            <text:p>6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0.38">
            <text:p>560,38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72.12">
            <text:p>2672,12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4906.59">
            <text:p>490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371568624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4">
            <text:p>3102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81.59">
            <text:p>121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106">
            <text:p>0,207</text:p>
          </table:table-cell>
          <table:table-cell table:style-name="ce12N2" office:value-type="float" office:value="157.33">
            <text:p>15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49.2">
            <text:p>10049,20</text:p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4">
            <text:p>90,44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45.21">
            <text:p>545,21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562.91">
            <text:p>56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5158626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6">
            <text:p>31027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13.38">
            <text:p>841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97.51">
            <text:p>7997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132">
            <text:p>0,123</text:p>
          </table:table-cell>
          <table:table-cell table:style-name="ce12N2" office:value-type="float" office:value="51.03">
            <text:p>5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1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77.6">
            <text:p>7677,60</text:p>
          </table:table-cell>
          <table:table-cell table:style-name="ce12N2" office:value-type="float" office:value="7.68">
            <text:p>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">
            <text:p>69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5.87">
            <text:p>415,87</text:p>
          </table:table-cell>
          <table:table-cell table:style-name="ce12N2" office:value-type="float" office:value="7997.51">
            <text:p>7997,51</text:p>
          </table:table-cell>
          <table:table-cell table:style-name="ce12N2" office:value-type="float" office:value="319.91">
            <text:p>3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61300156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7">
            <text:p>31027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.6">
            <text:p>1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.24">
            <text:p>1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64">
            <text:p>0,001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16">
            <text:p>103,16</text:p>
          </table:table-cell>
          <table:table-cell table:style-name="ce12N2" office:value-type="float" office:value="0.1">
            <text:p>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6.36">
            <text:p>6,36</text:p>
          </table:table-cell>
          <table:table-cell table:style-name="ce12N2" office:value-type="float" office:value="122.24">
            <text:p>122,24</text:p>
          </table:table-cell>
          <table:table-cell table:style-name="ce12N2" office:value-type="float" office:value="8.56">
            <text:p>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7138517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8">
            <text:p>310278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.61">
            <text:p>2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.59">
            <text:p>26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25">
            <text:p>0,00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3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87">
            <text:p>234,87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.02">
            <text:p>14,02</text:p>
          </table:table-cell>
          <table:table-cell table:style-name="ce12N2" office:value-type="float" office:value="269.59">
            <text:p>269,59</text:p>
          </table:table-cell>
          <table:table-cell table:style-name="ce12N2" office:value-type="float" office:value="10.78">
            <text:p>1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81380461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9">
            <text:p>310279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7.05">
            <text:p>802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4875">
            <text:p>0,735</text:p>
          </table:table-cell>
          <table:table-cell table:style-name="ce12N2" office:value-type="float" office:value="79.24">
            <text:p>7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61.15">
            <text:p>6361,15</text:p>
          </table:table-cell>
          <table:table-cell table:style-name="ce12N2" office:value-type="float" office:value="6.37">
            <text:p>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24">
            <text:p>57,2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89.91">
            <text:p>489,91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527.61">
            <text:p>52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266121759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0">
            <text:p>31028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.13">
            <text:p>88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284">
            <text:p>0,057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9.85">
            <text:p>699,85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9">
            <text:p>53,9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58.05">
            <text:p>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5351219649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9">
            <text:p>310289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6.4">
            <text:p>29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06.4">
            <text:p>290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">
            <text:p>0,138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2.93">
            <text:p>2452,93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6.4">
            <text:p>2906,40</text:p>
          </table:table-cell>
          <table:table-cell table:style-name="ce12N2" office:value-type="float" office:value="203.45">
            <text:p>20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6991417667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5">
            <text:p>310295</text:p>
          </table:table-cell>
          <table:table-cell table:style-name="ce0" table:number-columns-spanned="4" table:number-rows-spanned="1" office:value-type="string" calcext:value-type="string">
            <text:p>29.228 - CONDOR PINCEIS LTDA</text:p>
          </table:table-cell>
          <table:covered-table-cell table:number-columns-repeated="3"/>
          <table:table-cell table:style-name="ce0" office:value-type="string" calcext:value-type="string">
            <text:p>109.59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128.65">
            <text:p>27128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6973.16">
            <text:p>2697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2269">
            <text:p>0,452</text:p>
          </table:table-cell>
          <table:table-cell table:style-name="ce12N2" office:value-type="float" office:value="590.7">
            <text:p>59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128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64.67">
            <text:p>22764,67</text:p>
          </table:table-cell>
          <table:table-cell table:style-name="ce12N2" office:value-type="float" office:value="22.76">
            <text:p>2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.89">
            <text:p>204,89</text:p>
          </table:table-cell>
          <table:table-cell table:style-name="ce12N2" office:value-type="float" office:value="31">
            <text:p>3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5.49">
            <text:p>155,49</text:p>
          </table:table-cell>
          <table:table-cell table:style-name="ce12N2" office:value-type="float" office:value="26973.16">
            <text:p>26973,16</text:p>
          </table:table-cell>
          <table:table-cell table:style-name="ce12N2" office:value-type="float" office:value="1888.12">
            <text:p>188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217430000304550050001095991083361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9">
            <text:p>31029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3.82">
            <text:p>364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544">
            <text:p>0,315</text:p>
          </table:table-cell>
          <table:table-cell table:style-name="ce12N2" office:value-type="float" office:value="37.08">
            <text:p>3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6.51">
            <text:p>3066,51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6">
            <text:p>27,6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7401538682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0">
            <text:p>31030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656">
            <text:p>0,197</text:p>
          </table:table-cell>
          <table:table-cell table:style-name="ce12N2" office:value-type="float" office:value="9.72">
            <text:p>9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2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14.93">
            <text:p>2214,9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93">
            <text:p>19,93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183.71">
            <text:p>18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869107604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5">
            <text:p>31031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45.61">
            <text:p>2804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">
            <text:p>46,00</text:p>
          </table:table-cell>
          <table:table-cell table:style-name="ce12N2" office:value-type="float" office:value="26689.01">
            <text:p>2668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7266">
            <text:p>0,607</text:p>
          </table:table-cell>
          <table:table-cell table:style-name="ce12N2" office:value-type="float" office:value="486.28">
            <text:p>486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45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58.97">
            <text:p>22858,97</text:p>
          </table:table-cell>
          <table:table-cell table:style-name="ce12N2" office:value-type="float" office:value="22.87">
            <text:p>2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5.74">
            <text:p>205,7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356.6">
            <text:p>1356,60</text:p>
          </table:table-cell>
          <table:table-cell table:style-name="ce12N2" office:value-type="float" office:value="26689.01">
            <text:p>26689,01</text:p>
          </table:table-cell>
          <table:table-cell table:style-name="ce12N2" office:value-type="float" office:value="1500.03">
            <text:p>150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91491306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6">
            <text:p>31031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82.24">
            <text:p>470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46860.88">
            <text:p>4686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976484">
            <text:p>36,976</text:p>
          </table:table-cell>
          <table:table-cell table:style-name="ce12N2" office:value-type="float" office:value="1508.32">
            <text:p>150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4.47">
            <text:p>40804,47</text:p>
          </table:table-cell>
          <table:table-cell table:style-name="ce12N2" office:value-type="float" office:value="40.79">
            <text:p>4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7.23">
            <text:p>367,2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33398.05">
            <text:p>33398,05</text:p>
          </table:table-cell>
          <table:table-cell table:style-name="ce12N2" office:value-type="float" office:value="2128.87">
            <text:p>21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11376870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7">
            <text:p>310317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4.86">
            <text:p>3823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527776">
            <text:p>5,528</text:p>
          </table:table-cell>
          <table:table-cell table:style-name="ce12N2" office:value-type="float" office:value="1100.93">
            <text:p>110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234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53.53">
            <text:p>31253,53</text:p>
          </table:table-cell>
          <table:table-cell table:style-name="ce12N2" office:value-type="float" office:value="31.25">
            <text:p>3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28">
            <text:p>281,2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03.51">
            <text:p>1203,51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2592.2">
            <text:p>259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21780522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8">
            <text:p>310318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0.65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35.3">
            <text:p>933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221.36">
            <text:p>9221,36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56168">
            <text:p>0,656</text:p>
          </table:table-cell>
          <table:table-cell table:style-name="ce12N2" office:value-type="float" office:value="108">
            <text:p>1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3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88.39">
            <text:p>7988,39</text:p>
          </table:table-cell>
          <table:table-cell table:style-name="ce12N2" office:value-type="float" office:value="7.99">
            <text:p>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.9">
            <text:p>71,90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5.95">
            <text:p>105,95</text:p>
          </table:table-cell>
          <table:table-cell table:style-name="ce12N2" office:value-type="float" office:value="9229.35">
            <text:p>9229,35</text:p>
          </table:table-cell>
          <table:table-cell table:style-name="ce12N2" office:value-type="float" office:value="417.91">
            <text:p>41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06591329160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9">
            <text:p>310319</text:p>
          </table:table-cell>
          <table:table-cell table:style-name="ce0" table:number-columns-spanned="4" table:number-rows-spanned="1" office:value-type="string" calcext:value-type="string">
            <text:p>13.126 - ALMA TEXTIL LTDA</text:p>
          </table:table-cell>
          <table:covered-table-cell table:number-columns-repeated="3"/>
          <table:table-cell table:style-name="ce0" office:value-type="string" calcext:value-type="string">
            <text:p>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11.484">
            <text:p>3611,484</text:p>
          </table:table-cell>
          <table:table-cell table:style-name="ce12N2" office:value-type="float" office:value="1951">
            <text:p>19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17.11">
            <text:p>38817,11</text:p>
          </table:table-cell>
          <table:table-cell table:style-name="ce12N2" office:value-type="float" office:value="38.82">
            <text:p>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36">
            <text:p>349,36</text:p>
          </table:table-cell>
          <table:table-cell table:style-name="ce12N2" office:value-type="float" office:value="32">
            <text:p>3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3032.4">
            <text:p>30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796564000194550010000167131260167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4">
            <text:p>310344</text:p>
          </table:table-cell>
          <table:table-cell table:style-name="ce0" table:number-columns-spanned="4" table:number-rows-spanned="1" office:value-type="string" calcext:value-type="string">
            <text:p>32.610 - NEWELL BRANDS BRASIL LTDA</text:p>
          </table:table-cell>
          <table:covered-table-cell table:number-columns-repeated="3"/>
          <table:table-cell table:style-name="ce0" office:value-type="string" calcext:value-type="string">
            <text:p>17.97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4">
            <text:p>0,003</text:p>
          </table:table-cell>
          <table:table-cell table:style-name="ce12N2" office:value-type="float" office:value="90">
            <text:p>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9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66.16">
            <text:p>6066,16</text:p>
          </table:table-cell>
          <table:table-cell table:style-name="ce12N2" office:value-type="float" office:value="6.07">
            <text:p>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6">
            <text:p>54,60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911.52">
            <text:p>91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605945380016805500200001797012529133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5">
            <text:p>3103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69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5.54">
            <text:p>245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441.3">
            <text:p>22441,30</text:p>
          </table:table-cell>
          <table:table-cell table:style-name="ce12N2" office:value-type="float" office:value="929.39">
            <text:p>929,39</text:p>
          </table:table-cell>
          <table:table-cell table:style-name="ce12N3" office:value-type="float" office:value="0.44847">
            <text:p>0,448</text:p>
          </table:table-cell>
          <table:table-cell table:style-name="ce12N2" office:value-type="float" office:value="211.23">
            <text:p>21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974.63">
            <text:p>19974,63</text:p>
          </table:table-cell>
          <table:table-cell table:style-name="ce12N2" office:value-type="float" office:value="19.97">
            <text:p>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9.78">
            <text:p>179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14.85">
            <text:p>1214,85</text:p>
          </table:table-cell>
          <table:table-cell table:style-name="ce12N2" office:value-type="float" office:value="23370.69">
            <text:p>23370,69</text:p>
          </table:table-cell>
          <table:table-cell table:style-name="ce12N2" office:value-type="float" office:value="1360.07">
            <text:p>13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692163368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9">
            <text:p>31036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2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08.44">
            <text:p>12208,44</text:p>
          </table:table-cell>
          <table:table-cell table:style-name="ce12N2" office:value-type="float" office:value="780.03">
            <text:p>780,03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972.16">
            <text:p>119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85">
            <text:p>1,399</text:p>
          </table:table-cell>
          <table:table-cell table:style-name="ce12N2" office:value-type="float" office:value="523.5">
            <text:p>52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0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57">
            <text:p>9750,57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5">
            <text:p>87,75</text:p>
          </table:table-cell>
          <table:table-cell table:style-name="ce12N2" office:value-type="float" office:value="79.34">
            <text:p>79,3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016.31">
            <text:p>1016,31</text:p>
          </table:table-cell>
          <table:table-cell table:style-name="ce12N2" office:value-type="float" office:value="11192.13">
            <text:p>11192,13</text:p>
          </table:table-cell>
          <table:table-cell table:style-name="ce12N2" office:value-type="float" office:value="447.68">
            <text:p>44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236415441060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79">
            <text:p>310379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5.7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66.4">
            <text:p>36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2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39.68">
            <text:p>21039,68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36">
            <text:p>189,36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1745.05">
            <text:p>174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57651483938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7">
            <text:p>310387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">
            <text:p>0,038</text:p>
          </table:table-cell>
          <table:table-cell table:style-name="ce12N2" office:value-type="float" office:value="258.4">
            <text:p>25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369.75">
            <text:p>3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48875230001525500100003812010038124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4">
            <text:p>3104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241.31">
            <text:p>206324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2050218.05">
            <text:p>205021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2.103079">
            <text:p>692,103</text:p>
          </table:table-cell>
          <table:table-cell table:style-name="ce12N2" office:value-type="float" office:value="9038.4">
            <text:p>903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.241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0206.72">
            <text:p>1740206,72</text:p>
          </table:table-cell>
          <table:table-cell table:style-name="ce12N2" office:value-type="float" office:value="1740.22">
            <text:p>17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1.89">
            <text:p>15661,8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3023.26">
            <text:p>13023,26</text:p>
          </table:table-cell>
          <table:table-cell table:style-name="ce12N2" office:value-type="float" office:value="1999450.7">
            <text:p>1999450,70</text:p>
          </table:table-cell>
          <table:table-cell table:style-name="ce12N2" office:value-type="float" office:value="132634.89">
            <text:p>13263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51890466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1">
            <text:p>310421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19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68.09">
            <text:p>3096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30117.29">
            <text:p>30117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88948">
            <text:p>4,589</text:p>
          </table:table-cell>
          <table:table-cell table:style-name="ce12N2" office:value-type="float" office:value="422.54">
            <text:p>4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96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58.05">
            <text:p>25758,05</text:p>
          </table:table-cell>
          <table:table-cell table:style-name="ce12N2" office:value-type="float" office:value="25.77">
            <text:p>2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.87">
            <text:p>231,8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850.8">
            <text:p>850,80</text:p>
          </table:table-cell>
          <table:table-cell table:style-name="ce12N2" office:value-type="float" office:value="30117.29">
            <text:p>30117,29</text:p>
          </table:table-cell>
          <table:table-cell table:style-name="ce12N2" office:value-type="float" office:value="1733.74">
            <text:p>17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1921367116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6">
            <text:p>31044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09">
            <text:p>0,00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.53">
            <text:p>179,53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14.89">
            <text:p>1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91848323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8">
            <text:p>31044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4">
            <text:p>0,003</text:p>
          </table:table-cell>
          <table:table-cell table:style-name="ce12N2" office:value-type="float" office:value="5.4">
            <text:p>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9">
            <text:p>2851,79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81848989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6">
            <text:p>310476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9.4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6198">
            <text:p>7,462</text:p>
          </table:table-cell>
          <table:table-cell table:style-name="ce12N2" office:value-type="float" office:value="1304">
            <text:p>13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9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87.23">
            <text:p>19687,23</text:p>
          </table:table-cell>
          <table:table-cell table:style-name="ce12N2" office:value-type="float" office:value="19.69">
            <text:p>1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.19">
            <text:p>177,19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1711.8">
            <text:p>17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6557984000499550010000194321236381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3">
            <text:p>310483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1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5.23">
            <text:p>806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95.01">
            <text:p>7695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1784">
            <text:p>0,192</text:p>
          </table:table-cell>
          <table:table-cell table:style-name="ce12N2" office:value-type="float" office:value="26.1">
            <text:p>2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65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94.4">
            <text:p>6494,40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45">
            <text:p>5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370.22">
            <text:p>370,22</text:p>
          </table:table-cell>
          <table:table-cell table:style-name="ce12N2" office:value-type="float" office:value="7695.01">
            <text:p>7695,01</text:p>
          </table:table-cell>
          <table:table-cell table:style-name="ce12N2" office:value-type="float" office:value="538.65">
            <text:p>538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138311000317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7">
            <text:p>31049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7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2.17">
            <text:p>88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3.8">
            <text:p>80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8.39">
            <text:p>678,39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1">
            <text:p>6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8.37">
            <text:p>78,37</text:p>
          </table:table-cell>
          <table:table-cell table:style-name="ce12N2" office:value-type="float" office:value="803.8">
            <text:p>803,80</text:p>
          </table:table-cell>
          <table:table-cell table:style-name="ce12N2" office:value-type="float" office:value="56.27">
            <text:p>5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721376157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9">
            <text:p>31049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0.3">
            <text:p>117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13.2">
            <text:p>111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3">
            <text:p>0,021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0.41">
            <text:p>950,41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55">
            <text:p>8,5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57.1">
            <text:p>57,10</text:p>
          </table:table-cell>
          <table:table-cell table:style-name="ce12N2" office:value-type="float" office:value="1113.2">
            <text:p>1113,20</text:p>
          </table:table-cell>
          <table:table-cell table:style-name="ce12N2" office:value-type="float" office:value="65.92">
            <text:p>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80132220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0">
            <text:p>31050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84.16">
            <text:p>2384,16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197.74">
            <text:p>19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214027491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1">
            <text:p>3105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516">
            <text:p>0,060</text:p>
          </table:table-cell>
          <table:table-cell table:style-name="ce12N2" office:value-type="float" office:value="27.9">
            <text:p>2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3.11">
            <text:p>3503,11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3">
            <text:p>31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290.55">
            <text:p>29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31422428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2">
            <text:p>3105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12">
            <text:p>0,059</text:p>
          </table:table-cell>
          <table:table-cell table:style-name="ce12N2" office:value-type="float" office:value="27.1">
            <text:p>2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6.92">
            <text:p>466,92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41864812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6">
            <text:p>310506</text:p>
          </table:table-cell>
          <table:table-cell table:style-name="ce0" table:number-columns-spanned="4" table:number-rows-spanned="1" office:value-type="string" calcext:value-type="string">
            <text:p>37.371 - JOSE MAURICIO ALVES LTDA</text:p>
          </table:table-cell>
          <table:covered-table-cell table:number-columns-repeated="3"/>
          <table:table-cell table:style-name="ce0" office:value-type="string" calcext:value-type="string">
            <text:p>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94215">
            <text:p>2,794</text:p>
          </table:table-cell>
          <table:table-cell table:style-name="ce12N2" office:value-type="float" office:value="245.03">
            <text:p>245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0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613.49">
            <text:p>61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6279490100015055001000000023179526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4">
            <text:p>310534</text:p>
          </table:table-cell>
          <table:table-cell table:style-name="ce0" table:number-columns-spanned="4" table:number-rows-spanned="1" office:value-type="string" calcext:value-type="string">
            <text:p>39.171 - BALDEMETAL IND METALURGICA LTDA</text:p>
          </table:table-cell>
          <table:covered-table-cell table:number-columns-repeated="3"/>
          <table:table-cell table:style-name="ce0" office:value-type="string" calcext:value-type="string">
            <text:p>1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6304">
            <text:p>5,063</text:p>
          </table:table-cell>
          <table:table-cell table:style-name="ce12N2" office:value-type="float" office:value="1080">
            <text:p>10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889.89">
            <text:p>889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665712600001255500100000010910000015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5">
            <text:p>31053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8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46.59">
            <text:p>344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72.46">
            <text:p>327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8">
            <text:p>0,023</text:p>
          </table:table-cell>
          <table:table-cell table:style-name="ce12N2" office:value-type="float" office:value="9.04">
            <text:p>9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46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3.87">
            <text:p>2833,87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51">
            <text:p>25,5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74.13">
            <text:p>174,13</text:p>
          </table:table-cell>
          <table:table-cell table:style-name="ce12N2" office:value-type="float" office:value="3272.46">
            <text:p>3272,46</text:p>
          </table:table-cell>
          <table:table-cell table:style-name="ce12N2" office:value-type="float" office:value="149.74">
            <text:p>14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81140766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7">
            <text:p>3105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18.92">
            <text:p>2718,92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47">
            <text:p>24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225.51">
            <text:p>22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991236095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8">
            <text:p>3105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5.03">
            <text:p>364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30.3">
            <text:p>353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22">
            <text:p>0,039</text:p>
          </table:table-cell>
          <table:table-cell table:style-name="ce12N2" office:value-type="float" office:value="7.79">
            <text:p>7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9.5">
            <text:p>2979,50</text:p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82">
            <text:p>26,8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4.73">
            <text:p>114,73</text:p>
          </table:table-cell>
          <table:table-cell table:style-name="ce12N2" office:value-type="float" office:value="3530.3">
            <text:p>3530,30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4916370235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9">
            <text:p>310539</text:p>
          </table:table-cell>
          <table:table-cell table:style-name="ce0" table:number-columns-spanned="4" table:number-rows-spanned="1" office:value-type="string" calcext:value-type="string">
            <text:p>3.931 - INTELLI IND. TERM. ELETR. LTDA</text:p>
          </table:table-cell>
          <table:covered-table-cell table:number-columns-repeated="3"/>
          <table:table-cell table:style-name="ce0" office:value-type="string" calcext:value-type="string">
            <text:p>695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843.2">
            <text:p>3784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333">
            <text:p>0,035</text:p>
          </table:table-cell>
          <table:table-cell table:style-name="ce12N2" office:value-type="float" office:value="342.51">
            <text:p>34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84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33.37">
            <text:p>30933,37</text:p>
          </table:table-cell>
          <table:table-cell table:style-name="ce12N2" office:value-type="float" office:value="30.96">
            <text:p>3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3">
            <text:p>278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91.19">
            <text:p>1191,19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2565.64">
            <text:p>256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6754545000194550000006955941202607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6">
            <text:p>310546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91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6">
            <text:p>0,021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">
            <text:p>4074,00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337.89">
            <text:p>3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1385550020000199181408301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4">
            <text:p>31055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.5186">
            <text:p>33,519</text:p>
          </table:table-cell>
          <table:table-cell table:style-name="ce12N2" office:value-type="float" office:value="424">
            <text:p>4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6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06.02">
            <text:p>14406,02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65">
            <text:p>129,6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1194.86">
            <text:p>119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0411835813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2">
            <text:p>310562</text:p>
          </table:table-cell>
          <table:table-cell table:style-name="ce0" table:number-columns-spanned="4" table:number-rows-spanned="1" office:value-type="string" calcext:value-type="string">
            <text:p>6.898 - BETALUB INDUSTRIA DE PROD. DIVER. DE PET. LTDA EPP</text:p>
          </table:table-cell>
          <table:covered-table-cell table:number-columns-repeated="3"/>
          <table:table-cell table:style-name="ce0" office:value-type="string" calcext:value-type="string">
            <text:p>1.4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6.8">
            <text:p>145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519.4">
            <text:p>115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7736">
            <text:p>0,848</text:p>
          </table:table-cell>
          <table:table-cell table:style-name="ce12N2" office:value-type="float" office:value="456.91">
            <text:p>45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5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4.12">
            <text:p>10834,1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26.4">
            <text:p>3926,40</text:p>
          </table:table-cell>
          <table:table-cell table:style-name="ce12N2" office:value-type="float" office:value="274.85">
            <text:p>27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936.96">
            <text:p>14936,96</text:p>
          </table:table-cell>
          <table:table-cell table:style-name="ce12N2" office:value-type="float" office:value="2987.4">
            <text:p>2987,4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6260884000108550020000014901430271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7">
            <text:p>31056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6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2575">
            <text:p>1,043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4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1.81">
            <text:p>10421,81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8">
            <text:p>93,8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864.39">
            <text:p>86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69381719822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9">
            <text:p>31056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78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1.6">
            <text:p>90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484">
            <text:p>2,885</text:p>
          </table:table-cell>
          <table:table-cell table:style-name="ce12N2" office:value-type="float" office:value="263.04">
            <text:p>26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4.54">
            <text:p>7524,54</text:p>
          </table:table-cell>
          <table:table-cell table:style-name="ce12N2" office:value-type="float" office:value="7.53">
            <text:p>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71">
            <text:p>67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0.2">
            <text:p>190,2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539.9">
            <text:p>53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7821252863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4">
            <text:p>31057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1.9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4.16">
            <text:p>22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2.37">
            <text:p>1792,3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3">
            <text:p>16,1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0.43">
            <text:p>110,43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148.66">
            <text:p>14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19521100003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0">
            <text:p>310580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7.8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8">
            <text:p>90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248">
            <text:p>0,340</text:p>
          </table:table-cell>
          <table:table-cell table:style-name="ce12N2" office:value-type="float" office:value="84.25">
            <text:p>84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1.24">
            <text:p>7131,2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18">
            <text:p>64,1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578.41">
            <text:p>578,41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591.47">
            <text:p>59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78521570448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1">
            <text:p>310581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20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04.78">
            <text:p>490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04.78">
            <text:p>490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75">
            <text:p>0,030</text:p>
          </table:table-cell>
          <table:table-cell table:style-name="ce12N2" office:value-type="float" office:value="14.7">
            <text:p>1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0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16.96">
            <text:p>3916,96</text:p>
          </table:table-cell>
          <table:table-cell table:style-name="ce12N2" office:value-type="float" office:value="3.92">
            <text:p>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25">
            <text:p>35,2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4.78">
            <text:p>4904,78</text:p>
          </table:table-cell>
          <table:table-cell table:style-name="ce12N2" office:value-type="float" office:value="588.57">
            <text:p>58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0142240000120550010007200771965201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93">
            <text:p>310593</text:p>
          </table:table-cell>
          <table:table-cell table:style-name="ce0" table:number-columns-spanned="4" table:number-rows-spanned="1" office:value-type="string" calcext:value-type="string">
            <text:p>31.250 - MONT MAGNO FIXADORES LTDA</text:p>
          </table:table-cell>
          <table:covered-table-cell table:number-columns-repeated="3"/>
          <table:table-cell table:style-name="ce0" office:value-type="string" calcext:value-type="string">
            <text:p>2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89.1">
            <text:p>6698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60349.1">
            <text:p>60349,10</text:p>
          </table:table-cell>
          <table:table-cell table:style-name="ce12N2" office:value-type="float" office:value="6640">
            <text:p>6640,00</text:p>
          </table:table-cell>
          <table:table-cell table:style-name="ce12N3" office:value-type="float" office:value="8.36472">
            <text:p>8,365</text:p>
          </table:table-cell>
          <table:table-cell table:style-name="ce12N2" office:value-type="float" office:value="5675.82">
            <text:p>567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.98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349.1">
            <text:p>60349,10</text:p>
          </table:table-cell>
          <table:table-cell table:style-name="ce12N2" office:value-type="float" office:value="2432.06">
            <text:p>24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5420578000181550010000029031226870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25">
            <text:p>310625</text:p>
          </table:table-cell>
          <table:table-cell table:style-name="ce0" table:number-columns-spanned="4" table:number-rows-spanned="1" office:value-type="string" calcext:value-type="string">
            <text:p>37.371 - JOSE MAURICIO ALVES LTDA</text:p>
          </table:table-cell>
          <table:covered-table-cell table:number-columns-repeated="3"/>
          <table:table-cell table:style-name="ce0" office:value-type="string" calcext:value-type="string">
            <text:p>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017403">
            <text:p>12,017</text:p>
          </table:table-cell>
          <table:table-cell table:style-name="ce12N2" office:value-type="float" office:value="479.56">
            <text:p>47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64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1290.86">
            <text:p>129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62794901000150550010000000241233523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65">
            <text:p>310665</text:p>
          </table:table-cell>
          <table:table-cell table:style-name="ce0" table:number-columns-spanned="4" table:number-rows-spanned="1" office:value-type="string" calcext:value-type="string">
            <text:p>15.543 - SAINT-GOBAIN DO BRASIL PROD IND E P/ CONSTRUCAO LTDA</text:p>
          </table:table-cell>
          <table:covered-table-cell table:number-columns-repeated="3"/>
          <table:table-cell table:style-name="ce0" office:value-type="string" calcext:value-type="string">
            <text:p>169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31.4">
            <text:p>120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31.4">
            <text:p>120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2772">
            <text:p>2,933</text:p>
          </table:table-cell>
          <table:table-cell table:style-name="ce12N2" office:value-type="float" office:value="1702.8">
            <text:p>170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08.27">
            <text:p>9608,27</text:p>
          </table:table-cell>
          <table:table-cell table:style-name="ce12N2" office:value-type="float" office:value="9.61">
            <text:p>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47">
            <text:p>86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31.4">
            <text:p>12031,40</text:p>
          </table:table-cell>
          <table:table-cell table:style-name="ce12N2" office:value-type="float" office:value="1443.77">
            <text:p>144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610648380141935500100016939416211171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68">
            <text:p>31066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5.9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4.77">
            <text:p>2458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26">
            <text:p>244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7628">
            <text:p>4,976</text:p>
          </table:table-cell>
          <table:table-cell table:style-name="ce12N2" office:value-type="float" office:value="30594.6">
            <text:p>3059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75.48">
            <text:p>20575,48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18">
            <text:p>185,1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58.77">
            <text:p>158,77</text:p>
          </table:table-cell>
          <table:table-cell table:style-name="ce12N2" office:value-type="float" office:value="25047">
            <text:p>25047,00</text:p>
          </table:table-cell>
          <table:table-cell table:style-name="ce12N2" office:value-type="float" office:value="1753.29">
            <text:p>17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2">
            <text:p>57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3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07/07/2026</text:p>
          </table:table-cell>
          <table:table-cell table:style-name="ce12" office:value-type="string" calcext:value-type="string">
            <text:p>5.758,2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35260774423880000145550030012259001524427035</text:p>
          </table:table-cell>
          <table:table-cell table:style-name="ce0" office:value-type="string" calcext:value-type="string">
            <text:p>3526075432020300019457001000004439121191324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1">
            <text:p>31067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0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38.23">
            <text:p>2903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29038.23">
            <text:p>29038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63672">
            <text:p>2,264</text:p>
          </table:table-cell>
          <table:table-cell table:style-name="ce12N2" office:value-type="float" office:value="261.75">
            <text:p>26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03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12.17">
            <text:p>24512,17</text:p>
          </table:table-cell>
          <table:table-cell table:style-name="ce12N2" office:value-type="float" office:value="24.51">
            <text:p>2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.62">
            <text:p>220,6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38.23">
            <text:p>29038,23</text:p>
          </table:table-cell>
          <table:table-cell table:style-name="ce12N2" office:value-type="float" office:value="2032.68">
            <text:p>203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08512859905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3">
            <text:p>31067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0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80">
            <text:p>102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80">
            <text:p>10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6">
            <text:p>3,460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80">
            <text:p>8680,00</text:p>
          </table:table-cell>
          <table:table-cell table:style-name="ce12N2" office:value-type="float" office:value="8.68">
            <text:p>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80">
            <text:p>10280,00</text:p>
          </table:table-cell>
          <table:table-cell table:style-name="ce12N2" office:value-type="float" office:value="719.6">
            <text:p>71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08614516631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4">
            <text:p>31067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2.20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11">
            <text:p>22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9348">
            <text:p>0,579</text:p>
          </table:table-cell>
          <table:table-cell table:style-name="ce12N2" office:value-type="float" office:value="78.41">
            <text:p>7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3.68">
            <text:p>1863,68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8">
            <text:p>16,78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73.43">
            <text:p>73,43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132.05">
            <text:p>1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22001310110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6">
            <text:p>31067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3608">
            <text:p>50,361</text:p>
          </table:table-cell>
          <table:table-cell table:style-name="ce12N2" office:value-type="float" office:value="680">
            <text:p>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82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794.98">
            <text:p>21794,98</text:p>
          </table:table-cell>
          <table:table-cell table:style-name="ce12N2" office:value-type="float" office:value="21.79">
            <text:p>2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.15">
            <text:p>196,1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1807.69">
            <text:p>180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1611783819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7">
            <text:p>3106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122">
            <text:p>0,097</text:p>
          </table:table-cell>
          <table:table-cell table:style-name="ce12N2" office:value-type="float" office:value="60.45">
            <text:p>6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9.75">
            <text:p>12179,75</text:p>
          </table:table-cell>
          <table:table-cell table:style-name="ce12N2" office:value-type="float" office:value="12.18">
            <text:p>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62">
            <text:p>109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1010.21">
            <text:p>10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73314512160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8">
            <text:p>31067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5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926.2">
            <text:p>5892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926.2">
            <text:p>5892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0.96624">
            <text:p>60,966</text:p>
          </table:table-cell>
          <table:table-cell table:style-name="ce12N2" office:value-type="float" office:value="4863.62">
            <text:p>486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92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729">
            <text:p>49729,00</text:p>
          </table:table-cell>
          <table:table-cell table:style-name="ce12N2" office:value-type="float" office:value="49.73">
            <text:p>4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56">
            <text:p>447,5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926.2">
            <text:p>58926,20</text:p>
          </table:table-cell>
          <table:table-cell table:style-name="ce12N2" office:value-type="float" office:value="4124.83">
            <text:p>412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5461247707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9">
            <text:p>31067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5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44.08">
            <text:p>1124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244.08">
            <text:p>1124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77456">
            <text:p>1,677</text:p>
          </table:table-cell>
          <table:table-cell table:style-name="ce12N2" office:value-type="float" office:value="209.77">
            <text:p>209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44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93.68">
            <text:p>9493,68</text:p>
          </table:table-cell>
          <table:table-cell table:style-name="ce12N2" office:value-type="float" office:value="9.5">
            <text:p>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44">
            <text:p>85,4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44.08">
            <text:p>11244,08</text:p>
          </table:table-cell>
          <table:table-cell table:style-name="ce12N2" office:value-type="float" office:value="787.08">
            <text:p>78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58413496107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0">
            <text:p>31068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5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2">
            <text:p>90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082">
            <text:p>908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35">
            <text:p>0,835</text:p>
          </table:table-cell>
          <table:table-cell table:style-name="ce12N2" office:value-type="float" office:value="224.4">
            <text:p>2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66.6">
            <text:p>7666,60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">
            <text:p>69,0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2">
            <text:p>9082,00</text:p>
          </table:table-cell>
          <table:table-cell table:style-name="ce12N2" office:value-type="float" office:value="635.74">
            <text:p>63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57315053973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1">
            <text:p>31068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2.73668">
            <text:p>72,737</text:p>
          </table:table-cell>
          <table:table-cell table:style-name="ce12N2" office:value-type="float" office:value="5030.72">
            <text:p>503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9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031.5">
            <text:p>48031,50</text:p>
          </table:table-cell>
          <table:table-cell table:style-name="ce12N2" office:value-type="float" office:value="48.03">
            <text:p>4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.28">
            <text:p>432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3983.98">
            <text:p>398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58712827094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6">
            <text:p>31068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7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3.94115">
            <text:p>43,941</text:p>
          </table:table-cell>
          <table:table-cell table:style-name="ce12N2" office:value-type="float" office:value="4134.26">
            <text:p>413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25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43.77">
            <text:p>52543,77</text:p>
          </table:table-cell>
          <table:table-cell table:style-name="ce12N2" office:value-type="float" office:value="52.54">
            <text:p>5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2.89">
            <text:p>472,8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4358.02">
            <text:p>435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78716549158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8">
            <text:p>31068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3.94115">
            <text:p>43,941</text:p>
          </table:table-cell>
          <table:table-cell table:style-name="ce12N2" office:value-type="float" office:value="4134.26">
            <text:p>413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25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43.77">
            <text:p>52543,77</text:p>
          </table:table-cell>
          <table:table-cell table:style-name="ce12N2" office:value-type="float" office:value="52.54">
            <text:p>5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2.89">
            <text:p>472,8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4358.02">
            <text:p>435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7771830891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3">
            <text:p>31069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6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9.07">
            <text:p>94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9.2">
            <text:p>91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5.78">
            <text:p>775,78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98">
            <text:p>6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9.87">
            <text:p>29,87</text:p>
          </table:table-cell>
          <table:table-cell table:style-name="ce12N2" office:value-type="float" office:value="919.2">
            <text:p>919,20</text:p>
          </table:table-cell>
          <table:table-cell table:style-name="ce12N2" office:value-type="float" office:value="64.34">
            <text:p>6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6731489814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5">
            <text:p>310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">
            <text:p>0,056</text:p>
          </table:table-cell>
          <table:table-cell table:style-name="ce12N2" office:value-type="float" office:value="22.8">
            <text:p>2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4">
            <text:p>3320,4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8">
            <text:p>29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275.41">
            <text:p>27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21933536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6">
            <text:p>3106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6">
            <text:p>0,002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5">
            <text:p>2851,75</text:p>
          </table:table-cell>
          <table:table-cell table:style-name="ce12N2" office:value-type="float" office:value="2.85">
            <text:p>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11020667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0">
            <text:p>31070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4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29.21">
            <text:p>38829,21</text:p>
          </table:table-cell>
          <table:table-cell table:style-name="ce12N2" office:value-type="float" office:value="2271.96">
            <text:p>2271,96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7289.14">
            <text:p>3728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092937">
            <text:p>18,093</text:p>
          </table:table-cell>
          <table:table-cell table:style-name="ce12N2" office:value-type="float" office:value="305.38">
            <text:p>30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2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88.86">
            <text:p>30488,86</text:p>
          </table:table-cell>
          <table:table-cell table:style-name="ce12N2" office:value-type="float" office:value="30.49">
            <text:p>3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4.4">
            <text:p>274,40</text:p>
          </table:table-cell>
          <table:table-cell table:style-name="ce12N2" office:value-type="float" office:value="78.42">
            <text:p>78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3350.5">
            <text:p>3350,50</text:p>
          </table:table-cell>
          <table:table-cell table:style-name="ce12N2" office:value-type="float" office:value="35017.18">
            <text:p>35017,18</text:p>
          </table:table-cell>
          <table:table-cell table:style-name="ce12N2" office:value-type="float" office:value="1420.63">
            <text:p>142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51.61">
            <text:p>2551,61</text:p>
          </table:table-cell>
          <table:table-cell table:style-name="ce12N2" office:value-type="float" office:value="461.53">
            <text:p>461,53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4711124270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1">
            <text:p>310701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4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52">
            <text:p>23,520</text:p>
          </table:table-cell>
          <table:table-cell table:style-name="ce12N2" office:value-type="float" office:value="6443">
            <text:p>64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29.42">
            <text:p>31129,42</text:p>
          </table:table-cell>
          <table:table-cell table:style-name="ce12N2" office:value-type="float" office:value="31.13">
            <text:p>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.16">
            <text:p>280,16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4677.6">
            <text:p>46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44171638322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2">
            <text:p>31070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509.14">
            <text:p>7950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444.56">
            <text:p>7944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000.179148">
            <text:p>42000,179</text:p>
          </table:table-cell>
          <table:table-cell table:style-name="ce12N2" office:value-type="float" office:value="311.3">
            <text:p>31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50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049.28">
            <text:p>67049,28</text:p>
          </table:table-cell>
          <table:table-cell table:style-name="ce12N2" office:value-type="float" office:value="67.03">
            <text:p>6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3.42">
            <text:p>603,4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64.58">
            <text:p>64,58</text:p>
          </table:table-cell>
          <table:table-cell table:style-name="ce12N2" office:value-type="float" office:value="79444.56">
            <text:p>79444,56</text:p>
          </table:table-cell>
          <table:table-cell table:style-name="ce12N2" office:value-type="float" office:value="5561.11">
            <text:p>556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810042528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3">
            <text:p>31070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96">
            <text:p>0,065</text:p>
          </table:table-cell>
          <table:table-cell table:style-name="ce12N2" office:value-type="float" office:value="259">
            <text:p>25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6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89.99">
            <text:p>2589,99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214.82">
            <text:p>21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71007539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4">
            <text:p>31070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71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52.17">
            <text:p>345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43.5">
            <text:p>334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125">
            <text:p>0,398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5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2.89">
            <text:p>2912,89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9">
            <text:p>26,1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08.67">
            <text:p>108,67</text:p>
          </table:table-cell>
          <table:table-cell table:style-name="ce12N2" office:value-type="float" office:value="3343.5">
            <text:p>3343,50</text:p>
          </table:table-cell>
          <table:table-cell table:style-name="ce12N2" office:value-type="float" office:value="133.74">
            <text:p>1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711000334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6">
            <text:p>310706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0.31268">
            <text:p>120,313</text:p>
          </table:table-cell>
          <table:table-cell table:style-name="ce12N2" office:value-type="float" office:value="1306">
            <text:p>130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89.93">
            <text:p>17089,93</text:p>
          </table:table-cell>
          <table:table-cell table:style-name="ce12N2" office:value-type="float" office:value="17.07">
            <text:p>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3.79">
            <text:p>153,7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1417.45">
            <text:p>141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61000534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7">
            <text:p>310707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9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273.68">
            <text:p>1492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47906.36">
            <text:p>14790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2424">
            <text:p>1,162</text:p>
          </table:table-cell>
          <table:table-cell table:style-name="ce12N2" office:value-type="float" office:value="2341.96">
            <text:p>2341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9.27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829.3">
            <text:p>124829,30</text:p>
          </table:table-cell>
          <table:table-cell table:style-name="ce12N2" office:value-type="float" office:value="124.81">
            <text:p>12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3.44">
            <text:p>1123,4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367.32">
            <text:p>1367,32</text:p>
          </table:table-cell>
          <table:table-cell table:style-name="ce12N2" office:value-type="float" office:value="147906.36">
            <text:p>147906,36</text:p>
          </table:table-cell>
          <table:table-cell table:style-name="ce12N2" office:value-type="float" office:value="10353.44">
            <text:p>1035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91004599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8">
            <text:p>310708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70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6.63">
            <text:p>154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5.12">
            <text:p>118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376">
            <text:p>0,029</text:p>
          </table:table-cell>
          <table:table-cell table:style-name="ce12N2" office:value-type="float" office:value="10.8">
            <text:p>1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6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0.22">
            <text:p>1000,22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5.12">
            <text:p>1185,12</text:p>
          </table:table-cell>
          <table:table-cell table:style-name="ce12N2" office:value-type="float" office:value="82.96">
            <text:p>8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222.34">
            <text:p>2222,34</text:p>
          </table:table-cell>
          <table:table-cell table:style-name="ce12N2" office:value-type="float" office:value="361.51">
            <text:p>361,5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701006366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9">
            <text:p>31070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4.4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3.08">
            <text:p>283,080</text:p>
          </table:table-cell>
          <table:table-cell table:style-name="ce12N2" office:value-type="float" office:value="14970">
            <text:p>149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6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590.12">
            <text:p>63590,12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2.32">
            <text:p>572,32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9555.24">
            <text:p>955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44791381521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0">
            <text:p>31071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8.946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54.59">
            <text:p>2485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21827">
            <text:p>3,422</text:p>
          </table:table-cell>
          <table:table-cell table:style-name="ce12N2" office:value-type="float" office:value="759.8">
            <text:p>75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5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60.05">
            <text:p>20860,05</text:p>
          </table:table-cell>
          <table:table-cell table:style-name="ce12N2" office:value-type="float" office:value="20.84">
            <text:p>2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.72">
            <text:p>187,7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38.2">
            <text:p>138,2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1730.15">
            <text:p>173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6220550140009789461008086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1">
            <text:p>31071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62">
            <text:p>22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">
            <text:p>0,008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2.25">
            <text:p>1712,25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41">
            <text:p>15,41</text:p>
          </table:table-cell>
          <table:table-cell table:style-name="ce12N2" office:value-type="float" office:value="27.45">
            <text:p>27,4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72.82">
            <text:p>172,82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51887899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2">
            <text:p>31071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">
            <text:p>0,00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7.73">
            <text:p>1987,73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9">
            <text:p>17,8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29.63">
            <text:p>229,63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164.86">
            <text:p>1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61998071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4">
            <text:p>3107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4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.24">
            <text:p>189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35">
            <text:p>0,036</text:p>
          </table:table-cell>
          <table:table-cell table:style-name="ce12N2" office:value-type="float" office:value="13.85">
            <text:p>13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9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1.63">
            <text:p>1521,6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99.43">
            <text:p>99,43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483157055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5">
            <text:p>310715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20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05249">
            <text:p>2,605</text:p>
          </table:table-cell>
          <table:table-cell table:style-name="ce12N2" office:value-type="float" office:value="381.67">
            <text:p>38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.36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43.29">
            <text:p>61343,29</text:p>
          </table:table-cell>
          <table:table-cell table:style-name="ce12N2" office:value-type="float" office:value="61.35">
            <text:p>6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.09">
            <text:p>55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6771.43">
            <text:p>677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0142240000120550010007204661947286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73">
            <text:p>173,00</text:p>
          </table:table-cell>
          <table:table-cell table:style-name="ce26N2" office:value-type="float" office:value="26606.96">
            <text:p>26606,96</text:p>
          </table:table-cell>
          <table:table-cell table:style-name="ce26N2" office:value-type="float" office:value="7577.38">
            <text:p>7577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1332.58">
            <text:p>101332,58</text:p>
          </table:table-cell>
          <table:table-cell table:style-name="ce26N2" office:value-type="float" office:value="7070108.16">
            <text:p>7070108,16</text:p>
          </table:table-cell>
          <table:table-cell table:style-name="ce26N2" office:value-type="float" office:value="438027.41">
            <text:p>438027,4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758.2">
            <text:p>5758,20</text:p>
          </table:table-cell>
          <table:table-cell table:style-name="ce26N2" office:value-type="float" office:value="7306606.27">
            <text:p>7306606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5803.67">
            <text:p>75803,67</text:p>
          </table:table-cell>
          <table:table-cell table:style-name="ce26N2" office:value-type="float" office:value="13947.53">
            <text:p>13947,53</text:p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8765.506602">
            <text:p>48765,507</text:p>
          </table:table-cell>
          <table:table-cell table:style-name="ce26N2" office:value-type="float" office:value="7210355.74">
            <text:p>7210355,74</text:p>
          </table:table-cell>
          <table:table-cell table:style-name="ce26N2" office:value-type="float" office:value="7306606.27">
            <text:p>7306606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04643.43">
            <text:p>5904643,43</text:p>
          </table:table-cell>
          <table:table-cell table:style-name="ce26N2" office:value-type="float" office:value="5904.59">
            <text:p>5904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3141.8">
            <text:p>53141,8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75135.53">
            <text:p>275135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.65">
            <text:p>72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80" meta:object-count="0"/>
    <meta:generator>LibreOffice/4.3.0.4$Windows_x86 LibreOffice_project/62ad5818884a2fc2e5780dd45466868d41009ec0</meta:generator>
  </office:meta>
</office:document-meta>
</file>