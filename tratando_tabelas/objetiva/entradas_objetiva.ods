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2/05/2026 05:30:3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5">
            <text:p>306055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5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8.74792">
            <text:p>38,748</text:p>
          </table:table-cell>
          <table:table-cell table:style-name="ce12N2" office:value-type="float" office:value="2302.6">
            <text:p>230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8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1784.05">
            <text:p>178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21260419000152550010001459071219908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9">
            <text:p>30612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15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59.85">
            <text:p>377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63164">
            <text:p>4,063</text:p>
          </table:table-cell>
          <table:table-cell table:style-name="ce12N2" office:value-type="float" office:value="21489.76">
            <text:p>214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75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243.86">
            <text:p>243,86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2626.12">
            <text:p>262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157180812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2">
            <text:p>306202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556">
            <text:p>0,018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23.76">
            <text:p>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7128041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3">
            <text:p>306203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04">
            <text:p>0,020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26.54">
            <text:p>2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911898592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50">
            <text:p>30635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3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3.44">
            <text:p>1893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99997">
            <text:p>2,900</text:p>
          </table:table-cell>
          <table:table-cell table:style-name="ce12N2" office:value-type="float" office:value="11804.18">
            <text:p>11804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33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22.27">
            <text:p>122,27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1316.78">
            <text:p>131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30281564338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6">
            <text:p>306526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32">
            <text:p>1,523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465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1642.6">
            <text:p>164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017340084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8">
            <text:p>306528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95">
            <text:p>0,071</text:p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4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97.91">
            <text:p>9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11454297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2">
            <text:p>306552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309.56">
            <text:p>98130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3.070619">
            <text:p>53,071</text:p>
          </table:table-cell>
          <table:table-cell table:style-name="ce12N2" office:value-type="float" office:value="6522.54">
            <text:p>652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1.30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5072.51">
            <text:p>35072,51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57537.74">
            <text:p>5753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21683519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4">
            <text:p>30656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7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96.77">
            <text:p>689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34232">
            <text:p>1,334</text:p>
          </table:table-cell>
          <table:table-cell table:style-name="ce12N2" office:value-type="float" office:value="257.3">
            <text:p>257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9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17.09">
            <text:p>217,09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267.19">
            <text:p>26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74314412013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8">
            <text:p>30673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517.12">
            <text:p>465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7684">
            <text:p>3,388</text:p>
          </table:table-cell>
          <table:table-cell table:style-name="ce12N2" office:value-type="float" office:value="521.03">
            <text:p>52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51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35.06">
            <text:p>635,06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2573.89">
            <text:p>257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6191248127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2">
            <text:p>306812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870.93">
            <text:p>9587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58885">
            <text:p>7,959</text:p>
          </table:table-cell>
          <table:table-cell table:style-name="ce12N2" office:value-type="float" office:value="10340">
            <text:p>10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87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17.73">
            <text:p>3017,73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6499.72">
            <text:p>649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01015665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3">
            <text:p>306813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28.42">
            <text:p>1141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456">
            <text:p>3,275</text:p>
          </table:table-cell>
          <table:table-cell table:style-name="ce12N2" office:value-type="float" office:value="13000">
            <text:p>1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2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592.42">
            <text:p>3592,42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7737.52">
            <text:p>77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11015665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5">
            <text:p>30681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56.53">
            <text:p>9805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6816">
            <text:p>2,468</text:p>
          </table:table-cell>
          <table:table-cell table:style-name="ce12N2" office:value-type="float" office:value="7300">
            <text:p>7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05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86.53">
            <text:p>3086,53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6647.9">
            <text:p>66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21015665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91">
            <text:p>306891</text:p>
          </table:table-cell>
          <table:table-cell table:style-name="ce0" table:number-columns-spanned="4" table:number-rows-spanned="1" office:value-type="string" calcext:value-type="string">
            <text:p>3.848 - HIDROSSOL IND. E COM. DE PLASTICOS LTDA.</text:p>
          </table:table-cell>
          <table:covered-table-cell table:number-columns-repeated="3"/>
          <table:table-cell table:style-name="ce0" office:value-type="string" calcext:value-type="string">
            <text:p>57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12312">
            <text:p>2,112</text:p>
          </table:table-cell>
          <table:table-cell table:style-name="ce12N2" office:value-type="float" office:value="764.31">
            <text:p>764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0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1323.32">
            <text:p>1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5045140001555500100005752919057529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20">
            <text:p>306920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022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71.57">
            <text:p>3837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33615">
            <text:p>2,934</text:p>
          </table:table-cell>
          <table:table-cell table:style-name="ce12N2" office:value-type="float" office:value="3392.82">
            <text:p>339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371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298.71">
            <text:p>298,71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1524.62">
            <text:p>152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0221675054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11">
            <text:p>307111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149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352.72">
            <text:p>4635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">
            <text:p>31,00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152523">
            <text:p>7,153</text:p>
          </table:table-cell>
          <table:table-cell table:style-name="ce12N2" office:value-type="float" office:value="8613.53">
            <text:p>86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35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53.82">
            <text:p>753,82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1832.5">
            <text:p>183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1491306894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8">
            <text:p>3071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6.76">
            <text:p>103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616">
            <text:p>0,054</text:p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7.22">
            <text:p>67,22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67.87">
            <text:p>6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315702955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9">
            <text:p>3071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.45">
            <text:p>144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04">
            <text:p>0,041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6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88.28">
            <text:p>88,28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54.33">
            <text:p>5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51589236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0">
            <text:p>307150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0.72">
            <text:p>37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5">
            <text:p>0,137</text:p>
          </table:table-cell>
          <table:table-cell table:style-name="ce12N2" office:value-type="float" office:value="171.6">
            <text:p>1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249.57">
            <text:p>24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719398157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1">
            <text:p>30715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68.74">
            <text:p>626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299.236">
            <text:p>21299,236</text:p>
          </table:table-cell>
          <table:table-cell table:style-name="ce12N2" office:value-type="float" office:value="207.81">
            <text:p>207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6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97.32">
            <text:p>197,32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425">
            <text:p>4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818391826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4">
            <text:p>307154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634.51">
            <text:p>5563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199">
            <text:p>1,720</text:p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63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395.53">
            <text:p>3395,53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2089.56">
            <text:p>208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0391839776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5">
            <text:p>30715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9.28">
            <text:p>1230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7161">
            <text:p>0,672</text:p>
          </table:table-cell>
          <table:table-cell table:style-name="ce12N2" office:value-type="float" office:value="143.71">
            <text:p>143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53.16">
            <text:p>653,16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815.92">
            <text:p>81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091570355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4">
            <text:p>30716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85">
            <text:p>3,948</text:p>
          </table:table-cell>
          <table:table-cell table:style-name="ce12N2" office:value-type="float" office:value="1124.8">
            <text:p>1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2733.36">
            <text:p>273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827610000142550010000675741814316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7">
            <text:p>3071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4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1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281.23">
            <text:p>2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4601465598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8">
            <text:p>30718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86.85">
            <text:p>2378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00">
            <text:p>3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78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48.74">
            <text:p>748,74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1612.67">
            <text:p>161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41584130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9">
            <text:p>30718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49.06">
            <text:p>2404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4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72.03">
            <text:p>772,03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1622.23">
            <text:p>162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61568490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0">
            <text:p>3072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107.95">
            <text:p>10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41530387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3">
            <text:p>3072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3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192.72">
            <text:p>19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01044736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5">
            <text:p>3072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63.62">
            <text:p>6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6142473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6">
            <text:p>3072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8">
            <text:p>0,003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215.89">
            <text:p>215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31559226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7">
            <text:p>3072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52">
            <text:p>0,001</text:p>
          </table:table-cell>
          <table:table-cell table:style-name="ce12N2" office:value-type="float" office:value="9.65">
            <text:p>9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590.32">
            <text:p>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91857476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8">
            <text:p>307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8">
            <text:p>0,000</text:p>
          </table:table-cell>
          <table:table-cell table:style-name="ce12N2" office:value-type="float" office:value="3.89">
            <text:p>3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0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189.4">
            <text:p>18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21807035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9">
            <text:p>3072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4.3">
            <text:p>316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656">
            <text:p>0,047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3.13">
            <text:p>193,13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118.85">
            <text:p>11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11277077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0">
            <text:p>3072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11819923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2">
            <text:p>3072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2.45">
            <text:p>424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056">
            <text:p>0,012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58.93">
            <text:p>258,93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278.85">
            <text:p>27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91687859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3">
            <text:p>3072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63.67">
            <text:p>636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84">
            <text:p>0,018</text:p>
          </table:table-cell>
          <table:table-cell table:style-name="ce12N2" office:value-type="float" office:value="7.06">
            <text:p>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63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88.39">
            <text:p>388,39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418.27">
            <text:p>41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819941113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4">
            <text:p>3072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4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117.9">
            <text:p>11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51611884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6">
            <text:p>307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26">
            <text:p>0,001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2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289.07">
            <text:p>28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71533603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7">
            <text:p>3072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2">
            <text:p>0,001</text:p>
          </table:table-cell>
          <table:table-cell table:style-name="ce12N2" office:value-type="float" office:value="15.55">
            <text:p>1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797.45">
            <text:p>79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313228677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8">
            <text:p>3072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5.34">
            <text:p>96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28">
            <text:p>0,005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5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8.92">
            <text:p>58,92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63.45">
            <text:p>6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710700137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9">
            <text:p>3072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02">
            <text:p>0,060</text:p>
          </table:table-cell>
          <table:table-cell table:style-name="ce12N2" office:value-type="float" office:value="36.35">
            <text:p>36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12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1526.85">
            <text:p>15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01617954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0">
            <text:p>3072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782.27">
            <text:p>43478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433693.99">
            <text:p>433693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679331">
            <text:p>17,679</text:p>
          </table:table-cell>
          <table:table-cell table:style-name="ce12N2" office:value-type="float" office:value="1691.18">
            <text:p>169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4.782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088.28">
            <text:p>1088,28</text:p>
          </table:table-cell>
          <table:table-cell table:style-name="ce12N2" office:value-type="float" office:value="430570.54">
            <text:p>430570,54</text:p>
          </table:table-cell>
          <table:table-cell table:style-name="ce12N2" office:value-type="float" office:value="25868.84">
            <text:p>258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91906483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1">
            <text:p>307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">
            <text:p>0,001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50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2065.61">
            <text:p>206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11926848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6">
            <text:p>30724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0.6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71.78">
            <text:p>10637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13816">
            <text:p>7,414</text:p>
          </table:table-cell>
          <table:table-cell table:style-name="ce12N2" office:value-type="float" office:value="3329.13">
            <text:p>3329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371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28.18">
            <text:p>128,18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6817.63">
            <text:p>681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06791202127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7">
            <text:p>3072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96.46">
            <text:p>1689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3408">
            <text:p>0,663</text:p>
          </table:table-cell>
          <table:table-cell table:style-name="ce12N2" office:value-type="float" office:value="243.9">
            <text:p>2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9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31.85">
            <text:p>531,85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1145.52">
            <text:p>114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01571134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8">
            <text:p>3072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3.3">
            <text:p>1026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9232">
            <text:p>0,389</text:p>
          </table:table-cell>
          <table:table-cell table:style-name="ce12N2" office:value-type="float" office:value="143.1">
            <text:p>14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6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23.06">
            <text:p>323,06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695.82">
            <text:p>695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2157113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9">
            <text:p>3072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2.12">
            <text:p>542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632">
            <text:p>0,206</text:p>
          </table:table-cell>
          <table:table-cell table:style-name="ce12N2" office:value-type="float" office:value="75.6">
            <text:p>7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2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67">
            <text:p>170,67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367.6">
            <text:p>3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615711347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0">
            <text:p>3072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16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6.93">
            <text:p>315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64.25">
            <text:p>296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9">
            <text:p>0,002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6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2.68">
            <text:p>192,68</text:p>
          </table:table-cell>
          <table:table-cell table:style-name="ce12N2" office:value-type="float" office:value="2964.25">
            <text:p>2964,25</text:p>
          </table:table-cell>
          <table:table-cell table:style-name="ce12N2" office:value-type="float" office:value="207.5">
            <text:p>20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1671337729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9">
            <text:p>307279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2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03.95">
            <text:p>2410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">
            <text:p>0,520</text:p>
          </table:table-cell>
          <table:table-cell table:style-name="ce12N2" office:value-type="float" office:value="16.25">
            <text:p>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0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191.45">
            <text:p>1191,45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1603.88">
            <text:p>160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27611000128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5">
            <text:p>307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052">
            <text:p>0,074</text:p>
          </table:table-cell>
          <table:table-cell table:style-name="ce12N2" office:value-type="float" office:value="87.34">
            <text:p>8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37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1455">
            <text:p>14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8105097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8">
            <text:p>307298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5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0.48">
            <text:p>783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52">
            <text:p>1,152</text:p>
          </table:table-cell>
          <table:table-cell table:style-name="ce12N2" office:value-type="float" office:value="864">
            <text:p>8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46.48">
            <text:p>246,48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530.88">
            <text:p>53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55581194099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4">
            <text:p>3073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75">
            <text:p>0,127</text:p>
          </table:table-cell>
          <table:table-cell table:style-name="ce12N2" office:value-type="float" office:value="135.4">
            <text:p>13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75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3343.17">
            <text:p>334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6841818745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7">
            <text:p>307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544">
            <text:p>0,021</text:p>
          </table:table-cell>
          <table:table-cell table:style-name="ce12N2" office:value-type="float" office:value="4.28">
            <text:p>4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2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156.07">
            <text:p>15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041084287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9">
            <text:p>307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46">
            <text:p>0,125</text:p>
          </table:table-cell>
          <table:table-cell table:style-name="ce12N2" office:value-type="float" office:value="28.5">
            <text:p>2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1404.34">
            <text:p>140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301349019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5">
            <text:p>30733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4.35">
            <text:p>118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76">
            <text:p>0,020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4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7.28">
            <text:p>37,28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80.29">
            <text:p>8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01570337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6">
            <text:p>30733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3.86">
            <text:p>171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08">
            <text:p>0,094</text:p>
          </table:table-cell>
          <table:table-cell table:style-name="ce12N2" office:value-type="float" office:value="15.68">
            <text:p>1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2.26">
            <text:p>152,26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109.31">
            <text:p>10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51581548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0">
            <text:p>30734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74.94">
            <text:p>66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45">
            <text:p>63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">
            <text:p>0,144</text:p>
          </table:table-cell>
          <table:table-cell table:style-name="ce12N2" office:value-type="float" office:value="4.5">
            <text:p>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74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29.94">
            <text:p>329,94</text:p>
          </table:table-cell>
          <table:table-cell table:style-name="ce12N2" office:value-type="float" office:value="6345">
            <text:p>6345,00</text:p>
          </table:table-cell>
          <table:table-cell table:style-name="ce12N2" office:value-type="float" office:value="444.15">
            <text:p>44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6781100018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5">
            <text:p>30734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6.85">
            <text:p>168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502">
            <text:p>0,050</text:p>
          </table:table-cell>
          <table:table-cell table:style-name="ce12N2" office:value-type="float" office:value="107.16">
            <text:p>107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2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529.66">
            <text:p>529,66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1140.81">
            <text:p>114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11455403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6">
            <text:p>30734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.31">
            <text:p>91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5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62.06">
            <text:p>6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21111596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9">
            <text:p>30734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73">
            <text:p>0,025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7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460.37">
            <text:p>46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351909237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4">
            <text:p>3073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46">
            <text:p>0,049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5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920.74">
            <text:p>92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361597315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3">
            <text:p>3073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1.37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2">
            <text:p>4,42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1784.3">
            <text:p>178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13741092917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4">
            <text:p>307374</text:p>
          </table:table-cell>
          <table:table-cell table:style-name="ce0" table:number-columns-spanned="4" table:number-rows-spanned="1" office:value-type="string" calcext:value-type="string">
            <text:p>29.615 - TENASTEEL INDUSTRIA E COMERCIO LTDA</text:p>
          </table:table-cell>
          <table:covered-table-cell table:number-columns-repeated="3"/>
          <table:table-cell table:style-name="ce0" office:value-type="string" calcext:value-type="string">
            <text:p>9.05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57.55">
            <text:p>1955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8801.4">
            <text:p>1880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159">
            <text:p>0,292</text:p>
          </table:table-cell>
          <table:table-cell table:style-name="ce12N2" office:value-type="float" office:value="743.76">
            <text:p>74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5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.42">
            <text:p>47,4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756.15">
            <text:p>756,15</text:p>
          </table:table-cell>
          <table:table-cell table:style-name="ce12N2" office:value-type="float" office:value="18801.4">
            <text:p>18801,40</text:p>
          </table:table-cell>
          <table:table-cell table:style-name="ce12N2" office:value-type="float" office:value="1316.09">
            <text:p>131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14048772000108550040000090551139587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7">
            <text:p>307377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98">
            <text:p>0,890</text:p>
          </table:table-cell>
          <table:table-cell table:style-name="ce12N2" office:value-type="float" office:value="59.52">
            <text:p>5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47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22913200355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3">
            <text:p>3073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26">
            <text:p>0,019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49.29">
            <text:p>4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41945775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4">
            <text:p>3073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84">
            <text:p>0,001</text:p>
          </table:table-cell>
          <table:table-cell table:style-name="ce12N2" office:value-type="float" office:value="30.51">
            <text:p>3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0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1239.37">
            <text:p>123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51607923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5">
            <text:p>3073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32">
            <text:p>0,001</text:p>
          </table:table-cell>
          <table:table-cell table:style-name="ce12N2" office:value-type="float" office:value="23.73">
            <text:p>23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7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963.95">
            <text:p>9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61828839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7">
            <text:p>3073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8">
            <text:p>0,006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44.57">
            <text:p>44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81357376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8">
            <text:p>3073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0.29">
            <text:p>0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9182715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0">
            <text:p>307390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2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76.69">
            <text:p>6437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61795.15">
            <text:p>61795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230413">
            <text:p>14,230</text:p>
          </table:table-cell>
          <table:table-cell table:style-name="ce12N2" office:value-type="float" office:value="491.4">
            <text:p>49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376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88">
            <text:p>54,8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2581.54">
            <text:p>2581,54</text:p>
          </table:table-cell>
          <table:table-cell table:style-name="ce12N2" office:value-type="float" office:value="59923.43">
            <text:p>59923,43</text:p>
          </table:table-cell>
          <table:table-cell table:style-name="ce12N2" office:value-type="float" office:value="3000.7">
            <text:p>300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29491488662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8">
            <text:p>3073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2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24.64">
            <text:p>2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91462833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9">
            <text:p>3073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78">
            <text:p>0,058</text:p>
          </table:table-cell>
          <table:table-cell table:style-name="ce12N2" office:value-type="float" office:value="9.91">
            <text:p>9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147.87">
            <text:p>1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01180872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0">
            <text:p>3074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016">
            <text:p>0,119</text:p>
          </table:table-cell>
          <table:table-cell table:style-name="ce12N2" office:value-type="float" office:value="56.34">
            <text:p>56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209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1554.68">
            <text:p>155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11902782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1">
            <text:p>307401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8.7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7.36">
            <text:p>352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86.1">
            <text:p>338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55">
            <text:p>0,078</text:p>
          </table:table-cell>
          <table:table-cell table:style-name="ce12N2" office:value-type="float" office:value="21.88">
            <text:p>2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41.26">
            <text:p>141,26</text:p>
          </table:table-cell>
          <table:table-cell table:style-name="ce12N2" office:value-type="float" office:value="3386.1">
            <text:p>3386,10</text:p>
          </table:table-cell>
          <table:table-cell table:style-name="ce12N2" office:value-type="float" office:value="233.98">
            <text:p>23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3306426200025055001000268747120516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3">
            <text:p>30740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1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9.43">
            <text:p>266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2.39">
            <text:p>2482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436">
            <text:p>0,041</text:p>
          </table:table-cell>
          <table:table-cell table:style-name="ce12N2" office:value-type="float" office:value="24.17">
            <text:p>24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87.04">
            <text:p>187,04</text:p>
          </table:table-cell>
          <table:table-cell table:style-name="ce12N2" office:value-type="float" office:value="2482.39">
            <text:p>2482,39</text:p>
          </table:table-cell>
          <table:table-cell table:style-name="ce12N2" office:value-type="float" office:value="173.77">
            <text:p>17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1011570291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0">
            <text:p>307430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68.7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76">
            <text:p>827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776">
            <text:p>827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7.053904">
            <text:p>57,054</text:p>
          </table:table-cell>
          <table:table-cell table:style-name="ce12N2" office:value-type="float" office:value="4260">
            <text:p>42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7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82.42">
            <text:p>60782,42</text:p>
          </table:table-cell>
          <table:table-cell table:style-name="ce12N2" office:value-type="float" office:value="4254.77">
            <text:p>425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6840537000121550010003687571045571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4">
            <text:p>30743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4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3.4">
            <text:p>843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05.72">
            <text:p>780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9048">
            <text:p>0,489</text:p>
          </table:table-cell>
          <table:table-cell table:style-name="ce12N2" office:value-type="float" office:value="69.4">
            <text:p>6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627.68">
            <text:p>627,68</text:p>
          </table:table-cell>
          <table:table-cell table:style-name="ce12N2" office:value-type="float" office:value="7805.72">
            <text:p>7805,72</text:p>
          </table:table-cell>
          <table:table-cell table:style-name="ce12N2" office:value-type="float" office:value="312.23">
            <text:p>31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410080034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5">
            <text:p>307435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8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54.54">
            <text:p>1585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86.56">
            <text:p>13786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6">
            <text:p>0,015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85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067.98">
            <text:p>2067,98</text:p>
          </table:table-cell>
          <table:table-cell table:style-name="ce12N2" office:value-type="float" office:value="13786.56">
            <text:p>13786,56</text:p>
          </table:table-cell>
          <table:table-cell table:style-name="ce12N2" office:value-type="float" office:value="965.06">
            <text:p>96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810007985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6">
            <text:p>30743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7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3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31996">
            <text:p>7,932</text:p>
          </table:table-cell>
          <table:table-cell table:style-name="ce12N2" office:value-type="float" office:value="1295.38">
            <text:p>129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88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3251.68">
            <text:p>325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75991998297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7">
            <text:p>307437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7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1156">
            <text:p>0,712</text:p>
          </table:table-cell>
          <table:table-cell table:style-name="ce12N2" office:value-type="float" office:value="41.14">
            <text:p>41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9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1224.88">
            <text:p>122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710078338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8">
            <text:p>307438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7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5.5">
            <text:p>557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00">
            <text:p>54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4">
            <text:p>1,44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">
            <text:p>5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75.5">
            <text:p>175,50</text:p>
          </table:table-cell>
          <table:table-cell table:style-name="ce12N2" office:value-type="float" office:value="5400">
            <text:p>5400,00</text:p>
          </table:table-cell>
          <table:table-cell table:style-name="ce12N2" office:value-type="float" office:value="378">
            <text:p>37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74011259290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0">
            <text:p>30744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5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34">
            <text:p>0,053</text:p>
          </table:table-cell>
          <table:table-cell table:style-name="ce12N2" office:value-type="float" office:value="26.86">
            <text:p>26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9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594.73">
            <text:p>59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5711504332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5">
            <text:p>3074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28">
            <text:p>0,002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.21">
            <text:p>234,21</text:p>
          </table:table-cell>
          <table:table-cell table:style-name="ce12N2" office:value-type="float" office:value="16.39">
            <text:p>16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51599363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6">
            <text:p>3074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224">
            <text:p>0,013</text:p>
          </table:table-cell>
          <table:table-cell table:style-name="ce12N2" office:value-type="float" office:value="6.26">
            <text:p>6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7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172.74">
            <text:p>17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617416353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7">
            <text:p>3074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836">
            <text:p>0,198</text:p>
          </table:table-cell>
          <table:table-cell table:style-name="ce12N2" office:value-type="float" office:value="93.9">
            <text:p>9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01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2591.13">
            <text:p>259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71798311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8">
            <text:p>3074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84">
            <text:p>0,002</text:p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75.05">
            <text:p>7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811667505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9">
            <text:p>3074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831.73">
            <text:p>4508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">
            <text:p>91,00</text:p>
          </table:table-cell>
          <table:table-cell table:style-name="ce12N2" office:value-type="float" office:value="448672.28">
            <text:p>44867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811394">
            <text:p>17,811</text:p>
          </table:table-cell>
          <table:table-cell table:style-name="ce12N2" office:value-type="float" office:value="1457.6">
            <text:p>145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.8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159.45">
            <text:p>2159,45</text:p>
          </table:table-cell>
          <table:table-cell table:style-name="ce12N2" office:value-type="float" office:value="442130.72">
            <text:p>442130,72</text:p>
          </table:table-cell>
          <table:table-cell table:style-name="ce12N2" office:value-type="float" office:value="27913.85">
            <text:p>279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91479097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0">
            <text:p>30745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56.8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4.37">
            <text:p>115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3.92">
            <text:p>10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926">
            <text:p>0,086</text:p>
          </table:table-cell>
          <table:table-cell table:style-name="ce12N2" office:value-type="float" office:value="13.08">
            <text:p>13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70.45">
            <text:p>70,45</text:p>
          </table:table-cell>
          <table:table-cell table:style-name="ce12N2" office:value-type="float" office:value="1083.92">
            <text:p>1083,92</text:p>
          </table:table-cell>
          <table:table-cell table:style-name="ce12N2" office:value-type="float" office:value="75.87">
            <text:p>7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568821219493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1">
            <text:p>307451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56.8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6.84">
            <text:p>303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51.5">
            <text:p>285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6912">
            <text:p>0,277</text:p>
          </table:table-cell>
          <table:table-cell table:style-name="ce12N2" office:value-type="float" office:value="34.44">
            <text:p>3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36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85.34">
            <text:p>185,34</text:p>
          </table:table-cell>
          <table:table-cell table:style-name="ce12N2" office:value-type="float" office:value="2851.5">
            <text:p>2851,50</text:p>
          </table:table-cell>
          <table:table-cell table:style-name="ce12N2" office:value-type="float" office:value="199.6">
            <text:p>19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5688012995634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2">
            <text:p>30745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4.18">
            <text:p>122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2">
            <text:p>0,067</text:p>
          </table:table-cell>
          <table:table-cell table:style-name="ce12N2" office:value-type="float" office:value="11.2">
            <text:p>1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8.75">
            <text:p>108,75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78.08">
            <text:p>7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91581555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8">
            <text:p>307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85.24">
            <text:p>1988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671.59">
            <text:p>1867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01827">
            <text:p>5,602</text:p>
          </table:table-cell>
          <table:table-cell table:style-name="ce12N2" office:value-type="float" office:value="34.86">
            <text:p>34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85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213.65">
            <text:p>1213,65</text:p>
          </table:table-cell>
          <table:table-cell table:style-name="ce12N2" office:value-type="float" office:value="18671.59">
            <text:p>18671,59</text:p>
          </table:table-cell>
          <table:table-cell table:style-name="ce12N2" office:value-type="float" office:value="746.86">
            <text:p>7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01191149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9">
            <text:p>30746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398">
            <text:p>0,114</text:p>
          </table:table-cell>
          <table:table-cell table:style-name="ce12N2" office:value-type="float" office:value="32.04">
            <text:p>3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2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141.67">
            <text:p>14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20871140136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3">
            <text:p>307473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5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062">
            <text:p>0,461</text:p>
          </table:table-cell>
          <table:table-cell table:style-name="ce12N2" office:value-type="float" office:value="116.46">
            <text:p>11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466.33">
            <text:p>46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510007744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4">
            <text:p>30747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110.54">
            <text:p>5411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654.08">
            <text:p>5265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3968">
            <text:p>0,974</text:p>
          </table:table-cell>
          <table:table-cell table:style-name="ce12N2" office:value-type="float" office:value="2222.66">
            <text:p>222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11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456.46">
            <text:p>1456,46</text:p>
          </table:table-cell>
          <table:table-cell table:style-name="ce12N2" office:value-type="float" office:value="52654.08">
            <text:p>52654,08</text:p>
          </table:table-cell>
          <table:table-cell table:style-name="ce12N2" office:value-type="float" office:value="3685.78">
            <text:p>368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610041572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2">
            <text:p>3074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3">
            <text:p>0,006</text:p>
          </table:table-cell>
          <table:table-cell table:style-name="ce12N2" office:value-type="float" office:value="4.17">
            <text:p>4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8.3">
            <text:p>878,30</text:p>
          </table:table-cell>
          <table:table-cell table:style-name="ce12N2" office:value-type="float" office:value="61.48">
            <text:p>6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31685412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3">
            <text:p>3074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2">
            <text:p>0,002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.32">
            <text:p>351,32</text:p>
          </table:table-cell>
          <table:table-cell table:style-name="ce12N2" office:value-type="float" office:value="24.59">
            <text:p>2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21970174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4">
            <text:p>307494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7.78">
            <text:p>1960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5932">
            <text:p>0,386</text:p>
          </table:table-cell>
          <table:table-cell table:style-name="ce12N2" office:value-type="float" office:value="107.63">
            <text:p>1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0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914.63">
            <text:p>914,63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747.73">
            <text:p>7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31326491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5">
            <text:p>307495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735.71">
            <text:p>11173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32063">
            <text:p>2,832</text:p>
          </table:table-cell>
          <table:table-cell table:style-name="ce12N2" office:value-type="float" office:value="608.49">
            <text:p>608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73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">
            <text:p>3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6875.59">
            <text:p>6875,59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4194.4">
            <text:p>4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61601434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6">
            <text:p>307496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3.57">
            <text:p>216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915">
            <text:p>0,040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63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110.12">
            <text:p>110,12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82.14">
            <text:p>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41489216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19">
            <text:p>30751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8.1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877.44">
            <text:p>25887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">
            <text:p>144,00</text:p>
          </table:table-cell>
          <table:table-cell table:style-name="ce12N2" office:value-type="float" office:value="258783.1">
            <text:p>25878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5.698145">
            <text:p>95,698</text:p>
          </table:table-cell>
          <table:table-cell table:style-name="ce12N2" office:value-type="float" office:value="3814.33">
            <text:p>3814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8.877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94.34">
            <text:p>94,34</text:p>
          </table:table-cell>
          <table:table-cell table:style-name="ce12N2" office:value-type="float" office:value="258591">
            <text:p>258591,00</text:p>
          </table:table-cell>
          <table:table-cell table:style-name="ce12N2" office:value-type="float" office:value="17677.95">
            <text:p>1767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81471185481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20">
            <text:p>30752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350.65">
            <text:p>20835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">
            <text:p>146,00</text:p>
          </table:table-cell>
          <table:table-cell table:style-name="ce12N2" office:value-type="float" office:value="205582.83">
            <text:p>205582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2.033295">
            <text:p>172,033</text:p>
          </table:table-cell>
          <table:table-cell table:style-name="ce12N2" office:value-type="float" office:value="4387.54">
            <text:p>438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8.350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2767.82">
            <text:p>2767,82</text:p>
          </table:table-cell>
          <table:table-cell table:style-name="ce12N2" office:value-type="float" office:value="205099.2">
            <text:p>205099,20</text:p>
          </table:table-cell>
          <table:table-cell table:style-name="ce12N2" office:value-type="float" office:value="13431.74">
            <text:p>1343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842318280099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21">
            <text:p>30752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8.5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3368.9">
            <text:p>31336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">
            <text:p>79,00</text:p>
          </table:table-cell>
          <table:table-cell table:style-name="ce12N2" office:value-type="float" office:value="310972.34">
            <text:p>31097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80.048432">
            <text:p>380,048</text:p>
          </table:table-cell>
          <table:table-cell table:style-name="ce12N2" office:value-type="float" office:value="3627.3">
            <text:p>3627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3.36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2396.56">
            <text:p>2396,56</text:p>
          </table:table-cell>
          <table:table-cell table:style-name="ce12N2" office:value-type="float" office:value="309813">
            <text:p>309813,00</text:p>
          </table:table-cell>
          <table:table-cell table:style-name="ce12N2" office:value-type="float" office:value="20787.77">
            <text:p>2078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85781769008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0">
            <text:p>3075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0.48">
            <text:p>111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2.7">
            <text:p>104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33">
            <text:p>0,295</text:p>
          </table:table-cell>
          <table:table-cell table:style-name="ce12N2" office:value-type="float" office:value="3.82">
            <text:p>3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7.78">
            <text:p>67,78</text:p>
          </table:table-cell>
          <table:table-cell table:style-name="ce12N2" office:value-type="float" office:value="1042.7">
            <text:p>1042,70</text:p>
          </table:table-cell>
          <table:table-cell table:style-name="ce12N2" office:value-type="float" office:value="41.71">
            <text:p>4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11715382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1">
            <text:p>3075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2.37">
            <text:p>809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5">
            <text:p>0,015</text:p>
          </table:table-cell>
          <table:table-cell table:style-name="ce12N2" office:value-type="float" office:value="17.85">
            <text:p>1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2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23.37">
            <text:p>623,37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298.76">
            <text:p>2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81572145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2">
            <text:p>30758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46.61">
            <text:p>664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">
            <text:p>0,012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4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590.47">
            <text:p>590,47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242.25">
            <text:p>24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71572146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3">
            <text:p>3075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8">
            <text:p>0,001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65.07">
            <text:p>6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41975247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9">
            <text:p>3075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1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.66">
            <text:p>32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.6">
            <text:p>30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">
            <text:p>0,001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308.6">
            <text:p>308,60</text:p>
          </table:table-cell>
          <table:table-cell table:style-name="ce12N2" office:value-type="float" office:value="21.6">
            <text:p>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188712967961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2">
            <text:p>307592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723.8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0.35">
            <text:p>578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66.84">
            <text:p>5266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4025">
            <text:p>0,794</text:p>
          </table:table-cell>
          <table:table-cell table:style-name="ce12N2" office:value-type="float" office:value="145.05">
            <text:p>14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13.51">
            <text:p>513,51</text:p>
          </table:table-cell>
          <table:table-cell table:style-name="ce12N2" office:value-type="float" office:value="5266.84">
            <text:p>5266,84</text:p>
          </table:table-cell>
          <table:table-cell table:style-name="ce12N2" office:value-type="float" office:value="210.68">
            <text:p>2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50213052500017755003000723800153158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3">
            <text:p>307593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68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22.88">
            <text:p>2272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712.46">
            <text:p>2271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89513">
            <text:p>1,895</text:p>
          </table:table-cell>
          <table:table-cell table:style-name="ce12N2" office:value-type="float" office:value="288">
            <text:p>28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72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0.42">
            <text:p>10,42</text:p>
          </table:table-cell>
          <table:table-cell table:style-name="ce12N2" office:value-type="float" office:value="22712.46">
            <text:p>22712,46</text:p>
          </table:table-cell>
          <table:table-cell table:style-name="ce12N2" office:value-type="float" office:value="908.5">
            <text:p>90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6840537000121550010003689091209171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5">
            <text:p>307595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5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24.15">
            <text:p>16822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68224.15">
            <text:p>168224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44.6551">
            <text:p>444,655</text:p>
          </table:table-cell>
          <table:table-cell table:style-name="ce12N2" office:value-type="float" office:value="2564.6">
            <text:p>256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.224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224.15">
            <text:p>168224,15</text:p>
          </table:table-cell>
          <table:table-cell table:style-name="ce12N2" office:value-type="float" office:value="11775.69">
            <text:p>1177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508213280873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6">
            <text:p>307596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5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599.16">
            <text:p>23159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31599.16">
            <text:p>23159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7.6851">
            <text:p>697,685</text:p>
          </table:table-cell>
          <table:table-cell table:style-name="ce12N2" office:value-type="float" office:value="3142.4">
            <text:p>314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1.599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599.16">
            <text:p>231599,16</text:p>
          </table:table-cell>
          <table:table-cell table:style-name="ce12N2" office:value-type="float" office:value="16211.94">
            <text:p>1621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507919750241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0">
            <text:p>307600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4.2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9">
            <text:p>204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">
            <text:p>0,003</text:p>
          </table:table-cell>
          <table:table-cell table:style-name="ce12N2" office:value-type="float" office:value="49.5">
            <text:p>4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64.5">
            <text:p>64,5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138.92">
            <text:p>13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427116974982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6">
            <text:p>30760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5.21">
            <text:p>213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8">
            <text:p>20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6.38">
            <text:p>6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35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67.21">
            <text:p>67,21</text:p>
          </table:table-cell>
          <table:table-cell table:style-name="ce12N2" office:value-type="float" office:value="2068">
            <text:p>2068,00</text:p>
          </table:table-cell>
          <table:table-cell table:style-name="ce12N2" office:value-type="float" office:value="144.76">
            <text:p>14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218675791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7">
            <text:p>30760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1.72">
            <text:p>126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2">
            <text:p>122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9">
            <text:p>0,0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1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39.72">
            <text:p>39,72</text:p>
          </table:table-cell>
          <table:table-cell table:style-name="ce12N2" office:value-type="float" office:value="1222">
            <text:p>1222,00</text:p>
          </table:table-cell>
          <table:table-cell table:style-name="ce12N2" office:value-type="float" office:value="85.54">
            <text:p>8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311469010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9">
            <text:p>307609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4.5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4.85">
            <text:p>150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30.46">
            <text:p>1430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54">
            <text:p>0,046</text:p>
          </table:table-cell>
          <table:table-cell table:style-name="ce12N2" office:value-type="float" office:value="15.35">
            <text:p>15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0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74.39">
            <text:p>74,39</text:p>
          </table:table-cell>
          <table:table-cell table:style-name="ce12N2" office:value-type="float" office:value="1430.46">
            <text:p>1430,46</text:p>
          </table:table-cell>
          <table:table-cell table:style-name="ce12N2" office:value-type="float" office:value="100.14">
            <text:p>10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45761100030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1">
            <text:p>30761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18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10.54">
            <text:p>421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78">
            <text:p>40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">
            <text:p>0,010</text:p>
          </table:table-cell>
          <table:table-cell table:style-name="ce12N2" office:value-type="float" office:value="9.8">
            <text:p>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1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32.54">
            <text:p>132,54</text:p>
          </table:table-cell>
          <table:table-cell table:style-name="ce12N2" office:value-type="float" office:value="4078">
            <text:p>4078,00</text:p>
          </table:table-cell>
          <table:table-cell table:style-name="ce12N2" office:value-type="float" office:value="163.12">
            <text:p>16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18411913162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2">
            <text:p>307612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79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56.25">
            <text:p>525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5125.98">
            <text:p>512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93093">
            <text:p>42,931</text:p>
          </table:table-cell>
          <table:table-cell table:style-name="ce12N2" office:value-type="float" office:value="332.15">
            <text:p>33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56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30.27">
            <text:p>130,27</text:p>
          </table:table-cell>
          <table:table-cell table:style-name="ce12N2" office:value-type="float" office:value="4912.66">
            <text:p>4912,66</text:p>
          </table:table-cell>
          <table:table-cell table:style-name="ce12N2" office:value-type="float" office:value="343.9">
            <text:p>34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1913681000134550010001798341462989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5">
            <text:p>30761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4.98">
            <text:p>215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40.12">
            <text:p>214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1881">
            <text:p>0,242</text:p>
          </table:table-cell>
          <table:table-cell table:style-name="ce12N2" office:value-type="float" office:value="22.18">
            <text:p>22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54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4.86">
            <text:p>14,86</text:p>
          </table:table-cell>
          <table:table-cell table:style-name="ce12N2" office:value-type="float" office:value="2140.12">
            <text:p>2140,12</text:p>
          </table:table-cell>
          <table:table-cell table:style-name="ce12N2" office:value-type="float" office:value="149.81">
            <text:p>14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171536345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6">
            <text:p>30761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1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9">
            <text:p>168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14.3">
            <text:p>161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1">
            <text:p>0,009</text:p>
          </table:table-cell>
          <table:table-cell table:style-name="ce12N2" office:value-type="float" office:value="8.75">
            <text:p>8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72.6">
            <text:p>72,60</text:p>
          </table:table-cell>
          <table:table-cell table:style-name="ce12N2" office:value-type="float" office:value="1614.3">
            <text:p>1614,30</text:p>
          </table:table-cell>
          <table:table-cell table:style-name="ce12N2" office:value-type="float" office:value="96.85">
            <text:p>9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151931713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8">
            <text:p>307618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7.8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231">
            <text:p>3323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231">
            <text:p>3323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4.602">
            <text:p>64,602</text:p>
          </table:table-cell>
          <table:table-cell table:style-name="ce12N2" office:value-type="float" office:value="1500">
            <text:p>15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23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231">
            <text:p>33231,00</text:p>
          </table:table-cell>
          <table:table-cell table:style-name="ce12N2" office:value-type="float" office:value="2326.17">
            <text:p>232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784318138834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9">
            <text:p>307619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7.8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231">
            <text:p>3323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231">
            <text:p>3323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4.602">
            <text:p>64,602</text:p>
          </table:table-cell>
          <table:table-cell table:style-name="ce12N2" office:value-type="float" office:value="1500">
            <text:p>15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23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231">
            <text:p>33231,00</text:p>
          </table:table-cell>
          <table:table-cell table:style-name="ce12N2" office:value-type="float" office:value="2326.17">
            <text:p>232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784212263223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20">
            <text:p>307620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7.8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231">
            <text:p>3323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231">
            <text:p>3323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4.602">
            <text:p>64,602</text:p>
          </table:table-cell>
          <table:table-cell table:style-name="ce12N2" office:value-type="float" office:value="1500">
            <text:p>15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23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231">
            <text:p>33231,00</text:p>
          </table:table-cell>
          <table:table-cell table:style-name="ce12N2" office:value-type="float" office:value="2326.17">
            <text:p>232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78411639116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21">
            <text:p>307621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7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784018512309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22">
            <text:p>307622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7.8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7839128000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23">
            <text:p>307623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7.8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78381805663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24">
            <text:p>307624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7.8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0887">
            <text:p>22,089</text:p>
          </table:table-cell>
          <table:table-cell table:style-name="ce12N2" office:value-type="float" office:value="1050">
            <text:p>1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8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62">
            <text:p>32862,00</text:p>
          </table:table-cell>
          <table:table-cell table:style-name="ce12N2" office:value-type="float" office:value="2300.34">
            <text:p>230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6557984000499550010000178371787907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2">
            <text:p>30763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955.92">
            <text:p>19095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">
            <text:p>41,00</text:p>
          </table:table-cell>
          <table:table-cell table:style-name="ce12N2" office:value-type="float" office:value="190700.26">
            <text:p>1907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252118">
            <text:p>12,252</text:p>
          </table:table-cell>
          <table:table-cell table:style-name="ce12N2" office:value-type="float" office:value="5183.76">
            <text:p>518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0.95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55.66">
            <text:p>255,66</text:p>
          </table:table-cell>
          <table:table-cell table:style-name="ce12N2" office:value-type="float" office:value="190700.26">
            <text:p>190700,26</text:p>
          </table:table-cell>
          <table:table-cell table:style-name="ce12N2" office:value-type="float" office:value="12356.96">
            <text:p>123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1511727836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4">
            <text:p>307634</text:p>
          </table:table-cell>
          <table:table-cell table:style-name="ce0" table:number-columns-spanned="4" table:number-rows-spanned="1" office:value-type="string" calcext:value-type="string">
            <text:p>480 - HAGA S/A INDUSTRIA E COMERCIO LTDA</text:p>
          </table:table-cell>
          <table:covered-table-cell table:number-columns-repeated="3"/>
          <table:table-cell table:style-name="ce0" office:value-type="string" calcext:value-type="string">
            <text:p>108.1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08">
            <text:p>0,121</text:p>
          </table:table-cell>
          <table:table-cell table:style-name="ce12N2" office:value-type="float" office:value="44.16">
            <text:p>4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1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308.89">
            <text:p>30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30540991000166550010001081911363840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5">
            <text:p>307635</text:p>
          </table:table-cell>
          <table:table-cell table:style-name="ce0" table:number-columns-spanned="4" table:number-rows-spanned="1" office:value-type="string" calcext:value-type="string">
            <text:p>38.606 - FIOLUX INDUSTRIA E COMERCIO LTDA</text:p>
          </table:table-cell>
          <table:covered-table-cell table:number-columns-repeated="3"/>
          <table:table-cell table:style-name="ce0" office:value-type="string" calcext:value-type="string">
            <text:p>20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1.5">
            <text:p>477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347.6">
            <text:p>434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194">
            <text:p>0,192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23.9">
            <text:p>423,90</text:p>
          </table:table-cell>
          <table:table-cell table:style-name="ce12N2" office:value-type="float" office:value="4347.6">
            <text:p>4347,60</text:p>
          </table:table-cell>
          <table:table-cell table:style-name="ce12N2" office:value-type="float" office:value="521.72">
            <text:p>52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596420914000342550010000205081009327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8">
            <text:p>30763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5.1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014.6">
            <text:p>25601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56014.6">
            <text:p>25601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97417">
            <text:p>24,974</text:p>
          </table:table-cell>
          <table:table-cell table:style-name="ce12N2" office:value-type="float" office:value="9996.98">
            <text:p>9996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6.014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014.6">
            <text:p>256014,60</text:p>
          </table:table-cell>
          <table:table-cell table:style-name="ce12N2" office:value-type="float" office:value="12665.56">
            <text:p>1266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511219895243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43">
            <text:p>307643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4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05973">
            <text:p>3,606</text:p>
          </table:table-cell>
          <table:table-cell table:style-name="ce12N2" office:value-type="float" office:value="435.56">
            <text:p>435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48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1760.43">
            <text:p>176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48612380551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44">
            <text:p>30764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9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208.84">
            <text:p>732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3208.84">
            <text:p>7320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0.642632">
            <text:p>70,643</text:p>
          </table:table-cell>
          <table:table-cell table:style-name="ce12N2" office:value-type="float" office:value="7076.2">
            <text:p>7076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.2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208.84">
            <text:p>73208,84</text:p>
          </table:table-cell>
          <table:table-cell table:style-name="ce12N2" office:value-type="float" office:value="5124.62">
            <text:p>512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968714598326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45">
            <text:p>30764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9.6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3.34">
            <text:p>206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63.34">
            <text:p>2063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892">
            <text:p>0,234</text:p>
          </table:table-cell>
          <table:table-cell table:style-name="ce12N2" office:value-type="float" office:value="27.25">
            <text:p>27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3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3.34">
            <text:p>2063,34</text:p>
          </table:table-cell>
          <table:table-cell table:style-name="ce12N2" office:value-type="float" office:value="144.44">
            <text:p>14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96921789566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49">
            <text:p>307649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0.367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8">
            <text:p>138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84.8">
            <text:p>13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32">
            <text:p>0,064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4.8">
            <text:p>1384,80</text:p>
          </table:table-cell>
          <table:table-cell table:style-name="ce12N2" office:value-type="float" office:value="55.39">
            <text:p>5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6220550140009703671002283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0">
            <text:p>307650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0.366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51.65">
            <text:p>995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951.65">
            <text:p>9951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14475">
            <text:p>0,914</text:p>
          </table:table-cell>
          <table:table-cell table:style-name="ce12N2" office:value-type="float" office:value="88.1">
            <text:p>8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51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51.65">
            <text:p>9951,65</text:p>
          </table:table-cell>
          <table:table-cell table:style-name="ce12N2" office:value-type="float" office:value="696.62">
            <text:p>69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6220550140009703661002489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4">
            <text:p>307654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6.2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06.74">
            <text:p>3760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363.87">
            <text:p>37363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58732">
            <text:p>6,259</text:p>
          </table:table-cell>
          <table:table-cell table:style-name="ce12N2" office:value-type="float" office:value="19552">
            <text:p>1955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60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42.87">
            <text:p>242,87</text:p>
          </table:table-cell>
          <table:table-cell table:style-name="ce12N2" office:value-type="float" office:value="37363.87">
            <text:p>37363,87</text:p>
          </table:table-cell>
          <table:table-cell table:style-name="ce12N2" office:value-type="float" office:value="2615.47">
            <text:p>261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620212571135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5">
            <text:p>3076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4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422">
            <text:p>1342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22">
            <text:p>1342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46">
            <text:p>0,049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42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22">
            <text:p>13422,00</text:p>
          </table:table-cell>
          <table:table-cell table:style-name="ce12N2" office:value-type="float" office:value="939.54">
            <text:p>93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4861832287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9">
            <text:p>307659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4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5">
            <text:p>0,029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62.37">
            <text:p>6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451237100001475500100001348119313687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69">
            <text:p>3076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4.40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68">
            <text:p>0,012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690.61">
            <text:p>69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44051177032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5">
            <text:p>307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7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4.78">
            <text:p>452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4.78">
            <text:p>4524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49">
            <text:p>0,032</text:p>
          </table:table-cell>
          <table:table-cell table:style-name="ce12N2" office:value-type="float" office:value="8.64">
            <text:p>8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4.78">
            <text:p>4524,78</text:p>
          </table:table-cell>
          <table:table-cell table:style-name="ce12N2" office:value-type="float" office:value="316.73">
            <text:p>31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7551996728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4">
            <text:p>307684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5.68">
            <text:p>396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65.68">
            <text:p>396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35">
            <text:p>0,7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5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65.68">
            <text:p>3965,68</text:p>
          </table:table-cell>
          <table:table-cell table:style-name="ce12N2" office:value-type="float" office:value="277.6">
            <text:p>2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621515144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5">
            <text:p>307685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6.64">
            <text:p>158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86.64">
            <text:p>158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8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6.64">
            <text:p>1586,64</text:p>
          </table:table-cell>
          <table:table-cell table:style-name="ce12N2" office:value-type="float" office:value="111.06">
            <text:p>11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6515878298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8">
            <text:p>307688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13.8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8.3">
            <text:p>1301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2608.51">
            <text:p>12608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7304">
            <text:p>0,157</text:p>
          </table:table-cell>
          <table:table-cell table:style-name="ce12N2" office:value-type="float" office:value="172.38">
            <text:p>172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1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09.79">
            <text:p>409,79</text:p>
          </table:table-cell>
          <table:table-cell table:style-name="ce12N2" office:value-type="float" office:value="12608.51">
            <text:p>12608,51</text:p>
          </table:table-cell>
          <table:table-cell table:style-name="ce12N2" office:value-type="float" office:value="882.6">
            <text:p>88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4683374000300550030006138381226820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45">
            <text:p>14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7641.88">
            <text:p>87641,88</text:p>
          </table:table-cell>
          <table:table-cell table:style-name="ce26N2" office:value-type="float" office:value="5702346.09">
            <text:p>5702346,09</text:p>
          </table:table-cell>
          <table:table-cell table:style-name="ce26N2" office:value-type="float" office:value="360696.49">
            <text:p>360696,4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826096.34">
            <text:p>5826096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87846.43771">
            <text:p>87846,438</text:p>
          </table:table-cell>
          <table:table-cell table:style-name="ce26N2" office:value-type="float" office:value="5738454.46">
            <text:p>5738454,46</text:p>
          </table:table-cell>
          <table:table-cell table:style-name="ce26N2" office:value-type="float" office:value="5826096.34">
            <text:p>5826096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83774.01">
            <text:p>183774,0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.68">
            <text:p>41,6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OBJETIV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140" meta:object-count="0"/>
    <meta:generator>LibreOffice/4.3.0.4$Windows_x86 LibreOffice_project/62ad5818884a2fc2e5780dd45466868d41009ec0</meta:generator>
  </office:meta>
</office:document-meta>
</file>