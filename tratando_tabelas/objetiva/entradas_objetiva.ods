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7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9">
            <text:p>3082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78">
            <text:p>20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0087">
            <text:p>3,370</text:p>
          </table:table-cell>
          <table:table-cell table:style-name="ce12N2" office:value-type="float" office:value="10528">
            <text:p>105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9.94">
            <text:p>16979,94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82">
            <text:p>152,8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0.77">
            <text:p>130,77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1408.33">
            <text:p>14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2137648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0">
            <text:p>30834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6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1.3">
            <text:p>24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60216">
            <text:p>4,860</text:p>
          </table:table-cell>
          <table:table-cell table:style-name="ce12N2" office:value-type="float" office:value="18788.4">
            <text:p>1878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1.46">
            <text:p>20251,46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7">
            <text:p>182,27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5.97">
            <text:p>155,97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1679.67">
            <text:p>167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652138553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8">
            <text:p>3084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7166289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0">
            <text:p>30844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9.07">
            <text:p>1143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2008">
            <text:p>3,382</text:p>
          </table:table-cell>
          <table:table-cell table:style-name="ce12N2" office:value-type="float" office:value="11520">
            <text:p>115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3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91.95">
            <text:p>9591,95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33">
            <text:p>86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3.87">
            <text:p>73,87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795.56">
            <text:p>79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8182882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7">
            <text:p>3084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21771390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9">
            <text:p>30844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9.54">
            <text:p>57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1004">
            <text:p>1,691</text:p>
          </table:table-cell>
          <table:table-cell table:style-name="ce12N2" office:value-type="float" office:value="5760">
            <text:p>5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95.97">
            <text:p>4795,97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16">
            <text:p>43,16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.94">
            <text:p>36,94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397.78">
            <text:p>39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3152297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3">
            <text:p>30846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26.25">
            <text:p>3492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0045">
            <text:p>2,800</text:p>
          </table:table-cell>
          <table:table-cell table:style-name="ce12N2" office:value-type="float" office:value="300.85">
            <text:p>30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92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25.59">
            <text:p>30125,59</text:p>
          </table:table-cell>
          <table:table-cell table:style-name="ce12N2" office:value-type="float" office:value="30.14">
            <text:p>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14">
            <text:p>271,14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8.92">
            <text:p>28,92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1701.07">
            <text:p>170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3311732807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5">
            <text:p>3085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02.53">
            <text:p>3510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93168">
            <text:p>3,693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0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47.35">
            <text:p>29347,35</text:p>
          </table:table-cell>
          <table:table-cell table:style-name="ce12N2" office:value-type="float" office:value="29.34">
            <text:p>2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12">
            <text:p>264,1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32.23">
            <text:p>632,23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2131.63">
            <text:p>213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614736633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6">
            <text:p>3085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44">
            <text:p>5,644</text:p>
          </table:table-cell>
          <table:table-cell table:style-name="ce12N2" office:value-type="float" office:value="349.4">
            <text:p>34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94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966.16">
            <text:p>53966,16</text:p>
          </table:table-cell>
          <table:table-cell table:style-name="ce12N2" office:value-type="float" office:value="53.97">
            <text:p>5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.7">
            <text:p>485,7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4476">
            <text:p>44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8321063213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0">
            <text:p>3085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4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104">
            <text:p>0,371</text:p>
          </table:table-cell>
          <table:table-cell table:style-name="ce12N2" office:value-type="float" office:value="44.76">
            <text:p>44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8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7.76">
            <text:p>4397,76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8">
            <text:p>39,5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183.24">
            <text:p>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43481610762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2">
            <text:p>308582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4.1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88.48">
            <text:p>5318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23574">
            <text:p>9,224</text:p>
          </table:table-cell>
          <table:table-cell table:style-name="ce12N2" office:value-type="float" office:value="1769.07">
            <text:p>176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18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14.18">
            <text:p>43414,18</text:p>
          </table:table-cell>
          <table:table-cell table:style-name="ce12N2" office:value-type="float" office:value="43.42">
            <text:p>4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74">
            <text:p>390,7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860.04">
            <text:p>1860,04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3489.09">
            <text:p>34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41921627051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2">
            <text:p>308622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22.96">
            <text:p>262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184.24">
            <text:p>1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61852688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7">
            <text:p>3086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2.32">
            <text:p>13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5">
            <text:p>0,004</text:p>
          </table:table-cell>
          <table:table-cell table:style-name="ce12N2" office:value-type="float" office:value="450">
            <text:p>4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4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3.32">
            <text:p>10573,32</text:p>
          </table:table-cell>
          <table:table-cell table:style-name="ce12N2" office:value-type="float" office:value="10.57">
            <text:p>1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16">
            <text:p>95,16</text:p>
          </table:table-cell>
          <table:table-cell table:style-name="ce12N2" office:value-type="float" office:value="42.5">
            <text:p>4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14.32">
            <text:p>814,32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876.96">
            <text:p>87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2817804288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3">
            <text:p>308793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6818408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8">
            <text:p>30879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625">
            <text:p>12,863</text:p>
          </table:table-cell>
          <table:table-cell table:style-name="ce12N2" office:value-type="float" office:value="8015">
            <text:p>80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71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306.2">
            <text:p>37306,20</text:p>
          </table:table-cell>
          <table:table-cell table:style-name="ce12N2" office:value-type="float" office:value="37.31">
            <text:p>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76">
            <text:p>335,76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5605.74">
            <text:p>560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1141767568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5">
            <text:p>30886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36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5252">
            <text:p>12,525</text:p>
          </table:table-cell>
          <table:table-cell table:style-name="ce12N2" office:value-type="float" office:value="2875.3">
            <text:p>287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59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32.5">
            <text:p>58732,50</text:p>
          </table:table-cell>
          <table:table-cell table:style-name="ce12N2" office:value-type="float" office:value="58.74">
            <text:p>5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59">
            <text:p>528,5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4871.32">
            <text:p>48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3601662398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1">
            <text:p>308871</text:p>
          </table:table-cell>
          <table:table-cell table:style-name="ce0" table:number-columns-spanned="4" table:number-rows-spanned="1" office:value-type="string" calcext:value-type="string">
            <text:p>37.660 - BF LIMP COMERCIO DE PRODUTOS DE HIGIENE E LIMPEZA LTDA</text:p>
          </table:table-cell>
          <table:covered-table-cell table:number-columns-repeated="3"/>
          <table:table-cell table:style-name="ce0" office:value-type="string" calcext:value-type="string">
            <text:p>2.2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35">
            <text:p>0,074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2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21.31">
            <text:p>5421,31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79">
            <text:p>48,7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421.49">
            <text:p>42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24101070001655500100000228817357780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5">
            <text:p>30887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2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32">
            <text:p>349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358">
            <text:p>0,230</text:p>
          </table:table-cell>
          <table:table-cell table:style-name="ce12N2" office:value-type="float" office:value="44.71">
            <text:p>44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5.1">
            <text:p>2845,10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">
            <text:p>25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28.25">
            <text:p>128,25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235.98">
            <text:p>23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20915704022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9">
            <text:p>30895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46.4">
            <text:p>207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16.0124">
            <text:p>8016,012</text:p>
          </table:table-cell>
          <table:table-cell table:style-name="ce12N2" office:value-type="float" office:value="841.6">
            <text:p>84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8.29">
            <text:p>16958,29</text:p>
          </table:table-cell>
          <table:table-cell table:style-name="ce12N2" office:value-type="float" office:value="16.96">
            <text:p>1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63">
            <text:p>152,6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653.04">
            <text:p>653,04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1406.54">
            <text:p>140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520158161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0">
            <text:p>308960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.68">
            <text:p>703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56">
            <text:p>0,032</text:p>
          </table:table-cell>
          <table:table-cell table:style-name="ce12N2" office:value-type="float" office:value="264.08">
            <text:p>26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3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5.82">
            <text:p>6295,82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6">
            <text:p>56,66</text:p>
          </table:table-cell>
          <table:table-cell table:style-name="ce12N2" office:value-type="float" office:value="44.97">
            <text:p>44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.52">
            <text:p>12,52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491.84">
            <text:p>4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204129000106550010001419651121064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3">
            <text:p>308963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5.09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64.66">
            <text:p>8156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47536">
            <text:p>17,748</text:p>
          </table:table-cell>
          <table:table-cell table:style-name="ce12N2" office:value-type="float" office:value="7346.29">
            <text:p>7346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6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671.68">
            <text:p>66671,68</text:p>
          </table:table-cell>
          <table:table-cell table:style-name="ce12N2" office:value-type="float" office:value="66.67">
            <text:p>6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.04">
            <text:p>600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567.42">
            <text:p>2567,42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5529.81">
            <text:p>55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33881000160550000001150971836501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8">
            <text:p>308968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8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300">
            <text:p>8300,000</text:p>
          </table:table-cell>
          <table:table-cell table:style-name="ce12N2" office:value-type="float" office:value="1460.8">
            <text:p>146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7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89.88">
            <text:p>17789,88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11">
            <text:p>160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1475.51">
            <text:p>147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3102560001905500100048883511893283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6">
            <text:p>308976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6.05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899.97">
            <text:p>4089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41555">
            <text:p>2,942</text:p>
          </table:table-cell>
          <table:table-cell table:style-name="ce12N2" office:value-type="float" office:value="310.78">
            <text:p>31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89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21.4">
            <text:p>35521,40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9">
            <text:p>319,6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7.01">
            <text:p>127,01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1630.92">
            <text:p>163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60561455871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9">
            <text:p>308979</text:p>
          </table:table-cell>
          <table:table-cell table:style-name="ce0" table:number-columns-spanned="4" table:number-rows-spanned="1" office:value-type="string" calcext:value-type="string">
            <text:p>977 - POLIERG INDUSTRIA E COMERCIO LTDA</text:p>
          </table:table-cell>
          <table:covered-table-cell table:number-columns-repeated="3"/>
          <table:table-cell table:style-name="ce0" office:value-type="string" calcext:value-type="string">
            <text:p>120.7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5">
            <text:p>0,408</text:p>
          </table:table-cell>
          <table:table-cell table:style-name="ce12N2" office:value-type="float" office:value="409.5">
            <text:p>40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66.1">
            <text:p>14066,10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6">
            <text:p>126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88.1">
            <text:p>13288,10</text:p>
          </table:table-cell>
          <table:table-cell table:style-name="ce12N2" office:value-type="float" office:value="930.17">
            <text:p>93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010717000152550030001207581079396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1">
            <text:p>309021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2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773">
            <text:p>5,877</text:p>
          </table:table-cell>
          <table:table-cell table:style-name="ce12N2" office:value-type="float" office:value="2358.05">
            <text:p>235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.30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243.91">
            <text:p>65243,91</text:p>
          </table:table-cell>
          <table:table-cell table:style-name="ce12N2" office:value-type="float" office:value="65.19">
            <text:p>6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.14">
            <text:p>587,14</text:p>
          </table:table-cell>
          <table:table-cell table:style-name="ce12N2" office:value-type="float" office:value="45.67">
            <text:p>4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305.5">
            <text:p>77305,50</text:p>
          </table:table-cell>
          <table:table-cell table:style-name="ce12N2" office:value-type="float" office:value="5411.39">
            <text:p>541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83.25">
            <text:p>168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9.74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6/2026</text:p>
          </table:table-cell>
          <table:table-cell table:style-name="ce12" office:value-type="string" calcext:value-type="string">
            <text:p>1.683,25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41260600296181000145550010000182671001488262</text:p>
          </table:table-cell>
          <table:table-cell table:style-name="ce0" office:value-type="string" calcext:value-type="string">
            <text:p>352606052220920007635700200047974310069643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9">
            <text:p>30902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0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29.17">
            <text:p>35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1.24628">
            <text:p>201,246</text:p>
          </table:table-cell>
          <table:table-cell table:style-name="ce12N2" office:value-type="float" office:value="427.48">
            <text:p>42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929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06.98">
            <text:p>29306,98</text:p>
          </table:table-cell>
          <table:table-cell table:style-name="ce12N2" office:value-type="float" office:value="29.31">
            <text:p>2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.76">
            <text:p>263,76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204.23">
            <text:p>1204,23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2430.75">
            <text:p>24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013173876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1">
            <text:p>309031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3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75">
            <text:p>18,75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0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2.62">
            <text:p>14182,62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1176.32">
            <text:p>11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35861045058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3">
            <text:p>309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9748">
            <text:p>1,750</text:p>
          </table:table-cell>
          <table:table-cell table:style-name="ce12N2" office:value-type="float" office:value="508.99">
            <text:p>50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7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27.46">
            <text:p>7827,46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649.22">
            <text:p>64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11042095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4">
            <text:p>309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49">
            <text:p>0,013</text:p>
          </table:table-cell>
          <table:table-cell table:style-name="ce12N2" office:value-type="float" office:value="352.5">
            <text:p>35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0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28.63">
            <text:p>26228,63</text:p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06">
            <text:p>236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1204.25">
            <text:p>120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2109334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5">
            <text:p>309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152">
            <text:p>1,522</text:p>
          </table:table-cell>
          <table:table-cell table:style-name="ce12N2" office:value-type="float" office:value="442.6">
            <text:p>44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06.49">
            <text:p>6806,49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26">
            <text:p>61,2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564.54">
            <text:p>56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31450726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9">
            <text:p>309039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9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79936">
            <text:p>32,799</text:p>
          </table:table-cell>
          <table:table-cell table:style-name="ce12N2" office:value-type="float" office:value="307.8">
            <text:p>30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9.29">
            <text:p>18829,29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7">
            <text:p>169,4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71.95">
            <text:p>12671,95</text:p>
          </table:table-cell>
          <table:table-cell table:style-name="ce12N2" office:value-type="float" office:value="887.04">
            <text:p>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1995901709073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2">
            <text:p>3090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.38">
            <text:p>75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.43">
            <text:p>595,43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45.86">
            <text:p>45,86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21010391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4">
            <text:p>3090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2">
            <text:p>0,000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62">
            <text:p>3320,62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9">
            <text:p>29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275.42">
            <text:p>27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8114669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5">
            <text:p>3090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69">
            <text:p>3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.73">
            <text:p>297,7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.93">
            <text:p>22,93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24.69">
            <text:p>2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11784758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7">
            <text:p>3090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52">
            <text:p>0,008</text:p>
          </table:table-cell>
          <table:table-cell table:style-name="ce12N2" office:value-type="float" office:value="10.75">
            <text:p>1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4.78">
            <text:p>1644,78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">
            <text:p>14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2.98">
            <text:p>1402,98</text:p>
          </table:table-cell>
          <table:table-cell table:style-name="ce12N2" office:value-type="float" office:value="98.21">
            <text:p>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01762169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8">
            <text:p>3090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12">
            <text:p>0,06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3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6.17">
            <text:p>9396,17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779.33">
            <text:p>7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91810445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9">
            <text:p>3090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6.24">
            <text:p>6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26">
            <text:p>0,087</text:p>
          </table:table-cell>
          <table:table-cell table:style-name="ce12N2" office:value-type="float" office:value="18.4">
            <text:p>1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48.67">
            <text:p>5248,6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4">
            <text:p>4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1.6">
            <text:p>391,6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240.98">
            <text:p>2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3137611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0">
            <text:p>309050</text:p>
          </table:table-cell>
          <table:table-cell table:style-name="ce0" table:number-columns-spanned="4" table:number-rows-spanned="1" office:value-type="string" calcext:value-type="string">
            <text:p>9.315 - BRASIPLA INDUSTRIA E COMERCIO LTDA</text:p>
          </table:table-cell>
          <table:covered-table-cell table:number-columns-repeated="3"/>
          <table:table-cell table:style-name="ce0" office:value-type="string" calcext:value-type="string">
            <text:p>27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2.23">
            <text:p>2222,23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184.31">
            <text:p>18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22595300011055001000027678149200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1">
            <text:p>309051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19.262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1.74">
            <text:p>489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736">
            <text:p>0,018</text:p>
          </table:table-cell>
          <table:table-cell table:style-name="ce12N2" office:value-type="float" office:value="163.39">
            <text:p>16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42.5">
            <text:p>4142,5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98.85">
            <text:p>98,85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228.18">
            <text:p>22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192621635949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6">
            <text:p>3090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9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2.53">
            <text:p>82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85">
            <text:p>0,109</text:p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09.38">
            <text:p>6509,38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58">
            <text:p>58,5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60.43">
            <text:p>560,43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519.25">
            <text:p>5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9551457738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0">
            <text:p>309060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7.26">
            <text:p>1445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864">
            <text:p>0,089</text:p>
          </table:table-cell>
          <table:table-cell table:style-name="ce12N2" office:value-type="float" office:value="232.43">
            <text:p>23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7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44.22">
            <text:p>12044,22</text:p>
          </table:table-cell>
          <table:table-cell table:style-name="ce12N2" office:value-type="float" office:value="12.03">
            <text:p>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39">
            <text:p>108,3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86.48">
            <text:p>186,48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998.96">
            <text:p>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71008710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1">
            <text:p>30906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2.43">
            <text:p>125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05">
            <text:p>0,039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78">
            <text:p>1056,78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">
            <text:p>9,5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48.52">
            <text:p>4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91005556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2">
            <text:p>30906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37.6">
            <text:p>173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53754">
            <text:p>36,538</text:p>
          </table:table-cell>
          <table:table-cell table:style-name="ce12N2" office:value-type="float" office:value="117.42">
            <text:p>11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3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11.42">
            <text:p>14511,42</text:p>
          </table:table-cell>
          <table:table-cell table:style-name="ce12N2" office:value-type="float" office:value="14.48">
            <text:p>1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59">
            <text:p>130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43.52">
            <text:p>143,52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1203.59">
            <text:p>120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5100493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3">
            <text:p>30906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39.76">
            <text:p>656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6.228464">
            <text:p>506,228</text:p>
          </table:table-cell>
          <table:table-cell table:style-name="ce12N2" office:value-type="float" office:value="1897.19">
            <text:p>1897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491.13">
            <text:p>54491,13</text:p>
          </table:table-cell>
          <table:table-cell table:style-name="ce12N2" office:value-type="float" office:value="54.46">
            <text:p>5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.41">
            <text:p>490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074.94">
            <text:p>1074,94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4519.54">
            <text:p>45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6100363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4">
            <text:p>30906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08.8">
            <text:p>360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544">
            <text:p>0,069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0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3.84">
            <text:p>2333,84</text:p>
          </table:table-cell>
          <table:table-cell table:style-name="ce12N2" office:value-type="float" office:value="2.33">
            <text:p>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193.57">
            <text:p>19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185.45">
            <text:p>5185,45</text:p>
          </table:table-cell>
          <table:table-cell table:style-name="ce12N2" office:value-type="float" office:value="843.52">
            <text:p>843,52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81000658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6">
            <text:p>30906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9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1.58">
            <text:p>5941,58</text:p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492.8">
            <text:p>4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9080132146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7">
            <text:p>3090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1.5">
            <text:p>4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244113715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3">
            <text:p>309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6556">
            <text:p>0,417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26.6">
            <text:p>8326,60</text:p>
          </table:table-cell>
          <table:table-cell table:style-name="ce12N2" office:value-type="float" office:value="8.33">
            <text:p>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3341666424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7">
            <text:p>309087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6.7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24.83">
            <text:p>175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93">
            <text:p>0,063</text:p>
          </table:table-cell>
          <table:table-cell table:style-name="ce12N2" office:value-type="float" office:value="576.02">
            <text:p>57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52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80.51">
            <text:p>14880,51</text:p>
          </table:table-cell>
          <table:table-cell table:style-name="ce12N2" office:value-type="float" office:value="14.9">
            <text:p>1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94">
            <text:p>133,9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47.88">
            <text:p>947,88</text:p>
          </table:table-cell>
          <table:table-cell table:style-name="ce12N2" office:value-type="float" office:value="16576.95">
            <text:p>16576,95</text:p>
          </table:table-cell>
          <table:table-cell table:style-name="ce12N2" office:value-type="float" office:value="1056.79">
            <text:p>105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88978400011355001000036732100090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9">
            <text:p>309089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61.36">
            <text:p>2256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1503.64">
            <text:p>21503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69781">
            <text:p>3,170</text:p>
          </table:table-cell>
          <table:table-cell table:style-name="ce12N2" office:value-type="float" office:value="1245.05">
            <text:p>12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56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66.61">
            <text:p>18466,61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.18">
            <text:p>166,18</text:p>
          </table:table-cell>
          <table:table-cell table:style-name="ce12N2" office:value-type="float" office:value="54.69">
            <text:p>54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057.72">
            <text:p>1057,72</text:p>
          </table:table-cell>
          <table:table-cell table:style-name="ce12N2" office:value-type="float" office:value="20360.71">
            <text:p>20360,71</text:p>
          </table:table-cell>
          <table:table-cell table:style-name="ce12N2" office:value-type="float" office:value="1154.76">
            <text:p>11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81319404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2">
            <text:p>30909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2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039.34">
            <text:p>12603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697844">
            <text:p>13,698</text:p>
          </table:table-cell>
          <table:table-cell table:style-name="ce12N2" office:value-type="float" office:value="1865.95">
            <text:p>1865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039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025.72">
            <text:p>103025,72</text:p>
          </table:table-cell>
          <table:table-cell table:style-name="ce12N2" office:value-type="float" office:value="103.03">
            <text:p>10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23">
            <text:p>927,2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967.34">
            <text:p>3967,34</text:p>
          </table:table-cell>
          <table:table-cell table:style-name="ce12N2" office:value-type="float" office:value="122072">
            <text:p>122072,00</text:p>
          </table:table-cell>
          <table:table-cell table:style-name="ce12N2" office:value-type="float" office:value="8545.04">
            <text:p>854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29361100779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7">
            <text:p>3090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78">
            <text:p>0,064</text:p>
          </table:table-cell>
          <table:table-cell table:style-name="ce12N2" office:value-type="float" office:value="32.14">
            <text:p>3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7">
            <text:p>3047,00</text:p>
          </table:table-cell>
          <table:table-cell table:style-name="ce12N2" office:value-type="float" office:value="3.05">
            <text:p>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42">
            <text:p>27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9.25">
            <text:p>3499,25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810004671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8">
            <text:p>30909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4">
            <text:p>0,075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6">
            <text:p>381,60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">
            <text:p>452,40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2117169786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9">
            <text:p>30909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39347">
            <text:p>4,639</text:p>
          </table:table-cell>
          <table:table-cell table:style-name="ce12N2" office:value-type="float" office:value="867.09">
            <text:p>867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314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08.92">
            <text:p>41608,92</text:p>
          </table:table-cell>
          <table:table-cell table:style-name="ce12N2" office:value-type="float" office:value="41.58">
            <text:p>4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.47">
            <text:p>374,4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314.95">
            <text:p>49314,95</text:p>
          </table:table-cell>
          <table:table-cell table:style-name="ce12N2" office:value-type="float" office:value="3452.06">
            <text:p>34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41970337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0">
            <text:p>30910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24413">
            <text:p>2,524</text:p>
          </table:table-cell>
          <table:table-cell table:style-name="ce12N2" office:value-type="float" office:value="510.13">
            <text:p>51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4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25.94">
            <text:p>14225,94</text:p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.06">
            <text:p>128,0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7.95">
            <text:p>16847,95</text:p>
          </table:table-cell>
          <table:table-cell table:style-name="ce12N2" office:value-type="float" office:value="1164.97">
            <text:p>116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1516737520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1">
            <text:p>30910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308">
            <text:p>0,693</text:p>
          </table:table-cell>
          <table:table-cell table:style-name="ce12N2" office:value-type="float" office:value="85.66">
            <text:p>8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6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3.58">
            <text:p>7653,58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88">
            <text:p>68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67.86">
            <text:p>9067,86</text:p>
          </table:table-cell>
          <table:table-cell table:style-name="ce12N2" office:value-type="float" office:value="634.76">
            <text:p>63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221377652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3">
            <text:p>309103</text:p>
          </table:table-cell>
          <table:table-cell table:style-name="ce0" table:number-columns-spanned="4" table:number-rows-spanned="1" office:value-type="string" calcext:value-type="string">
            <text:p>13.002 - TECNYL IND E COM DE TELAS LTDA</text:p>
          </table:table-cell>
          <table:covered-table-cell table:number-columns-repeated="3"/>
          <table:table-cell table:style-name="ce0" office:value-type="string" calcext:value-type="string">
            <text:p>23.3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4111">
            <text:p>8,411</text:p>
          </table:table-cell>
          <table:table-cell table:style-name="ce12N2" office:value-type="float" office:value="1284">
            <text:p>12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4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66.37">
            <text:p>14466,37</text:p>
          </table:table-cell>
          <table:table-cell table:style-name="ce12N2" office:value-type="float" office:value="14.47">
            <text:p>1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44.5">
            <text:p>16144,50</text:p>
          </table:table-cell>
          <table:table-cell table:style-name="ce12N2" office:value-type="float" office:value="1130.12">
            <text:p>113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311173000144550010000233151027912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5">
            <text:p>30910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6</text:p>
          </table:table-cell>
          <table:table-cell table:style-name="ce9" office:value-type="string" calcext:value-type="string">
            <text:p>13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27392">
            <text:p>4,927</text:p>
          </table:table-cell>
          <table:table-cell table:style-name="ce12N2" office:value-type="float" office:value="7499.94">
            <text:p>749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566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28.35">
            <text:p>49428,35</text:p>
          </table:table-cell>
          <table:table-cell table:style-name="ce12N2" office:value-type="float" office:value="49.43">
            <text:p>4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.84">
            <text:p>444,8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66.12">
            <text:p>58566,12</text:p>
          </table:table-cell>
          <table:table-cell table:style-name="ce12N2" office:value-type="float" office:value="4099.62">
            <text:p>409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30000000961557606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7">
            <text:p>30910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699">
            <text:p>1,657</text:p>
          </table:table-cell>
          <table:table-cell table:style-name="ce12N2" office:value-type="float" office:value="343.91">
            <text:p>343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39.75">
            <text:p>3939,75</text:p>
          </table:table-cell>
          <table:table-cell table:style-name="ce12N2" office:value-type="float" office:value="3.94">
            <text:p>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46">
            <text:p>35,4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68.2">
            <text:p>4668,20</text:p>
          </table:table-cell>
          <table:table-cell table:style-name="ce12N2" office:value-type="float" office:value="326.77">
            <text:p>3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7311694302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0">
            <text:p>30911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5.53167">
            <text:p>185,532</text:p>
          </table:table-cell>
          <table:table-cell table:style-name="ce12N2" office:value-type="float" office:value="5773.53">
            <text:p>577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31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86.66">
            <text:p>73686,66</text:p>
          </table:table-cell>
          <table:table-cell table:style-name="ce12N2" office:value-type="float" office:value="73.68">
            <text:p>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3.17">
            <text:p>663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12.18">
            <text:p>87312,18</text:p>
          </table:table-cell>
          <table:table-cell table:style-name="ce12N2" office:value-type="float" office:value="6111.85">
            <text:p>61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7501533273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3">
            <text:p>309113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2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.32">
            <text:p>24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04">
            <text:p>0,350</text:p>
          </table:table-cell>
          <table:table-cell table:style-name="ce12N2" office:value-type="float" office:value="269">
            <text:p>2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7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76.86">
            <text:p>2076,86</text:p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69">
            <text:p>18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2460.8">
            <text:p>2460,80</text:p>
          </table:table-cell>
          <table:table-cell table:style-name="ce12N2" office:value-type="float" office:value="172.25">
            <text:p>1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287181769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3">
            <text:p>309123</text:p>
          </table:table-cell>
          <table:table-cell table:style-name="ce0" table:number-columns-spanned="4" table:number-rows-spanned="1" office:value-type="string" calcext:value-type="string">
            <text:p>35.459 - TRENTO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5.00075">
            <text:p>925,001</text:p>
          </table:table-cell>
          <table:table-cell table:style-name="ce12N2" office:value-type="float" office:value="161.25">
            <text:p>16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8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85.2">
            <text:p>43385,20</text:p>
          </table:table-cell>
          <table:table-cell table:style-name="ce12N2" office:value-type="float" office:value="802.65">
            <text:p>80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539433900001085500100000037111655457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1">
            <text:p>30913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8.9502">
            <text:p>208,950</text:p>
          </table:table-cell>
          <table:table-cell table:style-name="ce12N2" office:value-type="float" office:value="2286.3">
            <text:p>228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.17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7.87">
            <text:p>109867,87</text:p>
          </table:table-cell>
          <table:table-cell table:style-name="ce12N2" office:value-type="float" office:value="109.87">
            <text:p>10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81">
            <text:p>988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9112.53">
            <text:p>91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699169305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2">
            <text:p>309132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4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3.9">
            <text:p>28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6">
            <text:p>0,002</text:p>
          </table:table-cell>
          <table:table-cell table:style-name="ce12N2" office:value-type="float" office:value="20.34">
            <text:p>2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24.62">
            <text:p>2324,62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92">
            <text:p>20,92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89.52">
            <text:p>89,52</text:p>
          </table:table-cell>
          <table:table-cell table:style-name="ce12N2" office:value-type="float" office:value="2754.38">
            <text:p>2754,38</text:p>
          </table:table-cell>
          <table:table-cell table:style-name="ce12N2" office:value-type="float" office:value="192.81">
            <text:p>1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4331150795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4">
            <text:p>30913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1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.77">
            <text:p>103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96">
            <text:p>0,068</text:p>
          </table:table-cell>
          <table:table-cell table:style-name="ce12N2" office:value-type="float" office:value="8.98">
            <text:p>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.01">
            <text:p>845,0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2.54">
            <text:p>32,54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70.08">
            <text:p>7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1316157038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7">
            <text:p>30913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.81">
            <text:p>49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04">
            <text:p>0,003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.73">
            <text:p>407,73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9194172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9">
            <text:p>30913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.53">
            <text:p>7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48">
            <text:p>0,018</text:p>
          </table:table-cell>
          <table:table-cell table:style-name="ce12N2" office:value-type="float" office:value="6.91">
            <text:p>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.64">
            <text:p>571,64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5.22">
            <text:p>35,22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8190130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3">
            <text:p>309143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5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972">
            <text:p>11,972</text:p>
          </table:table-cell>
          <table:table-cell table:style-name="ce12N2" office:value-type="float" office:value="4480.35">
            <text:p>448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81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63.8">
            <text:p>67363,80</text:p>
          </table:table-cell>
          <table:table-cell table:style-name="ce12N2" office:value-type="float" office:value="67.37">
            <text:p>6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6.28">
            <text:p>606,2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17.3">
            <text:p>79817,30</text:p>
          </table:table-cell>
          <table:table-cell table:style-name="ce12N2" office:value-type="float" office:value="5587.21">
            <text:p>558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5063185968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4">
            <text:p>309144</text:p>
          </table:table-cell>
          <table:table-cell table:style-name="ce0" table:number-columns-spanned="4" table:number-rows-spanned="1" office:value-type="string" calcext:value-type="string">
            <text:p>11.789 - POLI-FERR INDUSTRIA E COMERCIO LTDA-EPP</text:p>
          </table:table-cell>
          <table:covered-table-cell table:number-columns-repeated="3"/>
          <table:table-cell table:style-name="ce0" office:value-type="string" calcext:value-type="string">
            <text:p>12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9.62">
            <text:p>20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9496">
            <text:p>194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2.0403">
            <text:p>412,040</text:p>
          </table:table-cell>
          <table:table-cell table:style-name="ce12N2" office:value-type="float" office:value="573.8">
            <text:p>5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19.67">
            <text:p>17419,67</text:p>
          </table:table-cell>
          <table:table-cell table:style-name="ce12N2" office:value-type="float" office:value="17.42">
            <text:p>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78">
            <text:p>156,7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633.62">
            <text:p>633,62</text:p>
          </table:table-cell>
          <table:table-cell table:style-name="ce12N2" office:value-type="float" office:value="19496">
            <text:p>19496,00</text:p>
          </table:table-cell>
          <table:table-cell table:style-name="ce12N2" office:value-type="float" office:value="1364.72">
            <text:p>136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9.8">
            <text:p>5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15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599,80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5260601115780000188550010000125401573097206</text:p>
          </table:table-cell>
          <table:table-cell table:style-name="ce0" office:value-type="string" calcext:value-type="string">
            <text:p>3526061138956500020057005000401152100087501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7">
            <text:p>30915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319.33">
            <text:p>28931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287374.47">
            <text:p>287374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15.052346">
            <text:p>815,052</text:p>
          </table:table-cell>
          <table:table-cell table:style-name="ce12N2" office:value-type="float" office:value="3126.75">
            <text:p>312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9.319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897.95">
            <text:p>242897,95</text:p>
          </table:table-cell>
          <table:table-cell table:style-name="ce12N2" office:value-type="float" office:value="242.9">
            <text:p>24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6.09">
            <text:p>2186,0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1944.86">
            <text:p>1944,86</text:p>
          </table:table-cell>
          <table:table-cell table:style-name="ce12N2" office:value-type="float" office:value="282052.65">
            <text:p>282052,65</text:p>
          </table:table-cell>
          <table:table-cell table:style-name="ce12N2" office:value-type="float" office:value="19743.69">
            <text:p>197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62133083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8">
            <text:p>30915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3.6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110.28">
            <text:p>2301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">
            <text:p>169,00</text:p>
          </table:table-cell>
          <table:table-cell table:style-name="ce12N2" office:value-type="float" office:value="229939.21">
            <text:p>229939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9.554388">
            <text:p>59,554</text:p>
          </table:table-cell>
          <table:table-cell table:style-name="ce12N2" office:value-type="float" office:value="2120.81">
            <text:p>212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0.1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4835.26">
            <text:p>194835,26</text:p>
          </table:table-cell>
          <table:table-cell table:style-name="ce12N2" office:value-type="float" office:value="194.84">
            <text:p>19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3.55">
            <text:p>1753,5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171.07">
            <text:p>171,07</text:p>
          </table:table-cell>
          <table:table-cell table:style-name="ce12N2" office:value-type="float" office:value="227958.84">
            <text:p>227958,84</text:p>
          </table:table-cell>
          <table:table-cell table:style-name="ce12N2" office:value-type="float" office:value="15246.46">
            <text:p>152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36711556035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72">
            <text:p>30917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7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28.64">
            <text:p>11162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28.64">
            <text:p>11162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2224">
            <text:p>21,472</text:p>
          </table:table-cell>
          <table:table-cell table:style-name="ce12N2" office:value-type="float" office:value="20949.34">
            <text:p>2094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62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146.62">
            <text:p>89146,62</text:p>
          </table:table-cell>
          <table:table-cell table:style-name="ce12N2" office:value-type="float" office:value="89.15">
            <text:p>8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.32">
            <text:p>802,32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628.64">
            <text:p>111628,64</text:p>
          </table:table-cell>
          <table:table-cell table:style-name="ce12N2" office:value-type="float" office:value="13395.44">
            <text:p>1339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769811338028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74">
            <text:p>309174</text:p>
          </table:table-cell>
          <table:table-cell table:style-name="ce0" table:number-columns-spanned="4" table:number-rows-spanned="1" office:value-type="string" calcext:value-type="string">
            <text:p>31.248 - GV DO BRASIL INDUSTRIA E COMERCIO DE ACO LTDA</text:p>
          </table:table-cell>
          <table:covered-table-cell table:number-columns-repeated="3"/>
          <table:table-cell table:style-name="ce0" office:value-type="string" calcext:value-type="string">
            <text:p>5.77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439.4">
            <text:p>16643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6439.4">
            <text:p>16643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443">
            <text:p>0,039</text:p>
          </table:table-cell>
          <table:table-cell table:style-name="ce12N2" office:value-type="float" office:value="36412.87">
            <text:p>364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6.43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470.69">
            <text:p>140470,69</text:p>
          </table:table-cell>
          <table:table-cell table:style-name="ce12N2" office:value-type="float" office:value="140.47">
            <text:p>14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4.24">
            <text:p>1264,2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439.4">
            <text:p>166439,40</text:p>
          </table:table-cell>
          <table:table-cell table:style-name="ce12N2" office:value-type="float" office:value="11650.76">
            <text:p>1165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84632000144550050000057761439551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86">
            <text:p>309186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8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75.42">
            <text:p>8877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87787.9">
            <text:p>8778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37551">
            <text:p>40,376</text:p>
          </table:table-cell>
          <table:table-cell table:style-name="ce12N2" office:value-type="float" office:value="11053">
            <text:p>110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77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473.85">
            <text:p>71473,85</text:p>
          </table:table-cell>
          <table:table-cell table:style-name="ce12N2" office:value-type="float" office:value="71.46">
            <text:p>7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.24">
            <text:p>643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987.52">
            <text:p>987,52</text:p>
          </table:table-cell>
          <table:table-cell table:style-name="ce12N2" office:value-type="float" office:value="87787.9">
            <text:p>87787,90</text:p>
          </table:table-cell>
          <table:table-cell table:style-name="ce12N2" office:value-type="float" office:value="9028.85">
            <text:p>902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61064838014193550010001684401821352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3">
            <text:p>30919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0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40.19">
            <text:p>45540,19</text:p>
          </table:table-cell>
          <table:table-cell table:style-name="ce12N2" office:value-type="float" office:value="2966.67">
            <text:p>2966,67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3427.11">
            <text:p>43427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90594">
            <text:p>4,091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40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146.66">
            <text:p>35146,66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.32">
            <text:p>316,32</text:p>
          </table:table-cell>
          <table:table-cell table:style-name="ce12N2" office:value-type="float" office:value="78.51">
            <text:p>78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720.2">
            <text:p>3720,20</text:p>
          </table:table-cell>
          <table:table-cell table:style-name="ce12N2" office:value-type="float" office:value="40460.44">
            <text:p>40460,44</text:p>
          </table:table-cell>
          <table:table-cell table:style-name="ce12N2" office:value-type="float" office:value="1731.37">
            <text:p>173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516.52">
            <text:p>7516,52</text:p>
          </table:table-cell>
          <table:table-cell table:style-name="ce12N2" office:value-type="float" office:value="1359.55">
            <text:p>1359,55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0281235243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4">
            <text:p>30919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2.8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58.86">
            <text:p>52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1291.85">
            <text:p>5129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2335">
            <text:p>0,532</text:p>
          </table:table-cell>
          <table:table-cell table:style-name="ce12N2" office:value-type="float" office:value="578.8">
            <text:p>57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289.03">
            <text:p>43289,03</text:p>
          </table:table-cell>
          <table:table-cell table:style-name="ce12N2" office:value-type="float" office:value="43.29">
            <text:p>4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9.6">
            <text:p>389,6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667.01">
            <text:p>1667,01</text:p>
          </table:table-cell>
          <table:table-cell table:style-name="ce12N2" office:value-type="float" office:value="51291.85">
            <text:p>51291,85</text:p>
          </table:table-cell>
          <table:table-cell table:style-name="ce12N2" office:value-type="float" office:value="3590.43">
            <text:p>359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69.09">
            <text:p>10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14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1.069,09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35260660398369000800550010006028041645675538</text:p>
          </table:table-cell>
          <table:table-cell table:style-name="ce0" office:value-type="string" calcext:value-type="string">
            <text:p>3526061138956500020057005000401144100087493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5">
            <text:p>309195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378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9.04">
            <text:p>149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94">
            <text:p>14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898">
            <text:p>0,024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9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1.7">
            <text:p>1351,70</text:p>
          </table:table-cell>
          <table:table-cell table:style-name="ce12N2" office:value-type="float" office:value="1.35">
            <text:p>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4.1">
            <text:p>74,10</text:p>
          </table:table-cell>
          <table:table-cell table:style-name="ce12N2" office:value-type="float" office:value="1046.33">
            <text:p>1046,33</text:p>
          </table:table-cell>
          <table:table-cell table:style-name="ce12N2" office:value-type="float" office:value="73.24">
            <text:p>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3781283009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6">
            <text:p>309196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41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3.22">
            <text:p>2109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50.59">
            <text:p>20050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205">
            <text:p>0,180</text:p>
          </table:table-cell>
          <table:table-cell table:style-name="ce12N2" office:value-type="float" office:value="131.97">
            <text:p>13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9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68.08">
            <text:p>17468,08</text:p>
          </table:table-cell>
          <table:table-cell table:style-name="ce12N2" office:value-type="float" office:value="17.47">
            <text:p>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.21">
            <text:p>157,2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42.63">
            <text:p>1042,63</text:p>
          </table:table-cell>
          <table:table-cell table:style-name="ce12N2" office:value-type="float" office:value="20050.59">
            <text:p>20050,59</text:p>
          </table:table-cell>
          <table:table-cell table:style-name="ce12N2" office:value-type="float" office:value="802.02">
            <text:p>80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4141653364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7">
            <text:p>309197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9.49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.99">
            <text:p>38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.16">
            <text:p>36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26">
            <text:p>0,000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.51">
            <text:p>315,51</text:p>
          </table:table-cell>
          <table:table-cell table:style-name="ce12N2" office:value-type="float" office:value="0.32">
            <text:p>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362.16">
            <text:p>362,16</text:p>
          </table:table-cell>
          <table:table-cell table:style-name="ce12N2" office:value-type="float" office:value="14.49">
            <text:p>1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8659200001005500400074949516895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9">
            <text:p>30919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2.4">
            <text:p>7592,40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3">
            <text:p>68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629.72">
            <text:p>62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01965533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0">
            <text:p>30920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3.4">
            <text:p>327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6">
            <text:p>0,054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8.42">
            <text:p>2598,4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8">
            <text:p>23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119.31">
            <text:p>1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0188334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1">
            <text:p>30920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134">
            <text:p>14,613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.67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601.94">
            <text:p>108601,94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42">
            <text:p>977,4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9007.54">
            <text:p>900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7991450881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2">
            <text:p>30920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987.53">
            <text:p>2698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6987.53">
            <text:p>2698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579">
            <text:p>2,758</text:p>
          </table:table-cell>
          <table:table-cell table:style-name="ce12N2" office:value-type="float" office:value="427.2">
            <text:p>42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98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182.31">
            <text:p>24182,31</text:p>
          </table:table-cell>
          <table:table-cell table:style-name="ce12N2" office:value-type="float" office:value="24.18">
            <text:p>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.65">
            <text:p>217,65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87.53">
            <text:p>26987,53</text:p>
          </table:table-cell>
          <table:table-cell table:style-name="ce12N2" office:value-type="float" office:value="1889.12">
            <text:p>188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365014000162550010000465001767581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3">
            <text:p>309203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5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01.43">
            <text:p>1130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301.43">
            <text:p>11301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32">
            <text:p>1,563</text:p>
          </table:table-cell>
          <table:table-cell table:style-name="ce12N2" office:value-type="float" office:value="269">
            <text:p>2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01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26.7">
            <text:p>10126,70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14">
            <text:p>91,14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01.43">
            <text:p>11301,43</text:p>
          </table:table-cell>
          <table:table-cell table:style-name="ce12N2" office:value-type="float" office:value="791.09">
            <text:p>79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365014000162550010000465011697748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4">
            <text:p>309204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5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0">
            <text:p>70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20">
            <text:p>70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84">
            <text:p>0,1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0.3">
            <text:p>6290,30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1">
            <text:p>56,61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20">
            <text:p>7020,00</text:p>
          </table:table-cell>
          <table:table-cell table:style-name="ce12N2" office:value-type="float" office:value="491.4">
            <text:p>49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365014000162550010000465021528037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5">
            <text:p>3092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265.37">
            <text:p>66326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">
            <text:p>92,00</text:p>
          </table:table-cell>
          <table:table-cell table:style-name="ce12N2" office:value-type="float" office:value="657872.35">
            <text:p>65787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833163">
            <text:p>15,833</text:p>
          </table:table-cell>
          <table:table-cell table:style-name="ce12N2" office:value-type="float" office:value="3254.08">
            <text:p>325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3.26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772.64">
            <text:p>559772,64</text:p>
          </table:table-cell>
          <table:table-cell table:style-name="ce12N2" office:value-type="float" office:value="559.79">
            <text:p>5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7.93">
            <text:p>5037,9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93.02">
            <text:p>5393,02</text:p>
          </table:table-cell>
          <table:table-cell table:style-name="ce12N2" office:value-type="float" office:value="647536.65">
            <text:p>647536,65</text:p>
          </table:table-cell>
          <table:table-cell table:style-name="ce12N2" office:value-type="float" office:value="41043">
            <text:p>410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61740177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6">
            <text:p>30920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7.29">
            <text:p>2667,29</text:p>
          </table:table-cell>
          <table:table-cell table:style-name="ce12N2" office:value-type="float" office:value="127.91">
            <text:p>127,9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58.24">
            <text:p>255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504">
            <text:p>0,915</text:p>
          </table:table-cell>
          <table:table-cell table:style-name="ce12N2" office:value-type="float" office:value="7.84">
            <text:p>7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7.3">
            <text:p>2117,30</text:p>
          </table:table-cell>
          <table:table-cell table:style-name="ce12N2" office:value-type="float" office:value="2.12">
            <text:p>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6">
            <text:p>19,06</text:p>
          </table:table-cell>
          <table:table-cell table:style-name="ce12N2" office:value-type="float" office:value="67.51">
            <text:p>67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36.96">
            <text:p>236,96</text:p>
          </table:table-cell>
          <table:table-cell table:style-name="ce12N2" office:value-type="float" office:value="2430.33">
            <text:p>2430,33</text:p>
          </table:table-cell>
          <table:table-cell table:style-name="ce12N2" office:value-type="float" office:value="97.21">
            <text:p>9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4131331400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1">
            <text:p>30921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">
            <text:p>0,000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1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19.99">
            <text:p>35519,99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2673.55">
            <text:p>267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913116267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2">
            <text:p>30921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3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9.01">
            <text:p>2584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35.36">
            <text:p>2503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">
            <text:p>1,120</text:p>
          </table:table-cell>
          <table:table-cell table:style-name="ce12N2" office:value-type="float" office:value="4.48">
            <text:p>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4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29.21">
            <text:p>21129,21</text:p>
          </table:table-cell>
          <table:table-cell table:style-name="ce12N2" office:value-type="float" office:value="21.13">
            <text:p>2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.16">
            <text:p>190,16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813.65">
            <text:p>813,65</text:p>
          </table:table-cell>
          <table:table-cell table:style-name="ce12N2" office:value-type="float" office:value="25035.36">
            <text:p>25035,36</text:p>
          </table:table-cell>
          <table:table-cell table:style-name="ce12N2" office:value-type="float" office:value="1752.48">
            <text:p>175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36231391172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3">
            <text:p>30921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7.9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4856">
            <text:p>5,849</text:p>
          </table:table-cell>
          <table:table-cell table:style-name="ce12N2" office:value-type="float" office:value="288">
            <text:p>28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3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54.24">
            <text:p>24754,24</text:p>
          </table:table-cell>
          <table:table-cell table:style-name="ce12N2" office:value-type="float" office:value="24.75">
            <text:p>2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.79">
            <text:p>222,7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2053.14">
            <text:p>205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554846000136550010006879671996625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6">
            <text:p>309216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01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78">
            <text:p>164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">
            <text:p>0,006</text:p>
          </table:table-cell>
          <table:table-cell table:style-name="ce12N2" office:value-type="float" office:value="10.26">
            <text:p>1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8.79">
            <text:p>1358,79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3">
            <text:p>12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81.1">
            <text:p>81,1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62.39">
            <text:p>6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0191431119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7">
            <text:p>309217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5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15.77">
            <text:p>4021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4490.37">
            <text:p>3449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1.467992">
            <text:p>121,468</text:p>
          </table:table-cell>
          <table:table-cell table:style-name="ce12N2" office:value-type="float" office:value="1176.85">
            <text:p>1176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1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544.02">
            <text:p>27544,02</text:p>
          </table:table-cell>
          <table:table-cell table:style-name="ce12N2" office:value-type="float" office:value="27.54">
            <text:p>2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89">
            <text:p>247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490.37">
            <text:p>34490,37</text:p>
          </table:table-cell>
          <table:table-cell table:style-name="ce12N2" office:value-type="float" office:value="4138.84">
            <text:p>413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321.23">
            <text:p>49321,23</text:p>
          </table:table-cell>
          <table:table-cell table:style-name="ce12N2" office:value-type="float" office:value="5725.4">
            <text:p>5725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10921911001004550010002559491707926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8">
            <text:p>30921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3.96">
            <text:p>2193,96</text:p>
          </table:table-cell>
          <table:table-cell table:style-name="ce12N2" office:value-type="float" office:value="108.46">
            <text:p>108,46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69.2">
            <text:p>216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08">
            <text:p>0,109</text:p>
          </table:table-cell>
          <table:table-cell table:style-name="ce12N2" office:value-type="float" office:value="39.2">
            <text:p>3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5.31">
            <text:p>1795,31</text:p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6">
            <text:p>16,16</text:p>
          </table:table-cell>
          <table:table-cell table:style-name="ce12N2" office:value-type="float" office:value="61.72">
            <text:p>6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2060.74">
            <text:p>2060,74</text:p>
          </table:table-cell>
          <table:table-cell table:style-name="ce12N2" office:value-type="float" office:value="82.43">
            <text:p>8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7721335751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2">
            <text:p>30922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303.56">
            <text:p>94303,56</text:p>
          </table:table-cell>
          <table:table-cell table:style-name="ce12N2" office:value-type="float" office:value="5352.99">
            <text:p>5352,99</text:p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88332.75">
            <text:p>8833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447424">
            <text:p>10,447</text:p>
          </table:table-cell>
          <table:table-cell table:style-name="ce12N2" office:value-type="float" office:value="3158.95">
            <text:p>315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3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92.08">
            <text:p>72292,08</text:p>
          </table:table-cell>
          <table:table-cell table:style-name="ce12N2" office:value-type="float" office:value="72.32">
            <text:p>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0.61">
            <text:p>650,61</text:p>
          </table:table-cell>
          <table:table-cell table:style-name="ce12N2" office:value-type="float" office:value="80.86">
            <text:p>80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734.92">
            <text:p>7734,92</text:p>
          </table:table-cell>
          <table:table-cell table:style-name="ce12N2" office:value-type="float" office:value="82979.76">
            <text:p>82979,76</text:p>
          </table:table-cell>
          <table:table-cell table:style-name="ce12N2" office:value-type="float" office:value="3319.15">
            <text:p>331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841.53">
            <text:p>19841,53</text:p>
          </table:table-cell>
          <table:table-cell table:style-name="ce12N2" office:value-type="float" office:value="3588.88">
            <text:p>3588,8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9541734405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8">
            <text:p>30922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12.66">
            <text:p>169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03.44">
            <text:p>16803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16">
            <text:p>2,888</text:p>
          </table:table-cell>
          <table:table-cell table:style-name="ce12N2" office:value-type="float" office:value="14756.48">
            <text:p>1475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1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1.68">
            <text:p>14181,68</text:p>
          </table:table-cell>
          <table:table-cell table:style-name="ce12N2" office:value-type="float" office:value="14.19">
            <text:p>1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99.88">
            <text:p>99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9.22">
            <text:p>109,22</text:p>
          </table:table-cell>
          <table:table-cell table:style-name="ce12N2" office:value-type="float" office:value="16803.44">
            <text:p>16803,44</text:p>
          </table:table-cell>
          <table:table-cell table:style-name="ce12N2" office:value-type="float" office:value="1176.24">
            <text:p>117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161164283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9">
            <text:p>3092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3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71.5">
            <text:p>423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097.86">
            <text:p>42097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444438">
            <text:p>6,444</text:p>
          </table:table-cell>
          <table:table-cell table:style-name="ce12N2" office:value-type="float" office:value="28096.32">
            <text:p>2809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29.52">
            <text:p>35529,52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76">
            <text:p>319,76</text:p>
          </table:table-cell>
          <table:table-cell table:style-name="ce12N2" office:value-type="float" office:value="99.88">
            <text:p>99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73.64">
            <text:p>273,64</text:p>
          </table:table-cell>
          <table:table-cell table:style-name="ce12N2" office:value-type="float" office:value="42097.86">
            <text:p>42097,86</text:p>
          </table:table-cell>
          <table:table-cell table:style-name="ce12N2" office:value-type="float" office:value="2946.86">
            <text:p>29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151082121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3">
            <text:p>309233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591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59">
            <text:p>98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72">
            <text:p>0,063</text:p>
          </table:table-cell>
          <table:table-cell table:style-name="ce12N2" office:value-type="float" office:value="39.9">
            <text:p>39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6.21">
            <text:p>816,21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5">
            <text:p>7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8.72">
            <text:p>48,72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37.47">
            <text:p>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5911469016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4">
            <text:p>309234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.04">
            <text:p>127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02">
            <text:p>0,007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7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9.77">
            <text:p>1039,77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6">
            <text:p>9,3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.04">
            <text:p>40,04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86.24">
            <text:p>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81518696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4">
            <text:p>30924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7.6">
            <text:p>100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51546">
            <text:p>2,852</text:p>
          </table:table-cell>
          <table:table-cell table:style-name="ce12N2" office:value-type="float" office:value="9846.72">
            <text:p>984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0.32">
            <text:p>8450,32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97.88">
            <text:p>97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5.08">
            <text:p>65,08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700.88">
            <text:p>70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981821558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3">
            <text:p>3092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9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">
            <text:p>0,038</text:p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2.5">
            <text:p>15802,50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22">
            <text:p>142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1310.68">
            <text:p>13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9141870408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5">
            <text:p>309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69.81">
            <text:p>386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6">
            <text:p>0,040</text:p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6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3.22">
            <text:p>3163,2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7">
            <text:p>28,4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1.81">
            <text:p>121,81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262.36">
            <text:p>2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251070833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6">
            <text:p>3092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0.44">
            <text:p>99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9">
            <text:p>0,034</text:p>
          </table:table-cell>
          <table:table-cell table:style-name="ce12N2" office:value-type="float" office:value="10.86">
            <text:p>1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97">
            <text:p>790,97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24">
            <text:p>53,24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65.6">
            <text:p>6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0188789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7">
            <text:p>3092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45">
            <text:p>39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65">
            <text:p>0,065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.15">
            <text:p>331,15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.35">
            <text:p>12,35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41999037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8">
            <text:p>3092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91">
            <text:p>168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">
            <text:p>0,040</text:p>
          </table:table-cell>
          <table:table-cell table:style-name="ce12N2" office:value-type="float" office:value="2.74">
            <text:p>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.77">
            <text:p>1402,77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3">
            <text:p>12,63</text:p>
          </table:table-cell>
          <table:table-cell table:style-name="ce12N2" office:value-type="float" office:value="27.71">
            <text:p>27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8.91">
            <text:p>68,91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72.25">
            <text:p>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915384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1">
            <text:p>30926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85.79">
            <text:p>1138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124">
            <text:p>0,914</text:p>
          </table:table-cell>
          <table:table-cell table:style-name="ce12N2" office:value-type="float" office:value="673.8">
            <text:p>6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8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86.01">
            <text:p>9486,01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46.11">
            <text:p>146,11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786.78">
            <text:p>78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9071641784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4">
            <text:p>3092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694.92">
            <text:p>1836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">
            <text:p>119,00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6.226182">
            <text:p>236,226</text:p>
          </table:table-cell>
          <table:table-cell table:style-name="ce12N2" office:value-type="float" office:value="1004.2">
            <text:p>100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3.6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14.08">
            <text:p>145514,08</text:p>
          </table:table-cell>
          <table:table-cell table:style-name="ce12N2" office:value-type="float" office:value="145.51">
            <text:p>14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9.64">
            <text:p>1309,6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1936.85">
            <text:p>11936,85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11411.95">
            <text:p>114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081550885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5">
            <text:p>3092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.14">
            <text:p>58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62">
            <text:p>0,000</text:p>
          </table:table-cell>
          <table:table-cell table:style-name="ce12N2" office:value-type="float" office:value="77">
            <text:p>7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5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9">
            <text:p>478,29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42">
            <text:p>18,42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39.67">
            <text:p>3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901655193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8">
            <text:p>309268</text:p>
          </table:table-cell>
          <table:table-cell table:style-name="ce0" table:number-columns-spanned="4" table:number-rows-spanned="1" office:value-type="string" calcext:value-type="string">
            <text:p>13.002 - TECNYL IND E COM DE TELAS LTDA</text:p>
          </table:table-cell>
          <table:covered-table-cell table:number-columns-repeated="3"/>
          <table:table-cell table:style-name="ce0" office:value-type="string" calcext:value-type="string">
            <text:p>23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21.39">
            <text:p>175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452">
            <text:p>164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905">
            <text:p>0,529</text:p>
          </table:table-cell>
          <table:table-cell table:style-name="ce12N2" office:value-type="float" office:value="2309">
            <text:p>23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52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7.43">
            <text:p>15217,43</text:p>
          </table:table-cell>
          <table:table-cell table:style-name="ce12N2" office:value-type="float" office:value="15.21">
            <text:p>1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6.96">
            <text:p>136,96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069.39">
            <text:p>1069,39</text:p>
          </table:table-cell>
          <table:table-cell table:style-name="ce12N2" office:value-type="float" office:value="16452">
            <text:p>16452,00</text:p>
          </table:table-cell>
          <table:table-cell table:style-name="ce12N2" office:value-type="float" office:value="658.08">
            <text:p>65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70.22">
            <text:p>127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21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1.270,2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35260605311173000144550010000233181546351925</text:p>
          </table:table-cell>
          <table:table-cell table:style-name="ce0" office:value-type="string" calcext:value-type="string">
            <text:p>3526061138956500020057005000401216100087572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9">
            <text:p>30926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7">
            <text:p>0,010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2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9.49">
            <text:p>9229,49</text:p>
          </table:table-cell>
          <table:table-cell table:style-name="ce12N2" office:value-type="float" office:value="369.17">
            <text:p>36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5104359000122550010000047451406886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8">
            <text:p>309278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8">
            <text:p>35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58">
            <text:p>35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24593">
            <text:p>8,246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8">
            <text:p>3558,00</text:p>
          </table:table-cell>
          <table:table-cell table:style-name="ce12N2" office:value-type="float" office:value="135.92">
            <text:p>13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81849406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0">
            <text:p>309280</text:p>
          </table:table-cell>
          <table:table-cell table:style-name="ce0" table:number-columns-spanned="4" table:number-rows-spanned="1" office:value-type="string" calcext:value-type="string">
            <text:p>28.315 - BSB METAIS LTDA</text:p>
          </table:table-cell>
          <table:covered-table-cell table:number-columns-repeated="3"/>
          <table:table-cell table:style-name="ce0" office:value-type="string" calcext:value-type="string">
            <text:p>29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06.96">
            <text:p>2560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606.96">
            <text:p>2560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86463">
            <text:p>1,086</text:p>
          </table:table-cell>
          <table:table-cell table:style-name="ce12N2" office:value-type="float" office:value="1122.9">
            <text:p>112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60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06.96">
            <text:p>25606,96</text:p>
          </table:table-cell>
          <table:table-cell table:style-name="ce12N2" office:value-type="float" office:value="916.73">
            <text:p>91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510986080001315500000000029917164871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1">
            <text:p>30928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87">
            <text:p>85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587">
            <text:p>858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37648">
            <text:p>20,376</text:p>
          </table:table-cell>
          <table:table-cell table:style-name="ce12N2" office:value-type="float" office:value="628">
            <text:p>6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8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87">
            <text:p>8587,00</text:p>
          </table:table-cell>
          <table:table-cell table:style-name="ce12N2" office:value-type="float" office:value="328.02">
            <text:p>32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21606637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3">
            <text:p>30928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55.51">
            <text:p>10725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4657">
            <text:p>2,005</text:p>
          </table:table-cell>
          <table:table-cell table:style-name="ce12N2" office:value-type="float" office:value="588.37">
            <text:p>588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255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724.29">
            <text:p>88724,29</text:p>
          </table:table-cell>
          <table:table-cell table:style-name="ce12N2" office:value-type="float" office:value="88.7">
            <text:p>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.53">
            <text:p>798,5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14.04">
            <text:p>5414,04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4073.67">
            <text:p>407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1154743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5">
            <text:p>30928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.33">
            <text:p>673,33</text:p>
          </table:table-cell>
          <table:table-cell table:style-name="ce12N2" office:value-type="float" office:value="32.29">
            <text:p>32,2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45.8">
            <text:p>64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4094">
            <text:p>8,041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49">
            <text:p>534,49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613.51">
            <text:p>613,51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3181135111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6">
            <text:p>30928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8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48.3333">
            <text:p>548,333</text:p>
          </table:table-cell>
          <table:table-cell table:style-name="ce12N2" office:value-type="float" office:value="12373.93">
            <text:p>12373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7.58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064.08">
            <text:p>614064,08</text:p>
          </table:table-cell>
          <table:table-cell table:style-name="ce12N2" office:value-type="float" office:value="614.06">
            <text:p>61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6.58">
            <text:p>5526,5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50930.99">
            <text:p>5093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8071149059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7">
            <text:p>30928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6">
            <text:p>0,666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3.86">
            <text:p>7073,86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586.71">
            <text:p>58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351371785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8">
            <text:p>3092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8.7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82.58">
            <text:p>160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612">
            <text:p>0,145</text:p>
          </table:table-cell>
          <table:table-cell table:style-name="ce12N2" office:value-type="float" office:value="193.25">
            <text:p>19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46.06">
            <text:p>13146,06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33">
            <text:p>118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06.23">
            <text:p>506,23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1090.36">
            <text:p>10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683374000300550030006187791889129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0">
            <text:p>309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68">
            <text:p>0,000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5.6">
            <text:p>675,60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8">
            <text:p>6,0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6.28">
            <text:p>576,28</text:p>
          </table:table-cell>
          <table:table-cell table:style-name="ce12N2" office:value-type="float" office:value="40.34">
            <text:p>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3189687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1">
            <text:p>309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4">
            <text:p>0,049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3.67">
            <text:p>3283,67</text:p>
          </table:table-cell>
          <table:table-cell table:style-name="ce12N2" office:value-type="float" office:value="3.28">
            <text:p>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55">
            <text:p>29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150.77">
            <text:p>15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71872435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2">
            <text:p>309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23">
            <text:p>0,086</text:p>
          </table:table-cell>
          <table:table-cell table:style-name="ce12N2" office:value-type="float" office:value="112.44">
            <text:p>11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7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54.01">
            <text:p>32854,01</text:p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68">
            <text:p>295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2667.61">
            <text:p>266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41579617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3">
            <text:p>3092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6">
            <text:p>0,033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12">
            <text:p>2189,12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">
            <text:p>19,7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100.51">
            <text:p>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61520138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4">
            <text:p>309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6.52">
            <text:p>29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4">
            <text:p>0,000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24">
            <text:p>2311,24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8">
            <text:p>178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21439709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5">
            <text:p>309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1">
            <text:p>0,016</text:p>
          </table:table-cell>
          <table:table-cell table:style-name="ce12N2" office:value-type="float" office:value="26.09">
            <text:p>26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3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84.02">
            <text:p>7284,02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604.14">
            <text:p>60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518487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6">
            <text:p>309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58.8">
            <text:p>5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7.99">
            <text:p>3377,99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">
            <text:p>30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1.39">
            <text:p>2881,39</text:p>
          </table:table-cell>
          <table:table-cell table:style-name="ce12N2" office:value-type="float" office:value="201.7">
            <text:p>20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01005888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7">
            <text:p>3092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616">
            <text:p>0,450</text:p>
          </table:table-cell>
          <table:table-cell table:style-name="ce12N2" office:value-type="float" office:value="212.84">
            <text:p>212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6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316.79">
            <text:p>77316,79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.85">
            <text:p>695,8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6412.72">
            <text:p>64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9150932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8">
            <text:p>3092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1584">
            <text:p>0,212</text:p>
          </table:table-cell>
          <table:table-cell table:style-name="ce12N2" office:value-type="float" office:value="100.16">
            <text:p>10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84.37">
            <text:p>36384,37</text:p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.46">
            <text:p>327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3017.75">
            <text:p>30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11329675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9">
            <text:p>3092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9766">
            <text:p>0,230</text:p>
          </table:table-cell>
          <table:table-cell table:style-name="ce12N2" office:value-type="float" office:value="116.53">
            <text:p>116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8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2.71">
            <text:p>24632,71</text:p>
          </table:table-cell>
          <table:table-cell table:style-name="ce12N2" office:value-type="float" office:value="24.63">
            <text:p>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.69">
            <text:p>221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1538.41">
            <text:p>15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817928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0">
            <text:p>309300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55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86.32">
            <text:p>509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86.32">
            <text:p>5098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21408">
            <text:p>5,721</text:p>
          </table:table-cell>
          <table:table-cell table:style-name="ce12N2" office:value-type="float" office:value="34439.33">
            <text:p>34439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98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17.68">
            <text:p>40717,68</text:p>
          </table:table-cell>
          <table:table-cell table:style-name="ce12N2" office:value-type="float" office:value="40.72">
            <text:p>4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6.46">
            <text:p>366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986.32">
            <text:p>50986,32</text:p>
          </table:table-cell>
          <table:table-cell table:style-name="ce12N2" office:value-type="float" office:value="6118.36">
            <text:p>611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338.19">
            <text:p>1033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.388</text:p>
          </table:table-cell>
          <table:table-cell table:style-name="ce0" office:value-type="string" calcext:value-type="string">
            <text:p>38.002 - TRANSPORTE MARTINS LTDA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10.338,19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2260610524837000193550010005574871642384970</text:p>
          </table:table-cell>
          <table:table-cell table:style-name="ce0" office:value-type="string" calcext:value-type="string">
            <text:p>3226062874377700016557001000019388100022278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8">
            <text:p>30930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56">
            <text:p>507,56</text:p>
          </table:table-cell>
          <table:table-cell table:style-name="ce12N2" office:value-type="float" office:value="33.31">
            <text:p>33,3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7.4">
            <text:p>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7">
            <text:p>0,023</text:p>
          </table:table-cell>
          <table:table-cell table:style-name="ce12N2" office:value-type="float" office:value="7.9">
            <text:p>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6">
            <text:p>395,6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454.09">
            <text:p>454,09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391867126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2">
            <text:p>309312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1.3">
            <text:p>517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71.3">
            <text:p>517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95256">
            <text:p>9,953</text:p>
          </table:table-cell>
          <table:table-cell table:style-name="ce12N2" office:value-type="float" office:value="332">
            <text:p>3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1.3">
            <text:p>5171,30</text:p>
          </table:table-cell>
          <table:table-cell table:style-name="ce12N2" office:value-type="float" office:value="197.54">
            <text:p>1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3181711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7">
            <text:p>30931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4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763.95">
            <text:p>89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375338">
            <text:p>2282,375</text:p>
          </table:table-cell>
          <table:table-cell table:style-name="ce12N2" office:value-type="float" office:value="486.5">
            <text:p>48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76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66.1">
            <text:p>74866,10</text:p>
          </table:table-cell>
          <table:table-cell table:style-name="ce12N2" office:value-type="float" office:value="74.87">
            <text:p>7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.84">
            <text:p>673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12.21">
            <text:p>1312,21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5955.92">
            <text:p>5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49931858413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3">
            <text:p>30932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65">
            <text:p>278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5">
            <text:p>0,080</text:p>
          </table:table-cell>
          <table:table-cell table:style-name="ce12N2" office:value-type="float" office:value="29.5">
            <text:p>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9.08">
            <text:p>2139,08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5">
            <text:p>19,2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177.42">
            <text:p>1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31582261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5">
            <text:p>30932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8.28">
            <text:p>215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5">
            <text:p>0,090</text:p>
          </table:table-cell>
          <table:table-cell table:style-name="ce12N2" office:value-type="float" office:value="23.35">
            <text:p>2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9.33">
            <text:p>1689,33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6.65">
            <text:p>156,65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140.12">
            <text:p>1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51580281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81">
            <text:p>181,00</text:p>
          </table:table-cell>
          <table:table-cell table:style-name="ce26N2" office:value-type="float" office:value="8895.59">
            <text:p>8895,59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2849.09">
            <text:p>72849,09</text:p>
          </table:table-cell>
          <table:table-cell table:style-name="ce26N2" office:value-type="float" office:value="6748964.74">
            <text:p>6748964,74</text:p>
          </table:table-cell>
          <table:table-cell table:style-name="ce26N2" office:value-type="float" office:value="459767.55">
            <text:p>459767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960.55">
            <text:p>14960,55</text:p>
          </table:table-cell>
          <table:table-cell table:style-name="ce26N2" office:value-type="float" office:value="6924954.83">
            <text:p>6924954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1864.73">
            <text:p>81864,73</text:p>
          </table:table-cell>
          <table:table-cell table:style-name="ce26N2" office:value-type="float" office:value="11517.35">
            <text:p>11517,35</text:p>
          </table:table-cell>
          <table:table-cell table:style-name="ce26N2" office:value-type="float" office:value="187.91">
            <text:p>187,9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3529.931224">
            <text:p>23529,931</text:p>
          </table:table-cell>
          <table:table-cell table:style-name="ce26N2" office:value-type="float" office:value="6849315.4">
            <text:p>6849315,40</text:p>
          </table:table-cell>
          <table:table-cell table:style-name="ce26N2" office:value-type="float" office:value="6924954.83">
            <text:p>6924954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75041.55">
            <text:p>5675041,55</text:p>
          </table:table-cell>
          <table:table-cell table:style-name="ce26N2" office:value-type="float" office:value="5674.95">
            <text:p>5674,9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1075.31">
            <text:p>51075,3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96271.13">
            <text:p>496271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11">
            <text:p>45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08" meta:object-count="0"/>
    <meta:generator>LibreOffice/4.3.0.4$Windows_x86 LibreOffice_project/62ad5818884a2fc2e5780dd45466868d41009ec0</meta:generator>
  </office:meta>
</office:document-meta>
</file>