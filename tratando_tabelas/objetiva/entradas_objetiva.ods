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2/05/2026 07:50:03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292401">
            <text:p>2924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852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10/2025</text:p>
          </table:table-cell>
          <table:table-cell table:style-name="ce0" office:value-type="string" calcext:value-type="string">
            <text:p>08/10/2025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24">
            <text:p>0,084</text:p>
          </table:table-cell>
          <table:table-cell table:style-name="ce12N2" office:value-type="float" office:value="125.7">
            <text:p>12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10/20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51061413282000143550010028528291960596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299145">
            <text:p>299145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696.5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1/2026</text:p>
          </table:table-cell>
          <table:table-cell table:style-name="ce0" office:value-type="string" calcext:value-type="string">
            <text:p>12/01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5.43">
            <text:p>122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1/2026</text:p>
          </table:table-cell>
          <table:table-cell table:style-name="ce12N2" office:value-type="float" office:value="118.13">
            <text:p>118,13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40.76">
            <text:p>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88.3">
            <text:p>8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102130525000177550030006965601356118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20">
            <text:p>302520</text:p>
          </table:table-cell>
          <table:table-cell table:style-name="ce0" table:number-columns-spanned="4" table:number-rows-spanned="1" office:value-type="string" calcext:value-type="string">
            <text:p>15.690 - CLI CENTRAL DE LOGISTICA INTEGRADA LTDA</text:p>
          </table:table-cell>
          <table:covered-table-cell table:number-columns-repeated="3"/>
          <table:table-cell table:style-name="ce0" office:value-type="string" calcext:value-type="string">
            <text:p>38.0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4/02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24.82">
            <text:p>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213528071000103550040000380921000371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35">
            <text:p>3025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30.01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">
            <text:p>30,000</text:p>
          </table:table-cell>
          <table:table-cell table:style-name="ce12N2" office:value-type="float" office:value="3425.1">
            <text:p>342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8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301637895007498550060014300181495666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11">
            <text:p>304411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2.85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4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5">
            <text:p>0,00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74.43">
            <text:p>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277713100347355005000882859186295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49">
            <text:p>30484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81.4">
            <text:p>1618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93.8">
            <text:p>151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9666">
            <text:p>5,897</text:p>
          </table:table-cell>
          <table:table-cell table:style-name="ce12N2" office:value-type="float" office:value="76.48">
            <text:p>7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8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987.6">
            <text:p>987,60</text:p>
          </table:table-cell>
          <table:table-cell table:style-name="ce12N2" office:value-type="float" office:value="15193.8">
            <text:p>15193,80</text:p>
          </table:table-cell>
          <table:table-cell table:style-name="ce12N2" office:value-type="float" office:value="607.75">
            <text:p>60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71271787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50">
            <text:p>30485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4">
            <text:p>0,295</text:p>
          </table:table-cell>
          <table:table-cell table:style-name="ce12N2" office:value-type="float" office:value="78.26">
            <text:p>7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42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856.99">
            <text:p>85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81547519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51">
            <text:p>3048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88">
            <text:p>0,031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43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1537.36">
            <text:p>153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91593785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1">
            <text:p>3052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056">
            <text:p>0,070</text:p>
          </table:table-cell>
          <table:table-cell table:style-name="ce12N2" office:value-type="float" office:value="110.71">
            <text:p>11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41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2536.69">
            <text:p>25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61466193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5">
            <text:p>305685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8.50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5.91">
            <text:p>212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59">
            <text:p>205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7">
            <text:p>0,018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5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6.91">
            <text:p>66,91</text:p>
          </table:table-cell>
          <table:table-cell table:style-name="ce12N2" office:value-type="float" office:value="2059">
            <text:p>2059,00</text:p>
          </table:table-cell>
          <table:table-cell table:style-name="ce12N2" office:value-type="float" office:value="144.13">
            <text:p>14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85061364734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4">
            <text:p>305784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0.7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22.13">
            <text:p>2232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1.71985">
            <text:p>141,720</text:p>
          </table:table-cell>
          <table:table-cell table:style-name="ce12N2" office:value-type="float" office:value="1211.17">
            <text:p>121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22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702.63">
            <text:p>702,63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1513.37">
            <text:p>15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70398020001225500100005074519243338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58">
            <text:p>30585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4.9">
            <text:p>199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4.9">
            <text:p>1994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449">
            <text:p>0,184</text:p>
          </table:table-cell>
          <table:table-cell table:style-name="ce12N2" office:value-type="float" office:value="107.82">
            <text:p>107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4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4.9">
            <text:p>1994,90</text:p>
          </table:table-cell>
          <table:table-cell table:style-name="ce12N2" office:value-type="float" office:value="139.64">
            <text:p>13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71606174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59">
            <text:p>30585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">
            <text:p>79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">
            <text:p>79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96">
            <text:p>0,074</text:p>
          </table:table-cell>
          <table:table-cell table:style-name="ce12N2" office:value-type="float" office:value="43.13">
            <text:p>4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">
            <text:p>798,00</text:p>
          </table:table-cell>
          <table:table-cell table:style-name="ce12N2" office:value-type="float" office:value="55.86">
            <text:p>5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61653580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0">
            <text:p>30586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3.2">
            <text:p>114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3.2">
            <text:p>114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16">
            <text:p>0,321</text:p>
          </table:table-cell>
          <table:table-cell table:style-name="ce12N2" office:value-type="float" office:value="70.6">
            <text:p>7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3.2">
            <text:p>1143,20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51455723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3">
            <text:p>30586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.92">
            <text:p>580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0.92">
            <text:p>580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944">
            <text:p>0,829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0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.92">
            <text:p>5800,92</text:p>
          </table:table-cell>
          <table:table-cell table:style-name="ce12N2" office:value-type="float" office:value="406.06">
            <text:p>40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31607341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9">
            <text:p>305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76.28">
            <text:p>2477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600.28">
            <text:p>2360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2032">
            <text:p>0,292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77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176">
            <text:p>1176,00</text:p>
          </table:table-cell>
          <table:table-cell table:style-name="ce12N2" office:value-type="float" office:value="23600.28">
            <text:p>23600,28</text:p>
          </table:table-cell>
          <table:table-cell table:style-name="ce12N2" office:value-type="float" office:value="1109.25">
            <text:p>110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01009880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0">
            <text:p>305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40.35">
            <text:p>644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47.28">
            <text:p>604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078">
            <text:p>0,066</text:p>
          </table:table-cell>
          <table:table-cell table:style-name="ce12N2" office:value-type="float" office:value="29.53">
            <text:p>2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4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393.07">
            <text:p>393,07</text:p>
          </table:table-cell>
          <table:table-cell table:style-name="ce12N2" office:value-type="float" office:value="6047.28">
            <text:p>6047,28</text:p>
          </table:table-cell>
          <table:table-cell table:style-name="ce12N2" office:value-type="float" office:value="241.89">
            <text:p>24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914817314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1">
            <text:p>3059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8.35">
            <text:p>83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6.7">
            <text:p>760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425">
            <text:p>0,384</text:p>
          </table:table-cell>
          <table:table-cell table:style-name="ce12N2" office:value-type="float" office:value="7.31">
            <text:p>7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41.65">
            <text:p>741,65</text:p>
          </table:table-cell>
          <table:table-cell table:style-name="ce12N2" office:value-type="float" office:value="7606.7">
            <text:p>7606,70</text:p>
          </table:table-cell>
          <table:table-cell table:style-name="ce12N2" office:value-type="float" office:value="304.27">
            <text:p>30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81855789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2">
            <text:p>3059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92">
            <text:p>0,003</text:p>
          </table:table-cell>
          <table:table-cell table:style-name="ce12N2" office:value-type="float" office:value="5.48">
            <text:p>5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71344346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3">
            <text:p>3059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3.46">
            <text:p>692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00.9">
            <text:p>650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9">
            <text:p>0,075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422.56">
            <text:p>422,56</text:p>
          </table:table-cell>
          <table:table-cell table:style-name="ce12N2" office:value-type="float" office:value="6500.9">
            <text:p>6500,90</text:p>
          </table:table-cell>
          <table:table-cell table:style-name="ce12N2" office:value-type="float" office:value="455.06">
            <text:p>4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419019920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4">
            <text:p>3059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9.59">
            <text:p>205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59.59">
            <text:p>205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501">
            <text:p>0,082</text:p>
          </table:table-cell>
          <table:table-cell table:style-name="ce12N2" office:value-type="float" office:value="17.36">
            <text:p>1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9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7.31">
            <text:p>1577,31</text:p>
          </table:table-cell>
          <table:table-cell table:style-name="ce12N2" office:value-type="float" office:value="103.08">
            <text:p>10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31396025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5">
            <text:p>3059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88">
            <text:p>232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21.88">
            <text:p>232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38">
            <text:p>0,033</text:p>
          </table:table-cell>
          <table:table-cell table:style-name="ce12N2" office:value-type="float" office:value="6.6">
            <text:p>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4.96">
            <text:p>1704,96</text:p>
          </table:table-cell>
          <table:table-cell table:style-name="ce12N2" office:value-type="float" office:value="119.35">
            <text:p>11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21490162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7">
            <text:p>3059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.5">
            <text:p>29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.71">
            <text:p>273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78">
            <text:p>0,006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9">
            <text:p>17,79</text:p>
          </table:table-cell>
          <table:table-cell table:style-name="ce12N2" office:value-type="float" office:value="273.71">
            <text:p>273,71</text:p>
          </table:table-cell>
          <table:table-cell table:style-name="ce12N2" office:value-type="float" office:value="19.16">
            <text:p>1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11892787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9">
            <text:p>305929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9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77.5">
            <text:p>170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227">
            <text:p>0,155</text:p>
          </table:table-cell>
          <table:table-cell table:style-name="ce12N2" office:value-type="float" office:value="210.19">
            <text:p>2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7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">
            <text:p>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37.54">
            <text:p>537,54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1157.8">
            <text:p>115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90471998837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4">
            <text:p>305934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57.1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.35">
            <text:p>132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39.66">
            <text:p>123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092">
            <text:p>0,032</text:p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86.69">
            <text:p>86,69</text:p>
          </table:table-cell>
          <table:table-cell table:style-name="ce12N2" office:value-type="float" office:value="1239.66">
            <text:p>1239,66</text:p>
          </table:table-cell>
          <table:table-cell table:style-name="ce12N2" office:value-type="float" office:value="49.59">
            <text:p>4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459901810032855500200125711114374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9">
            <text:p>305939</text:p>
          </table:table-cell>
          <table:table-cell table:style-name="ce0" table:number-columns-spanned="4" table:number-rows-spanned="1" office:value-type="string" calcext:value-type="string">
            <text:p>16.404 - GARRA DISTRIBUIDORA DE FUNDIDOS EIRELI</text:p>
          </table:table-cell>
          <table:covered-table-cell table:number-columns-repeated="3"/>
          <table:table-cell table:style-name="ce0" office:value-type="string" calcext:value-type="string">
            <text:p>5.7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6.8">
            <text:p>100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76.8">
            <text:p>1007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6">
            <text:p>0,022</text:p>
          </table:table-cell>
          <table:table-cell table:style-name="ce12N2" office:value-type="float" office:value="45.1">
            <text:p>4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76.82">
            <text:p>10076,82</text:p>
          </table:table-cell>
          <table:table-cell table:style-name="ce12N2" office:value-type="float" office:value="397.02">
            <text:p>397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178097140001485500100000577019134007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3">
            <text:p>3059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313408256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5">
            <text:p>306055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5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74792">
            <text:p>38,748</text:p>
          </table:table-cell>
          <table:table-cell table:style-name="ce12N2" office:value-type="float" office:value="2302.6">
            <text:p>23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8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1784.05">
            <text:p>178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1260419000152550010001459071219908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69">
            <text:p>306069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2.3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49.06">
            <text:p>384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27.9">
            <text:p>372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282">
            <text:p>0,362</text:p>
          </table:table-cell>
          <table:table-cell table:style-name="ce12N2" office:value-type="float" office:value="36.27">
            <text:p>36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4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21.16">
            <text:p>121,16</text:p>
          </table:table-cell>
          <table:table-cell table:style-name="ce12N2" office:value-type="float" office:value="3727.9">
            <text:p>3727,90</text:p>
          </table:table-cell>
          <table:table-cell table:style-name="ce12N2" office:value-type="float" office:value="149.12">
            <text:p>14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5094003000155550010001823631277124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73">
            <text:p>306073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2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52">
            <text:p>1005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0052">
            <text:p>1005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0385">
            <text:p>1,004</text:p>
          </table:table-cell>
          <table:table-cell table:style-name="ce12N2" office:value-type="float" office:value="488.2">
            <text:p>48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5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52">
            <text:p>10052,00</text:p>
          </table:table-cell>
          <table:table-cell table:style-name="ce12N2" office:value-type="float" office:value="703.64">
            <text:p>703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8276100001425500100006721518122128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97">
            <text:p>30609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4.6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2">
            <text:p>0,011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46451979993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8">
            <text:p>30612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6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810.21">
            <text:p>438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527.28">
            <text:p>4352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91185">
            <text:p>3,991</text:p>
          </table:table-cell>
          <table:table-cell table:style-name="ce12N2" office:value-type="float" office:value="17360.35">
            <text:p>1736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81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82.93">
            <text:p>282,93</text:p>
          </table:table-cell>
          <table:table-cell table:style-name="ce12N2" office:value-type="float" office:value="43527.28">
            <text:p>43527,28</text:p>
          </table:table-cell>
          <table:table-cell table:style-name="ce12N2" office:value-type="float" office:value="3046.92">
            <text:p>304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611483685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9">
            <text:p>3061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5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59.85">
            <text:p>377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3164">
            <text:p>4,063</text:p>
          </table:table-cell>
          <table:table-cell table:style-name="ce12N2" office:value-type="float" office:value="21489.76">
            <text:p>214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75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43.86">
            <text:p>243,86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2626.12">
            <text:p>262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57180812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30">
            <text:p>30613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561.01">
            <text:p>2356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408.85">
            <text:p>2340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518132">
            <text:p>3,518</text:p>
          </table:table-cell>
          <table:table-cell table:style-name="ce12N2" office:value-type="float" office:value="16090.4">
            <text:p>1609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561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52.16">
            <text:p>152,16</text:p>
          </table:table-cell>
          <table:table-cell table:style-name="ce12N2" office:value-type="float" office:value="23408.85">
            <text:p>23408,85</text:p>
          </table:table-cell>
          <table:table-cell table:style-name="ce12N2" office:value-type="float" office:value="1638.62">
            <text:p>16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3216604046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35">
            <text:p>3061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63.3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46.03">
            <text:p>10604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106046.03">
            <text:p>106046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80643">
            <text:p>1,581</text:p>
          </table:table-cell>
          <table:table-cell table:style-name="ce12N2" office:value-type="float" office:value="1296.04">
            <text:p>1296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04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046.03">
            <text:p>106046,03</text:p>
          </table:table-cell>
          <table:table-cell table:style-name="ce12N2" office:value-type="float" office:value="7330.95">
            <text:p>7330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611441500006785500100126338815909578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6">
            <text:p>306166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8.8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28.19">
            <text:p>3292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1895.5">
            <text:p>3189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4003">
            <text:p>1,540</text:p>
          </table:table-cell>
          <table:table-cell table:style-name="ce12N2" office:value-type="float" office:value="2039.79">
            <text:p>2039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92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032.69">
            <text:p>1032,69</text:p>
          </table:table-cell>
          <table:table-cell table:style-name="ce12N2" office:value-type="float" office:value="31895.5">
            <text:p>31895,50</text:p>
          </table:table-cell>
          <table:table-cell table:style-name="ce12N2" office:value-type="float" office:value="1595.9">
            <text:p>159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88651944831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2">
            <text:p>306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.24">
            <text:p>35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.24">
            <text:p>35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96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6.24">
            <text:p>356,24</text:p>
          </table:table-cell>
          <table:table-cell table:style-name="ce12N2" office:value-type="float" office:value="24.94">
            <text:p>2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61296137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6">
            <text:p>30617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2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5.47">
            <text:p>720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5435.48">
            <text:p>5435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64056">
            <text:p>1,964</text:p>
          </table:table-cell>
          <table:table-cell table:style-name="ce12N2" office:value-type="float" office:value="62.3">
            <text:p>62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5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467.52">
            <text:p>467,52</text:p>
          </table:table-cell>
          <table:table-cell table:style-name="ce12N2" office:value-type="float" office:value="5084.86">
            <text:p>5084,86</text:p>
          </table:table-cell>
          <table:table-cell table:style-name="ce12N2" office:value-type="float" office:value="203.4">
            <text:p>20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267.22">
            <text:p>7267,22</text:p>
          </table:table-cell>
          <table:table-cell table:style-name="ce12N2" office:value-type="float" office:value="1302.47">
            <text:p>1302,4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5094003000155550010001825061247713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2">
            <text:p>30620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56">
            <text:p>0,018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7128041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3">
            <text:p>30620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04">
            <text:p>0,020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26.54">
            <text:p>2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91189859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5">
            <text:p>3062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968">
            <text:p>0,122</text:p>
          </table:table-cell>
          <table:table-cell table:style-name="ce12N2" office:value-type="float" office:value="78.26">
            <text:p>7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42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856.99">
            <text:p>85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0451635086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11">
            <text:p>30621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4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09.9">
            <text:p>2180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669.05">
            <text:p>2166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37741">
            <text:p>2,238</text:p>
          </table:table-cell>
          <table:table-cell table:style-name="ce12N2" office:value-type="float" office:value="11518.84">
            <text:p>11518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09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40.85">
            <text:p>140,85</text:p>
          </table:table-cell>
          <table:table-cell table:style-name="ce12N2" office:value-type="float" office:value="21669.05">
            <text:p>21669,05</text:p>
          </table:table-cell>
          <table:table-cell table:style-name="ce12N2" office:value-type="float" office:value="1516.84">
            <text:p>151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4121320047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26">
            <text:p>30622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9.1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966.15">
            <text:p>21496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208455.45">
            <text:p>20845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9.371211">
            <text:p>379,371</text:p>
          </table:table-cell>
          <table:table-cell table:style-name="ce12N2" office:value-type="float" office:value="2241.17">
            <text:p>224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4.96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6510.7">
            <text:p>6510,70</text:p>
          </table:table-cell>
          <table:table-cell table:style-name="ce12N2" office:value-type="float" office:value="208455.45">
            <text:p>208455,45</text:p>
          </table:table-cell>
          <table:table-cell table:style-name="ce12N2" office:value-type="float" office:value="13184.53">
            <text:p>13184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91921570102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29">
            <text:p>306229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3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1.92">
            <text:p>688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665.3">
            <text:p>666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05.98">
            <text:p>70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16.62">
            <text:p>216,62</text:p>
          </table:table-cell>
          <table:table-cell table:style-name="ce12N2" office:value-type="float" office:value="6665.3">
            <text:p>6665,30</text:p>
          </table:table-cell>
          <table:table-cell table:style-name="ce12N2" office:value-type="float" office:value="466.57">
            <text:p>46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0641500005185500100020377114441141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9">
            <text:p>306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.4">
            <text:p>86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3.4">
            <text:p>86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3.4">
            <text:p>863,40</text:p>
          </table:table-cell>
          <table:table-cell table:style-name="ce12N2" office:value-type="float" office:value="60.44">
            <text:p>6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0461959785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0">
            <text:p>306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21.04">
            <text:p>113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30.08">
            <text:p>1063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72">
            <text:p>0,127</text:p>
          </table:table-cell>
          <table:table-cell table:style-name="ce12N2" office:value-type="float" office:value="14.64">
            <text:p>14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2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690.96">
            <text:p>690,96</text:p>
          </table:table-cell>
          <table:table-cell table:style-name="ce12N2" office:value-type="float" office:value="10630.08">
            <text:p>10630,08</text:p>
          </table:table-cell>
          <table:table-cell table:style-name="ce12N2" office:value-type="float" office:value="744.11">
            <text:p>74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0471551926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1">
            <text:p>306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4.56">
            <text:p>215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54.56">
            <text:p>215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316">
            <text:p>0,01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5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54.56">
            <text:p>2154,56</text:p>
          </table:table-cell>
          <table:table-cell table:style-name="ce12N2" office:value-type="float" office:value="150.82">
            <text:p>15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71149664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2">
            <text:p>3062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6.2">
            <text:p>316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66.2">
            <text:p>316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37">
            <text:p>0,044</text:p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24.94">
            <text:p>2324,94</text:p>
          </table:table-cell>
          <table:table-cell table:style-name="ce12N2" office:value-type="float" office:value="162.75">
            <text:p>16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01535720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3">
            <text:p>3062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0">
            <text:p>39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50">
            <text:p>39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3">
            <text:p>0,049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0.49">
            <text:p>2900,49</text:p>
          </table:table-cell>
          <table:table-cell table:style-name="ce12N2" office:value-type="float" office:value="203.03">
            <text:p>20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11554934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4">
            <text:p>3062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24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64.48">
            <text:p>6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311882748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5">
            <text:p>3062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.58">
            <text:p>3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.56">
            <text:p>292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728">
            <text:p>0,287</text:p>
          </table:table-cell>
          <table:table-cell table:style-name="ce12N2" office:value-type="float" office:value="1.96">
            <text:p>1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9.02">
            <text:p>19,02</text:p>
          </table:table-cell>
          <table:table-cell table:style-name="ce12N2" office:value-type="float" office:value="292.56">
            <text:p>292,56</text:p>
          </table:table-cell>
          <table:table-cell table:style-name="ce12N2" office:value-type="float" office:value="11.7">
            <text:p>1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216562189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6">
            <text:p>3062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633.28">
            <text:p>5363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633.28">
            <text:p>5363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">
            <text:p>0,064</text:p>
          </table:table-cell>
          <table:table-cell table:style-name="ce12N2" office:value-type="float" office:value="82.5">
            <text:p>8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63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633.28">
            <text:p>53633,28</text:p>
          </table:table-cell>
          <table:table-cell table:style-name="ce12N2" office:value-type="float" office:value="3754.33">
            <text:p>37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51937980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7">
            <text:p>3062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24">
            <text:p>0,001</text:p>
          </table:table-cell>
          <table:table-cell table:style-name="ce12N2" office:value-type="float" office:value="1.4">
            <text:p>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1.08">
            <text:p>921,08</text:p>
          </table:table-cell>
          <table:table-cell table:style-name="ce12N2" office:value-type="float" office:value="64.48">
            <text:p>6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61991708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8">
            <text:p>3062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48.66">
            <text:p>2244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448.66">
            <text:p>2244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">
            <text:p>0,026</text:p>
          </table:table-cell>
          <table:table-cell table:style-name="ce12N2" office:value-type="float" office:value="33.51">
            <text:p>33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4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448.66">
            <text:p>22448,66</text:p>
          </table:table-cell>
          <table:table-cell table:style-name="ce12N2" office:value-type="float" office:value="1571.41">
            <text:p>157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816358232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49">
            <text:p>3062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9.04">
            <text:p>1012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10.84">
            <text:p>9510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3804">
            <text:p>0,304</text:p>
          </table:table-cell>
          <table:table-cell table:style-name="ce12N2" office:value-type="float" office:value="29.74">
            <text:p>29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9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618.2">
            <text:p>618,20</text:p>
          </table:table-cell>
          <table:table-cell table:style-name="ce12N2" office:value-type="float" office:value="9510.84">
            <text:p>9510,84</text:p>
          </table:table-cell>
          <table:table-cell table:style-name="ce12N2" office:value-type="float" office:value="665.76">
            <text:p>66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91543074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0">
            <text:p>3062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95">
            <text:p>279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95">
            <text:p>279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6">
            <text:p>0,000</text:p>
          </table:table-cell>
          <table:table-cell table:style-name="ce12N2" office:value-type="float" office:value="6.1">
            <text:p>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9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95">
            <text:p>2795,00</text:p>
          </table:table-cell>
          <table:table-cell table:style-name="ce12N2" office:value-type="float" office:value="195.65">
            <text:p>19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701451819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1">
            <text:p>3062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4">
            <text:p>335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4">
            <text:p>335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12">
            <text:p>0,000</text:p>
          </table:table-cell>
          <table:table-cell table:style-name="ce12N2" office:value-type="float" office:value="7.32">
            <text:p>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4">
            <text:p>3354,00</text:p>
          </table:table-cell>
          <table:table-cell table:style-name="ce12N2" office:value-type="float" office:value="234.78">
            <text:p>2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71189965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2">
            <text:p>3062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40.53">
            <text:p>604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40.53">
            <text:p>6040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81591">
            <text:p>1,282</text:p>
          </table:table-cell>
          <table:table-cell table:style-name="ce12N2" office:value-type="float" office:value="57.15">
            <text:p>57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4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40.53">
            <text:p>6040,53</text:p>
          </table:table-cell>
          <table:table-cell table:style-name="ce12N2" office:value-type="float" office:value="283.49">
            <text:p>28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721584226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3">
            <text:p>3062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7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0.64">
            <text:p>256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04.36">
            <text:p>2404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2">
            <text:p>0,004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56.28">
            <text:p>156,28</text:p>
          </table:table-cell>
          <table:table-cell table:style-name="ce12N2" office:value-type="float" office:value="2404.36">
            <text:p>2404,36</text:p>
          </table:table-cell>
          <table:table-cell table:style-name="ce12N2" office:value-type="float" office:value="168.31">
            <text:p>16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7701731463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5">
            <text:p>3062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.12">
            <text:p>86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1.38">
            <text:p>81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4">
            <text:p>0,002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52.74">
            <text:p>52,74</text:p>
          </table:table-cell>
          <table:table-cell table:style-name="ce12N2" office:value-type="float" office:value="811.38">
            <text:p>811,38</text:p>
          </table:table-cell>
          <table:table-cell table:style-name="ce12N2" office:value-type="float" office:value="56.8">
            <text:p>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7711235250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6">
            <text:p>3062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992.97">
            <text:p>1799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992.97">
            <text:p>17992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176">
            <text:p>0,010</text:p>
          </table:table-cell>
          <table:table-cell table:style-name="ce12N2" office:value-type="float" office:value="48.81">
            <text:p>48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992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992.97">
            <text:p>17992,97</text:p>
          </table:table-cell>
          <table:table-cell table:style-name="ce12N2" office:value-type="float" office:value="1259.51">
            <text:p>1259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77215778097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7">
            <text:p>3062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7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70.27">
            <text:p>2947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8443.93">
            <text:p>28443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3446">
            <text:p>0,243</text:p>
          </table:table-cell>
          <table:table-cell table:style-name="ce12N2" office:value-type="float" office:value="221.15">
            <text:p>22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470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026.34">
            <text:p>1026,34</text:p>
          </table:table-cell>
          <table:table-cell table:style-name="ce12N2" office:value-type="float" office:value="27940.16">
            <text:p>27940,16</text:p>
          </table:table-cell>
          <table:table-cell table:style-name="ce12N2" office:value-type="float" office:value="1245.26">
            <text:p>124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77412310719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8">
            <text:p>3062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3.57">
            <text:p>2393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47.48">
            <text:p>22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296">
            <text:p>0,016</text:p>
          </table:table-cell>
          <table:table-cell table:style-name="ce12N2" office:value-type="float" office:value="19.57">
            <text:p>19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3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46.09">
            <text:p>146,09</text:p>
          </table:table-cell>
          <table:table-cell table:style-name="ce12N2" office:value-type="float" office:value="2247.48">
            <text:p>2247,48</text:p>
          </table:table-cell>
          <table:table-cell table:style-name="ce12N2" office:value-type="float" office:value="103.18">
            <text:p>10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7731174399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59">
            <text:p>3062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0.54">
            <text:p>46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0.54">
            <text:p>460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12">
            <text:p>0,001</text:p>
          </table:table-cell>
          <table:table-cell table:style-name="ce12N2" office:value-type="float" office:value="0.7">
            <text:p>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0.54">
            <text:p>460,54</text:p>
          </table:table-cell>
          <table:table-cell table:style-name="ce12N2" office:value-type="float" office:value="32.24">
            <text:p>3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41083385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3">
            <text:p>30627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6.0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68.78">
            <text:p>1976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88.08">
            <text:p>160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336646">
            <text:p>30,337</text:p>
          </table:table-cell>
          <table:table-cell table:style-name="ce12N2" office:value-type="float" office:value="263.02">
            <text:p>26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76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88.08">
            <text:p>16088,08</text:p>
          </table:table-cell>
          <table:table-cell table:style-name="ce12N2" office:value-type="float" office:value="1126.17">
            <text:p>112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949.99">
            <text:p>23949,99</text:p>
          </table:table-cell>
          <table:table-cell table:style-name="ce12N2" office:value-type="float" office:value="3680.7">
            <text:p>3680,7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60021577655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4">
            <text:p>306274</text:p>
          </table:table-cell>
          <table:table-cell table:style-name="ce0" table:number-columns-spanned="4" table:number-rows-spanned="1" office:value-type="string" calcext:value-type="string">
            <text:p>928 - ADERE PRODUTOS AUTO ADESIVOS LTDA</text:p>
          </table:table-cell>
          <table:covered-table-cell table:number-columns-repeated="3"/>
          <table:table-cell table:style-name="ce0" office:value-type="string" calcext:value-type="string">
            <text:p>690.18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130.44">
            <text:p>14313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8521.4">
            <text:p>13852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42552">
            <text:p>10,426</text:p>
          </table:table-cell>
          <table:table-cell table:style-name="ce12N2" office:value-type="float" office:value="6947.68">
            <text:p>6947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3.13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609.04">
            <text:p>4609,04</text:p>
          </table:table-cell>
          <table:table-cell table:style-name="ce12N2" office:value-type="float" office:value="138521.4">
            <text:p>138521,40</text:p>
          </table:table-cell>
          <table:table-cell table:style-name="ce12N2" office:value-type="float" office:value="9669.15">
            <text:p>9669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46062030000123550020006901871742632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14">
            <text:p>306314</text:p>
          </table:table-cell>
          <table:table-cell table:style-name="ce0" table:number-columns-spanned="4" table:number-rows-spanned="1" office:value-type="string" calcext:value-type="string">
            <text:p>13.126 - ALMA TEXTIL LTDA</text:p>
          </table:table-cell>
          <table:covered-table-cell table:number-columns-repeated="3"/>
          <table:table-cell table:style-name="ce0" office:value-type="string" calcext:value-type="string">
            <text:p>16.4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02.2">
            <text:p>2940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402.2">
            <text:p>2940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84.4258">
            <text:p>2584,426</text:p>
          </table:table-cell>
          <table:table-cell table:style-name="ce12N2" office:value-type="float" office:value="1099.7">
            <text:p>109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40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">
            <text:p>3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402.2">
            <text:p>29402,20</text:p>
          </table:table-cell>
          <table:table-cell table:style-name="ce12N2" office:value-type="float" office:value="2058.16">
            <text:p>205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796564000194550010000164151260164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5">
            <text:p>30632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34">
            <text:p>763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34">
            <text:p>763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">
            <text:p>0,450</text:p>
          </table:table-cell>
          <table:table-cell table:style-name="ce12N2" office:value-type="float" office:value="832.5">
            <text:p>83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3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34">
            <text:p>7634,00</text:p>
          </table:table-cell>
          <table:table-cell table:style-name="ce12N2" office:value-type="float" office:value="534.38">
            <text:p>53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601977855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7">
            <text:p>306347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58.79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02.4">
            <text:p>6780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64842.36">
            <text:p>6484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3168">
            <text:p>1,643</text:p>
          </table:table-cell>
          <table:table-cell table:style-name="ce12N2" office:value-type="float" office:value="600.74">
            <text:p>60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80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960.04">
            <text:p>2960,04</text:p>
          </table:table-cell>
          <table:table-cell table:style-name="ce12N2" office:value-type="float" office:value="64842.36">
            <text:p>64842,36</text:p>
          </table:table-cell>
          <table:table-cell table:style-name="ce12N2" office:value-type="float" office:value="2593.71">
            <text:p>259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45990181003285550020012587921490555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49">
            <text:p>30634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61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44.59">
            <text:p>2524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081.56">
            <text:p>2508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7906">
            <text:p>4,068</text:p>
          </table:table-cell>
          <table:table-cell table:style-name="ce12N2" office:value-type="float" office:value="15931.61">
            <text:p>15931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44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63.03">
            <text:p>163,03</text:p>
          </table:table-cell>
          <table:table-cell table:style-name="ce12N2" office:value-type="float" office:value="25081.56">
            <text:p>25081,56</text:p>
          </table:table-cell>
          <table:table-cell table:style-name="ce12N2" office:value-type="float" office:value="1755.71">
            <text:p>175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6161416640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50">
            <text:p>30635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3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3.44">
            <text:p>1893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99997">
            <text:p>2,900</text:p>
          </table:table-cell>
          <table:table-cell table:style-name="ce12N2" office:value-type="float" office:value="11804.18">
            <text:p>1180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33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22.27">
            <text:p>122,27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1316.78">
            <text:p>13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30281564338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63">
            <text:p>3063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2.82">
            <text:p>121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8.8">
            <text:p>11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8">
            <text:p>0,020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74.02">
            <text:p>74,02</text:p>
          </table:table-cell>
          <table:table-cell table:style-name="ce12N2" office:value-type="float" office:value="1138.8">
            <text:p>1138,80</text:p>
          </table:table-cell>
          <table:table-cell table:style-name="ce12N2" office:value-type="float" office:value="45.55">
            <text:p>4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519649826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4">
            <text:p>3063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.59">
            <text:p>35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0.13">
            <text:p>330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1.46">
            <text:p>21,46</text:p>
          </table:table-cell>
          <table:table-cell table:style-name="ce12N2" office:value-type="float" office:value="330.13">
            <text:p>330,13</text:p>
          </table:table-cell>
          <table:table-cell table:style-name="ce12N2" office:value-type="float" office:value="13.21">
            <text:p>1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11948470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5">
            <text:p>3063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532.23">
            <text:p>4253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39936.37">
            <text:p>39936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28524">
            <text:p>4,129</text:p>
          </table:table-cell>
          <table:table-cell table:style-name="ce12N2" office:value-type="float" office:value="114.63">
            <text:p>114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532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595.86">
            <text:p>2595,86</text:p>
          </table:table-cell>
          <table:table-cell table:style-name="ce12N2" office:value-type="float" office:value="39936.37">
            <text:p>39936,37</text:p>
          </table:table-cell>
          <table:table-cell table:style-name="ce12N2" office:value-type="float" office:value="1597.45">
            <text:p>159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21001936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6">
            <text:p>3063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73.81">
            <text:p>1137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679.64">
            <text:p>1067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79776">
            <text:p>3,180</text:p>
          </table:table-cell>
          <table:table-cell table:style-name="ce12N2" office:value-type="float" office:value="42.24">
            <text:p>4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73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694.17">
            <text:p>694,17</text:p>
          </table:table-cell>
          <table:table-cell table:style-name="ce12N2" office:value-type="float" office:value="10679.64">
            <text:p>10679,64</text:p>
          </table:table-cell>
          <table:table-cell table:style-name="ce12N2" office:value-type="float" office:value="427.17">
            <text:p>42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711089203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77">
            <text:p>30637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61.56">
            <text:p>766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61.56">
            <text:p>7661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45444">
            <text:p>1,445</text:p>
          </table:table-cell>
          <table:table-cell table:style-name="ce12N2" office:value-type="float" office:value="420.47">
            <text:p>42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6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61.56">
            <text:p>7661,56</text:p>
          </table:table-cell>
          <table:table-cell table:style-name="ce12N2" office:value-type="float" office:value="536.31">
            <text:p>53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918777132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4">
            <text:p>306384</text:p>
          </table:table-cell>
          <table:table-cell table:style-name="ce0" table:number-columns-spanned="4" table:number-rows-spanned="1" office:value-type="string" calcext:value-type="string">
            <text:p>11.247 - NOVA ROCHA INDUSTRIA DE TINTAS LTDA.</text:p>
          </table:table-cell>
          <table:covered-table-cell table:number-columns-repeated="3"/>
          <table:table-cell table:style-name="ce0" office:value-type="string" calcext:value-type="string">
            <text:p>552.7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6.28">
            <text:p>1334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75">
            <text:p>1317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93538">
            <text:p>5,935</text:p>
          </table:table-cell>
          <table:table-cell table:style-name="ce12N2" office:value-type="float" office:value="8500">
            <text:p>8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4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71.28">
            <text:p>171,28</text:p>
          </table:table-cell>
          <table:table-cell table:style-name="ce12N2" office:value-type="float" office:value="13175">
            <text:p>13175,00</text:p>
          </table:table-cell>
          <table:table-cell table:style-name="ce12N2" office:value-type="float" office:value="1581">
            <text:p>158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300512300010355001000552796119939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5">
            <text:p>30638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8">
            <text:p>0,155</text:p>
          </table:table-cell>
          <table:table-cell table:style-name="ce12N2" office:value-type="float" office:value="22.32">
            <text:p>2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2619763100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6">
            <text:p>30638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67">
            <text:p>0,297</text:p>
          </table:table-cell>
          <table:table-cell table:style-name="ce12N2" office:value-type="float" office:value="42.78">
            <text:p>4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109.48">
            <text:p>1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381888321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7">
            <text:p>30638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1.27">
            <text:p>1643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677.2">
            <text:p>156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48">
            <text:p>0,086</text:p>
          </table:table-cell>
          <table:table-cell table:style-name="ce12N2" office:value-type="float" office:value="70.92">
            <text:p>7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1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754.07">
            <text:p>754,07</text:p>
          </table:table-cell>
          <table:table-cell table:style-name="ce12N2" office:value-type="float" office:value="15677.2">
            <text:p>15677,20</text:p>
          </table:table-cell>
          <table:table-cell table:style-name="ce12N2" office:value-type="float" office:value="1097.4">
            <text:p>109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451350167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9">
            <text:p>3063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0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36.26">
            <text:p>6433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1755.03">
            <text:p>61755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2778">
            <text:p>0,423</text:p>
          </table:table-cell>
          <table:table-cell table:style-name="ce12N2" office:value-type="float" office:value="273.31">
            <text:p>273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3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581.23">
            <text:p>2581,23</text:p>
          </table:table-cell>
          <table:table-cell table:style-name="ce12N2" office:value-type="float" office:value="61755.03">
            <text:p>61755,03</text:p>
          </table:table-cell>
          <table:table-cell table:style-name="ce12N2" office:value-type="float" office:value="3131.52">
            <text:p>313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1019515861022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0">
            <text:p>306390</text:p>
          </table:table-cell>
          <table:table-cell table:style-name="ce0" table:number-columns-spanned="4" table:number-rows-spanned="1" office:value-type="string" calcext:value-type="string">
            <text:p>7.087 - VELLORE S/A</text:p>
          </table:table-cell>
          <table:covered-table-cell table:number-columns-repeated="3"/>
          <table:table-cell table:style-name="ce0" office:value-type="string" calcext:value-type="string">
            <text:p>405.9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45.11">
            <text:p>2034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9419.38">
            <text:p>1941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24">
            <text:p>0,023</text:p>
          </table:table-cell>
          <table:table-cell table:style-name="ce12N2" office:value-type="float" office:value="70.03">
            <text:p>70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45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25.73">
            <text:p>925,73</text:p>
          </table:table-cell>
          <table:table-cell table:style-name="ce12N2" office:value-type="float" office:value="19419.38">
            <text:p>19419,38</text:p>
          </table:table-cell>
          <table:table-cell table:style-name="ce12N2" office:value-type="float" office:value="778.34">
            <text:p>77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1723086000143550010004059441499965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1">
            <text:p>306391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6236">
            <text:p>0,496</text:p>
          </table:table-cell>
          <table:table-cell table:style-name="ce12N2" office:value-type="float" office:value="246.07">
            <text:p>246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48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2477.78">
            <text:p>24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81066087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2">
            <text:p>30639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0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380.11">
            <text:p>2838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6647.99">
            <text:p>2664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23892">
            <text:p>0,624</text:p>
          </table:table-cell>
          <table:table-cell table:style-name="ce12N2" office:value-type="float" office:value="487.68">
            <text:p>487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38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732.12">
            <text:p>1732,12</text:p>
          </table:table-cell>
          <table:table-cell table:style-name="ce12N2" office:value-type="float" office:value="26647.99">
            <text:p>26647,99</text:p>
          </table:table-cell>
          <table:table-cell table:style-name="ce12N2" office:value-type="float" office:value="1065.93">
            <text:p>106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1019615892130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5">
            <text:p>306395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0.7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425.78">
            <text:p>4942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9219.28">
            <text:p>49219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87496">
            <text:p>2,687</text:p>
          </table:table-cell>
          <table:table-cell table:style-name="ce12N2" office:value-type="float" office:value="1779.9">
            <text:p>1779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42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6.5">
            <text:p>206,50</text:p>
          </table:table-cell>
          <table:table-cell table:style-name="ce12N2" office:value-type="float" office:value="49219.28">
            <text:p>49219,28</text:p>
          </table:table-cell>
          <table:table-cell table:style-name="ce12N2" office:value-type="float" office:value="2276.72">
            <text:p>227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58587800001295500100021074717068805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8">
            <text:p>3063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3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91.68">
            <text:p>1869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103.32">
            <text:p>18103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509">
            <text:p>0,815</text:p>
          </table:table-cell>
          <table:table-cell table:style-name="ce12N2" office:value-type="float" office:value="1035.12">
            <text:p>103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69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588.36">
            <text:p>588,36</text:p>
          </table:table-cell>
          <table:table-cell table:style-name="ce12N2" office:value-type="float" office:value="18103.32">
            <text:p>18103,32</text:p>
          </table:table-cell>
          <table:table-cell table:style-name="ce12N2" office:value-type="float" office:value="1068.85">
            <text:p>106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064150000518550010002038131847892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02">
            <text:p>306402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1.664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41.72">
            <text:p>10641,72</text:p>
          </table:table-cell>
          <table:table-cell table:style-name="ce12N2" office:value-type="float" office:value="315.39">
            <text:p>315,3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57.11">
            <text:p>10957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4545">
            <text:p>0,265</text:p>
          </table:table-cell>
          <table:table-cell table:style-name="ce12N2" office:value-type="float" office:value="20.24">
            <text:p>2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41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41.72">
            <text:p>10641,72</text:p>
          </table:table-cell>
          <table:table-cell table:style-name="ce12N2" office:value-type="float" office:value="744.93">
            <text:p>74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620366000195550010016647091441472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05">
            <text:p>30640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5.75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2.7">
            <text:p>166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62.7">
            <text:p>166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4494">
            <text:p>0,064</text:p>
          </table:table-cell>
          <table:table-cell table:style-name="ce12N2" office:value-type="float" office:value="17.4">
            <text:p>1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6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2.7">
            <text:p>1662,70</text:p>
          </table:table-cell>
          <table:table-cell table:style-name="ce12N2" office:value-type="float" office:value="116.39">
            <text:p>1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6293564000146550020003357521217195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4">
            <text:p>306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61.13">
            <text:p>1256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61.13">
            <text:p>12561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04">
            <text:p>0,007</text:p>
          </table:table-cell>
          <table:table-cell table:style-name="ce12N2" office:value-type="float" office:value="34.08">
            <text:p>3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61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61.13">
            <text:p>12561,13</text:p>
          </table:table-cell>
          <table:table-cell table:style-name="ce12N2" office:value-type="float" office:value="879.28">
            <text:p>8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61343662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5">
            <text:p>306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98.12">
            <text:p>209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32.08">
            <text:p>203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806">
            <text:p>0,020</text:p>
          </table:table-cell>
          <table:table-cell table:style-name="ce12N2" office:value-type="float" office:value="4.31">
            <text:p>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9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66.04">
            <text:p>66,04</text:p>
          </table:table-cell>
          <table:table-cell table:style-name="ce12N2" office:value-type="float" office:value="2032.08">
            <text:p>2032,08</text:p>
          </table:table-cell>
          <table:table-cell table:style-name="ce12N2" office:value-type="float" office:value="142.25">
            <text:p>1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71377675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6">
            <text:p>306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16.86">
            <text:p>3971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716.86">
            <text:p>3971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">
            <text:p>0,046</text:p>
          </table:table-cell>
          <table:table-cell table:style-name="ce12N2" office:value-type="float" office:value="59.29">
            <text:p>5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71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716.86">
            <text:p>39716,86</text:p>
          </table:table-cell>
          <table:table-cell table:style-name="ce12N2" office:value-type="float" office:value="2780.18">
            <text:p>278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5819574568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8">
            <text:p>306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49.12">
            <text:p>294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49.12">
            <text:p>2949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68">
            <text:p>0,001</text:p>
          </table:table-cell>
          <table:table-cell table:style-name="ce12N2" office:value-type="float" office:value="18.72">
            <text:p>18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4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49.12">
            <text:p>2949,12</text:p>
          </table:table-cell>
          <table:table-cell table:style-name="ce12N2" office:value-type="float" office:value="117.96">
            <text:p>11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11816650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79">
            <text:p>306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4.08">
            <text:p>453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4.08">
            <text:p>453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12">
            <text:p>0,015</text:p>
          </table:table-cell>
          <table:table-cell table:style-name="ce12N2" office:value-type="float" office:value="15.82">
            <text:p>1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4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34.08">
            <text:p>4534,08</text:p>
          </table:table-cell>
          <table:table-cell table:style-name="ce12N2" office:value-type="float" office:value="181.36">
            <text:p>18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31385987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0">
            <text:p>306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951.23">
            <text:p>16395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3951.23">
            <text:p>163951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33648">
            <text:p>1,934</text:p>
          </table:table-cell>
          <table:table-cell table:style-name="ce12N2" office:value-type="float" office:value="785.8">
            <text:p>78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.951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951.23">
            <text:p>163951,23</text:p>
          </table:table-cell>
          <table:table-cell table:style-name="ce12N2" office:value-type="float" office:value="6558.05">
            <text:p>655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413456594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1">
            <text:p>306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2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446.34">
            <text:p>32844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327145.78">
            <text:p>327145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85229">
            <text:p>16,852</text:p>
          </table:table-cell>
          <table:table-cell table:style-name="ce12N2" office:value-type="float" office:value="1217.66">
            <text:p>1217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8.446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00.56">
            <text:p>1300,56</text:p>
          </table:table-cell>
          <table:table-cell table:style-name="ce12N2" office:value-type="float" office:value="326804.92">
            <text:p>326804,92</text:p>
          </table:table-cell>
          <table:table-cell table:style-name="ce12N2" office:value-type="float" office:value="18393.24">
            <text:p>1839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27512254488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6">
            <text:p>3064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991.68">
            <text:p>2799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991.68">
            <text:p>2799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85328">
            <text:p>1,853</text:p>
          </table:table-cell>
          <table:table-cell table:style-name="ce12N2" office:value-type="float" office:value="842.23">
            <text:p>842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99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991.68">
            <text:p>27991,68</text:p>
          </table:table-cell>
          <table:table-cell table:style-name="ce12N2" office:value-type="float" office:value="1119.67">
            <text:p>111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161111944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7">
            <text:p>30648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50.04">
            <text:p>9850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50.04">
            <text:p>9850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77632">
            <text:p>3,878</text:p>
          </table:table-cell>
          <table:table-cell table:style-name="ce12N2" office:value-type="float" office:value="188.32">
            <text:p>188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50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50.04">
            <text:p>9850,04</text:p>
          </table:table-cell>
          <table:table-cell table:style-name="ce12N2" office:value-type="float" office:value="394">
            <text:p>3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181986189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0">
            <text:p>30649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89.38">
            <text:p>2708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7089.38">
            <text:p>2708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00842">
            <text:p>3,101</text:p>
          </table:table-cell>
          <table:table-cell table:style-name="ce12N2" office:value-type="float" office:value="1141.39">
            <text:p>114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089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89.38">
            <text:p>27089,38</text:p>
          </table:table-cell>
          <table:table-cell table:style-name="ce12N2" office:value-type="float" office:value="1896.25">
            <text:p>189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51388500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1">
            <text:p>30649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457.73">
            <text:p>12045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20297.26">
            <text:p>120297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5.267434">
            <text:p>65,267</text:p>
          </table:table-cell>
          <table:table-cell table:style-name="ce12N2" office:value-type="float" office:value="1956.94">
            <text:p>195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0.45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60.47">
            <text:p>160,47</text:p>
          </table:table-cell>
          <table:table-cell table:style-name="ce12N2" office:value-type="float" office:value="120297.26">
            <text:p>120297,26</text:p>
          </table:table-cell>
          <table:table-cell table:style-name="ce12N2" office:value-type="float" office:value="7696.03">
            <text:p>769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61496564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2">
            <text:p>3064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0.8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40">
            <text:p>275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40">
            <text:p>275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25">
            <text:p>0,054</text:p>
          </table:table-cell>
          <table:table-cell table:style-name="ce12N2" office:value-type="float" office:value="6.1">
            <text:p>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40">
            <text:p>27540,00</text:p>
          </table:table-cell>
          <table:table-cell table:style-name="ce12N2" office:value-type="float" office:value="1927.8">
            <text:p>192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084110919959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9">
            <text:p>3064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">
            <text:p>0,030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5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920.74">
            <text:p>92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501182688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0">
            <text:p>3065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5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6.02">
            <text:p>394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46.02">
            <text:p>3946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46.02">
            <text:p>3946,02</text:p>
          </table:table-cell>
          <table:table-cell table:style-name="ce12N2" office:value-type="float" office:value="276.22">
            <text:p>27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15691304251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04">
            <text:p>3065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2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.34">
            <text:p>450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08.34">
            <text:p>450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0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08.34">
            <text:p>4508,34</text:p>
          </table:table-cell>
          <table:table-cell table:style-name="ce12N2" office:value-type="float" office:value="315.58">
            <text:p>31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2501407777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0">
            <text:p>306520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8.85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2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00.24">
            <text:p>2440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400.24">
            <text:p>2440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6938">
            <text:p>0,337</text:p>
          </table:table-cell>
          <table:table-cell table:style-name="ce12N2" office:value-type="float" office:value="707.12">
            <text:p>70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0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00.24">
            <text:p>24400,24</text:p>
          </table:table-cell>
          <table:table-cell table:style-name="ce12N2" office:value-type="float" office:value="1708.02">
            <text:p>17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777131003473550050008888531849584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2">
            <text:p>30652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3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2.76">
            <text:p>363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422.88">
            <text:p>342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16">
            <text:p>0,122</text:p>
          </table:table-cell>
          <table:table-cell table:style-name="ce12N2" office:value-type="float" office:value="81.2">
            <text:p>8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32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09.88">
            <text:p>209,88</text:p>
          </table:table-cell>
          <table:table-cell table:style-name="ce12N2" office:value-type="float" office:value="3422.88">
            <text:p>3422,88</text:p>
          </table:table-cell>
          <table:table-cell table:style-name="ce12N2" office:value-type="float" office:value="239.6">
            <text:p>23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732691833961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4">
            <text:p>30652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2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239.12">
            <text:p>18623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">
            <text:p>49,00</text:p>
          </table:table-cell>
          <table:table-cell table:style-name="ce12N2" office:value-type="float" office:value="179628.19">
            <text:p>17962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4.658971">
            <text:p>94,659</text:p>
          </table:table-cell>
          <table:table-cell table:style-name="ce12N2" office:value-type="float" office:value="1871.6">
            <text:p>18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6.23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6610.93">
            <text:p>6610,93</text:p>
          </table:table-cell>
          <table:table-cell table:style-name="ce12N2" office:value-type="float" office:value="179628.19">
            <text:p>179628,19</text:p>
          </table:table-cell>
          <table:table-cell table:style-name="ce12N2" office:value-type="float" office:value="12267.09">
            <text:p>1226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1122315701253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6">
            <text:p>30652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32">
            <text:p>1,523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6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1642.6">
            <text:p>164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017340084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8">
            <text:p>306528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95">
            <text:p>0,071</text:p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4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97.91">
            <text:p>9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11454297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0">
            <text:p>3065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05.15">
            <text:p>10805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156.55">
            <text:p>10156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374">
            <text:p>0,072</text:p>
          </table:table-cell>
          <table:table-cell table:style-name="ce12N2" office:value-type="float" office:value="84.57">
            <text:p>8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05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648.6">
            <text:p>648,60</text:p>
          </table:table-cell>
          <table:table-cell table:style-name="ce12N2" office:value-type="float" office:value="10156.55">
            <text:p>10156,55</text:p>
          </table:table-cell>
          <table:table-cell table:style-name="ce12N2" office:value-type="float" office:value="411.61">
            <text:p>4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01066071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1">
            <text:p>3065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8">
            <text:p>0,001</text:p>
          </table:table-cell>
          <table:table-cell table:style-name="ce12N2" office:value-type="float" office:value="4.2">
            <text:p>4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116560259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2">
            <text:p>3065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3.38">
            <text:p>94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5.8">
            <text:p>88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4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57.58">
            <text:p>57,58</text:p>
          </table:table-cell>
          <table:table-cell table:style-name="ce12N2" office:value-type="float" office:value="885.8">
            <text:p>885,80</text:p>
          </table:table-cell>
          <table:table-cell table:style-name="ce12N2" office:value-type="float" office:value="62.01">
            <text:p>6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21201088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3">
            <text:p>3065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.11">
            <text:p>17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8.11">
            <text:p>17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8">
            <text:p>0,00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.11">
            <text:p>178,11</text:p>
          </table:table-cell>
          <table:table-cell table:style-name="ce12N2" office:value-type="float" office:value="12.47">
            <text:p>12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314663350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4">
            <text:p>3065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5.1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9.32">
            <text:p>64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9.69">
            <text:p>609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36">
            <text:p>0,005</text:p>
          </table:table-cell>
          <table:table-cell table:style-name="ce12N2" office:value-type="float" office:value="4.74">
            <text:p>4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9.63">
            <text:p>39,63</text:p>
          </table:table-cell>
          <table:table-cell table:style-name="ce12N2" office:value-type="float" office:value="609.69">
            <text:p>609,69</text:p>
          </table:table-cell>
          <table:table-cell table:style-name="ce12N2" office:value-type="float" office:value="24.39">
            <text:p>2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51341814608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38">
            <text:p>306538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0.5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5.43">
            <text:p>396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65.43">
            <text:p>396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7763">
            <text:p>7,776</text:p>
          </table:table-cell>
          <table:table-cell table:style-name="ce12N2" office:value-type="float" office:value="105">
            <text:p>10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65.43">
            <text:p>3965,43</text:p>
          </table:table-cell>
          <table:table-cell table:style-name="ce12N2" office:value-type="float" office:value="277.58">
            <text:p>277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1507510091355500100056058312863353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1">
            <text:p>306541</text:p>
          </table:table-cell>
          <table:table-cell table:style-name="ce0" table:number-columns-spanned="4" table:number-rows-spanned="1" office:value-type="string" calcext:value-type="string">
            <text:p>27.367 - CARBOSTORM DO BRASIL LTDA</text:p>
          </table:table-cell>
          <table:covered-table-cell table:number-columns-repeated="3"/>
          <table:table-cell table:style-name="ce0" office:value-type="string" calcext:value-type="string">
            <text:p>75.3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29.03">
            <text:p>1532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4511">
            <text:p>1451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02">
            <text:p>0,160</text:p>
          </table:table-cell>
          <table:table-cell table:style-name="ce12N2" office:value-type="float" office:value="294.82">
            <text:p>29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29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18.03">
            <text:p>818,03</text:p>
          </table:table-cell>
          <table:table-cell table:style-name="ce12N2" office:value-type="float" office:value="14511">
            <text:p>14511,00</text:p>
          </table:table-cell>
          <table:table-cell table:style-name="ce12N2" office:value-type="float" office:value="580.44">
            <text:p>58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40235931800019955000000075314173321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3">
            <text:p>306543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2.2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12.75">
            <text:p>2461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3803.41">
            <text:p>23803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6.63313">
            <text:p>86,633</text:p>
          </table:table-cell>
          <table:table-cell table:style-name="ce12N2" office:value-type="float" office:value="170.75">
            <text:p>170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612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1">
            <text:p>44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9.34">
            <text:p>809,34</text:p>
          </table:table-cell>
          <table:table-cell table:style-name="ce12N2" office:value-type="float" office:value="23803.41">
            <text:p>23803,41</text:p>
          </table:table-cell>
          <table:table-cell table:style-name="ce12N2" office:value-type="float" office:value="1666.24">
            <text:p>166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7642862000248550020000122881222120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4">
            <text:p>30654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3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12">
            <text:p>4231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42312">
            <text:p>4231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3.13295">
            <text:p>203,133</text:p>
          </table:table-cell>
          <table:table-cell table:style-name="ce12N2" office:value-type="float" office:value="1105.85">
            <text:p>110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31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312">
            <text:p>42312,00</text:p>
          </table:table-cell>
          <table:table-cell table:style-name="ce12N2" office:value-type="float" office:value="2961.84">
            <text:p>29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827610000142550010000673301812272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6">
            <text:p>306546</text:p>
          </table:table-cell>
          <table:table-cell table:style-name="ce0" table:number-columns-spanned="4" table:number-rows-spanned="1" office:value-type="string" calcext:value-type="string">
            <text:p>780 - INDUSTRIA E COMERCIO RIOMAR CORDAS LTDA</text:p>
          </table:table-cell>
          <table:covered-table-cell table:number-columns-repeated="3"/>
          <table:table-cell table:style-name="ce0" office:value-type="string" calcext:value-type="string">
            <text:p>170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5.6">
            <text:p>364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45.6">
            <text:p>364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736">
            <text:p>0,127</text:p>
          </table:table-cell>
          <table:table-cell table:style-name="ce12N2" office:value-type="float" office:value="5512.91">
            <text:p>551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45.6">
            <text:p>3645,60</text:p>
          </table:table-cell>
          <table:table-cell table:style-name="ce12N2" office:value-type="float" office:value="255.2">
            <text:p>2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2989260001035500100017039417515203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7">
            <text:p>30654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4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8.54">
            <text:p>25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78">
            <text:p>24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08">
            <text:p>0,241</text:p>
          </table:table-cell>
          <table:table-cell table:style-name="ce12N2" office:value-type="float" office:value="70.7">
            <text:p>7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.54">
            <text:p>80,54</text:p>
          </table:table-cell>
          <table:table-cell table:style-name="ce12N2" office:value-type="float" office:value="2478">
            <text:p>2478,00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4211528224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8">
            <text:p>30654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277">
            <text:p>0,683</text:p>
          </table:table-cell>
          <table:table-cell table:style-name="ce12N2" office:value-type="float" office:value="99.99">
            <text:p>9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4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514.44">
            <text:p>51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4041851497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9">
            <text:p>30654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">
            <text:p>0,002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380135421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0">
            <text:p>306550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56.8">
            <text:p>1055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556.8">
            <text:p>1055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">
            <text:p>0,036</text:p>
          </table:table-cell>
          <table:table-cell table:style-name="ce12N2" office:value-type="float" office:value="266">
            <text:p>26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5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556.8">
            <text:p>10556,80</text:p>
          </table:table-cell>
          <table:table-cell table:style-name="ce12N2" office:value-type="float" office:value="336.77">
            <text:p>33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887523000152550010000372201003722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2">
            <text:p>30655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309.56">
            <text:p>9813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3.070619">
            <text:p>53,071</text:p>
          </table:table-cell>
          <table:table-cell table:style-name="ce12N2" office:value-type="float" office:value="6522.54">
            <text:p>65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.3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5072.51">
            <text:p>35072,51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57537.74">
            <text:p>5753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21683519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6">
            <text:p>306556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781.88">
            <text:p>15078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148447.14">
            <text:p>14844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76782">
            <text:p>3,377</text:p>
          </table:table-cell>
          <table:table-cell table:style-name="ce12N2" office:value-type="float" office:value="1487.06">
            <text:p>14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0.78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78">
            <text:p>41,7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334.74">
            <text:p>2334,74</text:p>
          </table:table-cell>
          <table:table-cell table:style-name="ce12N2" office:value-type="float" office:value="148447.14">
            <text:p>148447,14</text:p>
          </table:table-cell>
          <table:table-cell table:style-name="ce12N2" office:value-type="float" office:value="10391.2">
            <text:p>1039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45123710000147550010000130821897685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0">
            <text:p>306560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319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2.01">
            <text:p>2751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12.01">
            <text:p>27512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61824">
            <text:p>3,662</text:p>
          </table:table-cell>
          <table:table-cell table:style-name="ce12N2" office:value-type="float" office:value="2741.6">
            <text:p>274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12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2.01">
            <text:p>27512,01</text:p>
          </table:table-cell>
          <table:table-cell table:style-name="ce12N2" office:value-type="float" office:value="3301.44">
            <text:p>3301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330817040022105501800008431916195622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3">
            <text:p>306563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5.93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05.07">
            <text:p>53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53205.07">
            <text:p>53205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4.591891">
            <text:p>204,592</text:p>
          </table:table-cell>
          <table:table-cell table:style-name="ce12N2" office:value-type="float" office:value="1037.37">
            <text:p>1037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.205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05.07">
            <text:p>53205,07</text:p>
          </table:table-cell>
          <table:table-cell table:style-name="ce12N2" office:value-type="float" office:value="3724.35">
            <text:p>372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629356400014655002000335937166308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2">
            <text:p>306572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9.3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4.25">
            <text:p>1576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5568.08">
            <text:p>1556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4.844636">
            <text:p>134,845</text:p>
          </table:table-cell>
          <table:table-cell table:style-name="ce12N2" office:value-type="float" office:value="530.69">
            <text:p>53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64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96.17">
            <text:p>196,17</text:p>
          </table:table-cell>
          <table:table-cell table:style-name="ce12N2" office:value-type="float" office:value="15093.76">
            <text:p>15093,76</text:p>
          </table:table-cell>
          <table:table-cell table:style-name="ce12N2" office:value-type="float" office:value="1056.55">
            <text:p>105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1913681000134550010001793411895829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7">
            <text:p>306577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4.0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5.32">
            <text:p>685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855.32">
            <text:p>685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8298">
            <text:p>0,148</text:p>
          </table:table-cell>
          <table:table-cell table:style-name="ce12N2" office:value-type="float" office:value="41.68">
            <text:p>41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5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5.32">
            <text:p>6855,32</text:p>
          </table:table-cell>
          <table:table-cell table:style-name="ce12N2" office:value-type="float" office:value="479.87">
            <text:p>47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0641500005185500100020401612695409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3">
            <text:p>30658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9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39.63">
            <text:p>2493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22724.03">
            <text:p>22724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14">
            <text:p>0,246</text:p>
          </table:table-cell>
          <table:table-cell table:style-name="ce12N2" office:value-type="float" office:value="424.65">
            <text:p>42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39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215.6">
            <text:p>2215,60</text:p>
          </table:table-cell>
          <table:table-cell table:style-name="ce12N2" office:value-type="float" office:value="22724.03">
            <text:p>22724,03</text:p>
          </table:table-cell>
          <table:table-cell table:style-name="ce12N2" office:value-type="float" office:value="908.97">
            <text:p>908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91951589307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4">
            <text:p>30658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9.1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94.8">
            <text:p>5239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49972.4">
            <text:p>4997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64177">
            <text:p>1,664</text:p>
          </table:table-cell>
          <table:table-cell table:style-name="ce12N2" office:value-type="float" office:value="1266.89">
            <text:p>1266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39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422.4">
            <text:p>2422,40</text:p>
          </table:table-cell>
          <table:table-cell table:style-name="ce12N2" office:value-type="float" office:value="49972.4">
            <text:p>49972,40</text:p>
          </table:table-cell>
          <table:table-cell table:style-name="ce12N2" office:value-type="float" office:value="3218.65">
            <text:p>3218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919315684521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60">
            <text:p>3066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5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57">
            <text:p>2755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57">
            <text:p>2755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25">
            <text:p>0,054</text:p>
          </table:table-cell>
          <table:table-cell table:style-name="ce12N2" office:value-type="float" office:value="6.1">
            <text:p>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55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57">
            <text:p>27557,00</text:p>
          </table:table-cell>
          <table:table-cell table:style-name="ce12N2" office:value-type="float" office:value="1928.99">
            <text:p>192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5301021926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0">
            <text:p>306670</text:p>
          </table:table-cell>
          <table:table-cell table:style-name="ce0" table:number-columns-spanned="4" table:number-rows-spanned="1" office:value-type="string" calcext:value-type="string">
            <text:p>995 - LUMIBRAS INDUSTRIA METALURGICA LTDA</text:p>
          </table:table-cell>
          <table:covered-table-cell table:number-columns-repeated="3"/>
          <table:table-cell table:style-name="ce0" office:value-type="string" calcext:value-type="string">
            <text:p>87.0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1.95">
            <text:p>986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9027.82">
            <text:p>9027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63256">
            <text:p>2,263</text:p>
          </table:table-cell>
          <table:table-cell table:style-name="ce12N2" office:value-type="float" office:value="404.74">
            <text:p>404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1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82">
            <text:p>41,8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834.13">
            <text:p>834,13</text:p>
          </table:table-cell>
          <table:table-cell table:style-name="ce12N2" office:value-type="float" office:value="9027.82">
            <text:p>9027,82</text:p>
          </table:table-cell>
          <table:table-cell table:style-name="ce12N2" office:value-type="float" office:value="631.95">
            <text:p>631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847711000184550010000870061007830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3">
            <text:p>3066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8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37.4">
            <text:p>963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37.4">
            <text:p>963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72">
            <text:p>0,033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3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37.4">
            <text:p>9637,40</text:p>
          </table:table-cell>
          <table:table-cell table:style-name="ce12N2" office:value-type="float" office:value="674.62">
            <text:p>67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84111330538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4">
            <text:p>3066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2.5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76.8">
            <text:p>299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976.8">
            <text:p>2997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8">
            <text:p>0,061</text:p>
          </table:table-cell>
          <table:table-cell table:style-name="ce12N2" office:value-type="float" office:value="61.6">
            <text:p>6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9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76.8">
            <text:p>29976,80</text:p>
          </table:table-cell>
          <table:table-cell table:style-name="ce12N2" office:value-type="float" office:value="2098.38">
            <text:p>209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25721365791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7">
            <text:p>306677</text:p>
          </table:table-cell>
          <table:table-cell table:style-name="ce0" table:number-columns-spanned="4" table:number-rows-spanned="1" office:value-type="string" calcext:value-type="string">
            <text:p>5.002 - ELETRICA DANUBIO IND E COM DE MAT ELET LTDA</text:p>
          </table:table-cell>
          <table:covered-table-cell table:number-columns-repeated="3"/>
          <table:table-cell table:style-name="ce0" office:value-type="string" calcext:value-type="string">
            <text:p>485.7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99.83">
            <text:p>11839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18399.83">
            <text:p>118399,8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9.9549">
            <text:p>29,955</text:p>
          </table:table-cell>
          <table:table-cell table:style-name="ce12N2" office:value-type="float" office:value="1827.08">
            <text:p>182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99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399.83">
            <text:p>118399,83</text:p>
          </table:table-cell>
          <table:table-cell table:style-name="ce12N2" office:value-type="float" office:value="8287.99">
            <text:p>828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310256000190550010004857421407060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8">
            <text:p>306678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359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.3">
            <text:p>450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66.39">
            <text:p>436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775">
            <text:p>1,658</text:p>
          </table:table-cell>
          <table:table-cell table:style-name="ce12N2" office:value-type="float" office:value="940">
            <text:p>9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0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41.91">
            <text:p>141,91</text:p>
          </table:table-cell>
          <table:table-cell table:style-name="ce12N2" office:value-type="float" office:value="4366.39">
            <text:p>4366,39</text:p>
          </table:table-cell>
          <table:table-cell table:style-name="ce12N2" office:value-type="float" office:value="523.97">
            <text:p>5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35918218470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7">
            <text:p>30669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828">
            <text:p>0,248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187.07">
            <text:p>18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6071017307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2">
            <text:p>306702</text:p>
          </table:table-cell>
          <table:table-cell table:style-name="ce0" table:number-columns-spanned="4" table:number-rows-spanned="1" office:value-type="string" calcext:value-type="string">
            <text:p>570 - TRAMONTINA MULTI S/A</text:p>
          </table:table-cell>
          <table:covered-table-cell table:number-columns-repeated="3"/>
          <table:table-cell table:style-name="ce0" office:value-type="string" calcext:value-type="string">
            <text:p>1.188.7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022.58">
            <text:p>5102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50454.33">
            <text:p>50454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.800726">
            <text:p>28,801</text:p>
          </table:table-cell>
          <table:table-cell table:style-name="ce12N2" office:value-type="float" office:value="1189.13">
            <text:p>1189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02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568.25">
            <text:p>568,25</text:p>
          </table:table-cell>
          <table:table-cell table:style-name="ce12N2" office:value-type="float" office:value="37294.33">
            <text:p>37294,33</text:p>
          </table:table-cell>
          <table:table-cell table:style-name="ce12N2" office:value-type="float" office:value="2610.61">
            <text:p>261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0376680001545500100118879317915212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6">
            <text:p>306706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89.38">
            <text:p>8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91159426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7">
            <text:p>30670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19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64.52">
            <text:p>40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64.52">
            <text:p>4064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E-5">
            <text:p>0,000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64.52">
            <text:p>4064,52</text:p>
          </table:table-cell>
          <table:table-cell table:style-name="ce12N2" office:value-type="float" office:value="284.52">
            <text:p>28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49792000181550010013199361864489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0">
            <text:p>30671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8.2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054.52">
            <text:p>13305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">
            <text:p>88,00</text:p>
          </table:table-cell>
          <table:table-cell table:style-name="ce12N2" office:value-type="float" office:value="124037.86">
            <text:p>124037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8.465203">
            <text:p>88,465</text:p>
          </table:table-cell>
          <table:table-cell table:style-name="ce12N2" office:value-type="float" office:value="525.1">
            <text:p>52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05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9016.66">
            <text:p>9016,66</text:p>
          </table:table-cell>
          <table:table-cell table:style-name="ce12N2" office:value-type="float" office:value="124037.86">
            <text:p>124037,86</text:p>
          </table:table-cell>
          <table:table-cell table:style-name="ce12N2" office:value-type="float" office:value="7921.16">
            <text:p>792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825610380765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9">
            <text:p>306719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3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392.58">
            <text:p>10239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2392.58">
            <text:p>10239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2.7412">
            <text:p>142,741</text:p>
          </table:table-cell>
          <table:table-cell table:style-name="ce12N2" office:value-type="float" office:value="2267.51">
            <text:p>2267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39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392.58">
            <text:p>102392,58</text:p>
          </table:table-cell>
          <table:table-cell table:style-name="ce12N2" office:value-type="float" office:value="7167.48">
            <text:p>7167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362214374708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22">
            <text:p>306722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495.97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1">
            <text:p>119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8.19">
            <text:p>108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8">
            <text:p>0,038</text:p>
          </table:table-cell>
          <table:table-cell table:style-name="ce12N2" office:value-type="float" office:value="3.97">
            <text:p>3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.82">
            <text:p>10,82</text:p>
          </table:table-cell>
          <table:table-cell table:style-name="ce12N2" office:value-type="float" office:value="108.19">
            <text:p>108,19</text:p>
          </table:table-cell>
          <table:table-cell table:style-name="ce12N2" office:value-type="float" office:value="7.57">
            <text:p>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6203660001955500200049597711830673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7">
            <text:p>306737</text:p>
          </table:table-cell>
          <table:table-cell table:style-name="ce0" table:number-columns-spanned="4" table:number-rows-spanned="1" office:value-type="string" calcext:value-type="string">
            <text:p>6.898 - BETALUB INDUSTRIA DE PROD. DIVER. DE PET. LTDA EPP</text:p>
          </table:table-cell>
          <table:covered-table-cell table:number-columns-repeated="3"/>
          <table:table-cell table:style-name="ce0" office:value-type="string" calcext:value-type="string">
            <text:p>1.34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67.17">
            <text:p>78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498">
            <text:p>649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21792">
            <text:p>0,622</text:p>
          </table:table-cell>
          <table:table-cell table:style-name="ce12N2" office:value-type="float" office:value="294">
            <text:p>29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8">
            <text:p>3018,00</text:p>
          </table:table-cell>
          <table:table-cell table:style-name="ce12N2" office:value-type="float" office:value="211.26">
            <text:p>21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845.86">
            <text:p>6845,86</text:p>
          </table:table-cell>
          <table:table-cell table:style-name="ce12N2" office:value-type="float" office:value="1369.17">
            <text:p>1369,1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6260884000108550020000013401462936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384">
            <text:p>3,387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55">
            <text:p>306755</text:p>
          </table:table-cell>
          <table:table-cell table:style-name="ce0" table:number-columns-spanned="4" table:number-rows-spanned="1" office:value-type="string" calcext:value-type="string">
            <text:p>744 - INDUSAT INDUSTRIA E COMERCIO LTDA</text:p>
          </table:table-cell>
          <table:covered-table-cell table:number-columns-repeated="3"/>
          <table:table-cell table:style-name="ce0" office:value-type="string" calcext:value-type="string">
            <text:p>123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01.37">
            <text:p>560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334.64">
            <text:p>53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359.52">
            <text:p>35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01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66.73">
            <text:p>266,73</text:p>
          </table:table-cell>
          <table:table-cell table:style-name="ce12N2" office:value-type="float" office:value="5334.64">
            <text:p>5334,64</text:p>
          </table:table-cell>
          <table:table-cell table:style-name="ce12N2" office:value-type="float" office:value="245.87">
            <text:p>24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65339590000127550010001231971214143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77">
            <text:p>30677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0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3.63">
            <text:p>231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240.8">
            <text:p>224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724">
            <text:p>0,137</text:p>
          </table:table-cell>
          <table:table-cell table:style-name="ce12N2" office:value-type="float" office:value="7.04">
            <text:p>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72.83">
            <text:p>72,83</text:p>
          </table:table-cell>
          <table:table-cell table:style-name="ce12N2" office:value-type="float" office:value="2240.8">
            <text:p>2240,80</text:p>
          </table:table-cell>
          <table:table-cell table:style-name="ce12N2" office:value-type="float" office:value="115.01">
            <text:p>11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03216410540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78">
            <text:p>30677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0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7.12">
            <text:p>257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96">
            <text:p>24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25">
            <text:p>0,014</text:p>
          </table:table-cell>
          <table:table-cell table:style-name="ce12N2" office:value-type="float" office:value="1.35">
            <text:p>1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81.12">
            <text:p>81,12</text:p>
          </table:table-cell>
          <table:table-cell table:style-name="ce12N2" office:value-type="float" office:value="2496">
            <text:p>2496,00</text:p>
          </table:table-cell>
          <table:table-cell table:style-name="ce12N2" office:value-type="float" office:value="99.84">
            <text:p>9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03918095783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79">
            <text:p>30677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04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3.63">
            <text:p>19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882.2">
            <text:p>188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">
            <text:p>0,005</text:p>
          </table:table-cell>
          <table:table-cell table:style-name="ce12N2" office:value-type="float" office:value="3.68">
            <text:p>3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01.43">
            <text:p>101,43</text:p>
          </table:table-cell>
          <table:table-cell table:style-name="ce12N2" office:value-type="float" office:value="1882.2">
            <text:p>1882,20</text:p>
          </table:table-cell>
          <table:table-cell table:style-name="ce12N2" office:value-type="float" office:value="75.95">
            <text:p>7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0401997776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3">
            <text:p>3067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5.92">
            <text:p>287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75.53">
            <text:p>175,53</text:p>
          </table:table-cell>
          <table:table-cell table:style-name="ce12N2" office:value-type="float" office:value="2700.39">
            <text:p>2700,39</text:p>
          </table:table-cell>
          <table:table-cell table:style-name="ce12N2" office:value-type="float" office:value="108.02">
            <text:p>10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91705951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84">
            <text:p>3067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7.28">
            <text:p>19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7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17.02">
            <text:p>117,02</text:p>
          </table:table-cell>
          <table:table-cell table:style-name="ce12N2" office:value-type="float" office:value="1800.26">
            <text:p>1800,26</text:p>
          </table:table-cell>
          <table:table-cell table:style-name="ce12N2" office:value-type="float" office:value="72.01">
            <text:p>7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601270059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1">
            <text:p>3067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6.2">
            <text:p>245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56.2">
            <text:p>245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556">
            <text:p>0,029</text:p>
          </table:table-cell>
          <table:table-cell table:style-name="ce12N2" office:value-type="float" office:value="0.2">
            <text:p>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6.2">
            <text:p>2456,20</text:p>
          </table:table-cell>
          <table:table-cell table:style-name="ce12N2" office:value-type="float" office:value="171.93">
            <text:p>17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417066680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2">
            <text:p>3067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594">
            <text:p>0,022</text:p>
          </table:table-cell>
          <table:table-cell table:style-name="ce12N2" office:value-type="float" office:value="2.7">
            <text:p>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6.1">
            <text:p>1856,10</text:p>
          </table:table-cell>
          <table:table-cell table:style-name="ce12N2" office:value-type="float" office:value="129.93">
            <text:p>1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51462846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3">
            <text:p>3067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71.38">
            <text:p>4267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367.26">
            <text:p>42367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17">
            <text:p>0,112</text:p>
          </table:table-cell>
          <table:table-cell table:style-name="ce12N2" office:value-type="float" office:value="81.82">
            <text:p>8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7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4.12">
            <text:p>304,12</text:p>
          </table:table-cell>
          <table:table-cell table:style-name="ce12N2" office:value-type="float" office:value="42367.26">
            <text:p>42367,26</text:p>
          </table:table-cell>
          <table:table-cell table:style-name="ce12N2" office:value-type="float" office:value="2965.72">
            <text:p>296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61038430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4">
            <text:p>3067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97.35">
            <text:p>999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97.35">
            <text:p>9997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">
            <text:p>0,011</text:p>
          </table:table-cell>
          <table:table-cell table:style-name="ce12N2" office:value-type="float" office:value="14.18">
            <text:p>1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9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97.35">
            <text:p>9997,35</text:p>
          </table:table-cell>
          <table:table-cell table:style-name="ce12N2" office:value-type="float" office:value="699.81">
            <text:p>69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0713865155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5">
            <text:p>3067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29.93">
            <text:p>1912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9043.56">
            <text:p>19043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116">
            <text:p>0,021</text:p>
          </table:table-cell>
          <table:table-cell table:style-name="ce12N2" office:value-type="float" office:value="35.5">
            <text:p>3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129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86.37">
            <text:p>86,37</text:p>
          </table:table-cell>
          <table:table-cell table:style-name="ce12N2" office:value-type="float" office:value="19043.56">
            <text:p>19043,56</text:p>
          </table:table-cell>
          <table:table-cell table:style-name="ce12N2" office:value-type="float" office:value="1333.04">
            <text:p>133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511469941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6">
            <text:p>3067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43.8">
            <text:p>60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43.8">
            <text:p>60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">
            <text:p>0,007</text:p>
          </table:table-cell>
          <table:table-cell table:style-name="ce12N2" office:value-type="float" office:value="9.02">
            <text:p>9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4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43.8">
            <text:p>6043,80</text:p>
          </table:table-cell>
          <table:table-cell table:style-name="ce12N2" office:value-type="float" office:value="423.07">
            <text:p>42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5215032673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97">
            <text:p>3067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7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83.02">
            <text:p>778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08">
            <text:p>730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228">
            <text:p>3,123</text:p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83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75.02">
            <text:p>475,02</text:p>
          </table:table-cell>
          <table:table-cell table:style-name="ce12N2" office:value-type="float" office:value="7308">
            <text:p>7308,00</text:p>
          </table:table-cell>
          <table:table-cell table:style-name="ce12N2" office:value-type="float" office:value="292.32">
            <text:p>29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765313956497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0">
            <text:p>306800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0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22.13">
            <text:p>2232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1.71985">
            <text:p>141,720</text:p>
          </table:table-cell>
          <table:table-cell table:style-name="ce12N2" office:value-type="float" office:value="1211.17">
            <text:p>121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22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702.63">
            <text:p>702,63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1513.37">
            <text:p>15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980200012255001000050813139037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2">
            <text:p>306802</text:p>
          </table:table-cell>
          <table:table-cell table:style-name="ce0" table:number-columns-spanned="4" table:number-rows-spanned="1" office:value-type="string" calcext:value-type="string">
            <text:p>3.659 - GERIS INDUSTRIA COM. IMPORT. E EXPORT. DE FERRAGENS LTDA.</text:p>
          </table:table-cell>
          <table:covered-table-cell table:number-columns-repeated="3"/>
          <table:table-cell table:style-name="ce0" office:value-type="string" calcext:value-type="string">
            <text:p>95.8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477.61">
            <text:p>63477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1479.53">
            <text:p>6147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08001">
            <text:p>2,008</text:p>
          </table:table-cell>
          <table:table-cell table:style-name="ce12N2" office:value-type="float" office:value="230.2">
            <text:p>23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477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998.08">
            <text:p>1998,08</text:p>
          </table:table-cell>
          <table:table-cell table:style-name="ce12N2" office:value-type="float" office:value="61479.53">
            <text:p>61479,53</text:p>
          </table:table-cell>
          <table:table-cell table:style-name="ce12N2" office:value-type="float" office:value="2459.18">
            <text:p>2459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412045300010255001000095823154527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0">
            <text:p>306810</text:p>
          </table:table-cell>
          <table:table-cell table:style-name="ce0" table:number-columns-spanned="4" table:number-rows-spanned="1" office:value-type="string" calcext:value-type="string">
            <text:p>7.661 - SEGURIMAX COM. AT. EQUIP. SEG. IMP. EXP</text:p>
          </table:table-cell>
          <table:covered-table-cell table:number-columns-repeated="3"/>
          <table:table-cell table:style-name="ce0" office:value-type="string" calcext:value-type="string">
            <text:p>182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921.85">
            <text:p>5092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">
            <text:p>39,00</text:p>
          </table:table-cell>
          <table:table-cell table:style-name="ce12N2" office:value-type="float" office:value="49595.72">
            <text:p>4959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77165">
            <text:p>1,277</text:p>
          </table:table-cell>
          <table:table-cell table:style-name="ce12N2" office:value-type="float" office:value="600.12">
            <text:p>60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92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326.13">
            <text:p>1326,13</text:p>
          </table:table-cell>
          <table:table-cell table:style-name="ce12N2" office:value-type="float" office:value="49595.72">
            <text:p>49595,72</text:p>
          </table:table-cell>
          <table:table-cell table:style-name="ce12N2" office:value-type="float" office:value="1983.81">
            <text:p>198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21.62">
            <text:p>212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.158</text:p>
          </table:table-cell>
          <table:table-cell table:style-name="ce0" office:value-type="string" calcext:value-type="string">
            <text:p>34.164 - TRANSPORTES MARLIM LTDA</text:p>
          </table:table-cell>
          <table:table-cell table:style-name="ce0" office:value-type="string" calcext:value-type="string">
            <text:p>05/05/2026</text:p>
          </table:table-cell>
          <table:table-cell table:style-name="ce12" office:value-type="string" calcext:value-type="string">
            <text:p>2.121,62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42260417011376000102550010001820191491633781</text:p>
          </table:table-cell>
          <table:table-cell table:style-name="ce0" office:value-type="string" calcext:value-type="string">
            <text:p>4226055815837200012057001000040158100040203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4">
            <text:p>306814</text:p>
          </table:table-cell>
          <table:table-cell table:style-name="ce0" table:number-columns-spanned="4" table:number-rows-spanned="1" office:value-type="string" calcext:value-type="string">
            <text:p>10.396 - VIAPOL LTDA</text:p>
          </table:table-cell>
          <table:covered-table-cell table:number-columns-repeated="3"/>
          <table:table-cell table:style-name="ce0" office:value-type="string" calcext:value-type="string">
            <text:p>947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66.76">
            <text:p>4556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5422.82">
            <text:p>4542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8017">
            <text:p>6,380</text:p>
          </table:table-cell>
          <table:table-cell table:style-name="ce12N2" office:value-type="float" office:value="5848.22">
            <text:p>5848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56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.14">
            <text:p>56,1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43.94">
            <text:p>143,94</text:p>
          </table:table-cell>
          <table:table-cell table:style-name="ce12N2" office:value-type="float" office:value="45422.82">
            <text:p>45422,82</text:p>
          </table:table-cell>
          <table:table-cell table:style-name="ce12N2" office:value-type="float" office:value="3179.62">
            <text:p>31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681867000130550010009476801421085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2">
            <text:p>306822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401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7.39">
            <text:p>257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7.39">
            <text:p>257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9">
            <text:p>0,011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7.39">
            <text:p>2577,39</text:p>
          </table:table-cell>
          <table:table-cell table:style-name="ce12N2" office:value-type="float" office:value="309.29">
            <text:p>30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40116988083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27">
            <text:p>30682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3.2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677.95">
            <text:p>6567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">
            <text:p>72,00</text:p>
          </table:table-cell>
          <table:table-cell table:style-name="ce12N2" office:value-type="float" office:value="62405.13">
            <text:p>6240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84279">
            <text:p>1,384</text:p>
          </table:table-cell>
          <table:table-cell table:style-name="ce12N2" office:value-type="float" office:value="794.26">
            <text:p>79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67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272.82">
            <text:p>3272,82</text:p>
          </table:table-cell>
          <table:table-cell table:style-name="ce12N2" office:value-type="float" office:value="62405.13">
            <text:p>62405,13</text:p>
          </table:table-cell>
          <table:table-cell table:style-name="ce12N2" office:value-type="float" office:value="3227.07">
            <text:p>322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32591174401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3">
            <text:p>306833</text:p>
          </table:table-cell>
          <table:table-cell table:style-name="ce0" table:number-columns-spanned="4" table:number-rows-spanned="1" office:value-type="string" calcext:value-type="string">
            <text:p>9.694 - SFORPLAST INDUSTRIA E COMERCIO LTDA</text:p>
          </table:table-cell>
          <table:covered-table-cell table:number-columns-repeated="3"/>
          <table:table-cell table:style-name="ce0" office:value-type="string" calcext:value-type="string">
            <text:p>94.2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8.17">
            <text:p>1129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408.31">
            <text:p>10408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0.1358">
            <text:p>40,136</text:p>
          </table:table-cell>
          <table:table-cell table:style-name="ce12N2" office:value-type="float" office:value="195.12">
            <text:p>19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8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889.86">
            <text:p>889,86</text:p>
          </table:table-cell>
          <table:table-cell table:style-name="ce12N2" office:value-type="float" office:value="10408.31">
            <text:p>10408,31</text:p>
          </table:table-cell>
          <table:table-cell table:style-name="ce12N2" office:value-type="float" office:value="728.57">
            <text:p>72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698860002405500100009422310251650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6">
            <text:p>306836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3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54">
            <text:p>0,165</text:p>
          </table:table-cell>
          <table:table-cell table:style-name="ce12N2" office:value-type="float" office:value="47.7">
            <text:p>47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8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972.3">
            <text:p>97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386194697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7">
            <text:p>306837</text:p>
          </table:table-cell>
          <table:table-cell table:style-name="ce0" table:number-columns-spanned="4" table:number-rows-spanned="1" office:value-type="string" calcext:value-type="string">
            <text:p>35.393 - METALURGICA LOTH LTDA</text:p>
          </table:table-cell>
          <table:covered-table-cell table:number-columns-repeated="3"/>
          <table:table-cell table:style-name="ce0" office:value-type="string" calcext:value-type="string">
            <text:p>73.7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8.91">
            <text:p>340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389.95">
            <text:p>338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222">
            <text:p>0,332</text:p>
          </table:table-cell>
          <table:table-cell table:style-name="ce12N2" office:value-type="float" office:value="113.08">
            <text:p>1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0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8.96">
            <text:p>18,96</text:p>
          </table:table-cell>
          <table:table-cell table:style-name="ce12N2" office:value-type="float" office:value="3389.95">
            <text:p>3389,95</text:p>
          </table:table-cell>
          <table:table-cell table:style-name="ce12N2" office:value-type="float" office:value="237.3">
            <text:p>23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727568900010755001000073722175278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8">
            <text:p>30683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1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6.41">
            <text:p>23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11.41">
            <text:p>221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4">
            <text:p>0,028</text:p>
          </table:table-cell>
          <table:table-cell table:style-name="ce12N2" office:value-type="float" office:value="0.05">
            <text:p>0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15">
            <text:p>115,00</text:p>
          </table:table-cell>
          <table:table-cell table:style-name="ce12N2" office:value-type="float" office:value="2211.41">
            <text:p>2211,41</text:p>
          </table:table-cell>
          <table:table-cell table:style-name="ce12N2" office:value-type="float" office:value="154.8">
            <text:p>15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15271100020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9">
            <text:p>30683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3.25">
            <text:p>207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64">
            <text:p>0,057</text:p>
          </table:table-cell>
          <table:table-cell table:style-name="ce12N2" office:value-type="float" office:value="41.28">
            <text:p>4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26.54">
            <text:p>126,54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31589225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0">
            <text:p>306840</text:p>
          </table:table-cell>
          <table:table-cell table:style-name="ce0" table:number-columns-spanned="4" table:number-rows-spanned="1" office:value-type="string" calcext:value-type="string">
            <text:p>36.654 - AZIMUT ALUMINIOS LTDA</text:p>
          </table:table-cell>
          <table:covered-table-cell table:number-columns-repeated="3"/>
          <table:table-cell table:style-name="ce0" office:value-type="string" calcext:value-type="string">
            <text:p>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46.54">
            <text:p>1924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9246.54">
            <text:p>19246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373174">
            <text:p>9,373</text:p>
          </table:table-cell>
          <table:table-cell table:style-name="ce12N2" office:value-type="float" office:value="532.1">
            <text:p>53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246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46.54">
            <text:p>19246,54</text:p>
          </table:table-cell>
          <table:table-cell table:style-name="ce12N2" office:value-type="float" office:value="1347.25">
            <text:p>134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8784921000158550010000000961818500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6">
            <text:p>30684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0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072.28">
            <text:p>5207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0612.07">
            <text:p>50612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6244">
            <text:p>0,256</text:p>
          </table:table-cell>
          <table:table-cell table:style-name="ce12N2" office:value-type="float" office:value="212.8">
            <text:p>21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07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460.21">
            <text:p>1460,21</text:p>
          </table:table-cell>
          <table:table-cell table:style-name="ce12N2" office:value-type="float" office:value="48258.35">
            <text:p>48258,35</text:p>
          </table:table-cell>
          <table:table-cell table:style-name="ce12N2" office:value-type="float" office:value="2030.2">
            <text:p>203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02711396462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7">
            <text:p>3068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1.62">
            <text:p>155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8.84">
            <text:p>48,84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105.19">
            <text:p>10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21570254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8">
            <text:p>30684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05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33.86">
            <text:p>793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01.7">
            <text:p>7601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3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32.16">
            <text:p>332,16</text:p>
          </table:table-cell>
          <table:table-cell table:style-name="ce12N2" office:value-type="float" office:value="7601.7">
            <text:p>7601,70</text:p>
          </table:table-cell>
          <table:table-cell table:style-name="ce12N2" office:value-type="float" office:value="532.12">
            <text:p>53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05511098749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9">
            <text:p>3068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0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9.45">
            <text:p>326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9">
            <text:p>29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2">
            <text:p>0,015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6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290.45">
            <text:p>290,45</text:p>
          </table:table-cell>
          <table:table-cell table:style-name="ce12N2" office:value-type="float" office:value="2979">
            <text:p>2979,00</text:p>
          </table:table-cell>
          <table:table-cell table:style-name="ce12N2" office:value-type="float" office:value="208.53">
            <text:p>20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0451308705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7">
            <text:p>306857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6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6.8">
            <text:p>35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596.8">
            <text:p>359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501862">
            <text:p>9,502</text:p>
          </table:table-cell>
          <table:table-cell table:style-name="ce12N2" office:value-type="float" office:value="280.1">
            <text:p>280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9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96.8">
            <text:p>3596,80</text:p>
          </table:table-cell>
          <table:table-cell table:style-name="ce12N2" office:value-type="float" office:value="135.97">
            <text:p>13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20482520001165500100000066514772923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59">
            <text:p>306859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3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5">
            <text:p>84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45">
            <text:p>8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.1">
            <text:p>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5">
            <text:p>845,00</text:p>
          </table:table-cell>
          <table:table-cell table:style-name="ce12N2" office:value-type="float" office:value="57.65">
            <text:p>57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3851257308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67">
            <text:p>30686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47.22">
            <text:p>10264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101741.04">
            <text:p>10174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26.31291">
            <text:p>2726,313</text:p>
          </table:table-cell>
          <table:table-cell table:style-name="ce12N2" office:value-type="float" office:value="418.76">
            <text:p>41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647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906.18">
            <text:p>906,18</text:p>
          </table:table-cell>
          <table:table-cell table:style-name="ce12N2" office:value-type="float" office:value="101741.04">
            <text:p>101741,04</text:p>
          </table:table-cell>
          <table:table-cell table:style-name="ce12N2" office:value-type="float" office:value="7076.1">
            <text:p>707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62391023305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68">
            <text:p>30686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0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03.27">
            <text:p>710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04.6">
            <text:p>65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66">
            <text:p>0,032</text:p>
          </table:table-cell>
          <table:table-cell table:style-name="ce12N2" office:value-type="float" office:value="7.72">
            <text:p>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03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2">
            <text:p>54,8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598.67">
            <text:p>598,67</text:p>
          </table:table-cell>
          <table:table-cell table:style-name="ce12N2" office:value-type="float" office:value="6504.6">
            <text:p>6504,60</text:p>
          </table:table-cell>
          <table:table-cell table:style-name="ce12N2" office:value-type="float" office:value="438.92">
            <text:p>43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0411987994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1">
            <text:p>306891</text:p>
          </table:table-cell>
          <table:table-cell table:style-name="ce0" table:number-columns-spanned="4" table:number-rows-spanned="1" office:value-type="string" calcext:value-type="string">
            <text:p>3.848 - HIDROSSOL IND. E COM. DE PLASTICOS LTDA.</text:p>
          </table:table-cell>
          <table:covered-table-cell table:number-columns-repeated="3"/>
          <table:table-cell table:style-name="ce0" office:value-type="string" calcext:value-type="string">
            <text:p>57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12312">
            <text:p>2,112</text:p>
          </table:table-cell>
          <table:table-cell table:style-name="ce12N2" office:value-type="float" office:value="764.31">
            <text:p>76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0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1323.32">
            <text:p>1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504514000155550010000575291905752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0">
            <text:p>306920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022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71.57">
            <text:p>3837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3615">
            <text:p>2,934</text:p>
          </table:table-cell>
          <table:table-cell table:style-name="ce12N2" office:value-type="float" office:value="3392.82">
            <text:p>339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37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298.71">
            <text:p>298,71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1524.62">
            <text:p>15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022167505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35">
            <text:p>306935</text:p>
          </table:table-cell>
          <table:table-cell table:style-name="ce0" table:number-columns-spanned="4" table:number-rows-spanned="1" office:value-type="string" calcext:value-type="string">
            <text:p>15.133 - JSS FERRAGENS E SERVICOS EIRELI</text:p>
          </table:table-cell>
          <table:covered-table-cell table:number-columns-repeated="3"/>
          <table:table-cell table:style-name="ce0" office:value-type="string" calcext:value-type="string">
            <text:p>7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21.6">
            <text:p>572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721.6">
            <text:p>572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97624">
            <text:p>1,498</text:p>
          </table:table-cell>
          <table:table-cell table:style-name="ce12N2" office:value-type="float" office:value="271.2">
            <text:p>27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2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21.6">
            <text:p>5721,60</text:p>
          </table:table-cell>
          <table:table-cell table:style-name="ce12N2" office:value-type="float" office:value="190.71">
            <text:p>19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0703302000197550010000074951328411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3">
            <text:p>3069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68.89">
            <text:p>556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9">
            <text:p>522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8">
            <text:p>0,077</text:p>
          </table:table-cell>
          <table:table-cell table:style-name="ce12N2" office:value-type="float" office:value="10.5">
            <text:p>1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68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339.89">
            <text:p>339,89</text:p>
          </table:table-cell>
          <table:table-cell table:style-name="ce12N2" office:value-type="float" office:value="5229">
            <text:p>5229,00</text:p>
          </table:table-cell>
          <table:table-cell table:style-name="ce12N2" office:value-type="float" office:value="366.03">
            <text:p>36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291346673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4">
            <text:p>3069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2">
            <text:p>0,037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89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5710659782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56">
            <text:p>30695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1.1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0.15">
            <text:p>338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73.75">
            <text:p>3273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84">
            <text:p>0,218</text:p>
          </table:table-cell>
          <table:table-cell table:style-name="ce12N2" office:value-type="float" office:value="35.4">
            <text:p>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106.4">
            <text:p>106,40</text:p>
          </table:table-cell>
          <table:table-cell table:style-name="ce12N2" office:value-type="float" office:value="3273.75">
            <text:p>3273,75</text:p>
          </table:table-cell>
          <table:table-cell table:style-name="ce12N2" office:value-type="float" office:value="229.16">
            <text:p>22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11031424740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57">
            <text:p>306957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4.6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6.42">
            <text:p>1536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88.06">
            <text:p>1488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68">
            <text:p>0,122</text:p>
          </table:table-cell>
          <table:table-cell table:style-name="ce12N2" office:value-type="float" office:value="25.02">
            <text:p>25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6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48.36">
            <text:p>48,36</text:p>
          </table:table-cell>
          <table:table-cell table:style-name="ce12N2" office:value-type="float" office:value="1488.06">
            <text:p>1488,06</text:p>
          </table:table-cell>
          <table:table-cell table:style-name="ce12N2" office:value-type="float" office:value="104.16">
            <text:p>10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46681204989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4">
            <text:p>306964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9.83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5">
            <text:p>0,00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78.83">
            <text:p>7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777131003473550050008898381431941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74">
            <text:p>306974</text:p>
          </table:table-cell>
          <table:table-cell table:style-name="ce0" table:number-columns-spanned="4" table:number-rows-spanned="1" office:value-type="string" calcext:value-type="string">
            <text:p>6.601 - SIKA SA</text:p>
          </table:table-cell>
          <table:covered-table-cell table:number-columns-repeated="3"/>
          <table:table-cell table:style-name="ce0" office:value-type="string" calcext:value-type="string">
            <text:p>84.458</text:p>
          </table:table-cell>
          <table:table-cell table:style-name="ce9" office:value-type="string" calcext:value-type="string">
            <text:p>1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282.26">
            <text:p>6128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282.26">
            <text:p>61282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475264">
            <text:p>14,475</text:p>
          </table:table-cell>
          <table:table-cell table:style-name="ce12N2" office:value-type="float" office:value="10660.9">
            <text:p>1066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282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282.26">
            <text:p>61282,26</text:p>
          </table:table-cell>
          <table:table-cell table:style-name="ce12N2" office:value-type="float" office:value="7353.87">
            <text:p>735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330817040022105501800008445814878616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81">
            <text:p>306981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5.424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742.77">
            <text:p>14574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143577.19">
            <text:p>143577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5.203222">
            <text:p>35,203</text:p>
          </table:table-cell>
          <table:table-cell table:style-name="ce12N2" office:value-type="float" office:value="10867.86">
            <text:p>10867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5.742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2165.58">
            <text:p>2165,58</text:p>
          </table:table-cell>
          <table:table-cell table:style-name="ce12N2" office:value-type="float" office:value="143577.19">
            <text:p>143577,19</text:p>
          </table:table-cell>
          <table:table-cell table:style-name="ce12N2" office:value-type="float" office:value="10050.4">
            <text:p>1005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6542411247907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86">
            <text:p>306986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91936">
            <text:p>1,192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838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38.72">
            <text:p>23838,72</text:p>
          </table:table-cell>
          <table:table-cell table:style-name="ce12N2" office:value-type="float" office:value="953.55">
            <text:p>95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2761100031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87">
            <text:p>306987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2.2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7072">
            <text:p>0,207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2.24">
            <text:p>1002,24</text:p>
          </table:table-cell>
          <table:table-cell table:style-name="ce12N2" office:value-type="float" office:value="40.09">
            <text:p>4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228611000311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99">
            <text:p>30699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58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29.32">
            <text:p>6242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29.32">
            <text:p>6242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690509">
            <text:p>41,691</text:p>
          </table:table-cell>
          <table:table-cell table:style-name="ce12N2" office:value-type="float" office:value="13472.4">
            <text:p>1347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42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29.32">
            <text:p>62429,32</text:p>
          </table:table-cell>
          <table:table-cell table:style-name="ce12N2" office:value-type="float" office:value="7491.52">
            <text:p>749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583581805924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08">
            <text:p>307008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58.2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680.48">
            <text:p>12668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6680.48">
            <text:p>12668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9.306396">
            <text:p>39,306</text:p>
          </table:table-cell>
          <table:table-cell table:style-name="ce12N2" office:value-type="float" office:value="26585.96">
            <text:p>26585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.68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680.48">
            <text:p>126680,48</text:p>
          </table:table-cell>
          <table:table-cell table:style-name="ce12N2" office:value-type="float" office:value="15201.66">
            <text:p>1520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5829217442807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09">
            <text:p>30700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58.3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318.34">
            <text:p>3531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318.34">
            <text:p>3531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752806">
            <text:p>8,753</text:p>
          </table:table-cell>
          <table:table-cell table:style-name="ce12N2" office:value-type="float" office:value="8077.76">
            <text:p>8077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318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318.34">
            <text:p>35318,34</text:p>
          </table:table-cell>
          <table:table-cell table:style-name="ce12N2" office:value-type="float" office:value="4238.2">
            <text:p>42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583031437121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10">
            <text:p>30701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58.3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52.12">
            <text:p>3675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752.12">
            <text:p>3675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090119">
            <text:p>6,090</text:p>
          </table:table-cell>
          <table:table-cell table:style-name="ce12N2" office:value-type="float" office:value="8129.1">
            <text:p>812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75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752.12">
            <text:p>36752,12</text:p>
          </table:table-cell>
          <table:table-cell table:style-name="ce12N2" office:value-type="float" office:value="4410.25">
            <text:p>441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583011987288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11">
            <text:p>307011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58.3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20">
            <text:p>127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20">
            <text:p>127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2">
            <text:p>10,200</text:p>
          </table:table-cell>
          <table:table-cell table:style-name="ce12N2" office:value-type="float" office:value="2150">
            <text:p>2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7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720">
            <text:p>12720,00</text:p>
          </table:table-cell>
          <table:table-cell table:style-name="ce12N2" office:value-type="float" office:value="1526.4">
            <text:p>152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5830214802222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12">
            <text:p>307012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58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486.61">
            <text:p>9148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1486.61">
            <text:p>91486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082299">
            <text:p>24,082</text:p>
          </table:table-cell>
          <table:table-cell table:style-name="ce12N2" office:value-type="float" office:value="20776.19">
            <text:p>20776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.48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486.61">
            <text:p>91486,61</text:p>
          </table:table-cell>
          <table:table-cell table:style-name="ce12N2" office:value-type="float" office:value="10978.39">
            <text:p>1097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585911753058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1">
            <text:p>307041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6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00">
            <text:p>75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00">
            <text:p>75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4.711875">
            <text:p>34,712</text:p>
          </table:table-cell>
          <table:table-cell table:style-name="ce12N2" office:value-type="float" office:value="540">
            <text:p>5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0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00">
            <text:p>7500,00</text:p>
          </table:table-cell>
          <table:table-cell table:style-name="ce12N2" office:value-type="float" office:value="283.5">
            <text:p>28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2048252000116550010000006681486038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7">
            <text:p>307047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24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63.1">
            <text:p>10016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00163.1">
            <text:p>10016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83468">
            <text:p>7,983</text:p>
          </table:table-cell>
          <table:table-cell table:style-name="ce12N2" office:value-type="float" office:value="16532.87">
            <text:p>1653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16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63.1">
            <text:p>100163,10</text:p>
          </table:table-cell>
          <table:table-cell table:style-name="ce12N2" office:value-type="float" office:value="7011.41">
            <text:p>701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2441345445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3">
            <text:p>307053</text:p>
          </table:table-cell>
          <table:table-cell table:style-name="ce0" table:number-columns-spanned="4" table:number-rows-spanned="1" office:value-type="string" calcext:value-type="string">
            <text:p>23.993 - KARCHER INDUSTRIA E COMERCIO LIMITADA</text:p>
          </table:table-cell>
          <table:covered-table-cell table:number-columns-repeated="3"/>
          <table:table-cell table:style-name="ce0" office:value-type="string" calcext:value-type="string">
            <text:p>1.612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6.29">
            <text:p>339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89">
            <text:p>31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587">
            <text:p>0,450</text:p>
          </table:table-cell>
          <table:table-cell table:style-name="ce12N2" office:value-type="float" office:value="40.4">
            <text:p>4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6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07.29">
            <text:p>207,29</text:p>
          </table:table-cell>
          <table:table-cell table:style-name="ce12N2" office:value-type="float" office:value="3189">
            <text:p>3189,00</text:p>
          </table:table-cell>
          <table:table-cell table:style-name="ce12N2" office:value-type="float" office:value="160.68">
            <text:p>16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7110960000178550010016121951426337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4">
            <text:p>307054</text:p>
          </table:table-cell>
          <table:table-cell table:style-name="ce0" table:number-columns-spanned="4" table:number-rows-spanned="1" office:value-type="string" calcext:value-type="string">
            <text:p>21.328 - CERAMICA ALMEIDA LTDA</text:p>
          </table:table-cell>
          <table:covered-table-cell table:number-columns-repeated="3"/>
          <table:table-cell table:style-name="ce0" office:value-type="string" calcext:value-type="string">
            <text:p>187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278.36">
            <text:p>6127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0882.62">
            <text:p>60882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120789">
            <text:p>11,121</text:p>
          </table:table-cell>
          <table:table-cell table:style-name="ce12N2" office:value-type="float" office:value="39917.59">
            <text:p>39917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27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71">
            <text:p>74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395.74">
            <text:p>395,74</text:p>
          </table:table-cell>
          <table:table-cell table:style-name="ce12N2" office:value-type="float" office:value="60882.62">
            <text:p>60882,62</text:p>
          </table:table-cell>
          <table:table-cell table:style-name="ce12N2" office:value-type="float" office:value="4261.79">
            <text:p>426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4676633000351550010001872391119646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6">
            <text:p>307056</text:p>
          </table:table-cell>
          <table:table-cell table:style-name="ce0" table:number-columns-spanned="4" table:number-rows-spanned="1" office:value-type="string" calcext:value-type="string">
            <text:p>38.377 - TREND CABLE CONDUTORES ELETRICOS LTDA</text:p>
          </table:table-cell>
          <table:covered-table-cell table:number-columns-repeated="3"/>
          <table:table-cell table:style-name="ce0" office:value-type="string" calcext:value-type="string">
            <text:p>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10">
            <text:p>405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0510">
            <text:p>405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30.125">
            <text:p>1430,125</text:p>
          </table:table-cell>
          <table:table-cell table:style-name="ce12N2" office:value-type="float" office:value="1477">
            <text:p>147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5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10">
            <text:p>40510,00</text:p>
          </table:table-cell>
          <table:table-cell table:style-name="ce12N2" office:value-type="float" office:value="2835.7">
            <text:p>283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3502876000124550010000028081701352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8">
            <text:p>30705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198.37">
            <text:p>38219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381701.86">
            <text:p>3817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8.38815">
            <text:p>58,388</text:p>
          </table:table-cell>
          <table:table-cell table:style-name="ce12N2" office:value-type="float" office:value="2277.92">
            <text:p>227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2.198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496.51">
            <text:p>496,51</text:p>
          </table:table-cell>
          <table:table-cell table:style-name="ce12N2" office:value-type="float" office:value="381701.86">
            <text:p>381701,86</text:p>
          </table:table-cell>
          <table:table-cell table:style-name="ce12N2" office:value-type="float" office:value="26719.13">
            <text:p>26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311133567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08">
            <text:p>208,00</text:p>
          </table:table-cell>
          <table:table-cell table:style-name="ce26N2" office:value-type="float" office:value="315.39">
            <text:p>315,3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7468.34">
            <text:p>127468,34</text:p>
          </table:table-cell>
          <table:table-cell table:style-name="ce26N2" office:value-type="float" office:value="6669472.59">
            <text:p>6669472,59</text:p>
          </table:table-cell>
          <table:table-cell table:style-name="ce26N2" office:value-type="float" office:value="441334.3">
            <text:p>441334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121.62">
            <text:p>2121,62</text:p>
          </table:table-cell>
          <table:table-cell table:style-name="ce26N2" office:value-type="float" office:value="6841764.21">
            <text:p>6841764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8551.26">
            <text:p>38551,26</text:p>
          </table:table-cell>
          <table:table-cell table:style-name="ce26N2" office:value-type="float" office:value="6440.64">
            <text:p>6440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9178.871457">
            <text:p>9178,871</text:p>
          </table:table-cell>
          <table:table-cell table:style-name="ce26N2" office:value-type="float" office:value="6708170.62">
            <text:p>6708170,62</text:p>
          </table:table-cell>
          <table:table-cell table:style-name="ce26N2" office:value-type="float" office:value="6841764.21">
            <text:p>6841764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80410.54">
            <text:p>380410,5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.59">
            <text:p>47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46" meta:object-count="0"/>
    <meta:generator>LibreOffice/4.3.0.4$Windows_x86 LibreOffice_project/62ad5818884a2fc2e5780dd45466868d41009ec0</meta:generator>
  </office:meta>
</office:document-meta>
</file>