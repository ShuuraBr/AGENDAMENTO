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6/05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8">
            <text:p>3074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7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5.5">
            <text:p>557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">
            <text:p>1,44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5.5">
            <text:p>175,5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378">
            <text:p>3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74011259290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0">
            <text:p>3074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5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34">
            <text:p>0,053</text:p>
          </table:table-cell>
          <table:table-cell table:style-name="ce12N2" office:value-type="float" office:value="26.86">
            <text:p>2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9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594.73">
            <text:p>59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5711504332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9">
            <text:p>307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66">
            <text:p>32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21.6">
            <text:p>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71296796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3">
            <text:p>307593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22.88">
            <text:p>2272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712.46">
            <text:p>2271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513">
            <text:p>1,895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2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22712.46">
            <text:p>22712,46</text:p>
          </table:table-cell>
          <table:table-cell table:style-name="ce12N2" office:value-type="float" office:value="908.5">
            <text:p>90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9091209171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0">
            <text:p>30760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">
            <text:p>0,003</text:p>
          </table:table-cell>
          <table:table-cell table:style-name="ce12N2" office:value-type="float" office:value="49.5">
            <text:p>4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711697498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6">
            <text:p>307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5.21">
            <text:p>21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7.21">
            <text:p>67,21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144.76">
            <text:p>14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21867579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7">
            <text:p>30760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1.72">
            <text:p>126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">
            <text:p>0,0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9.72">
            <text:p>39,72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85.54">
            <text:p>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311469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2">
            <text:p>30761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6.25">
            <text:p>525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125.98">
            <text:p>512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3093">
            <text:p>42,931</text:p>
          </table:table-cell>
          <table:table-cell table:style-name="ce12N2" office:value-type="float" office:value="332.15">
            <text:p>33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0.27">
            <text:p>130,27</text:p>
          </table:table-cell>
          <table:table-cell table:style-name="ce12N2" office:value-type="float" office:value="4912.66">
            <text:p>4912,66</text:p>
          </table:table-cell>
          <table:table-cell table:style-name="ce12N2" office:value-type="float" office:value="343.9">
            <text:p>3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1913681000134550010001798341462989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2">
            <text:p>3076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955.92">
            <text:p>190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252118">
            <text:p>12,252</text:p>
          </table:table-cell>
          <table:table-cell table:style-name="ce12N2" office:value-type="float" office:value="5183.76">
            <text:p>5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.95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55.66">
            <text:p>255,66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12356.96">
            <text:p>123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1511727836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9">
            <text:p>307649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0.367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32">
            <text:p>0,064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55.39">
            <text:p>5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6220550140009703671002283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0">
            <text:p>30765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0.36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475">
            <text:p>0,914</text:p>
          </table:table-cell>
          <table:table-cell table:style-name="ce12N2" office:value-type="float" office:value="88.1">
            <text:p>8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5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696.62">
            <text:p>6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6220550140009703661002489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5">
            <text:p>3076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4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2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939.54">
            <text:p>93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486183228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9">
            <text:p>307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4.4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8">
            <text:p>0,012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4405117703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5">
            <text:p>307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49">
            <text:p>0,032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316.73">
            <text:p>31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7551996728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4">
            <text:p>307684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5">
            <text:p>0,7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277.6">
            <text:p>2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21515144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5">
            <text:p>30768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111.06">
            <text:p>1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515878298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3">
            <text:p>307723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8">
            <text:p>0,10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08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51118914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3">
            <text:p>307743</text:p>
          </table:table-cell>
          <table:table-cell table:style-name="ce0" table:number-columns-spanned="4" table:number-rows-spanned="1" office:value-type="string" calcext:value-type="string">
            <text:p>27.071 - ACO CEARENSE INDUSTRIAL LTDA</text:p>
          </table:table-cell>
          <table:covered-table-cell table:number-columns-repeated="3"/>
          <table:table-cell table:style-name="ce0" office:value-type="string" calcext:value-type="string">
            <text:p>1.189.2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059.52">
            <text:p>1790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6183.51">
            <text:p>176183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7.162">
            <text:p>567,162</text:p>
          </table:table-cell>
          <table:table-cell table:style-name="ce12N2" office:value-type="float" office:value="30502.6">
            <text:p>305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9.05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876.01">
            <text:p>2876,01</text:p>
          </table:table-cell>
          <table:table-cell table:style-name="ce12N2" office:value-type="float" office:value="176183.51">
            <text:p>176183,51</text:p>
          </table:table-cell>
          <table:table-cell table:style-name="ce12N2" office:value-type="float" office:value="21142.01">
            <text:p>2114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00990842000138550010011892061193318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8">
            <text:p>3077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2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.84">
            <text:p>5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88">
            <text:p>0,022</text:p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.74">
            <text:p>27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16.01">
            <text:p>1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2">
            <text:p>445,32</text:p>
          </table:table-cell>
          <table:table-cell table:style-name="ce12N2" office:value-type="float" office:value="80.54">
            <text:p>80,5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205114044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4">
            <text:p>307764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28.9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531.53">
            <text:p>5053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283">
            <text:p>1,253</text:p>
          </table:table-cell>
          <table:table-cell table:style-name="ce12N2" office:value-type="float" office:value="321.52">
            <text:p>3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53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74.41">
            <text:p>3074,41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1898.3">
            <text:p>18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231436000107550010000289081073452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9">
            <text:p>307769</text:p>
          </table:table-cell>
          <table:table-cell table:style-name="ce0" table:number-columns-spanned="4" table:number-rows-spanned="1" office:value-type="string" calcext:value-type="string">
            <text:p>15.036 - MAXI RUBBER INDUSTRIAS QUIMICAS LTDA</text:p>
          </table:table-cell>
          <table:covered-table-cell table:number-columns-repeated="3"/>
          <table:table-cell table:style-name="ce0" office:value-type="string" calcext:value-type="string">
            <text:p>234.24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91.62">
            <text:p>38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344">
            <text:p>0,332</text:p>
          </table:table-cell>
          <table:table-cell table:style-name="ce12N2" office:value-type="float" office:value="655.98">
            <text:p>6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92.82">
            <text:p>492,82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2666.92">
            <text:p>266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283822000470550050002342431280518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3">
            <text:p>3077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9632">
            <text:p>0,150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4711637957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4">
            <text:p>30777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">
            <text:p>0,006</text:p>
          </table:table-cell>
          <table:table-cell table:style-name="ce12N2" office:value-type="float" office:value="1329.5">
            <text:p>13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0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1218.07">
            <text:p>121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81761707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7">
            <text:p>3077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4">
            <text:p>0,023</text:p>
          </table:table-cell>
          <table:table-cell table:style-name="ce12N2" office:value-type="float" office:value="26.5">
            <text:p>2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08.96">
            <text:p>3508,96</text:p>
          </table:table-cell>
          <table:table-cell table:style-name="ce12N2" office:value-type="float" office:value="245.63">
            <text:p>24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30146284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8">
            <text:p>3077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90.45">
            <text:p>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91931360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9">
            <text:p>3077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63.92">
            <text:p>76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8">
            <text:p>0,075</text:p>
          </table:table-cell>
          <table:table-cell table:style-name="ce12N2" office:value-type="float" office:value="11.12">
            <text:p>1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7.75">
            <text:p>467,75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503.73">
            <text:p>50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81943773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1">
            <text:p>3077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39">
            <text:p>220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7">
            <text:p>0,006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34.36">
            <text:p>134,36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144.69">
            <text:p>14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71361895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2">
            <text:p>3077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9.37">
            <text:p>3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4">
            <text:p>0,011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262.87">
            <text:p>26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61974864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3">
            <text:p>307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98.75">
            <text:p>799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8">
            <text:p>0,022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9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525.74">
            <text:p>52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513791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4">
            <text:p>307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08">
            <text:p>0,001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18.09">
            <text:p>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415792392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5">
            <text:p>307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31174760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6">
            <text:p>307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1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462.75">
            <text:p>4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11494764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8">
            <text:p>307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39.96">
            <text:p>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01154769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9">
            <text:p>3077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8.81">
            <text:p>398,81</text:p>
          </table:table-cell>
          <table:table-cell table:style-name="ce12N2" office:value-type="float" office:value="27.92">
            <text:p>2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91883203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0">
            <text:p>307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1.93">
            <text:p>323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336">
            <text:p>0,069</text:p>
          </table:table-cell>
          <table:table-cell table:style-name="ce12N2" office:value-type="float" office:value="7.38">
            <text:p>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97.25">
            <text:p>197,25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212.43">
            <text:p>2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814303930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1">
            <text:p>307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752">
            <text:p>0,028</text:p>
          </table:table-cell>
          <table:table-cell table:style-name="ce12N2" office:value-type="float" office:value="76.12">
            <text:p>76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2701.06">
            <text:p>27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71619774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2">
            <text:p>307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61356616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5">
            <text:p>3077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66.36">
            <text:p>2446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466.36">
            <text:p>2446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506812">
            <text:p>23,507</text:p>
          </table:table-cell>
          <table:table-cell table:style-name="ce12N2" office:value-type="float" office:value="210.25">
            <text:p>21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6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443.32">
            <text:p>22443,32</text:p>
          </table:table-cell>
          <table:table-cell table:style-name="ce12N2" office:value-type="float" office:value="1314.58">
            <text:p>131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9159594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6">
            <text:p>3077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0.4">
            <text:p>955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50.4">
            <text:p>955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8533">
            <text:p>1,885</text:p>
          </table:table-cell>
          <table:table-cell table:style-name="ce12N2" office:value-type="float" office:value="171.67">
            <text:p>17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5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0.4">
            <text:p>9550,40</text:p>
          </table:table-cell>
          <table:table-cell table:style-name="ce12N2" office:value-type="float" office:value="668.54">
            <text:p>66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81969266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7">
            <text:p>3077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7">
            <text:p>28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7">
            <text:p>280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1778">
            <text:p>0,572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7">
            <text:p>2806,70</text:p>
          </table:table-cell>
          <table:table-cell table:style-name="ce12N2" office:value-type="float" office:value="196.47">
            <text:p>19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71136401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8">
            <text:p>30779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0.04">
            <text:p>28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820.04">
            <text:p>2820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938">
            <text:p>0,082</text:p>
          </table:table-cell>
          <table:table-cell table:style-name="ce12N2" office:value-type="float" office:value="25.64">
            <text:p>2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0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26">
            <text:p>2210,26</text:p>
          </table:table-cell>
          <table:table-cell table:style-name="ce12N2" office:value-type="float" office:value="154.72">
            <text:p>15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61559949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9">
            <text:p>30779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">
            <text:p>5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3">
            <text:p>5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74">
            <text:p>0,030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">
            <text:p>543,00</text:p>
          </table:table-cell>
          <table:table-cell table:style-name="ce12N2" office:value-type="float" office:value="38.01">
            <text:p>3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51211193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0">
            <text:p>30780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1.55">
            <text:p>557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55">
            <text:p>5571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0931">
            <text:p>0,291</text:p>
          </table:table-cell>
          <table:table-cell table:style-name="ce12N2" office:value-type="float" office:value="60.36">
            <text:p>60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1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1.55">
            <text:p>5571,5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41511184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2">
            <text:p>30780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51.17">
            <text:p>204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0451.17">
            <text:p>2045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7162">
            <text:p>4,072</text:p>
          </table:table-cell>
          <table:table-cell table:style-name="ce12N2" office:value-type="float" office:value="885.51">
            <text:p>885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51.17">
            <text:p>20451,17</text:p>
          </table:table-cell>
          <table:table-cell table:style-name="ce12N2" office:value-type="float" office:value="1431.59">
            <text:p>143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06141742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0">
            <text:p>307810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6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89.76">
            <text:p>1778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67">
            <text:p>1,897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8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.5">
            <text:p>4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085.76">
            <text:p>1085,76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1169.28">
            <text:p>116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6212048000302550010000069471152455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4">
            <text:p>30781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9.97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7.63">
            <text:p>1801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329116">
            <text:p>18,329</text:p>
          </table:table-cell>
          <table:table-cell table:style-name="ce12N2" office:value-type="float" office:value="23989.6">
            <text:p>239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.13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6.39">
            <text:p>26,39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12607.79">
            <text:p>126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699731566510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5">
            <text:p>3078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6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36">
            <text:p>0,003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66.86">
            <text:p>6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685162544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0">
            <text:p>30782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5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96">
            <text:p>0,073</text:p>
          </table:table-cell>
          <table:table-cell table:style-name="ce12N2" office:value-type="float" office:value="28.51">
            <text:p>2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46.03">
            <text:p>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510811000392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2">
            <text:p>307822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4.63">
            <text:p>368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27">
            <text:p>0,843</text:p>
          </table:table-cell>
          <table:table-cell table:style-name="ce12N2" office:value-type="float" office:value="445">
            <text:p>4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82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59.13">
            <text:p>1159,13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2496.59">
            <text:p>249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6371669273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3">
            <text:p>307823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5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29.3">
            <text:p>4012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7756">
            <text:p>4,478</text:p>
          </table:table-cell>
          <table:table-cell table:style-name="ce12N2" office:value-type="float" office:value="6044.42">
            <text:p>604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2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94">
            <text:p>44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63.47">
            <text:p>163,47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2797.62">
            <text:p>279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204129000106550010001415621939014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4">
            <text:p>3078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0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29">
            <text:p>0,403</text:p>
          </table:table-cell>
          <table:table-cell table:style-name="ce12N2" office:value-type="float" office:value="20.4">
            <text:p>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4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318.28">
            <text:p>31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041117539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6">
            <text:p>30782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3.62752">
            <text:p>173,628</text:p>
          </table:table-cell>
          <table:table-cell table:style-name="ce12N2" office:value-type="float" office:value="10950.72">
            <text:p>1095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.87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">
            <text:p>1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11540.96">
            <text:p>1154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41595075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7">
            <text:p>30782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6.05">
            <text:p>3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6.97">
            <text:p>116,97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143.96">
            <text:p>14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69158114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8">
            <text:p>30782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.58">
            <text:p>1003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5">
            <text:p>0,02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3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519.48">
            <text:p>519,48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380.56">
            <text:p>38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215721587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0">
            <text:p>307830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26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214.18">
            <text:p>214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91.18">
            <text:p>6591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56">
            <text:p>6,346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7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1275.4">
            <text:p>127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2641583382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1">
            <text:p>307831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4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07">
            <text:p>27307,00</text:p>
          </table:table-cell>
          <table:table-cell table:style-name="ce12N2" office:value-type="float" office:value="917.18">
            <text:p>917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224.18">
            <text:p>2822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5024">
            <text:p>28,502</text:p>
          </table:table-cell>
          <table:table-cell table:style-name="ce12N2" office:value-type="float" office:value="36000">
            <text:p>3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30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07">
            <text:p>27307,00</text:p>
          </table:table-cell>
          <table:table-cell table:style-name="ce12N2" office:value-type="float" office:value="5461.4">
            <text:p>54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4421875350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3">
            <text:p>307833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446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214.18">
            <text:p>214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91.18">
            <text:p>6591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56">
            <text:p>6,346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7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1275.4">
            <text:p>127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446149980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4">
            <text:p>307834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26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92">
            <text:p>19692,00</text:p>
          </table:table-cell>
          <table:table-cell table:style-name="ce12N2" office:value-type="float" office:value="661.43">
            <text:p>661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96.05">
            <text:p>1959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46">
            <text:p>23,460</text:p>
          </table:table-cell>
          <table:table-cell table:style-name="ce12N2" office:value-type="float" office:value="30000">
            <text:p>3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34.62">
            <text:p>18934,62</text:p>
          </table:table-cell>
          <table:table-cell table:style-name="ce12N2" office:value-type="float" office:value="3786.92">
            <text:p>378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721.54">
            <text:p>22721,54</text:p>
          </table:table-cell>
          <table:table-cell table:style-name="ce12N2" office:value-type="float" office:value="757.38">
            <text:p>757,3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2651759338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5">
            <text:p>3078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44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92">
            <text:p>19692,00</text:p>
          </table:table-cell>
          <table:table-cell table:style-name="ce12N2" office:value-type="float" office:value="661.43">
            <text:p>661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96.05">
            <text:p>1959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46">
            <text:p>23,460</text:p>
          </table:table-cell>
          <table:table-cell table:style-name="ce12N2" office:value-type="float" office:value="30000">
            <text:p>3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34.62">
            <text:p>18934,62</text:p>
          </table:table-cell>
          <table:table-cell table:style-name="ce12N2" office:value-type="float" office:value="3786.92">
            <text:p>378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721.54">
            <text:p>22721,54</text:p>
          </table:table-cell>
          <table:table-cell table:style-name="ce12N2" office:value-type="float" office:value="757.38">
            <text:p>757,3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4471831065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6">
            <text:p>307836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32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95.2">
            <text:p>189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64.62">
            <text:p>18264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896">
            <text:p>21,896</text:p>
          </table:table-cell>
          <table:table-cell table:style-name="ce12N2" office:value-type="float" office:value="28000">
            <text:p>2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9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64.62">
            <text:p>18264,62</text:p>
          </table:table-cell>
          <table:table-cell table:style-name="ce12N2" office:value-type="float" office:value="3652.92">
            <text:p>365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917.54">
            <text:p>21917,54</text:p>
          </table:table-cell>
          <table:table-cell table:style-name="ce12N2" office:value-type="float" office:value="730.58">
            <text:p>730,5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3231377729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7">
            <text:p>307837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201.24">
            <text:p>19120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191201.24">
            <text:p>1912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1085">
            <text:p>21,108</text:p>
          </table:table-cell>
          <table:table-cell table:style-name="ce12N2" office:value-type="float" office:value="2230.9">
            <text:p>223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.20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201.24">
            <text:p>191201,24</text:p>
          </table:table-cell>
          <table:table-cell table:style-name="ce12N2" office:value-type="float" office:value="13384.08">
            <text:p>133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571545369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8">
            <text:p>307838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19.02">
            <text:p>36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36019.02">
            <text:p>36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02">
            <text:p>4,760</text:p>
          </table:table-cell>
          <table:table-cell table:style-name="ce12N2" office:value-type="float" office:value="847.18">
            <text:p>847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019.02">
            <text:p>36019,02</text:p>
          </table:table-cell>
          <table:table-cell table:style-name="ce12N2" office:value-type="float" office:value="2521.31">
            <text:p>252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551521672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7">
            <text:p>30784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93.68">
            <text:p>6839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65231.14">
            <text:p>6523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46851">
            <text:p>1,947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39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162.54">
            <text:p>3162,54</text:p>
          </table:table-cell>
          <table:table-cell table:style-name="ce12N2" office:value-type="float" office:value="64947.12">
            <text:p>64947,12</text:p>
          </table:table-cell>
          <table:table-cell table:style-name="ce12N2" office:value-type="float" office:value="3325.85">
            <text:p>33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915746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0">
            <text:p>30785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6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552">
            <text:p>0,262</text:p>
          </table:table-cell>
          <table:table-cell table:style-name="ce12N2" office:value-type="float" office:value="47.4">
            <text:p>4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5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458.86">
            <text:p>4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6351241633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1">
            <text:p>3078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6">
            <text:p>0,009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4.37">
            <text:p>14,37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19.35">
            <text:p>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81843624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3">
            <text:p>307853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63.18">
            <text:p>201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27734">
            <text:p>4,277</text:p>
          </table:table-cell>
          <table:table-cell table:style-name="ce12N2" office:value-type="float" office:value="944.34">
            <text:p>944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1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9.57">
            <text:p>11809,57</text:p>
          </table:table-cell>
          <table:table-cell table:style-name="ce12N2" office:value-type="float" office:value="826.67">
            <text:p>82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3109902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4">
            <text:p>3078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.61">
            <text:p>627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9">
            <text:p>0,033</text:p>
          </table:table-cell>
          <table:table-cell table:style-name="ce12N2" office:value-type="float" office:value="284.1">
            <text:p>28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7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59.22">
            <text:p>359,22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280.59">
            <text:p>28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31570200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5">
            <text:p>30785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19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5.2">
            <text:p>547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64.62">
            <text:p>5264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56">
            <text:p>6,256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7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64.62">
            <text:p>5264,62</text:p>
          </table:table-cell>
          <table:table-cell table:style-name="ce12N2" office:value-type="float" office:value="1052.92">
            <text:p>105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317.54">
            <text:p>6317,54</text:p>
          </table:table-cell>
          <table:table-cell table:style-name="ce12N2" office:value-type="float" office:value="210.58">
            <text:p>210,5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1951267424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2">
            <text:p>307862</text:p>
          </table:table-cell>
          <table:table-cell table:style-name="ce0" table:number-columns-spanned="4" table:number-rows-spanned="1" office:value-type="string" calcext:value-type="string">
            <text:p>576 - BRASILUX INDUSTRIA COM IMP E EXP LTDA</text:p>
          </table:table-cell>
          <table:covered-table-cell table:number-columns-repeated="3"/>
          <table:table-cell table:style-name="ce0" office:value-type="string" calcext:value-type="string">
            <text:p>1.45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748.12">
            <text:p>1077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553028">
            <text:p>19,553</text:p>
          </table:table-cell>
          <table:table-cell table:style-name="ce12N2" office:value-type="float" office:value="2505">
            <text:p>25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74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9572.16">
            <text:p>9572,16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6872.32">
            <text:p>68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374121000101550010014500791725248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4">
            <text:p>3078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20.11">
            <text:p>77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7">
            <text:p>0,031</text:p>
          </table:table-cell>
          <table:table-cell table:style-name="ce12N2" office:value-type="float" office:value="47.04">
            <text:p>4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2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243.01">
            <text:p>243,01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523.4">
            <text:p>5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81170410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5">
            <text:p>3078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.88">
            <text:p>5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">
            <text:p>0,003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37.21">
            <text:p>3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421807808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8">
            <text:p>307868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5.63">
            <text:p>18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814.53">
            <text:p>181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00929">
            <text:p>45,201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1814.53">
            <text:p>1814,53</text:p>
          </table:table-cell>
          <table:table-cell table:style-name="ce12N2" office:value-type="float" office:value="362.88">
            <text:p>36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399825550001115500100000369315218399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31">
            <text:p>131,00</text:p>
          </table:table-cell>
          <table:table-cell table:style-name="ce26N2" office:value-type="float" office:value="2668.4">
            <text:p>2668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3097.75">
            <text:p>53097,75</text:p>
          </table:table-cell>
          <table:table-cell table:style-name="ce26N2" office:value-type="float" office:value="3080146.03">
            <text:p>3080146,03</text:p>
          </table:table-cell>
          <table:table-cell table:style-name="ce26N2" office:value-type="float" office:value="223431.89">
            <text:p>223431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65124.87">
            <text:p>3165124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4123.48">
            <text:p>74123,48</text:p>
          </table:table-cell>
          <table:table-cell table:style-name="ce26N2" office:value-type="float" office:value="2536.46">
            <text:p>2536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65208.740956">
            <text:p>65208,741</text:p>
          </table:table-cell>
          <table:table-cell table:style-name="ce26N2" office:value-type="float" office:value="3112159.06">
            <text:p>3112159,06</text:p>
          </table:table-cell>
          <table:table-cell table:style-name="ce26N2" office:value-type="float" office:value="3165124.87">
            <text:p>3165124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21667.98">
            <text:p>321667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18">
            <text:p>38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72" meta:object-count="0"/>
    <meta:generator>LibreOffice/4.3.0.4$Windows_x86 LibreOffice_project/62ad5818884a2fc2e5780dd45466868d41009ec0</meta:generator>
  </office:meta>
</office:document-meta>
</file>