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2/06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4">
            <text:p>307634</text:p>
          </table:table-cell>
          <table:table-cell table:style-name="ce0" table:number-columns-spanned="4" table:number-rows-spanned="1" office:value-type="string" calcext:value-type="string">
            <text:p>480 - HAGA S/A INDUSTRIA E COMERCIO LTDA</text:p>
          </table:table-cell>
          <table:covered-table-cell table:number-columns-repeated="3"/>
          <table:table-cell table:style-name="ce0" office:value-type="string" calcext:value-type="string">
            <text:p>108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08">
            <text:p>0,121</text:p>
          </table:table-cell>
          <table:table-cell table:style-name="ce12N2" office:value-type="float" office:value="44.16">
            <text:p>4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308.89">
            <text:p>3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30540991000166550010001081911363840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6">
            <text:p>30795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25.36">
            <text:p>5452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4813.12">
            <text:p>4481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25808">
            <text:p>7,526</text:p>
          </table:table-cell>
          <table:table-cell table:style-name="ce12N2" office:value-type="float" office:value="751.49">
            <text:p>751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525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94.88">
            <text:p>2894,88</text:p>
          </table:table-cell>
          <table:table-cell table:style-name="ce12N2" office:value-type="float" office:value="42977.89">
            <text:p>42977,89</text:p>
          </table:table-cell>
          <table:table-cell table:style-name="ce12N2" office:value-type="float" office:value="1782.08">
            <text:p>17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037.94">
            <text:p>38037,94</text:p>
          </table:table-cell>
          <table:table-cell table:style-name="ce12N2" office:value-type="float" office:value="6817.36">
            <text:p>6817,3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44341151200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1">
            <text:p>30808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7.35">
            <text:p>800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7406">
            <text:p>2,367</text:p>
          </table:table-cell>
          <table:table-cell table:style-name="ce12N2" office:value-type="float" office:value="8064">
            <text:p>80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0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14.36">
            <text:p>6714,36</text:p>
          </table:table-cell>
          <table:table-cell table:style-name="ce12N2" office:value-type="float" office:value="6.71">
            <text:p>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43">
            <text:p>60,4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1.71">
            <text:p>51,71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556.89">
            <text:p>55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0111780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0">
            <text:p>308090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7.25">
            <text:p>2447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496">
            <text:p>0,89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77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134.68">
            <text:p>20134,68</text:p>
          </table:table-cell>
          <table:table-cell table:style-name="ce12N2" office:value-type="float" office:value="20.13">
            <text:p>2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1">
            <text:p>181,21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20.28">
            <text:p>620,28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1669.99">
            <text:p>166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31932554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9">
            <text:p>30810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2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80.32">
            <text:p>4348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21614">
            <text:p>7,222</text:p>
          </table:table-cell>
          <table:table-cell table:style-name="ce12N2" office:value-type="float" office:value="22559.95">
            <text:p>2255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48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459.31">
            <text:p>36459,31</text:p>
          </table:table-cell>
          <table:table-cell table:style-name="ce12N2" office:value-type="float" office:value="36.46">
            <text:p>3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13">
            <text:p>328,13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80.8">
            <text:p>280,8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3023.97">
            <text:p>30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2017361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1">
            <text:p>3081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12.09">
            <text:p>184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8646">
            <text:p>2,889</text:p>
          </table:table-cell>
          <table:table-cell table:style-name="ce12N2" office:value-type="float" office:value="9023.94">
            <text:p>902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38.99">
            <text:p>15438,99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8.91">
            <text:p>118,91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1280.52">
            <text:p>1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1183825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2">
            <text:p>30811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107.18">
            <text:p>13510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3629">
            <text:p>7,136</text:p>
          </table:table-cell>
          <table:table-cell table:style-name="ce12N2" office:value-type="float" office:value="1347.5">
            <text:p>134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5.107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596.02">
            <text:p>108596,02</text:p>
          </table:table-cell>
          <table:table-cell table:style-name="ce12N2" office:value-type="float" office:value="108.6">
            <text:p>10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36">
            <text:p>977,36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56.1">
            <text:p>10456,1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4986.05">
            <text:p>49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93814266121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8">
            <text:p>30819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44.72">
            <text:p>212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57069">
            <text:p>5,057</text:p>
          </table:table-cell>
          <table:table-cell table:style-name="ce12N2" office:value-type="float" office:value="22015.99">
            <text:p>2201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2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14.22">
            <text:p>17814,22</text:p>
          </table:table-cell>
          <table:table-cell table:style-name="ce12N2" office:value-type="float" office:value="17.81">
            <text:p>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33">
            <text:p>160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7.2">
            <text:p>137,2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1477.53">
            <text:p>147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461549419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6">
            <text:p>30820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18.58">
            <text:p>1051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1109">
            <text:p>1,611</text:p>
          </table:table-cell>
          <table:table-cell table:style-name="ce12N2" office:value-type="float" office:value="7024.08">
            <text:p>702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1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20.08">
            <text:p>8820,08</text:p>
          </table:table-cell>
          <table:table-cell table:style-name="ce12N2" office:value-type="float" office:value="8.82">
            <text:p>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38">
            <text:p>79,3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67.93">
            <text:p>67,93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731.55">
            <text:p>73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012352403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6">
            <text:p>30824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4124.66">
            <text:p>98412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58853.58">
            <text:p>958853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8.627062">
            <text:p>48,627</text:p>
          </table:table-cell>
          <table:table-cell table:style-name="ce12N2" office:value-type="float" office:value="5420.2">
            <text:p>542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4.12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7945.56">
            <text:p>817945,56</text:p>
          </table:table-cell>
          <table:table-cell table:style-name="ce12N2" office:value-type="float" office:value="817.93">
            <text:p>81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61.49">
            <text:p>7361,4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5271.08">
            <text:p>25271,08</text:p>
          </table:table-cell>
          <table:table-cell table:style-name="ce12N2" office:value-type="float" office:value="958853.58">
            <text:p>958853,58</text:p>
          </table:table-cell>
          <table:table-cell table:style-name="ce12N2" office:value-type="float" office:value="57536.13">
            <text:p>57536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21614848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9">
            <text:p>3082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9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49.78">
            <text:p>2024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70087">
            <text:p>3,370</text:p>
          </table:table-cell>
          <table:table-cell table:style-name="ce12N2" office:value-type="float" office:value="10528">
            <text:p>105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24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79.94">
            <text:p>16979,94</text:p>
          </table:table-cell>
          <table:table-cell table:style-name="ce12N2" office:value-type="float" office:value="16.98">
            <text:p>1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82">
            <text:p>152,82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30.77">
            <text:p>130,77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1408.33">
            <text:p>14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952137648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3">
            <text:p>3082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27.59">
            <text:p>3402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27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32.97">
            <text:p>28532,97</text:p>
          </table:table-cell>
          <table:table-cell table:style-name="ce12N2" office:value-type="float" office:value="28.53">
            <text:p>2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8">
            <text:p>256,8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19.75">
            <text:p>219,75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2366.55">
            <text:p>236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51767573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4">
            <text:p>30826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5.02">
            <text:p>1328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1958">
            <text:p>0,752</text:p>
          </table:table-cell>
          <table:table-cell table:style-name="ce12N2" office:value-type="float" office:value="5953.15">
            <text:p>595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8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9.82">
            <text:p>11139,82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6">
            <text:p>100,2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85.79">
            <text:p>85,79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923.95">
            <text:p>92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41188285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6">
            <text:p>30833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24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4.43">
            <text:p>367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48">
            <text:p>33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6">
            <text:p>0,005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7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6.78">
            <text:p>2916,78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5">
            <text:p>26,25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26.43">
            <text:p>326,43</text:p>
          </table:table-cell>
          <table:table-cell table:style-name="ce12N2" office:value-type="float" office:value="3348">
            <text:p>3348,00</text:p>
          </table:table-cell>
          <table:table-cell table:style-name="ce12N2" office:value-type="float" office:value="133.92">
            <text:p>13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24815109791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7">
            <text:p>30833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25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46.58">
            <text:p>7146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921.62">
            <text:p>6921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068">
            <text:p>0,022</text:p>
          </table:table-cell>
          <table:table-cell table:style-name="ce12N2" office:value-type="float" office:value="22.07">
            <text:p>22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46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30.11">
            <text:p>6030,11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7">
            <text:p>54,27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4.96">
            <text:p>224,96</text:p>
          </table:table-cell>
          <table:table-cell table:style-name="ce12N2" office:value-type="float" office:value="6921.62">
            <text:p>6921,62</text:p>
          </table:table-cell>
          <table:table-cell table:style-name="ce12N2" office:value-type="float" office:value="276.86">
            <text:p>27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2541673082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0">
            <text:p>30834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6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1.3">
            <text:p>2415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60216">
            <text:p>4,860</text:p>
          </table:table-cell>
          <table:table-cell table:style-name="ce12N2" office:value-type="float" office:value="18788.4">
            <text:p>1878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1.46">
            <text:p>20251,46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7">
            <text:p>182,27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5.97">
            <text:p>155,97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1679.67">
            <text:p>167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65213855366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1">
            <text:p>30834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7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8.39">
            <text:p>511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1826">
            <text:p>0,592</text:p>
          </table:table-cell>
          <table:table-cell table:style-name="ce12N2" office:value-type="float" office:value="4084.48">
            <text:p>4084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91.91">
            <text:p>4291,91</text:p>
          </table:table-cell>
          <table:table-cell table:style-name="ce12N2" office:value-type="float" office:value="4.29">
            <text:p>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63">
            <text:p>38,6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3.05">
            <text:p>33,05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355.97">
            <text:p>35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7071683356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1">
            <text:p>308351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8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86.57">
            <text:p>2528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490.63">
            <text:p>24490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5078">
            <text:p>3,751</text:p>
          </table:table-cell>
          <table:table-cell table:style-name="ce12N2" office:value-type="float" office:value="449.38">
            <text:p>449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86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69.48">
            <text:p>20669,48</text:p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6.03">
            <text:p>186,03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95.94">
            <text:p>795,94</text:p>
          </table:table-cell>
          <table:table-cell table:style-name="ce12N2" office:value-type="float" office:value="24490.63">
            <text:p>24490,63</text:p>
          </table:table-cell>
          <table:table-cell table:style-name="ce12N2" office:value-type="float" office:value="1714.34">
            <text:p>171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83541758481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8">
            <text:p>30843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7166289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0">
            <text:p>30844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7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39.07">
            <text:p>1143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2008">
            <text:p>3,382</text:p>
          </table:table-cell>
          <table:table-cell table:style-name="ce12N2" office:value-type="float" office:value="11520">
            <text:p>115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39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91.95">
            <text:p>9591,95</text:p>
          </table:table-cell>
          <table:table-cell table:style-name="ce12N2" office:value-type="float" office:value="9.59">
            <text:p>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33">
            <text:p>86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3.87">
            <text:p>73,87</text:p>
          </table:table-cell>
          <table:table-cell table:style-name="ce12N2" office:value-type="float" office:value="11365.2">
            <text:p>11365,20</text:p>
          </table:table-cell>
          <table:table-cell table:style-name="ce12N2" office:value-type="float" office:value="795.56">
            <text:p>79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7181828823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7">
            <text:p>30844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5.62">
            <text:p>681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33">
            <text:p>0,753</text:p>
          </table:table-cell>
          <table:table-cell table:style-name="ce12N2" office:value-type="float" office:value="5189.18">
            <text:p>518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1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5.06">
            <text:p>5715,06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.44">
            <text:p>51,44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44.02">
            <text:p>44,02</text:p>
          </table:table-cell>
          <table:table-cell table:style-name="ce12N2" office:value-type="float" office:value="6771.6">
            <text:p>6771,60</text:p>
          </table:table-cell>
          <table:table-cell table:style-name="ce12N2" office:value-type="float" office:value="474.01">
            <text:p>4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21771390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49">
            <text:p>30844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8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9.54">
            <text:p>571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1004">
            <text:p>1,691</text:p>
          </table:table-cell>
          <table:table-cell table:style-name="ce12N2" office:value-type="float" office:value="5760">
            <text:p>5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1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95.97">
            <text:p>4795,97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16">
            <text:p>43,16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6.94">
            <text:p>36,94</text:p>
          </table:table-cell>
          <table:table-cell table:style-name="ce12N2" office:value-type="float" office:value="5682.6">
            <text:p>5682,60</text:p>
          </table:table-cell>
          <table:table-cell table:style-name="ce12N2" office:value-type="float" office:value="397.78">
            <text:p>39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8131522978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3">
            <text:p>30845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6.38">
            <text:p>176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72861">
            <text:p>2,673</text:p>
          </table:table-cell>
          <table:table-cell table:style-name="ce12N2" office:value-type="float" office:value="16943.9">
            <text:p>169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6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88.55">
            <text:p>14788,55</text:p>
          </table:table-cell>
          <table:table-cell table:style-name="ce12N2" office:value-type="float" office:value="14.79">
            <text:p>1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09">
            <text:p>133,09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13.89">
            <text:p>113,89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1226.57">
            <text:p>12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8321826114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4">
            <text:p>308454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5717">
            <text:p>0,357</text:p>
          </table:table-cell>
          <table:table-cell table:style-name="ce12N2" office:value-type="float" office:value="374.4">
            <text:p>3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2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70.22">
            <text:p>12670,22</text:p>
          </table:table-cell>
          <table:table-cell table:style-name="ce12N2" office:value-type="float" office:value="12.66">
            <text:p>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.04">
            <text:p>114,04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21.05">
            <text:p>15021,05</text:p>
          </table:table-cell>
          <table:table-cell table:style-name="ce12N2" office:value-type="float" office:value="1802.54">
            <text:p>1802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231597020001185500100002103919735015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2">
            <text:p>308462</text:p>
          </table:table-cell>
          <table:table-cell table:style-name="ce0" table:number-columns-spanned="4" table:number-rows-spanned="1" office:value-type="string" calcext:value-type="string">
            <text:p>12.902 - CORDOARIA BRASIL INDUSTRIA E COMERCIO DE CORDAS EIRELI</text:p>
          </table:table-cell>
          <table:covered-table-cell table:number-columns-repeated="3"/>
          <table:table-cell table:style-name="ce0" office:value-type="string" calcext:value-type="string">
            <text:p>49.6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5632">
            <text:p>0,296</text:p>
          </table:table-cell>
          <table:table-cell table:style-name="ce12N2" office:value-type="float" office:value="5299.35">
            <text:p>5299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7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1.91">
            <text:p>6611,91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1">
            <text:p>59,5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78.91">
            <text:p>7378,91</text:p>
          </table:table-cell>
          <table:table-cell table:style-name="ce12N2" office:value-type="float" office:value="516.52">
            <text:p>51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4546240001535500100004967717582346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3">
            <text:p>30846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26.25">
            <text:p>3492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00045">
            <text:p>2,800</text:p>
          </table:table-cell>
          <table:table-cell table:style-name="ce12N2" office:value-type="float" office:value="300.85">
            <text:p>30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92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25.59">
            <text:p>30125,59</text:p>
          </table:table-cell>
          <table:table-cell table:style-name="ce12N2" office:value-type="float" office:value="30.14">
            <text:p>3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14">
            <text:p>271,14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8.92">
            <text:p>28,92</text:p>
          </table:table-cell>
          <table:table-cell table:style-name="ce12N2" office:value-type="float" office:value="34897.33">
            <text:p>34897,33</text:p>
          </table:table-cell>
          <table:table-cell table:style-name="ce12N2" office:value-type="float" office:value="1701.07">
            <text:p>170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3311732807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5">
            <text:p>308465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4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792">
            <text:p>0,069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.84">
            <text:p>220,84</text:p>
          </table:table-cell>
          <table:table-cell table:style-name="ce12N2" office:value-type="float" office:value="0.22">
            <text:p>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1.68">
            <text:p>261,68</text:p>
          </table:table-cell>
          <table:table-cell table:style-name="ce12N2" office:value-type="float" office:value="18.32">
            <text:p>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4150744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0">
            <text:p>308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8.3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272.61">
            <text:p>17327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71588.08">
            <text:p>1715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024832">
            <text:p>6,025</text:p>
          </table:table-cell>
          <table:table-cell table:style-name="ce12N2" office:value-type="float" office:value="485.54">
            <text:p>48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3.27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853.86">
            <text:p>145853,86</text:p>
          </table:table-cell>
          <table:table-cell table:style-name="ce12N2" office:value-type="float" office:value="145.86">
            <text:p>14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2.68">
            <text:p>1312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684.53">
            <text:p>1684,53</text:p>
          </table:table-cell>
          <table:table-cell table:style-name="ce12N2" office:value-type="float" office:value="167518.9">
            <text:p>167518,90</text:p>
          </table:table-cell>
          <table:table-cell table:style-name="ce12N2" office:value-type="float" office:value="10867.54">
            <text:p>1086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833317946248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9">
            <text:p>3084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9.07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2.43">
            <text:p>449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8314">
            <text:p>0,518</text:p>
          </table:table-cell>
          <table:table-cell table:style-name="ce12N2" office:value-type="float" office:value="2256.02">
            <text:p>225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7.02">
            <text:p>3767,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99.55">
            <text:p>99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9.01">
            <text:p>29,01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312.44">
            <text:p>31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90761582524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6">
            <text:p>308496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76.06">
            <text:p>1107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27.42">
            <text:p>1072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1048">
            <text:p>2,410</text:p>
          </table:table-cell>
          <table:table-cell table:style-name="ce12N2" office:value-type="float" office:value="860.9">
            <text:p>86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76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76.5">
            <text:p>9976,50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.78">
            <text:p>89,7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48.64">
            <text:p>348,64</text:p>
          </table:table-cell>
          <table:table-cell table:style-name="ce12N2" office:value-type="float" office:value="10727.42">
            <text:p>10727,42</text:p>
          </table:table-cell>
          <table:table-cell table:style-name="ce12N2" office:value-type="float" office:value="750.92">
            <text:p>75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2164439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7">
            <text:p>308497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0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1.08">
            <text:p>436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23.82">
            <text:p>4223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6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28.15">
            <text:p>3928,15</text:p>
          </table:table-cell>
          <table:table-cell table:style-name="ce12N2" office:value-type="float" office:value="3.93">
            <text:p>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34">
            <text:p>35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7.26">
            <text:p>137,26</text:p>
          </table:table-cell>
          <table:table-cell table:style-name="ce12N2" office:value-type="float" office:value="4223.82">
            <text:p>4223,82</text:p>
          </table:table-cell>
          <table:table-cell table:style-name="ce12N2" office:value-type="float" office:value="295.67">
            <text:p>29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091748272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8">
            <text:p>308498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35.78">
            <text:p>11063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06651.02">
            <text:p>106651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9.13361">
            <text:p>29,134</text:p>
          </table:table-cell>
          <table:table-cell table:style-name="ce12N2" office:value-type="float" office:value="8729.32">
            <text:p>8729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0.63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048.12">
            <text:p>90048,12</text:p>
          </table:table-cell>
          <table:table-cell table:style-name="ce12N2" office:value-type="float" office:value="90.05">
            <text:p>9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0.43">
            <text:p>810,4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984.76">
            <text:p>3984,76</text:p>
          </table:table-cell>
          <table:table-cell table:style-name="ce12N2" office:value-type="float" office:value="106651.02">
            <text:p>106651,02</text:p>
          </table:table-cell>
          <table:table-cell table:style-name="ce12N2" office:value-type="float" office:value="7424.44">
            <text:p>742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31084140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9">
            <text:p>308499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7.03">
            <text:p>227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05.36">
            <text:p>220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88">
            <text:p>0,795</text:p>
          </table:table-cell>
          <table:table-cell table:style-name="ce12N2" office:value-type="float" office:value="230.4">
            <text:p>23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0.98">
            <text:p>2050,98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46">
            <text:p>18,4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1.67">
            <text:p>71,67</text:p>
          </table:table-cell>
          <table:table-cell table:style-name="ce12N2" office:value-type="float" office:value="2205.36">
            <text:p>2205,36</text:p>
          </table:table-cell>
          <table:table-cell table:style-name="ce12N2" office:value-type="float" office:value="154.38">
            <text:p>15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11531791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00">
            <text:p>308500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5.61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5.21">
            <text:p>83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8.92">
            <text:p>80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16">
            <text:p>0,056</text:p>
          </table:table-cell>
          <table:table-cell table:style-name="ce12N2" office:value-type="float" office:value="37.8">
            <text:p>3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5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2.3">
            <text:p>752,30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7">
            <text:p>6,7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.29">
            <text:p>26,29</text:p>
          </table:table-cell>
          <table:table-cell table:style-name="ce12N2" office:value-type="float" office:value="808.92">
            <text:p>808,92</text:p>
          </table:table-cell>
          <table:table-cell table:style-name="ce12N2" office:value-type="float" office:value="56.62">
            <text:p>5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6062030000123550020006956101144540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5">
            <text:p>3085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02.53">
            <text:p>3510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93168">
            <text:p>3,693</text:p>
          </table:table-cell>
          <table:table-cell table:style-name="ce12N2" office:value-type="float" office:value="190.61">
            <text:p>19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0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347.35">
            <text:p>29347,35</text:p>
          </table:table-cell>
          <table:table-cell table:style-name="ce12N2" office:value-type="float" office:value="29.34">
            <text:p>2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12">
            <text:p>264,1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32.23">
            <text:p>632,23</text:p>
          </table:table-cell>
          <table:table-cell table:style-name="ce12N2" office:value-type="float" office:value="34470.3">
            <text:p>34470,30</text:p>
          </table:table-cell>
          <table:table-cell table:style-name="ce12N2" office:value-type="float" office:value="2131.63">
            <text:p>213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79614736633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6">
            <text:p>3085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3.8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44">
            <text:p>5,644</text:p>
          </table:table-cell>
          <table:table-cell table:style-name="ce12N2" office:value-type="float" office:value="349.4">
            <text:p>34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94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966.16">
            <text:p>53966,16</text:p>
          </table:table-cell>
          <table:table-cell table:style-name="ce12N2" office:value-type="float" office:value="53.97">
            <text:p>5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.7">
            <text:p>485,70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942.84">
            <text:p>63942,84</text:p>
          </table:table-cell>
          <table:table-cell table:style-name="ce12N2" office:value-type="float" office:value="4476">
            <text:p>44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38321063213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0">
            <text:p>30855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54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5811">
            <text:p>2,558</text:p>
          </table:table-cell>
          <table:table-cell table:style-name="ce12N2" office:value-type="float" office:value="717.38">
            <text:p>717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3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22.56">
            <text:p>20622,5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6">
            <text:p>185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35.04">
            <text:p>24435,04</text:p>
          </table:table-cell>
          <table:table-cell table:style-name="ce12N2" office:value-type="float" office:value="1710.45">
            <text:p>171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5431964997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8">
            <text:p>308558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482">
            <text:p>0,019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9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.33">
            <text:p>819,33</text:p>
          </table:table-cell>
          <table:table-cell table:style-name="ce12N2" office:value-type="float" office:value="98.32">
            <text:p>9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23159702000118550010000210401619827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1">
            <text:p>30856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91.43">
            <text:p>2629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4106.07">
            <text:p>24106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58025">
            <text:p>1,258</text:p>
          </table:table-cell>
          <table:table-cell table:style-name="ce12N2" office:value-type="float" office:value="933.36">
            <text:p>93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291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01.23">
            <text:p>21001,23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01">
            <text:p>189,01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2185.36">
            <text:p>2185,36</text:p>
          </table:table-cell>
          <table:table-cell table:style-name="ce12N2" office:value-type="float" office:value="24106.07">
            <text:p>24106,07</text:p>
          </table:table-cell>
          <table:table-cell table:style-name="ce12N2" office:value-type="float" office:value="964.24">
            <text:p>96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2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47415894009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2">
            <text:p>30856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8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2.75">
            <text:p>484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2.53">
            <text:p>4412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6">
            <text:p>0,005</text:p>
          </table:table-cell>
          <table:table-cell table:style-name="ce12N2" office:value-type="float" office:value="390">
            <text:p>3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42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36.03">
            <text:p>4236,03</text:p>
          </table:table-cell>
          <table:table-cell table:style-name="ce12N2" office:value-type="float" office:value="4.24">
            <text:p>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12">
            <text:p>38,1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30.22">
            <text:p>430,22</text:p>
          </table:table-cell>
          <table:table-cell table:style-name="ce12N2" office:value-type="float" office:value="4412.53">
            <text:p>4412,53</text:p>
          </table:table-cell>
          <table:table-cell table:style-name="ce12N2" office:value-type="float" office:value="176.5">
            <text:p>1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84751589447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65">
            <text:p>308565</text:p>
          </table:table-cell>
          <table:table-cell table:style-name="ce0" table:number-columns-spanned="4" table:number-rows-spanned="1" office:value-type="string" calcext:value-type="string">
            <text:p>7.661 - SEGURIMAX COM. AT. EQUIP. SEG. IMP. EXP</text:p>
          </table:table-cell>
          <table:covered-table-cell table:number-columns-repeated="3"/>
          <table:table-cell table:style-name="ce0" office:value-type="string" calcext:value-type="string">
            <text:p>183.7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32.33">
            <text:p>455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2983.85">
            <text:p>42983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217">
            <text:p>0,532</text:p>
          </table:table-cell>
          <table:table-cell table:style-name="ce12N2" office:value-type="float" office:value="676.81">
            <text:p>67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532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47.54">
            <text:p>37447,54</text:p>
          </table:table-cell>
          <table:table-cell table:style-name="ce12N2" office:value-type="float" office:value="37.45">
            <text:p>3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7.04">
            <text:p>337,0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2548.48">
            <text:p>2548,48</text:p>
          </table:table-cell>
          <table:table-cell table:style-name="ce12N2" office:value-type="float" office:value="42983.85">
            <text:p>42983,85</text:p>
          </table:table-cell>
          <table:table-cell table:style-name="ce12N2" office:value-type="float" office:value="1719.34">
            <text:p>171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79.33">
            <text:p>127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2.374</text:p>
          </table:table-cell>
          <table:table-cell table:style-name="ce0" office:value-type="string" calcext:value-type="string">
            <text:p>34.164 - TRANSPORTES MARLIM LTDA</text:p>
          </table:table-cell>
          <table:table-cell table:style-name="ce0" office:value-type="string" calcext:value-type="string">
            <text:p>01/06/2026</text:p>
          </table:table-cell>
          <table:table-cell table:style-name="ce12" office:value-type="string" calcext:value-type="string">
            <text:p>1.279,33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42260517011376000102550010001837351141562958</text:p>
          </table:table-cell>
          <table:table-cell table:style-name="ce0" office:value-type="string" calcext:value-type="string">
            <text:p>4226065815837200012057001000042374100042420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0">
            <text:p>3085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4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104">
            <text:p>0,371</text:p>
          </table:table-cell>
          <table:table-cell table:style-name="ce12N2" office:value-type="float" office:value="44.76">
            <text:p>44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8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97.76">
            <text:p>4397,76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58">
            <text:p>39,5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1">
            <text:p>4581,00</text:p>
          </table:table-cell>
          <table:table-cell table:style-name="ce12N2" office:value-type="float" office:value="183.24">
            <text:p>18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434816107621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2">
            <text:p>308582</text:p>
          </table:table-cell>
          <table:table-cell table:style-name="ce0" table:number-columns-spanned="4" table:number-rows-spanned="1" office:value-type="string" calcext:value-type="string">
            <text:p>629 - PLASTCOR DO BRASIL LTDA</text:p>
          </table:table-cell>
          <table:covered-table-cell table:number-columns-repeated="3"/>
          <table:table-cell table:style-name="ce0" office:value-type="string" calcext:value-type="string">
            <text:p>374.1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188.48">
            <text:p>5318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223574">
            <text:p>9,224</text:p>
          </table:table-cell>
          <table:table-cell table:style-name="ce12N2" office:value-type="float" office:value="1769.07">
            <text:p>1769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18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14.18">
            <text:p>43414,18</text:p>
          </table:table-cell>
          <table:table-cell table:style-name="ce12N2" office:value-type="float" office:value="43.42">
            <text:p>4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74">
            <text:p>390,74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860.04">
            <text:p>1860,04</text:p>
          </table:table-cell>
          <table:table-cell table:style-name="ce12N2" office:value-type="float" office:value="51328.44">
            <text:p>51328,44</text:p>
          </table:table-cell>
          <table:table-cell table:style-name="ce12N2" office:value-type="float" office:value="3489.09">
            <text:p>348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704457000138550040003741921627051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6">
            <text:p>3085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13">
            <text:p>118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72">
            <text:p>0,001</text:p>
          </table:table-cell>
          <table:table-cell table:style-name="ce12N2" office:value-type="float" office:value="2.33">
            <text:p>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0.76">
            <text:p>940,76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7">
            <text:p>8,4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2.45">
            <text:p>72,45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78.03">
            <text:p>7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218732195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8">
            <text:p>3085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90.93">
            <text:p>549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11.64">
            <text:p>11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9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1.36">
            <text:p>4351,36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6">
            <text:p>39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360.91">
            <text:p>36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01950915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9">
            <text:p>3085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9.6">
            <text:p>585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9.6">
            <text:p>585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8">
            <text:p>0,035</text:p>
          </table:table-cell>
          <table:table-cell table:style-name="ce12N2" office:value-type="float" office:value="37.8">
            <text:p>3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5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5.35">
            <text:p>4945,35</text:p>
          </table:table-cell>
          <table:table-cell table:style-name="ce12N2" office:value-type="float" office:value="4.95">
            <text:p>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51">
            <text:p>44,51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59.6">
            <text:p>5859,60</text:p>
          </table:table-cell>
          <table:table-cell table:style-name="ce12N2" office:value-type="float" office:value="410.17">
            <text:p>41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31547187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2">
            <text:p>3085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4.78">
            <text:p>272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58.48">
            <text:p>255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402">
            <text:p>0,017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9.3">
            <text:p>2159,30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3">
            <text:p>1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66.3">
            <text:p>166,30</text:p>
          </table:table-cell>
          <table:table-cell table:style-name="ce12N2" office:value-type="float" office:value="2558.48">
            <text:p>2558,48</text:p>
          </table:table-cell>
          <table:table-cell table:style-name="ce12N2" office:value-type="float" office:value="179.09">
            <text:p>17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71546314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3">
            <text:p>3085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79.73">
            <text:p>1127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79.73">
            <text:p>11279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9">
            <text:p>0,067</text:p>
          </table:table-cell>
          <table:table-cell table:style-name="ce12N2" office:value-type="float" office:value="72.77">
            <text:p>72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79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19.81">
            <text:p>9519,81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68">
            <text:p>85,6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79.73">
            <text:p>11279,73</text:p>
          </table:table-cell>
          <table:table-cell table:style-name="ce12N2" office:value-type="float" office:value="789.58">
            <text:p>78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516421766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5">
            <text:p>3085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3">
            <text:p>67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15">
            <text:p>63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42">
            <text:p>0,001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.36">
            <text:p>534,36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15">
            <text:p>633,15</text:p>
          </table:table-cell>
          <table:table-cell table:style-name="ce12N2" office:value-type="float" office:value="44.32">
            <text:p>4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81015902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08">
            <text:p>3086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60.6">
            <text:p>696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60.6">
            <text:p>696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776">
            <text:p>0,014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6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74.57">
            <text:p>5874,57</text:p>
          </table:table-cell>
          <table:table-cell table:style-name="ce12N2" office:value-type="float" office:value="5.87">
            <text:p>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87">
            <text:p>52,8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60.6">
            <text:p>6960,60</text:p>
          </table:table-cell>
          <table:table-cell table:style-name="ce12N2" office:value-type="float" office:value="487.24">
            <text:p>48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81481705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2">
            <text:p>308622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622.96">
            <text:p>262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2632.05">
            <text:p>2632,05</text:p>
          </table:table-cell>
          <table:table-cell table:style-name="ce12N2" office:value-type="float" office:value="184.24">
            <text:p>1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61852688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0">
            <text:p>3086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2.12">
            <text:p>73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7.44">
            <text:p>687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8">
            <text:p>0,001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.18">
            <text:p>580,18</text:p>
          </table:table-cell>
          <table:table-cell table:style-name="ce12N2" office:value-type="float" office:value="0.58">
            <text:p>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44.68">
            <text:p>44,68</text:p>
          </table:table-cell>
          <table:table-cell table:style-name="ce12N2" office:value-type="float" office:value="687.44">
            <text:p>687,44</text:p>
          </table:table-cell>
          <table:table-cell table:style-name="ce12N2" office:value-type="float" office:value="48.12">
            <text:p>4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61035126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1">
            <text:p>3086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90.93">
            <text:p>549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11.64">
            <text:p>11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9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51.36">
            <text:p>4351,36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16">
            <text:p>39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5155.8">
            <text:p>5155,80</text:p>
          </table:table-cell>
          <table:table-cell table:style-name="ce12N2" office:value-type="float" office:value="360.91">
            <text:p>36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91263814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3">
            <text:p>3086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2.74">
            <text:p>439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4.64">
            <text:p>41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088">
            <text:p>0,005</text:p>
          </table:table-cell>
          <table:table-cell table:style-name="ce12N2" office:value-type="float" office:value="9.31">
            <text:p>9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2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1.1">
            <text:p>3481,10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3">
            <text:p>31,3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268.1">
            <text:p>268,10</text:p>
          </table:table-cell>
          <table:table-cell table:style-name="ce12N2" office:value-type="float" office:value="4124.64">
            <text:p>4124,64</text:p>
          </table:table-cell>
          <table:table-cell table:style-name="ce12N2" office:value-type="float" office:value="288.72">
            <text:p>28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0710237443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7">
            <text:p>3086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2.32">
            <text:p>13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05">
            <text:p>0,004</text:p>
          </table:table-cell>
          <table:table-cell table:style-name="ce12N2" office:value-type="float" office:value="450">
            <text:p>4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4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73.32">
            <text:p>10573,32</text:p>
          </table:table-cell>
          <table:table-cell table:style-name="ce12N2" office:value-type="float" office:value="10.57">
            <text:p>1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.16">
            <text:p>95,16</text:p>
          </table:table-cell>
          <table:table-cell table:style-name="ce12N2" office:value-type="float" office:value="42.5">
            <text:p>42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814.32">
            <text:p>814,32</text:p>
          </table:table-cell>
          <table:table-cell table:style-name="ce12N2" office:value-type="float" office:value="12528">
            <text:p>12528,00</text:p>
          </table:table-cell>
          <table:table-cell table:style-name="ce12N2" office:value-type="float" office:value="876.96">
            <text:p>87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2817804288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8">
            <text:p>30866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2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18.31">
            <text:p>20018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246.13">
            <text:p>1824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2554">
            <text:p>1,426</text:p>
          </table:table-cell>
          <table:table-cell table:style-name="ce12N2" office:value-type="float" office:value="253.86">
            <text:p>253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18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99.27">
            <text:p>15399,27</text:p>
          </table:table-cell>
          <table:table-cell table:style-name="ce12N2" office:value-type="float" office:value="15.4">
            <text:p>1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6">
            <text:p>138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772.18">
            <text:p>1772,18</text:p>
          </table:table-cell>
          <table:table-cell table:style-name="ce12N2" office:value-type="float" office:value="18246.13">
            <text:p>18246,13</text:p>
          </table:table-cell>
          <table:table-cell table:style-name="ce12N2" office:value-type="float" office:value="1277.23">
            <text:p>127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2921570463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69">
            <text:p>308669</text:p>
          </table:table-cell>
          <table:table-cell table:style-name="ce0" table:number-columns-spanned="4" table:number-rows-spanned="1" office:value-type="string" calcext:value-type="string">
            <text:p>995 - LUMIBRAS INDUSTRIA METALURGICA LTDA</text:p>
          </table:table-cell>
          <table:covered-table-cell table:number-columns-repeated="3"/>
          <table:table-cell table:style-name="ce0" office:value-type="string" calcext:value-type="string">
            <text:p>87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67.65">
            <text:p>466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309.44">
            <text:p>4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956">
            <text:p>0,430</text:p>
          </table:table-cell>
          <table:table-cell table:style-name="ce12N2" office:value-type="float" office:value="114.75">
            <text:p>114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67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37.06">
            <text:p>3637,06</text:p>
          </table:table-cell>
          <table:table-cell table:style-name="ce12N2" office:value-type="float" office:value="3.64">
            <text:p>3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73">
            <text:p>32,73</text:p>
          </table:table-cell>
          <table:table-cell table:style-name="ce12N2" office:value-type="float" office:value="34.4">
            <text:p>34,4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58.21">
            <text:p>358,21</text:p>
          </table:table-cell>
          <table:table-cell table:style-name="ce12N2" office:value-type="float" office:value="4309.44">
            <text:p>4309,44</text:p>
          </table:table-cell>
          <table:table-cell table:style-name="ce12N2" office:value-type="float" office:value="301.67">
            <text:p>30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47711000184550010000875641058667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1">
            <text:p>3086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3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02.1">
            <text:p>260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489.8">
            <text:p>248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252">
            <text:p>0,032</text:p>
          </table:table-cell>
          <table:table-cell table:style-name="ce12N2" office:value-type="float" office:value="42.62">
            <text:p>4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0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48.36">
            <text:p>2148,36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33">
            <text:p>19,3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12.3">
            <text:p>112,30</text:p>
          </table:table-cell>
          <table:table-cell table:style-name="ce12N2" office:value-type="float" office:value="2489.8">
            <text:p>2489,80</text:p>
          </table:table-cell>
          <table:table-cell table:style-name="ce12N2" office:value-type="float" office:value="122.45">
            <text:p>12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3001586193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2">
            <text:p>3086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1.7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5.76">
            <text:p>351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76">
            <text:p>351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67.22">
            <text:p>2967,22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">
            <text:p>26,7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5.76">
            <text:p>3515,76</text:p>
          </table:table-cell>
          <table:table-cell table:style-name="ce12N2" office:value-type="float" office:value="246.1">
            <text:p>24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178918241979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4">
            <text:p>3086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1.7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51.35">
            <text:p>2515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073.63">
            <text:p>25073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229">
            <text:p>0,142</text:p>
          </table:table-cell>
          <table:table-cell table:style-name="ce12N2" office:value-type="float" office:value="157.66">
            <text:p>157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51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61.51">
            <text:p>21161,51</text:p>
          </table:table-cell>
          <table:table-cell table:style-name="ce12N2" office:value-type="float" office:value="21.16">
            <text:p>2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77.72">
            <text:p>77,72</text:p>
          </table:table-cell>
          <table:table-cell table:style-name="ce12N2" office:value-type="float" office:value="25073.63">
            <text:p>25073,63</text:p>
          </table:table-cell>
          <table:table-cell table:style-name="ce12N2" office:value-type="float" office:value="1755.15">
            <text:p>175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178819861788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85">
            <text:p>3086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1.7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02">
            <text:p>142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02">
            <text:p>142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44">
            <text:p>0,000</text:p>
          </table:table-cell>
          <table:table-cell table:style-name="ce12N2" office:value-type="float" office:value="1.94">
            <text:p>1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1.84">
            <text:p>1201,84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82">
            <text:p>10,8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02">
            <text:p>1424,02</text:p>
          </table:table-cell>
          <table:table-cell table:style-name="ce12N2" office:value-type="float" office:value="99.68">
            <text:p>9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17481522157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1">
            <text:p>308711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8.6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3303">
            <text:p>3,003</text:p>
          </table:table-cell>
          <table:table-cell table:style-name="ce12N2" office:value-type="float" office:value="379.94">
            <text:p>37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75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80.57">
            <text:p>36080,57</text:p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73">
            <text:p>324,7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2992.55">
            <text:p>299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86651322422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6">
            <text:p>30872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0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440.76">
            <text:p>764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034.63">
            <text:p>7403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1452">
            <text:p>9,145</text:p>
          </table:table-cell>
          <table:table-cell table:style-name="ce12N2" office:value-type="float" office:value="697.5">
            <text:p>69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44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483.38">
            <text:p>62483,38</text:p>
          </table:table-cell>
          <table:table-cell table:style-name="ce12N2" office:value-type="float" office:value="62.48">
            <text:p>6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2.35">
            <text:p>562,35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2406.13">
            <text:p>2406,13</text:p>
          </table:table-cell>
          <table:table-cell table:style-name="ce12N2" office:value-type="float" office:value="74034.63">
            <text:p>74034,63</text:p>
          </table:table-cell>
          <table:table-cell table:style-name="ce12N2" office:value-type="float" office:value="5182.42">
            <text:p>518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05551256120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7">
            <text:p>30872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0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0.5">
            <text:p>23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5.25">
            <text:p>231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46">
            <text:p>0,265</text:p>
          </table:table-cell>
          <table:table-cell table:style-name="ce12N2" office:value-type="float" office:value="54.6">
            <text:p>5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54.01">
            <text:p>1954,01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59">
            <text:p>17,59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75.25">
            <text:p>75,25</text:p>
          </table:table-cell>
          <table:table-cell table:style-name="ce12N2" office:value-type="float" office:value="2315.25">
            <text:p>2315,25</text:p>
          </table:table-cell>
          <table:table-cell table:style-name="ce12N2" office:value-type="float" office:value="162.07">
            <text:p>16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05541098736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4">
            <text:p>30873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6.5">
            <text:p>433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2">
            <text:p>0,000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44.69">
            <text:p>3544,69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36.5">
            <text:p>136,50</text:p>
          </table:table-cell>
          <table:table-cell table:style-name="ce12N2" office:value-type="float" office:value="4200">
            <text:p>4200,00</text:p>
          </table:table-cell>
          <table:table-cell table:style-name="ce12N2" office:value-type="float" office:value="294">
            <text:p>2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3631262305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46">
            <text:p>308746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4.2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6.04">
            <text:p>4346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346.04">
            <text:p>4346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5208">
            <text:p>0,815</text:p>
          </table:table-cell>
          <table:table-cell table:style-name="ce12N2" office:value-type="float" office:value="95.96">
            <text:p>95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46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85.25">
            <text:p>3685,25</text:p>
          </table:table-cell>
          <table:table-cell table:style-name="ce12N2" office:value-type="float" office:value="3.68">
            <text:p>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17">
            <text:p>33,1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46.04">
            <text:p>4346,04</text:p>
          </table:table-cell>
          <table:table-cell table:style-name="ce12N2" office:value-type="float" office:value="285.16">
            <text:p>28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723837000172550000006942871212476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4">
            <text:p>30875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7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1.2">
            <text:p>267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33.89">
            <text:p>243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77">
            <text:p>0,026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0.44">
            <text:p>2110,44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237.31">
            <text:p>237,31</text:p>
          </table:table-cell>
          <table:table-cell table:style-name="ce12N2" office:value-type="float" office:value="2433.89">
            <text:p>2433,89</text:p>
          </table:table-cell>
          <table:table-cell table:style-name="ce12N2" office:value-type="float" office:value="108.33">
            <text:p>1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7231581187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87">
            <text:p>308787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7.86">
            <text:p>568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896">
            <text:p>0,889</text:p>
          </table:table-cell>
          <table:table-cell table:style-name="ce12N2" office:value-type="float" office:value="245.6">
            <text:p>24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8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34.6">
            <text:p>4734,60</text:p>
          </table:table-cell>
          <table:table-cell table:style-name="ce12N2" office:value-type="float" office:value="4.73">
            <text:p>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61">
            <text:p>42,61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5547.3">
            <text:p>5547,30</text:p>
          </table:table-cell>
          <table:table-cell table:style-name="ce12N2" office:value-type="float" office:value="330.11">
            <text:p>33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2651607305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3">
            <text:p>308793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1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4.5">
            <text:p>44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1681840811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4">
            <text:p>30879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71.0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33772">
            <text:p>15,338</text:p>
          </table:table-cell>
          <table:table-cell table:style-name="ce12N2" office:value-type="float" office:value="4014.56">
            <text:p>40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28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002.86">
            <text:p>153002,86</text:p>
          </table:table-cell>
          <table:table-cell table:style-name="ce12N2" office:value-type="float" office:value="153.05">
            <text:p>15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.02">
            <text:p>1377,0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288.4">
            <text:p>181288,40</text:p>
          </table:table-cell>
          <table:table-cell table:style-name="ce12N2" office:value-type="float" office:value="12690.21">
            <text:p>1269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7101419589447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7">
            <text:p>30879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4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5.57">
            <text:p>3525,57</text:p>
          </table:table-cell>
          <table:table-cell table:style-name="ce12N2" office:value-type="float" office:value="228.84">
            <text:p>228,84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1.2">
            <text:p>344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32">
            <text:p>0,362</text:p>
          </table:table-cell>
          <table:table-cell table:style-name="ce12N2" office:value-type="float" office:value="89.6">
            <text:p>8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8.62">
            <text:p>2798,62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19">
            <text:p>25,19</text:p>
          </table:table-cell>
          <table:table-cell table:style-name="ce12N2" office:value-type="float" office:value="79.02">
            <text:p>79,0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313.21">
            <text:p>313,21</text:p>
          </table:table-cell>
          <table:table-cell table:style-name="ce12N2" office:value-type="float" office:value="3212.36">
            <text:p>3212,36</text:p>
          </table:table-cell>
          <table:table-cell table:style-name="ce12N2" office:value-type="float" office:value="128.49">
            <text:p>12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45721583825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8">
            <text:p>30879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625">
            <text:p>12,863</text:p>
          </table:table-cell>
          <table:table-cell table:style-name="ce12N2" office:value-type="float" office:value="8015">
            <text:p>80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71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306.2">
            <text:p>37306,20</text:p>
          </table:table-cell>
          <table:table-cell table:style-name="ce12N2" office:value-type="float" office:value="37.31">
            <text:p>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76">
            <text:p>335,76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714.5">
            <text:p>46714,50</text:p>
          </table:table-cell>
          <table:table-cell table:style-name="ce12N2" office:value-type="float" office:value="5605.74">
            <text:p>560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1141767568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99">
            <text:p>30879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35">
            <text:p>1093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35">
            <text:p>1093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12">
            <text:p>6,120</text:p>
          </table:table-cell>
          <table:table-cell table:style-name="ce12N2" office:value-type="float" office:value="1740">
            <text:p>17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93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32.69">
            <text:p>8732,69</text:p>
          </table:table-cell>
          <table:table-cell table:style-name="ce12N2" office:value-type="float" office:value="8.73">
            <text:p>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.59">
            <text:p>78,59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35">
            <text:p>10935,00</text:p>
          </table:table-cell>
          <table:table-cell table:style-name="ce12N2" office:value-type="float" office:value="1312.2">
            <text:p>13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3171745098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00">
            <text:p>30880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25">
            <text:p>182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25">
            <text:p>182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2">
            <text:p>10,200</text:p>
          </table:table-cell>
          <table:table-cell table:style-name="ce12N2" office:value-type="float" office:value="2900">
            <text:p>29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22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54.48">
            <text:p>14554,48</text:p>
          </table:table-cell>
          <table:table-cell table:style-name="ce12N2" office:value-type="float" office:value="14.55">
            <text:p>1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99">
            <text:p>130,99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25">
            <text:p>18225,00</text:p>
          </table:table-cell>
          <table:table-cell table:style-name="ce12N2" office:value-type="float" office:value="2187">
            <text:p>218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31818792443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7">
            <text:p>308837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1.0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4.17">
            <text:p>61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4.84">
            <text:p>59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2">
            <text:p>1,920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9.33">
            <text:p>19,33</text:p>
          </table:table-cell>
          <table:table-cell table:style-name="ce12N2" office:value-type="float" office:value="594.84">
            <text:p>594,84</text:p>
          </table:table-cell>
          <table:table-cell table:style-name="ce12N2" office:value-type="float" office:value="41.64">
            <text:p>4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980200012255001000051002116624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5">
            <text:p>30884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6.5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353.04">
            <text:p>3435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353.04">
            <text:p>3435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522048">
            <text:p>6,522</text:p>
          </table:table-cell>
          <table:table-cell table:style-name="ce12N2" office:value-type="float" office:value="1004.79">
            <text:p>100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35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28.35">
            <text:p>29928,35</text:p>
          </table:table-cell>
          <table:table-cell table:style-name="ce12N2" office:value-type="float" office:value="29.93">
            <text:p>2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9.35">
            <text:p>269,3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353.04">
            <text:p>34353,04</text:p>
          </table:table-cell>
          <table:table-cell table:style-name="ce12N2" office:value-type="float" office:value="1374.13">
            <text:p>137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6590140629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4">
            <text:p>308854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553">
            <text:p>41,553</text:p>
          </table:table-cell>
          <table:table-cell table:style-name="ce12N2" office:value-type="float" office:value="1056">
            <text:p>105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81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17.6">
            <text:p>15817,60</text:p>
          </table:table-cell>
          <table:table-cell table:style-name="ce12N2" office:value-type="float" office:value="604.23">
            <text:p>60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7921865934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7">
            <text:p>308857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1.69788">
            <text:p>61,698</text:p>
          </table:table-cell>
          <table:table-cell table:style-name="ce12N2" office:value-type="float" office:value="838">
            <text:p>8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1.4">
            <text:p>11691,40</text:p>
          </table:table-cell>
          <table:table-cell table:style-name="ce12N2" office:value-type="float" office:value="446.61">
            <text:p>4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7911691318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9">
            <text:p>308859</text:p>
          </table:table-cell>
          <table:table-cell table:style-name="ce0" table:number-columns-spanned="4" table:number-rows-spanned="1" office:value-type="string" calcext:value-type="string">
            <text:p>36.654 - AZIMUT ALUMINIOS LTDA</text:p>
          </table:table-cell>
          <table:covered-table-cell table:number-columns-repeated="3"/>
          <table:table-cell table:style-name="ce0" office:value-type="string" calcext:value-type="string">
            <text:p>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3556">
            <text:p>16,836</text:p>
          </table:table-cell>
          <table:table-cell table:style-name="ce12N2" office:value-type="float" office:value="894.4">
            <text:p>89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83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47.59">
            <text:p>28447,59</text:p>
          </table:table-cell>
          <table:table-cell table:style-name="ce12N2" office:value-type="float" office:value="28.44">
            <text:p>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03">
            <text:p>256,0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838.38">
            <text:p>31838,38</text:p>
          </table:table-cell>
          <table:table-cell table:style-name="ce12N2" office:value-type="float" office:value="2228.7">
            <text:p>222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49210001585500100000011818179521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0">
            <text:p>308860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5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51.5">
            <text:p>1635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38128">
            <text:p>0,638</text:p>
          </table:table-cell>
          <table:table-cell table:style-name="ce12N2" office:value-type="float" office:value="697.13">
            <text:p>697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5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65.86">
            <text:p>13365,86</text:p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29">
            <text:p>120,29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514.7">
            <text:p>514,70</text:p>
          </table:table-cell>
          <table:table-cell table:style-name="ce12N2" office:value-type="float" office:value="15836.8">
            <text:p>15836,80</text:p>
          </table:table-cell>
          <table:table-cell table:style-name="ce12N2" office:value-type="float" office:value="1108.58">
            <text:p>11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5431802276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3">
            <text:p>308863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4.431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314">
            <text:p>8831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7215.66">
            <text:p>8721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084198">
            <text:p>50,084</text:p>
          </table:table-cell>
          <table:table-cell table:style-name="ce12N2" office:value-type="float" office:value="28862.81">
            <text:p>28862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31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07.83">
            <text:p>73607,83</text:p>
          </table:table-cell>
          <table:table-cell table:style-name="ce12N2" office:value-type="float" office:value="73.6">
            <text:p>7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2.47">
            <text:p>662,47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098.34">
            <text:p>1098,34</text:p>
          </table:table-cell>
          <table:table-cell table:style-name="ce12N2" office:value-type="float" office:value="87215.66">
            <text:p>87215,66</text:p>
          </table:table-cell>
          <table:table-cell table:style-name="ce12N2" office:value-type="float" office:value="6105.09">
            <text:p>610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44311884119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4">
            <text:p>30886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7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0.7">
            <text:p>146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88.5">
            <text:p>138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">
            <text:p>0,010</text:p>
          </table:table-cell>
          <table:table-cell table:style-name="ce12N2" office:value-type="float" office:value="0.02">
            <text:p>0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1.85">
            <text:p>1171,8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72.2">
            <text:p>72,20</text:p>
          </table:table-cell>
          <table:table-cell table:style-name="ce12N2" office:value-type="float" office:value="1388.5">
            <text:p>1388,50</text:p>
          </table:table-cell>
          <table:table-cell table:style-name="ce12N2" office:value-type="float" office:value="97.2">
            <text:p>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74291100002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65">
            <text:p>30886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4.36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5252">
            <text:p>12,525</text:p>
          </table:table-cell>
          <table:table-cell table:style-name="ce12N2" office:value-type="float" office:value="2875.3">
            <text:p>287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59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732.5">
            <text:p>58732,50</text:p>
          </table:table-cell>
          <table:table-cell table:style-name="ce12N2" office:value-type="float" office:value="58.74">
            <text:p>5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8.59">
            <text:p>528,5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90.32">
            <text:p>69590,32</text:p>
          </table:table-cell>
          <table:table-cell table:style-name="ce12N2" office:value-type="float" office:value="4871.32">
            <text:p>487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43601662398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1">
            <text:p>308871</text:p>
          </table:table-cell>
          <table:table-cell table:style-name="ce0" table:number-columns-spanned="4" table:number-rows-spanned="1" office:value-type="string" calcext:value-type="string">
            <text:p>37.660 - BF LIMP COMERCIO DE PRODUTOS DE HIGIENE E LIMPEZA LTDA</text:p>
          </table:table-cell>
          <table:covered-table-cell table:number-columns-repeated="3"/>
          <table:table-cell table:style-name="ce0" office:value-type="string" calcext:value-type="string">
            <text:p>2.2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535">
            <text:p>0,074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2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21.31">
            <text:p>5421,31</text:p>
          </table:table-cell>
          <table:table-cell table:style-name="ce12N2" office:value-type="float" office:value="5.42">
            <text:p>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79">
            <text:p>48,7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21.2">
            <text:p>6021,20</text:p>
          </table:table-cell>
          <table:table-cell table:style-name="ce12N2" office:value-type="float" office:value="421.49">
            <text:p>42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7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24101070001655500100000228817357780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2">
            <text:p>308872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9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65">
            <text:p>482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9">
            <text:p>0,210</text:p>
          </table:table-cell>
          <table:table-cell table:style-name="ce12N2" office:value-type="float" office:value="110">
            <text:p>1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5.59">
            <text:p>4115,59</text:p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4">
            <text:p>37,04</text:p>
          </table:table-cell>
          <table:table-cell table:style-name="ce12N2" office:value-type="float" office:value="41.33">
            <text:p>4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9.65">
            <text:p>229,65</text:p>
          </table:table-cell>
          <table:table-cell table:style-name="ce12N2" office:value-type="float" office:value="4593">
            <text:p>4593,00</text:p>
          </table:table-cell>
          <table:table-cell table:style-name="ce12N2" office:value-type="float" office:value="321.51">
            <text:p>32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45123710000147550010000139181192001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75">
            <text:p>30887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0.2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99.32">
            <text:p>349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358">
            <text:p>0,230</text:p>
          </table:table-cell>
          <table:table-cell table:style-name="ce12N2" office:value-type="float" office:value="44.71">
            <text:p>44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9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5.1">
            <text:p>2845,10</text:p>
          </table:table-cell>
          <table:table-cell table:style-name="ce12N2" office:value-type="float" office:value="2.84">
            <text:p>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6">
            <text:p>25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28.25">
            <text:p>128,25</text:p>
          </table:table-cell>
          <table:table-cell table:style-name="ce12N2" office:value-type="float" office:value="3371.07">
            <text:p>3371,07</text:p>
          </table:table-cell>
          <table:table-cell table:style-name="ce12N2" office:value-type="float" office:value="235.98">
            <text:p>23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020915704022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0">
            <text:p>308880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3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0.36">
            <text:p>713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05.92">
            <text:p>690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9">
            <text:p>0,006</text:p>
          </table:table-cell>
          <table:table-cell table:style-name="ce12N2" office:value-type="float" office:value="9.67">
            <text:p>9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30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28.43">
            <text:p>5828,43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46">
            <text:p>52,46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24.44">
            <text:p>224,44</text:p>
          </table:table-cell>
          <table:table-cell table:style-name="ce12N2" office:value-type="float" office:value="6905.92">
            <text:p>6905,92</text:p>
          </table:table-cell>
          <table:table-cell table:style-name="ce12N2" office:value-type="float" office:value="483.41">
            <text:p>48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837457000187550010003639211347884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1">
            <text:p>3088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7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6">
            <text:p>0,037</text:p>
          </table:table-cell>
          <table:table-cell table:style-name="ce12N2" office:value-type="float" office:value="30.44">
            <text:p>3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0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8">
            <text:p>14858,00</text:p>
          </table:table-cell>
          <table:table-cell table:style-name="ce12N2" office:value-type="float" office:value="14.86">
            <text:p>1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72">
            <text:p>133,7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04.8">
            <text:p>17604,80</text:p>
          </table:table-cell>
          <table:table-cell table:style-name="ce12N2" office:value-type="float" office:value="1232.34">
            <text:p>123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7761899421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3">
            <text:p>3088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7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6">
            <text:p>0,037</text:p>
          </table:table-cell>
          <table:table-cell table:style-name="ce12N2" office:value-type="float" office:value="30.44">
            <text:p>3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67.4">
            <text:p>14867,40</text:p>
          </table:table-cell>
          <table:table-cell table:style-name="ce12N2" office:value-type="float" office:value="14.87">
            <text:p>1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81">
            <text:p>133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616">
            <text:p>17616,00</text:p>
          </table:table-cell>
          <table:table-cell table:style-name="ce12N2" office:value-type="float" office:value="1233.12">
            <text:p>12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77514208986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4">
            <text:p>30888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5.2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6528">
            <text:p>0,457</text:p>
          </table:table-cell>
          <table:table-cell table:style-name="ce12N2" office:value-type="float" office:value="30.61">
            <text:p>3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8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67.2">
            <text:p>6067,20</text:p>
          </table:table-cell>
          <table:table-cell table:style-name="ce12N2" office:value-type="float" office:value="6.07">
            <text:p>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61">
            <text:p>54,6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88.84">
            <text:p>7188,84</text:p>
          </table:table-cell>
          <table:table-cell table:style-name="ce12N2" office:value-type="float" office:value="503.22">
            <text:p>50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6523216045027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5">
            <text:p>308885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8.7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5">
            <text:p>0,172</text:p>
          </table:table-cell>
          <table:table-cell table:style-name="ce12N2" office:value-type="float" office:value="13.7">
            <text:p>1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8.43">
            <text:p>998,4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3">
            <text:p>1183,00</text:p>
          </table:table-cell>
          <table:table-cell table:style-name="ce12N2" office:value-type="float" office:value="82.81">
            <text:p>8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8725157429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9">
            <text:p>308889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9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378">
            <text:p>3,384</text:p>
          </table:table-cell>
          <table:table-cell table:style-name="ce12N2" office:value-type="float" office:value="2932">
            <text:p>29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1.96">
            <text:p>17391,96</text:p>
          </table:table-cell>
          <table:table-cell table:style-name="ce12N2" office:value-type="float" office:value="17.39">
            <text:p>1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53">
            <text:p>156,5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1442.5">
            <text:p>14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199231897214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90">
            <text:p>308890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3.2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339.71">
            <text:p>9033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90126.08">
            <text:p>9012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973526">
            <text:p>19,974</text:p>
          </table:table-cell>
          <table:table-cell table:style-name="ce12N2" office:value-type="float" office:value="21843">
            <text:p>218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.33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064.16">
            <text:p>76064,16</text:p>
          </table:table-cell>
          <table:table-cell table:style-name="ce12N2" office:value-type="float" office:value="76.05">
            <text:p>7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4.56">
            <text:p>684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213.63">
            <text:p>213,63</text:p>
          </table:table-cell>
          <table:table-cell table:style-name="ce12N2" office:value-type="float" office:value="90126.08">
            <text:p>90126,08</text:p>
          </table:table-cell>
          <table:table-cell table:style-name="ce12N2" office:value-type="float" office:value="6308.83">
            <text:p>630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32731391091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91">
            <text:p>3088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5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3.42">
            <text:p>468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36">
            <text:p>4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28">
            <text:p>0,152</text:p>
          </table:table-cell>
          <table:table-cell table:style-name="ce12N2" office:value-type="float" office:value="19.44">
            <text:p>19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8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28.28">
            <text:p>3828,28</text:p>
          </table:table-cell>
          <table:table-cell table:style-name="ce12N2" office:value-type="float" office:value="3.83">
            <text:p>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45">
            <text:p>34,45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47.42">
            <text:p>147,42</text:p>
          </table:table-cell>
          <table:table-cell table:style-name="ce12N2" office:value-type="float" office:value="4536">
            <text:p>4536,00</text:p>
          </table:table-cell>
          <table:table-cell table:style-name="ce12N2" office:value-type="float" office:value="317.52">
            <text:p>3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5591099196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5">
            <text:p>3089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30.16">
            <text:p>1033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05">
            <text:p>1000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43">
            <text:p>0,324</text:p>
          </table:table-cell>
          <table:table-cell table:style-name="ce12N2" office:value-type="float" office:value="41.4">
            <text:p>4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3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43.97">
            <text:p>8443,97</text:p>
          </table:table-cell>
          <table:table-cell table:style-name="ce12N2" office:value-type="float" office:value="8.44">
            <text:p>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">
            <text:p>76,00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25.16">
            <text:p>325,16</text:p>
          </table:table-cell>
          <table:table-cell table:style-name="ce12N2" office:value-type="float" office:value="10005">
            <text:p>10005,00</text:p>
          </table:table-cell>
          <table:table-cell table:style-name="ce12N2" office:value-type="float" office:value="700.35">
            <text:p>70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4210398455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6">
            <text:p>3089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5.15">
            <text:p>461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257.6">
            <text:p>425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26">
            <text:p>0,091</text:p>
          </table:table-cell>
          <table:table-cell table:style-name="ce12N2" office:value-type="float" office:value="9.2">
            <text:p>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15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3.32">
            <text:p>3593,32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3">
            <text:p>32,3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57.55">
            <text:p>357,55</text:p>
          </table:table-cell>
          <table:table-cell table:style-name="ce12N2" office:value-type="float" office:value="4257.6">
            <text:p>4257,60</text:p>
          </table:table-cell>
          <table:table-cell table:style-name="ce12N2" office:value-type="float" office:value="298.03">
            <text:p>29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411195200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7">
            <text:p>30895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5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9.62">
            <text:p>363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403.4">
            <text:p>340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894">
            <text:p>0,059</text:p>
          </table:table-cell>
          <table:table-cell table:style-name="ce12N2" office:value-type="float" office:value="10.77">
            <text:p>1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3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72.37">
            <text:p>2872,37</text:p>
          </table:table-cell>
          <table:table-cell table:style-name="ce12N2" office:value-type="float" office:value="2.87">
            <text:p>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84">
            <text:p>25,8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236.22">
            <text:p>236,22</text:p>
          </table:table-cell>
          <table:table-cell table:style-name="ce12N2" office:value-type="float" office:value="3403.4">
            <text:p>3403,40</text:p>
          </table:table-cell>
          <table:table-cell table:style-name="ce12N2" office:value-type="float" office:value="238.24">
            <text:p>23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5561303922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9">
            <text:p>30895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0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46.4">
            <text:p>2074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93.36">
            <text:p>2009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16.0124">
            <text:p>8016,012</text:p>
          </table:table-cell>
          <table:table-cell table:style-name="ce12N2" office:value-type="float" office:value="841.6">
            <text:p>84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74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8.29">
            <text:p>16958,29</text:p>
          </table:table-cell>
          <table:table-cell table:style-name="ce12N2" office:value-type="float" office:value="16.96">
            <text:p>1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63">
            <text:p>152,6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653.04">
            <text:p>653,04</text:p>
          </table:table-cell>
          <table:table-cell table:style-name="ce12N2" office:value-type="float" office:value="20093.36">
            <text:p>20093,36</text:p>
          </table:table-cell>
          <table:table-cell table:style-name="ce12N2" office:value-type="float" office:value="1406.54">
            <text:p>140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0520158161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0">
            <text:p>308960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38.68">
            <text:p>703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56">
            <text:p>0,032</text:p>
          </table:table-cell>
          <table:table-cell table:style-name="ce12N2" office:value-type="float" office:value="264.08">
            <text:p>26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3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95.82">
            <text:p>6295,82</text:p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66">
            <text:p>56,66</text:p>
          </table:table-cell>
          <table:table-cell table:style-name="ce12N2" office:value-type="float" office:value="44.97">
            <text:p>44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.52">
            <text:p>12,52</text:p>
          </table:table-cell>
          <table:table-cell table:style-name="ce12N2" office:value-type="float" office:value="7026.16">
            <text:p>7026,16</text:p>
          </table:table-cell>
          <table:table-cell table:style-name="ce12N2" office:value-type="float" office:value="491.84">
            <text:p>49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204129000106550010001419651121064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1">
            <text:p>308961</text:p>
          </table:table-cell>
          <table:table-cell table:style-name="ce0" table:number-columns-spanned="4" table:number-rows-spanned="1" office:value-type="string" calcext:value-type="string">
            <text:p>1.634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239.6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71.95">
            <text:p>787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82.84">
            <text:p>748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75">
            <text:p>0,068</text:p>
          </table:table-cell>
          <table:table-cell table:style-name="ce12N2" office:value-type="float" office:value="49.44">
            <text:p>49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71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19.05">
            <text:p>6519,05</text:p>
          </table:table-cell>
          <table:table-cell table:style-name="ce12N2" office:value-type="float" office:value="6.52">
            <text:p>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67">
            <text:p>58,6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389.11">
            <text:p>389,11</text:p>
          </table:table-cell>
          <table:table-cell table:style-name="ce12N2" office:value-type="float" office:value="7482.84">
            <text:p>7482,84</text:p>
          </table:table-cell>
          <table:table-cell table:style-name="ce12N2" office:value-type="float" office:value="299.31">
            <text:p>29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45865920000615550030002396021282265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3">
            <text:p>308963</text:p>
          </table:table-cell>
          <table:table-cell table:style-name="ce0" table:number-columns-spanned="4" table:number-rows-spanned="1" office:value-type="string" calcext:value-type="string">
            <text:p>14.587 - GFC INDUSTRIA E COMERCIO TUBOS E CONEXOES LTDA</text:p>
          </table:table-cell>
          <table:covered-table-cell table:number-columns-repeated="3"/>
          <table:table-cell table:style-name="ce0" office:value-type="string" calcext:value-type="string">
            <text:p>115.09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64.66">
            <text:p>8156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8997.24">
            <text:p>7899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747536">
            <text:p>17,748</text:p>
          </table:table-cell>
          <table:table-cell table:style-name="ce12N2" office:value-type="float" office:value="7346.29">
            <text:p>7346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56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671.68">
            <text:p>66671,68</text:p>
          </table:table-cell>
          <table:table-cell table:style-name="ce12N2" office:value-type="float" office:value="66.67">
            <text:p>66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0.04">
            <text:p>600,04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2567.42">
            <text:p>2567,42</text:p>
          </table:table-cell>
          <table:table-cell table:style-name="ce12N2" office:value-type="float" office:value="78997.24">
            <text:p>78997,24</text:p>
          </table:table-cell>
          <table:table-cell table:style-name="ce12N2" office:value-type="float" office:value="5529.81">
            <text:p>552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33881000160550000001150971836501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68">
            <text:p>308968</text:p>
          </table:table-cell>
          <table:table-cell table:style-name="ce0" table:number-columns-spanned="4" table:number-rows-spanned="1" office:value-type="string" calcext:value-type="string">
            <text:p>5.002 - ELETRICA DANUBIO IND E COM DE MAT ELET LTDA</text:p>
          </table:table-cell>
          <table:covered-table-cell table:number-columns-repeated="3"/>
          <table:table-cell table:style-name="ce0" office:value-type="string" calcext:value-type="string">
            <text:p>488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300">
            <text:p>8300,000</text:p>
          </table:table-cell>
          <table:table-cell table:style-name="ce12N2" office:value-type="float" office:value="1460.8">
            <text:p>146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7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789.88">
            <text:p>17789,88</text:p>
          </table:table-cell>
          <table:table-cell table:style-name="ce12N2" office:value-type="float" office:value="17.79">
            <text:p>1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11">
            <text:p>160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078.68">
            <text:p>21078,68</text:p>
          </table:table-cell>
          <table:table-cell table:style-name="ce12N2" office:value-type="float" office:value="1475.51">
            <text:p>147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3102560001905500100048883511893283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2">
            <text:p>3089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0.7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52">
            <text:p>4415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52">
            <text:p>4415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4">
            <text:p>0,139</text:p>
          </table:table-cell>
          <table:table-cell table:style-name="ce12N2" office:value-type="float" office:value="76.4">
            <text:p>7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15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263">
            <text:p>37263,00</text:p>
          </table:table-cell>
          <table:table-cell table:style-name="ce12N2" office:value-type="float" office:value="37.26">
            <text:p>3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37">
            <text:p>335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52">
            <text:p>44152,00</text:p>
          </table:table-cell>
          <table:table-cell table:style-name="ce12N2" office:value-type="float" office:value="3090.64">
            <text:p>309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07281091418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3">
            <text:p>30897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5.3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4.72">
            <text:p>9214,72</text:p>
          </table:table-cell>
          <table:table-cell table:style-name="ce12N2" office:value-type="float" office:value="441.9">
            <text:p>441,9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38">
            <text:p>88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3445">
            <text:p>0,803</text:p>
          </table:table-cell>
          <table:table-cell table:style-name="ce12N2" office:value-type="float" office:value="312">
            <text:p>3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1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14.69">
            <text:p>7314,69</text:p>
          </table:table-cell>
          <table:table-cell table:style-name="ce12N2" office:value-type="float" office:value="7.32">
            <text:p>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83">
            <text:p>65,83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18.62">
            <text:p>818,62</text:p>
          </table:table-cell>
          <table:table-cell table:style-name="ce12N2" office:value-type="float" office:value="8396.1">
            <text:p>8396,10</text:p>
          </table:table-cell>
          <table:table-cell table:style-name="ce12N2" office:value-type="float" office:value="335.85">
            <text:p>33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530510808738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6">
            <text:p>308976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6.056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899.97">
            <text:p>4089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40772.96">
            <text:p>4077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41555">
            <text:p>2,942</text:p>
          </table:table-cell>
          <table:table-cell table:style-name="ce12N2" office:value-type="float" office:value="310.78">
            <text:p>31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899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21.4">
            <text:p>35521,40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9">
            <text:p>319,6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27.01">
            <text:p>127,01</text:p>
          </table:table-cell>
          <table:table-cell table:style-name="ce12N2" office:value-type="float" office:value="40772.96">
            <text:p>40772,96</text:p>
          </table:table-cell>
          <table:table-cell table:style-name="ce12N2" office:value-type="float" office:value="1630.92">
            <text:p>163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2741051000185550550003060561455871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7">
            <text:p>30897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5.4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9.37">
            <text:p>5439,37</text:p>
          </table:table-cell>
          <table:table-cell table:style-name="ce12N2" office:value-type="float" office:value="260.85">
            <text:p>260,85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17">
            <text:p>52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9598">
            <text:p>4,696</text:p>
          </table:table-cell>
          <table:table-cell table:style-name="ce12N2" office:value-type="float" office:value="223">
            <text:p>22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7.79">
            <text:p>4317,79</text:p>
          </table:table-cell>
          <table:table-cell table:style-name="ce12N2" office:value-type="float" office:value="4.32">
            <text:p>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6">
            <text:p>38,86</text:p>
          </table:table-cell>
          <table:table-cell table:style-name="ce12N2" office:value-type="float" office:value="96.58">
            <text:p>96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483.22">
            <text:p>483,22</text:p>
          </table:table-cell>
          <table:table-cell table:style-name="ce12N2" office:value-type="float" office:value="4956.15">
            <text:p>4956,15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54411354541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9">
            <text:p>308979</text:p>
          </table:table-cell>
          <table:table-cell table:style-name="ce0" table:number-columns-spanned="4" table:number-rows-spanned="1" office:value-type="string" calcext:value-type="string">
            <text:p>977 - POLIERG INDUSTRIA E COMERCIO LTDA</text:p>
          </table:table-cell>
          <table:covered-table-cell table:number-columns-repeated="3"/>
          <table:table-cell table:style-name="ce0" office:value-type="string" calcext:value-type="string">
            <text:p>120.7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30">
            <text:p>164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85">
            <text:p>0,408</text:p>
          </table:table-cell>
          <table:table-cell table:style-name="ce12N2" office:value-type="float" office:value="409.5">
            <text:p>40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66.1">
            <text:p>14066,10</text:p>
          </table:table-cell>
          <table:table-cell table:style-name="ce12N2" office:value-type="float" office:value="14.07">
            <text:p>1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6">
            <text:p>126,6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88.1">
            <text:p>13288,10</text:p>
          </table:table-cell>
          <table:table-cell table:style-name="ce12N2" office:value-type="float" office:value="930.17">
            <text:p>93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010717000152550030001207581079396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92">
            <text:p>308992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6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166.42">
            <text:p>4516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166.42">
            <text:p>4516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967541">
            <text:p>10,968</text:p>
          </table:table-cell>
          <table:table-cell table:style-name="ce12N2" office:value-type="float" office:value="10121.27">
            <text:p>10121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166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69.9">
            <text:p>36069,90</text:p>
          </table:table-cell>
          <table:table-cell table:style-name="ce12N2" office:value-type="float" office:value="36.07">
            <text:p>3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63">
            <text:p>324,6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166.42">
            <text:p>45166,42</text:p>
          </table:table-cell>
          <table:table-cell table:style-name="ce12N2" office:value-type="float" office:value="5419.97">
            <text:p>54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079339140001545500100086631910219240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95">
            <text:p>30899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4.297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27">
            <text:p>9227,00</text:p>
          </table:table-cell>
          <table:table-cell table:style-name="ce12N2" office:value-type="float" office:value="309.92">
            <text:p>309,9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36.92">
            <text:p>9536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0928">
            <text:p>14,093</text:p>
          </table:table-cell>
          <table:table-cell table:style-name="ce12N2" office:value-type="float" office:value="18000">
            <text:p>1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2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8.8">
            <text:p>6698,80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29">
            <text:p>60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27">
            <text:p>9227,00</text:p>
          </table:table-cell>
          <table:table-cell table:style-name="ce12N2" office:value-type="float" office:value="1845.4">
            <text:p>184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1637895007498550060014542971371065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96">
            <text:p>308996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4.29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6">
            <text:p>13016,00</text:p>
          </table:table-cell>
          <table:table-cell table:style-name="ce12N2" office:value-type="float" office:value="437.17">
            <text:p>437,17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52.55">
            <text:p>12952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64">
            <text:p>15,640</text:p>
          </table:table-cell>
          <table:table-cell table:style-name="ce12N2" office:value-type="float" office:value="20000">
            <text:p>2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86.16">
            <text:p>9086,16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.78">
            <text:p>81,78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15.38">
            <text:p>12515,38</text:p>
          </table:table-cell>
          <table:table-cell table:style-name="ce12N2" office:value-type="float" office:value="2503.08">
            <text:p>250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018.46">
            <text:p>15018,46</text:p>
          </table:table-cell>
          <table:table-cell table:style-name="ce12N2" office:value-type="float" office:value="500.62">
            <text:p>500,62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16378950074985500600145429817109550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4">
            <text:p>3090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9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800.5">
            <text:p>6980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67530.76">
            <text:p>6753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05312">
            <text:p>2,405</text:p>
          </table:table-cell>
          <table:table-cell table:style-name="ce12N2" office:value-type="float" office:value="831.62">
            <text:p>83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80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221.73">
            <text:p>57221,73</text:p>
          </table:table-cell>
          <table:table-cell table:style-name="ce12N2" office:value-type="float" office:value="57.21">
            <text:p>5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5">
            <text:p>515,0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2269.74">
            <text:p>2269,74</text:p>
          </table:table-cell>
          <table:table-cell table:style-name="ce12N2" office:value-type="float" office:value="67530.76">
            <text:p>67530,76</text:p>
          </table:table-cell>
          <table:table-cell table:style-name="ce12N2" office:value-type="float" office:value="4476.54">
            <text:p>447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197161568557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0">
            <text:p>309020</text:p>
          </table:table-cell>
          <table:table-cell table:style-name="ce0" table:number-columns-spanned="4" table:number-rows-spanned="1" office:value-type="string" calcext:value-type="string">
            <text:p>699 - INDUSTRIA DE TELAS METALICAS MM LTDA</text:p>
          </table:table-cell>
          <table:covered-table-cell table:number-columns-repeated="3"/>
          <table:table-cell table:style-name="ce0" office:value-type="string" calcext:value-type="string">
            <text:p>164.8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4.2">
            <text:p>244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3978">
            <text:p>239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17748">
            <text:p>2,918</text:p>
          </table:table-cell>
          <table:table-cell table:style-name="ce12N2" office:value-type="float" office:value="1087.72">
            <text:p>108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7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485.6">
            <text:p>21485,60</text:p>
          </table:table-cell>
          <table:table-cell table:style-name="ce12N2" office:value-type="float" office:value="21.49">
            <text:p>2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.37">
            <text:p>193,37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496.2">
            <text:p>496,20</text:p>
          </table:table-cell>
          <table:table-cell table:style-name="ce12N2" office:value-type="float" office:value="23978">
            <text:p>23978,00</text:p>
          </table:table-cell>
          <table:table-cell table:style-name="ce12N2" office:value-type="float" office:value="1678.46">
            <text:p>167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81388120001245500100016484613108611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8">
            <text:p>30902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5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55.56">
            <text:p>6055,56</text:p>
          </table:table-cell>
          <table:table-cell table:style-name="ce12N2" office:value-type="float" office:value="290.4">
            <text:p>290,4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08">
            <text:p>58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5015">
            <text:p>0,815</text:p>
          </table:table-cell>
          <table:table-cell table:style-name="ce12N2" office:value-type="float" office:value="176">
            <text:p>17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5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06.93">
            <text:p>4806,93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26">
            <text:p>43,26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37.96">
            <text:p>537,96</text:p>
          </table:table-cell>
          <table:table-cell table:style-name="ce12N2" office:value-type="float" office:value="5517.6">
            <text:p>5517,60</text:p>
          </table:table-cell>
          <table:table-cell table:style-name="ce12N2" office:value-type="float" office:value="220.7">
            <text:p>22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54341127745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9">
            <text:p>309029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0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29.17">
            <text:p>3592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4724.94">
            <text:p>3472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1.24628">
            <text:p>201,246</text:p>
          </table:table-cell>
          <table:table-cell table:style-name="ce12N2" office:value-type="float" office:value="427.48">
            <text:p>427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929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306.98">
            <text:p>29306,98</text:p>
          </table:table-cell>
          <table:table-cell table:style-name="ce12N2" office:value-type="float" office:value="29.31">
            <text:p>2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.76">
            <text:p>263,76</text:p>
          </table:table-cell>
          <table:table-cell table:style-name="ce12N2" office:value-type="float" office:value="44.5">
            <text:p>44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204.23">
            <text:p>1204,23</text:p>
          </table:table-cell>
          <table:table-cell table:style-name="ce12N2" office:value-type="float" office:value="34724.94">
            <text:p>34724,94</text:p>
          </table:table-cell>
          <table:table-cell table:style-name="ce12N2" office:value-type="float" office:value="2430.75">
            <text:p>243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013173876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1">
            <text:p>309031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3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75">
            <text:p>18,75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0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182.62">
            <text:p>14182,62</text:p>
          </table:table-cell>
          <table:table-cell table:style-name="ce12N2" office:value-type="float" office:value="14.18">
            <text:p>1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.64">
            <text:p>127,64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04.56">
            <text:p>16804,56</text:p>
          </table:table-cell>
          <table:table-cell table:style-name="ce12N2" office:value-type="float" office:value="1176.32">
            <text:p>117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35861045058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3">
            <text:p>30903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49748">
            <text:p>1,750</text:p>
          </table:table-cell>
          <table:table-cell table:style-name="ce12N2" office:value-type="float" office:value="508.99">
            <text:p>508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7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27.46">
            <text:p>7827,46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649.22">
            <text:p>64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11042095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4">
            <text:p>30903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49">
            <text:p>0,013</text:p>
          </table:table-cell>
          <table:table-cell table:style-name="ce12N2" office:value-type="float" office:value="352.5">
            <text:p>35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10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228.63">
            <text:p>26228,63</text:p>
          </table:table-cell>
          <table:table-cell table:style-name="ce12N2" office:value-type="float" office:value="26.23">
            <text:p>2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6.06">
            <text:p>236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1204.25">
            <text:p>120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2109334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5">
            <text:p>3090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152">
            <text:p>1,522</text:p>
          </table:table-cell>
          <table:table-cell table:style-name="ce12N2" office:value-type="float" office:value="442.6">
            <text:p>44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06.49">
            <text:p>6806,49</text:p>
          </table:table-cell>
          <table:table-cell table:style-name="ce12N2" office:value-type="float" office:value="6.81">
            <text:p>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26">
            <text:p>61,2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564.54">
            <text:p>56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314507262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9">
            <text:p>309039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9.5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5.57">
            <text:p>2163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635.57">
            <text:p>21635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79936">
            <text:p>32,799</text:p>
          </table:table-cell>
          <table:table-cell table:style-name="ce12N2" office:value-type="float" office:value="307.8">
            <text:p>30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3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29.29">
            <text:p>18829,29</text:p>
          </table:table-cell>
          <table:table-cell table:style-name="ce12N2" office:value-type="float" office:value="18.83">
            <text:p>1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.47">
            <text:p>169,4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71.95">
            <text:p>12671,95</text:p>
          </table:table-cell>
          <table:table-cell table:style-name="ce12N2" office:value-type="float" office:value="887.04">
            <text:p>8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0376680001545500100119959017090732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0">
            <text:p>30904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7.7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.34">
            <text:p>14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.4">
            <text:p>13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0.1">
            <text:p>0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0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.06">
            <text:p>124,06</text:p>
          </table:table-cell>
          <table:table-cell table:style-name="ce12N2" office:value-type="float" office:value="0.12">
            <text:p>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133.4">
            <text:p>133,40</text:p>
          </table:table-cell>
          <table:table-cell table:style-name="ce12N2" office:value-type="float" office:value="9.34">
            <text:p>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77261100009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2">
            <text:p>3090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.38">
            <text:p>75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.43">
            <text:p>595,43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36">
            <text:p>5,3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45.86">
            <text:p>45,86</text:p>
          </table:table-cell>
          <table:table-cell table:style-name="ce12N2" office:value-type="float" office:value="705.52">
            <text:p>705,52</text:p>
          </table:table-cell>
          <table:table-cell table:style-name="ce12N2" office:value-type="float" office:value="49.39">
            <text:p>4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21010391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4">
            <text:p>3090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52">
            <text:p>0,000</text:p>
          </table:table-cell>
          <table:table-cell table:style-name="ce12N2" office:value-type="float" office:value="6.78">
            <text:p>6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0.62">
            <text:p>3320,62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9">
            <text:p>29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4.5">
            <text:p>3934,50</text:p>
          </table:table-cell>
          <table:table-cell table:style-name="ce12N2" office:value-type="float" office:value="275.42">
            <text:p>27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81146696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5">
            <text:p>3090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69">
            <text:p>3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26">
            <text:p>0,004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.73">
            <text:p>297,73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22.93">
            <text:p>22,93</text:p>
          </table:table-cell>
          <table:table-cell table:style-name="ce12N2" office:value-type="float" office:value="352.76">
            <text:p>352,76</text:p>
          </table:table-cell>
          <table:table-cell table:style-name="ce12N2" office:value-type="float" office:value="24.69">
            <text:p>2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11784758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7">
            <text:p>3090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0.64">
            <text:p>1910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52">
            <text:p>0,008</text:p>
          </table:table-cell>
          <table:table-cell table:style-name="ce12N2" office:value-type="float" office:value="10.75">
            <text:p>10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4.78">
            <text:p>1644,78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">
            <text:p>14,8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2.98">
            <text:p>1402,98</text:p>
          </table:table-cell>
          <table:table-cell table:style-name="ce12N2" office:value-type="float" office:value="98.21">
            <text:p>9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01762169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8">
            <text:p>3090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2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12">
            <text:p>0,06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3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6.17">
            <text:p>9396,17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57">
            <text:p>84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3.24">
            <text:p>11133,24</text:p>
          </table:table-cell>
          <table:table-cell table:style-name="ce12N2" office:value-type="float" office:value="779.33">
            <text:p>779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691810445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9">
            <text:p>3090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5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16.24">
            <text:p>64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26">
            <text:p>0,087</text:p>
          </table:table-cell>
          <table:table-cell table:style-name="ce12N2" office:value-type="float" office:value="18.4">
            <text:p>1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48.67">
            <text:p>5248,6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24">
            <text:p>4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91.6">
            <text:p>391,60</text:p>
          </table:table-cell>
          <table:table-cell table:style-name="ce12N2" office:value-type="float" office:value="6024.64">
            <text:p>6024,64</text:p>
          </table:table-cell>
          <table:table-cell table:style-name="ce12N2" office:value-type="float" office:value="240.98">
            <text:p>24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53731376116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0">
            <text:p>309050</text:p>
          </table:table-cell>
          <table:table-cell table:style-name="ce0" table:number-columns-spanned="4" table:number-rows-spanned="1" office:value-type="string" calcext:value-type="string">
            <text:p>9.315 - BRASIPLA INDUSTRIA E COMERCIO LTDA</text:p>
          </table:table-cell>
          <table:covered-table-cell table:number-columns-repeated="3"/>
          <table:table-cell table:style-name="ce0" office:value-type="string" calcext:value-type="string">
            <text:p>27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2">
            <text:p>0,720</text:p>
          </table:table-cell>
          <table:table-cell table:style-name="ce12N2" office:value-type="float" office:value="72">
            <text:p>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22.23">
            <text:p>2222,23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3.04">
            <text:p>2633,04</text:p>
          </table:table-cell>
          <table:table-cell table:style-name="ce12N2" office:value-type="float" office:value="184.31">
            <text:p>18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122595300011055001000027678149200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1">
            <text:p>309051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19.262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1.74">
            <text:p>489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4792.89">
            <text:p>4792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736">
            <text:p>0,018</text:p>
          </table:table-cell>
          <table:table-cell table:style-name="ce12N2" office:value-type="float" office:value="163.39">
            <text:p>163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42.5">
            <text:p>4142,50</text:p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98.85">
            <text:p>98,85</text:p>
          </table:table-cell>
          <table:table-cell table:style-name="ce12N2" office:value-type="float" office:value="4792.89">
            <text:p>4792,89</text:p>
          </table:table-cell>
          <table:table-cell table:style-name="ce12N2" office:value-type="float" office:value="228.18">
            <text:p>22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192621635949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2">
            <text:p>309052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385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30.59">
            <text:p>6743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30.59">
            <text:p>67430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159232">
            <text:p>8,159</text:p>
          </table:table-cell>
          <table:table-cell table:style-name="ce12N2" office:value-type="float" office:value="6108.8">
            <text:p>610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30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850.07">
            <text:p>53850,07</text:p>
          </table:table-cell>
          <table:table-cell table:style-name="ce12N2" office:value-type="float" office:value="53.85">
            <text:p>5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4.65">
            <text:p>484,6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30.59">
            <text:p>67430,59</text:p>
          </table:table-cell>
          <table:table-cell table:style-name="ce12N2" office:value-type="float" office:value="8091.67">
            <text:p>809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3851054341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6">
            <text:p>3090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95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52.53">
            <text:p>825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7692.1">
            <text:p>769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85">
            <text:p>0,109</text:p>
          </table:table-cell>
          <table:table-cell table:style-name="ce12N2" office:value-type="float" office:value="11.24">
            <text:p>11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5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09.38">
            <text:p>6509,38</text:p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58">
            <text:p>58,5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60.43">
            <text:p>560,43</text:p>
          </table:table-cell>
          <table:table-cell table:style-name="ce12N2" office:value-type="float" office:value="7692.1">
            <text:p>7692,10</text:p>
          </table:table-cell>
          <table:table-cell table:style-name="ce12N2" office:value-type="float" office:value="519.25">
            <text:p>51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9551457738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0">
            <text:p>309060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57.26">
            <text:p>1445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270.78">
            <text:p>142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864">
            <text:p>0,089</text:p>
          </table:table-cell>
          <table:table-cell table:style-name="ce12N2" office:value-type="float" office:value="232.43">
            <text:p>23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57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44.22">
            <text:p>12044,22</text:p>
          </table:table-cell>
          <table:table-cell table:style-name="ce12N2" office:value-type="float" office:value="12.03">
            <text:p>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39">
            <text:p>108,3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86.48">
            <text:p>186,48</text:p>
          </table:table-cell>
          <table:table-cell table:style-name="ce12N2" office:value-type="float" office:value="14270.78">
            <text:p>14270,78</text:p>
          </table:table-cell>
          <table:table-cell table:style-name="ce12N2" office:value-type="float" office:value="998.96">
            <text:p>99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71008710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1">
            <text:p>309061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9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2.43">
            <text:p>125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3">
            <text:p>121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05">
            <text:p>0,039</text:p>
          </table:table-cell>
          <table:table-cell table:style-name="ce12N2" office:value-type="float" office:value="6.3">
            <text:p>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6.78">
            <text:p>1056,78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">
            <text:p>9,5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9.43">
            <text:p>39,43</text:p>
          </table:table-cell>
          <table:table-cell table:style-name="ce12N2" office:value-type="float" office:value="1213">
            <text:p>1213,00</text:p>
          </table:table-cell>
          <table:table-cell table:style-name="ce12N2" office:value-type="float" office:value="48.52">
            <text:p>4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910055569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2">
            <text:p>30906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337.6">
            <text:p>173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194.08">
            <text:p>171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53754">
            <text:p>36,538</text:p>
          </table:table-cell>
          <table:table-cell table:style-name="ce12N2" office:value-type="float" office:value="117.42">
            <text:p>11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3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11.42">
            <text:p>14511,42</text:p>
          </table:table-cell>
          <table:table-cell table:style-name="ce12N2" office:value-type="float" office:value="14.48">
            <text:p>1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59">
            <text:p>130,59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43.52">
            <text:p>143,52</text:p>
          </table:table-cell>
          <table:table-cell table:style-name="ce12N2" office:value-type="float" office:value="17194.08">
            <text:p>17194,08</text:p>
          </table:table-cell>
          <table:table-cell table:style-name="ce12N2" office:value-type="float" office:value="1203.59">
            <text:p>120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51004933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3">
            <text:p>30906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39.76">
            <text:p>656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4564.82">
            <text:p>6456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6.228464">
            <text:p>506,228</text:p>
          </table:table-cell>
          <table:table-cell table:style-name="ce12N2" office:value-type="float" office:value="1897.19">
            <text:p>1897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491.13">
            <text:p>54491,13</text:p>
          </table:table-cell>
          <table:table-cell table:style-name="ce12N2" office:value-type="float" office:value="54.46">
            <text:p>5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.41">
            <text:p>490,4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074.94">
            <text:p>1074,94</text:p>
          </table:table-cell>
          <table:table-cell table:style-name="ce12N2" office:value-type="float" office:value="64564.82">
            <text:p>64564,82</text:p>
          </table:table-cell>
          <table:table-cell table:style-name="ce12N2" office:value-type="float" office:value="4519.54">
            <text:p>451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61003635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4">
            <text:p>30906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88.40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08.8">
            <text:p>360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5.28">
            <text:p>276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544">
            <text:p>0,069</text:p>
          </table:table-cell>
          <table:table-cell table:style-name="ce12N2" office:value-type="float" office:value="25.2">
            <text:p>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0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33.84">
            <text:p>2333,84</text:p>
          </table:table-cell>
          <table:table-cell table:style-name="ce12N2" office:value-type="float" office:value="2.33">
            <text:p>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5.28">
            <text:p>2765,28</text:p>
          </table:table-cell>
          <table:table-cell table:style-name="ce12N2" office:value-type="float" office:value="193.57">
            <text:p>19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185.45">
            <text:p>5185,45</text:p>
          </table:table-cell>
          <table:table-cell table:style-name="ce12N2" office:value-type="float" office:value="843.52">
            <text:p>843,52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59853710001085502500078840810006583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6">
            <text:p>309066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9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41.58">
            <text:p>5941,58</text:p>
          </table:table-cell>
          <table:table-cell table:style-name="ce12N2" office:value-type="float" office:value="5.94">
            <text:p>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47">
            <text:p>53,47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0">
            <text:p>7040,00</text:p>
          </table:table-cell>
          <table:table-cell table:style-name="ce12N2" office:value-type="float" office:value="492.8">
            <text:p>49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064150000518550010002090801321469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7">
            <text:p>309067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7.2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77.36">
            <text:p>1037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5">
            <text:p>0,003</text:p>
          </table:table-cell>
          <table:table-cell table:style-name="ce12N2" office:value-type="float" office:value="350">
            <text:p>3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7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3.69">
            <text:p>8223,6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41.5">
            <text:p>4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633.36">
            <text:p>633,36</text:p>
          </table:table-cell>
          <table:table-cell table:style-name="ce12N2" office:value-type="float" office:value="9744">
            <text:p>9744,00</text:p>
          </table:table-cell>
          <table:table-cell table:style-name="ce12N2" office:value-type="float" office:value="682.08">
            <text:p>6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6212048000302550010000072441137152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9">
            <text:p>30906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5.465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40.37">
            <text:p>246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504.6">
            <text:p>245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47">
            <text:p>0,685</text:p>
          </table:table-cell>
          <table:table-cell table:style-name="ce12N2" office:value-type="float" office:value="1440">
            <text:p>14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4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81.27">
            <text:p>20681,27</text:p>
          </table:table-cell>
          <table:table-cell table:style-name="ce12N2" office:value-type="float" office:value="20.69">
            <text:p>2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6.13">
            <text:p>186,1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135.77">
            <text:p>135,77</text:p>
          </table:table-cell>
          <table:table-cell table:style-name="ce12N2" office:value-type="float" office:value="24504.6">
            <text:p>24504,60</text:p>
          </table:table-cell>
          <table:table-cell table:style-name="ce12N2" office:value-type="float" office:value="1715.32">
            <text:p>171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54651579012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55">
            <text:p>155,00</text:p>
          </table:table-cell>
          <table:table-cell table:style-name="ce26N2" office:value-type="float" office:value="1969.08">
            <text:p>1969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5374.92">
            <text:p>85374,92</text:p>
          </table:table-cell>
          <table:table-cell table:style-name="ce26N2" office:value-type="float" office:value="4402820.21">
            <text:p>4402820,21</text:p>
          </table:table-cell>
          <table:table-cell table:style-name="ce26N2" office:value-type="float" office:value="293440.25">
            <text:p>293440,2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79.33">
            <text:p>1279,33</text:p>
          </table:table-cell>
          <table:table-cell table:style-name="ce26N2" office:value-type="float" office:value="4573474.13">
            <text:p>4573474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8241.85">
            <text:p>58241,85</text:p>
          </table:table-cell>
          <table:table-cell table:style-name="ce26N2" office:value-type="float" office:value="8161.5">
            <text:p>8161,50</text:p>
          </table:table-cell>
          <table:table-cell table:style-name="ce26N2" office:value-type="float" office:value="2108.32">
            <text:p>2108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7670.444504">
            <text:p>17670,445</text:p>
          </table:table-cell>
          <table:table-cell table:style-name="ce26N2" office:value-type="float" office:value="4481906.79">
            <text:p>4481906,79</text:p>
          </table:table-cell>
          <table:table-cell table:style-name="ce26N2" office:value-type="float" office:value="4573474.13">
            <text:p>4573474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03769.34">
            <text:p>3703769,34</text:p>
          </table:table-cell>
          <table:table-cell table:style-name="ce26N2" office:value-type="float" office:value="3703.78">
            <text:p>3703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3333.82">
            <text:p>33333,82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99050.92">
            <text:p>399050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.67">
            <text:p>48,6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92" meta:object-count="0"/>
    <meta:generator>LibreOffice/4.3.0.4$Windows_x86 LibreOffice_project/62ad5818884a2fc2e5780dd45466868d41009ec0</meta:generator>
  </office:meta>
</office:document-meta>
</file>