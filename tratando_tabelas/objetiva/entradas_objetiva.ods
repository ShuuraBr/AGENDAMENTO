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3/06/2026 04:30:38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3">
            <text:p>30810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4.92">
            <text:p>819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2">
            <text:p>81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876">
            <text:p>1,659</text:p>
          </table:table-cell>
          <table:table-cell table:style-name="ce12N2" office:value-type="float" office:value="10198.2">
            <text:p>1019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9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58.49">
            <text:p>6858,49</text:p>
          </table:table-cell>
          <table:table-cell table:style-name="ce12N2" office:value-type="float" office:value="6.86">
            <text:p>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73">
            <text:p>61,7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2.92">
            <text:p>52,92</text:p>
          </table:table-cell>
          <table:table-cell table:style-name="ce12N2" office:value-type="float" office:value="8349">
            <text:p>8349,00</text:p>
          </table:table-cell>
          <table:table-cell table:style-name="ce12N2" office:value-type="float" office:value="584.43">
            <text:p>58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0281178273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3">
            <text:p>30826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2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27.59">
            <text:p>3402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231">
            <text:p>3,323</text:p>
          </table:table-cell>
          <table:table-cell table:style-name="ce12N2" office:value-type="float" office:value="35337.72">
            <text:p>353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027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32.97">
            <text:p>28532,97</text:p>
          </table:table-cell>
          <table:table-cell table:style-name="ce12N2" office:value-type="float" office:value="28.53">
            <text:p>2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.8">
            <text:p>256,80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19.75">
            <text:p>219,75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2366.55">
            <text:p>236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2517675730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5">
            <text:p>30835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28">
            <text:p>0,663</text:p>
          </table:table-cell>
          <table:table-cell table:style-name="ce12N2" office:value-type="float" office:value="851.2">
            <text:p>85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49.98">
            <text:p>4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82">
            <text:p>449,8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61063272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862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3">
            <text:p>30845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8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36.38">
            <text:p>1763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72861">
            <text:p>2,673</text:p>
          </table:table-cell>
          <table:table-cell table:style-name="ce12N2" office:value-type="float" office:value="16943.9">
            <text:p>169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36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88.55">
            <text:p>14788,55</text:p>
          </table:table-cell>
          <table:table-cell table:style-name="ce12N2" office:value-type="float" office:value="14.79">
            <text:p>1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09">
            <text:p>133,09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13.89">
            <text:p>113,89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1226.57">
            <text:p>12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8321826114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9">
            <text:p>30848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9.07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2.43">
            <text:p>449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8314">
            <text:p>0,518</text:p>
          </table:table-cell>
          <table:table-cell table:style-name="ce12N2" office:value-type="float" office:value="2256.02">
            <text:p>2256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7.02">
            <text:p>3767,02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">
            <text:p>33,90</text:p>
          </table:table-cell>
          <table:table-cell table:style-name="ce12N2" office:value-type="float" office:value="99.55">
            <text:p>99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9.01">
            <text:p>29,01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312.44">
            <text:p>31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90761582524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8">
            <text:p>30854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1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992.53">
            <text:p>25599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172308">
            <text:p>4,172</text:p>
          </table:table-cell>
          <table:table-cell table:style-name="ce12N2" office:value-type="float" office:value="2315.2">
            <text:p>23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.99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317.73">
            <text:p>215317,73</text:p>
          </table:table-cell>
          <table:table-cell table:style-name="ce12N2" office:value-type="float" office:value="215.35">
            <text:p>21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83">
            <text:p>1937,8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298.56">
            <text:p>1298,56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17429.28">
            <text:p>1742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15651834946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1">
            <text:p>308711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8.66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03303">
            <text:p>3,003</text:p>
          </table:table-cell>
          <table:table-cell table:style-name="ce12N2" office:value-type="float" office:value="379.94">
            <text:p>37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75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080.57">
            <text:p>36080,57</text:p>
          </table:table-cell>
          <table:table-cell table:style-name="ce12N2" office:value-type="float" office:value="36.08">
            <text:p>3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.73">
            <text:p>324,7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2992.55">
            <text:p>299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86651322422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9">
            <text:p>308729</text:p>
          </table:table-cell>
          <table:table-cell table:style-name="ce0" table:number-columns-spanned="4" table:number-rows-spanned="1" office:value-type="string" calcext:value-type="string">
            <text:p>7.682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183.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19.91">
            <text:p>131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2625">
            <text:p>0,113</text:p>
          </table:table-cell>
          <table:table-cell table:style-name="ce12N2" office:value-type="float" office:value="82.4">
            <text:p>8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1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48.51">
            <text:p>648,51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498.86">
            <text:p>49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45865920001000550010001836961537768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56">
            <text:p>30875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6364">
            <text:p>1,764</text:p>
          </table:table-cell>
          <table:table-cell table:style-name="ce12N2" office:value-type="float" office:value="4474.4">
            <text:p>447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5.98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408.63">
            <text:p>165408,63</text:p>
          </table:table-cell>
          <table:table-cell table:style-name="ce12N2" office:value-type="float" office:value="165.41">
            <text:p>16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68">
            <text:p>1488,68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13719.13">
            <text:p>1371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40155101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3">
            <text:p>309093</text:p>
          </table:table-cell>
          <table:table-cell table:style-name="ce0" table:number-columns-spanned="4" table:number-rows-spanned="1" office:value-type="string" calcext:value-type="string">
            <text:p>13.198 - SDSTK INDUSTRIA E COMERCIO LTDA</text:p>
          </table:table-cell>
          <table:covered-table-cell table:number-columns-repeated="3"/>
          <table:table-cell table:style-name="ce0" office:value-type="string" calcext:value-type="string">
            <text:p>13.1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1.38">
            <text:p>54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52.8">
            <text:p>5252,80</text:p>
          </table:table-cell>
          <table:table-cell table:style-name="ce12N2" office:value-type="float" office:value="168.58">
            <text:p>168,58</text:p>
          </table:table-cell>
          <table:table-cell table:style-name="ce12N3" office:value-type="float" office:value="0.14673">
            <text:p>0,147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2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14.56">
            <text:p>5014,56</text:p>
          </table:table-cell>
          <table:table-cell table:style-name="ce12N2" office:value-type="float" office:value="5.01">
            <text:p>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14">
            <text:p>45,1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21.38">
            <text:p>5421,38</text:p>
          </table:table-cell>
          <table:table-cell table:style-name="ce12N2" office:value-type="float" office:value="216.85">
            <text:p>2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86786380001035500100001314819236660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2">
            <text:p>309102</text:p>
          </table:table-cell>
          <table:table-cell table:style-name="ce0" table:number-columns-spanned="4" table:number-rows-spanned="1" office:value-type="string" calcext:value-type="string">
            <text:p>780 - INDUSTRIA E COMERCIO RIOMAR CORDAS LTDA</text:p>
          </table:table-cell>
          <table:covered-table-cell table:number-columns-repeated="3"/>
          <table:table-cell table:style-name="ce0" office:value-type="string" calcext:value-type="string">
            <text:p>171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6856">
            <text:p>0,807</text:p>
          </table:table-cell>
          <table:table-cell table:style-name="ce12N2" office:value-type="float" office:value="1731.53">
            <text:p>173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1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59.72">
            <text:p>6659,72</text:p>
          </table:table-cell>
          <table:table-cell table:style-name="ce12N2" office:value-type="float" office:value="6.66">
            <text:p>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94">
            <text:p>59,9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554.2">
            <text:p>55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298926000103550010001713531525277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4">
            <text:p>30913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1.3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3.77">
            <text:p>103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01.23">
            <text:p>1001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496">
            <text:p>0,068</text:p>
          </table:table-cell>
          <table:table-cell table:style-name="ce12N2" office:value-type="float" office:value="8.98">
            <text:p>8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33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5.01">
            <text:p>845,01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1">
            <text:p>7,6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2.54">
            <text:p>32,54</text:p>
          </table:table-cell>
          <table:table-cell table:style-name="ce12N2" office:value-type="float" office:value="1001.23">
            <text:p>1001,23</text:p>
          </table:table-cell>
          <table:table-cell table:style-name="ce12N2" office:value-type="float" office:value="70.08">
            <text:p>7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13161570383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5">
            <text:p>3091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503.43">
            <text:p>12950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129480.1">
            <text:p>12948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677488">
            <text:p>11,677</text:p>
          </table:table-cell>
          <table:table-cell table:style-name="ce12N2" office:value-type="float" office:value="3587.9">
            <text:p>358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9.503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862.14">
            <text:p>109862,14</text:p>
          </table:table-cell>
          <table:table-cell table:style-name="ce12N2" office:value-type="float" office:value="109.84">
            <text:p>10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8.76">
            <text:p>988,7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23.33">
            <text:p>23,33</text:p>
          </table:table-cell>
          <table:table-cell table:style-name="ce12N2" office:value-type="float" office:value="129480.1">
            <text:p>129480,10</text:p>
          </table:table-cell>
          <table:table-cell table:style-name="ce12N2" office:value-type="float" office:value="8419.91">
            <text:p>84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21810491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6">
            <text:p>30913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5108">
            <text:p>1,051</text:p>
          </table:table-cell>
          <table:table-cell table:style-name="ce12N2" office:value-type="float" office:value="228">
            <text:p>2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5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47.85">
            <text:p>21047,85</text:p>
          </table:table-cell>
          <table:table-cell table:style-name="ce12N2" office:value-type="float" office:value="21.05">
            <text:p>2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43">
            <text:p>189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966.38">
            <text:p>96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318820766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7">
            <text:p>30913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8.81">
            <text:p>49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.11">
            <text:p>483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904">
            <text:p>0,003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.73">
            <text:p>407,73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67">
            <text:p>3,67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15.7">
            <text:p>15,70</text:p>
          </table:table-cell>
          <table:table-cell table:style-name="ce12N2" office:value-type="float" office:value="483.11">
            <text:p>483,11</text:p>
          </table:table-cell>
          <table:table-cell table:style-name="ce12N2" office:value-type="float" office:value="33.82">
            <text:p>3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291941728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9">
            <text:p>309139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2.53">
            <text:p>71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.31">
            <text:p>677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48">
            <text:p>0,018</text:p>
          </table:table-cell>
          <table:table-cell table:style-name="ce12N2" office:value-type="float" office:value="6.91">
            <text:p>6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.64">
            <text:p>571,64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5.22">
            <text:p>35,22</text:p>
          </table:table-cell>
          <table:table-cell table:style-name="ce12N2" office:value-type="float" office:value="677.31">
            <text:p>677,31</text:p>
          </table:table-cell>
          <table:table-cell table:style-name="ce12N2" office:value-type="float" office:value="47.41">
            <text:p>4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28190130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0">
            <text:p>30914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">
            <text:p>0,126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961.99">
            <text:p>37961,99</text:p>
          </table:table-cell>
          <table:table-cell table:style-name="ce12N2" office:value-type="float" office:value="37.96">
            <text:p>3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1.66">
            <text:p>341,6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3148.6">
            <text:p>314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11345831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7">
            <text:p>3091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">
            <text:p>0,087</text:p>
          </table:table-cell>
          <table:table-cell table:style-name="ce12N2" office:value-type="float" office:value="94.5">
            <text:p>9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4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14.09">
            <text:p>13014,09</text:p>
          </table:table-cell>
          <table:table-cell table:style-name="ce12N2" office:value-type="float" office:value="13.01">
            <text:p>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7.13">
            <text:p>117,1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1079.4">
            <text:p>107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319222284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8">
            <text:p>3091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6">
            <text:p>0,001</text:p>
          </table:table-cell>
          <table:table-cell table:style-name="ce12N2" office:value-type="float" office:value="33.9">
            <text:p>3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7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03.1">
            <text:p>16603,10</text:p>
          </table:table-cell>
          <table:table-cell table:style-name="ce12N2" office:value-type="float" office:value="16.6">
            <text:p>1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.43">
            <text:p>149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1377.08">
            <text:p>137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41896471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9">
            <text:p>3091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514424412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8">
            <text:p>309198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1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85.19">
            <text:p>9818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665668">
            <text:p>49,666</text:p>
          </table:table-cell>
          <table:table-cell table:style-name="ce12N2" office:value-type="float" office:value="5370">
            <text:p>53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18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719.97">
            <text:p>82719,97</text:p>
          </table:table-cell>
          <table:table-cell table:style-name="ce12N2" office:value-type="float" office:value="82.72">
            <text:p>8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48">
            <text:p>744,4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16.29">
            <text:p>416,29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6843.83">
            <text:p>684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212211275673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9">
            <text:p>30919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96">
            <text:p>899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96">
            <text:p>89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9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92.4">
            <text:p>7592,40</text:p>
          </table:table-cell>
          <table:table-cell table:style-name="ce12N2" office:value-type="float" office:value="7.59">
            <text:p>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33">
            <text:p>68,3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96">
            <text:p>8996,00</text:p>
          </table:table-cell>
          <table:table-cell table:style-name="ce12N2" office:value-type="float" office:value="629.72">
            <text:p>62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01965533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0">
            <text:p>309200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3.4">
            <text:p>327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982.59">
            <text:p>2982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356">
            <text:p>0,054</text:p>
          </table:table-cell>
          <table:table-cell table:style-name="ce12N2" office:value-type="float" office:value="45.16">
            <text:p>4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3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98.42">
            <text:p>2598,42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38">
            <text:p>23,38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90.81">
            <text:p>290,81</text:p>
          </table:table-cell>
          <table:table-cell table:style-name="ce12N2" office:value-type="float" office:value="2982.59">
            <text:p>2982,59</text:p>
          </table:table-cell>
          <table:table-cell table:style-name="ce12N2" office:value-type="float" office:value="119.31">
            <text:p>11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301883343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5">
            <text:p>3092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3265.37">
            <text:p>66326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">
            <text:p>92,00</text:p>
          </table:table-cell>
          <table:table-cell table:style-name="ce12N2" office:value-type="float" office:value="657872.35">
            <text:p>657872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833163">
            <text:p>15,833</text:p>
          </table:table-cell>
          <table:table-cell table:style-name="ce12N2" office:value-type="float" office:value="3254.08">
            <text:p>325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3.265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9772.64">
            <text:p>559772,64</text:p>
          </table:table-cell>
          <table:table-cell table:style-name="ce12N2" office:value-type="float" office:value="559.79">
            <text:p>55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37.93">
            <text:p>5037,9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393.02">
            <text:p>5393,02</text:p>
          </table:table-cell>
          <table:table-cell table:style-name="ce12N2" office:value-type="float" office:value="647536.65">
            <text:p>647536,65</text:p>
          </table:table-cell>
          <table:table-cell table:style-name="ce12N2" office:value-type="float" office:value="41043">
            <text:p>4104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617401778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1">
            <text:p>309211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56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">
            <text:p>0,000</text:p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19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519.99">
            <text:p>35519,99</text:p>
          </table:table-cell>
          <table:table-cell table:style-name="ce12N2" office:value-type="float" office:value="35.52">
            <text:p>3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9.68">
            <text:p>319,6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2673.55">
            <text:p>2673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56913116267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4">
            <text:p>309234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56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2.04">
            <text:p>127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2">
            <text:p>12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02">
            <text:p>0,007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7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9.77">
            <text:p>1039,77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6">
            <text:p>9,36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0.04">
            <text:p>40,04</text:p>
          </table:table-cell>
          <table:table-cell table:style-name="ce12N2" office:value-type="float" office:value="1232">
            <text:p>1232,00</text:p>
          </table:table-cell>
          <table:table-cell table:style-name="ce12N2" office:value-type="float" office:value="86.24">
            <text:p>8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5681518696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4">
            <text:p>30924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1.59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77.6">
            <text:p>1007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12.52">
            <text:p>1001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51546">
            <text:p>2,852</text:p>
          </table:table-cell>
          <table:table-cell table:style-name="ce12N2" office:value-type="float" office:value="9846.72">
            <text:p>9846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7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50.32">
            <text:p>8450,32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05">
            <text:p>76,05</text:p>
          </table:table-cell>
          <table:table-cell table:style-name="ce12N2" office:value-type="float" office:value="97.88">
            <text:p>97,8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65.08">
            <text:p>65,08</text:p>
          </table:table-cell>
          <table:table-cell table:style-name="ce12N2" office:value-type="float" office:value="10012.52">
            <text:p>10012,52</text:p>
          </table:table-cell>
          <table:table-cell table:style-name="ce12N2" office:value-type="float" office:value="700.88">
            <text:p>70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44238800001455500300122159818215583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6">
            <text:p>309246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75.24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09.8">
            <text:p>3640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409.8">
            <text:p>3640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4958">
            <text:p>1,350</text:p>
          </table:table-cell>
          <table:table-cell table:style-name="ce12N2" office:value-type="float" office:value="856.98">
            <text:p>856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40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728.96">
            <text:p>30728,96</text:p>
          </table:table-cell>
          <table:table-cell table:style-name="ce12N2" office:value-type="float" office:value="30.73">
            <text:p>3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.56">
            <text:p>276,5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409.8">
            <text:p>36409,80</text:p>
          </table:table-cell>
          <table:table-cell table:style-name="ce12N2" office:value-type="float" office:value="2548.69">
            <text:p>254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7524514159960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8">
            <text:p>309248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17.81">
            <text:p>827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1.06342">
            <text:p>151,063</text:p>
          </table:table-cell>
          <table:table-cell table:style-name="ce12N2" office:value-type="float" office:value="6308.05">
            <text:p>630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1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514.9">
            <text:p>69514,90</text:p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.62">
            <text:p>625,6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51.76">
            <text:p>351,76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5765.62">
            <text:p>576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21260419000152550010001468611255383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3">
            <text:p>3092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6.9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24">
            <text:p>187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24">
            <text:p>187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">
            <text:p>0,038</text:p>
          </table:table-cell>
          <table:table-cell table:style-name="ce12N2" office:value-type="float" office:value="38.5">
            <text:p>3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02.5">
            <text:p>15802,50</text:p>
          </table:table-cell>
          <table:table-cell table:style-name="ce12N2" office:value-type="float" office:value="15.8">
            <text:p>1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22">
            <text:p>142,2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24">
            <text:p>18724,00</text:p>
          </table:table-cell>
          <table:table-cell table:style-name="ce12N2" office:value-type="float" office:value="1310.68">
            <text:p>131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691418704086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5">
            <text:p>30925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2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69.81">
            <text:p>386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48">
            <text:p>37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6">
            <text:p>0,040</text:p>
          </table:table-cell>
          <table:table-cell table:style-name="ce12N2" office:value-type="float" office:value="32.8">
            <text:p>3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6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63.22">
            <text:p>3163,2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47">
            <text:p>28,4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21.81">
            <text:p>121,81</text:p>
          </table:table-cell>
          <table:table-cell table:style-name="ce12N2" office:value-type="float" office:value="3748">
            <text:p>3748,00</text:p>
          </table:table-cell>
          <table:table-cell table:style-name="ce12N2" office:value-type="float" office:value="262.36">
            <text:p>26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2510708332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6">
            <text:p>30925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3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0.44">
            <text:p>99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37.2">
            <text:p>93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29">
            <text:p>0,034</text:p>
          </table:table-cell>
          <table:table-cell table:style-name="ce12N2" office:value-type="float" office:value="10.86">
            <text:p>10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90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0.97">
            <text:p>790,97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3.24">
            <text:p>53,24</text:p>
          </table:table-cell>
          <table:table-cell table:style-name="ce12N2" office:value-type="float" office:value="937.2">
            <text:p>937,20</text:p>
          </table:table-cell>
          <table:table-cell table:style-name="ce12N2" office:value-type="float" office:value="65.6">
            <text:p>6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301887890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7">
            <text:p>30925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3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45">
            <text:p>39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0.1">
            <text:p>38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65">
            <text:p>0,065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.15">
            <text:p>331,15</text:p>
          </table:table-cell>
          <table:table-cell table:style-name="ce12N2" office:value-type="float" office:value="0.33">
            <text:p>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98">
            <text:p>2,9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2.35">
            <text:p>12,35</text:p>
          </table:table-cell>
          <table:table-cell table:style-name="ce12N2" office:value-type="float" office:value="380.1">
            <text:p>380,10</text:p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3419990376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8">
            <text:p>30925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3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6.91">
            <text:p>168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18">
            <text:p>161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9">
            <text:p>0,040</text:p>
          </table:table-cell>
          <table:table-cell table:style-name="ce12N2" office:value-type="float" office:value="2.74">
            <text:p>2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2.77">
            <text:p>1402,77</text:p>
          </table:table-cell>
          <table:table-cell table:style-name="ce12N2" office:value-type="float" office:value="1.4">
            <text:p>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63">
            <text:p>12,63</text:p>
          </table:table-cell>
          <table:table-cell table:style-name="ce12N2" office:value-type="float" office:value="27.71">
            <text:p>27,7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68.91">
            <text:p>68,91</text:p>
          </table:table-cell>
          <table:table-cell table:style-name="ce12N2" office:value-type="float" office:value="1618">
            <text:p>1618,00</text:p>
          </table:table-cell>
          <table:table-cell table:style-name="ce12N2" office:value-type="float" office:value="72.25">
            <text:p>7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3915384899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1">
            <text:p>309261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4.9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85.79">
            <text:p>1138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239.68">
            <text:p>1123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14124">
            <text:p>0,914</text:p>
          </table:table-cell>
          <table:table-cell table:style-name="ce12N2" office:value-type="float" office:value="673.8">
            <text:p>673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8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86.01">
            <text:p>9486,01</text:p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.37">
            <text:p>85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46.11">
            <text:p>146,11</text:p>
          </table:table-cell>
          <table:table-cell table:style-name="ce12N2" office:value-type="float" office:value="11239.68">
            <text:p>11239,68</text:p>
          </table:table-cell>
          <table:table-cell table:style-name="ce12N2" office:value-type="float" office:value="786.78">
            <text:p>78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6818670001305500100095490716417849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4">
            <text:p>30926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0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694.92">
            <text:p>18369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">
            <text:p>119,00</text:p>
          </table:table-cell>
          <table:table-cell table:style-name="ce12N2" office:value-type="float" office:value="171758.07">
            <text:p>171758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36.226182">
            <text:p>236,226</text:p>
          </table:table-cell>
          <table:table-cell table:style-name="ce12N2" office:value-type="float" office:value="1004.2">
            <text:p>1004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3.69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514.08">
            <text:p>145514,08</text:p>
          </table:table-cell>
          <table:table-cell table:style-name="ce12N2" office:value-type="float" office:value="145.51">
            <text:p>14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9.64">
            <text:p>1309,64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1936.85">
            <text:p>11936,85</text:p>
          </table:table-cell>
          <table:table-cell table:style-name="ce12N2" office:value-type="float" office:value="171758.07">
            <text:p>171758,07</text:p>
          </table:table-cell>
          <table:table-cell table:style-name="ce12N2" office:value-type="float" office:value="11411.95">
            <text:p>1141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081550885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5">
            <text:p>30926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9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5.14">
            <text:p>585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6.72">
            <text:p>566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62">
            <text:p>0,000</text:p>
          </table:table-cell>
          <table:table-cell table:style-name="ce12N2" office:value-type="float" office:value="77">
            <text:p>7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5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.29">
            <text:p>478,29</text:p>
          </table:table-cell>
          <table:table-cell table:style-name="ce12N2" office:value-type="float" office:value="0.48">
            <text:p>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8.42">
            <text:p>18,42</text:p>
          </table:table-cell>
          <table:table-cell table:style-name="ce12N2" office:value-type="float" office:value="566.72">
            <text:p>566,72</text:p>
          </table:table-cell>
          <table:table-cell table:style-name="ce12N2" office:value-type="float" office:value="39.67">
            <text:p>3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9016551935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2">
            <text:p>309282</text:p>
          </table:table-cell>
          <table:table-cell table:style-name="ce0" table:number-columns-spanned="4" table:number-rows-spanned="1" office:value-type="string" calcext:value-type="string">
            <text:p>15.133 - JSS FERRAGENS E SERVICOS EIRELI</text:p>
          </table:table-cell>
          <table:covered-table-cell table:number-columns-repeated="3"/>
          <table:table-cell table:style-name="ce0" office:value-type="string" calcext:value-type="string">
            <text:p>7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2996">
            <text:p>0,553</text:p>
          </table:table-cell>
          <table:table-cell table:style-name="ce12N2" office:value-type="float" office:value="127.06">
            <text:p>12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6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291.9">
            <text:p>29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0703302000197550010000076251584111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3">
            <text:p>309283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255.51">
            <text:p>10725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101841.47">
            <text:p>101841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04657">
            <text:p>2,005</text:p>
          </table:table-cell>
          <table:table-cell table:style-name="ce12N2" office:value-type="float" office:value="588.37">
            <text:p>588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7.255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724.29">
            <text:p>88724,29</text:p>
          </table:table-cell>
          <table:table-cell table:style-name="ce12N2" office:value-type="float" office:value="88.7">
            <text:p>8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.53">
            <text:p>798,5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414.04">
            <text:p>5414,04</text:p>
          </table:table-cell>
          <table:table-cell table:style-name="ce12N2" office:value-type="float" office:value="101841.47">
            <text:p>101841,47</text:p>
          </table:table-cell>
          <table:table-cell table:style-name="ce12N2" office:value-type="float" office:value="4073.67">
            <text:p>407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311547439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5">
            <text:p>309285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3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3.33">
            <text:p>673,33</text:p>
          </table:table-cell>
          <table:table-cell table:style-name="ce12N2" office:value-type="float" office:value="32.29">
            <text:p>32,2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45.8">
            <text:p>64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04094">
            <text:p>8,041</text:p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3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4.49">
            <text:p>534,49</text:p>
          </table:table-cell>
          <table:table-cell table:style-name="ce12N2" office:value-type="float" office:value="0.53">
            <text:p>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48.38">
            <text:p>48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9.82">
            <text:p>59,82</text:p>
          </table:table-cell>
          <table:table-cell table:style-name="ce12N2" office:value-type="float" office:value="613.51">
            <text:p>613,51</text:p>
          </table:table-cell>
          <table:table-cell table:style-name="ce12N2" office:value-type="float" office:value="24.54">
            <text:p>2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31811351118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6">
            <text:p>309286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8.0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585.62">
            <text:p>72758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727585.62">
            <text:p>727585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48.3333">
            <text:p>548,333</text:p>
          </table:table-cell>
          <table:table-cell table:style-name="ce12N2" office:value-type="float" office:value="12373.93">
            <text:p>12373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7.58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4064.08">
            <text:p>614064,08</text:p>
          </table:table-cell>
          <table:table-cell table:style-name="ce12N2" office:value-type="float" office:value="614.06">
            <text:p>61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26.58">
            <text:p>5526,5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7585.62">
            <text:p>727585,62</text:p>
          </table:table-cell>
          <table:table-cell table:style-name="ce12N2" office:value-type="float" office:value="50930.99">
            <text:p>5093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544042000119550010004780711490599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7">
            <text:p>309287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4.33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1.6">
            <text:p>838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1.6">
            <text:p>838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6">
            <text:p>0,666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8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73.86">
            <text:p>7073,86</text:p>
          </table:table-cell>
          <table:table-cell table:style-name="ce12N2" office:value-type="float" office:value="7.07">
            <text:p>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66">
            <text:p>63,6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81.6">
            <text:p>8381,60</text:p>
          </table:table-cell>
          <table:table-cell table:style-name="ce12N2" office:value-type="float" office:value="586.71">
            <text:p>58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642862000248550020000143351371785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8">
            <text:p>309288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18.77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82.58">
            <text:p>160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15576.35">
            <text:p>15576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612">
            <text:p>0,145</text:p>
          </table:table-cell>
          <table:table-cell table:style-name="ce12N2" office:value-type="float" office:value="193.25">
            <text:p>193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46.06">
            <text:p>13146,06</text:p>
          </table:table-cell>
          <table:table-cell table:style-name="ce12N2" office:value-type="float" office:value="13.14">
            <text:p>1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.33">
            <text:p>118,33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06.23">
            <text:p>506,23</text:p>
          </table:table-cell>
          <table:table-cell table:style-name="ce12N2" office:value-type="float" office:value="15576.35">
            <text:p>15576,35</text:p>
          </table:table-cell>
          <table:table-cell table:style-name="ce12N2" office:value-type="float" office:value="1090.36">
            <text:p>109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6833740003005500300061877918891290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0">
            <text:p>3092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4.8">
            <text:p>78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4.8">
            <text:p>78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68">
            <text:p>0,000</text:p>
          </table:table-cell>
          <table:table-cell table:style-name="ce12N2" office:value-type="float" office:value="11.76">
            <text:p>1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5.6">
            <text:p>675,60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08">
            <text:p>6,0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6.28">
            <text:p>576,28</text:p>
          </table:table-cell>
          <table:table-cell table:style-name="ce12N2" office:value-type="float" office:value="40.34">
            <text:p>4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31896874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1">
            <text:p>3092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14">
            <text:p>0,049</text:p>
          </table:table-cell>
          <table:table-cell table:style-name="ce12N2" office:value-type="float" office:value="13.02">
            <text:p>1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9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3.67">
            <text:p>3283,67</text:p>
          </table:table-cell>
          <table:table-cell table:style-name="ce12N2" office:value-type="float" office:value="3.28">
            <text:p>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55">
            <text:p>29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150.77">
            <text:p>15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718724356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2">
            <text:p>3092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623">
            <text:p>0,086</text:p>
          </table:table-cell>
          <table:table-cell table:style-name="ce12N2" office:value-type="float" office:value="112.44">
            <text:p>11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870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54.01">
            <text:p>32854,01</text:p>
          </table:table-cell>
          <table:table-cell table:style-name="ce12N2" office:value-type="float" office:value="32.86">
            <text:p>3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.68">
            <text:p>295,6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2667.61">
            <text:p>266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41579617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3">
            <text:p>3092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76">
            <text:p>0,033</text:p>
          </table:table-cell>
          <table:table-cell table:style-name="ce12N2" office:value-type="float" office:value="8.68">
            <text:p>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12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9.12">
            <text:p>2189,12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">
            <text:p>19,7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100.51">
            <text:p>1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61520138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4">
            <text:p>309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6.52">
            <text:p>291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38.52">
            <text:p>2738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4">
            <text:p>0,000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6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1.24">
            <text:p>2311,24</text:p>
          </table:table-cell>
          <table:table-cell table:style-name="ce12N2" office:value-type="float" office:value="2.31">
            <text:p>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8">
            <text:p>20,80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78">
            <text:p>178,00</text:p>
          </table:table-cell>
          <table:table-cell table:style-name="ce12N2" office:value-type="float" office:value="2738.52">
            <text:p>2738,52</text:p>
          </table:table-cell>
          <table:table-cell table:style-name="ce12N2" office:value-type="float" office:value="191.7">
            <text:p>19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21439709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5">
            <text:p>309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1">
            <text:p>0,016</text:p>
          </table:table-cell>
          <table:table-cell table:style-name="ce12N2" office:value-type="float" office:value="26.09">
            <text:p>26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30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84.02">
            <text:p>7284,02</text:p>
          </table:table-cell>
          <table:table-cell table:style-name="ce12N2" office:value-type="float" office:value="7.28">
            <text:p>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56">
            <text:p>65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604.14">
            <text:p>60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51848717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6">
            <text:p>309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4">
            <text:p>39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24">
            <text:p>39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4">
            <text:p>0,001</text:p>
          </table:table-cell>
          <table:table-cell table:style-name="ce12N2" office:value-type="float" office:value="58.8">
            <text:p>5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77.99">
            <text:p>3377,99</text:p>
          </table:table-cell>
          <table:table-cell table:style-name="ce12N2" office:value-type="float" office:value="3.38">
            <text:p>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4">
            <text:p>30,4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81.39">
            <text:p>2881,39</text:p>
          </table:table-cell>
          <table:table-cell table:style-name="ce12N2" office:value-type="float" office:value="201.7">
            <text:p>20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6010058889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7">
            <text:p>3092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49616">
            <text:p>0,450</text:p>
          </table:table-cell>
          <table:table-cell table:style-name="ce12N2" office:value-type="float" office:value="212.84">
            <text:p>212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.61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316.79">
            <text:p>77316,79</text:p>
          </table:table-cell>
          <table:table-cell table:style-name="ce12N2" office:value-type="float" office:value="77.32">
            <text:p>7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5.85">
            <text:p>695,8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6412.72">
            <text:p>641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915093238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8">
            <text:p>3092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1584">
            <text:p>0,212</text:p>
          </table:table-cell>
          <table:table-cell table:style-name="ce12N2" office:value-type="float" office:value="100.16">
            <text:p>10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11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384.37">
            <text:p>36384,37</text:p>
          </table:table-cell>
          <table:table-cell table:style-name="ce12N2" office:value-type="float" office:value="36.38">
            <text:p>3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7.46">
            <text:p>327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3017.75">
            <text:p>301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6113296751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9">
            <text:p>3092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9766">
            <text:p>0,230</text:p>
          </table:table-cell>
          <table:table-cell table:style-name="ce12N2" office:value-type="float" office:value="116.53">
            <text:p>116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68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632.71">
            <text:p>24632,71</text:p>
          </table:table-cell>
          <table:table-cell table:style-name="ce12N2" office:value-type="float" office:value="24.63">
            <text:p>2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.69">
            <text:p>221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1538.41">
            <text:p>153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81792893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7">
            <text:p>309307</text:p>
          </table:table-cell>
          <table:table-cell table:style-name="ce0" table:number-columns-spanned="4" table:number-rows-spanned="1" office:value-type="string" calcext:value-type="string">
            <text:p>33.509 - NEIMAR ANTONIO COLPANI LTDA</text:p>
          </table:table-cell>
          <table:covered-table-cell table:number-columns-repeated="3"/>
          <table:table-cell table:style-name="ce0" office:value-type="string" calcext:value-type="string">
            <text:p>16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31.49">
            <text:p>4431,49</text:p>
          </table:table-cell>
          <table:table-cell table:style-name="ce12N2" office:value-type="float" office:value="273.96">
            <text:p>273,96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65.96">
            <text:p>456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96768">
            <text:p>1,397</text:p>
          </table:table-cell>
          <table:table-cell table:style-name="ce12N2" office:value-type="float" office:value="96">
            <text:p>9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3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94.55">
            <text:p>3594,55</text:p>
          </table:table-cell>
          <table:table-cell table:style-name="ce12N2" office:value-type="float" office:value="3.59">
            <text:p>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35">
            <text:p>32,3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9.49">
            <text:p>139,49</text:p>
          </table:table-cell>
          <table:table-cell table:style-name="ce12N2" office:value-type="float" office:value="4292">
            <text:p>4292,00</text:p>
          </table:table-cell>
          <table:table-cell table:style-name="ce12N2" office:value-type="float" office:value="300.44">
            <text:p>30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5081122000180550010000163861000142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8">
            <text:p>30930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5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7.56">
            <text:p>507,56</text:p>
          </table:table-cell>
          <table:table-cell table:style-name="ce12N2" office:value-type="float" office:value="33.31">
            <text:p>33,3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7.4">
            <text:p>48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7">
            <text:p>0,023</text:p>
          </table:table-cell>
          <table:table-cell table:style-name="ce12N2" office:value-type="float" office:value="7.9">
            <text:p>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7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5.6">
            <text:p>395,6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3.47">
            <text:p>53,47</text:p>
          </table:table-cell>
          <table:table-cell table:style-name="ce12N2" office:value-type="float" office:value="454.09">
            <text:p>454,09</text:p>
          </table:table-cell>
          <table:table-cell table:style-name="ce12N2" office:value-type="float" office:value="18.17">
            <text:p>1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53918671263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7">
            <text:p>309317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74.9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763.95">
            <text:p>8976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88451.74">
            <text:p>88451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82.375338">
            <text:p>2282,375</text:p>
          </table:table-cell>
          <table:table-cell table:style-name="ce12N2" office:value-type="float" office:value="486.5">
            <text:p>48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.76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866.1">
            <text:p>74866,10</text:p>
          </table:table-cell>
          <table:table-cell table:style-name="ce12N2" office:value-type="float" office:value="74.87">
            <text:p>7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3.84">
            <text:p>673,8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12.21">
            <text:p>1312,21</text:p>
          </table:table-cell>
          <table:table-cell table:style-name="ce12N2" office:value-type="float" office:value="88451.74">
            <text:p>88451,74</text:p>
          </table:table-cell>
          <table:table-cell table:style-name="ce12N2" office:value-type="float" office:value="5955.92">
            <text:p>595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330642620002505500100027499318584132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8">
            <text:p>309318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8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82">
            <text:p>0,018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5.18">
            <text:p>1265,18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39">
            <text:p>11,3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58.09">
            <text:p>5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87111100022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3">
            <text:p>30932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1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1.65">
            <text:p>278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34.53">
            <text:p>2534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5">
            <text:p>0,080</text:p>
          </table:table-cell>
          <table:table-cell table:style-name="ce12N2" office:value-type="float" office:value="29.5">
            <text:p>2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1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9.08">
            <text:p>2139,08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25">
            <text:p>19,25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47.12">
            <text:p>247,12</text:p>
          </table:table-cell>
          <table:table-cell table:style-name="ce12N2" office:value-type="float" office:value="2534.53">
            <text:p>2534,53</text:p>
          </table:table-cell>
          <table:table-cell table:style-name="ce12N2" office:value-type="float" office:value="177.42">
            <text:p>17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14315822614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5">
            <text:p>30932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1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8.28">
            <text:p>215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01.63">
            <text:p>2001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55">
            <text:p>0,090</text:p>
          </table:table-cell>
          <table:table-cell table:style-name="ce12N2" office:value-type="float" office:value="23.35">
            <text:p>23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58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9.33">
            <text:p>1689,33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56.65">
            <text:p>156,65</text:p>
          </table:table-cell>
          <table:table-cell table:style-name="ce12N2" office:value-type="float" office:value="2001.63">
            <text:p>2001,63</text:p>
          </table:table-cell>
          <table:table-cell table:style-name="ce12N2" office:value-type="float" office:value="140.12">
            <text:p>14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14515802815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0">
            <text:p>30934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5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7.547153">
            <text:p>227,547</text:p>
          </table:table-cell>
          <table:table-cell table:style-name="ce12N2" office:value-type="float" office:value="765.94">
            <text:p>765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07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98.62">
            <text:p>23698,62</text:p>
          </table:table-cell>
          <table:table-cell table:style-name="ce12N2" office:value-type="float" office:value="23.7">
            <text:p>2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.29">
            <text:p>213,29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1965.58">
            <text:p>196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5915751703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5">
            <text:p>309345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90948">
            <text:p>5,191</text:p>
          </table:table-cell>
          <table:table-cell table:style-name="ce12N2" office:value-type="float" office:value="473.37">
            <text:p>473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659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19.47">
            <text:p>47819,47</text:p>
          </table:table-cell>
          <table:table-cell table:style-name="ce12N2" office:value-type="float" office:value="47.82">
            <text:p>47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0.38">
            <text:p>430,38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3966.19">
            <text:p>396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631990171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0">
            <text:p>309390</text:p>
          </table:table-cell>
          <table:table-cell table:style-name="ce0" table:number-columns-spanned="4" table:number-rows-spanned="1" office:value-type="string" calcext:value-type="string">
            <text:p>1.670 - ARQUA IND. BRASILEIRA DE MANGUEIRAS E TERMOPLASTICOS LTDA</text:p>
          </table:table-cell>
          <table:covered-table-cell table:number-columns-repeated="3"/>
          <table:table-cell table:style-name="ce0" office:value-type="string" calcext:value-type="string">
            <text:p>17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30.63">
            <text:p>17630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7075.67">
            <text:p>17075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60258">
            <text:p>0,960</text:p>
          </table:table-cell>
          <table:table-cell table:style-name="ce12N2" office:value-type="float" office:value="660.09">
            <text:p>660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30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11.43">
            <text:p>14411,43</text:p>
          </table:table-cell>
          <table:table-cell table:style-name="ce12N2" office:value-type="float" office:value="14.41">
            <text:p>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.7">
            <text:p>129,7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554.96">
            <text:p>554,96</text:p>
          </table:table-cell>
          <table:table-cell table:style-name="ce12N2" office:value-type="float" office:value="17075.67">
            <text:p>17075,67</text:p>
          </table:table-cell>
          <table:table-cell table:style-name="ce12N2" office:value-type="float" office:value="1195.3">
            <text:p>119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081333150001195500100001754014402378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2">
            <text:p>309392</text:p>
          </table:table-cell>
          <table:table-cell table:style-name="ce0" table:number-columns-spanned="4" table:number-rows-spanned="1" office:value-type="string" calcext:value-type="string">
            <text:p>9.951 - QUALITRONIX TECNOLOGIA LTDA</text:p>
          </table:table-cell>
          <table:covered-table-cell table:number-columns-repeated="3"/>
          <table:table-cell table:style-name="ce0" office:value-type="string" calcext:value-type="string">
            <text:p>131.15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9.58">
            <text:p>8439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136.14">
            <text:p>813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37198">
            <text:p>45,372</text:p>
          </table:table-cell>
          <table:table-cell table:style-name="ce12N2" office:value-type="float" office:value="68.97">
            <text:p>68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9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.43">
            <text:p>7290,43</text:p>
          </table:table-cell>
          <table:table-cell table:style-name="ce12N2" office:value-type="float" office:value="7.29">
            <text:p>7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61">
            <text:p>65,61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303.44">
            <text:p>303,44</text:p>
          </table:table-cell>
          <table:table-cell table:style-name="ce12N2" office:value-type="float" office:value="8136.14">
            <text:p>8136,14</text:p>
          </table:table-cell>
          <table:table-cell table:style-name="ce12N2" office:value-type="float" office:value="569.53">
            <text:p>56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02803462000172550030001311531226243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4">
            <text:p>309394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3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7.99">
            <text:p>200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7.99">
            <text:p>200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">
            <text:p>0,011</text:p>
          </table:table-cell>
          <table:table-cell table:style-name="ce12N2" office:value-type="float" office:value="0.15">
            <text:p>0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0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4.14">
            <text:p>1794,14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14">
            <text:p>16,1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7.99">
            <text:p>2007,99</text:p>
          </table:table-cell>
          <table:table-cell table:style-name="ce12N2" office:value-type="float" office:value="140.56">
            <text:p>14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3576045000150550010000053221001921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6">
            <text:p>309396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5.7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8.16">
            <text:p>569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18.8">
            <text:p>551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9732">
            <text:p>0,697</text:p>
          </table:table-cell>
          <table:table-cell table:style-name="ce12N2" office:value-type="float" office:value="117">
            <text:p>1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98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18.8">
            <text:p>5518,80</text:p>
          </table:table-cell>
          <table:table-cell table:style-name="ce12N2" office:value-type="float" office:value="5.52">
            <text:p>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67">
            <text:p>49,6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179.36">
            <text:p>179,36</text:p>
          </table:table-cell>
          <table:table-cell table:style-name="ce12N2" office:value-type="float" office:value="5518.8">
            <text:p>5518,80</text:p>
          </table:table-cell>
          <table:table-cell table:style-name="ce12N2" office:value-type="float" office:value="386.32">
            <text:p>38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5094003000155550010001857201114655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11">
            <text:p>309411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.95537">
            <text:p>37,955</text:p>
          </table:table-cell>
          <table:table-cell table:style-name="ce12N2" office:value-type="float" office:value="583">
            <text:p>58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4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288.36">
            <text:p>28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61242541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2">
            <text:p>309422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4.43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907.77">
            <text:p>2690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6060.79">
            <text:p>26060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4.599">
            <text:p>244,599</text:p>
          </table:table-cell>
          <table:table-cell table:style-name="ce12N2" office:value-type="float" office:value="428.7">
            <text:p>428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907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994.65">
            <text:p>21994,65</text:p>
          </table:table-cell>
          <table:table-cell table:style-name="ce12N2" office:value-type="float" office:value="21.99">
            <text:p>21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.95">
            <text:p>197,95</text:p>
          </table:table-cell>
          <table:table-cell table:style-name="ce12N2" office:value-type="float" office:value="44.53">
            <text:p>44,5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846.98">
            <text:p>846,98</text:p>
          </table:table-cell>
          <table:table-cell table:style-name="ce12N2" office:value-type="float" office:value="26060.79">
            <text:p>26060,79</text:p>
          </table:table-cell>
          <table:table-cell table:style-name="ce12N2" office:value-type="float" office:value="1824.26">
            <text:p>182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6428620002485500200001443214821014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2">
            <text:p>30943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28.9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55.06">
            <text:p>2665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5305.05">
            <text:p>2530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21105">
            <text:p>2,121</text:p>
          </table:table-cell>
          <table:table-cell table:style-name="ce12N2" office:value-type="float" office:value="334.97">
            <text:p>334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655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56.81">
            <text:p>21356,81</text:p>
          </table:table-cell>
          <table:table-cell table:style-name="ce12N2" office:value-type="float" office:value="21.36">
            <text:p>2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.21">
            <text:p>192,21</text:p>
          </table:table-cell>
          <table:table-cell table:style-name="ce12N2" office:value-type="float" office:value="61.58">
            <text:p>61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1350.01">
            <text:p>1350,01</text:p>
          </table:table-cell>
          <table:table-cell table:style-name="ce12N2" office:value-type="float" office:value="25305.05">
            <text:p>25305,05</text:p>
          </table:table-cell>
          <table:table-cell table:style-name="ce12N2" office:value-type="float" office:value="1771.36">
            <text:p>177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2899110226712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48">
            <text:p>309448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3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17.42">
            <text:p>1651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517.42">
            <text:p>16517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0699">
            <text:p>1,107</text:p>
          </table:table-cell>
          <table:table-cell table:style-name="ce12N2" office:value-type="float" office:value="97.92">
            <text:p>9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517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58.32">
            <text:p>14758,32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.81">
            <text:p>132,8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17.42">
            <text:p>16517,42</text:p>
          </table:table-cell>
          <table:table-cell table:style-name="ce12N2" office:value-type="float" office:value="1156.22">
            <text:p>115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3576045000150550010000053241001921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2">
            <text:p>30945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7.3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0.74">
            <text:p>819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190.74">
            <text:p>8190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9683">
            <text:p>3,097</text:p>
          </table:table-cell>
          <table:table-cell table:style-name="ce12N2" office:value-type="float" office:value="380.07">
            <text:p>380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90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12.65">
            <text:p>6912,65</text:p>
          </table:table-cell>
          <table:table-cell table:style-name="ce12N2" office:value-type="float" office:value="6.9">
            <text:p>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21">
            <text:p>62,2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90.74">
            <text:p>8190,74</text:p>
          </table:table-cell>
          <table:table-cell table:style-name="ce12N2" office:value-type="float" office:value="573.35">
            <text:p>573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73471442714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3">
            <text:p>30945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7.3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3.6">
            <text:p>117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73.6">
            <text:p>117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56">
            <text:p>16,560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3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0.72">
            <text:p>990,72</text:p>
          </table:table-cell>
          <table:table-cell table:style-name="ce12N2" office:value-type="float" office:value="0.99">
            <text:p>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92">
            <text:p>8,9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73.6">
            <text:p>1173,60</text:p>
          </table:table-cell>
          <table:table-cell table:style-name="ce12N2" office:value-type="float" office:value="82.15">
            <text:p>8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73571007430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4">
            <text:p>309454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7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7.99">
            <text:p>2060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549.21">
            <text:p>20549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778458">
            <text:p>9,778</text:p>
          </table:table-cell>
          <table:table-cell table:style-name="ce12N2" office:value-type="float" office:value="348.33">
            <text:p>348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0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15.93">
            <text:p>17415,93</text:p>
          </table:table-cell>
          <table:table-cell table:style-name="ce12N2" office:value-type="float" office:value="17.42">
            <text:p>1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75">
            <text:p>156,7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58.78">
            <text:p>58,78</text:p>
          </table:table-cell>
          <table:table-cell table:style-name="ce12N2" office:value-type="float" office:value="20549.21">
            <text:p>20549,21</text:p>
          </table:table-cell>
          <table:table-cell table:style-name="ce12N2" office:value-type="float" office:value="1347.83">
            <text:p>134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735311124449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5">
            <text:p>30945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7.4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89.81">
            <text:p>3668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35701.77">
            <text:p>35701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.814824">
            <text:p>28,815</text:p>
          </table:table-cell>
          <table:table-cell table:style-name="ce12N2" office:value-type="float" office:value="570.23">
            <text:p>570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68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168.05">
            <text:p>30168,05</text:p>
          </table:table-cell>
          <table:table-cell table:style-name="ce12N2" office:value-type="float" office:value="30.16">
            <text:p>3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1.51">
            <text:p>271,5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988.04">
            <text:p>988,04</text:p>
          </table:table-cell>
          <table:table-cell table:style-name="ce12N2" office:value-type="float" office:value="35701.77">
            <text:p>35701,77</text:p>
          </table:table-cell>
          <table:table-cell table:style-name="ce12N2" office:value-type="float" office:value="2459.07">
            <text:p>245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740914330026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6">
            <text:p>30945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64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1.17">
            <text:p>135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68.7">
            <text:p>1268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3">
            <text:p>0,032</text:p>
          </table:table-cell>
          <table:table-cell table:style-name="ce12N2" office:value-type="float" office:value="3.75">
            <text:p>3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70.75">
            <text:p>1070,75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64">
            <text:p>9,64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82.47">
            <text:p>82,47</text:p>
          </table:table-cell>
          <table:table-cell table:style-name="ce12N2" office:value-type="float" office:value="1268.7">
            <text:p>1268,70</text:p>
          </table:table-cell>
          <table:table-cell table:style-name="ce12N2" office:value-type="float" office:value="88.81">
            <text:p>8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6491267961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7">
            <text:p>309457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650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3.72">
            <text:p>106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8.8">
            <text:p>99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6">
            <text:p>0,013</text:p>
          </table:table-cell>
          <table:table-cell table:style-name="ce12N2" office:value-type="float" office:value="3.75">
            <text:p>3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63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2.96">
            <text:p>842,96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59">
            <text:p>7,59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64.92">
            <text:p>64,92</text:p>
          </table:table-cell>
          <table:table-cell table:style-name="ce12N2" office:value-type="float" office:value="998.8">
            <text:p>998,80</text:p>
          </table:table-cell>
          <table:table-cell table:style-name="ce12N2" office:value-type="float" office:value="69.92">
            <text:p>69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6501375736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5">
            <text:p>309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04.16">
            <text:p>1230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53.2">
            <text:p>115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756">
            <text:p>0,338</text:p>
          </table:table-cell>
          <table:table-cell table:style-name="ce12N2" office:value-type="float" office:value="33.04">
            <text:p>3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0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50.62">
            <text:p>9750,62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.76">
            <text:p>87,7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750.96">
            <text:p>750,96</text:p>
          </table:table-cell>
          <table:table-cell table:style-name="ce12N2" office:value-type="float" office:value="11553.2">
            <text:p>11553,20</text:p>
          </table:table-cell>
          <table:table-cell table:style-name="ce12N2" office:value-type="float" office:value="808.72">
            <text:p>80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718298291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6">
            <text:p>309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952">
            <text:p>0,031</text:p>
          </table:table-cell>
          <table:table-cell table:style-name="ce12N2" office:value-type="float" office:value="0.5">
            <text:p>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0.97">
            <text:p>1580,97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23">
            <text:p>14,2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131.13">
            <text:p>13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11546280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7">
            <text:p>3094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83.39">
            <text:p>10583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37.46">
            <text:p>9937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162">
            <text:p>0,134</text:p>
          </table:table-cell>
          <table:table-cell table:style-name="ce12N2" office:value-type="float" office:value="30.56">
            <text:p>3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83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6.97">
            <text:p>8386,97</text:p>
          </table:table-cell>
          <table:table-cell table:style-name="ce12N2" office:value-type="float" office:value="8.39">
            <text:p>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48">
            <text:p>75,4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645.93">
            <text:p>645,93</text:p>
          </table:table-cell>
          <table:table-cell table:style-name="ce12N2" office:value-type="float" office:value="9937.46">
            <text:p>9937,46</text:p>
          </table:table-cell>
          <table:table-cell table:style-name="ce12N2" office:value-type="float" office:value="695.62">
            <text:p>69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31315605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9">
            <text:p>309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9">
            <text:p>0,000</text:p>
          </table:table-cell>
          <table:table-cell table:style-name="ce12N2" office:value-type="float" office:value="9.15">
            <text:p>9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31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19.22">
            <text:p>4819,22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37">
            <text:p>43,3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221.27">
            <text:p>22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017898775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0">
            <text:p>309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37.6">
            <text:p>1273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37.6">
            <text:p>1273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68">
            <text:p>0,052</text:p>
          </table:table-cell>
          <table:table-cell table:style-name="ce12N2" office:value-type="float" office:value="71.68">
            <text:p>7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3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65.2">
            <text:p>10965,20</text:p>
          </table:table-cell>
          <table:table-cell table:style-name="ce12N2" office:value-type="float" office:value="10.97">
            <text:p>1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.69">
            <text:p>98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53.22">
            <text:p>9353,22</text:p>
          </table:table-cell>
          <table:table-cell table:style-name="ce12N2" office:value-type="float" office:value="654.73">
            <text:p>65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61131213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1">
            <text:p>309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7.2">
            <text:p>139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7.2">
            <text:p>139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">
            <text:p>0,003</text:p>
          </table:table-cell>
          <table:table-cell table:style-name="ce12N2" office:value-type="float" office:value="7.36">
            <text:p>7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2.78">
            <text:p>1202,78</text:p>
          </table:table-cell>
          <table:table-cell table:style-name="ce12N2" office:value-type="float" office:value="1.2">
            <text:p>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83">
            <text:p>10,8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5.96">
            <text:p>1025,96</text:p>
          </table:table-cell>
          <table:table-cell table:style-name="ce12N2" office:value-type="float" office:value="71.82">
            <text:p>7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51452877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2">
            <text:p>3094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7">
            <text:p>0,001</text:p>
          </table:table-cell>
          <table:table-cell table:style-name="ce12N2" office:value-type="float" office:value="27.45">
            <text:p>27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268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30.81">
            <text:p>12430,81</text:p>
          </table:table-cell>
          <table:table-cell table:style-name="ce12N2" office:value-type="float" office:value="12.43">
            <text:p>1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88">
            <text:p>111,8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570.74">
            <text:p>57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212039838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3">
            <text:p>3094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8.68">
            <text:p>514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4.44">
            <text:p>4834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268">
            <text:p>0,065</text:p>
          </table:table-cell>
          <table:table-cell table:style-name="ce12N2" office:value-type="float" office:value="14.87">
            <text:p>14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4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0.15">
            <text:p>4080,15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72">
            <text:p>36,7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314.24">
            <text:p>314,24</text:p>
          </table:table-cell>
          <table:table-cell table:style-name="ce12N2" office:value-type="float" office:value="4834.44">
            <text:p>4834,44</text:p>
          </table:table-cell>
          <table:table-cell table:style-name="ce12N2" office:value-type="float" office:value="338.41">
            <text:p>33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41567041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4">
            <text:p>309494</text:p>
          </table:table-cell>
          <table:table-cell table:style-name="ce0" table:number-columns-spanned="4" table:number-rows-spanned="1" office:value-type="string" calcext:value-type="string">
            <text:p>34.313 - LYNUS INDUSTRIA, COMERCIO, IMPORTACAO E EXPORTACAO LTDA</text:p>
          </table:table-cell>
          <table:covered-table-cell table:number-columns-repeated="3"/>
          <table:table-cell table:style-name="ce0" office:value-type="string" calcext:value-type="string">
            <text:p>238.13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60.54">
            <text:p>1246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2437.7">
            <text:p>1243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6958">
            <text:p>1,170</text:p>
          </table:table-cell>
          <table:table-cell table:style-name="ce12N2" office:value-type="float" office:value="135.3">
            <text:p>135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6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5.72">
            <text:p>10835,72</text:p>
          </table:table-cell>
          <table:table-cell table:style-name="ce12N2" office:value-type="float" office:value="10.84">
            <text:p>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.52">
            <text:p>97,5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22.84">
            <text:p>22,84</text:p>
          </table:table-cell>
          <table:table-cell table:style-name="ce12N2" office:value-type="float" office:value="12437.7">
            <text:p>12437,70</text:p>
          </table:table-cell>
          <table:table-cell table:style-name="ce12N2" office:value-type="float" office:value="497.52">
            <text:p>49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71629640001855500200023813714662464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5">
            <text:p>309495</text:p>
          </table:table-cell>
          <table:table-cell table:style-name="ce0" table:number-columns-spanned="4" table:number-rows-spanned="1" office:value-type="string" calcext:value-type="string">
            <text:p>6.638 - MECANICA MABELINI LTDA</text:p>
          </table:table-cell>
          <table:covered-table-cell table:number-columns-repeated="3"/>
          <table:table-cell table:style-name="ce0" office:value-type="string" calcext:value-type="string">
            <text:p>7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65.4">
            <text:p>336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3665.4">
            <text:p>33665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08">
            <text:p>0,210</text:p>
          </table:table-cell>
          <table:table-cell table:style-name="ce12N2" office:value-type="float" office:value="2473">
            <text:p>247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65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9.67">
            <text:p>49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65.4">
            <text:p>33665,40</text:p>
          </table:table-cell>
          <table:table-cell table:style-name="ce12N2" office:value-type="float" office:value="1326.41">
            <text:p>132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8458900000110550010000072901612188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24">
            <text:p>309524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7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741.5">
            <text:p>11474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">
            <text:p>50,00</text:p>
          </table:table-cell>
          <table:table-cell table:style-name="ce12N2" office:value-type="float" office:value="114706.79">
            <text:p>114706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39384">
            <text:p>12,394</text:p>
          </table:table-cell>
          <table:table-cell table:style-name="ce12N2" office:value-type="float" office:value="2588.09">
            <text:p>2588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74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733.05">
            <text:p>96733,05</text:p>
          </table:table-cell>
          <table:table-cell table:style-name="ce12N2" office:value-type="float" office:value="96.7">
            <text:p>9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0.6">
            <text:p>870,6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34.71">
            <text:p>34,71</text:p>
          </table:table-cell>
          <table:table-cell table:style-name="ce12N2" office:value-type="float" office:value="114706.79">
            <text:p>114706,79</text:p>
          </table:table-cell>
          <table:table-cell table:style-name="ce12N2" office:value-type="float" office:value="8028.11">
            <text:p>802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746418537400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28">
            <text:p>30952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7.4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563.41">
            <text:p>14756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147563.41">
            <text:p>147563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00998">
            <text:p>20,010</text:p>
          </table:table-cell>
          <table:table-cell table:style-name="ce12N2" office:value-type="float" office:value="3231.64">
            <text:p>3231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7.56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624.07">
            <text:p>124624,07</text:p>
          </table:table-cell>
          <table:table-cell table:style-name="ce12N2" office:value-type="float" office:value="124.63">
            <text:p>12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1.61">
            <text:p>1121,6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563.41">
            <text:p>147563,41</text:p>
          </table:table-cell>
          <table:table-cell table:style-name="ce12N2" office:value-type="float" office:value="10275.23">
            <text:p>1027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7434191009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3">
            <text:p>30953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5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6.81">
            <text:p>204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86.93">
            <text:p>1986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487">
            <text:p>0,345</text:p>
          </table:table-cell>
          <table:table-cell table:style-name="ce12N2" office:value-type="float" office:value="28.8">
            <text:p>2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46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2">
            <text:p>1702,00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32">
            <text:p>15,3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59.88">
            <text:p>59,88</text:p>
          </table:table-cell>
          <table:table-cell table:style-name="ce12N2" office:value-type="float" office:value="1986.93">
            <text:p>1986,93</text:p>
          </table:table-cell>
          <table:table-cell table:style-name="ce12N2" office:value-type="float" office:value="111.45">
            <text:p>11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8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57115722262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4">
            <text:p>309534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0.88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395.29">
            <text:p>4239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121.5">
            <text:p>4212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99.318372">
            <text:p>699,318</text:p>
          </table:table-cell>
          <table:table-cell table:style-name="ce12N2" office:value-type="float" office:value="14370.72">
            <text:p>1437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395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549.49">
            <text:p>35549,49</text:p>
          </table:table-cell>
          <table:table-cell table:style-name="ce12N2" office:value-type="float" office:value="35.55">
            <text:p>3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9.95">
            <text:p>319,95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273.79">
            <text:p>273,79</text:p>
          </table:table-cell>
          <table:table-cell table:style-name="ce12N2" office:value-type="float" office:value="42121.5">
            <text:p>42121,50</text:p>
          </table:table-cell>
          <table:table-cell table:style-name="ce12N2" office:value-type="float" office:value="2948.51">
            <text:p>2948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51.28">
            <text:p>415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389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19/06/2026</text:p>
          </table:table-cell>
          <table:table-cell table:style-name="ce12" office:value-type="string" calcext:value-type="string">
            <text:p>4.151,28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35260656883820000204550030019008801269761123</text:p>
          </table:table-cell>
          <table:table-cell table:style-name="ce0" office:value-type="string" calcext:value-type="string">
            <text:p>3526065432020300019457001000004389171964226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45">
            <text:p>30954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8.7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53.22">
            <text:p>1325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3253.22">
            <text:p>13253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10038">
            <text:p>1,610</text:p>
          </table:table-cell>
          <table:table-cell table:style-name="ce12N2" office:value-type="float" office:value="577.39">
            <text:p>577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253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336.22">
            <text:p>11336,22</text:p>
          </table:table-cell>
          <table:table-cell table:style-name="ce12N2" office:value-type="float" office:value="11.33">
            <text:p>11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.03">
            <text:p>102,03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53.22">
            <text:p>13253,22</text:p>
          </table:table-cell>
          <table:table-cell table:style-name="ce12N2" office:value-type="float" office:value="756.66">
            <text:p>75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877912055545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46">
            <text:p>309546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76.5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9.46">
            <text:p>20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78.68">
            <text:p>197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216">
            <text:p>0,021</text:p>
          </table:table-cell>
          <table:table-cell table:style-name="ce12N2" office:value-type="float" office:value="1.87">
            <text:p>1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5.64">
            <text:p>1685,64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7">
            <text:p>15,1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30.78">
            <text:p>30,78</text:p>
          </table:table-cell>
          <table:table-cell table:style-name="ce12N2" office:value-type="float" office:value="1978.68">
            <text:p>1978,68</text:p>
          </table:table-cell>
          <table:table-cell table:style-name="ce12N2" office:value-type="float" office:value="120.75">
            <text:p>12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330642620002505500100027650413311183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47">
            <text:p>30954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8.8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163.1">
            <text:p>8516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163.1">
            <text:p>85163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4.00925">
            <text:p>44,009</text:p>
          </table:table-cell>
          <table:table-cell table:style-name="ce12N2" office:value-type="float" office:value="4246.64">
            <text:p>4246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5.163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875.3">
            <text:p>71875,30</text:p>
          </table:table-cell>
          <table:table-cell table:style-name="ce12N2" office:value-type="float" office:value="71.88">
            <text:p>7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6.88">
            <text:p>646,8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163.1">
            <text:p>85163,10</text:p>
          </table:table-cell>
          <table:table-cell table:style-name="ce12N2" office:value-type="float" office:value="5961.41">
            <text:p>596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883518980979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49">
            <text:p>30954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8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335.99">
            <text:p>20833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206653.82">
            <text:p>206653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9.794186">
            <text:p>129,794</text:p>
          </table:table-cell>
          <table:table-cell table:style-name="ce12N2" office:value-type="float" office:value="7131.94">
            <text:p>7131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8.335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784.7">
            <text:p>175784,70</text:p>
          </table:table-cell>
          <table:table-cell table:style-name="ce12N2" office:value-type="float" office:value="175.79">
            <text:p>17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82.06">
            <text:p>1582,0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682.17">
            <text:p>1682,17</text:p>
          </table:table-cell>
          <table:table-cell table:style-name="ce12N2" office:value-type="float" office:value="206653.82">
            <text:p>206653,82</text:p>
          </table:table-cell>
          <table:table-cell table:style-name="ce12N2" office:value-type="float" office:value="12945.4">
            <text:p>1294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891717583729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52">
            <text:p>309552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4.36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26.52">
            <text:p>1362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97.6">
            <text:p>131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4.2">
            <text:p>304,200</text:p>
          </table:table-cell>
          <table:table-cell table:style-name="ce12N2" office:value-type="float" office:value="268.8">
            <text:p>26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626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38.44">
            <text:p>11138,44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.25">
            <text:p>100,25</text:p>
          </table:table-cell>
          <table:table-cell table:style-name="ce12N2" office:value-type="float" office:value="44.53">
            <text:p>44,5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428.92">
            <text:p>428,92</text:p>
          </table:table-cell>
          <table:table-cell table:style-name="ce12N2" office:value-type="float" office:value="13197.6">
            <text:p>13197,60</text:p>
          </table:table-cell>
          <table:table-cell table:style-name="ce12N2" office:value-type="float" office:value="923.83">
            <text:p>92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642862000248550020000143641904330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54">
            <text:p>309554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8.9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577.84">
            <text:p>8157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1577.84">
            <text:p>8157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0.642632">
            <text:p>70,643</text:p>
          </table:table-cell>
          <table:table-cell table:style-name="ce12N2" office:value-type="float" office:value="7076.2">
            <text:p>7076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.577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857.56">
            <text:p>68857,56</text:p>
          </table:table-cell>
          <table:table-cell table:style-name="ce12N2" office:value-type="float" office:value="68.86">
            <text:p>6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9.72">
            <text:p>619,7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577.84">
            <text:p>81577,84</text:p>
          </table:table-cell>
          <table:table-cell table:style-name="ce12N2" office:value-type="float" office:value="5710.45">
            <text:p>571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893713231800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55">
            <text:p>30955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8.9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493.18">
            <text:p>12349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23493.18">
            <text:p>12349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94.254128">
            <text:p>294,254</text:p>
          </table:table-cell>
          <table:table-cell table:style-name="ce12N2" office:value-type="float" office:value="4200">
            <text:p>4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3.49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900.5">
            <text:p>104900,50</text:p>
          </table:table-cell>
          <table:table-cell table:style-name="ce12N2" office:value-type="float" office:value="104.91">
            <text:p>10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44.1">
            <text:p>944,1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019.29">
            <text:p>113019,29</text:p>
          </table:table-cell>
          <table:table-cell table:style-name="ce12N2" office:value-type="float" office:value="7911.35">
            <text:p>791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896217655736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58">
            <text:p>309558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99.80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47.55">
            <text:p>5084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0847.55">
            <text:p>50847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513">
            <text:p>0,046</text:p>
          </table:table-cell>
          <table:table-cell table:style-name="ce12N2" office:value-type="float" office:value="871.61">
            <text:p>871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847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040.57">
            <text:p>44040,57</text:p>
          </table:table-cell>
          <table:table-cell table:style-name="ce12N2" office:value-type="float" office:value="44.05">
            <text:p>4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6.36">
            <text:p>396,3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47.55">
            <text:p>50847,55</text:p>
          </table:table-cell>
          <table:table-cell table:style-name="ce12N2" office:value-type="float" office:value="2318">
            <text:p>231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7771310034735500500089980919909662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59">
            <text:p>309559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99.810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7.63">
            <text:p>90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7.63">
            <text:p>907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21">
            <text:p>0,001</text:p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6.02">
            <text:p>766,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89">
            <text:p>6,8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7.63">
            <text:p>907,63</text:p>
          </table:table-cell>
          <table:table-cell table:style-name="ce12N2" office:value-type="float" office:value="63.53">
            <text:p>6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777131003473550050008998101017989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0">
            <text:p>309560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99.821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.36">
            <text:p>30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9.36">
            <text:p>309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6">
            <text:p>0,001</text:p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9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1.08">
            <text:p>261,08</text:p>
          </table:table-cell>
          <table:table-cell table:style-name="ce12N2" office:value-type="float" office:value="0.26">
            <text:p>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35">
            <text:p>2,3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.36">
            <text:p>309,36</text:p>
          </table:table-cell>
          <table:table-cell table:style-name="ce12N2" office:value-type="float" office:value="21.66">
            <text:p>2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777131003473550050008998211582216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2">
            <text:p>30956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9.37">
            <text:p>499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42">
            <text:p>48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48">
            <text:p>0,006</text:p>
          </table:table-cell>
          <table:table-cell table:style-name="ce12N2" office:value-type="float" office:value="29.52">
            <text:p>29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99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6.53">
            <text:p>4086,53</text:p>
          </table:table-cell>
          <table:table-cell table:style-name="ce12N2" office:value-type="float" office:value="4.09">
            <text:p>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78">
            <text:p>36,78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57.37">
            <text:p>157,37</text:p>
          </table:table-cell>
          <table:table-cell table:style-name="ce12N2" office:value-type="float" office:value="4842">
            <text:p>4842,00</text:p>
          </table:table-cell>
          <table:table-cell table:style-name="ce12N2" office:value-type="float" office:value="338.94">
            <text:p>33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11423552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5">
            <text:p>30956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3">
            <text:p>0,032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.92">
            <text:p>713,92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59.21">
            <text:p>5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516129107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73">
            <text:p>309573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57.160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127.2">
            <text:p>22127,20</text:p>
          </table:table-cell>
          <table:table-cell table:style-name="ce12N2" office:value-type="float" office:value="743.26">
            <text:p>743,26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019.41">
            <text:p>22019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.588">
            <text:p>26,588</text:p>
          </table:table-cell>
          <table:table-cell table:style-name="ce12N2" office:value-type="float" office:value="34000">
            <text:p>3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12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46.48">
            <text:p>15446,48</text:p>
          </table:table-cell>
          <table:table-cell table:style-name="ce12N2" office:value-type="float" office:value="15.45">
            <text:p>1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02">
            <text:p>139,02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276.15">
            <text:p>21276,15</text:p>
          </table:table-cell>
          <table:table-cell table:style-name="ce12N2" office:value-type="float" office:value="4255.23">
            <text:p>425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5531.38">
            <text:p>25531,38</text:p>
          </table:table-cell>
          <table:table-cell table:style-name="ce12N2" office:value-type="float" office:value="851.05">
            <text:p>851,05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01637895007498550060014571601971038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74">
            <text:p>309574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57.15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9.5">
            <text:p>2909,50</text:p>
          </table:table-cell>
          <table:table-cell table:style-name="ce12N2" office:value-type="float" office:value="97.73">
            <text:p>97,73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07.23">
            <text:p>3007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728">
            <text:p>3,173</text:p>
          </table:table-cell>
          <table:table-cell table:style-name="ce12N2" office:value-type="float" office:value="4000">
            <text:p>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0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2.3">
            <text:p>2112,30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01">
            <text:p>19,0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09.5">
            <text:p>2909,50</text:p>
          </table:table-cell>
          <table:table-cell table:style-name="ce12N2" office:value-type="float" office:value="581.9">
            <text:p>58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016378950074985500600145715913232820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78">
            <text:p>309578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57.192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08">
            <text:p>24608,00</text:p>
          </table:table-cell>
          <table:table-cell table:style-name="ce12N2" office:value-type="float" office:value="826.48">
            <text:p>826,4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434.48">
            <text:p>25434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9.7024">
            <text:p>29,702</text:p>
          </table:table-cell>
          <table:table-cell table:style-name="ce12N2" office:value-type="float" office:value="36000">
            <text:p>36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60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65.41">
            <text:p>17865,41</text:p>
          </table:table-cell>
          <table:table-cell table:style-name="ce12N2" office:value-type="float" office:value="17.87">
            <text:p>1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.78">
            <text:p>160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608">
            <text:p>24608,00</text:p>
          </table:table-cell>
          <table:table-cell table:style-name="ce12N2" office:value-type="float" office:value="4921.6">
            <text:p>492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016378950074985500600145719215469353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79">
            <text:p>309579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57.19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1.6">
            <text:p>1301,60</text:p>
          </table:table-cell>
          <table:table-cell table:style-name="ce12N2" office:value-type="float" office:value="43.72">
            <text:p>43,72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5.26">
            <text:p>1295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64">
            <text:p>1,564</text:p>
          </table:table-cell>
          <table:table-cell table:style-name="ce12N2" office:value-type="float" office:value="2000">
            <text:p>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0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8.62">
            <text:p>908,62</text:p>
          </table:table-cell>
          <table:table-cell table:style-name="ce12N2" office:value-type="float" office:value="0.91">
            <text:p>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18">
            <text:p>8,18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1.54">
            <text:p>1251,54</text:p>
          </table:table-cell>
          <table:table-cell table:style-name="ce12N2" office:value-type="float" office:value="250.31">
            <text:p>25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01.85">
            <text:p>1501,85</text:p>
          </table:table-cell>
          <table:table-cell table:style-name="ce12N2" office:value-type="float" office:value="50.06">
            <text:p>50,06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016378950074985500600145719519592227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80">
            <text:p>309580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57.202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127.2">
            <text:p>22127,20</text:p>
          </table:table-cell>
          <table:table-cell table:style-name="ce12N2" office:value-type="float" office:value="743.26">
            <text:p>743,26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019.41">
            <text:p>22019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.588">
            <text:p>26,588</text:p>
          </table:table-cell>
          <table:table-cell table:style-name="ce12N2" office:value-type="float" office:value="34000">
            <text:p>3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12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46.48">
            <text:p>15446,48</text:p>
          </table:table-cell>
          <table:table-cell table:style-name="ce12N2" office:value-type="float" office:value="15.45">
            <text:p>1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02">
            <text:p>139,02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276.15">
            <text:p>21276,15</text:p>
          </table:table-cell>
          <table:table-cell table:style-name="ce12N2" office:value-type="float" office:value="4255.23">
            <text:p>425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5531.38">
            <text:p>25531,38</text:p>
          </table:table-cell>
          <table:table-cell table:style-name="ce12N2" office:value-type="float" office:value="851.05">
            <text:p>851,05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01637895007498550060014572021815133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81">
            <text:p>309581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57.201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9.5">
            <text:p>2909,50</text:p>
          </table:table-cell>
          <table:table-cell table:style-name="ce12N2" office:value-type="float" office:value="97.73">
            <text:p>97,73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07.23">
            <text:p>3007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728">
            <text:p>3,173</text:p>
          </table:table-cell>
          <table:table-cell table:style-name="ce12N2" office:value-type="float" office:value="4000">
            <text:p>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0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2.3">
            <text:p>2112,30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01">
            <text:p>19,0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09.5">
            <text:p>2909,50</text:p>
          </table:table-cell>
          <table:table-cell table:style-name="ce12N2" office:value-type="float" office:value="581.9">
            <text:p>58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016378950074985500600145720119230912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89">
            <text:p>309589</text:p>
          </table:table-cell>
          <table:table-cell table:style-name="ce0" table:number-columns-spanned="4" table:number-rows-spanned="1" office:value-type="string" calcext:value-type="string">
            <text:p>5.623 - ELGIN S/A</text:p>
          </table:table-cell>
          <table:covered-table-cell table:number-columns-repeated="3"/>
          <table:table-cell table:style-name="ce0" office:value-type="string" calcext:value-type="string">
            <text:p>649.0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4">
            <text:p>340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04">
            <text:p>340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892">
            <text:p>0,004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0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65.56">
            <text:p>2965,56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69">
            <text:p>26,69</text:p>
          </table:table-cell>
          <table:table-cell table:style-name="ce12N2" office:value-type="float" office:value="51">
            <text:p>5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04">
            <text:p>3404,00</text:p>
          </table:table-cell>
          <table:table-cell table:style-name="ce12N2" office:value-type="float" office:value="136.16">
            <text:p>13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5565780001225500100064900816964699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7">
            <text:p>309597</text:p>
          </table:table-cell>
          <table:table-cell table:style-name="ce0" table:number-columns-spanned="4" table:number-rows-spanned="1" office:value-type="string" calcext:value-type="string">
            <text:p>15.599 - FUNDICAO CLAUDIENSE EIRELI</text:p>
          </table:table-cell>
          <table:covered-table-cell table:number-columns-repeated="3"/>
          <table:table-cell table:style-name="ce0" office:value-type="string" calcext:value-type="string">
            <text:p>2.0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271.3">
            <text:p>12127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113869.75">
            <text:p>113869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39565">
            <text:p>6,396</text:p>
          </table:table-cell>
          <table:table-cell table:style-name="ce12N2" office:value-type="float" office:value="10691">
            <text:p>1069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1.271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8.17">
            <text:p>58,1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7401.55">
            <text:p>7401,55</text:p>
          </table:table-cell>
          <table:table-cell table:style-name="ce12N2" office:value-type="float" office:value="113869.75">
            <text:p>113869,75</text:p>
          </table:table-cell>
          <table:table-cell table:style-name="ce12N2" office:value-type="float" office:value="7970.89">
            <text:p>797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332564950001735500100000201613563014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2">
            <text:p>30960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9.5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4.59">
            <text:p>138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78.32">
            <text:p>1378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1">
            <text:p>0,059</text:p>
          </table:table-cell>
          <table:table-cell table:style-name="ce12N2" office:value-type="float" office:value="15.22">
            <text:p>15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4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63.04">
            <text:p>1163,04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47">
            <text:p>10,4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6.27">
            <text:p>6,27</text:p>
          </table:table-cell>
          <table:table-cell table:style-name="ce12N2" office:value-type="float" office:value="1378.32">
            <text:p>1378,32</text:p>
          </table:table-cell>
          <table:table-cell table:style-name="ce12N2" office:value-type="float" office:value="96.48">
            <text:p>9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951615072919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3">
            <text:p>30960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9.5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5.7">
            <text:p>304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045.7">
            <text:p>304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332">
            <text:p>0,283</text:p>
          </table:table-cell>
          <table:table-cell table:style-name="ce12N2" office:value-type="float" office:value="58.33">
            <text:p>58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0.4">
            <text:p>2570,40</text:p>
          </table:table-cell>
          <table:table-cell table:style-name="ce12N2" office:value-type="float" office:value="2.57">
            <text:p>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14">
            <text:p>23,1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45.7">
            <text:p>3045,70</text:p>
          </table:table-cell>
          <table:table-cell table:style-name="ce12N2" office:value-type="float" office:value="213.2">
            <text:p>21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954114568597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4">
            <text:p>309604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9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14">
            <text:p>5691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914">
            <text:p>5691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2.73668">
            <text:p>72,737</text:p>
          </table:table-cell>
          <table:table-cell table:style-name="ce12N2" office:value-type="float" office:value="5030.72">
            <text:p>503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91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031.5">
            <text:p>48031,50</text:p>
          </table:table-cell>
          <table:table-cell table:style-name="ce12N2" office:value-type="float" office:value="48.03">
            <text:p>4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2.28">
            <text:p>432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14">
            <text:p>56914,00</text:p>
          </table:table-cell>
          <table:table-cell table:style-name="ce12N2" office:value-type="float" office:value="3983.98">
            <text:p>398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957416182872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5">
            <text:p>30960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9.5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164.6">
            <text:p>122164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2164.6">
            <text:p>12216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4.0447">
            <text:p>164,045</text:p>
          </table:table-cell>
          <table:table-cell table:style-name="ce12N2" office:value-type="float" office:value="5664.59">
            <text:p>5664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2.164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104.1">
            <text:p>103104,10</text:p>
          </table:table-cell>
          <table:table-cell table:style-name="ce12N2" office:value-type="float" office:value="103.1">
            <text:p>10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7.94">
            <text:p>927,9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164.6">
            <text:p>122164,60</text:p>
          </table:table-cell>
          <table:table-cell table:style-name="ce12N2" office:value-type="float" office:value="8551.52">
            <text:p>855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957516663298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6">
            <text:p>30960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68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6.6">
            <text:p>497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76.6">
            <text:p>497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4">
            <text:p>0,007</text:p>
          </table:table-cell>
          <table:table-cell table:style-name="ce12N2" office:value-type="float" office:value="3.4">
            <text:p>3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00.12">
            <text:p>4200,12</text:p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8">
            <text:p>37,80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76.6">
            <text:p>4976,60</text:p>
          </table:table-cell>
          <table:table-cell table:style-name="ce12N2" office:value-type="float" office:value="348.36">
            <text:p>34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68514954655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27">
            <text:p>127,00</text:p>
          </table:table-cell>
          <table:table-cell table:style-name="ce26N2" office:value-type="float" office:value="2891.74">
            <text:p>2891,74</text:p>
          </table:table-cell>
          <table:table-cell table:style-name="ce26N2" office:value-type="float" office:value="168.58">
            <text:p>168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8097.6">
            <text:p>48097,60</text:p>
          </table:table-cell>
          <table:table-cell table:style-name="ce26N2" office:value-type="float" office:value="4920206.36">
            <text:p>4920206,36</text:p>
          </table:table-cell>
          <table:table-cell table:style-name="ce26N2" office:value-type="float" office:value="334081.14">
            <text:p>334081,1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151.28">
            <text:p>4151,28</text:p>
          </table:table-cell>
          <table:table-cell table:style-name="ce26N2" office:value-type="float" office:value="5054481.46">
            <text:p>5054481,4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2564.61">
            <text:p>52564,61</text:p>
          </table:table-cell>
          <table:table-cell table:style-name="ce26N2" office:value-type="float" office:value="1752.16">
            <text:p>1752,16</text:p>
          </table:table-cell>
          <table:table-cell table:style-name="ce26N2" office:value-type="float" office:value="348.51">
            <text:p>348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5927.090498">
            <text:p>5927,090</text:p>
          </table:table-cell>
          <table:table-cell table:style-name="ce26N2" office:value-type="float" office:value="5007354.86">
            <text:p>5007354,86</text:p>
          </table:table-cell>
          <table:table-cell table:style-name="ce26N2" office:value-type="float" office:value="5054481.46">
            <text:p>5054481,4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57833.98">
            <text:p>4057833,98</text:p>
          </table:table-cell>
          <table:table-cell table:style-name="ce26N2" office:value-type="float" office:value="4057.76">
            <text:p>4057,7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6520.51">
            <text:p>36520,51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15412.37">
            <text:p>315412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.69">
            <text:p>40,6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44" meta:object-count="0"/>
    <meta:generator>LibreOffice/4.3.0.4$Windows_x86 LibreOffice_project/62ad5818884a2fc2e5780dd45466868d41009ec0</meta:generator>
  </office:meta>
</office:document-meta>
</file>