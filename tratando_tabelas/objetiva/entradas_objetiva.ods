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1/06/2026 07:30:45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45">
            <text:p>306445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7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09">
            <text:p>25,131</text:p>
          </table:table-cell>
          <table:table-cell table:style-name="ce12N2" office:value-type="float" office:value="134.5">
            <text:p>1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1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840.82">
            <text:p>84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38506700014055001000047165142051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2">
            <text:p>306812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870.93">
            <text:p>9587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58885">
            <text:p>7,959</text:p>
          </table:table-cell>
          <table:table-cell table:style-name="ce12N2" office:value-type="float" office:value="10340">
            <text:p>10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87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17.73">
            <text:p>3017,73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6499.72">
            <text:p>649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01015665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3">
            <text:p>306813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28.42">
            <text:p>1141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456">
            <text:p>3,275</text:p>
          </table:table-cell>
          <table:table-cell table:style-name="ce12N2" office:value-type="float" office:value="13000">
            <text:p>13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2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592.42">
            <text:p>3592,42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7737.52">
            <text:p>77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11015665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5">
            <text:p>30681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056.53">
            <text:p>9805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6816">
            <text:p>2,468</text:p>
          </table:table-cell>
          <table:table-cell table:style-name="ce12N2" office:value-type="float" office:value="7300">
            <text:p>7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056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86.53">
            <text:p>3086,53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6647.9">
            <text:p>66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21015665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4">
            <text:p>30716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85">
            <text:p>3,948</text:p>
          </table:table-cell>
          <table:table-cell table:style-name="ce12N2" office:value-type="float" office:value="1124.8">
            <text:p>1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2733.36">
            <text:p>273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827610000142550010000675741814316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2">
            <text:p>30745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4.18">
            <text:p>122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2">
            <text:p>0,067</text:p>
          </table:table-cell>
          <table:table-cell table:style-name="ce12N2" office:value-type="float" office:value="11.2">
            <text:p>1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8.75">
            <text:p>108,75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78.08">
            <text:p>7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91581555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1">
            <text:p>3075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92.37">
            <text:p>809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45">
            <text:p>0,015</text:p>
          </table:table-cell>
          <table:table-cell table:style-name="ce12N2" office:value-type="float" office:value="17.85">
            <text:p>17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92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623.37">
            <text:p>623,37</text:p>
          </table:table-cell>
          <table:table-cell table:style-name="ce12N2" office:value-type="float" office:value="7469">
            <text:p>7469,00</text:p>
          </table:table-cell>
          <table:table-cell table:style-name="ce12N2" office:value-type="float" office:value="298.76">
            <text:p>298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81572145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82">
            <text:p>30758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46.61">
            <text:p>664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">
            <text:p>0,012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4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590.47">
            <text:p>590,47</text:p>
          </table:table-cell>
          <table:table-cell table:style-name="ce12N2" office:value-type="float" office:value="6056.14">
            <text:p>6056,14</text:p>
          </table:table-cell>
          <table:table-cell table:style-name="ce12N2" office:value-type="float" office:value="242.25">
            <text:p>24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71572146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2">
            <text:p>307592</text:p>
          </table:table-cell>
          <table:table-cell table:style-name="ce0" table:number-columns-spanned="4" table:number-rows-spanned="1" office:value-type="string" calcext:value-type="string">
            <text:p>5.700 - MARSCHALL IND. COM. IMP. EXP. LTDA</text:p>
          </table:table-cell>
          <table:covered-table-cell table:number-columns-repeated="3"/>
          <table:table-cell table:style-name="ce0" office:value-type="string" calcext:value-type="string">
            <text:p>723.8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80.35">
            <text:p>578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66.84">
            <text:p>5266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4025">
            <text:p>0,794</text:p>
          </table:table-cell>
          <table:table-cell table:style-name="ce12N2" office:value-type="float" office:value="145.05">
            <text:p>145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8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513.51">
            <text:p>513,51</text:p>
          </table:table-cell>
          <table:table-cell table:style-name="ce12N2" office:value-type="float" office:value="5266.84">
            <text:p>5266,84</text:p>
          </table:table-cell>
          <table:table-cell table:style-name="ce12N2" office:value-type="float" office:value="210.68">
            <text:p>21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502130525000177550030007238001531587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4">
            <text:p>307634</text:p>
          </table:table-cell>
          <table:table-cell table:style-name="ce0" table:number-columns-spanned="4" table:number-rows-spanned="1" office:value-type="string" calcext:value-type="string">
            <text:p>480 - HAGA S/A INDUSTRIA E COMERCIO LTDA</text:p>
          </table:table-cell>
          <table:covered-table-cell table:number-columns-repeated="3"/>
          <table:table-cell table:style-name="ce0" office:value-type="string" calcext:value-type="string">
            <text:p>108.1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708">
            <text:p>0,121</text:p>
          </table:table-cell>
          <table:table-cell table:style-name="ce12N2" office:value-type="float" office:value="44.16">
            <text:p>44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1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2.92">
            <text:p>4412,92</text:p>
          </table:table-cell>
          <table:table-cell table:style-name="ce12N2" office:value-type="float" office:value="308.89">
            <text:p>30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30540991000166550010001081911363840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35">
            <text:p>307635</text:p>
          </table:table-cell>
          <table:table-cell table:style-name="ce0" table:number-columns-spanned="4" table:number-rows-spanned="1" office:value-type="string" calcext:value-type="string">
            <text:p>38.606 - FIOLUX INDUSTRIA E COMERCIO LTDA</text:p>
          </table:table-cell>
          <table:covered-table-cell table:number-columns-repeated="3"/>
          <table:table-cell table:style-name="ce0" office:value-type="string" calcext:value-type="string">
            <text:p>20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1.5">
            <text:p>477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347.6">
            <text:p>434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194">
            <text:p>0,192</text:p>
          </table:table-cell>
          <table:table-cell table:style-name="ce12N2" office:value-type="float" office:value="46.92">
            <text:p>46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23.9">
            <text:p>423,90</text:p>
          </table:table-cell>
          <table:table-cell table:style-name="ce12N2" office:value-type="float" office:value="4347.6">
            <text:p>4347,60</text:p>
          </table:table-cell>
          <table:table-cell table:style-name="ce12N2" office:value-type="float" office:value="521.72">
            <text:p>52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5964209140003425500100002050810093271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43">
            <text:p>307643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48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05973">
            <text:p>3,606</text:p>
          </table:table-cell>
          <table:table-cell table:style-name="ce12N2" office:value-type="float" office:value="435.56">
            <text:p>435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148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48.94">
            <text:p>25148,94</text:p>
          </table:table-cell>
          <table:table-cell table:style-name="ce12N2" office:value-type="float" office:value="1760.43">
            <text:p>176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48612380551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59">
            <text:p>307659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4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885">
            <text:p>0,029</text:p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1.1">
            <text:p>891,10</text:p>
          </table:table-cell>
          <table:table-cell table:style-name="ce12N2" office:value-type="float" office:value="62.37">
            <text:p>62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451237100001475500100001348119313687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88">
            <text:p>307688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13.8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18.3">
            <text:p>1301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12608.51">
            <text:p>12608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7304">
            <text:p>0,157</text:p>
          </table:table-cell>
          <table:table-cell table:style-name="ce12N2" office:value-type="float" office:value="172.38">
            <text:p>172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1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409.79">
            <text:p>409,79</text:p>
          </table:table-cell>
          <table:table-cell table:style-name="ce12N2" office:value-type="float" office:value="12608.51">
            <text:p>12608,51</text:p>
          </table:table-cell>
          <table:table-cell table:style-name="ce12N2" office:value-type="float" office:value="882.6">
            <text:p>88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4683374000300550030006138381226820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23">
            <text:p>307723</text:p>
          </table:table-cell>
          <table:table-cell table:style-name="ce0" table:number-columns-spanned="4" table:number-rows-spanned="1" office:value-type="string" calcext:value-type="string">
            <text:p>8.844 - COZIMAX MOVEIS MIRASSOL LTDA</text:p>
          </table:table-cell>
          <table:covered-table-cell table:number-columns-repeated="3"/>
          <table:table-cell table:style-name="ce0" office:value-type="string" calcext:value-type="string">
            <text:p>753.8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.64">
            <text:p>53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39.64">
            <text:p>539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08">
            <text:p>0,101</text:p>
          </table:table-cell>
          <table:table-cell table:style-name="ce12N2" office:value-type="float" office:value="9.2">
            <text:p>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9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08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0432010001005500100075388511189148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48">
            <text:p>30774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2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2.84">
            <text:p>51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00.2">
            <text:p>40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88">
            <text:p>0,022</text:p>
          </table:table-cell>
          <table:table-cell table:style-name="ce12N2" office:value-type="float" office:value="64">
            <text:p>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7.74">
            <text:p>27,7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32.1">
            <text:p>32,10</text:p>
          </table:table-cell>
          <table:table-cell table:style-name="ce12N2" office:value-type="float" office:value="400.2">
            <text:p>400,20</text:p>
          </table:table-cell>
          <table:table-cell table:style-name="ce12N2" office:value-type="float" office:value="16.01">
            <text:p>1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5.32">
            <text:p>445,32</text:p>
          </table:table-cell>
          <table:table-cell table:style-name="ce12N2" office:value-type="float" office:value="80.54">
            <text:p>80,54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2051140446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5">
            <text:p>30781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68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36">
            <text:p>0,003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5.16">
            <text:p>955,16</text:p>
          </table:table-cell>
          <table:table-cell table:style-name="ce12N2" office:value-type="float" office:value="66.86">
            <text:p>6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68516254461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4">
            <text:p>3078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0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29">
            <text:p>0,403</text:p>
          </table:table-cell>
          <table:table-cell table:style-name="ce12N2" office:value-type="float" office:value="20.4">
            <text:p>2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4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6.8">
            <text:p>4546,80</text:p>
          </table:table-cell>
          <table:table-cell table:style-name="ce12N2" office:value-type="float" office:value="318.28">
            <text:p>31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0411175397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7">
            <text:p>30782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16.05">
            <text:p>371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99.08">
            <text:p>359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83">
            <text:p>0,017</text:p>
          </table:table-cell>
          <table:table-cell table:style-name="ce12N2" office:value-type="float" office:value="8.41">
            <text:p>8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16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16.97">
            <text:p>116,97</text:p>
          </table:table-cell>
          <table:table-cell table:style-name="ce12N2" office:value-type="float" office:value="3599.08">
            <text:p>3599,08</text:p>
          </table:table-cell>
          <table:table-cell table:style-name="ce12N2" office:value-type="float" office:value="143.96">
            <text:p>14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6915811477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28">
            <text:p>30782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33.58">
            <text:p>1003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514.1">
            <text:p>9514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5">
            <text:p>0,020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3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519.48">
            <text:p>519,48</text:p>
          </table:table-cell>
          <table:table-cell table:style-name="ce12N2" office:value-type="float" office:value="9514.1">
            <text:p>9514,10</text:p>
          </table:table-cell>
          <table:table-cell table:style-name="ce12N2" office:value-type="float" office:value="380.56">
            <text:p>38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7215721587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6">
            <text:p>307846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23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063">
            <text:p>0,044</text:p>
          </table:table-cell>
          <table:table-cell table:style-name="ce12N2" office:value-type="float" office:value="10.31">
            <text:p>10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67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7.01">
            <text:p>1967,01</text:p>
          </table:table-cell>
          <table:table-cell table:style-name="ce12N2" office:value-type="float" office:value="137.69">
            <text:p>13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2351324832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7">
            <text:p>307847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9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393.68">
            <text:p>6839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">
            <text:p>71,00</text:p>
          </table:table-cell>
          <table:table-cell table:style-name="ce12N2" office:value-type="float" office:value="65231.14">
            <text:p>65231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46851">
            <text:p>1,947</text:p>
          </table:table-cell>
          <table:table-cell table:style-name="ce12N2" office:value-type="float" office:value="748.5">
            <text:p>74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.39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3162.54">
            <text:p>3162,54</text:p>
          </table:table-cell>
          <table:table-cell table:style-name="ce12N2" office:value-type="float" office:value="64947.12">
            <text:p>64947,12</text:p>
          </table:table-cell>
          <table:table-cell table:style-name="ce12N2" office:value-type="float" office:value="3325.85">
            <text:p>33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911915746736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8">
            <text:p>30784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245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66">
            <text:p>0,006</text:p>
          </table:table-cell>
          <table:table-cell table:style-name="ce12N2" office:value-type="float" office:value="3.06">
            <text:p>3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5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55.7">
            <text:p>2855,70</text:p>
          </table:table-cell>
          <table:table-cell table:style-name="ce12N2" office:value-type="float" office:value="199.9">
            <text:p>19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24514889120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49">
            <text:p>307849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40.924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.05">
            <text:p>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2">
            <text:p>0,002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90.35">
            <text:p>90,35</text:p>
          </table:table-cell>
          <table:table-cell table:style-name="ce12N2" office:value-type="float" office:value="3.61">
            <text:p>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8659200001005500400074092411171799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0">
            <text:p>307850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7.63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55.09">
            <text:p>655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6555.09">
            <text:p>6555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1552">
            <text:p>0,262</text:p>
          </table:table-cell>
          <table:table-cell table:style-name="ce12N2" office:value-type="float" office:value="47.4">
            <text:p>4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55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55.09">
            <text:p>6555,09</text:p>
          </table:table-cell>
          <table:table-cell table:style-name="ce12N2" office:value-type="float" office:value="458.86">
            <text:p>45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62935640001465500200033763512416339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1">
            <text:p>30785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9.1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81">
            <text:p>29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44">
            <text:p>27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56">
            <text:p>0,009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14.37">
            <text:p>14,37</text:p>
          </table:table-cell>
          <table:table-cell table:style-name="ce12N2" office:value-type="float" office:value="276.44">
            <text:p>276,44</text:p>
          </table:table-cell>
          <table:table-cell table:style-name="ce12N2" office:value-type="float" office:value="19.35">
            <text:p>1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911818436241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2">
            <text:p>30785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05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2">
            <text:p>357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140">
            <text:p>11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7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0561964876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4">
            <text:p>30785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5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75.61">
            <text:p>627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916.39">
            <text:p>591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29">
            <text:p>0,033</text:p>
          </table:table-cell>
          <table:table-cell table:style-name="ce12N2" office:value-type="float" office:value="284.1">
            <text:p>28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75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359.22">
            <text:p>359,22</text:p>
          </table:table-cell>
          <table:table-cell table:style-name="ce12N2" office:value-type="float" office:value="5916.39">
            <text:p>5916,39</text:p>
          </table:table-cell>
          <table:table-cell table:style-name="ce12N2" office:value-type="float" office:value="280.59">
            <text:p>28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57731570200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9">
            <text:p>30785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4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421288442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2">
            <text:p>307862</text:p>
          </table:table-cell>
          <table:table-cell table:style-name="ce0" table:number-columns-spanned="4" table:number-rows-spanned="1" office:value-type="string" calcext:value-type="string">
            <text:p>576 - BRASILUX INDUSTRIA COM IMP E EXP LTDA</text:p>
          </table:table-cell>
          <table:covered-table-cell table:number-columns-repeated="3"/>
          <table:table-cell table:style-name="ce0" office:value-type="string" calcext:value-type="string">
            <text:p>1.450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748.12">
            <text:p>10774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175.96">
            <text:p>9817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553028">
            <text:p>19,553</text:p>
          </table:table-cell>
          <table:table-cell table:style-name="ce12N2" office:value-type="float" office:value="2505">
            <text:p>250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7.74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9572.16">
            <text:p>9572,16</text:p>
          </table:table-cell>
          <table:table-cell table:style-name="ce12N2" office:value-type="float" office:value="98175.96">
            <text:p>98175,96</text:p>
          </table:table-cell>
          <table:table-cell table:style-name="ce12N2" office:value-type="float" office:value="6872.32">
            <text:p>687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03741210001015500100145007917252481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4">
            <text:p>3078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20.11">
            <text:p>772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77.1">
            <text:p>747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7">
            <text:p>0,031</text:p>
          </table:table-cell>
          <table:table-cell table:style-name="ce12N2" office:value-type="float" office:value="47.04">
            <text:p>47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2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243.01">
            <text:p>243,01</text:p>
          </table:table-cell>
          <table:table-cell table:style-name="ce12N2" office:value-type="float" office:value="7477.1">
            <text:p>7477,10</text:p>
          </table:table-cell>
          <table:table-cell table:style-name="ce12N2" office:value-type="float" office:value="523.4">
            <text:p>52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2811704102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5">
            <text:p>30786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.88">
            <text:p>54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1.6">
            <text:p>5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3">
            <text:p>0,003</text:p>
          </table:table-cell>
          <table:table-cell table:style-name="ce12N2" office:value-type="float" office:value="6.72">
            <text:p>6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8">
            <text:p>5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17.28">
            <text:p>17,28</text:p>
          </table:table-cell>
          <table:table-cell table:style-name="ce12N2" office:value-type="float" office:value="531.6">
            <text:p>531,60</text:p>
          </table:table-cell>
          <table:table-cell table:style-name="ce12N2" office:value-type="float" office:value="37.21">
            <text:p>3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4218078085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6">
            <text:p>307866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32">
            <text:p>2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0">
            <text:p>8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2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531994832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4">
            <text:p>3078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4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3.82">
            <text:p>316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0.72">
            <text:p>297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344">
            <text:p>0,025</text:p>
          </table:table-cell>
          <table:table-cell table:style-name="ce12N2" office:value-type="float" office:value="14.4">
            <text:p>1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3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93.1">
            <text:p>193,10</text:p>
          </table:table-cell>
          <table:table-cell table:style-name="ce12N2" office:value-type="float" office:value="2970.72">
            <text:p>2970,72</text:p>
          </table:table-cell>
          <table:table-cell table:style-name="ce12N2" office:value-type="float" office:value="118.83">
            <text:p>11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49918035506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5">
            <text:p>3078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96.51">
            <text:p>1859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437.22">
            <text:p>18437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9456">
            <text:p>0,069</text:p>
          </table:table-cell>
          <table:table-cell table:style-name="ce12N2" office:value-type="float" office:value="62.14">
            <text:p>6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96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59.29">
            <text:p>159,29</text:p>
          </table:table-cell>
          <table:table-cell table:style-name="ce12N2" office:value-type="float" office:value="18437.22">
            <text:p>18437,22</text:p>
          </table:table-cell>
          <table:table-cell table:style-name="ce12N2" office:value-type="float" office:value="737.49">
            <text:p>73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017591236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6">
            <text:p>3078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91.6">
            <text:p>419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91.6">
            <text:p>419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3">
            <text:p>0,009</text:p>
          </table:table-cell>
          <table:table-cell table:style-name="ce12N2" office:value-type="float" office:value="22.08">
            <text:p>2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9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77.89">
            <text:p>3077,89</text:p>
          </table:table-cell>
          <table:table-cell table:style-name="ce12N2" office:value-type="float" office:value="215.45">
            <text:p>21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412875320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9">
            <text:p>307899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2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">
            <text:p>0,005</text:p>
          </table:table-cell>
          <table:table-cell table:style-name="ce12N2" office:value-type="float" office:value="15.2">
            <text:p>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1">
            <text:p>1941,00</text:p>
          </table:table-cell>
          <table:table-cell table:style-name="ce12N2" office:value-type="float" office:value="135.87">
            <text:p>13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61144150000678550010012722281393110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6">
            <text:p>30790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664.14">
            <text:p>1766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561.76">
            <text:p>17561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4">
            <text:p>0,068</text:p>
          </table:table-cell>
          <table:table-cell table:style-name="ce12N2" office:value-type="float" office:value="45.46">
            <text:p>45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66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02.38">
            <text:p>102,38</text:p>
          </table:table-cell>
          <table:table-cell table:style-name="ce12N2" office:value-type="float" office:value="17561.76">
            <text:p>17561,76</text:p>
          </table:table-cell>
          <table:table-cell table:style-name="ce12N2" office:value-type="float" office:value="749.73">
            <text:p>74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21135587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7">
            <text:p>30790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54.66">
            <text:p>1125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567.76">
            <text:p>1056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92">
            <text:p>0,081</text:p>
          </table:table-cell>
          <table:table-cell table:style-name="ce12N2" office:value-type="float" office:value="17.49">
            <text:p>17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5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686.9">
            <text:p>686,90</text:p>
          </table:table-cell>
          <table:table-cell table:style-name="ce12N2" office:value-type="float" office:value="10567.76">
            <text:p>10567,76</text:p>
          </table:table-cell>
          <table:table-cell table:style-name="ce12N2" office:value-type="float" office:value="739.74">
            <text:p>73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117796189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8">
            <text:p>3079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5.56">
            <text:p>284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5.56">
            <text:p>284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888">
            <text:p>0,007</text:p>
          </table:table-cell>
          <table:table-cell table:style-name="ce12N2" office:value-type="float" office:value="4.74">
            <text:p>4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5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45.56">
            <text:p>2845,56</text:p>
          </table:table-cell>
          <table:table-cell table:style-name="ce12N2" office:value-type="float" office:value="113.82">
            <text:p>113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311497791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09">
            <text:p>30790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35.2">
            <text:p>194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435.2">
            <text:p>1943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01">
            <text:p>0,001</text:p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35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35.2">
            <text:p>19435,20</text:p>
          </table:table-cell>
          <table:table-cell table:style-name="ce12N2" office:value-type="float" office:value="1360.46">
            <text:p>136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61627295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0">
            <text:p>30791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2.5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6.64">
            <text:p>167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6.64">
            <text:p>167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2">
            <text:p>0,004</text:p>
          </table:table-cell>
          <table:table-cell table:style-name="ce12N2" office:value-type="float" office:value="8.83">
            <text:p>8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1.16">
            <text:p>1231,16</text:p>
          </table:table-cell>
          <table:table-cell table:style-name="ce12N2" office:value-type="float" office:value="86.18">
            <text:p>8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250511910763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5">
            <text:p>3079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9.52">
            <text:p>70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1.74">
            <text:p>69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26">
            <text:p>0,002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9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7.78">
            <text:p>17,78</text:p>
          </table:table-cell>
          <table:table-cell table:style-name="ce12N2" office:value-type="float" office:value="691.74">
            <text:p>691,74</text:p>
          </table:table-cell>
          <table:table-cell table:style-name="ce12N2" office:value-type="float" office:value="48.42">
            <text:p>4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011163363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6">
            <text:p>307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4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79.14">
            <text:p>1257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79.14">
            <text:p>12579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23">
            <text:p>0,155</text:p>
          </table:table-cell>
          <table:table-cell table:style-name="ce12N2" office:value-type="float" office:value="15.98">
            <text:p>15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579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79.14">
            <text:p>12579,14</text:p>
          </table:table-cell>
          <table:table-cell table:style-name="ce12N2" office:value-type="float" office:value="880.54">
            <text:p>88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115500653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7">
            <text:p>30791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6.48">
            <text:p>462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26.48">
            <text:p>462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556">
            <text:p>0,116</text:p>
          </table:table-cell>
          <table:table-cell table:style-name="ce12N2" office:value-type="float" office:value="19.82">
            <text:p>19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26.48">
            <text:p>4626,48</text:p>
          </table:table-cell>
          <table:table-cell table:style-name="ce12N2" office:value-type="float" office:value="323.85">
            <text:p>32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21946225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8">
            <text:p>3079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36.09">
            <text:p>733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64.36">
            <text:p>7164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31">
            <text:p>0,032</text:p>
          </table:table-cell>
          <table:table-cell table:style-name="ce12N2" office:value-type="float" office:value="14.57">
            <text:p>14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3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171.73">
            <text:p>171,73</text:p>
          </table:table-cell>
          <table:table-cell table:style-name="ce12N2" office:value-type="float" office:value="7164.36">
            <text:p>7164,36</text:p>
          </table:table-cell>
          <table:table-cell table:style-name="ce12N2" office:value-type="float" office:value="365.84">
            <text:p>36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31934407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19">
            <text:p>307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28.09">
            <text:p>1692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642.24">
            <text:p>1664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1512">
            <text:p>0,112</text:p>
          </table:table-cell>
          <table:table-cell table:style-name="ce12N2" office:value-type="float" office:value="29.84">
            <text:p>29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2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85.85">
            <text:p>285,85</text:p>
          </table:table-cell>
          <table:table-cell table:style-name="ce12N2" office:value-type="float" office:value="16642.24">
            <text:p>16642,24</text:p>
          </table:table-cell>
          <table:table-cell table:style-name="ce12N2" office:value-type="float" office:value="1164.96">
            <text:p>116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41568815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0">
            <text:p>307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99.9">
            <text:p>18399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676.84">
            <text:p>17676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792">
            <text:p>0,110</text:p>
          </table:table-cell>
          <table:table-cell table:style-name="ce12N2" office:value-type="float" office:value="38.67">
            <text:p>38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99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723.06">
            <text:p>723,06</text:p>
          </table:table-cell>
          <table:table-cell table:style-name="ce12N2" office:value-type="float" office:value="17676.84">
            <text:p>17676,84</text:p>
          </table:table-cell>
          <table:table-cell table:style-name="ce12N2" office:value-type="float" office:value="1062.83">
            <text:p>106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51868341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1">
            <text:p>3079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5105.76">
            <text:p>44510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">
            <text:p>93,00</text:p>
          </table:table-cell>
          <table:table-cell table:style-name="ce12N2" office:value-type="float" office:value="441507.04">
            <text:p>44150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661168">
            <text:p>11,661</text:p>
          </table:table-cell>
          <table:table-cell table:style-name="ce12N2" office:value-type="float" office:value="1849.21">
            <text:p>1849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5.105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598.72">
            <text:p>3598,72</text:p>
          </table:table-cell>
          <table:table-cell table:style-name="ce12N2" office:value-type="float" office:value="435689.29">
            <text:p>435689,29</text:p>
          </table:table-cell>
          <table:table-cell table:style-name="ce12N2" office:value-type="float" office:value="26553.19">
            <text:p>2655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612198852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23">
            <text:p>307923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3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140.16">
            <text:p>3614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6140.16">
            <text:p>36140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99">
            <text:p>0,980</text:p>
          </table:table-cell>
          <table:table-cell table:style-name="ce12N2" office:value-type="float" office:value="404.02">
            <text:p>404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14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140.16">
            <text:p>36140,16</text:p>
          </table:table-cell>
          <table:table-cell table:style-name="ce12N2" office:value-type="float" office:value="2529.78">
            <text:p>252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4512371000014755001000013622111019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2">
            <text:p>30793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6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58.73">
            <text:p>130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2215.23">
            <text:p>12215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482">
            <text:p>0,090</text:p>
          </table:table-cell>
          <table:table-cell table:style-name="ce12N2" office:value-type="float" office:value="214.79">
            <text:p>214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058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843.5">
            <text:p>843,50</text:p>
          </table:table-cell>
          <table:table-cell table:style-name="ce12N2" office:value-type="float" office:value="12215.23">
            <text:p>12215,23</text:p>
          </table:table-cell>
          <table:table-cell table:style-name="ce12N2" office:value-type="float" office:value="562.95">
            <text:p>562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624015701755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37">
            <text:p>30793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15.2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21.98">
            <text:p>14921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860.3">
            <text:p>1486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508">
            <text:p>1,751</text:p>
          </table:table-cell>
          <table:table-cell table:style-name="ce12N2" office:value-type="float" office:value="933.2">
            <text:p>93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921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61.68">
            <text:p>61,68</text:p>
          </table:table-cell>
          <table:table-cell table:style-name="ce12N2" office:value-type="float" office:value="14860.3">
            <text:p>14860,30</text:p>
          </table:table-cell>
          <table:table-cell table:style-name="ce12N2" office:value-type="float" office:value="1040.22">
            <text:p>10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6427740012095500100021520214108742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47">
            <text:p>307947</text:p>
          </table:table-cell>
          <table:table-cell table:style-name="ce0" table:number-columns-spanned="4" table:number-rows-spanned="1" office:value-type="string" calcext:value-type="string">
            <text:p>629 - PLASTCOR DO BRASIL LTDA</text:p>
          </table:table-cell>
          <table:covered-table-cell table:number-columns-repeated="3"/>
          <table:table-cell table:style-name="ce0" office:value-type="string" calcext:value-type="string">
            <text:p>373.50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01.6">
            <text:p>960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9348.88">
            <text:p>934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98028">
            <text:p>3,098</text:p>
          </table:table-cell>
          <table:table-cell table:style-name="ce12N2" office:value-type="float" office:value="154.68">
            <text:p>154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0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52.72">
            <text:p>252,72</text:p>
          </table:table-cell>
          <table:table-cell table:style-name="ce12N2" office:value-type="float" office:value="9348.88">
            <text:p>9348,88</text:p>
          </table:table-cell>
          <table:table-cell table:style-name="ce12N2" office:value-type="float" office:value="609.84">
            <text:p>6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4704457000138550040003735091928895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0">
            <text:p>307950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8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9.09">
            <text:p>159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48.75">
            <text:p>154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">
            <text:p>0,007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9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50.34">
            <text:p>50,34</text:p>
          </table:table-cell>
          <table:table-cell table:style-name="ce12N2" office:value-type="float" office:value="1548.75">
            <text:p>1548,75</text:p>
          </table:table-cell>
          <table:table-cell table:style-name="ce12N2" office:value-type="float" office:value="108.41">
            <text:p>10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8741481302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1">
            <text:p>307951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2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454.44">
            <text:p>11345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9883.23">
            <text:p>109883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.58192">
            <text:p>27,582</text:p>
          </table:table-cell>
          <table:table-cell table:style-name="ce12N2" office:value-type="float" office:value="5167.5">
            <text:p>516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3.454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571.21">
            <text:p>3571,21</text:p>
          </table:table-cell>
          <table:table-cell table:style-name="ce12N2" office:value-type="float" office:value="109883.23">
            <text:p>109883,23</text:p>
          </table:table-cell>
          <table:table-cell table:style-name="ce12N2" office:value-type="float" office:value="7691.83">
            <text:p>769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88674080000373550010000062791575112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3">
            <text:p>307953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2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16.63">
            <text:p>1441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62.84">
            <text:p>1396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31518">
            <text:p>5,132</text:p>
          </table:table-cell>
          <table:table-cell table:style-name="ce12N2" office:value-type="float" office:value="803.25">
            <text:p>80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16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453.79">
            <text:p>453,79</text:p>
          </table:table-cell>
          <table:table-cell table:style-name="ce12N2" office:value-type="float" office:value="13962.84">
            <text:p>13962,84</text:p>
          </table:table-cell>
          <table:table-cell table:style-name="ce12N2" office:value-type="float" office:value="977.4">
            <text:p>97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88674080000373550010000062831575112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4">
            <text:p>307954</text:p>
          </table:table-cell>
          <table:table-cell table:style-name="ce0" table:number-columns-spanned="4" table:number-rows-spanned="1" office:value-type="string" calcext:value-type="string">
            <text:p>32.363 - TRAMONTINA ELETRIK S.A.</text:p>
          </table:table-cell>
          <table:covered-table-cell table:number-columns-repeated="3"/>
          <table:table-cell table:style-name="ce0" office:value-type="string" calcext:value-type="string">
            <text:p>6.2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782.05">
            <text:p>12678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2791.33">
            <text:p>122791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850963">
            <text:p>24,851</text:p>
          </table:table-cell>
          <table:table-cell table:style-name="ce12N2" office:value-type="float" office:value="5607.96">
            <text:p>5607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.782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990.72">
            <text:p>3990,72</text:p>
          </table:table-cell>
          <table:table-cell table:style-name="ce12N2" office:value-type="float" office:value="122791.33">
            <text:p>122791,33</text:p>
          </table:table-cell>
          <table:table-cell table:style-name="ce12N2" office:value-type="float" office:value="8595.4">
            <text:p>859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886740800003735500100000628415751128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5">
            <text:p>30795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4.2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7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74.76">
            <text:p>8474,76</text:p>
          </table:table-cell>
          <table:table-cell table:style-name="ce12N2" office:value-type="float" office:value="593.23">
            <text:p>59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42281574571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56">
            <text:p>30795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4.4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525.36">
            <text:p>5452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44813.12">
            <text:p>4481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525808">
            <text:p>7,526</text:p>
          </table:table-cell>
          <table:table-cell table:style-name="ce12N2" office:value-type="float" office:value="751.49">
            <text:p>751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525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894.88">
            <text:p>2894,88</text:p>
          </table:table-cell>
          <table:table-cell table:style-name="ce12N2" office:value-type="float" office:value="42977.89">
            <text:p>42977,89</text:p>
          </table:table-cell>
          <table:table-cell table:style-name="ce12N2" office:value-type="float" office:value="1782.08">
            <text:p>178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8037.94">
            <text:p>38037,94</text:p>
          </table:table-cell>
          <table:table-cell table:style-name="ce12N2" office:value-type="float" office:value="6817.36">
            <text:p>6817,3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443411512003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98">
            <text:p>307998</text:p>
          </table:table-cell>
          <table:table-cell table:style-name="ce0" table:number-columns-spanned="4" table:number-rows-spanned="1" office:value-type="string" calcext:value-type="string">
            <text:p>584 - PONTO DAS DUCHAS COMERCIO E INDUSTRIA LTDA</text:p>
          </table:table-cell>
          <table:covered-table-cell table:number-columns-repeated="3"/>
          <table:table-cell table:style-name="ce0" office:value-type="string" calcext:value-type="string">
            <text:p>5.7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065.8">
            <text:p>4706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7065.8">
            <text:p>4706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6994">
            <text:p>1,470</text:p>
          </table:table-cell>
          <table:table-cell table:style-name="ce12N2" office:value-type="float" office:value="512.26">
            <text:p>512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06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065.8">
            <text:p>47065,80</text:p>
          </table:table-cell>
          <table:table-cell table:style-name="ce12N2" office:value-type="float" office:value="1388.44">
            <text:p>138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01130182000188550010000057711309846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4">
            <text:p>308014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5.6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626.44">
            <text:p>14162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41626.44">
            <text:p>14162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676545">
            <text:p>14,677</text:p>
          </table:table-cell>
          <table:table-cell table:style-name="ce12N2" office:value-type="float" office:value="2098.89">
            <text:p>2098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1.62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626.44">
            <text:p>141626,44</text:p>
          </table:table-cell>
          <table:table-cell table:style-name="ce12N2" office:value-type="float" office:value="9913.85">
            <text:p>99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56481567176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5">
            <text:p>308015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5.6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8030.37">
            <text:p>42803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28030.37">
            <text:p>42803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64.5743">
            <text:p>764,574</text:p>
          </table:table-cell>
          <table:table-cell table:style-name="ce12N2" office:value-type="float" office:value="7156.7">
            <text:p>7156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8.030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8030.37">
            <text:p>428030,37</text:p>
          </table:table-cell>
          <table:table-cell table:style-name="ce12N2" office:value-type="float" office:value="29962.13">
            <text:p>2996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565012523439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8">
            <text:p>30801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0.15">
            <text:p>749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33">
            <text:p>703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">
            <text:p>0,000</text:p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0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57.15">
            <text:p>457,15</text:p>
          </table:table-cell>
          <table:table-cell table:style-name="ce12N2" office:value-type="float" office:value="7033">
            <text:p>7033,00</text:p>
          </table:table-cell>
          <table:table-cell table:style-name="ce12N2" office:value-type="float" office:value="492.31">
            <text:p>4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61772660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0">
            <text:p>308020</text:p>
          </table:table-cell>
          <table:table-cell table:style-name="ce0" table:number-columns-spanned="4" table:number-rows-spanned="1" office:value-type="string" calcext:value-type="string">
            <text:p>5.133 - CIA IND H CARLOS SCHNEIDER</text:p>
          </table:table-cell>
          <table:covered-table-cell table:number-columns-repeated="3"/>
          <table:table-cell table:style-name="ce0" office:value-type="string" calcext:value-type="string">
            <text:p>2.272.9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49.85">
            <text:p>3564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31713.92">
            <text:p>31713,92</text:p>
          </table:table-cell>
          <table:table-cell table:style-name="ce12N2" office:value-type="float" office:value="1760.13">
            <text:p>1760,13</text:p>
          </table:table-cell>
          <table:table-cell table:style-name="ce12N3" office:value-type="float" office:value="0.144621">
            <text:p>0,145</text:p>
          </table:table-cell>
          <table:table-cell table:style-name="ce12N2" office:value-type="float" office:value="227.72">
            <text:p>22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64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.69">
            <text:p>56,6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175.8">
            <text:p>2175,80</text:p>
          </table:table-cell>
          <table:table-cell table:style-name="ce12N2" office:value-type="float" office:value="33474.05">
            <text:p>33474,05</text:p>
          </table:table-cell>
          <table:table-cell table:style-name="ce12N2" office:value-type="float" office:value="2333.49">
            <text:p>233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4709955001265550010022729501184351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1">
            <text:p>308021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30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8.63">
            <text:p>3548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8.63">
            <text:p>3548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1734">
            <text:p>0,342</text:p>
          </table:table-cell>
          <table:table-cell table:style-name="ce12N2" office:value-type="float" office:value="342">
            <text:p>3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48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48.63">
            <text:p>3548,63</text:p>
          </table:table-cell>
          <table:table-cell table:style-name="ce12N2" office:value-type="float" office:value="248.4">
            <text:p>24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301207265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2">
            <text:p>30802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31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783.58">
            <text:p>25578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254587.36">
            <text:p>25458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543016">
            <text:p>20,543</text:p>
          </table:table-cell>
          <table:table-cell table:style-name="ce12N2" office:value-type="float" office:value="27385.1">
            <text:p>2738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.78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96.22">
            <text:p>1196,22</text:p>
          </table:table-cell>
          <table:table-cell table:style-name="ce12N2" office:value-type="float" office:value="254587.36">
            <text:p>254587,36</text:p>
          </table:table-cell>
          <table:table-cell table:style-name="ce12N2" office:value-type="float" office:value="17821.12">
            <text:p>1782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3111752417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4">
            <text:p>30802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285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881.85">
            <text:p>13288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1387.76">
            <text:p>131387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182212">
            <text:p>19,182</text:p>
          </table:table-cell>
          <table:table-cell table:style-name="ce12N2" office:value-type="float" office:value="29152.4">
            <text:p>2915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2.88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494.09">
            <text:p>1494,09</text:p>
          </table:table-cell>
          <table:table-cell table:style-name="ce12N2" office:value-type="float" office:value="131387.76">
            <text:p>131387,76</text:p>
          </table:table-cell>
          <table:table-cell table:style-name="ce12N2" office:value-type="float" office:value="9197.14">
            <text:p>919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28516836611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5">
            <text:p>30802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2.48">
            <text:p>369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6.25">
            <text:p>3576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875">
            <text:p>0,033</text:p>
          </table:table-cell>
          <table:table-cell table:style-name="ce12N2" office:value-type="float" office:value="3.75">
            <text:p>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6.23">
            <text:p>116,23</text:p>
          </table:table-cell>
          <table:table-cell table:style-name="ce12N2" office:value-type="float" office:value="3576.25">
            <text:p>3576,25</text:p>
          </table:table-cell>
          <table:table-cell table:style-name="ce12N2" office:value-type="float" office:value="250.34">
            <text:p>25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261855007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6">
            <text:p>30802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0821.32">
            <text:p>32082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">
            <text:p>106,00</text:p>
          </table:table-cell>
          <table:table-cell table:style-name="ce12N2" office:value-type="float" office:value="299635.29">
            <text:p>299635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09.717298">
            <text:p>709,717</text:p>
          </table:table-cell>
          <table:table-cell table:style-name="ce12N2" office:value-type="float" office:value="1826.71">
            <text:p>1826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0.821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1186.03">
            <text:p>21186,03</text:p>
          </table:table-cell>
          <table:table-cell table:style-name="ce12N2" office:value-type="float" office:value="299635.29">
            <text:p>299635,29</text:p>
          </table:table-cell>
          <table:table-cell table:style-name="ce12N2" office:value-type="float" office:value="20082.92">
            <text:p>2008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0913296226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7">
            <text:p>308027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340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59.89">
            <text:p>88659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7614.3">
            <text:p>8761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8.651636">
            <text:p>18,652</text:p>
          </table:table-cell>
          <table:table-cell table:style-name="ce12N2" office:value-type="float" office:value="28773.2">
            <text:p>2877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.659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045.59">
            <text:p>1045,59</text:p>
          </table:table-cell>
          <table:table-cell table:style-name="ce12N2" office:value-type="float" office:value="87614.3">
            <text:p>87614,30</text:p>
          </table:table-cell>
          <table:table-cell table:style-name="ce12N2" office:value-type="float" office:value="6133">
            <text:p>613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34010726547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28">
            <text:p>308028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0.51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151.17">
            <text:p>9015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9288.6">
            <text:p>8928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633168">
            <text:p>17,633</text:p>
          </table:table-cell>
          <table:table-cell table:style-name="ce12N2" office:value-type="float" office:value="29055.16">
            <text:p>29055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.151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62.57">
            <text:p>862,57</text:p>
          </table:table-cell>
          <table:table-cell table:style-name="ce12N2" office:value-type="float" office:value="89288.6">
            <text:p>89288,60</text:p>
          </table:table-cell>
          <table:table-cell table:style-name="ce12N2" office:value-type="float" office:value="6250.21">
            <text:p>625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05161566829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43">
            <text:p>308043</text:p>
          </table:table-cell>
          <table:table-cell table:style-name="ce0" table:number-columns-spanned="4" table:number-rows-spanned="1" office:value-type="string" calcext:value-type="string">
            <text:p>541 - FAME FABRICA DE APARELHOS ELETRICOS LTDA</text:p>
          </table:table-cell>
          <table:covered-table-cell table:number-columns-repeated="3"/>
          <table:table-cell table:style-name="ce0" office:value-type="string" calcext:value-type="string">
            <text:p>497.99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.9">
            <text:p>12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22.22">
            <text:p>12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28">
            <text:p>0,004</text:p>
          </table:table-cell>
          <table:table-cell table:style-name="ce12N2" office:value-type="float" office:value="0.62">
            <text:p>0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0.68">
            <text:p>0,68</text:p>
          </table:table-cell>
          <table:table-cell table:style-name="ce12N2" office:value-type="float" office:value="122.22">
            <text:p>122,22</text:p>
          </table:table-cell>
          <table:table-cell table:style-name="ce12N2" office:value-type="float" office:value="8.56">
            <text:p>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620366000195550020004979971120775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44">
            <text:p>308044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24.9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70.72">
            <text:p>2407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3696.04">
            <text:p>23696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5878">
            <text:p>0,806</text:p>
          </table:table-cell>
          <table:table-cell table:style-name="ce12N2" office:value-type="float" office:value="1929.25">
            <text:p>1929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7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374.68">
            <text:p>374,68</text:p>
          </table:table-cell>
          <table:table-cell table:style-name="ce12N2" office:value-type="float" office:value="23696.04">
            <text:p>23696,04</text:p>
          </table:table-cell>
          <table:table-cell table:style-name="ce12N2" office:value-type="float" office:value="1107.89">
            <text:p>110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0648380165605500100052491615230290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45">
            <text:p>308045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2.8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58.06">
            <text:p>265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74.39">
            <text:p>2574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867">
            <text:p>0,099</text:p>
          </table:table-cell>
          <table:table-cell table:style-name="ce12N2" office:value-type="float" office:value="9.73">
            <text:p>9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58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3.67">
            <text:p>83,67</text:p>
          </table:table-cell>
          <table:table-cell table:style-name="ce12N2" office:value-type="float" office:value="2574.39">
            <text:p>2574,39</text:p>
          </table:table-cell>
          <table:table-cell table:style-name="ce12N2" office:value-type="float" office:value="180.21">
            <text:p>18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8374570001875500100036285613373530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5">
            <text:p>30805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8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1.36">
            <text:p>333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26.5">
            <text:p>322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271">
            <text:p>0,043</text:p>
          </table:table-cell>
          <table:table-cell table:style-name="ce12N2" office:value-type="float" office:value="22.53">
            <text:p>22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3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04.86">
            <text:p>104,86</text:p>
          </table:table-cell>
          <table:table-cell table:style-name="ce12N2" office:value-type="float" office:value="3226.5">
            <text:p>3226,50</text:p>
          </table:table-cell>
          <table:table-cell table:style-name="ce12N2" office:value-type="float" office:value="225.86">
            <text:p>22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87511149356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6">
            <text:p>308056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4.4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99.22">
            <text:p>1319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442.2">
            <text:p>944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24412">
            <text:p>4,524</text:p>
          </table:table-cell>
          <table:table-cell table:style-name="ce12N2" office:value-type="float" office:value="41.56">
            <text:p>41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99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96.33">
            <text:p>896,33</text:p>
          </table:table-cell>
          <table:table-cell table:style-name="ce12N2" office:value-type="float" office:value="8672.1">
            <text:p>8672,10</text:p>
          </table:table-cell>
          <table:table-cell table:style-name="ce12N2" office:value-type="float" office:value="346.89">
            <text:p>34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961.46">
            <text:p>15961,46</text:p>
          </table:table-cell>
          <table:table-cell table:style-name="ce12N2" office:value-type="float" office:value="2860.69">
            <text:p>2860,6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443813006386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60">
            <text:p>30806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12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0.93">
            <text:p>59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4.86">
            <text:p>554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06">
            <text:p>0,001</text:p>
          </table:table-cell>
          <table:table-cell table:style-name="ce12N2" office:value-type="float" office:value="0.87">
            <text:p>0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36.07">
            <text:p>36,07</text:p>
          </table:table-cell>
          <table:table-cell table:style-name="ce12N2" office:value-type="float" office:value="554.86">
            <text:p>554,86</text:p>
          </table:table-cell>
          <table:table-cell table:style-name="ce12N2" office:value-type="float" office:value="22.19">
            <text:p>2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1271425379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1">
            <text:p>30808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9.57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7.35">
            <text:p>800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67406">
            <text:p>2,367</text:p>
          </table:table-cell>
          <table:table-cell table:style-name="ce12N2" office:value-type="float" office:value="8064">
            <text:p>80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0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14.36">
            <text:p>6714,36</text:p>
          </table:table-cell>
          <table:table-cell table:style-name="ce12N2" office:value-type="float" office:value="6.71">
            <text:p>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43">
            <text:p>60,4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1.71">
            <text:p>51,71</text:p>
          </table:table-cell>
          <table:table-cell table:style-name="ce12N2" office:value-type="float" office:value="7955.64">
            <text:p>7955,64</text:p>
          </table:table-cell>
          <table:table-cell table:style-name="ce12N2" office:value-type="float" office:value="556.89">
            <text:p>556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95701117805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4">
            <text:p>3080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5.6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026.6">
            <text:p>2620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2026.6">
            <text:p>26202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4.63317">
            <text:p>34,633</text:p>
          </table:table-cell>
          <table:table-cell table:style-name="ce12N2" office:value-type="float" office:value="13325.4">
            <text:p>1332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2.0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8277.58">
            <text:p>228277,58</text:p>
          </table:table-cell>
          <table:table-cell table:style-name="ce12N2" office:value-type="float" office:value="228.28">
            <text:p>22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54.5">
            <text:p>2054,5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026.6">
            <text:p>262026,60</text:p>
          </table:table-cell>
          <table:table-cell table:style-name="ce12N2" office:value-type="float" office:value="10481.06">
            <text:p>1048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564916511099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5">
            <text:p>308085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71.554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484.34">
            <text:p>8448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82627.22">
            <text:p>82627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4.609874">
            <text:p>44,610</text:p>
          </table:table-cell>
          <table:table-cell table:style-name="ce12N2" office:value-type="float" office:value="3697.89">
            <text:p>3697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484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735.31">
            <text:p>69735,31</text:p>
          </table:table-cell>
          <table:table-cell table:style-name="ce12N2" office:value-type="float" office:value="69.72">
            <text:p>6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7.63">
            <text:p>627,63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857.12">
            <text:p>1857,12</text:p>
          </table:table-cell>
          <table:table-cell table:style-name="ce12N2" office:value-type="float" office:value="82627.22">
            <text:p>82627,22</text:p>
          </table:table-cell>
          <table:table-cell table:style-name="ce12N2" office:value-type="float" office:value="5783.91">
            <text:p>5783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5617190095035502100197155411651891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7">
            <text:p>30808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6.9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402.21">
            <text:p>2240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806.81">
            <text:p>20806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1796">
            <text:p>0,818</text:p>
          </table:table-cell>
          <table:table-cell table:style-name="ce12N2" office:value-type="float" office:value="90.5">
            <text:p>9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402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60.43">
            <text:p>17560,43</text:p>
          </table:table-cell>
          <table:table-cell table:style-name="ce12N2" office:value-type="float" office:value="17.56">
            <text:p>1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.04">
            <text:p>158,04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595.4">
            <text:p>1595,40</text:p>
          </table:table-cell>
          <table:table-cell table:style-name="ce12N2" office:value-type="float" office:value="20806.81">
            <text:p>20806,81</text:p>
          </table:table-cell>
          <table:table-cell table:style-name="ce12N2" office:value-type="float" office:value="1456.48">
            <text:p>145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692415704394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0">
            <text:p>308090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77.25">
            <text:p>2447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856.97">
            <text:p>2385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9496">
            <text:p>0,895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477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134.68">
            <text:p>20134,68</text:p>
          </table:table-cell>
          <table:table-cell table:style-name="ce12N2" office:value-type="float" office:value="20.13">
            <text:p>2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21">
            <text:p>181,21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20.28">
            <text:p>620,28</text:p>
          </table:table-cell>
          <table:table-cell table:style-name="ce12N2" office:value-type="float" office:value="23856.97">
            <text:p>23856,97</text:p>
          </table:table-cell>
          <table:table-cell table:style-name="ce12N2" office:value-type="float" office:value="1669.99">
            <text:p>166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31932554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1">
            <text:p>308091</text:p>
          </table:table-cell>
          <table:table-cell table:style-name="ce0" table:number-columns-spanned="4" table:number-rows-spanned="1" office:value-type="string" calcext:value-type="string">
            <text:p>33.509 - NEIMAR ANTONIO COLPANI LTDA</text:p>
          </table:table-cell>
          <table:covered-table-cell table:number-columns-repeated="3"/>
          <table:table-cell table:style-name="ce0" office:value-type="string" calcext:value-type="string">
            <text:p>16.3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73.56">
            <text:p>8173,56</text:p>
          </table:table-cell>
          <table:table-cell table:style-name="ce12N2" office:value-type="float" office:value="674.24">
            <text:p>674,24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590.52">
            <text:p>859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137">
            <text:p>2,514</text:p>
          </table:table-cell>
          <table:table-cell table:style-name="ce12N2" office:value-type="float" office:value="144">
            <text:p>14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7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629.88">
            <text:p>6629,88</text:p>
          </table:table-cell>
          <table:table-cell table:style-name="ce12N2" office:value-type="float" office:value="6.63">
            <text:p>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.67">
            <text:p>59,6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57.28">
            <text:p>257,28</text:p>
          </table:table-cell>
          <table:table-cell table:style-name="ce12N2" office:value-type="float" office:value="7916.28">
            <text:p>7916,28</text:p>
          </table:table-cell>
          <table:table-cell table:style-name="ce12N2" office:value-type="float" office:value="554.14">
            <text:p>55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50811220001805500100001631110001407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2">
            <text:p>30809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1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0.4">
            <text:p>53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0.4">
            <text:p>53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5">
            <text:p>0,068</text:p>
          </table:table-cell>
          <table:table-cell table:style-name="ce12N2" office:value-type="float" office:value="5.76">
            <text:p>5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.64">
            <text:p>447,64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03">
            <text:p>4,03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0.4">
            <text:p>530,40</text:p>
          </table:table-cell>
          <table:table-cell table:style-name="ce12N2" office:value-type="float" office:value="37.13">
            <text:p>3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1912451613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3">
            <text:p>308093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9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7.91">
            <text:p>231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88.16">
            <text:p>2288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">
            <text:p>7,200</text:p>
          </table:table-cell>
          <table:table-cell table:style-name="ce12N2" office:value-type="float" office:value="8.64">
            <text:p>8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7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16.34">
            <text:p>1916,34</text:p>
          </table:table-cell>
          <table:table-cell table:style-name="ce12N2" office:value-type="float" office:value="1.92">
            <text:p>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25">
            <text:p>17,25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9.75">
            <text:p>29,75</text:p>
          </table:table-cell>
          <table:table-cell table:style-name="ce12N2" office:value-type="float" office:value="2288.16">
            <text:p>2288,16</text:p>
          </table:table-cell>
          <table:table-cell table:style-name="ce12N2" office:value-type="float" office:value="160.17">
            <text:p>16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45422380001785500100009697810009678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4">
            <text:p>30809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8.39">
            <text:p>97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1.8">
            <text:p>9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3">
            <text:p>0,004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8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6.41">
            <text:p>786,41</text:p>
          </table:table-cell>
          <table:table-cell table:style-name="ce12N2" office:value-type="float" office:value="0.79">
            <text:p>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08">
            <text:p>7,0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46.59">
            <text:p>46,59</text:p>
          </table:table-cell>
          <table:table-cell table:style-name="ce12N2" office:value-type="float" office:value="931.8">
            <text:p>931,80</text:p>
          </table:table-cell>
          <table:table-cell table:style-name="ce12N2" office:value-type="float" office:value="65.23">
            <text:p>6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281021736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5">
            <text:p>30809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2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3.26">
            <text:p>132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5.7">
            <text:p>120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3">
            <text:p>0,001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3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7.58">
            <text:p>1017,58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6">
            <text:p>9,16</text:p>
          </table:table-cell>
          <table:table-cell table:style-name="ce12N2" office:value-type="float" office:value="54.76">
            <text:p>54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7.56">
            <text:p>117,56</text:p>
          </table:table-cell>
          <table:table-cell table:style-name="ce12N2" office:value-type="float" office:value="1205.7">
            <text:p>1205,70</text:p>
          </table:table-cell>
          <table:table-cell table:style-name="ce12N2" office:value-type="float" office:value="84.4">
            <text:p>8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271931299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6">
            <text:p>30809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3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4.72">
            <text:p>214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77.2">
            <text:p>207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4">
            <text:p>0,060</text:p>
          </table:table-cell>
          <table:table-cell table:style-name="ce12N2" office:value-type="float" office:value="5.4">
            <text:p>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4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3.11">
            <text:p>1753,11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67.52">
            <text:p>67,52</text:p>
          </table:table-cell>
          <table:table-cell table:style-name="ce12N2" office:value-type="float" office:value="2077.2">
            <text:p>2077,20</text:p>
          </table:table-cell>
          <table:table-cell table:style-name="ce12N2" office:value-type="float" office:value="145.4">
            <text:p>14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3017213967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7">
            <text:p>30809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2.46">
            <text:p>62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7.7">
            <text:p>58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36">
            <text:p>0,004</text:p>
          </table:table-cell>
          <table:table-cell table:style-name="ce12N2" office:value-type="float" office:value="3.29">
            <text:p>3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2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6">
            <text:p>496,00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46">
            <text:p>4,4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34.76">
            <text:p>34,76</text:p>
          </table:table-cell>
          <table:table-cell table:style-name="ce12N2" office:value-type="float" office:value="587.7">
            <text:p>587,70</text:p>
          </table:table-cell>
          <table:table-cell table:style-name="ce12N2" office:value-type="float" office:value="41.14">
            <text:p>4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381766936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8">
            <text:p>30809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3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88.19">
            <text:p>808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833.6">
            <text:p>783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04">
            <text:p>0,005</text:p>
          </table:table-cell>
          <table:table-cell table:style-name="ce12N2" office:value-type="float" office:value="13.28">
            <text:p>13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88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4.63">
            <text:p>6824,63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2">
            <text:p>61,42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54.59">
            <text:p>254,59</text:p>
          </table:table-cell>
          <table:table-cell table:style-name="ce12N2" office:value-type="float" office:value="7833.6">
            <text:p>7833,60</text:p>
          </table:table-cell>
          <table:table-cell table:style-name="ce12N2" office:value-type="float" office:value="313.34">
            <text:p>31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3712944837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99">
            <text:p>308099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1.3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582.38">
            <text:p>7658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76207.8">
            <text:p>7620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90.201388">
            <text:p>1490,201</text:p>
          </table:table-cell>
          <table:table-cell table:style-name="ce12N2" office:value-type="float" office:value="1189.38">
            <text:p>1189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.58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843.3">
            <text:p>65843,30</text:p>
          </table:table-cell>
          <table:table-cell table:style-name="ce12N2" office:value-type="float" office:value="65.87">
            <text:p>6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2.6">
            <text:p>592,6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374.58">
            <text:p>374,58</text:p>
          </table:table-cell>
          <table:table-cell table:style-name="ce12N2" office:value-type="float" office:value="76207.8">
            <text:p>76207,80</text:p>
          </table:table-cell>
          <table:table-cell table:style-name="ce12N2" office:value-type="float" office:value="3653.23">
            <text:p>365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587800001295500100021136710137698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0">
            <text:p>308100</text:p>
          </table:table-cell>
          <table:table-cell table:style-name="ce0" table:number-columns-spanned="4" table:number-rows-spanned="1" office:value-type="string" calcext:value-type="string">
            <text:p>3.166 - ITW PPF BRASIL ADESIVOS LTDA.</text:p>
          </table:table-cell>
          <table:covered-table-cell table:number-columns-repeated="3"/>
          <table:table-cell table:style-name="ce0" office:value-type="string" calcext:value-type="string">
            <text:p>211.3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2">
            <text:p>163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32">
            <text:p>163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2">
            <text:p>0,102</text:p>
          </table:table-cell>
          <table:table-cell table:style-name="ce12N2" office:value-type="float" office:value="10.2">
            <text:p>1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3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6.72">
            <text:p>1566,72</text:p>
          </table:table-cell>
          <table:table-cell table:style-name="ce12N2" office:value-type="float" office:value="1.57">
            <text:p>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1">
            <text:p>14,1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32">
            <text:p>1632,00</text:p>
          </table:table-cell>
          <table:table-cell table:style-name="ce12N2" office:value-type="float" office:value="65.28">
            <text:p>6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5858780000129550010002113681505111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2">
            <text:p>308102</text:p>
          </table:table-cell>
          <table:table-cell table:style-name="ce0" table:number-columns-spanned="4" table:number-rows-spanned="1" office:value-type="string" calcext:value-type="string">
            <text:p>744 - INDUSAT INDUSTRIA E COMERCIO LTDA</text:p>
          </table:table-cell>
          <table:covered-table-cell table:number-columns-repeated="3"/>
          <table:table-cell table:style-name="ce0" office:value-type="string" calcext:value-type="string">
            <text:p>123.4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8">
            <text:p>37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569.52">
            <text:p>3569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">
            <text:p>0,000</text:p>
          </table:table-cell>
          <table:table-cell table:style-name="ce12N2" office:value-type="float" office:value="137.5">
            <text:p>13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09.76">
            <text:p>3109,76</text:p>
          </table:table-cell>
          <table:table-cell table:style-name="ce12N2" office:value-type="float" office:value="3.11">
            <text:p>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99">
            <text:p>27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78.48">
            <text:p>178,48</text:p>
          </table:table-cell>
          <table:table-cell table:style-name="ce12N2" office:value-type="float" office:value="3569.52">
            <text:p>3569,52</text:p>
          </table:table-cell>
          <table:table-cell table:style-name="ce12N2" office:value-type="float" office:value="142.78">
            <text:p>142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653395900001275500100012344910480747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3">
            <text:p>30810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94.92">
            <text:p>819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2">
            <text:p>814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5876">
            <text:p>1,659</text:p>
          </table:table-cell>
          <table:table-cell table:style-name="ce12N2" office:value-type="float" office:value="10198.2">
            <text:p>1019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9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58.49">
            <text:p>6858,49</text:p>
          </table:table-cell>
          <table:table-cell table:style-name="ce12N2" office:value-type="float" office:value="6.86">
            <text:p>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73">
            <text:p>61,7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2.92">
            <text:p>52,92</text:p>
          </table:table-cell>
          <table:table-cell table:style-name="ce12N2" office:value-type="float" office:value="8349">
            <text:p>8349,00</text:p>
          </table:table-cell>
          <table:table-cell table:style-name="ce12N2" office:value-type="float" office:value="584.43">
            <text:p>58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0281178273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6">
            <text:p>308106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2.95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6">
            <text:p>1452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26">
            <text:p>145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758">
            <text:p>4,758</text:p>
          </table:table-cell>
          <table:table-cell table:style-name="ce12N2" office:value-type="float" office:value="150">
            <text:p>1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52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59.58">
            <text:p>12259,58</text:p>
          </table:table-cell>
          <table:table-cell table:style-name="ce12N2" office:value-type="float" office:value="12.26">
            <text:p>1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.34">
            <text:p>110,34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26">
            <text:p>14526,00</text:p>
          </table:table-cell>
          <table:table-cell table:style-name="ce12N2" office:value-type="float" office:value="1016.82">
            <text:p>1016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75801902002501550000008229511059834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7">
            <text:p>308107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22.95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72.2">
            <text:p>1897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972.2">
            <text:p>1897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787">
            <text:p>2,079</text:p>
          </table:table-cell>
          <table:table-cell table:style-name="ce12N2" office:value-type="float" office:value="1076.4">
            <text:p>107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7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012.06">
            <text:p>16012,06</text:p>
          </table:table-cell>
          <table:table-cell table:style-name="ce12N2" office:value-type="float" office:value="16.02">
            <text:p>1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.11">
            <text:p>144,11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72.2">
            <text:p>18972,20</text:p>
          </table:table-cell>
          <table:table-cell table:style-name="ce12N2" office:value-type="float" office:value="1328.05">
            <text:p>132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75801902002501550000008229501332655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8">
            <text:p>30810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1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93.46">
            <text:p>1209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15.36">
            <text:p>12015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51462">
            <text:p>2,351</text:p>
          </table:table-cell>
          <table:table-cell table:style-name="ce12N2" office:value-type="float" office:value="12799.99">
            <text:p>12799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9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40.65">
            <text:p>10140,65</text:p>
          </table:table-cell>
          <table:table-cell table:style-name="ce12N2" office:value-type="float" office:value="10.14">
            <text:p>1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.27">
            <text:p>91,27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78.1">
            <text:p>78,10</text:p>
          </table:table-cell>
          <table:table-cell table:style-name="ce12N2" office:value-type="float" office:value="12015.36">
            <text:p>12015,36</text:p>
          </table:table-cell>
          <table:table-cell table:style-name="ce12N2" office:value-type="float" office:value="841.08">
            <text:p>84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191496593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09">
            <text:p>30810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2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80.32">
            <text:p>4348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21614">
            <text:p>7,222</text:p>
          </table:table-cell>
          <table:table-cell table:style-name="ce12N2" office:value-type="float" office:value="22559.95">
            <text:p>22559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48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459.31">
            <text:p>36459,31</text:p>
          </table:table-cell>
          <table:table-cell table:style-name="ce12N2" office:value-type="float" office:value="36.46">
            <text:p>3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.13">
            <text:p>328,13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80.8">
            <text:p>280,80</text:p>
          </table:table-cell>
          <table:table-cell table:style-name="ce12N2" office:value-type="float" office:value="43199.52">
            <text:p>43199,52</text:p>
          </table:table-cell>
          <table:table-cell table:style-name="ce12N2" office:value-type="float" office:value="3023.97">
            <text:p>302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201736175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0">
            <text:p>30811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5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75.01">
            <text:p>8775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18.34">
            <text:p>871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02182">
            <text:p>1,902</text:p>
          </table:table-cell>
          <table:table-cell table:style-name="ce12N2" office:value-type="float" office:value="10240">
            <text:p>102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75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58.07">
            <text:p>7358,07</text:p>
          </table:table-cell>
          <table:table-cell table:style-name="ce12N2" office:value-type="float" office:value="7.36">
            <text:p>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22">
            <text:p>66,22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56.67">
            <text:p>56,67</text:p>
          </table:table-cell>
          <table:table-cell table:style-name="ce12N2" office:value-type="float" office:value="8718.34">
            <text:p>8718,34</text:p>
          </table:table-cell>
          <table:table-cell table:style-name="ce12N2" office:value-type="float" office:value="610.28">
            <text:p>610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5016520017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1">
            <text:p>30811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5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12.09">
            <text:p>184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88646">
            <text:p>2,889</text:p>
          </table:table-cell>
          <table:table-cell table:style-name="ce12N2" office:value-type="float" office:value="9023.94">
            <text:p>9023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12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38.99">
            <text:p>15438,99</text:p>
          </table:table-cell>
          <table:table-cell table:style-name="ce12N2" office:value-type="float" office:value="15.44">
            <text:p>1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.95">
            <text:p>138,95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18.91">
            <text:p>118,91</text:p>
          </table:table-cell>
          <table:table-cell table:style-name="ce12N2" office:value-type="float" office:value="18293.18">
            <text:p>18293,18</text:p>
          </table:table-cell>
          <table:table-cell table:style-name="ce12N2" office:value-type="float" office:value="1280.52">
            <text:p>128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511838250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12">
            <text:p>308112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9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107.18">
            <text:p>13510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651.08">
            <text:p>12465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13629">
            <text:p>7,136</text:p>
          </table:table-cell>
          <table:table-cell table:style-name="ce12N2" office:value-type="float" office:value="1347.5">
            <text:p>134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5.107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596.02">
            <text:p>108596,02</text:p>
          </table:table-cell>
          <table:table-cell table:style-name="ce12N2" office:value-type="float" office:value="108.6">
            <text:p>10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7.36">
            <text:p>977,36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0456.1">
            <text:p>10456,10</text:p>
          </table:table-cell>
          <table:table-cell table:style-name="ce12N2" office:value-type="float" office:value="124651.08">
            <text:p>124651,08</text:p>
          </table:table-cell>
          <table:table-cell table:style-name="ce12N2" office:value-type="float" office:value="4986.05">
            <text:p>498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93814266121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38">
            <text:p>308138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90">
            <text:p>42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90">
            <text:p>42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9.7375">
            <text:p>39,737</text:p>
          </table:table-cell>
          <table:table-cell table:style-name="ce12N2" office:value-type="float" office:value="340">
            <text:p>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90">
            <text:p>4290,00</text:p>
          </table:table-cell>
          <table:table-cell table:style-name="ce12N2" office:value-type="float" office:value="164.31">
            <text:p>16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222428080001185500100000278312547616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39">
            <text:p>308139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26.7">
            <text:p>276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626.7">
            <text:p>2762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6.86004">
            <text:p>56,860</text:p>
          </table:table-cell>
          <table:table-cell table:style-name="ce12N2" office:value-type="float" office:value="1875">
            <text:p>18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6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26.7">
            <text:p>27626,70</text:p>
          </table:table-cell>
          <table:table-cell table:style-name="ce12N2" office:value-type="float" office:value="1058.1">
            <text:p>105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222428080001185500100000278418469800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40">
            <text:p>308140</text:p>
          </table:table-cell>
          <table:table-cell table:style-name="ce0" table:number-columns-spanned="4" table:number-rows-spanned="1" office:value-type="string" calcext:value-type="string">
            <text:p>37.726 - CARMEM LUCIA DE SOUZA LUVAS</text:p>
          </table:table-cell>
          <table:covered-table-cell table:number-columns-repeated="3"/>
          <table:table-cell table:style-name="ce0" office:value-type="string" calcext:value-type="string">
            <text:p>3.24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41">
            <text:p>2774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741">
            <text:p>277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37">
            <text:p>3,237</text:p>
          </table:table-cell>
          <table:table-cell table:style-name="ce12N2" office:value-type="float" office:value="1582">
            <text:p>158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74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741">
            <text:p>27741,00</text:p>
          </table:table-cell>
          <table:table-cell table:style-name="ce12N2" office:value-type="float" office:value="907.11">
            <text:p>90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34153406000126550000000032451140065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41">
            <text:p>308141</text:p>
          </table:table-cell>
          <table:table-cell table:style-name="ce0" table:number-columns-spanned="4" table:number-rows-spanned="1" office:value-type="string" calcext:value-type="string">
            <text:p>37.726 - CARMEM LUCIA DE SOUZA LUVAS</text:p>
          </table:table-cell>
          <table:covered-table-cell table:number-columns-repeated="3"/>
          <table:table-cell table:style-name="ce0" office:value-type="string" calcext:value-type="string">
            <text:p>3.2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5">
            <text:p>379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5">
            <text:p>379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5">
            <text:p>0,051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9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3">
            <text:p>4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5">
            <text:p>3795,00</text:p>
          </table:table-cell>
          <table:table-cell table:style-name="ce12N2" office:value-type="float" office:value="124.09">
            <text:p>12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341534060001265500000000324618105873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4">
            <text:p>30817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1.27">
            <text:p>56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34.76">
            <text:p>53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42">
            <text:p>0,001</text:p>
          </table:table-cell>
          <table:table-cell table:style-name="ce12N2" office:value-type="float" office:value="0.19">
            <text:p>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1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5.88">
            <text:p>465,88</text:p>
          </table:table-cell>
          <table:table-cell table:style-name="ce12N2" office:value-type="float" office:value="0.46">
            <text:p>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19">
            <text:p>4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534.76">
            <text:p>534,76</text:p>
          </table:table-cell>
          <table:table-cell table:style-name="ce12N2" office:value-type="float" office:value="21.39">
            <text:p>2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321323881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76">
            <text:p>30817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02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57.31">
            <text:p>1135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83.96">
            <text:p>1128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31608">
            <text:p>1,332</text:p>
          </table:table-cell>
          <table:table-cell table:style-name="ce12N2" office:value-type="float" office:value="9190.08">
            <text:p>919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5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523.38">
            <text:p>9523,38</text:p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.71">
            <text:p>85,71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73.35">
            <text:p>73,35</text:p>
          </table:table-cell>
          <table:table-cell table:style-name="ce12N2" office:value-type="float" office:value="11283.96">
            <text:p>11283,96</text:p>
          </table:table-cell>
          <table:table-cell table:style-name="ce12N2" office:value-type="float" office:value="789.88">
            <text:p>78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0271861467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87">
            <text:p>308187</text:p>
          </table:table-cell>
          <table:table-cell table:style-name="ce0" table:number-columns-spanned="4" table:number-rows-spanned="1" office:value-type="string" calcext:value-type="string">
            <text:p>5.460 - BLACK &amp; DECKER DO BRASIL LTDA</text:p>
          </table:table-cell>
          <table:covered-table-cell table:number-columns-repeated="3"/>
          <table:table-cell table:style-name="ce0" office:value-type="string" calcext:value-type="string">
            <text:p>2.408.557</text:p>
          </table:table-cell>
          <table:table-cell table:style-name="ce9" office:value-type="string" calcext:value-type="string">
            <text:p>2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5.2">
            <text:p>382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91.74">
            <text:p>359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232">
            <text:p>0,119</text:p>
          </table:table-cell>
          <table:table-cell table:style-name="ce12N2" office:value-type="float" office:value="14.11">
            <text:p>14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25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29.13">
            <text:p>3129,13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16">
            <text:p>28,1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33.46">
            <text:p>233,46</text:p>
          </table:table-cell>
          <table:table-cell table:style-name="ce12N2" office:value-type="float" office:value="3591.74">
            <text:p>3591,74</text:p>
          </table:table-cell>
          <table:table-cell table:style-name="ce12N2" office:value-type="float" office:value="143.67">
            <text:p>14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3296273003298550230024085571302531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88">
            <text:p>308188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7.7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105.12">
            <text:p>8310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80523.51">
            <text:p>80523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6.021932">
            <text:p>96,022</text:p>
          </table:table-cell>
          <table:table-cell table:style-name="ce12N2" office:value-type="float" office:value="1340.59">
            <text:p>1340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.10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463.76">
            <text:p>69463,76</text:p>
          </table:table-cell>
          <table:table-cell table:style-name="ce12N2" office:value-type="float" office:value="69.46">
            <text:p>6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5.16">
            <text:p>625,16</text:p>
          </table:table-cell>
          <table:table-cell table:style-name="ce12N2" office:value-type="float" office:value="55.13">
            <text:p>55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581.61">
            <text:p>2581,61</text:p>
          </table:table-cell>
          <table:table-cell table:style-name="ce12N2" office:value-type="float" office:value="75058.15">
            <text:p>75058,15</text:p>
          </table:table-cell>
          <table:table-cell table:style-name="ce12N2" office:value-type="float" office:value="3979.41">
            <text:p>3979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77771679784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89">
            <text:p>308189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7.7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741.19">
            <text:p>20274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96359.51">
            <text:p>196359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710192">
            <text:p>25,710</text:p>
          </table:table-cell>
          <table:table-cell table:style-name="ce12N2" office:value-type="float" office:value="3453.27">
            <text:p>3453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.741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722.53">
            <text:p>165722,53</text:p>
          </table:table-cell>
          <table:table-cell table:style-name="ce12N2" office:value-type="float" office:value="165.72">
            <text:p>16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1.5">
            <text:p>1491,50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6381.68">
            <text:p>6381,68</text:p>
          </table:table-cell>
          <table:table-cell table:style-name="ce12N2" office:value-type="float" office:value="196359.51">
            <text:p>196359,51</text:p>
          </table:table-cell>
          <table:table-cell table:style-name="ce12N2" office:value-type="float" office:value="13745.17">
            <text:p>13745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777815549117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0">
            <text:p>308190</text:p>
          </table:table-cell>
          <table:table-cell table:style-name="ce0" table:number-columns-spanned="4" table:number-rows-spanned="1" office:value-type="string" calcext:value-type="string">
            <text:p>11.013 - PRECON INDUSTRIAL S/A AL</text:p>
          </table:table-cell>
          <table:covered-table-cell table:number-columns-repeated="3"/>
          <table:table-cell table:style-name="ce0" office:value-type="string" calcext:value-type="string">
            <text:p>38.9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79.6">
            <text:p>487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726">
            <text:p>47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04">
            <text:p>0,120</text:p>
          </table:table-cell>
          <table:table-cell table:style-name="ce12N2" office:value-type="float" office:value="300">
            <text:p>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7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74.18">
            <text:p>3774,18</text:p>
          </table:table-cell>
          <table:table-cell table:style-name="ce12N2" office:value-type="float" office:value="3.78">
            <text:p>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6">
            <text:p>33,9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53.6">
            <text:p>153,60</text:p>
          </table:table-cell>
          <table:table-cell table:style-name="ce12N2" office:value-type="float" office:value="4726">
            <text:p>4726,00</text:p>
          </table:table-cell>
          <table:table-cell table:style-name="ce12N2" office:value-type="float" office:value="567.12">
            <text:p>56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7260523452238002016550010000389371738457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4">
            <text:p>30819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7.3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97.69">
            <text:p>5149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9928">
            <text:p>499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65345">
            <text:p>15,653</text:p>
          </table:table-cell>
          <table:table-cell table:style-name="ce12N2" office:value-type="float" office:value="1609.55">
            <text:p>1609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497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137.98">
            <text:p>42137,98</text:p>
          </table:table-cell>
          <table:table-cell table:style-name="ce12N2" office:value-type="float" office:value="42.14">
            <text:p>4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24">
            <text:p>379,24</text:p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569.69">
            <text:p>1569,69</text:p>
          </table:table-cell>
          <table:table-cell table:style-name="ce12N2" office:value-type="float" office:value="49928">
            <text:p>49928,00</text:p>
          </table:table-cell>
          <table:table-cell table:style-name="ce12N2" office:value-type="float" office:value="3494.96">
            <text:p>3494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73931211190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5">
            <text:p>3081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62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89.16">
            <text:p>868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689.16">
            <text:p>8689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592">
            <text:p>0,015</text:p>
          </table:table-cell>
          <table:table-cell table:style-name="ce12N2" office:value-type="float" office:value="6.47">
            <text:p>6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89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33.4">
            <text:p>7333,40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">
            <text:p>66,0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89.16">
            <text:p>8689,16</text:p>
          </table:table-cell>
          <table:table-cell table:style-name="ce12N2" office:value-type="float" office:value="608.24">
            <text:p>60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62910946946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8">
            <text:p>30819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5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44.72">
            <text:p>2124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057069">
            <text:p>5,057</text:p>
          </table:table-cell>
          <table:table-cell table:style-name="ce12N2" office:value-type="float" office:value="22015.99">
            <text:p>22015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24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814.22">
            <text:p>17814,22</text:p>
          </table:table-cell>
          <table:table-cell table:style-name="ce12N2" office:value-type="float" office:value="17.81">
            <text:p>1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.33">
            <text:p>160,3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7.2">
            <text:p>137,20</text:p>
          </table:table-cell>
          <table:table-cell table:style-name="ce12N2" office:value-type="float" office:value="21107.52">
            <text:p>21107,52</text:p>
          </table:table-cell>
          <table:table-cell table:style-name="ce12N2" office:value-type="float" office:value="1477.53">
            <text:p>147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54615494194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9">
            <text:p>30819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57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532.35">
            <text:p>39532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9277.05">
            <text:p>39277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740173">
            <text:p>6,740</text:p>
          </table:table-cell>
          <table:table-cell table:style-name="ce12N2" office:value-type="float" office:value="21055.89">
            <text:p>21055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532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48.85">
            <text:p>33148,85</text:p>
          </table:table-cell>
          <table:table-cell table:style-name="ce12N2" office:value-type="float" office:value="33.15">
            <text:p>3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8.34">
            <text:p>298,34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55.3">
            <text:p>255,30</text:p>
          </table:table-cell>
          <table:table-cell table:style-name="ce12N2" office:value-type="float" office:value="39277.05">
            <text:p>39277,05</text:p>
          </table:table-cell>
          <table:table-cell table:style-name="ce12N2" office:value-type="float" office:value="2749.39">
            <text:p>274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57415347710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0">
            <text:p>30820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5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46.73">
            <text:p>604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07.68">
            <text:p>6007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75731">
            <text:p>1,176</text:p>
          </table:table-cell>
          <table:table-cell table:style-name="ce12N2" office:value-type="float" office:value="6399.99">
            <text:p>6399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46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70.33">
            <text:p>5070,33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63">
            <text:p>45,6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39.05">
            <text:p>39,05</text:p>
          </table:table-cell>
          <table:table-cell table:style-name="ce12N2" office:value-type="float" office:value="6007.68">
            <text:p>6007,68</text:p>
          </table:table-cell>
          <table:table-cell table:style-name="ce12N2" office:value-type="float" office:value="420.54">
            <text:p>42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57317254512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6">
            <text:p>308206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29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18.58">
            <text:p>1051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11109">
            <text:p>1,611</text:p>
          </table:table-cell>
          <table:table-cell table:style-name="ce12N2" office:value-type="float" office:value="7024.08">
            <text:p>702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1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20.08">
            <text:p>8820,08</text:p>
          </table:table-cell>
          <table:table-cell table:style-name="ce12N2" office:value-type="float" office:value="8.82">
            <text:p>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.38">
            <text:p>79,38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67.93">
            <text:p>67,93</text:p>
          </table:table-cell>
          <table:table-cell table:style-name="ce12N2" office:value-type="float" office:value="10450.65">
            <text:p>10450,65</text:p>
          </table:table-cell>
          <table:table-cell table:style-name="ce12N2" office:value-type="float" office:value="731.55">
            <text:p>73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29012352403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8">
            <text:p>308208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29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57.37">
            <text:p>1435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264.65">
            <text:p>14264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54979">
            <text:p>2,055</text:p>
          </table:table-cell>
          <table:table-cell table:style-name="ce12N2" office:value-type="float" office:value="10087.44">
            <text:p>10087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35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39">
            <text:p>12039,00</text:p>
          </table:table-cell>
          <table:table-cell table:style-name="ce12N2" office:value-type="float" office:value="12.04">
            <text:p>1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35">
            <text:p>108,35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92.72">
            <text:p>92,72</text:p>
          </table:table-cell>
          <table:table-cell table:style-name="ce12N2" office:value-type="float" office:value="14264.65">
            <text:p>14264,65</text:p>
          </table:table-cell>
          <table:table-cell table:style-name="ce12N2" office:value-type="float" office:value="998.53">
            <text:p>99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29212710243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9">
            <text:p>30820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29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37.16">
            <text:p>2103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901.3">
            <text:p>20901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22219">
            <text:p>3,222</text:p>
          </table:table-cell>
          <table:table-cell table:style-name="ce12N2" office:value-type="float" office:value="14048.16">
            <text:p>14048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037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640.18">
            <text:p>17640,18</text:p>
          </table:table-cell>
          <table:table-cell table:style-name="ce12N2" office:value-type="float" office:value="17.64">
            <text:p>1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8.76">
            <text:p>158,7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135.86">
            <text:p>135,86</text:p>
          </table:table-cell>
          <table:table-cell table:style-name="ce12N2" office:value-type="float" office:value="20901.3">
            <text:p>20901,30</text:p>
          </table:table-cell>
          <table:table-cell table:style-name="ce12N2" office:value-type="float" office:value="1463.09">
            <text:p>146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29313655200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10">
            <text:p>308210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8.0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379.54">
            <text:p>12437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464.45">
            <text:p>120464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1.6368">
            <text:p>31,637</text:p>
          </table:table-cell>
          <table:table-cell table:style-name="ce12N2" office:value-type="float" office:value="3159">
            <text:p>315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4.37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668.98">
            <text:p>101668,98</text:p>
          </table:table-cell>
          <table:table-cell table:style-name="ce12N2" office:value-type="float" office:value="101.67">
            <text:p>10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5.02">
            <text:p>915,02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3915.09">
            <text:p>3915,09</text:p>
          </table:table-cell>
          <table:table-cell table:style-name="ce12N2" office:value-type="float" office:value="120464.45">
            <text:p>120464,45</text:p>
          </table:table-cell>
          <table:table-cell table:style-name="ce12N2" office:value-type="float" office:value="8432.51">
            <text:p>843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806112955266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11">
            <text:p>308211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8.0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310.61">
            <text:p>2631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482.43">
            <text:p>25482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832">
            <text:p>8,832</text:p>
          </table:table-cell>
          <table:table-cell table:style-name="ce12N2" office:value-type="float" office:value="1329.6">
            <text:p>132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310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506.53">
            <text:p>21506,53</text:p>
          </table:table-cell>
          <table:table-cell table:style-name="ce12N2" office:value-type="float" office:value="21.51">
            <text:p>2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.56">
            <text:p>193,56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828.18">
            <text:p>828,18</text:p>
          </table:table-cell>
          <table:table-cell table:style-name="ce12N2" office:value-type="float" office:value="25482.43">
            <text:p>25482,43</text:p>
          </table:table-cell>
          <table:table-cell table:style-name="ce12N2" office:value-type="float" office:value="1783.77">
            <text:p>178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806216507888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12">
            <text:p>308212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310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7.5">
            <text:p>34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27.5">
            <text:p>34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">
            <text:p>0,00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92.72">
            <text:p>2892,72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03">
            <text:p>26,03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27.5">
            <text:p>3427,50</text:p>
          </table:table-cell>
          <table:table-cell table:style-name="ce12N2" office:value-type="float" office:value="239.93">
            <text:p>239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3101772105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14">
            <text:p>308214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9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998.82">
            <text:p>3199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31911">
            <text:p>3191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.39182">
            <text:p>16,392</text:p>
          </table:table-cell>
          <table:table-cell table:style-name="ce12N2" office:value-type="float" office:value="7494">
            <text:p>749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99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25.44">
            <text:p>26725,44</text:p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0.53">
            <text:p>240,53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87.82">
            <text:p>87,82</text:p>
          </table:table-cell>
          <table:table-cell table:style-name="ce12N2" office:value-type="float" office:value="31911">
            <text:p>31911,00</text:p>
          </table:table-cell>
          <table:table-cell table:style-name="ce12N2" office:value-type="float" office:value="2233.79">
            <text:p>223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45422380001785500100009699910009680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19">
            <text:p>30821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8.3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80.2">
            <text:p>13580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80.2">
            <text:p>1358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4762">
            <text:p>0,948</text:p>
          </table:table-cell>
          <table:table-cell table:style-name="ce12N2" office:value-type="float" office:value="194.5">
            <text:p>19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580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461.35">
            <text:p>11461,35</text:p>
          </table:table-cell>
          <table:table-cell table:style-name="ce12N2" office:value-type="float" office:value="11.47">
            <text:p>1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3.15">
            <text:p>103,15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80.2">
            <text:p>13580,20</text:p>
          </table:table-cell>
          <table:table-cell table:style-name="ce12N2" office:value-type="float" office:value="950.61">
            <text:p>95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83131662344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20">
            <text:p>3082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6.6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0.64">
            <text:p>78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0.64">
            <text:p>780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9">
            <text:p>0,006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8.84">
            <text:p>658,84</text:p>
          </table:table-cell>
          <table:table-cell table:style-name="ce12N2" office:value-type="float" office:value="0.66">
            <text:p>0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93">
            <text:p>5,93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0.64">
            <text:p>780,64</text:p>
          </table:table-cell>
          <table:table-cell table:style-name="ce12N2" office:value-type="float" office:value="54.64">
            <text:p>5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667915012945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21">
            <text:p>3082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6.6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82.4">
            <text:p>1338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82.4">
            <text:p>1338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4">
            <text:p>0,104</text:p>
          </table:table-cell>
          <table:table-cell table:style-name="ce12N2" office:value-type="float" office:value="113.4">
            <text:p>113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38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94.41">
            <text:p>11294,41</text:p>
          </table:table-cell>
          <table:table-cell table:style-name="ce12N2" office:value-type="float" office:value="11.29">
            <text:p>1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.65">
            <text:p>101,65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82.4">
            <text:p>13382,40</text:p>
          </table:table-cell>
          <table:table-cell table:style-name="ce12N2" office:value-type="float" office:value="936.77">
            <text:p>93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668016220350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0">
            <text:p>308240</text:p>
          </table:table-cell>
          <table:table-cell table:style-name="ce0" table:number-columns-spanned="4" table:number-rows-spanned="1" office:value-type="string" calcext:value-type="string">
            <text:p>31.248 - GV DO BRASIL INDUSTRIA E COMERCIO DE ACO LTDA</text:p>
          </table:table-cell>
          <table:covered-table-cell table:number-columns-repeated="3"/>
          <table:table-cell table:style-name="ce0" office:value-type="string" calcext:value-type="string">
            <text:p>5.40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525.8">
            <text:p>18252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2525.8">
            <text:p>18252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255">
            <text:p>0,043</text:p>
          </table:table-cell>
          <table:table-cell table:style-name="ce12N2" office:value-type="float" office:value="39937.18">
            <text:p>39937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2.525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047.21">
            <text:p>154047,21</text:p>
          </table:table-cell>
          <table:table-cell table:style-name="ce12N2" office:value-type="float" office:value="154.05">
            <text:p>15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6.42">
            <text:p>1386,42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525.8">
            <text:p>182525,80</text:p>
          </table:table-cell>
          <table:table-cell table:style-name="ce12N2" office:value-type="float" office:value="12776.81">
            <text:p>12776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8846320001445500500000540917390211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2">
            <text:p>308242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0.7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99.37">
            <text:p>4899,37</text:p>
          </table:table-cell>
          <table:table-cell table:style-name="ce12N2" office:value-type="float" office:value="318.01">
            <text:p>318,01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782.12">
            <text:p>4782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96174">
            <text:p>3,796</text:p>
          </table:table-cell>
          <table:table-cell table:style-name="ce12N2" office:value-type="float" office:value="108.4">
            <text:p>10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99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9.21">
            <text:p>79,2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35.26">
            <text:p>435,26</text:p>
          </table:table-cell>
          <table:table-cell table:style-name="ce12N2" office:value-type="float" office:value="4464.11">
            <text:p>4464,11</text:p>
          </table:table-cell>
          <table:table-cell table:style-name="ce12N2" office:value-type="float" office:value="178.56">
            <text:p>17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207271323305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3">
            <text:p>308243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0.7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0.31">
            <text:p>2190,31</text:p>
          </table:table-cell>
          <table:table-cell table:style-name="ce12N2" office:value-type="float" office:value="127.39">
            <text:p>127,3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23.12">
            <text:p>212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6164">
            <text:p>0,236</text:p>
          </table:table-cell>
          <table:table-cell table:style-name="ce12N2" office:value-type="float" office:value="95.2">
            <text:p>9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0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1.13">
            <text:p>61,1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94.58">
            <text:p>194,58</text:p>
          </table:table-cell>
          <table:table-cell table:style-name="ce12N2" office:value-type="float" office:value="1995.73">
            <text:p>1995,73</text:p>
          </table:table-cell>
          <table:table-cell table:style-name="ce12N2" office:value-type="float" office:value="79.83">
            <text:p>7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2077810301160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6">
            <text:p>308246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4124.66">
            <text:p>98412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958853.58">
            <text:p>958853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8.627062">
            <text:p>48,627</text:p>
          </table:table-cell>
          <table:table-cell table:style-name="ce12N2" office:value-type="float" office:value="5420.2">
            <text:p>542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4.124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7945.56">
            <text:p>817945,56</text:p>
          </table:table-cell>
          <table:table-cell table:style-name="ce12N2" office:value-type="float" office:value="817.93">
            <text:p>817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61.49">
            <text:p>7361,49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5271.08">
            <text:p>25271,08</text:p>
          </table:table-cell>
          <table:table-cell table:style-name="ce12N2" office:value-type="float" office:value="958853.58">
            <text:p>958853,58</text:p>
          </table:table-cell>
          <table:table-cell table:style-name="ce12N2" office:value-type="float" office:value="57536.13">
            <text:p>57536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21614848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8">
            <text:p>30824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1.5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6.43">
            <text:p>3366,43</text:p>
          </table:table-cell>
          <table:table-cell table:style-name="ce12N2" office:value-type="float" office:value="161.44">
            <text:p>161,44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28.8">
            <text:p>322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184">
            <text:p>0,918</text:p>
          </table:table-cell>
          <table:table-cell table:style-name="ce12N2" office:value-type="float" office:value="304">
            <text:p>30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66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72.29">
            <text:p>2672,29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05">
            <text:p>24,05</text:p>
          </table:table-cell>
          <table:table-cell table:style-name="ce12N2" office:value-type="float" office:value="94.06">
            <text:p>94,0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99.07">
            <text:p>299,07</text:p>
          </table:table-cell>
          <table:table-cell table:style-name="ce12N2" office:value-type="float" office:value="3067.36">
            <text:p>3067,36</text:p>
          </table:table-cell>
          <table:table-cell table:style-name="ce12N2" office:value-type="float" office:value="122.69">
            <text:p>12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2153614381708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59">
            <text:p>30825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9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49.78">
            <text:p>20249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119.01">
            <text:p>20119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70087">
            <text:p>3,370</text:p>
          </table:table-cell>
          <table:table-cell table:style-name="ce12N2" office:value-type="float" office:value="10528">
            <text:p>105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249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979.94">
            <text:p>16979,94</text:p>
          </table:table-cell>
          <table:table-cell table:style-name="ce12N2" office:value-type="float" office:value="16.98">
            <text:p>16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.82">
            <text:p>152,82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30.77">
            <text:p>130,77</text:p>
          </table:table-cell>
          <table:table-cell table:style-name="ce12N2" office:value-type="float" office:value="20119.01">
            <text:p>20119,01</text:p>
          </table:table-cell>
          <table:table-cell table:style-name="ce12N2" office:value-type="float" office:value="1408.33">
            <text:p>140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952137648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0">
            <text:p>30826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95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37.39">
            <text:p>483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06.15">
            <text:p>4806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40585">
            <text:p>0,941</text:p>
          </table:table-cell>
          <table:table-cell table:style-name="ce12N2" office:value-type="float" office:value="5119.99">
            <text:p>5119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37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56.27">
            <text:p>4056,27</text:p>
          </table:table-cell>
          <table:table-cell table:style-name="ce12N2" office:value-type="float" office:value="4.06">
            <text:p>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51">
            <text:p>36,51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1.24">
            <text:p>31,24</text:p>
          </table:table-cell>
          <table:table-cell table:style-name="ce12N2" office:value-type="float" office:value="4806.15">
            <text:p>4806,15</text:p>
          </table:table-cell>
          <table:table-cell table:style-name="ce12N2" office:value-type="float" office:value="336.43">
            <text:p>33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9511956531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1">
            <text:p>308261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1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969.75">
            <text:p>179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853.7">
            <text:p>1785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73254">
            <text:p>2,073</text:p>
          </table:table-cell>
          <table:table-cell table:style-name="ce12N2" office:value-type="float" office:value="9023.62">
            <text:p>902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969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68.07">
            <text:p>15068,07</text:p>
          </table:table-cell>
          <table:table-cell table:style-name="ce12N2" office:value-type="float" office:value="15.07">
            <text:p>1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.61">
            <text:p>135,61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16.05">
            <text:p>116,05</text:p>
          </table:table-cell>
          <table:table-cell table:style-name="ce12N2" office:value-type="float" office:value="17853.7">
            <text:p>17853,70</text:p>
          </table:table-cell>
          <table:table-cell table:style-name="ce12N2" office:value-type="float" office:value="1249.76">
            <text:p>124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1117834741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3">
            <text:p>308263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027.59">
            <text:p>3402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231">
            <text:p>3,323</text:p>
          </table:table-cell>
          <table:table-cell table:style-name="ce12N2" office:value-type="float" office:value="35337.72">
            <text:p>353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027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532.97">
            <text:p>28532,97</text:p>
          </table:table-cell>
          <table:table-cell table:style-name="ce12N2" office:value-type="float" office:value="28.53">
            <text:p>2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.8">
            <text:p>256,80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19.75">
            <text:p>219,75</text:p>
          </table:table-cell>
          <table:table-cell table:style-name="ce12N2" office:value-type="float" office:value="33807.84">
            <text:p>33807,84</text:p>
          </table:table-cell>
          <table:table-cell table:style-name="ce12N2" office:value-type="float" office:value="2366.55">
            <text:p>236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517675730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4">
            <text:p>30826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42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85.02">
            <text:p>1328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1958">
            <text:p>0,752</text:p>
          </table:table-cell>
          <table:table-cell table:style-name="ce12N2" office:value-type="float" office:value="5953.15">
            <text:p>5953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8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39.82">
            <text:p>11139,82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.26">
            <text:p>100,2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85.79">
            <text:p>85,79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923.95">
            <text:p>92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42411882852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6">
            <text:p>308266</text:p>
          </table:table-cell>
          <table:table-cell table:style-name="ce0" table:number-columns-spanned="4" table:number-rows-spanned="1" office:value-type="string" calcext:value-type="string">
            <text:p>38.377 - TREND CABLE CONDUTORES ELETRICOS LTDA</text:p>
          </table:table-cell>
          <table:covered-table-cell table:number-columns-repeated="3"/>
          <table:table-cell table:style-name="ce0" office:value-type="string" calcext:value-type="string">
            <text:p>2.8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91.5">
            <text:p>12309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3091.5">
            <text:p>12309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472.20625">
            <text:p>4472,206</text:p>
          </table:table-cell>
          <table:table-cell table:style-name="ce12N2" office:value-type="float" office:value="1565.65">
            <text:p>1565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3.09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3886.15">
            <text:p>103886,15</text:p>
          </table:table-cell>
          <table:table-cell table:style-name="ce12N2" office:value-type="float" office:value="103.88">
            <text:p>10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4.97">
            <text:p>934,9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091.5">
            <text:p>123091,50</text:p>
          </table:table-cell>
          <table:table-cell table:style-name="ce12N2" office:value-type="float" office:value="8616.41">
            <text:p>861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3502876000124550010000028691005357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7">
            <text:p>308267</text:p>
          </table:table-cell>
          <table:table-cell table:style-name="ce0" table:number-columns-spanned="4" table:number-rows-spanned="1" office:value-type="string" calcext:value-type="string">
            <text:p>22.431 - PL- INDUSTRIA METALURGICA LTDA</text:p>
          </table:table-cell>
          <table:covered-table-cell table:number-columns-repeated="3"/>
          <table:table-cell table:style-name="ce0" office:value-type="string" calcext:value-type="string">
            <text:p>105.9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25.25">
            <text:p>5672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56725.25">
            <text:p>5672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19">
            <text:p>13,190</text:p>
          </table:table-cell>
          <table:table-cell table:style-name="ce12N2" office:value-type="float" office:value="4074.35">
            <text:p>407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72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874.7">
            <text:p>47874,70</text:p>
          </table:table-cell>
          <table:table-cell table:style-name="ce12N2" office:value-type="float" office:value="47.86">
            <text:p>47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0.86">
            <text:p>430,86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25.25">
            <text:p>56725,25</text:p>
          </table:table-cell>
          <table:table-cell table:style-name="ce12N2" office:value-type="float" office:value="3970.78">
            <text:p>397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8787482000137550010001059421303990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8">
            <text:p>308268</text:p>
          </table:table-cell>
          <table:table-cell table:style-name="ce0" table:number-columns-spanned="4" table:number-rows-spanned="1" office:value-type="string" calcext:value-type="string">
            <text:p>543 - ESTEVES S/A.</text:p>
          </table:table-cell>
          <table:covered-table-cell table:number-columns-repeated="3"/>
          <table:table-cell table:style-name="ce0" office:value-type="string" calcext:value-type="string">
            <text:p>363.3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690.77">
            <text:p>2369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3542.31">
            <text:p>23542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8602">
            <text:p>0,429</text:p>
          </table:table-cell>
          <table:table-cell table:style-name="ce12N2" office:value-type="float" office:value="49.98">
            <text:p>49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690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69.12">
            <text:p>19869,12</text:p>
          </table:table-cell>
          <table:table-cell table:style-name="ce12N2" office:value-type="float" office:value="19.86">
            <text:p>1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8.81">
            <text:p>178,81</text:p>
          </table:table-cell>
          <table:table-cell table:style-name="ce12N2" office:value-type="float" office:value="41.91">
            <text:p>41,9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48.46">
            <text:p>148,46</text:p>
          </table:table-cell>
          <table:table-cell table:style-name="ce12N2" office:value-type="float" office:value="23542.31">
            <text:p>23542,31</text:p>
          </table:table-cell>
          <table:table-cell table:style-name="ce12N2" office:value-type="float" office:value="1647.97">
            <text:p>1647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837457000187550010003633601800630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69">
            <text:p>30826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3.13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992.59">
            <text:p>3599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3970.35">
            <text:p>3397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17.093475">
            <text:p>717,093</text:p>
          </table:table-cell>
          <table:table-cell table:style-name="ce12N2" office:value-type="float" office:value="1122.74">
            <text:p>1122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99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670.13">
            <text:p>28670,13</text:p>
          </table:table-cell>
          <table:table-cell table:style-name="ce12N2" office:value-type="float" office:value="28.68">
            <text:p>2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.02">
            <text:p>258,02</text:p>
          </table:table-cell>
          <table:table-cell table:style-name="ce12N2" office:value-type="float" office:value="55.21">
            <text:p>55,2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022.24">
            <text:p>2022,24</text:p>
          </table:table-cell>
          <table:table-cell table:style-name="ce12N2" office:value-type="float" office:value="33970.35">
            <text:p>33970,35</text:p>
          </table:table-cell>
          <table:table-cell table:style-name="ce12N2" office:value-type="float" office:value="2377.92">
            <text:p>237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313112106968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70">
            <text:p>30827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5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2.92">
            <text:p>125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2.92">
            <text:p>125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6122">
            <text:p>0,406</text:p>
          </table:table-cell>
          <table:table-cell table:style-name="ce12N2" office:value-type="float" office:value="88.8">
            <text:p>8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7.43">
            <text:p>1057,43</text:p>
          </table:table-cell>
          <table:table-cell table:style-name="ce12N2" office:value-type="float" office:value="1.06">
            <text:p>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2.92">
            <text:p>1252,92</text:p>
          </table:table-cell>
          <table:table-cell table:style-name="ce12N2" office:value-type="float" office:value="87.7">
            <text:p>8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504419567114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9">
            <text:p>30828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2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488.16">
            <text:p>5048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0162.11">
            <text:p>50162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665937">
            <text:p>8,666</text:p>
          </table:table-cell>
          <table:table-cell table:style-name="ce12N2" office:value-type="float" office:value="27071.82">
            <text:p>2707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488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335.56">
            <text:p>42335,56</text:p>
          </table:table-cell>
          <table:table-cell table:style-name="ce12N2" office:value-type="float" office:value="42.33">
            <text:p>42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1.02">
            <text:p>381,02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26.05">
            <text:p>326,05</text:p>
          </table:table-cell>
          <table:table-cell table:style-name="ce12N2" office:value-type="float" office:value="50162.11">
            <text:p>50162,11</text:p>
          </table:table-cell>
          <table:table-cell table:style-name="ce12N2" office:value-type="float" office:value="3511.35">
            <text:p>351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24616446307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0">
            <text:p>30829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2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9.35">
            <text:p>120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1.54">
            <text:p>120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5146">
            <text:p>0,235</text:p>
          </table:table-cell>
          <table:table-cell table:style-name="ce12N2" office:value-type="float" office:value="1280">
            <text:p>12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09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4.07">
            <text:p>1014,0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3">
            <text:p>9,13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7.81">
            <text:p>7,81</text:p>
          </table:table-cell>
          <table:table-cell table:style-name="ce12N2" office:value-type="float" office:value="1201.54">
            <text:p>1201,54</text:p>
          </table:table-cell>
          <table:table-cell table:style-name="ce12N2" office:value-type="float" office:value="84.11">
            <text:p>8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245135870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1">
            <text:p>308291</text:p>
          </table:table-cell>
          <table:table-cell table:style-name="ce0" table:number-columns-spanned="4" table:number-rows-spanned="1" office:value-type="string" calcext:value-type="string">
            <text:p>15.543 - SAINT-GOBAIN DO BRASIL PROD IND E P/ CONSTRUCAO LTDA</text:p>
          </table:table-cell>
          <table:covered-table-cell table:number-columns-repeated="3"/>
          <table:table-cell table:style-name="ce0" office:value-type="string" calcext:value-type="string">
            <text:p>167.8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550.05">
            <text:p>10255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02016.75">
            <text:p>102016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7133">
            <text:p>6,271</text:p>
          </table:table-cell>
          <table:table-cell table:style-name="ce12N2" office:value-type="float" office:value="18322.7">
            <text:p>1832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550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1470.58">
            <text:p>81470,58</text:p>
          </table:table-cell>
          <table:table-cell table:style-name="ce12N2" office:value-type="float" office:value="81.47">
            <text:p>8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3.25">
            <text:p>733,2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533.3">
            <text:p>533,30</text:p>
          </table:table-cell>
          <table:table-cell table:style-name="ce12N2" office:value-type="float" office:value="102016.75">
            <text:p>102016,75</text:p>
          </table:table-cell>
          <table:table-cell table:style-name="ce12N2" office:value-type="float" office:value="12242.01">
            <text:p>1224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61064838014193550010001678421622035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2">
            <text:p>30830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54.9">
            <text:p>855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54.9">
            <text:p>8554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83">
            <text:p>0,017</text:p>
          </table:table-cell>
          <table:table-cell table:style-name="ce12N2" office:value-type="float" office:value="197.24">
            <text:p>197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54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51937083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7">
            <text:p>308307</text:p>
          </table:table-cell>
          <table:table-cell table:style-name="ce0" table:number-columns-spanned="4" table:number-rows-spanned="1" office:value-type="string" calcext:value-type="string">
            <text:p>541 - FAME FABRICA DE APARELHOS ELETRICOS LTDA</text:p>
          </table:table-cell>
          <table:covered-table-cell table:number-columns-repeated="3"/>
          <table:table-cell table:style-name="ce0" office:value-type="string" calcext:value-type="string">
            <text:p>1.670.4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626.78">
            <text:p>158626,78</text:p>
          </table:table-cell>
          <table:table-cell table:style-name="ce12N2" office:value-type="float" office:value="22854.76">
            <text:p>22854,76</text:p>
          </table:table-cell>
          <table:table-cell table:style-name="ce12N2" office:value-type="float" office:value="119">
            <text:p>119,00</text:p>
          </table:table-cell>
          <table:table-cell table:style-name="ce12N2" office:value-type="float" office:value="172187.88">
            <text:p>17218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03.864632">
            <text:p>1503,865</text:p>
          </table:table-cell>
          <table:table-cell table:style-name="ce12N2" office:value-type="float" office:value="2009.06">
            <text:p>2009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8.626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293.66">
            <text:p>9293,66</text:p>
          </table:table-cell>
          <table:table-cell table:style-name="ce12N2" office:value-type="float" office:value="149333.12">
            <text:p>149333,12</text:p>
          </table:table-cell>
          <table:table-cell table:style-name="ce12N2" office:value-type="float" office:value="10393.01">
            <text:p>1039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6203660001955500100167041213458476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1">
            <text:p>30831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89.56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61.34">
            <text:p>1636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255.68">
            <text:p>16255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05695">
            <text:p>5,306</text:p>
          </table:table-cell>
          <table:table-cell table:style-name="ce12N2" office:value-type="float" office:value="10752">
            <text:p>1075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6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719.39">
            <text:p>13719,39</text:p>
          </table:table-cell>
          <table:table-cell table:style-name="ce12N2" office:value-type="float" office:value="13.72">
            <text:p>1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.47">
            <text:p>123,47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05.66">
            <text:p>105,66</text:p>
          </table:table-cell>
          <table:table-cell table:style-name="ce12N2" office:value-type="float" office:value="16255.68">
            <text:p>16255,68</text:p>
          </table:table-cell>
          <table:table-cell table:style-name="ce12N2" office:value-type="float" office:value="1137.9">
            <text:p>113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895691112923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2">
            <text:p>30831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48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15.6">
            <text:p>2581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23994.05">
            <text:p>23994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215905">
            <text:p>5,216</text:p>
          </table:table-cell>
          <table:table-cell table:style-name="ce12N2" office:value-type="float" office:value="90.93">
            <text:p>9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81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616.78">
            <text:p>20616,78</text:p>
          </table:table-cell>
          <table:table-cell table:style-name="ce12N2" office:value-type="float" office:value="20.6">
            <text:p>2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.53">
            <text:p>185,53</text:p>
          </table:table-cell>
          <table:table-cell table:style-name="ce12N2" office:value-type="float" office:value="55.01">
            <text:p>55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821.55">
            <text:p>1821,55</text:p>
          </table:table-cell>
          <table:table-cell table:style-name="ce12N2" office:value-type="float" office:value="23994.05">
            <text:p>23994,05</text:p>
          </table:table-cell>
          <table:table-cell table:style-name="ce12N2" office:value-type="float" office:value="1275.8">
            <text:p>127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48310107387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4">
            <text:p>30831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3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5.76">
            <text:p>211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27.8">
            <text:p>192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">
            <text:p>0,002</text:p>
          </table:table-cell>
          <table:table-cell table:style-name="ce12N2" office:value-type="float" office:value="0.06">
            <text:p>0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5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27.01">
            <text:p>1627,01</text:p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64">
            <text:p>14,64</text:p>
          </table:table-cell>
          <table:table-cell table:style-name="ce12N2" office:value-type="float" office:value="54.76">
            <text:p>54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87.96">
            <text:p>187,96</text:p>
          </table:table-cell>
          <table:table-cell table:style-name="ce12N2" office:value-type="float" office:value="1927.8">
            <text:p>1927,80</text:p>
          </table:table-cell>
          <table:table-cell table:style-name="ce12N2" office:value-type="float" office:value="134.95">
            <text:p>13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3113080618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5">
            <text:p>30831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2.7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0.08">
            <text:p>110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34.4">
            <text:p>103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2">
            <text:p>0,002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87.74">
            <text:p>887,7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99">
            <text:p>7,99</text:p>
          </table:table-cell>
          <table:table-cell table:style-name="ce12N2" office:value-type="float" office:value="55.17">
            <text:p>55,1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65.68">
            <text:p>65,68</text:p>
          </table:table-cell>
          <table:table-cell table:style-name="ce12N2" office:value-type="float" office:value="1034.4">
            <text:p>1034,40</text:p>
          </table:table-cell>
          <table:table-cell table:style-name="ce12N2" office:value-type="float" office:value="56.17">
            <text:p>5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27421675671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6">
            <text:p>308316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04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38.48">
            <text:p>1373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649.76">
            <text:p>13649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366121">
            <text:p>4,366</text:p>
          </table:table-cell>
          <table:table-cell table:style-name="ce12N2" office:value-type="float" office:value="9408">
            <text:p>940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3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20.06">
            <text:p>11520,06</text:p>
          </table:table-cell>
          <table:table-cell table:style-name="ce12N2" office:value-type="float" office:value="11.52">
            <text:p>11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3.68">
            <text:p>103,68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88.72">
            <text:p>88,72</text:p>
          </table:table-cell>
          <table:table-cell table:style-name="ce12N2" office:value-type="float" office:value="13649.76">
            <text:p>13649,76</text:p>
          </table:table-cell>
          <table:table-cell table:style-name="ce12N2" office:value-type="float" office:value="955.48">
            <text:p>95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0491965037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8">
            <text:p>308318</text:p>
          </table:table-cell>
          <table:table-cell table:style-name="ce0" table:number-columns-spanned="4" table:number-rows-spanned="1" office:value-type="string" calcext:value-type="string">
            <text:p>612 - GP CABOS IND. E COMERCIO LTDA</text:p>
          </table:table-cell>
          <table:covered-table-cell table:number-columns-repeated="3"/>
          <table:table-cell table:style-name="ce0" office:value-type="string" calcext:value-type="string">
            <text:p>81.2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51.7">
            <text:p>4815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8012.8">
            <text:p>480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1.548">
            <text:p>111,548</text:p>
          </table:table-cell>
          <table:table-cell table:style-name="ce12N2" office:value-type="float" office:value="1333.2">
            <text:p>133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151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022.11">
            <text:p>43022,11</text:p>
          </table:table-cell>
          <table:table-cell table:style-name="ce12N2" office:value-type="float" office:value="43.02">
            <text:p>4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7.2">
            <text:p>387,20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38.9">
            <text:p>138,90</text:p>
          </table:table-cell>
          <table:table-cell table:style-name="ce12N2" office:value-type="float" office:value="48012.8">
            <text:p>48012,80</text:p>
          </table:table-cell>
          <table:table-cell table:style-name="ce12N2" office:value-type="float" office:value="3360.9">
            <text:p>336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840044000155550010000812171335084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20">
            <text:p>308320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54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09.31">
            <text:p>2670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6536.82">
            <text:p>26536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09732">
            <text:p>4,810</text:p>
          </table:table-cell>
          <table:table-cell table:style-name="ce12N2" office:value-type="float" office:value="18020.07">
            <text:p>18020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70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396.41">
            <text:p>22396,41</text:p>
          </table:table-cell>
          <table:table-cell table:style-name="ce12N2" office:value-type="float" office:value="22.4">
            <text:p>2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1.57">
            <text:p>201,57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72.49">
            <text:p>172,49</text:p>
          </table:table-cell>
          <table:table-cell table:style-name="ce12N2" office:value-type="float" office:value="26536.82">
            <text:p>26536,82</text:p>
          </table:table-cell>
          <table:table-cell table:style-name="ce12N2" office:value-type="float" office:value="1857.58">
            <text:p>1857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5451396236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21">
            <text:p>308321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0.57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49.34">
            <text:p>9349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88.96">
            <text:p>928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31826">
            <text:p>3,032</text:p>
          </table:table-cell>
          <table:table-cell table:style-name="ce12N2" office:value-type="float" office:value="6144">
            <text:p>614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349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839.65">
            <text:p>7839,65</text:p>
          </table:table-cell>
          <table:table-cell table:style-name="ce12N2" office:value-type="float" office:value="7.84">
            <text:p>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.56">
            <text:p>70,56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60.38">
            <text:p>60,38</text:p>
          </table:table-cell>
          <table:table-cell table:style-name="ce12N2" office:value-type="float" office:value="9288.96">
            <text:p>9288,96</text:p>
          </table:table-cell>
          <table:table-cell table:style-name="ce12N2" office:value-type="float" office:value="650.23">
            <text:p>65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05721973870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28">
            <text:p>308328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5.9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802.18">
            <text:p>8280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78942.63">
            <text:p>78942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63645">
            <text:p>1,564</text:p>
          </table:table-cell>
          <table:table-cell table:style-name="ce12N2" office:value-type="float" office:value="478.25">
            <text:p>478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802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13">
            <text:p>67313,00</text:p>
          </table:table-cell>
          <table:table-cell table:style-name="ce12N2" office:value-type="float" office:value="67.3">
            <text:p>6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5.82">
            <text:p>605,8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859.55">
            <text:p>3859,55</text:p>
          </table:table-cell>
          <table:table-cell table:style-name="ce12N2" office:value-type="float" office:value="78942.63">
            <text:p>78942,63</text:p>
          </table:table-cell>
          <table:table-cell table:style-name="ce12N2" office:value-type="float" office:value="4768.57">
            <text:p>476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59621100008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0">
            <text:p>30833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3.1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912.72">
            <text:p>5091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47953.39">
            <text:p>47953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7852">
            <text:p>0,168</text:p>
          </table:table-cell>
          <table:table-cell table:style-name="ce12N2" office:value-type="float" office:value="162.28">
            <text:p>162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.91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368.34">
            <text:p>41368,34</text:p>
          </table:table-cell>
          <table:table-cell table:style-name="ce12N2" office:value-type="float" office:value="41.35">
            <text:p>4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2.33">
            <text:p>372,33</text:p>
          </table:table-cell>
          <table:table-cell table:style-name="ce12N2" office:value-type="float" office:value="55.19">
            <text:p>55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959.33">
            <text:p>2959,33</text:p>
          </table:table-cell>
          <table:table-cell table:style-name="ce12N2" office:value-type="float" office:value="47953.39">
            <text:p>47953,39</text:p>
          </table:table-cell>
          <table:table-cell table:style-name="ce12N2" office:value-type="float" office:value="2368.41">
            <text:p>23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312819529038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4">
            <text:p>30833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3.13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337.42">
            <text:p>10733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01003.1">
            <text:p>10100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613.56407">
            <text:p>1613,564</text:p>
          </table:table-cell>
          <table:table-cell table:style-name="ce12N2" office:value-type="float" office:value="3330.76">
            <text:p>3330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7.337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5244.08">
            <text:p>85244,08</text:p>
          </table:table-cell>
          <table:table-cell table:style-name="ce12N2" office:value-type="float" office:value="85.24">
            <text:p>8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7.21">
            <text:p>767,21</text:p>
          </table:table-cell>
          <table:table-cell table:style-name="ce12N2" office:value-type="float" office:value="55.18">
            <text:p>55,1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6334.32">
            <text:p>6334,32</text:p>
          </table:table-cell>
          <table:table-cell table:style-name="ce12N2" office:value-type="float" office:value="101003.1">
            <text:p>101003,10</text:p>
          </table:table-cell>
          <table:table-cell table:style-name="ce12N2" office:value-type="float" office:value="7070.22">
            <text:p>707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313219246916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6">
            <text:p>30833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3.24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74.43">
            <text:p>367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48">
            <text:p>33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6">
            <text:p>0,005</text:p>
          </table:table-cell>
          <table:table-cell table:style-name="ce12N2" office:value-type="float" office:value="0.81">
            <text:p>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74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16.78">
            <text:p>2916,78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25">
            <text:p>26,25</text:p>
          </table:table-cell>
          <table:table-cell table:style-name="ce12N2" office:value-type="float" office:value="54.76">
            <text:p>54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26.43">
            <text:p>326,43</text:p>
          </table:table-cell>
          <table:table-cell table:style-name="ce12N2" office:value-type="float" office:value="3348">
            <text:p>3348,00</text:p>
          </table:table-cell>
          <table:table-cell table:style-name="ce12N2" office:value-type="float" office:value="133.92">
            <text:p>13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324815109791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7">
            <text:p>30833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3.25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46.58">
            <text:p>7146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921.62">
            <text:p>6921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068">
            <text:p>0,022</text:p>
          </table:table-cell>
          <table:table-cell table:style-name="ce12N2" office:value-type="float" office:value="22.07">
            <text:p>22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46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30.11">
            <text:p>6030,11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7">
            <text:p>54,27</text:p>
          </table:table-cell>
          <table:table-cell table:style-name="ce12N2" office:value-type="float" office:value="55.56">
            <text:p>55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24.96">
            <text:p>224,96</text:p>
          </table:table-cell>
          <table:table-cell table:style-name="ce12N2" office:value-type="float" office:value="6921.62">
            <text:p>6921,62</text:p>
          </table:table-cell>
          <table:table-cell table:style-name="ce12N2" office:value-type="float" office:value="276.86">
            <text:p>27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325416730828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8">
            <text:p>30833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91.24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2">
            <text:p>701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66.72">
            <text:p>6966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73869">
            <text:p>2,274</text:p>
          </table:table-cell>
          <table:table-cell table:style-name="ce12N2" office:value-type="float" office:value="4608">
            <text:p>460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1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79.74">
            <text:p>5879,74</text:p>
          </table:table-cell>
          <table:table-cell table:style-name="ce12N2" office:value-type="float" office:value="5.88">
            <text:p>5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92">
            <text:p>52,92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5.28">
            <text:p>45,28</text:p>
          </table:table-cell>
          <table:table-cell table:style-name="ce12N2" office:value-type="float" office:value="6966.72">
            <text:p>6966,72</text:p>
          </table:table-cell>
          <table:table-cell table:style-name="ce12N2" office:value-type="float" office:value="487.67">
            <text:p>48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6883820000204550030018912441569615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0">
            <text:p>30834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65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1.3">
            <text:p>2415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995.33">
            <text:p>23995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60216">
            <text:p>4,860</text:p>
          </table:table-cell>
          <table:table-cell table:style-name="ce12N2" office:value-type="float" office:value="18788.4">
            <text:p>1878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51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51.46">
            <text:p>20251,46</text:p>
          </table:table-cell>
          <table:table-cell table:style-name="ce12N2" office:value-type="float" office:value="20.25">
            <text:p>2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27">
            <text:p>182,27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55.97">
            <text:p>155,97</text:p>
          </table:table-cell>
          <table:table-cell table:style-name="ce12N2" office:value-type="float" office:value="23995.33">
            <text:p>23995,33</text:p>
          </table:table-cell>
          <table:table-cell table:style-name="ce12N2" office:value-type="float" office:value="1679.67">
            <text:p>167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65213855366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1">
            <text:p>308341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70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8.39">
            <text:p>5118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91826">
            <text:p>0,592</text:p>
          </table:table-cell>
          <table:table-cell table:style-name="ce12N2" office:value-type="float" office:value="4084.48">
            <text:p>4084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18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91.91">
            <text:p>4291,91</text:p>
          </table:table-cell>
          <table:table-cell table:style-name="ce12N2" office:value-type="float" office:value="4.29">
            <text:p>4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63">
            <text:p>38,63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3.05">
            <text:p>33,05</text:p>
          </table:table-cell>
          <table:table-cell table:style-name="ce12N2" office:value-type="float" office:value="5085.34">
            <text:p>5085,34</text:p>
          </table:table-cell>
          <table:table-cell table:style-name="ce12N2" office:value-type="float" office:value="355.97">
            <text:p>35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7071683356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2">
            <text:p>308342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70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969.75">
            <text:p>179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853.7">
            <text:p>1785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73254">
            <text:p>2,073</text:p>
          </table:table-cell>
          <table:table-cell table:style-name="ce12N2" office:value-type="float" office:value="9024.1">
            <text:p>902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969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68.07">
            <text:p>15068,07</text:p>
          </table:table-cell>
          <table:table-cell table:style-name="ce12N2" office:value-type="float" office:value="15.07">
            <text:p>1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.61">
            <text:p>135,61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16.05">
            <text:p>116,05</text:p>
          </table:table-cell>
          <table:table-cell table:style-name="ce12N2" office:value-type="float" office:value="17853.7">
            <text:p>17853,70</text:p>
          </table:table-cell>
          <table:table-cell table:style-name="ce12N2" office:value-type="float" office:value="1249.76">
            <text:p>124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7081748213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4">
            <text:p>30834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8.71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85.02">
            <text:p>1328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1958">
            <text:p>0,752</text:p>
          </table:table-cell>
          <table:table-cell table:style-name="ce12N2" office:value-type="float" office:value="5953.15">
            <text:p>5953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8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39.82">
            <text:p>11139,82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.26">
            <text:p>100,26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85.79">
            <text:p>85,79</text:p>
          </table:table-cell>
          <table:table-cell table:style-name="ce12N2" office:value-type="float" office:value="13199.23">
            <text:p>13199,23</text:p>
          </table:table-cell>
          <table:table-cell table:style-name="ce12N2" office:value-type="float" office:value="923.95">
            <text:p>92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4423880000145550030012187101860066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49">
            <text:p>308349</text:p>
          </table:table-cell>
          <table:table-cell table:style-name="ce0" table:number-columns-spanned="4" table:number-rows-spanned="1" office:value-type="string" calcext:value-type="string">
            <text:p>589 - MONTANA HIDROTECNICA LTDA</text:p>
          </table:table-cell>
          <table:covered-table-cell table:number-columns-repeated="3"/>
          <table:table-cell table:style-name="ce0" office:value-type="string" calcext:value-type="string">
            <text:p>53.835</text:p>
          </table:table-cell>
          <table:table-cell table:style-name="ce9" office:value-type="string" calcext:value-type="string">
            <text:p>100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095.33">
            <text:p>5709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6973.16">
            <text:p>5697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25144">
            <text:p>1,425</text:p>
          </table:table-cell>
          <table:table-cell table:style-name="ce12N2" office:value-type="float" office:value="208.5">
            <text:p>20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.095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905.51">
            <text:p>50905,51</text:p>
          </table:table-cell>
          <table:table-cell table:style-name="ce12N2" office:value-type="float" office:value="50.91">
            <text:p>5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8.15">
            <text:p>458,15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122.17">
            <text:p>122,17</text:p>
          </table:table-cell>
          <table:table-cell table:style-name="ce12N2" office:value-type="float" office:value="56973.16">
            <text:p>56973,16</text:p>
          </table:table-cell>
          <table:table-cell table:style-name="ce12N2" office:value-type="float" office:value="3988.12">
            <text:p>398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3260501595430000166551000000538351344787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0">
            <text:p>308350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8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9">
            <text:p>204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">
            <text:p>0,003</text:p>
          </table:table-cell>
          <table:table-cell table:style-name="ce12N2" office:value-type="float" office:value="49.5">
            <text:p>49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74.87">
            <text:p>1674,87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07">
            <text:p>15,07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64.5">
            <text:p>64,50</text:p>
          </table:table-cell>
          <table:table-cell table:style-name="ce12N2" office:value-type="float" office:value="1984.5">
            <text:p>1984,50</text:p>
          </table:table-cell>
          <table:table-cell table:style-name="ce12N2" office:value-type="float" office:value="138.92">
            <text:p>13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835212460861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1">
            <text:p>308351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8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86.57">
            <text:p>2528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4490.63">
            <text:p>24490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5078">
            <text:p>3,751</text:p>
          </table:table-cell>
          <table:table-cell table:style-name="ce12N2" office:value-type="float" office:value="449.38">
            <text:p>449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86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669.48">
            <text:p>20669,48</text:p>
          </table:table-cell>
          <table:table-cell table:style-name="ce12N2" office:value-type="float" office:value="20.67">
            <text:p>20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6.03">
            <text:p>186,03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795.94">
            <text:p>795,94</text:p>
          </table:table-cell>
          <table:table-cell table:style-name="ce12N2" office:value-type="float" office:value="24490.63">
            <text:p>24490,63</text:p>
          </table:table-cell>
          <table:table-cell table:style-name="ce12N2" office:value-type="float" office:value="1714.34">
            <text:p>171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83541758481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2">
            <text:p>308352</text:p>
          </table:table-cell>
          <table:table-cell table:style-name="ce0" table:number-columns-spanned="4" table:number-rows-spanned="1" office:value-type="string" calcext:value-type="string">
            <text:p>937 - TYROLIT DO BRASIL LTDA</text:p>
          </table:table-cell>
          <table:covered-table-cell table:number-columns-repeated="3"/>
          <table:table-cell table:style-name="ce0" office:value-type="string" calcext:value-type="string">
            <text:p>254.6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">
            <text:p>3,740</text:p>
          </table:table-cell>
          <table:table-cell table:style-name="ce12N2" office:value-type="float" office:value="71.4">
            <text:p>7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76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839.73">
            <text:p>15839,73</text:p>
          </table:table-cell>
          <table:table-cell table:style-name="ce12N2" office:value-type="float" office:value="15.84">
            <text:p>1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.56">
            <text:p>142,56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68">
            <text:p>18768,00</text:p>
          </table:table-cell>
          <table:table-cell table:style-name="ce12N2" office:value-type="float" office:value="1313.76">
            <text:p>131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099539000102550010002546891964739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53">
            <text:p>308353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351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073.19">
            <text:p>1507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4767.5">
            <text:p>1476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219">
            <text:p>0,050</text:p>
          </table:table-cell>
          <table:table-cell table:style-name="ce12N2" office:value-type="float" office:value="38.73">
            <text:p>38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07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63.39">
            <text:p>12463,39</text:p>
          </table:table-cell>
          <table:table-cell table:style-name="ce12N2" office:value-type="float" office:value="12.46">
            <text:p>1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.17">
            <text:p>112,17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305.69">
            <text:p>305,69</text:p>
          </table:table-cell>
          <table:table-cell table:style-name="ce12N2" office:value-type="float" office:value="14767.5">
            <text:p>14767,50</text:p>
          </table:table-cell>
          <table:table-cell table:style-name="ce12N2" office:value-type="float" office:value="1033.73">
            <text:p>103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3511172918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70">
            <text:p>170,00</text:p>
          </table:table-cell>
          <table:table-cell table:style-name="ce26N2" office:value-type="float" office:value="24135.84">
            <text:p>24135,84</text:p>
          </table:table-cell>
          <table:table-cell table:style-name="ce26N2" office:value-type="float" office:value="1760.13">
            <text:p>1760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4789.57">
            <text:p>164789,57</text:p>
          </table:table-cell>
          <table:table-cell table:style-name="ce26N2" office:value-type="float" office:value="6966502.47">
            <text:p>6966502,47</text:p>
          </table:table-cell>
          <table:table-cell table:style-name="ce26N2" office:value-type="float" office:value="450560.44">
            <text:p>450560,4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174505.82">
            <text:p>7174505,8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4444.72">
            <text:p>54444,72</text:p>
          </table:table-cell>
          <table:table-cell table:style-name="ce26N2" office:value-type="float" office:value="9758.59">
            <text:p>9758,59</text:p>
          </table:table-cell>
          <table:table-cell table:style-name="ce26N2" office:value-type="float" office:value="701.58">
            <text:p>701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2211.845691">
            <text:p>12211,846</text:p>
          </table:table-cell>
          <table:table-cell table:style-name="ce26N2" office:value-type="float" office:value="7022333.37">
            <text:p>7022333,37</text:p>
          </table:table-cell>
          <table:table-cell table:style-name="ce26N2" office:value-type="float" office:value="7174505.82">
            <text:p>7174505,8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077533.38">
            <text:p>3077533,38</text:p>
          </table:table-cell>
          <table:table-cell table:style-name="ce26N2" office:value-type="float" office:value="3077.48">
            <text:p>3077,4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7697.77">
            <text:p>27697,77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51854.31">
            <text:p>651854,3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.51">
            <text:p>41,5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OBJETIV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382" meta:object-count="0"/>
    <meta:generator>LibreOffice/4.3.0.4$Windows_x86 LibreOffice_project/62ad5818884a2fc2e5780dd45466868d41009ec0</meta:generator>
  </office:meta>
</office:document-meta>
</file>