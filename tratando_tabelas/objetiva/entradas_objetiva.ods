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5/05/2026 07:59:5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5">
            <text:p>305685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8.5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.91">
            <text:p>212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7">
            <text:p>0,0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5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6.91">
            <text:p>66,91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144.13">
            <text:p>14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85061364734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9">
            <text:p>305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6.28">
            <text:p>2477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2032">
            <text:p>0,292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77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176">
            <text:p>1176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1109.25">
            <text:p>110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01009880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0">
            <text:p>305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40.35">
            <text:p>644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078">
            <text:p>0,066</text:p>
          </table:table-cell>
          <table:table-cell table:style-name="ce12N2" office:value-type="float" office:value="29.53">
            <text:p>2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4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393.07">
            <text:p>393,07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241.89">
            <text:p>24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91481731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1">
            <text:p>305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8.35">
            <text:p>83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425">
            <text:p>0,384</text:p>
          </table:table-cell>
          <table:table-cell table:style-name="ce12N2" office:value-type="float" office:value="7.31">
            <text:p>7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41.65">
            <text:p>741,65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304.27">
            <text:p>30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81855789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2">
            <text:p>3059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92">
            <text:p>0,003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71344346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3">
            <text:p>3059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3.46">
            <text:p>69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">
            <text:p>0,075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422.56">
            <text:p>422,56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455.06">
            <text:p>4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41901992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4">
            <text:p>3059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501">
            <text:p>0,082</text:p>
          </table:table-cell>
          <table:table-cell table:style-name="ce12N2" office:value-type="float" office:value="17.36">
            <text:p>1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9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7.31">
            <text:p>1577,31</text:p>
          </table:table-cell>
          <table:table-cell table:style-name="ce12N2" office:value-type="float" office:value="103.08">
            <text:p>10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31396025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5">
            <text:p>3059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38">
            <text:p>0,033</text:p>
          </table:table-cell>
          <table:table-cell table:style-name="ce12N2" office:value-type="float" office:value="6.6">
            <text:p>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4.96">
            <text:p>1704,96</text:p>
          </table:table-cell>
          <table:table-cell table:style-name="ce12N2" office:value-type="float" office:value="119.35">
            <text:p>1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21490162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7">
            <text:p>3059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.5">
            <text:p>29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78">
            <text:p>0,006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19.16">
            <text:p>1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11892787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9">
            <text:p>305929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9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77.5">
            <text:p>170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27">
            <text:p>0,155</text:p>
          </table:table-cell>
          <table:table-cell table:style-name="ce12N2" office:value-type="float" office:value="210.19">
            <text:p>2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7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">
            <text:p>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37.54">
            <text:p>537,54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1157.8">
            <text:p>115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90471998837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9">
            <text:p>305939</text:p>
          </table:table-cell>
          <table:table-cell table:style-name="ce0" table:number-columns-spanned="4" table:number-rows-spanned="1" office:value-type="string" calcext:value-type="string">
            <text:p>16.404 - GARRA DISTRIBUIDORA DE FUNDIDOS EIRELI</text:p>
          </table:table-cell>
          <table:covered-table-cell table:number-columns-repeated="3"/>
          <table:table-cell table:style-name="ce0" office:value-type="string" calcext:value-type="string">
            <text:p>5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6">
            <text:p>0,022</text:p>
          </table:table-cell>
          <table:table-cell table:style-name="ce12N2" office:value-type="float" office:value="45.1">
            <text:p>4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76.82">
            <text:p>10076,82</text:p>
          </table:table-cell>
          <table:table-cell table:style-name="ce12N2" office:value-type="float" office:value="397.02">
            <text:p>397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178097140001485500100000577019134007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3">
            <text:p>3059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313408256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97">
            <text:p>30609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4.6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2">
            <text:p>0,011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4645197999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2">
            <text:p>306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24.94">
            <text:p>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6129613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6">
            <text:p>30617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5.47">
            <text:p>720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435.48">
            <text:p>543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64056">
            <text:p>1,964</text:p>
          </table:table-cell>
          <table:table-cell table:style-name="ce12N2" office:value-type="float" office:value="62.3">
            <text:p>62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467.52">
            <text:p>467,52</text:p>
          </table:table-cell>
          <table:table-cell table:style-name="ce12N2" office:value-type="float" office:value="5084.86">
            <text:p>5084,86</text:p>
          </table:table-cell>
          <table:table-cell table:style-name="ce12N2" office:value-type="float" office:value="203.4">
            <text:p>2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67.22">
            <text:p>7267,22</text:p>
          </table:table-cell>
          <table:table-cell table:style-name="ce12N2" office:value-type="float" office:value="1302.47">
            <text:p>1302,4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506124771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1">
            <text:p>306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316">
            <text:p>0,01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150.82">
            <text:p>15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71149664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2">
            <text:p>306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6.2">
            <text:p>316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66.2">
            <text:p>316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">
            <text:p>0,04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24.94">
            <text:p>2324,94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01535720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3">
            <text:p>306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0">
            <text:p>39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0">
            <text:p>39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3">
            <text:p>0,04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0.49">
            <text:p>2900,49</text:p>
          </table:table-cell>
          <table:table-cell table:style-name="ce12N2" office:value-type="float" office:value="203.03">
            <text:p>2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11554934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4">
            <text:p>306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24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64.48">
            <text:p>6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31188274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5">
            <text:p>306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.58">
            <text:p>3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.56">
            <text:p>2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728">
            <text:p>0,287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9.02">
            <text:p>19,02</text:p>
          </table:table-cell>
          <table:table-cell table:style-name="ce12N2" office:value-type="float" office:value="292.56">
            <text:p>292,56</text:p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216562189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6">
            <text:p>3062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">
            <text:p>0,064</text:p>
          </table:table-cell>
          <table:table-cell table:style-name="ce12N2" office:value-type="float" office:value="82.5">
            <text:p>8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63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3754.33">
            <text:p>37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51937980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7">
            <text:p>3062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24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64.48">
            <text:p>6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6199170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8">
            <text:p>3062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">
            <text:p>0,026</text:p>
          </table:table-cell>
          <table:table-cell table:style-name="ce12N2" office:value-type="float" office:value="33.51">
            <text:p>3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4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1571.41">
            <text:p>15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8163582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9">
            <text:p>3062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9.04">
            <text:p>1012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10.84">
            <text:p>95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3804">
            <text:p>0,304</text:p>
          </table:table-cell>
          <table:table-cell table:style-name="ce12N2" office:value-type="float" office:value="29.74">
            <text:p>29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9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618.2">
            <text:p>618,20</text:p>
          </table:table-cell>
          <table:table-cell table:style-name="ce12N2" office:value-type="float" office:value="9510.84">
            <text:p>9510,84</text:p>
          </table:table-cell>
          <table:table-cell table:style-name="ce12N2" office:value-type="float" office:value="665.76">
            <text:p>66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91543074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0">
            <text:p>3062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6">
            <text:p>0,000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195.65">
            <text:p>19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01451819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1">
            <text:p>3062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12">
            <text:p>0,000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234.78">
            <text:p>2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1189965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2">
            <text:p>3062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1591">
            <text:p>1,282</text:p>
          </table:table-cell>
          <table:table-cell table:style-name="ce12N2" office:value-type="float" office:value="57.15">
            <text:p>57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283.49">
            <text:p>28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21584226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9">
            <text:p>3062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12">
            <text:p>0,001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32.24">
            <text:p>3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41083385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3">
            <text:p>30627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68.78">
            <text:p>1976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336646">
            <text:p>30,337</text:p>
          </table:table-cell>
          <table:table-cell table:style-name="ce12N2" office:value-type="float" office:value="263.02">
            <text:p>26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76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1126.17">
            <text:p>11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949.99">
            <text:p>23949,99</text:p>
          </table:table-cell>
          <table:table-cell table:style-name="ce12N2" office:value-type="float" office:value="3680.7">
            <text:p>3680,7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6002157765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7">
            <text:p>30634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58.7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02.4">
            <text:p>6780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4842.36">
            <text:p>6484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168">
            <text:p>1,643</text:p>
          </table:table-cell>
          <table:table-cell table:style-name="ce12N2" office:value-type="float" office:value="600.74">
            <text:p>60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80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960.04">
            <text:p>2960,04</text:p>
          </table:table-cell>
          <table:table-cell table:style-name="ce12N2" office:value-type="float" office:value="64842.36">
            <text:p>64842,36</text:p>
          </table:table-cell>
          <table:table-cell table:style-name="ce12N2" office:value-type="float" office:value="2593.71">
            <text:p>259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45990181003285550020012587921490555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63">
            <text:p>3063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2.82">
            <text:p>12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8.8">
            <text:p>11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8">
            <text:p>0,020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4.02">
            <text:p>74,02</text:p>
          </table:table-cell>
          <table:table-cell table:style-name="ce12N2" office:value-type="float" office:value="1138.8">
            <text:p>1138,80</text:p>
          </table:table-cell>
          <table:table-cell table:style-name="ce12N2" office:value-type="float" office:value="45.55">
            <text:p>4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51964982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4">
            <text:p>3063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.59">
            <text:p>35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0.13">
            <text:p>330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330.13">
            <text:p>330,13</text:p>
          </table:table-cell>
          <table:table-cell table:style-name="ce12N2" office:value-type="float" office:value="13.21">
            <text:p>1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11948470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5">
            <text:p>30638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8">
            <text:p>0,155</text:p>
          </table:table-cell>
          <table:table-cell table:style-name="ce12N2" office:value-type="float" office:value="22.32">
            <text:p>2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261976310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6">
            <text:p>3063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67">
            <text:p>0,297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109.48">
            <text:p>1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3818883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7">
            <text:p>3063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1.27">
            <text:p>164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48">
            <text:p>0,086</text:p>
          </table:table-cell>
          <table:table-cell table:style-name="ce12N2" office:value-type="float" office:value="70.92">
            <text:p>7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54.07">
            <text:p>754,07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1097.4">
            <text:p>109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451350167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0">
            <text:p>30639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05.9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45.11">
            <text:p>2034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24">
            <text:p>0,023</text:p>
          </table:table-cell>
          <table:table-cell table:style-name="ce12N2" office:value-type="float" office:value="70.03">
            <text:p>7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45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25.73">
            <text:p>925,73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778.34">
            <text:p>77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1723086000143550010004059441499965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1">
            <text:p>306391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6236">
            <text:p>0,496</text:p>
          </table:table-cell>
          <table:table-cell table:style-name="ce12N2" office:value-type="float" office:value="246.07">
            <text:p>246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48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2477.78">
            <text:p>24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81066087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4">
            <text:p>306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34.08">
            <text:p>3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61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879.28">
            <text:p>8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61343662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5">
            <text:p>306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8.12">
            <text:p>209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32.08">
            <text:p>203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806">
            <text:p>0,020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9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6.04">
            <text:p>66,04</text:p>
          </table:table-cell>
          <table:table-cell table:style-name="ce12N2" office:value-type="float" office:value="2032.08">
            <text:p>2032,08</text:p>
          </table:table-cell>
          <table:table-cell table:style-name="ce12N2" office:value-type="float" office:value="142.25">
            <text:p>1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71377675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6">
            <text:p>306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">
            <text:p>0,046</text:p>
          </table:table-cell>
          <table:table-cell table:style-name="ce12N2" office:value-type="float" office:value="59.29">
            <text:p>5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71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2780.18">
            <text:p>278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81957456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8">
            <text:p>306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8">
            <text:p>0,001</text:p>
          </table:table-cell>
          <table:table-cell table:style-name="ce12N2" office:value-type="float" office:value="18.72">
            <text:p>1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117.96">
            <text:p>1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11816650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9">
            <text:p>306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12">
            <text:p>0,015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4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181.36">
            <text:p>1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31385987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0">
            <text:p>306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33648">
            <text:p>1,934</text:p>
          </table:table-cell>
          <table:table-cell table:style-name="ce12N2" office:value-type="float" office:value="785.8">
            <text:p>78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.951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6558.05">
            <text:p>65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41345659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0">
            <text:p>3064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00842">
            <text:p>3,101</text:p>
          </table:table-cell>
          <table:table-cell table:style-name="ce12N2" office:value-type="float" office:value="1141.39">
            <text:p>114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089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1896.25">
            <text:p>189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51388500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1">
            <text:p>30649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57.73">
            <text:p>12045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20297.26">
            <text:p>12029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5.267434">
            <text:p>65,267</text:p>
          </table:table-cell>
          <table:table-cell table:style-name="ce12N2" office:value-type="float" office:value="1956.94">
            <text:p>195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0.45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60.47">
            <text:p>160,47</text:p>
          </table:table-cell>
          <table:table-cell table:style-name="ce12N2" office:value-type="float" office:value="120297.26">
            <text:p>120297,26</text:p>
          </table:table-cell>
          <table:table-cell table:style-name="ce12N2" office:value-type="float" office:value="7696.03">
            <text:p>769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61496564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2">
            <text:p>30652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2.76">
            <text:p>363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22.88">
            <text:p>34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16">
            <text:p>0,122</text:p>
          </table:table-cell>
          <table:table-cell table:style-name="ce12N2" office:value-type="float" office:value="81.2">
            <text:p>8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09.88">
            <text:p>209,88</text:p>
          </table:table-cell>
          <table:table-cell table:style-name="ce12N2" office:value-type="float" office:value="3422.88">
            <text:p>3422,88</text:p>
          </table:table-cell>
          <table:table-cell table:style-name="ce12N2" office:value-type="float" office:value="239.6">
            <text:p>23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2691833961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4">
            <text:p>30652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239.12">
            <text:p>18623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">
            <text:p>49,00</text:p>
          </table:table-cell>
          <table:table-cell table:style-name="ce12N2" office:value-type="float" office:value="179628.19">
            <text:p>17962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4.658971">
            <text:p>94,659</text:p>
          </table:table-cell>
          <table:table-cell table:style-name="ce12N2" office:value-type="float" office:value="1871.6">
            <text:p>18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6.23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610.93">
            <text:p>6610,93</text:p>
          </table:table-cell>
          <table:table-cell table:style-name="ce12N2" office:value-type="float" office:value="179628.19">
            <text:p>179628,19</text:p>
          </table:table-cell>
          <table:table-cell table:style-name="ce12N2" office:value-type="float" office:value="12267.09">
            <text:p>1226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12231570125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0">
            <text:p>3065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05.15">
            <text:p>1080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156.55">
            <text:p>10156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74">
            <text:p>0,072</text:p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0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48.6">
            <text:p>648,60</text:p>
          </table:table-cell>
          <table:table-cell table:style-name="ce12N2" office:value-type="float" office:value="10156.55">
            <text:p>10156,55</text:p>
          </table:table-cell>
          <table:table-cell table:style-name="ce12N2" office:value-type="float" office:value="411.61">
            <text:p>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0106607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1">
            <text:p>3065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8">
            <text:p>0,001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11656025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2">
            <text:p>3065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.38">
            <text:p>9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.8">
            <text:p>88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885.8">
            <text:p>885,80</text:p>
          </table:table-cell>
          <table:table-cell table:style-name="ce12N2" office:value-type="float" office:value="62.01">
            <text:p>6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21201088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3">
            <text:p>3065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12.47">
            <text:p>1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31466335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4">
            <text:p>3065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9.32">
            <text:p>64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9.69">
            <text:p>609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36">
            <text:p>0,005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9.63">
            <text:p>39,63</text:p>
          </table:table-cell>
          <table:table-cell table:style-name="ce12N2" office:value-type="float" office:value="609.69">
            <text:p>609,69</text:p>
          </table:table-cell>
          <table:table-cell table:style-name="ce12N2" office:value-type="float" office:value="24.39">
            <text:p>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41814608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3">
            <text:p>306543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2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12.75">
            <text:p>2461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3803.41">
            <text:p>23803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6.63313">
            <text:p>86,633</text:p>
          </table:table-cell>
          <table:table-cell table:style-name="ce12N2" office:value-type="float" office:value="170.75">
            <text:p>17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1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1">
            <text:p>44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9.34">
            <text:p>809,34</text:p>
          </table:table-cell>
          <table:table-cell table:style-name="ce12N2" office:value-type="float" office:value="23803.41">
            <text:p>23803,41</text:p>
          </table:table-cell>
          <table:table-cell table:style-name="ce12N2" office:value-type="float" office:value="1666.24">
            <text:p>166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22881222120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4">
            <text:p>30654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3.13295">
            <text:p>203,133</text:p>
          </table:table-cell>
          <table:table-cell table:style-name="ce12N2" office:value-type="float" office:value="1105.85">
            <text:p>110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1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2961.84">
            <text:p>29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82761000014255001000067330181227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7">
            <text:p>30654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8.54">
            <text:p>2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08">
            <text:p>0,241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.54">
            <text:p>80,54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211528224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8">
            <text:p>30654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277">
            <text:p>0,683</text:p>
          </table:table-cell>
          <table:table-cell table:style-name="ce12N2" office:value-type="float" office:value="99.99">
            <text:p>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4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514.44">
            <text:p>51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041851497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9">
            <text:p>30654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380135421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0">
            <text:p>306550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">
            <text:p>0,036</text:p>
          </table:table-cell>
          <table:table-cell table:style-name="ce12N2" office:value-type="float" office:value="266">
            <text:p>2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336.77">
            <text:p>33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887523000152550010000372201003722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3">
            <text:p>30656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5.9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4.591891">
            <text:p>204,592</text:p>
          </table:table-cell>
          <table:table-cell table:style-name="ce12N2" office:value-type="float" office:value="1037.37">
            <text:p>103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205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3724.35">
            <text:p>372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5937166308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2">
            <text:p>30657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3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4.25">
            <text:p>1576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568.08">
            <text:p>1556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4.844636">
            <text:p>134,845</text:p>
          </table:table-cell>
          <table:table-cell table:style-name="ce12N2" office:value-type="float" office:value="530.69">
            <text:p>53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6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96.17">
            <text:p>196,17</text:p>
          </table:table-cell>
          <table:table-cell table:style-name="ce12N2" office:value-type="float" office:value="15093.76">
            <text:p>15093,76</text:p>
          </table:table-cell>
          <table:table-cell table:style-name="ce12N2" office:value-type="float" office:value="1056.55">
            <text:p>105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93411895829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7">
            <text:p>3066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828">
            <text:p>0,248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187.07">
            <text:p>18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6071017307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6">
            <text:p>306706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89.38">
            <text:p>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91159426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384">
            <text:p>3,387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1">
            <text:p>306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556">
            <text:p>0,029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171.93">
            <text:p>17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41706668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2">
            <text:p>306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4">
            <text:p>0,022</text:p>
          </table:table-cell>
          <table:table-cell table:style-name="ce12N2" office:value-type="float" office:value="2.7">
            <text:p>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129.93">
            <text:p>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51462846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3">
            <text:p>3067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71.38">
            <text:p>4267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367.26">
            <text:p>4236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7">
            <text:p>0,112</text:p>
          </table:table-cell>
          <table:table-cell table:style-name="ce12N2" office:value-type="float" office:value="81.82">
            <text:p>8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7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4.12">
            <text:p>304,12</text:p>
          </table:table-cell>
          <table:table-cell table:style-name="ce12N2" office:value-type="float" office:value="42367.26">
            <text:p>42367,26</text:p>
          </table:table-cell>
          <table:table-cell table:style-name="ce12N2" office:value-type="float" office:value="2965.72">
            <text:p>296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61038430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4">
            <text:p>3067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">
            <text:p>0,011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9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699.81">
            <text:p>69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71386515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5">
            <text:p>3067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29.93">
            <text:p>19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043.56">
            <text:p>1904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116">
            <text:p>0,021</text:p>
          </table:table-cell>
          <table:table-cell table:style-name="ce12N2" office:value-type="float" office:value="35.5">
            <text:p>3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29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86.37">
            <text:p>86,37</text:p>
          </table:table-cell>
          <table:table-cell table:style-name="ce12N2" office:value-type="float" office:value="19043.56">
            <text:p>19043,56</text:p>
          </table:table-cell>
          <table:table-cell table:style-name="ce12N2" office:value-type="float" office:value="1333.04">
            <text:p>13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1146994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6">
            <text:p>3067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">
            <text:p>0,007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423.07">
            <text:p>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21503267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7">
            <text:p>3067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3.02">
            <text:p>778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08">
            <text:p>73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228">
            <text:p>3,123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3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75.02">
            <text:p>475,02</text:p>
          </table:table-cell>
          <table:table-cell table:style-name="ce12N2" office:value-type="float" office:value="7308">
            <text:p>7308,00</text:p>
          </table:table-cell>
          <table:table-cell table:style-name="ce12N2" office:value-type="float" office:value="292.32">
            <text:p>2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31395649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0">
            <text:p>306800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11095">
            <text:p>26,111</text:p>
          </table:table-cell>
          <table:table-cell table:style-name="ce12N2" office:value-type="float" office:value="250.16">
            <text:p>25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980200012255001000050813139037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7">
            <text:p>30682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3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7.95">
            <text:p>656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62405.13">
            <text:p>6240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4279">
            <text:p>1,384</text:p>
          </table:table-cell>
          <table:table-cell table:style-name="ce12N2" office:value-type="float" office:value="794.26">
            <text:p>79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272.82">
            <text:p>3272,82</text:p>
          </table:table-cell>
          <table:table-cell table:style-name="ce12N2" office:value-type="float" office:value="62405.13">
            <text:p>62405,13</text:p>
          </table:table-cell>
          <table:table-cell table:style-name="ce12N2" office:value-type="float" office:value="3227.07">
            <text:p>322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32591174401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6">
            <text:p>30683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54">
            <text:p>0,175</text:p>
          </table:table-cell>
          <table:table-cell table:style-name="ce12N2" office:value-type="float" office:value="47.7">
            <text:p>47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972.3">
            <text:p>97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6194697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7">
            <text:p>306837</text:p>
          </table:table-cell>
          <table:table-cell table:style-name="ce0" table:number-columns-spanned="4" table:number-rows-spanned="1" office:value-type="string" calcext:value-type="string">
            <text:p>35.393 - METALURGICA LOTH LTDA</text:p>
          </table:table-cell>
          <table:covered-table-cell table:number-columns-repeated="3"/>
          <table:table-cell table:style-name="ce0" office:value-type="string" calcext:value-type="string">
            <text:p>73.7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8.91">
            <text:p>340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22">
            <text:p>0,332</text:p>
          </table:table-cell>
          <table:table-cell table:style-name="ce12N2" office:value-type="float" office:value="113.08">
            <text:p>1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8.96">
            <text:p>18,96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237.3">
            <text:p>23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727568900010755001000073722175278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6">
            <text:p>30684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0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072.28">
            <text:p>5207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0612.07">
            <text:p>506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6244">
            <text:p>0,256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07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460.21">
            <text:p>1460,21</text:p>
          </table:table-cell>
          <table:table-cell table:style-name="ce12N2" office:value-type="float" office:value="48258.35">
            <text:p>48258,35</text:p>
          </table:table-cell>
          <table:table-cell table:style-name="ce12N2" office:value-type="float" office:value="2030.2">
            <text:p>203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0271139646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7">
            <text:p>30686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7.22">
            <text:p>10264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26.31291">
            <text:p>2726,313</text:p>
          </table:table-cell>
          <table:table-cell table:style-name="ce12N2" office:value-type="float" office:value="418.76">
            <text:p>41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64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906.18">
            <text:p>906,18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7076.1">
            <text:p>707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62391023305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4">
            <text:p>3069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9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571065978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56">
            <text:p>30695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1.1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0.15">
            <text:p>33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4">
            <text:p>0,218</text:p>
          </table:table-cell>
          <table:table-cell table:style-name="ce12N2" office:value-type="float" office:value="35.4">
            <text:p>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06.4">
            <text:p>106,4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229.16">
            <text:p>22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11031424740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4">
            <text:p>306964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9.83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78.83">
            <text:p>7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98381431941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6">
            <text:p>30698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91936">
            <text:p>1,19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953.55">
            <text:p>9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761100031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7">
            <text:p>306987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072">
            <text:p>0,207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8611000311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3">
            <text:p>307053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12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6.29">
            <text:p>339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587">
            <text:p>0,450</text:p>
          </table:table-cell>
          <table:table-cell table:style-name="ce12N2" office:value-type="float" office:value="40.4">
            <text:p>4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07.29">
            <text:p>207,29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160.68">
            <text:p>16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7110960000178550010016121951426337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4">
            <text:p>307054</text:p>
          </table:table-cell>
          <table:table-cell table:style-name="ce0" table:number-columns-spanned="4" table:number-rows-spanned="1" office:value-type="string" calcext:value-type="string">
            <text:p>21.328 - CERAMICA ALMEIDA LTDA</text:p>
          </table:table-cell>
          <table:covered-table-cell table:number-columns-repeated="3"/>
          <table:table-cell table:style-name="ce0" office:value-type="string" calcext:value-type="string">
            <text:p>187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78.36">
            <text:p>6127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882.62">
            <text:p>60882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120789">
            <text:p>11,121</text:p>
          </table:table-cell>
          <table:table-cell table:style-name="ce12N2" office:value-type="float" office:value="39917.59">
            <text:p>39917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27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71">
            <text:p>74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395.74">
            <text:p>395,74</text:p>
          </table:table-cell>
          <table:table-cell table:style-name="ce12N2" office:value-type="float" office:value="60882.62">
            <text:p>60882,62</text:p>
          </table:table-cell>
          <table:table-cell table:style-name="ce12N2" office:value-type="float" office:value="4261.79">
            <text:p>426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467663300035155001000187239111964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8">
            <text:p>30705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198.37">
            <text:p>38219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38815">
            <text:p>58,388</text:p>
          </table:table-cell>
          <table:table-cell table:style-name="ce12N2" office:value-type="float" office:value="2277.92">
            <text:p>227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2.198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96.51">
            <text:p>496,51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26719.13">
            <text:p>26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31113356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3">
            <text:p>30706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35">
            <text:p>2,284</text:p>
          </table:table-cell>
          <table:table-cell table:style-name="ce12N2" office:value-type="float" office:value="899.02">
            <text:p>89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8.99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31429.97">
            <text:p>3142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51431206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6">
            <text:p>30706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3292">
            <text:p>1,293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479.86">
            <text:p>47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1135063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7">
            <text:p>30706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6">
            <text:p>0,553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264.01">
            <text:p>2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010051908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8">
            <text:p>3070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456">
            <text:p>0,456</text:p>
          </table:table-cell>
          <table:table-cell table:style-name="ce12N2" office:value-type="float" office:value="132.78">
            <text:p>13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391018201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9">
            <text:p>3070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6788">
            <text:p>0,347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21014824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0">
            <text:p>30707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8.38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6501">
            <text:p>11,865</text:p>
          </table:table-cell>
          <table:table-cell table:style-name="ce12N2" office:value-type="float" office:value="3127.43">
            <text:p>3127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0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10081.18">
            <text:p>1008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58383160671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1">
            <text:p>30707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5.06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1.76">
            <text:p>34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5998">
            <text:p>5,316</text:p>
          </table:table-cell>
          <table:table-cell table:style-name="ce12N2" office:value-type="float" office:value="740.61">
            <text:p>74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28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12.46">
            <text:p>612,46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2057.24">
            <text:p>20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50661708155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4">
            <text:p>30707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6.87">
            <text:p>4819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94">
            <text:p>0,319</text:p>
          </table:table-cell>
          <table:table-cell table:style-name="ce12N2" office:value-type="float" office:value="1291.05">
            <text:p>1291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517.09">
            <text:p>1517,09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2909.39">
            <text:p>290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47951293807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7">
            <text:p>307077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48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285.43">
            <text:p>5528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274.88">
            <text:p>5527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46736">
            <text:p>16,467</text:p>
          </table:table-cell>
          <table:table-cell table:style-name="ce12N2" office:value-type="float" office:value="19056">
            <text:p>19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28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14">
            <text:p>56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55274.88">
            <text:p>55274,88</text:p>
          </table:table-cell>
          <table:table-cell table:style-name="ce12N2" office:value-type="float" office:value="3869.23">
            <text:p>386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681867000130550010009483351777182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1">
            <text:p>3070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.49">
            <text:p>24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18">
            <text:p>0,091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3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169.75">
            <text:p>1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051157026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7">
            <text:p>3070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412">
            <text:p>0,092</text:p>
          </table:table-cell>
          <table:table-cell table:style-name="ce12N2" office:value-type="float" office:value="11.41">
            <text:p>1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433.98">
            <text:p>4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1139589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8">
            <text:p>3070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624">
            <text:p>0,006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2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21799286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9">
            <text:p>3070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123.52">
            <text:p>12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0.81">
            <text:p>11130,81</text:p>
          </table:table-cell>
          <table:table-cell table:style-name="ce12N2" office:value-type="float" office:value="779.16">
            <text:p>7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31758898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0">
            <text:p>3070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6.95">
            <text:p>1038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58">
            <text:p>3,076</text:p>
          </table:table-cell>
          <table:table-cell table:style-name="ce12N2" office:value-type="float" office:value="112.2">
            <text:p>1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33.95">
            <text:p>633,95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390.12">
            <text:p>3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4163601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1">
            <text:p>3070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5">
            <text:p>0,01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1355.67">
            <text:p>135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51165422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2">
            <text:p>3070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504">
            <text:p>0,120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0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38.5">
            <text:p>738,5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795.31">
            <text:p>79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610767865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3">
            <text:p>3070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134.28">
            <text:p>13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71808138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4">
            <text:p>3070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59">
            <text:p>0,058</text:p>
          </table:table-cell>
          <table:table-cell table:style-name="ce12N2" office:value-type="float" office:value="33.61">
            <text:p>3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9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81507891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5">
            <text:p>3070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5">
            <text:p>0,02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08">
            <text:p>6261,08</text:p>
          </table:table-cell>
          <table:table-cell table:style-name="ce12N2" office:value-type="float" office:value="438.28">
            <text:p>43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91582957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6">
            <text:p>3070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2.39">
            <text:p>153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4">
            <text:p>0,074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42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36.39">
            <text:p>936,39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1008.42">
            <text:p>10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51700246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7">
            <text:p>3070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5.93">
            <text:p>291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34">
            <text:p>0,293</text:p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3.13">
            <text:p>923,13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1972.8">
            <text:p>19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61284029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8">
            <text:p>3070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7.54">
            <text:p>453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14">
            <text:p>0,04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76.94">
            <text:p>276,94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298.24">
            <text:p>29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71484272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9">
            <text:p>307099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8.7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024">
            <text:p>0,570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391.31">
            <text:p>39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87041743852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9">
            <text:p>30711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201.51">
            <text:p>115201,51</text:p>
          </table:table-cell>
          <table:table-cell table:style-name="ce12N2" office:value-type="float" office:value="5458.35">
            <text:p>5458,35</text:p>
          </table:table-cell>
          <table:table-cell table:style-name="ce12N2" office:value-type="float" office:value="70">
            <text:p>70,00</text:p>
          </table:table-cell>
          <table:table-cell table:style-name="ce12N2" office:value-type="float" office:value="109166.42">
            <text:p>10916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8377">
            <text:p>5,738</text:p>
          </table:table-cell>
          <table:table-cell table:style-name="ce12N2" office:value-type="float" office:value="5043.2">
            <text:p>50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20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.38">
            <text:p>96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811.13">
            <text:p>9811,13</text:p>
          </table:table-cell>
          <table:table-cell table:style-name="ce12N2" office:value-type="float" office:value="103708.07">
            <text:p>103708,07</text:p>
          </table:table-cell>
          <table:table-cell table:style-name="ce12N2" office:value-type="float" office:value="4377.25">
            <text:p>43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300.9">
            <text:p>9300,90</text:p>
          </table:table-cell>
          <table:table-cell table:style-name="ce12N2" office:value-type="float" office:value="1682.31">
            <text:p>1682,3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6851272645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3">
            <text:p>307123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6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5.72">
            <text:p>112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882.05">
            <text:p>10882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73">
            <text:p>25,137</text:p>
          </table:table-cell>
          <table:table-cell table:style-name="ce12N2" office:value-type="float" office:value="490.74">
            <text:p>49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53.67">
            <text:p>353,67</text:p>
          </table:table-cell>
          <table:table-cell table:style-name="ce12N2" office:value-type="float" office:value="10882.05">
            <text:p>10882,05</text:p>
          </table:table-cell>
          <table:table-cell table:style-name="ce12N2" office:value-type="float" office:value="761.74">
            <text:p>76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7642862000248550020000126701349019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4">
            <text:p>30712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7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9.86">
            <text:p>3809,86</text:p>
          </table:table-cell>
          <table:table-cell table:style-name="ce12N2" office:value-type="float" office:value="107.4">
            <text:p>107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78.8">
            <text:p>357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184">
            <text:p>8,918</text:p>
          </table:table-cell>
          <table:table-cell table:style-name="ce12N2" office:value-type="float" office:value="308">
            <text:p>3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8.46">
            <text:p>338,46</text:p>
          </table:table-cell>
          <table:table-cell table:style-name="ce12N2" office:value-type="float" office:value="3471.4">
            <text:p>3471,40</text:p>
          </table:table-cell>
          <table:table-cell table:style-name="ce12N2" office:value-type="float" office:value="138.86">
            <text:p>1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737176304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5">
            <text:p>307125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6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1.63">
            <text:p>19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60.69">
            <text:p>1860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">
            <text:p>0,023</text:p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8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0.94">
            <text:p>120,94</text:p>
          </table:table-cell>
          <table:table-cell table:style-name="ce12N2" office:value-type="float" office:value="1860.69">
            <text:p>1860,69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7642862000248550020000126811624245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1">
            <text:p>30713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5.18">
            <text:p>1325,18</text:p>
          </table:table-cell>
          <table:table-cell table:style-name="ce12N2" office:value-type="float" office:value="63.55">
            <text:p>63,5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">
            <text:p>127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87">
            <text:p>0,071</text:p>
          </table:table-cell>
          <table:table-cell table:style-name="ce12N2" office:value-type="float" office:value="167.8">
            <text:p>16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.41">
            <text:p>9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17.73">
            <text:p>117,73</text:p>
          </table:table-cell>
          <table:table-cell table:style-name="ce12N2" office:value-type="float" office:value="1207.45">
            <text:p>1207,45</text:p>
          </table:table-cell>
          <table:table-cell table:style-name="ce12N2" office:value-type="float" office:value="48.3">
            <text:p>4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0191133141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4">
            <text:p>307134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2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49.7">
            <text:p>1894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1169">
            <text:p>1,641</text:p>
          </table:table-cell>
          <table:table-cell table:style-name="ce12N2" office:value-type="float" office:value="416.82">
            <text:p>41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4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43.21">
            <text:p>1243,21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1239.46">
            <text:p>12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2577147760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8">
            <text:p>30713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.95">
            <text:p>42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3">
            <text:p>0,021</text:p>
          </table:table-cell>
          <table:table-cell table:style-name="ce12N2" office:value-type="float" office:value="8.52">
            <text:p>8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1.15">
            <text:p>21,15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28.48">
            <text:p>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5661100002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3">
            <text:p>3071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">
            <text:p>0,15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9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3073.21">
            <text:p>307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3791008430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7">
            <text:p>307157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5.7711">
            <text:p>175,771</text:p>
          </table:table-cell>
          <table:table-cell table:style-name="ce12N2" office:value-type="float" office:value="5413.9">
            <text:p>54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1.78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28825">
            <text:p>288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3721449861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8">
            <text:p>3071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9.75">
            <text:p>288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73">
            <text:p>0,055</text:p>
          </table:table-cell>
          <table:table-cell table:style-name="ce12N2" office:value-type="float" office:value="32.57">
            <text:p>32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37.35">
            <text:p>137,35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192.67">
            <text:p>1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51651758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0">
            <text:p>3071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2">
            <text:p>352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06">
            <text:p>0,035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47.82">
            <text:p>147,82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236.44">
            <text:p>23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71862509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5">
            <text:p>307165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4.792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73.28">
            <text:p>6147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473.28">
            <text:p>6147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06102">
            <text:p>2,606</text:p>
          </table:table-cell>
          <table:table-cell table:style-name="ce12N2" office:value-type="float" office:value="4684.73">
            <text:p>468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7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473.28">
            <text:p>61473,28</text:p>
          </table:table-cell>
          <table:table-cell table:style-name="ce12N2" office:value-type="float" office:value="7376.79">
            <text:p>73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66.75">
            <text:p>156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055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12/05/2026</text:p>
          </table:table-cell>
          <table:table-cell table:style-name="ce12" office:value-type="string" calcext:value-type="string">
            <text:p>1.566,75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32260510524837000193550070000247921594139152</text:p>
          </table:table-cell>
          <table:table-cell table:style-name="ce0" office:value-type="string" calcext:value-type="string">
            <text:p>3226052874377700016557001000019055100021919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6">
            <text:p>307176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5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54">
            <text:p>735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67.9">
            <text:p>596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7784">
            <text:p>16,378</text:p>
          </table:table-cell>
          <table:table-cell table:style-name="ce12N2" office:value-type="float" office:value="188.69">
            <text:p>188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5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67.9">
            <text:p>5967,90</text:p>
          </table:table-cell>
          <table:table-cell table:style-name="ce12N2" office:value-type="float" office:value="417.75">
            <text:p>4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19.29">
            <text:p>9019,29</text:p>
          </table:table-cell>
          <table:table-cell table:style-name="ce12N2" office:value-type="float" office:value="1386.1">
            <text:p>1386,1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37008145000149550010001065031402273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4">
            <text:p>3071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775">
            <text:p>1,648</text:p>
          </table:table-cell>
          <table:table-cell table:style-name="ce12N2" office:value-type="float" office:value="299.7">
            <text:p>2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1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1316.93">
            <text:p>13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4180508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5">
            <text:p>3071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91">
            <text:p>0,659</text:p>
          </table:table-cell>
          <table:table-cell table:style-name="ce12N2" office:value-type="float" office:value="119.88">
            <text:p>119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526.77">
            <text:p>5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51093286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6">
            <text:p>3071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2494">
            <text:p>11,625</text:p>
          </table:table-cell>
          <table:table-cell table:style-name="ce12N2" office:value-type="float" office:value="4137.72">
            <text:p>41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2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5341.03">
            <text:p>534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71888472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8">
            <text:p>307208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8.77">
            <text:p>379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488">
            <text:p>0,465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.57">
            <text:p>119,57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257.54">
            <text:p>25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50018557382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1">
            <text:p>3072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1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6.74">
            <text:p>3760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58732">
            <text:p>6,259</text:p>
          </table:table-cell>
          <table:table-cell table:style-name="ce12N2" office:value-type="float" office:value="19552">
            <text:p>195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60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87">
            <text:p>242,87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2615.47">
            <text:p>261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18321541556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3">
            <text:p>30721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07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85.76">
            <text:p>898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72">
            <text:p>0,020</text:p>
          </table:table-cell>
          <table:table-cell table:style-name="ce12N2" office:value-type="float" office:value="47.51">
            <text:p>47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8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53">
            <text:p>242,53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612.03">
            <text:p>6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0771742073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4">
            <text:p>3072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52">
            <text:p>0,367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182.74">
            <text:p>18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817572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7">
            <text:p>307217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610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58.87">
            <text:p>495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02.78">
            <text:p>48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775">
            <text:p>1,658</text:p>
          </table:table-cell>
          <table:table-cell table:style-name="ce12N2" office:value-type="float" office:value="940">
            <text:p>9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5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.09">
            <text:p>156,09</text:p>
          </table:table-cell>
          <table:table-cell table:style-name="ce12N2" office:value-type="float" office:value="4802.78">
            <text:p>4802,78</text:p>
          </table:table-cell>
          <table:table-cell table:style-name="ce12N2" office:value-type="float" office:value="576.33">
            <text:p>57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6101160176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8">
            <text:p>30721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596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45">
            <text:p>0,054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8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1546.43">
            <text:p>154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596120711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53">
            <text:p>307253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64.83">
            <text:p>7616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164.83">
            <text:p>76164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0.37785">
            <text:p>170,378</text:p>
          </table:table-cell>
          <table:table-cell table:style-name="ce12N2" office:value-type="float" office:value="292.85">
            <text:p>292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6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64.83">
            <text:p>76164,83</text:p>
          </table:table-cell>
          <table:table-cell table:style-name="ce12N2" office:value-type="float" office:value="3046.59">
            <text:p>304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661649001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6">
            <text:p>30726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1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002.38">
            <text:p>20500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74442">
            <text:p>283,744</text:p>
          </table:table-cell>
          <table:table-cell table:style-name="ce12N2" office:value-type="float" office:value="4482">
            <text:p>44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5.00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65.49">
            <text:p>1265,49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13924.14">
            <text:p>1392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1269190404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7">
            <text:p>3072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4.2">
            <text:p>39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9">
            <text:p>0,006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7">
            <text:p>54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8.73">
            <text:p>318,73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229.32">
            <text:p>22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61061461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4">
            <text:p>30727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5366">
            <text:p>4,054</text:p>
          </table:table-cell>
          <table:table-cell table:style-name="ce12N2" office:value-type="float" office:value="869">
            <text:p>8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9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2043.48">
            <text:p>20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91380246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7">
            <text:p>307287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4.813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85.44">
            <text:p>4578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85.44">
            <text:p>4578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03.5">
            <text:p>1303,500</text:p>
          </table:table-cell>
          <table:table-cell table:style-name="ce12N2" office:value-type="float" office:value="651.75">
            <text:p>65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78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85.44">
            <text:p>45785,44</text:p>
          </table:table-cell>
          <table:table-cell table:style-name="ce12N2" office:value-type="float" office:value="5494.25">
            <text:p>54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10524837000193550070000248131668346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1">
            <text:p>3072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53.96">
            <text:p>4315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">
            <text:p>0,04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5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358.36">
            <text:p>1358,36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2925.69">
            <text:p>292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51736654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6">
            <text:p>30731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3.6909">
            <text:p>223,691</text:p>
          </table:table-cell>
          <table:table-cell table:style-name="ce12N2" office:value-type="float" office:value="3083.2">
            <text:p>308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07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10854.91">
            <text:p>1085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5851432865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4">
            <text:p>3073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5">
            <text:p>0,127</text:p>
          </table:table-cell>
          <table:table-cell table:style-name="ce12N2" office:value-type="float" office:value="135.4">
            <text:p>1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5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3343.17">
            <text:p>334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841818745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7">
            <text:p>307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544">
            <text:p>0,021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41084287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9">
            <text:p>307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46">
            <text:p>0,125</text:p>
          </table:table-cell>
          <table:table-cell table:style-name="ce12N2" office:value-type="float" office:value="28.5">
            <text:p>2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1404.34">
            <text:p>140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30134901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7">
            <text:p>307337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16.32">
            <text:p>2111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075.02">
            <text:p>1907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057">
            <text:p>1,182</text:p>
          </table:table-cell>
          <table:table-cell table:style-name="ce12N2" office:value-type="float" office:value="310.91">
            <text:p>31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11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912.37">
            <text:p>912,37</text:p>
          </table:table-cell>
          <table:table-cell table:style-name="ce12N2" office:value-type="float" office:value="18771.12">
            <text:p>18771,12</text:p>
          </table:table-cell>
          <table:table-cell table:style-name="ce12N2" office:value-type="float" office:value="783.29">
            <text:p>78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98.96">
            <text:p>6298,96</text:p>
          </table:table-cell>
          <table:table-cell table:style-name="ce12N2" office:value-type="float" office:value="1128.93">
            <text:p>1128,9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660139272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8">
            <text:p>30733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12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46">
            <text:p>0,018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390.36">
            <text:p>3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1281805822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9">
            <text:p>3073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73">
            <text:p>0,025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460.37">
            <text:p>46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51909237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0">
            <text:p>307350</text:p>
          </table:table-cell>
          <table:table-cell table:style-name="ce0" table:number-columns-spanned="4" table:number-rows-spanned="1" office:value-type="string" calcext:value-type="string">
            <text:p>12.999 - SAGA DISTRIBUICAO E LOGISTICA LTDA</text:p>
          </table:table-cell>
          <table:covered-table-cell table:number-columns-repeated="3"/>
          <table:table-cell table:style-name="ce0" office:value-type="string" calcext:value-type="string">
            <text:p>1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795">
            <text:p>0,218</text:p>
          </table:table-cell>
          <table:table-cell table:style-name="ce12N2" office:value-type="float" office:value="88.5">
            <text:p>8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591.38">
            <text:p>5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9682263000100550010000014221958895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1">
            <text:p>307351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5.7469">
            <text:p>75,747</text:p>
          </table:table-cell>
          <table:table-cell table:style-name="ce12N2" office:value-type="float" office:value="1472">
            <text:p>14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733.02">
            <text:p>73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7515047175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2">
            <text:p>30735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9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445306">
            <text:p>31,445</text:p>
          </table:table-cell>
          <table:table-cell table:style-name="ce12N2" office:value-type="float" office:value="23632.4">
            <text:p>2363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62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13395.47">
            <text:p>1339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96601071743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4">
            <text:p>3073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6159731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5">
            <text:p>3073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292.18">
            <text:p>29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441969649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7">
            <text:p>307357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665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07.48">
            <text:p>2440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07.48">
            <text:p>2440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816256">
            <text:p>14,816</text:p>
          </table:table-cell>
          <table:table-cell table:style-name="ce12N2" office:value-type="float" office:value="13022.1">
            <text:p>1302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0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07.48">
            <text:p>24407,48</text:p>
          </table:table-cell>
          <table:table-cell table:style-name="ce12N2" office:value-type="float" office:value="2928.9">
            <text:p>29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6651465504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12">
            <text:p>212,00</text:p>
          </table:table-cell>
          <table:table-cell table:style-name="ce26N2" office:value-type="float" office:value="5629.3">
            <text:p>5629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8723.31">
            <text:p>108723,31</text:p>
          </table:table-cell>
          <table:table-cell table:style-name="ce26N2" office:value-type="float" office:value="6941908.62">
            <text:p>6941908,62</text:p>
          </table:table-cell>
          <table:table-cell table:style-name="ce26N2" office:value-type="float" office:value="455485.58">
            <text:p>455485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566.75">
            <text:p>1566,75</text:p>
          </table:table-cell>
          <table:table-cell table:style-name="ce26N2" office:value-type="float" office:value="7075789.81">
            <text:p>7075789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6324.55">
            <text:p>56324,55</text:p>
          </table:table-cell>
          <table:table-cell table:style-name="ce26N2" office:value-type="float" office:value="9268.81">
            <text:p>9268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1596.001013">
            <text:p>91596,001</text:p>
          </table:table-cell>
          <table:table-cell table:style-name="ce26N2" office:value-type="float" office:value="6963426.99">
            <text:p>6963426,99</text:p>
          </table:table-cell>
          <table:table-cell table:style-name="ce26N2" office:value-type="float" office:value="7075789.81">
            <text:p>7075789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77915.92">
            <text:p>277915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.54">
            <text:p>54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94" meta:object-count="0"/>
    <meta:generator>LibreOffice/4.3.0.4$Windows_x86 LibreOffice_project/62ad5818884a2fc2e5780dd45466868d41009ec0</meta:generator>
  </office:meta>
</office:document-meta>
</file>