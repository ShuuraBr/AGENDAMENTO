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30/06/2026 04:30:2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2">
            <text:p>309282</text:p>
          </table:table-cell>
          <table:table-cell table:style-name="ce0" table:number-columns-spanned="4" table:number-rows-spanned="1" office:value-type="string" calcext:value-type="string">
            <text:p>15.133 - JSS FERRAGENS E SERVICOS EIRELI</text:p>
          </table:table-cell>
          <table:covered-table-cell table:number-columns-repeated="3"/>
          <table:table-cell table:style-name="ce0" office:value-type="string" calcext:value-type="string">
            <text:p>7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96">
            <text:p>0,553</text:p>
          </table:table-cell>
          <table:table-cell table:style-name="ce12N2" office:value-type="float" office:value="127.06">
            <text:p>12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6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291.9">
            <text:p>29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0703302000197550010000076251584111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7">
            <text:p>309307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1.49">
            <text:p>4431,49</text:p>
          </table:table-cell>
          <table:table-cell table:style-name="ce12N2" office:value-type="float" office:value="273.96">
            <text:p>273,9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65.96">
            <text:p>45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6768">
            <text:p>1,397</text:p>
          </table:table-cell>
          <table:table-cell table:style-name="ce12N2" office:value-type="float" office:value="96">
            <text:p>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4.55">
            <text:p>3594,55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5">
            <text:p>32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9.49">
            <text:p>139,49</text:p>
          </table:table-cell>
          <table:table-cell table:style-name="ce12N2" office:value-type="float" office:value="4292">
            <text:p>4292,00</text:p>
          </table:table-cell>
          <table:table-cell table:style-name="ce12N2" office:value-type="float" office:value="300.44">
            <text:p>30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5081122000180550010000163861000142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8">
            <text:p>30931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8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2">
            <text:p>0,018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5.18">
            <text:p>1265,18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9">
            <text:p>11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58.09">
            <text:p>5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8711110002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0">
            <text:p>30934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5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7.547153">
            <text:p>227,547</text:p>
          </table:table-cell>
          <table:table-cell table:style-name="ce12N2" office:value-type="float" office:value="765.94">
            <text:p>765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7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98.62">
            <text:p>23698,62</text:p>
          </table:table-cell>
          <table:table-cell table:style-name="ce12N2" office:value-type="float" office:value="23.7">
            <text:p>2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.29">
            <text:p>213,2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1965.58">
            <text:p>196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59157517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5">
            <text:p>30934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0948">
            <text:p>5,191</text:p>
          </table:table-cell>
          <table:table-cell table:style-name="ce12N2" office:value-type="float" office:value="473.37">
            <text:p>473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65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19.47">
            <text:p>47819,47</text:p>
          </table:table-cell>
          <table:table-cell table:style-name="ce12N2" office:value-type="float" office:value="47.82">
            <text:p>4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0.38">
            <text:p>430,38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3966.19">
            <text:p>396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631990171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11">
            <text:p>309411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.95537">
            <text:p>37,955</text:p>
          </table:table-cell>
          <table:table-cell table:style-name="ce12N2" office:value-type="float" office:value="583">
            <text:p>58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4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288.36">
            <text:p>28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61242541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2">
            <text:p>30943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28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5.06">
            <text:p>2665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21105">
            <text:p>2,121</text:p>
          </table:table-cell>
          <table:table-cell table:style-name="ce12N2" office:value-type="float" office:value="334.97">
            <text:p>334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655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6.81">
            <text:p>21356,81</text:p>
          </table:table-cell>
          <table:table-cell table:style-name="ce12N2" office:value-type="float" office:value="21.36">
            <text:p>2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.21">
            <text:p>192,21</text:p>
          </table:table-cell>
          <table:table-cell table:style-name="ce12N2" office:value-type="float" office:value="61.58">
            <text:p>61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1350.01">
            <text:p>1350,01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1771.36">
            <text:p>17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289911022671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5">
            <text:p>309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4.16">
            <text:p>1230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53.2">
            <text:p>115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756">
            <text:p>0,338</text:p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0.62">
            <text:p>9750,62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6">
            <text:p>87,7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750.96">
            <text:p>750,96</text:p>
          </table:table-cell>
          <table:table-cell table:style-name="ce12N2" office:value-type="float" office:value="11553.2">
            <text:p>11553,20</text:p>
          </table:table-cell>
          <table:table-cell table:style-name="ce12N2" office:value-type="float" office:value="808.72">
            <text:p>8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71829829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6">
            <text:p>309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952">
            <text:p>0,031</text:p>
          </table:table-cell>
          <table:table-cell table:style-name="ce12N2" office:value-type="float" office:value="0.5">
            <text:p>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0.97">
            <text:p>1580,97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23">
            <text:p>14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131.13">
            <text:p>13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11546280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7">
            <text:p>309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83.39">
            <text:p>1058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37.46">
            <text:p>9937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162">
            <text:p>0,134</text:p>
          </table:table-cell>
          <table:table-cell table:style-name="ce12N2" office:value-type="float" office:value="30.56">
            <text:p>3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83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6.97">
            <text:p>8386,97</text:p>
          </table:table-cell>
          <table:table-cell table:style-name="ce12N2" office:value-type="float" office:value="8.39">
            <text:p>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48">
            <text:p>75,4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645.93">
            <text:p>645,93</text:p>
          </table:table-cell>
          <table:table-cell table:style-name="ce12N2" office:value-type="float" office:value="9937.46">
            <text:p>9937,46</text:p>
          </table:table-cell>
          <table:table-cell table:style-name="ce12N2" office:value-type="float" office:value="695.62">
            <text:p>69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31315605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9">
            <text:p>309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9">
            <text:p>0,000</text:p>
          </table:table-cell>
          <table:table-cell table:style-name="ce12N2" office:value-type="float" office:value="9.15">
            <text:p>9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31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19.22">
            <text:p>4819,22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37">
            <text:p>43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221.27">
            <text:p>22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017898775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0">
            <text:p>309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37.6">
            <text:p>127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37.6">
            <text:p>1273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68">
            <text:p>0,052</text:p>
          </table:table-cell>
          <table:table-cell table:style-name="ce12N2" office:value-type="float" office:value="71.68">
            <text:p>7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3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65.2">
            <text:p>10965,20</text:p>
          </table:table-cell>
          <table:table-cell table:style-name="ce12N2" office:value-type="float" office:value="10.97">
            <text:p>1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69">
            <text:p>98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53.22">
            <text:p>9353,22</text:p>
          </table:table-cell>
          <table:table-cell table:style-name="ce12N2" office:value-type="float" office:value="654.73">
            <text:p>65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61131213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1">
            <text:p>309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7.2">
            <text:p>139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7.2">
            <text:p>139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">
            <text:p>0,003</text:p>
          </table:table-cell>
          <table:table-cell table:style-name="ce12N2" office:value-type="float" office:value="7.36">
            <text:p>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2.78">
            <text:p>1202,78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83">
            <text:p>10,8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5.96">
            <text:p>1025,96</text:p>
          </table:table-cell>
          <table:table-cell table:style-name="ce12N2" office:value-type="float" office:value="71.82">
            <text:p>7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51452877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2">
            <text:p>309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7">
            <text:p>0,001</text:p>
          </table:table-cell>
          <table:table-cell table:style-name="ce12N2" office:value-type="float" office:value="27.45">
            <text:p>27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268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30.81">
            <text:p>12430,81</text:p>
          </table:table-cell>
          <table:table-cell table:style-name="ce12N2" office:value-type="float" office:value="12.43">
            <text:p>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8">
            <text:p>111,8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570.74">
            <text:p>57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212039838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3">
            <text:p>3094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8.68">
            <text:p>51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4.44">
            <text:p>4834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268">
            <text:p>0,065</text:p>
          </table:table-cell>
          <table:table-cell table:style-name="ce12N2" office:value-type="float" office:value="14.87">
            <text:p>14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4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.15">
            <text:p>4080,15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72">
            <text:p>36,7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314.24">
            <text:p>314,24</text:p>
          </table:table-cell>
          <table:table-cell table:style-name="ce12N2" office:value-type="float" office:value="4834.44">
            <text:p>4834,44</text:p>
          </table:table-cell>
          <table:table-cell table:style-name="ce12N2" office:value-type="float" office:value="338.41">
            <text:p>33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41567041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3">
            <text:p>30953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5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.81">
            <text:p>204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86.93">
            <text:p>1986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487">
            <text:p>0,345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6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2">
            <text:p>1702,00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32">
            <text:p>15,3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59.88">
            <text:p>59,88</text:p>
          </table:table-cell>
          <table:table-cell table:style-name="ce12N2" office:value-type="float" office:value="1986.93">
            <text:p>1986,93</text:p>
          </table:table-cell>
          <table:table-cell table:style-name="ce12N2" office:value-type="float" office:value="111.45">
            <text:p>11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8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57115722262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2">
            <text:p>3095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9.37">
            <text:p>499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42">
            <text:p>48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48">
            <text:p>0,006</text:p>
          </table:table-cell>
          <table:table-cell table:style-name="ce12N2" office:value-type="float" office:value="29.52">
            <text:p>2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9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6.53">
            <text:p>4086,53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78">
            <text:p>36,78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57.37">
            <text:p>157,37</text:p>
          </table:table-cell>
          <table:table-cell table:style-name="ce12N2" office:value-type="float" office:value="4842">
            <text:p>4842,00</text:p>
          </table:table-cell>
          <table:table-cell table:style-name="ce12N2" office:value-type="float" office:value="338.94">
            <text:p>33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11423552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5">
            <text:p>3095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3">
            <text:p>0,032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.92">
            <text:p>713,9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59.21">
            <text:p>5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516129107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5">
            <text:p>309625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9.3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1.64">
            <text:p>1561,64</text:p>
          </table:table-cell>
          <table:table-cell table:style-name="ce12N2" office:value-type="float" office:value="74.89">
            <text:p>74,89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7.8">
            <text:p>149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">
            <text:p>0,036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9.63">
            <text:p>1239,63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6">
            <text:p>11,16</text:p>
          </table:table-cell>
          <table:table-cell table:style-name="ce12N2" office:value-type="float" office:value="48.38">
            <text:p>48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38.73">
            <text:p>138,73</text:p>
          </table:table-cell>
          <table:table-cell table:style-name="ce12N2" office:value-type="float" office:value="1422.91">
            <text:p>1422,9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931417831852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3">
            <text:p>3096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15">
            <text:p>139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65">
            <text:p>0,003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4.02">
            <text:p>1104,02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4">
            <text:p>9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85.03">
            <text:p>85,03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91.57">
            <text:p>9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51194191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5">
            <text:p>309635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6.4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6">
            <text:p>1,296</text:p>
          </table:table-cell>
          <table:table-cell table:style-name="ce12N2" office:value-type="float" office:value="473.8">
            <text:p>473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3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42.1">
            <text:p>7542,10</text:p>
          </table:table-cell>
          <table:table-cell table:style-name="ce12N2" office:value-type="float" office:value="7.55">
            <text:p>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88">
            <text:p>67,8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625.55">
            <text:p>62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64451850239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7">
            <text:p>309637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40.3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1862">
            <text:p>1,482</text:p>
          </table:table-cell>
          <table:table-cell table:style-name="ce12N2" office:value-type="float" office:value="387.37">
            <text:p>387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80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21.34">
            <text:p>12221,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99">
            <text:p>109,9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1013.65">
            <text:p>101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403961351912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0">
            <text:p>3096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6.3">
            <text:p>278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6.24">
            <text:p>261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3">
            <text:p>0,006</text:p>
          </table:table-cell>
          <table:table-cell table:style-name="ce12N2" office:value-type="float" office:value="12.91">
            <text:p>12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8.03">
            <text:p>2208,03</text:p>
          </table:table-cell>
          <table:table-cell table:style-name="ce12N2" office:value-type="float" office:value="2.21">
            <text:p>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87">
            <text:p>19,8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70.06">
            <text:p>170,06</text:p>
          </table:table-cell>
          <table:table-cell table:style-name="ce12N2" office:value-type="float" office:value="2616.24">
            <text:p>2616,24</text:p>
          </table:table-cell>
          <table:table-cell table:style-name="ce12N2" office:value-type="float" office:value="183.14">
            <text:p>18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7179834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1">
            <text:p>3096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2.43">
            <text:p>17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7.92">
            <text:p>160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7.05">
            <text:p>1357,05</text:p>
          </table:table-cell>
          <table:table-cell table:style-name="ce12N2" office:value-type="float" office:value="1.36">
            <text:p>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1">
            <text:p>12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04.51">
            <text:p>104,51</text:p>
          </table:table-cell>
          <table:table-cell table:style-name="ce12N2" office:value-type="float" office:value="1607.92">
            <text:p>1607,92</text:p>
          </table:table-cell>
          <table:table-cell table:style-name="ce12N2" office:value-type="float" office:value="112.55">
            <text:p>11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81637324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2">
            <text:p>3096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9.46">
            <text:p>206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51.61">
            <text:p>1935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5413">
            <text:p>0,565</text:p>
          </table:table-cell>
          <table:table-cell table:style-name="ce12N2" office:value-type="float" office:value="55.34">
            <text:p>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32.28">
            <text:p>16332,28</text:p>
          </table:table-cell>
          <table:table-cell table:style-name="ce12N2" office:value-type="float" office:value="16.33">
            <text:p>1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.99">
            <text:p>146,9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257.85">
            <text:p>1257,85</text:p>
          </table:table-cell>
          <table:table-cell table:style-name="ce12N2" office:value-type="float" office:value="19351.61">
            <text:p>19351,61</text:p>
          </table:table-cell>
          <table:table-cell table:style-name="ce12N2" office:value-type="float" office:value="1354.61">
            <text:p>135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71392529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3">
            <text:p>3096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2.59">
            <text:p>557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32.48">
            <text:p>52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66">
            <text:p>0,013</text:p>
          </table:table-cell>
          <table:table-cell table:style-name="ce12N2" office:value-type="float" office:value="25.82">
            <text:p>2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16.09">
            <text:p>4416,09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74">
            <text:p>39,7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40.11">
            <text:p>340,11</text:p>
          </table:table-cell>
          <table:table-cell table:style-name="ce12N2" office:value-type="float" office:value="5232.48">
            <text:p>5232,48</text:p>
          </table:table-cell>
          <table:table-cell table:style-name="ce12N2" office:value-type="float" office:value="366.27">
            <text:p>36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11262576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4">
            <text:p>3096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15">
            <text:p>139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65">
            <text:p>0,003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4.02">
            <text:p>1104,02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4">
            <text:p>9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85.03">
            <text:p>85,03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91.57">
            <text:p>9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61306152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6">
            <text:p>3096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56.24">
            <text:p>1845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329.8">
            <text:p>1732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634">
            <text:p>0,506</text:p>
          </table:table-cell>
          <table:table-cell table:style-name="ce12N2" office:value-type="float" office:value="49.56">
            <text:p>49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5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25.91">
            <text:p>14625,91</text:p>
          </table:table-cell>
          <table:table-cell table:style-name="ce12N2" office:value-type="float" office:value="14.63">
            <text:p>1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.63">
            <text:p>131,6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126.44">
            <text:p>1126,44</text:p>
          </table:table-cell>
          <table:table-cell table:style-name="ce12N2" office:value-type="float" office:value="17329.8">
            <text:p>17329,80</text:p>
          </table:table-cell>
          <table:table-cell table:style-name="ce12N2" office:value-type="float" office:value="1213.09">
            <text:p>121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91570710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7">
            <text:p>3096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8.77">
            <text:p>92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8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6.01">
            <text:p>736,01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56.69">
            <text:p>56,69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61.05">
            <text:p>6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01727392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8">
            <text:p>3096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2">
            <text:p>19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2">
            <text:p>19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2">
            <text:p>0,000</text:p>
          </table:table-cell>
          <table:table-cell table:style-name="ce12N2" office:value-type="float" office:value="29.4">
            <text:p>2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8.99">
            <text:p>1688,99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0.7">
            <text:p>1440,70</text:p>
          </table:table-cell>
          <table:table-cell table:style-name="ce12N2" office:value-type="float" office:value="100.85">
            <text:p>1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91608337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9">
            <text:p>3096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8.85">
            <text:p>399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54.79">
            <text:p>375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707">
            <text:p>0,110</text:p>
          </table:table-cell>
          <table:table-cell table:style-name="ce12N2" office:value-type="float" office:value="10.74">
            <text:p>1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9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8.94">
            <text:p>3168,94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2">
            <text:p>28,5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44.06">
            <text:p>244,06</text:p>
          </table:table-cell>
          <table:table-cell table:style-name="ce12N2" office:value-type="float" office:value="3754.79">
            <text:p>3754,79</text:p>
          </table:table-cell>
          <table:table-cell table:style-name="ce12N2" office:value-type="float" office:value="262.84">
            <text:p>26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813994527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1">
            <text:p>3096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2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8872">
            <text:p>0,979</text:p>
          </table:table-cell>
          <table:table-cell table:style-name="ce12N2" office:value-type="float" office:value="324.04">
            <text:p>32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484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933.48">
            <text:p>94933,48</text:p>
          </table:table-cell>
          <table:table-cell table:style-name="ce12N2" office:value-type="float" office:value="94.93">
            <text:p>9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4.4">
            <text:p>85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7873.94">
            <text:p>787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2361235109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3">
            <text:p>3096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2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979.98">
            <text:p>18197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81785.3">
            <text:p>18178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9901">
            <text:p>1,060</text:p>
          </table:table-cell>
          <table:table-cell table:style-name="ce12N2" office:value-type="float" office:value="250.33">
            <text:p>250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.979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423.22">
            <text:p>153423,22</text:p>
          </table:table-cell>
          <table:table-cell table:style-name="ce12N2" office:value-type="float" office:value="153.4">
            <text:p>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0.81">
            <text:p>1380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94.68">
            <text:p>194,68</text:p>
          </table:table-cell>
          <table:table-cell table:style-name="ce12N2" office:value-type="float" office:value="181785.3">
            <text:p>181785,30</text:p>
          </table:table-cell>
          <table:table-cell table:style-name="ce12N2" office:value-type="float" office:value="12724.97">
            <text:p>1272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2821816538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0">
            <text:p>3096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347.27">
            <text:p>7534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72660.19">
            <text:p>72660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5828">
            <text:p>0,336</text:p>
          </table:table-cell>
          <table:table-cell table:style-name="ce12N2" office:value-type="float" office:value="136.56">
            <text:p>136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347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372.48">
            <text:p>61372,48</text:p>
          </table:table-cell>
          <table:table-cell table:style-name="ce12N2" office:value-type="float" office:value="61.38">
            <text:p>6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.36">
            <text:p>552,3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687.08">
            <text:p>2687,08</text:p>
          </table:table-cell>
          <table:table-cell table:style-name="ce12N2" office:value-type="float" office:value="72660.19">
            <text:p>72660,19</text:p>
          </table:table-cell>
          <table:table-cell table:style-name="ce12N2" office:value-type="float" office:value="5031.18">
            <text:p>503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315519558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2">
            <text:p>3096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5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869.85">
            <text:p>217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211738.72">
            <text:p>21173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40671">
            <text:p>4,441</text:p>
          </table:table-cell>
          <table:table-cell table:style-name="ce12N2" office:value-type="float" office:value="518.91">
            <text:p>518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7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899.43">
            <text:p>178899,43</text:p>
          </table:table-cell>
          <table:table-cell table:style-name="ce12N2" office:value-type="float" office:value="178.88">
            <text:p>17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0.1">
            <text:p>1610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6131.13">
            <text:p>6131,13</text:p>
          </table:table-cell>
          <table:table-cell table:style-name="ce12N2" office:value-type="float" office:value="211738.72">
            <text:p>211738,72</text:p>
          </table:table-cell>
          <table:table-cell table:style-name="ce12N2" office:value-type="float" office:value="14606.92">
            <text:p>1460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5461417438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5">
            <text:p>309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8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8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12.62">
            <text:p>912,62</text:p>
          </table:table-cell>
          <table:table-cell table:style-name="ce12N2" office:value-type="float" office:value="0.91">
            <text:p>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1">
            <text:p>8,2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75.69">
            <text:p>7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8101952739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6">
            <text:p>30968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5.92">
            <text:p>158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6">
            <text:p>1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52">
            <text:p>0,004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8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6.35">
            <text:p>1296,35</text:p>
          </table:table-cell>
          <table:table-cell table:style-name="ce12N2" office:value-type="float" office:value="1.3">
            <text:p>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67">
            <text:p>11,6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9.92">
            <text:p>49,92</text:p>
          </table:table-cell>
          <table:table-cell table:style-name="ce12N2" office:value-type="float" office:value="1536">
            <text:p>1536,00</text:p>
          </table:table-cell>
          <table:table-cell table:style-name="ce12N2" office:value-type="float" office:value="107.52">
            <text:p>10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514623147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8">
            <text:p>30968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3.56">
            <text:p>470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55.5">
            <text:p>455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3">
            <text:p>0,003</text:p>
          </table:table-cell>
          <table:table-cell table:style-name="ce12N2" office:value-type="float" office:value="4.16">
            <text:p>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0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44.73">
            <text:p>3844,73</text:p>
          </table:table-cell>
          <table:table-cell table:style-name="ce12N2" office:value-type="float" office:value="3.85">
            <text:p>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61">
            <text:p>34,6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48.06">
            <text:p>148,06</text:p>
          </table:table-cell>
          <table:table-cell table:style-name="ce12N2" office:value-type="float" office:value="4555.5">
            <text:p>4555,50</text:p>
          </table:table-cell>
          <table:table-cell table:style-name="ce12N2" office:value-type="float" office:value="318.89">
            <text:p>31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811090939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1">
            <text:p>3096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6.95">
            <text:p>327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73.8">
            <text:p>317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8">
            <text:p>0,002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8.6">
            <text:p>2678,60</text:p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11">
            <text:p>24,1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03.15">
            <text:p>103,15</text:p>
          </table:table-cell>
          <table:table-cell table:style-name="ce12N2" office:value-type="float" office:value="3173.8">
            <text:p>3173,80</text:p>
          </table:table-cell>
          <table:table-cell table:style-name="ce12N2" office:value-type="float" office:value="222.17">
            <text:p>22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1816394499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2">
            <text:p>309692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2.0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67.27">
            <text:p>526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37.43">
            <text:p>5237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136">
            <text:p>0,011</text:p>
          </table:table-cell>
          <table:table-cell table:style-name="ce12N2" office:value-type="float" office:value="100.76">
            <text:p>10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67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46.02">
            <text:p>4546,02</text:p>
          </table:table-cell>
          <table:table-cell table:style-name="ce12N2" office:value-type="float" office:value="4.55">
            <text:p>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92">
            <text:p>40,92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3257.78">
            <text:p>3257,78</text:p>
          </table:table-cell>
          <table:table-cell table:style-name="ce12N2" office:value-type="float" office:value="228.05">
            <text:p>22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037668000154550010012020221425431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8">
            <text:p>30969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1.74">
            <text:p>107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8">
            <text:p>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">
            <text:p>0,002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1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6.04">
            <text:p>876,04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88">
            <text:p>7,8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3.74">
            <text:p>33,74</text:p>
          </table:table-cell>
          <table:table-cell table:style-name="ce12N2" office:value-type="float" office:value="1038">
            <text:p>1038,00</text:p>
          </table:table-cell>
          <table:table-cell table:style-name="ce12N2" office:value-type="float" office:value="72.66">
            <text:p>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7010800228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0">
            <text:p>30970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7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5.81">
            <text:p>225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84.8">
            <text:p>21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5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3.91">
            <text:p>1843,9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6">
            <text:p>16,6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71.01">
            <text:p>71,01</text:p>
          </table:table-cell>
          <table:table-cell table:style-name="ce12N2" office:value-type="float" office:value="2184.8">
            <text:p>2184,80</text:p>
          </table:table-cell>
          <table:table-cell table:style-name="ce12N2" office:value-type="float" office:value="152.94">
            <text:p>15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711917369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2">
            <text:p>30970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9.00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59.64">
            <text:p>15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3.1">
            <text:p>2863,10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7">
            <text:p>25,77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237.47">
            <text:p>2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56171900950355021001979003122621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4">
            <text:p>30970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4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761">
            <text:p>4,761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3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90.51">
            <text:p>2390,51</text:p>
          </table:table-cell>
          <table:table-cell table:style-name="ce12N2" office:value-type="float" office:value="2.39">
            <text:p>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51">
            <text:p>21,51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198.27">
            <text:p>19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1507510091355500100056480118952545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5">
            <text:p>3097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8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53.54">
            <text:p>3935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6133.4">
            <text:p>3613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436211">
            <text:p>25,436</text:p>
          </table:table-cell>
          <table:table-cell table:style-name="ce12N2" office:value-type="float" office:value="19.29">
            <text:p>1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35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383.18">
            <text:p>31383,18</text:p>
          </table:table-cell>
          <table:table-cell table:style-name="ce12N2" office:value-type="float" office:value="31.41">
            <text:p>3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2.45">
            <text:p>282,45</text:p>
          </table:table-cell>
          <table:table-cell table:style-name="ce12N2" office:value-type="float" office:value="54.86">
            <text:p>54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220.14">
            <text:p>3220,14</text:p>
          </table:table-cell>
          <table:table-cell table:style-name="ce12N2" office:value-type="float" office:value="36133.4">
            <text:p>36133,40</text:p>
          </table:table-cell>
          <table:table-cell table:style-name="ce12N2" office:value-type="float" office:value="1551.37">
            <text:p>155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82117192292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6">
            <text:p>309726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9.9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8.63">
            <text:p>383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24.08">
            <text:p>382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60786">
            <text:p>0,761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3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31.53">
            <text:p>3331,53</text:p>
          </table:table-cell>
          <table:table-cell table:style-name="ce12N2" office:value-type="float" office:value="3.33">
            <text:p>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8">
            <text:p>29,9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4.55">
            <text:p>14,55</text:p>
          </table:table-cell>
          <table:table-cell table:style-name="ce12N2" office:value-type="float" office:value="3824.08">
            <text:p>3824,08</text:p>
          </table:table-cell>
          <table:table-cell table:style-name="ce12N2" office:value-type="float" office:value="152.97">
            <text:p>15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99561100008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8">
            <text:p>30972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17.87">
            <text:p>541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06.35">
            <text:p>520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03">
            <text:p>0,020</text:p>
          </table:table-cell>
          <table:table-cell table:style-name="ce12N2" office:value-type="float" office:value="9.29">
            <text:p>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1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94.05">
            <text:p>4394,05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56">
            <text:p>39,5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211.52">
            <text:p>211,52</text:p>
          </table:table-cell>
          <table:table-cell table:style-name="ce12N2" office:value-type="float" office:value="5206.35">
            <text:p>5206,35</text:p>
          </table:table-cell>
          <table:table-cell table:style-name="ce12N2" office:value-type="float" office:value="364.44">
            <text:p>36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91584523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6">
            <text:p>309736</text:p>
          </table:table-cell>
          <table:table-cell table:style-name="ce0" table:number-columns-spanned="4" table:number-rows-spanned="1" office:value-type="string" calcext:value-type="string">
            <text:p>11.849 - SCHULZ COMPRESSORES S.A</text:p>
          </table:table-cell>
          <table:covered-table-cell table:number-columns-repeated="3"/>
          <table:table-cell table:style-name="ce0" office:value-type="string" calcext:value-type="string">
            <text:p>640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67.48">
            <text:p>1116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167.48">
            <text:p>1116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1832">
            <text:p>0,822</text:p>
          </table:table-cell>
          <table:table-cell table:style-name="ce12N2" office:value-type="float" office:value="219.39">
            <text:p>219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67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3.57">
            <text:p>9613,57</text:p>
          </table:table-cell>
          <table:table-cell table:style-name="ce12N2" office:value-type="float" office:value="9.62">
            <text:p>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3">
            <text:p>86,5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00.28">
            <text:p>8200,28</text:p>
          </table:table-cell>
          <table:table-cell table:style-name="ce12N2" office:value-type="float" office:value="574.02">
            <text:p>57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36357980001435500100064065215694671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7">
            <text:p>30973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8368">
            <text:p>0,168</text:p>
          </table:table-cell>
          <table:table-cell table:style-name="ce12N2" office:value-type="float" office:value="43.66">
            <text:p>4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7.53">
            <text:p>1657,53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2">
            <text:p>14,9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137.48">
            <text:p>13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11571727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8">
            <text:p>30973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199">
            <text:p>0,262</text:p>
          </table:table-cell>
          <table:table-cell table:style-name="ce12N2" office:value-type="float" office:value="113.13">
            <text:p>11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1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9.45">
            <text:p>4719,45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8">
            <text:p>42,4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391.44">
            <text:p>39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21861940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9">
            <text:p>30973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41657">
            <text:p>0,542</text:p>
          </table:table-cell>
          <table:table-cell table:style-name="ce12N2" office:value-type="float" office:value="134.79">
            <text:p>134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69.77">
            <text:p>4369,77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33">
            <text:p>39,3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362.43">
            <text:p>36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31486507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0">
            <text:p>30974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785">
            <text:p>0,138</text:p>
          </table:table-cell>
          <table:table-cell table:style-name="ce12N2" office:value-type="float" office:value="89.66">
            <text:p>89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61.96">
            <text:p>2161,96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6">
            <text:p>19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179.31">
            <text:p>17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41438738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1">
            <text:p>3097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8.45">
            <text:p>156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.72">
            <text:p>147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8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.94">
            <text:p>1242,94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9">
            <text:p>11,1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95.73">
            <text:p>95,73</text:p>
          </table:table-cell>
          <table:table-cell table:style-name="ce12N2" office:value-type="float" office:value="1472.72">
            <text:p>1472,72</text:p>
          </table:table-cell>
          <table:table-cell table:style-name="ce12N2" office:value-type="float" office:value="103.09">
            <text:p>10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4815299255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2">
            <text:p>3097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70.3">
            <text:p>1137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257.36">
            <text:p>1125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0218">
            <text:p>0,602</text:p>
          </table:table-cell>
          <table:table-cell table:style-name="ce12N2" office:value-type="float" office:value="27.34">
            <text:p>2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7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07.43">
            <text:p>9807,43</text:p>
          </table:table-cell>
          <table:table-cell table:style-name="ce12N2" office:value-type="float" office:value="9.8">
            <text:p>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.26">
            <text:p>88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12.94">
            <text:p>112,94</text:p>
          </table:table-cell>
          <table:table-cell table:style-name="ce12N2" office:value-type="float" office:value="11257.36">
            <text:p>11257,36</text:p>
          </table:table-cell>
          <table:table-cell table:style-name="ce12N2" office:value-type="float" office:value="450.29">
            <text:p>45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491518820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3">
            <text:p>3097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46.92">
            <text:p>181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062.21">
            <text:p>18062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297">
            <text:p>0,500</text:p>
          </table:table-cell>
          <table:table-cell table:style-name="ce12N2" office:value-type="float" office:value="75.06">
            <text:p>7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146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92.36">
            <text:p>15692,36</text:p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24">
            <text:p>141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84.71">
            <text:p>84,71</text:p>
          </table:table-cell>
          <table:table-cell table:style-name="ce12N2" office:value-type="float" office:value="17367.14">
            <text:p>17367,14</text:p>
          </table:table-cell>
          <table:table-cell table:style-name="ce12N2" office:value-type="float" office:value="770.35">
            <text:p>77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01143860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4">
            <text:p>3097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875">
            <text:p>0,038</text:p>
          </table:table-cell>
          <table:table-cell table:style-name="ce12N2" office:value-type="float" office:value="16.48">
            <text:p>1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2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47.76">
            <text:p>5847,76</text:p>
          </table:table-cell>
          <table:table-cell table:style-name="ce12N2" office:value-type="float" office:value="5.85">
            <text:p>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63">
            <text:p>52,6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485.01">
            <text:p>48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315588101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5">
            <text:p>3097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0.25">
            <text:p>201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7.56">
            <text:p>188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93.06">
            <text:p>1593,06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34">
            <text:p>14,3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22.69">
            <text:p>122,69</text:p>
          </table:table-cell>
          <table:table-cell table:style-name="ce12N2" office:value-type="float" office:value="1887.56">
            <text:p>1887,56</text:p>
          </table:table-cell>
          <table:table-cell table:style-name="ce12N2" office:value-type="float" office:value="132.13">
            <text:p>13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11987638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6">
            <text:p>3097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.64">
            <text:p>82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4.64">
            <text:p>8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6">
            <text:p>0,002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9.89">
            <text:p>709,89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9">
            <text:p>6,3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5.53">
            <text:p>605,53</text:p>
          </table:table-cell>
          <table:table-cell table:style-name="ce12N2" office:value-type="float" office:value="42.39">
            <text:p>4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21050230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7">
            <text:p>3097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">
            <text:p>0,002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.78">
            <text:p>669,78</text:p>
          </table:table-cell>
          <table:table-cell table:style-name="ce12N2" office:value-type="float" office:value="0.67">
            <text:p>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55.55">
            <text:p>5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61786983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9">
            <text:p>3097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4.14">
            <text:p>624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4.14">
            <text:p>6244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262">
            <text:p>0,047</text:p>
          </table:table-cell>
          <table:table-cell table:style-name="ce12N2" office:value-type="float" office:value="20.93">
            <text:p>2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00.76">
            <text:p>5300,76</text:p>
          </table:table-cell>
          <table:table-cell table:style-name="ce12N2" office:value-type="float" office:value="5.3">
            <text:p>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71">
            <text:p>47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58.15">
            <text:p>5758,15</text:p>
          </table:table-cell>
          <table:table-cell table:style-name="ce12N2" office:value-type="float" office:value="403.07">
            <text:p>40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51698337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0">
            <text:p>3097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26.1">
            <text:p>572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46.08">
            <text:p>564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664">
            <text:p>0,052</text:p>
          </table:table-cell>
          <table:table-cell table:style-name="ce12N2" office:value-type="float" office:value="7.48">
            <text:p>7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2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65.15">
            <text:p>4765,15</text:p>
          </table:table-cell>
          <table:table-cell table:style-name="ce12N2" office:value-type="float" office:value="4.77">
            <text:p>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89">
            <text:p>42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80.02">
            <text:p>80,02</text:p>
          </table:table-cell>
          <table:table-cell table:style-name="ce12N2" office:value-type="float" office:value="5646.08">
            <text:p>5646,08</text:p>
          </table:table-cell>
          <table:table-cell table:style-name="ce12N2" office:value-type="float" office:value="395.22">
            <text:p>39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41478725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1">
            <text:p>3097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1">
            <text:p>0,047</text:p>
          </table:table-cell>
          <table:table-cell table:style-name="ce12N2" office:value-type="float" office:value="237.71">
            <text:p>237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08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84.43">
            <text:p>65384,43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46">
            <text:p>588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3039.24">
            <text:p>303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71775280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8">
            <text:p>3097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49.03">
            <text:p>1504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12.1">
            <text:p>1371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">
            <text:p>0,004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49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45.98">
            <text:p>11945,98</text:p>
          </table:table-cell>
          <table:table-cell table:style-name="ce12N2" office:value-type="float" office:value="11.95">
            <text:p>1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51">
            <text:p>107,5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336.93">
            <text:p>1336,93</text:p>
          </table:table-cell>
          <table:table-cell table:style-name="ce12N2" office:value-type="float" office:value="13712.1">
            <text:p>13712,10</text:p>
          </table:table-cell>
          <table:table-cell table:style-name="ce12N2" office:value-type="float" office:value="548.48">
            <text:p>5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451498916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9">
            <text:p>30975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0.6">
            <text:p>176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4.4">
            <text:p>164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13">
            <text:p>0,023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6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7.84">
            <text:p>1387,84</text:p>
          </table:table-cell>
          <table:table-cell table:style-name="ce12N2" office:value-type="float" office:value="1.38">
            <text:p>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49">
            <text:p>12,4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16.2">
            <text:p>116,20</text:p>
          </table:table-cell>
          <table:table-cell table:style-name="ce12N2" office:value-type="float" office:value="1644.4">
            <text:p>1644,40</text:p>
          </table:table-cell>
          <table:table-cell table:style-name="ce12N2" office:value-type="float" office:value="115.11">
            <text:p>1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01306432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0">
            <text:p>30976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19.61">
            <text:p>601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84.84">
            <text:p>548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6">
            <text:p>0,002</text:p>
          </table:table-cell>
          <table:table-cell table:style-name="ce12N2" office:value-type="float" office:value="1.06">
            <text:p>1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1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78.4">
            <text:p>4778,40</text:p>
          </table:table-cell>
          <table:table-cell table:style-name="ce12N2" office:value-type="float" office:value="4.78">
            <text:p>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01">
            <text:p>43,0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34.77">
            <text:p>534,77</text:p>
          </table:table-cell>
          <table:table-cell table:style-name="ce12N2" office:value-type="float" office:value="5484.84">
            <text:p>5484,84</text:p>
          </table:table-cell>
          <table:table-cell table:style-name="ce12N2" office:value-type="float" office:value="219.39">
            <text:p>21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81507392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1">
            <text:p>30976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2.02">
            <text:p>996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48.45">
            <text:p>9648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98">
            <text:p>0,005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2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05.73">
            <text:p>8405,73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65">
            <text:p>75,6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13.57">
            <text:p>313,57</text:p>
          </table:table-cell>
          <table:table-cell table:style-name="ce12N2" office:value-type="float" office:value="9648.45">
            <text:p>9648,45</text:p>
          </table:table-cell>
          <table:table-cell table:style-name="ce12N2" office:value-type="float" office:value="385.94">
            <text:p>38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91441479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6">
            <text:p>3097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1575">
            <text:p>0,062</text:p>
          </table:table-cell>
          <table:table-cell table:style-name="ce12N2" office:value-type="float" office:value="28.45">
            <text:p>2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4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97.15">
            <text:p>4597,15</text:p>
          </table:table-cell>
          <table:table-cell table:style-name="ce12N2" office:value-type="float" office:value="4.6">
            <text:p>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37">
            <text:p>41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381.29">
            <text:p>38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441701124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8">
            <text:p>309768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900.510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7.04">
            <text:p>976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67.04">
            <text:p>976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9696">
            <text:p>0,130</text:p>
          </table:table-cell>
          <table:table-cell table:style-name="ce12N2" office:value-type="float" office:value="268.8">
            <text:p>26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7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43.14">
            <text:p>8243,14</text:p>
          </table:table-cell>
          <table:table-cell table:style-name="ce12N2" office:value-type="float" office:value="8.24">
            <text:p>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19">
            <text:p>74,1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67.04">
            <text:p>9767,04</text:p>
          </table:table-cell>
          <table:table-cell table:style-name="ce12N2" office:value-type="float" office:value="683.69">
            <text:p>68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7771310034735500500090051019137096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9">
            <text:p>309769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30.239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5.02">
            <text:p>89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0.78">
            <text:p>85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6">
            <text:p>0,004</text:p>
          </table:table-cell>
          <table:table-cell table:style-name="ce12N2" office:value-type="float" office:value="4.53">
            <text:p>4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1.19">
            <text:p>741,19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7">
            <text:p>6,6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4.24">
            <text:p>44,24</text:p>
          </table:table-cell>
          <table:table-cell table:style-name="ce12N2" office:value-type="float" office:value="850.78">
            <text:p>850,78</text:p>
          </table:table-cell>
          <table:table-cell table:style-name="ce12N2" office:value-type="float" office:value="34.03">
            <text:p>3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302391316675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82">
            <text:p>309782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0.2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28">
            <text:p>506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0628">
            <text:p>506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48">
            <text:p>150,480</text:p>
          </table:table-cell>
          <table:table-cell table:style-name="ce12N2" office:value-type="float" office:value="8316">
            <text:p>83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6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31.52">
            <text:p>40431,52</text:p>
          </table:table-cell>
          <table:table-cell table:style-name="ce12N2" office:value-type="float" office:value="40.44">
            <text:p>4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88">
            <text:p>363,8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628">
            <text:p>50628,00</text:p>
          </table:table-cell>
          <table:table-cell table:style-name="ce12N2" office:value-type="float" office:value="6075.36">
            <text:p>607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702331992414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91">
            <text:p>3097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4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0.81">
            <text:p>190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80.2">
            <text:p>178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91">
            <text:p>0,027</text:p>
          </table:table-cell>
          <table:table-cell table:style-name="ce12N2" office:value-type="float" office:value="1.71">
            <text:p>1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0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2.46">
            <text:p>1502,46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52">
            <text:p>13,5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20.61">
            <text:p>120,61</text:p>
          </table:table-cell>
          <table:table-cell table:style-name="ce12N2" office:value-type="float" office:value="1780.2">
            <text:p>1780,20</text:p>
          </table:table-cell>
          <table:table-cell table:style-name="ce12N2" office:value-type="float" office:value="124.61">
            <text:p>12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491572976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93">
            <text:p>309793</text:p>
          </table:table-cell>
          <table:table-cell table:style-name="ce0" table:number-columns-spanned="4" table:number-rows-spanned="1" office:value-type="string" calcext:value-type="string">
            <text:p>5.133 - CIA IND H CARLOS SCHNEIDER</text:p>
          </table:table-cell>
          <table:covered-table-cell table:number-columns-repeated="3"/>
          <table:table-cell table:style-name="ce0" office:value-type="string" calcext:value-type="string">
            <text:p>2.284.0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34.68">
            <text:p>1983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17646.86">
            <text:p>17646,86</text:p>
          </table:table-cell>
          <table:table-cell table:style-name="ce12N2" office:value-type="float" office:value="979.4">
            <text:p>979,40</text:p>
          </table:table-cell>
          <table:table-cell table:style-name="ce12N3" office:value-type="float" office:value="0.007303">
            <text:p>0,007</text:p>
          </table:table-cell>
          <table:table-cell table:style-name="ce12N2" office:value-type="float" office:value="445.54">
            <text:p>44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3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20.1">
            <text:p>15720,10</text:p>
          </table:table-cell>
          <table:table-cell table:style-name="ce12N2" office:value-type="float" office:value="15.7">
            <text:p>1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46">
            <text:p>141,46</text:p>
          </table:table-cell>
          <table:table-cell table:style-name="ce12N2" office:value-type="float" office:value="43.35">
            <text:p>43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208.42">
            <text:p>1208,42</text:p>
          </table:table-cell>
          <table:table-cell table:style-name="ce12N2" office:value-type="float" office:value="18626.26">
            <text:p>18626,26</text:p>
          </table:table-cell>
          <table:table-cell table:style-name="ce12N2" office:value-type="float" office:value="1303.82">
            <text:p>130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709955001265550010022840121020864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94">
            <text:p>3097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4.3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2.9">
            <text:p>70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2.9">
            <text:p>70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">
            <text:p>0,004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3.24">
            <text:p>593,24</text:p>
          </table:table-cell>
          <table:table-cell table:style-name="ce12N2" office:value-type="float" office:value="0.59">
            <text:p>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2.9">
            <text:p>702,90</text:p>
          </table:table-cell>
          <table:table-cell table:style-name="ce12N2" office:value-type="float" office:value="49.2">
            <text:p>4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43361826717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4">
            <text:p>309804</text:p>
          </table:table-cell>
          <table:table-cell table:style-name="ce0" table:number-columns-spanned="4" table:number-rows-spanned="1" office:value-type="string" calcext:value-type="string">
            <text:p>9.277 - ALUMASA IND. DE PLASTICO E ALUMINIO LTDA</text:p>
          </table:table-cell>
          <table:covered-table-cell table:number-columns-repeated="3"/>
          <table:table-cell table:style-name="ce0" office:value-type="string" calcext:value-type="string">
            <text:p>396.1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58.34">
            <text:p>2785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6981.44">
            <text:p>26981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15275">
            <text:p>14,153</text:p>
          </table:table-cell>
          <table:table-cell table:style-name="ce12N2" office:value-type="float" office:value="703.5">
            <text:p>70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85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71.66">
            <text:p>22771,66</text:p>
          </table:table-cell>
          <table:table-cell table:style-name="ce12N2" office:value-type="float" office:value="22.77">
            <text:p>2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.95">
            <text:p>204,9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876.9">
            <text:p>876,90</text:p>
          </table:table-cell>
          <table:table-cell table:style-name="ce12N2" office:value-type="float" office:value="26981.44">
            <text:p>26981,44</text:p>
          </table:table-cell>
          <table:table-cell table:style-name="ce12N2" office:value-type="float" office:value="1888.7">
            <text:p>188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0718984000180550010003961911064893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6">
            <text:p>309806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2.6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819.5">
            <text:p>4181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41819.5">
            <text:p>418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8015">
            <text:p>0,558</text:p>
          </table:table-cell>
          <table:table-cell table:style-name="ce12N2" office:value-type="float" office:value="441.99">
            <text:p>441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81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317.32">
            <text:p>35317,32</text:p>
          </table:table-cell>
          <table:table-cell table:style-name="ce12N2" office:value-type="float" office:value="35.33">
            <text:p>3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.85">
            <text:p>317,85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819.5">
            <text:p>41819,50</text:p>
          </table:table-cell>
          <table:table-cell table:style-name="ce12N2" office:value-type="float" office:value="2902.32">
            <text:p>290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826671743995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7">
            <text:p>309807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30.979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9.09">
            <text:p>286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7.27">
            <text:p>2727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692">
            <text:p>0,217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6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6">
            <text:p>2376,00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8">
            <text:p>21,3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41.82">
            <text:p>141,82</text:p>
          </table:table-cell>
          <table:table-cell table:style-name="ce12N2" office:value-type="float" office:value="2727.27">
            <text:p>2727,27</text:p>
          </table:table-cell>
          <table:table-cell table:style-name="ce12N2" office:value-type="float" office:value="109.09">
            <text:p>10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309791077672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8">
            <text:p>309808</text:p>
          </table:table-cell>
          <table:table-cell table:style-name="ce0" table:number-columns-spanned="4" table:number-rows-spanned="1" office:value-type="string" calcext:value-type="string">
            <text:p>13.604 - FISCHER BRASIL INDUSTRIA E COMERCIO LTDA</text:p>
          </table:table-cell>
          <table:covered-table-cell table:number-columns-repeated="3"/>
          <table:table-cell table:style-name="ce0" office:value-type="string" calcext:value-type="string">
            <text:p>119.62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32.58">
            <text:p>2753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6089.28">
            <text:p>2608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126">
            <text:p>0,681</text:p>
          </table:table-cell>
          <table:table-cell table:style-name="ce12N2" office:value-type="float" office:value="302.12">
            <text:p>302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53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61.42">
            <text:p>22061,42</text:p>
          </table:table-cell>
          <table:table-cell table:style-name="ce12N2" office:value-type="float" office:value="22.06">
            <text:p>2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8.57">
            <text:p>198,57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443.3">
            <text:p>1443,30</text:p>
          </table:table-cell>
          <table:table-cell table:style-name="ce12N2" office:value-type="float" office:value="26089.28">
            <text:p>26089,28</text:p>
          </table:table-cell>
          <table:table-cell table:style-name="ce12N2" office:value-type="float" office:value="1779.2">
            <text:p>177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33471960005785500500011962812388623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10">
            <text:p>309810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6.480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3.54">
            <text:p>123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32.39">
            <text:p>1132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27">
            <text:p>0,001</text:p>
          </table:table-cell>
          <table:table-cell table:style-name="ce12N2" office:value-type="float" office:value="751">
            <text:p>75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3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5.72">
            <text:p>955,72</text:p>
          </table:table-cell>
          <table:table-cell table:style-name="ce12N2" office:value-type="float" office:value="0.95">
            <text:p>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59">
            <text:p>8,5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01.15">
            <text:p>101,15</text:p>
          </table:table-cell>
          <table:table-cell table:style-name="ce12N2" office:value-type="float" office:value="1132.39">
            <text:p>1132,39</text:p>
          </table:table-cell>
          <table:table-cell table:style-name="ce12N2" office:value-type="float" office:value="79.27">
            <text:p>7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6220550140009764801002123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11">
            <text:p>309811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32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83.22">
            <text:p>5148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50577.9">
            <text:p>5057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77.91766">
            <text:p>577,918</text:p>
          </table:table-cell>
          <table:table-cell table:style-name="ce12N2" office:value-type="float" office:value="2525.65">
            <text:p>2525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483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687.6">
            <text:p>43687,60</text:p>
          </table:table-cell>
          <table:table-cell table:style-name="ce12N2" office:value-type="float" office:value="43.68">
            <text:p>4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.17">
            <text:p>393,1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905.32">
            <text:p>905,32</text:p>
          </table:table-cell>
          <table:table-cell table:style-name="ce12N2" office:value-type="float" office:value="50577.9">
            <text:p>50577,90</text:p>
          </table:table-cell>
          <table:table-cell table:style-name="ce12N2" office:value-type="float" office:value="2437.31">
            <text:p>24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064838016560550010005324001618089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5">
            <text:p>30984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6.6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24.15">
            <text:p>20462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85523">
            <text:p>13,855</text:p>
          </table:table-cell>
          <table:table-cell table:style-name="ce12N2" office:value-type="float" office:value="22000">
            <text:p>2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4.624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261.68">
            <text:p>167261,68</text:p>
          </table:table-cell>
          <table:table-cell table:style-name="ce12N2" office:value-type="float" office:value="167.26">
            <text:p>16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5.36">
            <text:p>1505,36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440.95">
            <text:p>6440,95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13872.82">
            <text:p>138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667407000130550000000166941016452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0">
            <text:p>309850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31.257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835.12">
            <text:p>4183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767.22">
            <text:p>39767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3">
            <text:p>0,630</text:p>
          </table:table-cell>
          <table:table-cell table:style-name="ce12N2" office:value-type="float" office:value="227.4">
            <text:p>22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83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645.2">
            <text:p>34645,20</text:p>
          </table:table-cell>
          <table:table-cell table:style-name="ce12N2" office:value-type="float" office:value="34.65">
            <text:p>3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.81">
            <text:p>311,8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2067.9">
            <text:p>2067,90</text:p>
          </table:table-cell>
          <table:table-cell table:style-name="ce12N2" office:value-type="float" office:value="39767.22">
            <text:p>39767,22</text:p>
          </table:table-cell>
          <table:table-cell table:style-name="ce12N2" office:value-type="float" office:value="1590.69">
            <text:p>159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3125717725828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2">
            <text:p>30985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6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531.46">
            <text:p>15453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54431.5">
            <text:p>15443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20226">
            <text:p>4,820</text:p>
          </table:table-cell>
          <table:table-cell table:style-name="ce12N2" office:value-type="float" office:value="3026.03">
            <text:p>3026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4.53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906.9">
            <text:p>132906,90</text:p>
          </table:table-cell>
          <table:table-cell table:style-name="ce12N2" office:value-type="float" office:value="132.92">
            <text:p>13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6.15">
            <text:p>1196,1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99.96">
            <text:p>99,96</text:p>
          </table:table-cell>
          <table:table-cell table:style-name="ce12N2" office:value-type="float" office:value="154431.5">
            <text:p>154431,50</text:p>
          </table:table-cell>
          <table:table-cell table:style-name="ce12N2" office:value-type="float" office:value="7977.63">
            <text:p>797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65512921908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9">
            <text:p>30985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3.7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54.36">
            <text:p>37354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113.12">
            <text:p>3711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478">
            <text:p>3,848</text:p>
          </table:table-cell>
          <table:table-cell table:style-name="ce12N2" office:value-type="float" office:value="40917.36">
            <text:p>4091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354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322.54">
            <text:p>31322,54</text:p>
          </table:table-cell>
          <table:table-cell table:style-name="ce12N2" office:value-type="float" office:value="31.32">
            <text:p>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.9">
            <text:p>281,90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241.24">
            <text:p>241,24</text:p>
          </table:table-cell>
          <table:table-cell table:style-name="ce12N2" office:value-type="float" office:value="37113.12">
            <text:p>37113,12</text:p>
          </table:table-cell>
          <table:table-cell table:style-name="ce12N2" office:value-type="float" office:value="2597.92">
            <text:p>259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306.02">
            <text:p>830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08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26/06/2026</text:p>
          </table:table-cell>
          <table:table-cell table:style-name="ce12" office:value-type="string" calcext:value-type="string">
            <text:p>8.306,02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5260674423880000145550030012237411733626684</text:p>
          </table:table-cell>
          <table:table-cell table:style-name="ce0" office:value-type="string" calcext:value-type="string">
            <text:p>3526065432020300019457001000004408142883620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3">
            <text:p>30986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3.8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93.78">
            <text:p>509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60.88">
            <text:p>506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47">
            <text:p>0,525</text:p>
          </table:table-cell>
          <table:table-cell table:style-name="ce12N2" office:value-type="float" office:value="5579.64">
            <text:p>557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93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1.26">
            <text:p>4271,26</text:p>
          </table:table-cell>
          <table:table-cell table:style-name="ce12N2" office:value-type="float" office:value="4.27">
            <text:p>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44">
            <text:p>38,44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32.9">
            <text:p>32,90</text:p>
          </table:table-cell>
          <table:table-cell table:style-name="ce12N2" office:value-type="float" office:value="5060.88">
            <text:p>5060,88</text:p>
          </table:table-cell>
          <table:table-cell table:style-name="ce12N2" office:value-type="float" office:value="354.26">
            <text:p>35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10.53">
            <text:p>111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11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26/06/2026</text:p>
          </table:table-cell>
          <table:table-cell table:style-name="ce12" office:value-type="string" calcext:value-type="string">
            <text:p>1.110,5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5260674423880000145550030012238051638564331</text:p>
          </table:table-cell>
          <table:table-cell table:style-name="ce0" office:value-type="string" calcext:value-type="string">
            <text:p>3526065432020300019457001000004411154064949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5">
            <text:p>309865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7.128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4594.3">
            <text:p>13459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">
            <text:p>36,00</text:p>
          </table:table-cell>
          <table:table-cell table:style-name="ce12N2" office:value-type="float" office:value="132420.67">
            <text:p>132420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6.137965">
            <text:p>206,138</text:p>
          </table:table-cell>
          <table:table-cell table:style-name="ce12N2" office:value-type="float" office:value="1911.94">
            <text:p>1911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4.59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357.97">
            <text:p>115357,97</text:p>
          </table:table-cell>
          <table:table-cell table:style-name="ce12N2" office:value-type="float" office:value="115.36">
            <text:p>11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38.22">
            <text:p>1038,2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2173.63">
            <text:p>2173,63</text:p>
          </table:table-cell>
          <table:table-cell table:style-name="ce12N2" office:value-type="float" office:value="132420.67">
            <text:p>132420,67</text:p>
          </table:table-cell>
          <table:table-cell table:style-name="ce12N2" office:value-type="float" office:value="5304.45">
            <text:p>530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2741051000185550550003071281203335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3">
            <text:p>30987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3.9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434.37">
            <text:p>5243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095.76">
            <text:p>5209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021468">
            <text:p>11,021</text:p>
          </table:table-cell>
          <table:table-cell table:style-name="ce12N2" office:value-type="float" office:value="41590.92">
            <text:p>4159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43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967.52">
            <text:p>43967,52</text:p>
          </table:table-cell>
          <table:table-cell table:style-name="ce12N2" office:value-type="float" office:value="43.97">
            <text:p>4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5.71">
            <text:p>395,71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338.61">
            <text:p>338,61</text:p>
          </table:table-cell>
          <table:table-cell table:style-name="ce12N2" office:value-type="float" office:value="52095.76">
            <text:p>52095,76</text:p>
          </table:table-cell>
          <table:table-cell table:style-name="ce12N2" office:value-type="float" office:value="3646.71">
            <text:p>364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328.6">
            <text:p>832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03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25/06/2026</text:p>
          </table:table-cell>
          <table:table-cell table:style-name="ce12" office:value-type="string" calcext:value-type="string">
            <text:p>8.328,60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5260674423880000145550030012239701225464003</text:p>
          </table:table-cell>
          <table:table-cell table:style-name="ce0" office:value-type="string" calcext:value-type="string">
            <text:p>3526065432020300019457001000004403131087122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4">
            <text:p>30987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3.98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449.36">
            <text:p>3944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194.6">
            <text:p>3919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087199">
            <text:p>11,087</text:p>
          </table:table-cell>
          <table:table-cell table:style-name="ce12N2" office:value-type="float" office:value="41711.76">
            <text:p>4171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44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073.47">
            <text:p>33073,47</text:p>
          </table:table-cell>
          <table:table-cell table:style-name="ce12N2" office:value-type="float" office:value="33.07">
            <text:p>3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.66">
            <text:p>297,6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254.76">
            <text:p>254,76</text:p>
          </table:table-cell>
          <table:table-cell table:style-name="ce12N2" office:value-type="float" office:value="39285.68">
            <text:p>39285,68</text:p>
          </table:table-cell>
          <table:table-cell table:style-name="ce12N2" office:value-type="float" office:value="2750">
            <text:p>275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280.3">
            <text:p>828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04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25/06/2026</text:p>
          </table:table-cell>
          <table:table-cell table:style-name="ce12" office:value-type="string" calcext:value-type="string">
            <text:p>8.280,30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5260674423880000145550030012239831467327510</text:p>
          </table:table-cell>
          <table:table-cell table:style-name="ce0" office:value-type="string" calcext:value-type="string">
            <text:p>3526065432020300019457001000004404147851782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2">
            <text:p>309882</text:p>
          </table:table-cell>
          <table:table-cell table:style-name="ce0" table:number-columns-spanned="4" table:number-rows-spanned="1" office:value-type="string" calcext:value-type="string">
            <text:p>29.615 - TENASTEEL INDUSTRIA E COMERCIO LTDA</text:p>
          </table:table-cell>
          <table:covered-table-cell table:number-columns-repeated="3"/>
          <table:table-cell table:style-name="ce0" office:value-type="string" calcext:value-type="string">
            <text:p>9.42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66.98">
            <text:p>11166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0788.94">
            <text:p>10788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1166">
            <text:p>0,181</text:p>
          </table:table-cell>
          <table:table-cell table:style-name="ce12N2" office:value-type="float" office:value="516.41">
            <text:p>516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66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105.59">
            <text:p>9105,59</text:p>
          </table:table-cell>
          <table:table-cell table:style-name="ce12N2" office:value-type="float" office:value="9.1">
            <text:p>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95">
            <text:p>81,95</text:p>
          </table:table-cell>
          <table:table-cell table:style-name="ce12N2" office:value-type="float" office:value="48.17">
            <text:p>48,1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378.04">
            <text:p>378,04</text:p>
          </table:table-cell>
          <table:table-cell table:style-name="ce12N2" office:value-type="float" office:value="10788.94">
            <text:p>10788,94</text:p>
          </table:table-cell>
          <table:table-cell table:style-name="ce12N2" office:value-type="float" office:value="755.23">
            <text:p>75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40487720001085500400000942014981462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3">
            <text:p>309883</text:p>
          </table:table-cell>
          <table:table-cell table:style-name="ce0" table:number-columns-spanned="4" table:number-rows-spanned="1" office:value-type="string" calcext:value-type="string">
            <text:p>1.201 - INDUSTRIA DE MOTORES ANAUGER S/A</text:p>
          </table:table-cell>
          <table:covered-table-cell table:number-columns-repeated="3"/>
          <table:table-cell table:style-name="ce0" office:value-type="string" calcext:value-type="string">
            <text:p>304.4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46">
            <text:p>2834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346">
            <text:p>283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0867">
            <text:p>0,909</text:p>
          </table:table-cell>
          <table:table-cell table:style-name="ce12N2" office:value-type="float" office:value="294.61">
            <text:p>294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34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427.07">
            <text:p>24427,07</text:p>
          </table:table-cell>
          <table:table-cell table:style-name="ce12N2" office:value-type="float" office:value="24.42">
            <text:p>2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9.84">
            <text:p>219,8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15.74">
            <text:p>20415,74</text:p>
          </table:table-cell>
          <table:table-cell table:style-name="ce12N2" office:value-type="float" office:value="1429.1">
            <text:p>142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346350001245500400030442419502906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4">
            <text:p>309884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77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04">
            <text:p>121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7.04">
            <text:p>121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36">
            <text:p>0,039</text:p>
          </table:table-cell>
          <table:table-cell table:style-name="ce12N2" office:value-type="float" office:value="7.67">
            <text:p>7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7.44">
            <text:p>1027,44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5">
            <text:p>9,2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04">
            <text:p>1217,04</text:p>
          </table:table-cell>
          <table:table-cell table:style-name="ce12N2" office:value-type="float" office:value="85.2">
            <text:p>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330642620002505500100027793610734825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9">
            <text:p>30988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4.00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19.02">
            <text:p>532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875.32">
            <text:p>5287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213633">
            <text:p>9,214</text:p>
          </table:table-cell>
          <table:table-cell table:style-name="ce12N2" office:value-type="float" office:value="38012.97">
            <text:p>38012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2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625.45">
            <text:p>44625,45</text:p>
          </table:table-cell>
          <table:table-cell table:style-name="ce12N2" office:value-type="float" office:value="44.63">
            <text:p>4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.63">
            <text:p>401,6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343.7">
            <text:p>343,70</text:p>
          </table:table-cell>
          <table:table-cell table:style-name="ce12N2" office:value-type="float" office:value="52875.32">
            <text:p>52875,32</text:p>
          </table:table-cell>
          <table:table-cell table:style-name="ce12N2" office:value-type="float" office:value="3701.27">
            <text:p>370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368.9">
            <text:p>736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09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26/06/2026</text:p>
          </table:table-cell>
          <table:table-cell table:style-name="ce12" office:value-type="string" calcext:value-type="string">
            <text:p>7.368,90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5260674423880000145550030012240031274407185</text:p>
          </table:table-cell>
          <table:table-cell table:style-name="ce0" office:value-type="string" calcext:value-type="string">
            <text:p>3526065432020300019457001000004409198478393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91">
            <text:p>30989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2.2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7">
            <text:p>395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57">
            <text:p>395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4">
            <text:p>0,152</text:p>
          </table:table-cell>
          <table:table-cell table:style-name="ce12N2" office:value-type="float" office:value="58.2">
            <text:p>5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5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39">
            <text:p>3339,0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05">
            <text:p>30,0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57">
            <text:p>3957,00</text:p>
          </table:table-cell>
          <table:table-cell table:style-name="ce12N2" office:value-type="float" office:value="276.99">
            <text:p>276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22691573965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92">
            <text:p>30989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2.2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">
            <text:p>0,140</text:p>
          </table:table-cell>
          <table:table-cell table:style-name="ce12N2" office:value-type="float" office:value="30.8">
            <text:p>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8">
            <text:p>808,00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27">
            <text:p>7,2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67">
            <text:p>6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229610038380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95">
            <text:p>30989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2.2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47.7">
            <text:p>3094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0947.7">
            <text:p>3094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11926">
            <text:p>6,119</text:p>
          </table:table-cell>
          <table:table-cell table:style-name="ce12N2" office:value-type="float" office:value="818.95">
            <text:p>81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94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168.9">
            <text:p>26168,90</text:p>
          </table:table-cell>
          <table:table-cell table:style-name="ce12N2" office:value-type="float" office:value="26.17">
            <text:p>2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5.51">
            <text:p>235,5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47.7">
            <text:p>30947,70</text:p>
          </table:table-cell>
          <table:table-cell table:style-name="ce12N2" office:value-type="float" office:value="2166.34">
            <text:p>216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22921011767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96">
            <text:p>30989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2.2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179.24">
            <text:p>5517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55179.24">
            <text:p>55179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8.562848">
            <text:p>128,563</text:p>
          </table:table-cell>
          <table:table-cell table:style-name="ce12N2" office:value-type="float" office:value="863.66">
            <text:p>86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179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74.9">
            <text:p>46574,90</text:p>
          </table:table-cell>
          <table:table-cell table:style-name="ce12N2" office:value-type="float" office:value="46.6">
            <text:p>4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9.16">
            <text:p>419,1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179.24">
            <text:p>55179,24</text:p>
          </table:table-cell>
          <table:table-cell table:style-name="ce12N2" office:value-type="float" office:value="3862.56">
            <text:p>386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22931948367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0">
            <text:p>3099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74">
            <text:p>0,041</text:p>
          </table:table-cell>
          <table:table-cell table:style-name="ce12N2" office:value-type="float" office:value="155.34">
            <text:p>1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9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45.87">
            <text:p>15745,87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71">
            <text:p>141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31.08">
            <text:p>13431,08</text:p>
          </table:table-cell>
          <table:table-cell table:style-name="ce12N2" office:value-type="float" office:value="940.18">
            <text:p>94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8125447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1">
            <text:p>3099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635">
            <text:p>0,140</text:p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8.11">
            <text:p>4718,11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6">
            <text:p>42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391.32">
            <text:p>39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01434461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2">
            <text:p>3099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116852652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3">
            <text:p>3099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9">
            <text:p>0,029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6.16">
            <text:p>976,1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80.96">
            <text:p>8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21037109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4">
            <text:p>3099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96">
            <text:p>0,144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0.61">
            <text:p>12420,61</text:p>
          </table:table-cell>
          <table:table-cell table:style-name="ce12N2" office:value-type="float" office:value="12.42">
            <text:p>1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79">
            <text:p>111,7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1030.18">
            <text:p>103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31535591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5">
            <text:p>3099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8.09">
            <text:p>978,09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41847623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6">
            <text:p>309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8">
            <text:p>0,001</text:p>
          </table:table-cell>
          <table:table-cell table:style-name="ce12N2" office:value-type="float" office:value="13.61">
            <text:p>1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2.86">
            <text:p>8412,86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2">
            <text:p>75,7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697.77">
            <text:p>69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7138933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7">
            <text:p>309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5948">
            <text:p>0,946</text:p>
          </table:table-cell>
          <table:table-cell table:style-name="ce12N2" office:value-type="float" office:value="145.73">
            <text:p>1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290.64">
            <text:p>25290,64</text:p>
          </table:table-cell>
          <table:table-cell table:style-name="ce12N2" office:value-type="float" office:value="25.29">
            <text:p>2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.61">
            <text:p>227,6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1233.11">
            <text:p>123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8185622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8">
            <text:p>309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02.5">
            <text:p>3802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378235.77">
            <text:p>37823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0591">
            <text:p>1,561</text:p>
          </table:table-cell>
          <table:table-cell table:style-name="ce12N2" office:value-type="float" office:value="1037.64">
            <text:p>1037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0.20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5020.25">
            <text:p>325020,25</text:p>
          </table:table-cell>
          <table:table-cell table:style-name="ce12N2" office:value-type="float" office:value="324.99">
            <text:p>32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5.21">
            <text:p>2925,2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966.73">
            <text:p>1966,73</text:p>
          </table:table-cell>
          <table:table-cell table:style-name="ce12N2" office:value-type="float" office:value="372611.39">
            <text:p>372611,39</text:p>
          </table:table-cell>
          <table:table-cell table:style-name="ce12N2" office:value-type="float" office:value="20086.7">
            <text:p>200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91486881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9">
            <text:p>309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2">
            <text:p>0,068</text:p>
          </table:table-cell>
          <table:table-cell table:style-name="ce12N2" office:value-type="float" office:value="180.26">
            <text:p>18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958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54.57">
            <text:p>36554,57</text:p>
          </table:table-cell>
          <table:table-cell table:style-name="ce12N2" office:value-type="float" office:value="36.56">
            <text:p>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99">
            <text:p>328,9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1678.35">
            <text:p>167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11600070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0">
            <text:p>309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54">
            <text:p>0,047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7.66">
            <text:p>7657,66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92">
            <text:p>68,9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31.91">
            <text:p>6531,91</text:p>
          </table:table-cell>
          <table:table-cell table:style-name="ce12N2" office:value-type="float" office:value="457.23">
            <text:p>45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2137394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2">
            <text:p>30992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6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38.64">
            <text:p>77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38.64">
            <text:p>77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84">
            <text:p>0,043</text:p>
          </table:table-cell>
          <table:table-cell table:style-name="ce12N2" office:value-type="float" office:value="24.5">
            <text:p>2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1.22">
            <text:p>6531,22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78">
            <text:p>58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38.64">
            <text:p>7738,64</text:p>
          </table:table-cell>
          <table:table-cell table:style-name="ce12N2" office:value-type="float" office:value="541.7">
            <text:p>54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6571800828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5">
            <text:p>309925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9.37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09.56">
            <text:p>1380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2901.12">
            <text:p>1290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50016">
            <text:p>6,500</text:p>
          </table:table-cell>
          <table:table-cell table:style-name="ce12N2" office:value-type="float" office:value="476.35">
            <text:p>476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80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53.18">
            <text:p>10953,18</text:p>
          </table:table-cell>
          <table:table-cell table:style-name="ce12N2" office:value-type="float" office:value="10.95">
            <text:p>1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58">
            <text:p>98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908.44">
            <text:p>908,44</text:p>
          </table:table-cell>
          <table:table-cell table:style-name="ce12N2" office:value-type="float" office:value="12901.12">
            <text:p>12901,12</text:p>
          </table:table-cell>
          <table:table-cell table:style-name="ce12N2" office:value-type="float" office:value="831.51">
            <text:p>83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60620300001235500200069937016778314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7">
            <text:p>30992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2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230.13">
            <text:p>6623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6230.13">
            <text:p>66230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977115">
            <text:p>36,977</text:p>
          </table:table-cell>
          <table:table-cell table:style-name="ce12N2" office:value-type="float" office:value="3908.27">
            <text:p>3908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.230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909.41">
            <text:p>55909,41</text:p>
          </table:table-cell>
          <table:table-cell table:style-name="ce12N2" office:value-type="float" office:value="55.9">
            <text:p>5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3.19">
            <text:p>503,1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230.13">
            <text:p>66230,13</text:p>
          </table:table-cell>
          <table:table-cell table:style-name="ce12N2" office:value-type="float" office:value="4636.11">
            <text:p>463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24691690939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8">
            <text:p>30992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2.4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935.6">
            <text:p>5993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9935.6">
            <text:p>5993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129696">
            <text:p>36,130</text:p>
          </table:table-cell>
          <table:table-cell table:style-name="ce12N2" office:value-type="float" office:value="3787.08">
            <text:p>378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93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575.4">
            <text:p>50575,40</text:p>
          </table:table-cell>
          <table:table-cell table:style-name="ce12N2" office:value-type="float" office:value="50.57">
            <text:p>5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5.18">
            <text:p>455,1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935.6">
            <text:p>59935,60</text:p>
          </table:table-cell>
          <table:table-cell table:style-name="ce12N2" office:value-type="float" office:value="4195.49">
            <text:p>419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246816576885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9">
            <text:p>30992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6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7">
            <text:p>0,276</text:p>
          </table:table-cell>
          <table:table-cell table:style-name="ce12N2" office:value-type="float" office:value="179.32">
            <text:p>17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51.5">
            <text:p>4551,50</text:p>
          </table:table-cell>
          <table:table-cell table:style-name="ce12N2" office:value-type="float" office:value="4.55">
            <text:p>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96">
            <text:p>40,9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377.5">
            <text:p>37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6561735409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31">
            <text:p>309931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59.196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.6">
            <text:p>1301,60</text:p>
          </table:table-cell>
          <table:table-cell table:style-name="ce12N2" office:value-type="float" office:value="43.72">
            <text:p>43,72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5.26">
            <text:p>1295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4">
            <text:p>1,564</text:p>
          </table:table-cell>
          <table:table-cell table:style-name="ce12N2" office:value-type="float" office:value="2000">
            <text:p>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0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8.62">
            <text:p>908,62</text:p>
          </table:table-cell>
          <table:table-cell table:style-name="ce12N2" office:value-type="float" office:value="0.91">
            <text:p>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18">
            <text:p>8,18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1.54">
            <text:p>1251,54</text:p>
          </table:table-cell>
          <table:table-cell table:style-name="ce12N2" office:value-type="float" office:value="250.31">
            <text:p>25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01.85">
            <text:p>1501,85</text:p>
          </table:table-cell>
          <table:table-cell table:style-name="ce12N2" office:value-type="float" office:value="50.06">
            <text:p>50,0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016378950074985500600145919610357018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39">
            <text:p>309939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25.723</text:p>
          </table:table-cell>
          <table:table-cell table:style-name="ce9" office:value-type="string" calcext:value-type="string">
            <text:p>7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2.07">
            <text:p>152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22.07">
            <text:p>1522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7">
            <text:p>0,047</text:p>
          </table:table-cell>
          <table:table-cell table:style-name="ce12N2" office:value-type="float" office:value="95.11">
            <text:p>95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2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5.52">
            <text:p>1215,52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4">
            <text:p>10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2.07">
            <text:p>1522,07</text:p>
          </table:table-cell>
          <table:table-cell table:style-name="ce12N2" office:value-type="float" office:value="182.65">
            <text:p>18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.27">
            <text:p>3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9.554</text:p>
          </table:table-cell>
          <table:table-cell table:style-name="ce0" office:value-type="string" calcext:value-type="string">
            <text:p>38.002 - TRANSPORTE MARTINS LTDA</text:p>
          </table:table-cell>
          <table:table-cell table:style-name="ce0" office:value-type="string" calcext:value-type="string">
            <text:p>27/06/2026</text:p>
          </table:table-cell>
          <table:table-cell table:style-name="ce12" office:value-type="string" calcext:value-type="string">
            <text:p>30,27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2260610524837000193550070000257231223854393</text:p>
          </table:table-cell>
          <table:table-cell table:style-name="ce0" office:value-type="string" calcext:value-type="string">
            <text:p>3226062874377700016557001000019554100022455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4">
            <text:p>309954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778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20.74">
            <text:p>4522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20.74">
            <text:p>45220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.901376">
            <text:p>28,901</text:p>
          </table:table-cell>
          <table:table-cell table:style-name="ce12N2" office:value-type="float" office:value="25401.6">
            <text:p>2540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220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113.28">
            <text:p>36113,28</text:p>
          </table:table-cell>
          <table:table-cell table:style-name="ce12N2" office:value-type="float" office:value="36.11">
            <text:p>3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5.02">
            <text:p>325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20.74">
            <text:p>45220,74</text:p>
          </table:table-cell>
          <table:table-cell table:style-name="ce12N2" office:value-type="float" office:value="5426.49">
            <text:p>5426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77812539217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5">
            <text:p>30995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40.75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5">
            <text:p>72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276.5">
            <text:p>727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72">
            <text:p>0,003</text:p>
          </table:table-cell>
          <table:table-cell table:style-name="ce12N2" office:value-type="float" office:value="202.14">
            <text:p>20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1.18">
            <text:p>6141,18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27">
            <text:p>55,27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76.5">
            <text:p>7276,50</text:p>
          </table:table-cell>
          <table:table-cell table:style-name="ce12N2" office:value-type="float" office:value="509.36">
            <text:p>50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4075718250538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6">
            <text:p>309956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40.03">
            <text:p>227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593.17">
            <text:p>22593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21409">
            <text:p>2,221</text:p>
          </table:table-cell>
          <table:table-cell table:style-name="ce12N2" office:value-type="float" office:value="25919.97">
            <text:p>25919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74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68.07">
            <text:p>19068,07</text:p>
          </table:table-cell>
          <table:table-cell table:style-name="ce12N2" office:value-type="float" office:value="19.07">
            <text:p>1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.61">
            <text:p>171,61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6.86">
            <text:p>146,86</text:p>
          </table:table-cell>
          <table:table-cell table:style-name="ce12N2" office:value-type="float" office:value="22593.17">
            <text:p>22593,17</text:p>
          </table:table-cell>
          <table:table-cell table:style-name="ce12N2" office:value-type="float" office:value="1581.52">
            <text:p>158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211818219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7">
            <text:p>309957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2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80.08">
            <text:p>1868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59.44">
            <text:p>1855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55918">
            <text:p>5,756</text:p>
          </table:table-cell>
          <table:table-cell table:style-name="ce12N2" office:value-type="float" office:value="17640">
            <text:p>176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68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63.71">
            <text:p>15663,71</text:p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.97">
            <text:p>140,97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20.64">
            <text:p>120,64</text:p>
          </table:table-cell>
          <table:table-cell table:style-name="ce12N2" office:value-type="float" office:value="18559.44">
            <text:p>18559,44</text:p>
          </table:table-cell>
          <table:table-cell table:style-name="ce12N2" office:value-type="float" office:value="1299.16">
            <text:p>129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221293188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8">
            <text:p>30995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53.38">
            <text:p>124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37278">
            <text:p>3,837</text:p>
          </table:table-cell>
          <table:table-cell table:style-name="ce12N2" office:value-type="float" office:value="11760">
            <text:p>11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42.47">
            <text:p>10442,47</text:p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98">
            <text:p>93,98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866.11">
            <text:p>86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61703715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9">
            <text:p>30995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62.36">
            <text:p>1076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92.86">
            <text:p>1069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47602">
            <text:p>3,348</text:p>
          </table:table-cell>
          <table:table-cell table:style-name="ce12N2" office:value-type="float" office:value="7680">
            <text:p>76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6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24.51">
            <text:p>9024,51</text:p>
          </table:table-cell>
          <table:table-cell table:style-name="ce12N2" office:value-type="float" office:value="9.02">
            <text:p>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22">
            <text:p>81,22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10692.86">
            <text:p>10692,86</text:p>
          </table:table-cell>
          <table:table-cell table:style-name="ce12N2" office:value-type="float" office:value="748.5">
            <text:p>74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516143875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60">
            <text:p>30996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20.22">
            <text:p>1862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499.97">
            <text:p>18499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8773">
            <text:p>0,269</text:p>
          </table:table-cell>
          <table:table-cell table:style-name="ce12N2" office:value-type="float" office:value="19584.37">
            <text:p>1958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620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13.51">
            <text:p>15613,51</text:p>
          </table:table-cell>
          <table:table-cell table:style-name="ce12N2" office:value-type="float" office:value="15.61">
            <text:p>1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.52">
            <text:p>140,52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20.25">
            <text:p>120,25</text:p>
          </table:table-cell>
          <table:table-cell table:style-name="ce12N2" office:value-type="float" office:value="18499.97">
            <text:p>18499,97</text:p>
          </table:table-cell>
          <table:table-cell table:style-name="ce12N2" office:value-type="float" office:value="1295">
            <text:p>129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41274154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61">
            <text:p>309961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5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272.24">
            <text:p>1927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96">
            <text:p>180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85">
            <text:p>0,006</text:p>
          </table:table-cell>
          <table:table-cell table:style-name="ce12N2" office:value-type="float" office:value="650">
            <text:p>6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27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72.57">
            <text:p>15272,57</text:p>
          </table:table-cell>
          <table:table-cell table:style-name="ce12N2" office:value-type="float" office:value="15.27">
            <text:p>1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.45">
            <text:p>137,45</text:p>
          </table:table-cell>
          <table:table-cell table:style-name="ce12N2" office:value-type="float" office:value="43.5">
            <text:p>43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176.24">
            <text:p>1176,24</text:p>
          </table:table-cell>
          <table:table-cell table:style-name="ce12N2" office:value-type="float" office:value="18096">
            <text:p>18096,00</text:p>
          </table:table-cell>
          <table:table-cell table:style-name="ce12N2" office:value-type="float" office:value="1266.72">
            <text:p>126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5821605490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64">
            <text:p>3099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9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90">
            <text:p>82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90">
            <text:p>82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8">
            <text:p>0,052</text:p>
          </table:table-cell>
          <table:table-cell table:style-name="ce12N2" office:value-type="float" office:value="24.4">
            <text:p>2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96">
            <text:p>6996,00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96">
            <text:p>62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90">
            <text:p>8290,00</text:p>
          </table:table-cell>
          <table:table-cell table:style-name="ce12N2" office:value-type="float" office:value="580.3">
            <text:p>58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9351905031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65">
            <text:p>30996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2.9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41.1">
            <text:p>274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41.1">
            <text:p>274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4">
            <text:p>0,001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4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88">
            <text:p>2388,00</text:p>
          </table:table-cell>
          <table:table-cell table:style-name="ce12N2" office:value-type="float" office:value="2.39">
            <text:p>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49">
            <text:p>21,4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41.1">
            <text:p>2741,10</text:p>
          </table:table-cell>
          <table:table-cell table:style-name="ce12N2" office:value-type="float" office:value="109.64">
            <text:p>10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299510519526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66">
            <text:p>30996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0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1.52">
            <text:p>153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1.52">
            <text:p>153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4">
            <text:p>0,224</text:p>
          </table:table-cell>
          <table:table-cell table:style-name="ce12N2" office:value-type="float" office:value="49.28">
            <text:p>49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3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2.8">
            <text:p>1292,80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64">
            <text:p>11,6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31.52">
            <text:p>1531,52</text:p>
          </table:table-cell>
          <table:table-cell table:style-name="ce12N2" office:value-type="float" office:value="107.21">
            <text:p>10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0061821175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67">
            <text:p>30996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0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8.64">
            <text:p>76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8.64">
            <text:p>76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2752">
            <text:p>0,113</text:p>
          </table:table-cell>
          <table:table-cell table:style-name="ce12N2" office:value-type="float" office:value="12.36">
            <text:p>1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8.8">
            <text:p>648,80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84">
            <text:p>5,8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8.64">
            <text:p>768,64</text:p>
          </table:table-cell>
          <table:table-cell table:style-name="ce12N2" office:value-type="float" office:value="53.8">
            <text:p>5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0141200246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68">
            <text:p>30996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0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4.2">
            <text:p>219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94.2">
            <text:p>219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7734">
            <text:p>0,377</text:p>
          </table:table-cell>
          <table:table-cell table:style-name="ce12N2" office:value-type="float" office:value="57.07">
            <text:p>57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52.2">
            <text:p>1852,20</text:p>
          </table:table-cell>
          <table:table-cell table:style-name="ce12N2" office:value-type="float" office:value="1.85">
            <text:p>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67">
            <text:p>16,6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94.2">
            <text:p>2194,20</text:p>
          </table:table-cell>
          <table:table-cell table:style-name="ce12N2" office:value-type="float" office:value="153.59">
            <text:p>15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0231038478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69">
            <text:p>3099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08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1.46">
            <text:p>214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10.76">
            <text:p>201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144">
            <text:p>0,006</text:p>
          </table:table-cell>
          <table:table-cell table:style-name="ce12N2" office:value-type="float" office:value="2.42">
            <text:p>2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4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7.04">
            <text:p>1697,04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7">
            <text:p>15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30.7">
            <text:p>130,70</text:p>
          </table:table-cell>
          <table:table-cell table:style-name="ce12N2" office:value-type="float" office:value="2010.76">
            <text:p>2010,76</text:p>
          </table:table-cell>
          <table:table-cell table:style-name="ce12N2" office:value-type="float" office:value="140.75">
            <text:p>14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088157409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71">
            <text:p>30997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1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721.18">
            <text:p>10172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101721.18">
            <text:p>101721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416722">
            <text:p>18,417</text:p>
          </table:table-cell>
          <table:table-cell table:style-name="ce12N2" office:value-type="float" office:value="2022.46">
            <text:p>202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1.721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825">
            <text:p>85825,00</text:p>
          </table:table-cell>
          <table:table-cell table:style-name="ce12N2" office:value-type="float" office:value="85.83">
            <text:p>85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2.42">
            <text:p>772,4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721.18">
            <text:p>101721,18</text:p>
          </table:table-cell>
          <table:table-cell table:style-name="ce12N2" office:value-type="float" office:value="7120.47">
            <text:p>712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10319975274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72">
            <text:p>30997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1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121.12">
            <text:p>11612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16121.12">
            <text:p>11612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930692">
            <text:p>19,931</text:p>
          </table:table-cell>
          <table:table-cell table:style-name="ce12N2" office:value-type="float" office:value="3142.06">
            <text:p>3142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6.12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025.76">
            <text:p>98025,76</text:p>
          </table:table-cell>
          <table:table-cell table:style-name="ce12N2" office:value-type="float" office:value="98.01">
            <text:p>98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2.23">
            <text:p>882,2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121.12">
            <text:p>116121,12</text:p>
          </table:table-cell>
          <table:table-cell table:style-name="ce12N2" office:value-type="float" office:value="8114.77">
            <text:p>811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11214282051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73">
            <text:p>30997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266.5">
            <text:p>7126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266.5">
            <text:p>7126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005">
            <text:p>49,005</text:p>
          </table:table-cell>
          <table:table-cell table:style-name="ce12N2" office:value-type="float" office:value="5074.65">
            <text:p>507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.26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149.25">
            <text:p>60149,25</text:p>
          </table:table-cell>
          <table:table-cell table:style-name="ce12N2" office:value-type="float" office:value="60.15">
            <text:p>6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1.34">
            <text:p>541,3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266.5">
            <text:p>71266,50</text:p>
          </table:table-cell>
          <table:table-cell table:style-name="ce12N2" office:value-type="float" office:value="4988.66">
            <text:p>498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11714342775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77">
            <text:p>30997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8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1626">
            <text:p>5916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90982.32">
            <text:p>59098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281652">
            <text:p>8,282</text:p>
          </table:table-cell>
          <table:table-cell table:style-name="ce12N2" office:value-type="float" office:value="2503.84">
            <text:p>250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1.6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4863.79">
            <text:p>514863,79</text:p>
          </table:table-cell>
          <table:table-cell table:style-name="ce12N2" office:value-type="float" office:value="514.86">
            <text:p>51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33.77">
            <text:p>4633,7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643.68">
            <text:p>643,68</text:p>
          </table:table-cell>
          <table:table-cell table:style-name="ce12N2" office:value-type="float" office:value="590982.32">
            <text:p>590982,32</text:p>
          </table:table-cell>
          <table:table-cell table:style-name="ce12N2" office:value-type="float" office:value="23639.3">
            <text:p>2363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8111704710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78">
            <text:p>30997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9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61.52">
            <text:p>676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61.52">
            <text:p>676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48">
            <text:p>0,005</text:p>
          </table:table-cell>
          <table:table-cell table:style-name="ce12N2" office:value-type="float" office:value="14.56">
            <text:p>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6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90.64">
            <text:p>5890,64</text:p>
          </table:table-cell>
          <table:table-cell table:style-name="ce12N2" office:value-type="float" office:value="5.89">
            <text:p>5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02">
            <text:p>53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61.52">
            <text:p>6761,52</text:p>
          </table:table-cell>
          <table:table-cell table:style-name="ce12N2" office:value-type="float" office:value="270.46">
            <text:p>27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97113902646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0">
            <text:p>30998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9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61.52">
            <text:p>676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61.52">
            <text:p>676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48">
            <text:p>0,005</text:p>
          </table:table-cell>
          <table:table-cell table:style-name="ce12N2" office:value-type="float" office:value="14.56">
            <text:p>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6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90.64">
            <text:p>5890,64</text:p>
          </table:table-cell>
          <table:table-cell table:style-name="ce12N2" office:value-type="float" office:value="5.89">
            <text:p>5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02">
            <text:p>53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61.52">
            <text:p>6761,52</text:p>
          </table:table-cell>
          <table:table-cell table:style-name="ce12N2" office:value-type="float" office:value="270.46">
            <text:p>27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97011880119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1">
            <text:p>3099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2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4.38">
            <text:p>1664,38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8">
            <text:p>14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138.05">
            <text:p>13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11118983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2">
            <text:p>3099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">
            <text:p>0,033</text:p>
          </table:table-cell>
          <table:table-cell table:style-name="ce12N2" office:value-type="float" office:value="18.15">
            <text:p>18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1.03">
            <text:p>6691,03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2">
            <text:p>60,2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3991705019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3">
            <text:p>3099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">
            <text:p>0,008</text:p>
          </table:table-cell>
          <table:table-cell table:style-name="ce12N2" office:value-type="float" office:value="160">
            <text:p>1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0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37.33">
            <text:p>20937,33</text:p>
          </table:table-cell>
          <table:table-cell table:style-name="ce12N2" office:value-type="float" office:value="20.94">
            <text:p>2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.44">
            <text:p>188,4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1736.56">
            <text:p>17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41835592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4">
            <text:p>3099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464">
            <text:p>0,107</text:p>
          </table:table-cell>
          <table:table-cell table:style-name="ce12N2" office:value-type="float" office:value="32.36">
            <text:p>3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02.72">
            <text:p>8602,7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43">
            <text:p>77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394.98">
            <text:p>39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31033592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5">
            <text:p>3099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048">
            <text:p>0,150</text:p>
          </table:table-cell>
          <table:table-cell table:style-name="ce12N2" office:value-type="float" office:value="122.31">
            <text:p>122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7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07.25">
            <text:p>38807,25</text:p>
          </table:table-cell>
          <table:table-cell table:style-name="ce12N2" office:value-type="float" office:value="38.81">
            <text:p>3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27">
            <text:p>349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1959.79">
            <text:p>19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21380843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6">
            <text:p>3099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712">
            <text:p>0,021</text:p>
          </table:table-cell>
          <table:table-cell table:style-name="ce12N2" office:value-type="float" office:value="25.16">
            <text:p>2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4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16.72">
            <text:p>11916,72</text:p>
          </table:table-cell>
          <table:table-cell table:style-name="ce12N2" office:value-type="float" office:value="11.9">
            <text:p>1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26">
            <text:p>107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608.76">
            <text:p>60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01789689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7">
            <text:p>3099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32">
            <text:p>0,144</text:p>
          </table:table-cell>
          <table:table-cell table:style-name="ce12N2" office:value-type="float" office:value="45.26">
            <text:p>4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7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89.46">
            <text:p>14089,46</text:p>
          </table:table-cell>
          <table:table-cell table:style-name="ce12N2" office:value-type="float" office:value="14.09">
            <text:p>1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81">
            <text:p>126,8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646.9">
            <text:p>64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11898328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8">
            <text:p>3099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5.6">
            <text:p>219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.94">
            <text:p>1739,94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34">
            <text:p>134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144.31">
            <text:p>14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0149330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9">
            <text:p>3099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8">
            <text:p>0,008</text:p>
          </table:table-cell>
          <table:table-cell table:style-name="ce12N2" office:value-type="float" office:value="15.82">
            <text:p>1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7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27.13">
            <text:p>8727,13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55">
            <text:p>78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400.68">
            <text:p>40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21724402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2">
            <text:p>30999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3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36.89">
            <text:p>6153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1536.89">
            <text:p>61536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913445">
            <text:p>5,913</text:p>
          </table:table-cell>
          <table:table-cell table:style-name="ce12N2" office:value-type="float" office:value="2851.79">
            <text:p>2851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536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572.19">
            <text:p>52572,19</text:p>
          </table:table-cell>
          <table:table-cell table:style-name="ce12N2" office:value-type="float" office:value="52.57">
            <text:p>5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3.14">
            <text:p>473,1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536.89">
            <text:p>61536,89</text:p>
          </table:table-cell>
          <table:table-cell table:style-name="ce12N2" office:value-type="float" office:value="3606.11">
            <text:p>360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335417152982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3">
            <text:p>30999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3.3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6.52">
            <text:p>449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96.52">
            <text:p>4496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03">
            <text:p>0,300</text:p>
          </table:table-cell>
          <table:table-cell table:style-name="ce12N2" office:value-type="float" office:value="471.65">
            <text:p>47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6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4.95">
            <text:p>3794,95</text:p>
          </table:table-cell>
          <table:table-cell table:style-name="ce12N2" office:value-type="float" office:value="3.8">
            <text:p>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15">
            <text:p>34,1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6.52">
            <text:p>4496,52</text:p>
          </table:table-cell>
          <table:table-cell table:style-name="ce12N2" office:value-type="float" office:value="314.76">
            <text:p>31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335512843793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4">
            <text:p>30999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3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8">
            <text:p>12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8">
            <text:p>12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64">
            <text:p>0,166</text:p>
          </table:table-cell>
          <table:table-cell table:style-name="ce12N2" office:value-type="float" office:value="86.4">
            <text:p>8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3.28">
            <text:p>1053,28</text:p>
          </table:table-cell>
          <table:table-cell table:style-name="ce12N2" office:value-type="float" office:value="1.05">
            <text:p>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8">
            <text:p>1248,00</text:p>
          </table:table-cell>
          <table:table-cell table:style-name="ce12N2" office:value-type="float" office:value="87.36">
            <text:p>8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33561013742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5">
            <text:p>30999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3.3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27.96">
            <text:p>372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27.96">
            <text:p>3727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466">
            <text:p>0,175</text:p>
          </table:table-cell>
          <table:table-cell table:style-name="ce12N2" office:value-type="float" office:value="75.42">
            <text:p>75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27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46.3">
            <text:p>3146,30</text:p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32">
            <text:p>28,3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27.96">
            <text:p>3727,96</text:p>
          </table:table-cell>
          <table:table-cell table:style-name="ce12N2" office:value-type="float" office:value="260.96">
            <text:p>26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33571892139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6">
            <text:p>30999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3.3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3.98">
            <text:p>186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63.98">
            <text:p>186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33">
            <text:p>0,087</text:p>
          </table:table-cell>
          <table:table-cell table:style-name="ce12N2" office:value-type="float" office:value="37.71">
            <text:p>37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63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3.15">
            <text:p>1573,15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16">
            <text:p>14,1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63.98">
            <text:p>1863,98</text:p>
          </table:table-cell>
          <table:table-cell table:style-name="ce12N2" office:value-type="float" office:value="130.48">
            <text:p>13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335818966141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7">
            <text:p>3099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57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61.86">
            <text:p>1176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44">
            <text:p>110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9">
            <text:p>0,075</text:p>
          </table:table-cell>
          <table:table-cell table:style-name="ce12N2" office:value-type="float" office:value="36.8">
            <text:p>3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761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21">
            <text:p>9321,00</text:p>
          </table:table-cell>
          <table:table-cell table:style-name="ce12N2" office:value-type="float" office:value="9.32">
            <text:p>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.89">
            <text:p>83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717.86">
            <text:p>717,86</text:p>
          </table:table-cell>
          <table:table-cell table:style-name="ce12N2" office:value-type="float" office:value="11044">
            <text:p>11044,00</text:p>
          </table:table-cell>
          <table:table-cell table:style-name="ce12N2" office:value-type="float" office:value="773.08">
            <text:p>77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5701653793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1">
            <text:p>31000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8.1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6.09">
            <text:p>135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3.4">
            <text:p>131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88">
            <text:p>0,012</text:p>
          </table:table-cell>
          <table:table-cell table:style-name="ce12N2" office:value-type="float" office:value="9.84">
            <text:p>9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8.48">
            <text:p>1108,48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42.69">
            <text:p>42,69</text:p>
          </table:table-cell>
          <table:table-cell table:style-name="ce12N2" office:value-type="float" office:value="1313.4">
            <text:p>1313,40</text:p>
          </table:table-cell>
          <table:table-cell table:style-name="ce12N2" office:value-type="float" office:value="91.94">
            <text:p>9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810219665825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2">
            <text:p>31000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8.0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3.54">
            <text:p>615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907.6">
            <text:p>590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74">
            <text:p>0,074</text:p>
          </table:table-cell>
          <table:table-cell table:style-name="ce12N2" office:value-type="float" office:value="8.48">
            <text:p>8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85.87">
            <text:p>4985,87</text:p>
          </table:table-cell>
          <table:table-cell table:style-name="ce12N2" office:value-type="float" office:value="4.99">
            <text:p>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87">
            <text:p>44,87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245.94">
            <text:p>245,94</text:p>
          </table:table-cell>
          <table:table-cell table:style-name="ce12N2" office:value-type="float" office:value="5907.6">
            <text:p>5907,60</text:p>
          </table:table-cell>
          <table:table-cell table:style-name="ce12N2" office:value-type="float" office:value="413.53">
            <text:p>41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80961850008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3">
            <text:p>3100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9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80.22">
            <text:p>2078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530.84">
            <text:p>2053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476">
            <text:p>0,121</text:p>
          </table:table-cell>
          <table:table-cell table:style-name="ce12N2" office:value-type="float" office:value="11.91">
            <text:p>11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780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249.38">
            <text:p>249,38</text:p>
          </table:table-cell>
          <table:table-cell table:style-name="ce12N2" office:value-type="float" office:value="20530.84">
            <text:p>20530,84</text:p>
          </table:table-cell>
          <table:table-cell table:style-name="ce12N2" office:value-type="float" office:value="1437.16">
            <text:p>143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93018367480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9">
            <text:p>31000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4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8.94">
            <text:p>242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28.94">
            <text:p>2428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28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49.96">
            <text:p>2049,96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45">
            <text:p>18,4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28.94">
            <text:p>2428,94</text:p>
          </table:table-cell>
          <table:table-cell table:style-name="ce12N2" office:value-type="float" office:value="170.03">
            <text:p>17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4216220912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20">
            <text:p>310020</text:p>
          </table:table-cell>
          <table:table-cell table:style-name="ce0" table:number-columns-spanned="4" table:number-rows-spanned="1" office:value-type="string" calcext:value-type="string">
            <text:p>29.857 - J.H. DE OLIVEIRA FABRICACAO DE MANGUEIRAS LTDA</text:p>
          </table:table-cell>
          <table:covered-table-cell table:number-columns-repeated="3"/>
          <table:table-cell table:style-name="ce0" office:value-type="string" calcext:value-type="string">
            <text:p>7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49.5">
            <text:p>634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349.5">
            <text:p>634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74048">
            <text:p>12,740</text:p>
          </table:table-cell>
          <table:table-cell table:style-name="ce12N2" office:value-type="float" office:value="408">
            <text:p>4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4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49.5">
            <text:p>6349,50</text:p>
          </table:table-cell>
          <table:table-cell table:style-name="ce12N2" office:value-type="float" office:value="241.28">
            <text:p>24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02048252000116550010000007171850581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69">
            <text:p>169,00</text:p>
          </table:table-cell>
          <table:table-cell table:style-name="ce26N2" office:value-type="float" office:value="392.57">
            <text:p>392,57</text:p>
          </table:table-cell>
          <table:table-cell table:style-name="ce26N2" office:value-type="float" office:value="979.4">
            <text:p>979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1160.24">
            <text:p>51160,24</text:p>
          </table:table-cell>
          <table:table-cell table:style-name="ce26N2" office:value-type="float" office:value="4735906.77">
            <text:p>4735906,77</text:p>
          </table:table-cell>
          <table:table-cell table:style-name="ce26N2" office:value-type="float" office:value="287731.04">
            <text:p>287731,0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3424.62">
            <text:p>33424,62</text:p>
          </table:table-cell>
          <table:table-cell table:style-name="ce26N2" office:value-type="float" office:value="4877244">
            <text:p>487724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501.85">
            <text:p>1501,85</text:p>
          </table:table-cell>
          <table:table-cell table:style-name="ce26N2" office:value-type="float" office:value="50.06">
            <text:p>50,06</text:p>
          </table:table-cell>
          <table:table-cell table:style-name="ce26N2" office:value-type="float" office:value="348.51">
            <text:p>348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968.735868">
            <text:p>1968,736</text:p>
          </table:table-cell>
          <table:table-cell table:style-name="ce26N2" office:value-type="float" office:value="4825446.87">
            <text:p>4825446,87</text:p>
          </table:table-cell>
          <table:table-cell table:style-name="ce26N2" office:value-type="float" office:value="4877244">
            <text:p>487724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46041.41">
            <text:p>4046041,41</text:p>
          </table:table-cell>
          <table:table-cell table:style-name="ce26N2" office:value-type="float" office:value="4046.02">
            <text:p>4046,0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6414.37">
            <text:p>36414,3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77417.83">
            <text:p>377417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9.65">
            <text:p>59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316" meta:object-count="0"/>
    <meta:generator>LibreOffice/4.3.0.4$Windows_x86 LibreOffice_project/62ad5818884a2fc2e5780dd45466868d41009ec0</meta:generator>
  </office:meta>
</office:document-meta>
</file>