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9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4">
            <text:p>30873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6.5">
            <text:p>433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2">
            <text:p>0,000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4.69">
            <text:p>3544,69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36.5">
            <text:p>136,5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631262305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7">
            <text:p>30878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7.86">
            <text:p>568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896">
            <text:p>0,889</text:p>
          </table:table-cell>
          <table:table-cell table:style-name="ce12N2" office:value-type="float" office:value="245.6">
            <text:p>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8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34.6">
            <text:p>4734,60</text:p>
          </table:table-cell>
          <table:table-cell table:style-name="ce12N2" office:value-type="float" office:value="4.73">
            <text:p>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61">
            <text:p>42,61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330.11">
            <text:p>33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2651607305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4">
            <text:p>30879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1.0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33772">
            <text:p>15,338</text:p>
          </table:table-cell>
          <table:table-cell table:style-name="ce12N2" office:value-type="float" office:value="4014.56">
            <text:p>40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28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002.86">
            <text:p>153002,86</text:p>
          </table:table-cell>
          <table:table-cell table:style-name="ce12N2" office:value-type="float" office:value="153.05">
            <text:p>15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.02">
            <text:p>137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12690.21">
            <text:p>1269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101419589447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0">
            <text:p>308860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5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51.5">
            <text:p>1635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8128">
            <text:p>0,638</text:p>
          </table:table-cell>
          <table:table-cell table:style-name="ce12N2" office:value-type="float" office:value="697.13">
            <text:p>697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5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65.86">
            <text:p>13365,86</text:p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29">
            <text:p>120,29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514.7">
            <text:p>514,7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1108.58">
            <text:p>11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5431802276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2">
            <text:p>30887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9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65">
            <text:p>482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9">
            <text:p>0,210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59">
            <text:p>4115,59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4">
            <text:p>37,04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9.65">
            <text:p>229,65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321.51">
            <text:p>3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39181192001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5">
            <text:p>308885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5">
            <text:p>0,172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43">
            <text:p>998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82.81">
            <text:p>8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725157429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0">
            <text:p>308960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.68">
            <text:p>703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56">
            <text:p>0,032</text:p>
          </table:table-cell>
          <table:table-cell table:style-name="ce12N2" office:value-type="float" office:value="264.08">
            <text:p>26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3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95.82">
            <text:p>6295,82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66">
            <text:p>56,66</text:p>
          </table:table-cell>
          <table:table-cell table:style-name="ce12N2" office:value-type="float" office:value="44.97">
            <text:p>44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.52">
            <text:p>12,52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491.84">
            <text:p>4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204129000106550010001419651121064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1">
            <text:p>309031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3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75">
            <text:p>18,75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0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82.62">
            <text:p>14182,62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.64">
            <text:p>127,64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1176.32">
            <text:p>11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35861045058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3">
            <text:p>309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49748">
            <text:p>1,750</text:p>
          </table:table-cell>
          <table:table-cell table:style-name="ce12N2" office:value-type="float" office:value="508.99">
            <text:p>50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7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27.46">
            <text:p>7827,46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649.22">
            <text:p>64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11042095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4">
            <text:p>309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49">
            <text:p>0,013</text:p>
          </table:table-cell>
          <table:table-cell table:style-name="ce12N2" office:value-type="float" office:value="352.5">
            <text:p>35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0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228.63">
            <text:p>26228,63</text:p>
          </table:table-cell>
          <table:table-cell table:style-name="ce12N2" office:value-type="float" office:value="26.23">
            <text:p>2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.06">
            <text:p>236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1204.25">
            <text:p>120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2109334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5">
            <text:p>309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152">
            <text:p>1,522</text:p>
          </table:table-cell>
          <table:table-cell table:style-name="ce12N2" office:value-type="float" office:value="442.6">
            <text:p>44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06.49">
            <text:p>6806,49</text:p>
          </table:table-cell>
          <table:table-cell table:style-name="ce12N2" office:value-type="float" office:value="6.81">
            <text:p>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26">
            <text:p>61,2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564.54">
            <text:p>56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31450726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2">
            <text:p>3090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.38">
            <text:p>75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.43">
            <text:p>595,43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45.86">
            <text:p>45,86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21010391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4">
            <text:p>3090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2">
            <text:p>0,000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62">
            <text:p>3320,62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9">
            <text:p>29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275.42">
            <text:p>27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8114669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5">
            <text:p>3090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69">
            <text:p>3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.73">
            <text:p>297,7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.93">
            <text:p>22,93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24.69">
            <text:p>2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11784758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7">
            <text:p>3090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52">
            <text:p>0,008</text:p>
          </table:table-cell>
          <table:table-cell table:style-name="ce12N2" office:value-type="float" office:value="10.75">
            <text:p>1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4.78">
            <text:p>1644,78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">
            <text:p>14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2.98">
            <text:p>1402,98</text:p>
          </table:table-cell>
          <table:table-cell table:style-name="ce12N2" office:value-type="float" office:value="98.21">
            <text:p>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01762169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8">
            <text:p>3090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12">
            <text:p>0,06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3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6.17">
            <text:p>9396,17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779.33">
            <text:p>7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91810445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9">
            <text:p>3090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6.24">
            <text:p>64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26">
            <text:p>0,087</text:p>
          </table:table-cell>
          <table:table-cell table:style-name="ce12N2" office:value-type="float" office:value="18.4">
            <text:p>1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48.67">
            <text:p>5248,6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4">
            <text:p>4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1.6">
            <text:p>391,6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240.98">
            <text:p>2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3137611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0">
            <text:p>309050</text:p>
          </table:table-cell>
          <table:table-cell table:style-name="ce0" table:number-columns-spanned="4" table:number-rows-spanned="1" office:value-type="string" calcext:value-type="string">
            <text:p>9.315 - BRASIPLA INDUSTRIA E COMERCIO LTDA</text:p>
          </table:table-cell>
          <table:covered-table-cell table:number-columns-repeated="3"/>
          <table:table-cell table:style-name="ce0" office:value-type="string" calcext:value-type="string">
            <text:p>27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2.23">
            <text:p>2222,23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184.31">
            <text:p>18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22595300011055001000027678149200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6">
            <text:p>309066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9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1.58">
            <text:p>5941,58</text:p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492.8">
            <text:p>4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9080132146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7">
            <text:p>3090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1.5">
            <text:p>4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244113715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3">
            <text:p>309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6556">
            <text:p>0,417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26.6">
            <text:p>8326,60</text:p>
          </table:table-cell>
          <table:table-cell table:style-name="ce12N2" office:value-type="float" office:value="8.33">
            <text:p>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3341666424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7">
            <text:p>309087</text:p>
          </table:table-cell>
          <table:table-cell table:style-name="ce0" table:number-columns-spanned="4" table:number-rows-spanned="1" office:value-type="string" calcext:value-type="string">
            <text:p>38.144 - INDUSTRIA DE PLASTICOS E ACOS FARROUPILHA LTDA</text:p>
          </table:table-cell>
          <table:covered-table-cell table:number-columns-repeated="3"/>
          <table:table-cell table:style-name="ce0" office:value-type="string" calcext:value-type="string">
            <text:p>36.7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24.83">
            <text:p>1752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93">
            <text:p>0,063</text:p>
          </table:table-cell>
          <table:table-cell table:style-name="ce12N2" office:value-type="float" office:value="576.02">
            <text:p>57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52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80.51">
            <text:p>14880,51</text:p>
          </table:table-cell>
          <table:table-cell table:style-name="ce12N2" office:value-type="float" office:value="14.9">
            <text:p>1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94">
            <text:p>133,9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47.88">
            <text:p>947,88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1056.79">
            <text:p>105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88978400011355001000036732100090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3">
            <text:p>309093</text:p>
          </table:table-cell>
          <table:table-cell table:style-name="ce0" table:number-columns-spanned="4" table:number-rows-spanned="1" office:value-type="string" calcext:value-type="string">
            <text:p>13.198 - SDSTK INDUSTRIA E COMERCIO LTDA</text:p>
          </table:table-cell>
          <table:covered-table-cell table:number-columns-repeated="3"/>
          <table:table-cell table:style-name="ce0" office:value-type="string" calcext:value-type="string">
            <text:p>1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52.8">
            <text:p>5252,80</text:p>
          </table:table-cell>
          <table:table-cell table:style-name="ce12N2" office:value-type="float" office:value="168.58">
            <text:p>168,58</text:p>
          </table:table-cell>
          <table:table-cell table:style-name="ce12N3" office:value-type="float" office:value="0.14673">
            <text:p>0,147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14.56">
            <text:p>5014,56</text:p>
          </table:table-cell>
          <table:table-cell table:style-name="ce12N2" office:value-type="float" office:value="5.01">
            <text:p>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4">
            <text:p>45,1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216.85">
            <text:p>2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8678638000103550010000131481923666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3">
            <text:p>309113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2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.32">
            <text:p>24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04">
            <text:p>0,350</text:p>
          </table:table-cell>
          <table:table-cell table:style-name="ce12N2" office:value-type="float" office:value="269">
            <text:p>2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76.86">
            <text:p>2076,86</text:p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69">
            <text:p>18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172.25">
            <text:p>1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287181769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1">
            <text:p>30913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8.9502">
            <text:p>208,950</text:p>
          </table:table-cell>
          <table:table-cell table:style-name="ce12N2" office:value-type="float" office:value="2286.3">
            <text:p>228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.17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7.87">
            <text:p>109867,87</text:p>
          </table:table-cell>
          <table:table-cell table:style-name="ce12N2" office:value-type="float" office:value="109.87">
            <text:p>10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81">
            <text:p>988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9112.53">
            <text:p>91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699169305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2">
            <text:p>309132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4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3.9">
            <text:p>28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6">
            <text:p>0,002</text:p>
          </table:table-cell>
          <table:table-cell table:style-name="ce12N2" office:value-type="float" office:value="20.34">
            <text:p>2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24.62">
            <text:p>2324,62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92">
            <text:p>20,92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89.52">
            <text:p>89,52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192.81">
            <text:p>1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4331150795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4">
            <text:p>30913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1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.77">
            <text:p>103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96">
            <text:p>0,068</text:p>
          </table:table-cell>
          <table:table-cell table:style-name="ce12N2" office:value-type="float" office:value="8.98">
            <text:p>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.01">
            <text:p>845,0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2.54">
            <text:p>32,54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70.08">
            <text:p>7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1316157038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5">
            <text:p>3091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503.43">
            <text:p>12950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77488">
            <text:p>11,677</text:p>
          </table:table-cell>
          <table:table-cell table:style-name="ce12N2" office:value-type="float" office:value="3587.9">
            <text:p>358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9.50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2.14">
            <text:p>109862,14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76">
            <text:p>988,7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8419.91">
            <text:p>84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21810491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6">
            <text:p>3091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108">
            <text:p>1,051</text:p>
          </table:table-cell>
          <table:table-cell table:style-name="ce12N2" office:value-type="float" office:value="228">
            <text:p>2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47.85">
            <text:p>21047,85</text:p>
          </table:table-cell>
          <table:table-cell table:style-name="ce12N2" office:value-type="float" office:value="21.05">
            <text:p>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43">
            <text:p>18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966.38">
            <text:p>9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31882076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7">
            <text:p>30913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8.81">
            <text:p>49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04">
            <text:p>0,003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.73">
            <text:p>407,73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33.82">
            <text:p>3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9194172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9">
            <text:p>30913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.53">
            <text:p>7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48">
            <text:p>0,018</text:p>
          </table:table-cell>
          <table:table-cell table:style-name="ce12N2" office:value-type="float" office:value="6.91">
            <text:p>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.64">
            <text:p>571,64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5.22">
            <text:p>35,22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8190130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0">
            <text:p>3091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">
            <text:p>0,126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61.99">
            <text:p>37961,99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66">
            <text:p>341,6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3148.6">
            <text:p>314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11345831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7">
            <text:p>3091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">
            <text:p>0,087</text:p>
          </table:table-cell>
          <table:table-cell table:style-name="ce12N2" office:value-type="float" office:value="94.5">
            <text:p>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4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14.09">
            <text:p>13014,09</text:p>
          </table:table-cell>
          <table:table-cell table:style-name="ce12N2" office:value-type="float" office:value="13.01">
            <text:p>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.13">
            <text:p>117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1079.4">
            <text:p>107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31922228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8">
            <text:p>3091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">
            <text:p>0,001</text:p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7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03.1">
            <text:p>16603,10</text:p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43">
            <text:p>14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1377.08">
            <text:p>137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41896471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9">
            <text:p>3091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51442441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3">
            <text:p>30919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0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40.19">
            <text:p>45540,19</text:p>
          </table:table-cell>
          <table:table-cell table:style-name="ce12N2" office:value-type="float" office:value="2966.67">
            <text:p>2966,67</text:p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3427.11">
            <text:p>43427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90594">
            <text:p>4,091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40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146.66">
            <text:p>35146,66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.32">
            <text:p>316,32</text:p>
          </table:table-cell>
          <table:table-cell table:style-name="ce12N2" office:value-type="float" office:value="78.51">
            <text:p>78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720.2">
            <text:p>3720,20</text:p>
          </table:table-cell>
          <table:table-cell table:style-name="ce12N2" office:value-type="float" office:value="40460.44">
            <text:p>40460,44</text:p>
          </table:table-cell>
          <table:table-cell table:style-name="ce12N2" office:value-type="float" office:value="1731.37">
            <text:p>173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516.52">
            <text:p>7516,52</text:p>
          </table:table-cell>
          <table:table-cell table:style-name="ce12N2" office:value-type="float" office:value="1359.55">
            <text:p>1359,55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0281235243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5">
            <text:p>309195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378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9.04">
            <text:p>149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94">
            <text:p>142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898">
            <text:p>0,024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9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1.7">
            <text:p>1351,70</text:p>
          </table:table-cell>
          <table:table-cell table:style-name="ce12N2" office:value-type="float" office:value="1.35">
            <text:p>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4.1">
            <text:p>74,10</text:p>
          </table:table-cell>
          <table:table-cell table:style-name="ce12N2" office:value-type="float" office:value="1046.33">
            <text:p>1046,33</text:p>
          </table:table-cell>
          <table:table-cell table:style-name="ce12N2" office:value-type="float" office:value="73.24">
            <text:p>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3781283009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6">
            <text:p>309196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41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3.22">
            <text:p>2109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50.59">
            <text:p>20050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0205">
            <text:p>0,180</text:p>
          </table:table-cell>
          <table:table-cell table:style-name="ce12N2" office:value-type="float" office:value="131.97">
            <text:p>131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9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68.08">
            <text:p>17468,08</text:p>
          </table:table-cell>
          <table:table-cell table:style-name="ce12N2" office:value-type="float" office:value="17.47">
            <text:p>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.21">
            <text:p>157,2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42.63">
            <text:p>1042,63</text:p>
          </table:table-cell>
          <table:table-cell table:style-name="ce12N2" office:value-type="float" office:value="20050.59">
            <text:p>20050,59</text:p>
          </table:table-cell>
          <table:table-cell table:style-name="ce12N2" office:value-type="float" office:value="802.02">
            <text:p>80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4141653364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7">
            <text:p>309197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49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.99">
            <text:p>38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2.16">
            <text:p>36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26">
            <text:p>0,000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.51">
            <text:p>315,51</text:p>
          </table:table-cell>
          <table:table-cell table:style-name="ce12N2" office:value-type="float" office:value="0.32">
            <text:p>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8.83">
            <text:p>18,83</text:p>
          </table:table-cell>
          <table:table-cell table:style-name="ce12N2" office:value-type="float" office:value="362.16">
            <text:p>362,16</text:p>
          </table:table-cell>
          <table:table-cell table:style-name="ce12N2" office:value-type="float" office:value="14.49">
            <text:p>1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49516895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9">
            <text:p>30919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2.4">
            <text:p>7592,40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3">
            <text:p>68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629.72">
            <text:p>62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01965533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0">
            <text:p>30920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3.4">
            <text:p>327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6">
            <text:p>0,054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8.42">
            <text:p>2598,4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8">
            <text:p>23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119.31">
            <text:p>1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0188334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1">
            <text:p>30920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134">
            <text:p>14,613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8.67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601.94">
            <text:p>108601,94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42">
            <text:p>977,4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9007.54">
            <text:p>900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7991450881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5">
            <text:p>3092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265.37">
            <text:p>66326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">
            <text:p>92,00</text:p>
          </table:table-cell>
          <table:table-cell table:style-name="ce12N2" office:value-type="float" office:value="657872.35">
            <text:p>65787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833163">
            <text:p>15,833</text:p>
          </table:table-cell>
          <table:table-cell table:style-name="ce12N2" office:value-type="float" office:value="3254.08">
            <text:p>325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3.26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9772.64">
            <text:p>559772,64</text:p>
          </table:table-cell>
          <table:table-cell table:style-name="ce12N2" office:value-type="float" office:value="559.79">
            <text:p>5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7.93">
            <text:p>5037,9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93.02">
            <text:p>5393,02</text:p>
          </table:table-cell>
          <table:table-cell table:style-name="ce12N2" office:value-type="float" office:value="647536.65">
            <text:p>647536,65</text:p>
          </table:table-cell>
          <table:table-cell table:style-name="ce12N2" office:value-type="float" office:value="41043">
            <text:p>410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61740177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6">
            <text:p>30920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7.29">
            <text:p>2667,29</text:p>
          </table:table-cell>
          <table:table-cell table:style-name="ce12N2" office:value-type="float" office:value="127.91">
            <text:p>127,9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58.24">
            <text:p>255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504">
            <text:p>0,915</text:p>
          </table:table-cell>
          <table:table-cell table:style-name="ce12N2" office:value-type="float" office:value="7.84">
            <text:p>7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7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7.3">
            <text:p>2117,30</text:p>
          </table:table-cell>
          <table:table-cell table:style-name="ce12N2" office:value-type="float" office:value="2.12">
            <text:p>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6">
            <text:p>19,06</text:p>
          </table:table-cell>
          <table:table-cell table:style-name="ce12N2" office:value-type="float" office:value="67.51">
            <text:p>67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36.96">
            <text:p>236,96</text:p>
          </table:table-cell>
          <table:table-cell table:style-name="ce12N2" office:value-type="float" office:value="2430.33">
            <text:p>2430,33</text:p>
          </table:table-cell>
          <table:table-cell table:style-name="ce12N2" office:value-type="float" office:value="97.21">
            <text:p>9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4131331400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1">
            <text:p>30921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">
            <text:p>0,000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1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19.99">
            <text:p>35519,99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2673.55">
            <text:p>267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913116267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3">
            <text:p>30921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7.9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4856">
            <text:p>5,849</text:p>
          </table:table-cell>
          <table:table-cell table:style-name="ce12N2" office:value-type="float" office:value="288">
            <text:p>28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3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754.24">
            <text:p>24754,24</text:p>
          </table:table-cell>
          <table:table-cell table:style-name="ce12N2" office:value-type="float" office:value="24.75">
            <text:p>2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.79">
            <text:p>222,7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2053.14">
            <text:p>205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554846000136550010006879671996625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6">
            <text:p>309216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21.01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78">
            <text:p>164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59.68">
            <text:p>155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">
            <text:p>0,006</text:p>
          </table:table-cell>
          <table:table-cell table:style-name="ce12N2" office:value-type="float" office:value="10.26">
            <text:p>1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8.79">
            <text:p>1358,79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3">
            <text:p>12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81.1">
            <text:p>81,10</text:p>
          </table:table-cell>
          <table:table-cell table:style-name="ce12N2" office:value-type="float" office:value="1559.68">
            <text:p>1559,68</text:p>
          </table:table-cell>
          <table:table-cell table:style-name="ce12N2" office:value-type="float" office:value="62.39">
            <text:p>6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210191431119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7">
            <text:p>309217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5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15.77">
            <text:p>4021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4490.37">
            <text:p>3449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1.467992">
            <text:p>121,468</text:p>
          </table:table-cell>
          <table:table-cell table:style-name="ce12N2" office:value-type="float" office:value="1176.85">
            <text:p>1176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1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544.02">
            <text:p>27544,02</text:p>
          </table:table-cell>
          <table:table-cell table:style-name="ce12N2" office:value-type="float" office:value="27.54">
            <text:p>2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89">
            <text:p>247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490.37">
            <text:p>34490,37</text:p>
          </table:table-cell>
          <table:table-cell table:style-name="ce12N2" office:value-type="float" office:value="4138.84">
            <text:p>413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321.23">
            <text:p>49321,23</text:p>
          </table:table-cell>
          <table:table-cell table:style-name="ce12N2" office:value-type="float" office:value="5725.4">
            <text:p>5725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0921911001004550010002559491707926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8">
            <text:p>30921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3.96">
            <text:p>2193,96</text:p>
          </table:table-cell>
          <table:table-cell table:style-name="ce12N2" office:value-type="float" office:value="108.46">
            <text:p>108,46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69.2">
            <text:p>216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08">
            <text:p>0,109</text:p>
          </table:table-cell>
          <table:table-cell table:style-name="ce12N2" office:value-type="float" office:value="39.2">
            <text:p>3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5.31">
            <text:p>1795,31</text:p>
          </table:table-cell>
          <table:table-cell table:style-name="ce12N2" office:value-type="float" office:value="1.8">
            <text:p>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6">
            <text:p>16,16</text:p>
          </table:table-cell>
          <table:table-cell table:style-name="ce12N2" office:value-type="float" office:value="61.72">
            <text:p>61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2060.74">
            <text:p>2060,74</text:p>
          </table:table-cell>
          <table:table-cell table:style-name="ce12N2" office:value-type="float" office:value="82.43">
            <text:p>8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7721335751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2">
            <text:p>30922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303.56">
            <text:p>94303,56</text:p>
          </table:table-cell>
          <table:table-cell table:style-name="ce12N2" office:value-type="float" office:value="5352.99">
            <text:p>5352,99</text:p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88332.75">
            <text:p>88332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447424">
            <text:p>10,447</text:p>
          </table:table-cell>
          <table:table-cell table:style-name="ce12N2" office:value-type="float" office:value="3158.95">
            <text:p>315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3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92.08">
            <text:p>72292,08</text:p>
          </table:table-cell>
          <table:table-cell table:style-name="ce12N2" office:value-type="float" office:value="72.32">
            <text:p>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0.61">
            <text:p>650,61</text:p>
          </table:table-cell>
          <table:table-cell table:style-name="ce12N2" office:value-type="float" office:value="80.86">
            <text:p>80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734.92">
            <text:p>7734,92</text:p>
          </table:table-cell>
          <table:table-cell table:style-name="ce12N2" office:value-type="float" office:value="82979.76">
            <text:p>82979,76</text:p>
          </table:table-cell>
          <table:table-cell table:style-name="ce12N2" office:value-type="float" office:value="3319.15">
            <text:p>331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841.53">
            <text:p>19841,53</text:p>
          </table:table-cell>
          <table:table-cell table:style-name="ce12N2" office:value-type="float" office:value="3588.88">
            <text:p>3588,8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9541734405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3">
            <text:p>309233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21.591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59">
            <text:p>98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87">
            <text:p>936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72">
            <text:p>0,063</text:p>
          </table:table-cell>
          <table:table-cell table:style-name="ce12N2" office:value-type="float" office:value="39.9">
            <text:p>39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6.21">
            <text:p>816,21</text:p>
          </table:table-cell>
          <table:table-cell table:style-name="ce12N2" office:value-type="float" office:value="0.82">
            <text:p>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5">
            <text:p>7,3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8.72">
            <text:p>48,72</text:p>
          </table:table-cell>
          <table:table-cell table:style-name="ce12N2" office:value-type="float" office:value="936.87">
            <text:p>936,87</text:p>
          </table:table-cell>
          <table:table-cell table:style-name="ce12N2" office:value-type="float" office:value="37.47">
            <text:p>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215911469016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4">
            <text:p>309234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2.04">
            <text:p>127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02">
            <text:p>0,007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7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9.77">
            <text:p>1039,77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6">
            <text:p>9,3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.04">
            <text:p>40,04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86.24">
            <text:p>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81518696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4">
            <text:p>30924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7.6">
            <text:p>100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51546">
            <text:p>2,852</text:p>
          </table:table-cell>
          <table:table-cell table:style-name="ce12N2" office:value-type="float" office:value="9846.72">
            <text:p>984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0.32">
            <text:p>8450,32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97.88">
            <text:p>97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5.08">
            <text:p>65,08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700.88">
            <text:p>70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981821558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3">
            <text:p>3092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9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">
            <text:p>0,038</text:p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2.5">
            <text:p>15802,50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22">
            <text:p>142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1310.68">
            <text:p>13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9141870408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5">
            <text:p>309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69.81">
            <text:p>386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6">
            <text:p>0,040</text:p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6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3.22">
            <text:p>3163,2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7">
            <text:p>28,4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1.81">
            <text:p>121,81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262.36">
            <text:p>2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251070833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6">
            <text:p>3092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0.44">
            <text:p>99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29">
            <text:p>0,034</text:p>
          </table:table-cell>
          <table:table-cell table:style-name="ce12N2" office:value-type="float" office:value="10.86">
            <text:p>1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97">
            <text:p>790,97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24">
            <text:p>53,24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65.6">
            <text:p>6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0188789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7">
            <text:p>3092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45">
            <text:p>39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65">
            <text:p>0,065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.15">
            <text:p>331,15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.35">
            <text:p>12,35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41999037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8">
            <text:p>3092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91">
            <text:p>168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">
            <text:p>0,040</text:p>
          </table:table-cell>
          <table:table-cell table:style-name="ce12N2" office:value-type="float" office:value="2.74">
            <text:p>2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.77">
            <text:p>1402,77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3">
            <text:p>12,63</text:p>
          </table:table-cell>
          <table:table-cell table:style-name="ce12N2" office:value-type="float" office:value="27.71">
            <text:p>27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8.91">
            <text:p>68,91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72.25">
            <text:p>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915384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1">
            <text:p>30926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85.79">
            <text:p>1138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4124">
            <text:p>0,914</text:p>
          </table:table-cell>
          <table:table-cell table:style-name="ce12N2" office:value-type="float" office:value="673.8">
            <text:p>6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8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86.01">
            <text:p>9486,01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37">
            <text:p>85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46.11">
            <text:p>146,11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786.78">
            <text:p>78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9071641784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4">
            <text:p>3092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694.92">
            <text:p>1836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">
            <text:p>119,00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6.226182">
            <text:p>236,226</text:p>
          </table:table-cell>
          <table:table-cell table:style-name="ce12N2" office:value-type="float" office:value="1004.2">
            <text:p>100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3.6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514.08">
            <text:p>145514,08</text:p>
          </table:table-cell>
          <table:table-cell table:style-name="ce12N2" office:value-type="float" office:value="145.51">
            <text:p>14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9.64">
            <text:p>1309,6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1936.85">
            <text:p>11936,85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11411.95">
            <text:p>114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081550885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5">
            <text:p>3092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.14">
            <text:p>58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62">
            <text:p>0,000</text:p>
          </table:table-cell>
          <table:table-cell table:style-name="ce12N2" office:value-type="float" office:value="77">
            <text:p>7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5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9">
            <text:p>478,29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8.42">
            <text:p>18,42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39.67">
            <text:p>3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901655193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9">
            <text:p>309269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635">
            <text:p>0,015</text:p>
          </table:table-cell>
          <table:table-cell table:style-name="ce12N2" office:value-type="float" office:value="10.32">
            <text:p>10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2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369.17">
            <text:p>36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5104359000122550010000047451406886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3">
            <text:p>30928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55.51">
            <text:p>10725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4657">
            <text:p>2,005</text:p>
          </table:table-cell>
          <table:table-cell table:style-name="ce12N2" office:value-type="float" office:value="588.37">
            <text:p>588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255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724.29">
            <text:p>88724,29</text:p>
          </table:table-cell>
          <table:table-cell table:style-name="ce12N2" office:value-type="float" office:value="88.7">
            <text:p>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.53">
            <text:p>798,5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14.04">
            <text:p>5414,04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4073.67">
            <text:p>407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1154743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5">
            <text:p>30928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.33">
            <text:p>673,33</text:p>
          </table:table-cell>
          <table:table-cell table:style-name="ce12N2" office:value-type="float" office:value="32.29">
            <text:p>32,2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45.8">
            <text:p>64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04094">
            <text:p>8,041</text:p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49">
            <text:p>534,49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613.51">
            <text:p>613,51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3181135111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6">
            <text:p>30928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8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48.3333">
            <text:p>548,333</text:p>
          </table:table-cell>
          <table:table-cell table:style-name="ce12N2" office:value-type="float" office:value="12373.93">
            <text:p>12373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7.58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064.08">
            <text:p>614064,08</text:p>
          </table:table-cell>
          <table:table-cell table:style-name="ce12N2" office:value-type="float" office:value="614.06">
            <text:p>61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6.58">
            <text:p>5526,5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50930.99">
            <text:p>5093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8071149059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7">
            <text:p>30928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6">
            <text:p>0,666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3.86">
            <text:p>7073,86</text:p>
          </table:table-cell>
          <table:table-cell table:style-name="ce12N2" office:value-type="float" office:value="7.07">
            <text:p>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586.71">
            <text:p>58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351371785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8">
            <text:p>3092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8.7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82.58">
            <text:p>160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612">
            <text:p>0,145</text:p>
          </table:table-cell>
          <table:table-cell table:style-name="ce12N2" office:value-type="float" office:value="193.25">
            <text:p>19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46.06">
            <text:p>13146,06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33">
            <text:p>118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06.23">
            <text:p>506,23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1090.36">
            <text:p>10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683374000300550030006187791889129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0">
            <text:p>309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68">
            <text:p>0,000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5.6">
            <text:p>675,60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8">
            <text:p>6,0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6.28">
            <text:p>576,28</text:p>
          </table:table-cell>
          <table:table-cell table:style-name="ce12N2" office:value-type="float" office:value="40.34">
            <text:p>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3189687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1">
            <text:p>309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4">
            <text:p>0,049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3.67">
            <text:p>3283,67</text:p>
          </table:table-cell>
          <table:table-cell table:style-name="ce12N2" office:value-type="float" office:value="3.28">
            <text:p>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55">
            <text:p>29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150.77">
            <text:p>15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718724356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2">
            <text:p>309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23">
            <text:p>0,086</text:p>
          </table:table-cell>
          <table:table-cell table:style-name="ce12N2" office:value-type="float" office:value="112.44">
            <text:p>11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7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54.01">
            <text:p>32854,01</text:p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68">
            <text:p>295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2667.61">
            <text:p>266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41579617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3">
            <text:p>3092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6">
            <text:p>0,033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12">
            <text:p>2189,12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">
            <text:p>19,7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100.51">
            <text:p>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61520138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4">
            <text:p>309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6.52">
            <text:p>29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4">
            <text:p>0,000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24">
            <text:p>2311,24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8">
            <text:p>178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21439709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5">
            <text:p>309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1">
            <text:p>0,016</text:p>
          </table:table-cell>
          <table:table-cell table:style-name="ce12N2" office:value-type="float" office:value="26.09">
            <text:p>26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3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84.02">
            <text:p>7284,02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604.14">
            <text:p>60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51848717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6">
            <text:p>309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58.8">
            <text:p>5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7.99">
            <text:p>3377,99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">
            <text:p>30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1.39">
            <text:p>2881,39</text:p>
          </table:table-cell>
          <table:table-cell table:style-name="ce12N2" office:value-type="float" office:value="201.7">
            <text:p>20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010058889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7">
            <text:p>3092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616">
            <text:p>0,450</text:p>
          </table:table-cell>
          <table:table-cell table:style-name="ce12N2" office:value-type="float" office:value="212.84">
            <text:p>212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6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316.79">
            <text:p>77316,79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.85">
            <text:p>695,8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6412.72">
            <text:p>64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9150932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8">
            <text:p>3092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1584">
            <text:p>0,212</text:p>
          </table:table-cell>
          <table:table-cell table:style-name="ce12N2" office:value-type="float" office:value="100.16">
            <text:p>10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84.37">
            <text:p>36384,37</text:p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.46">
            <text:p>327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3017.75">
            <text:p>30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11329675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9">
            <text:p>3092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9766">
            <text:p>0,230</text:p>
          </table:table-cell>
          <table:table-cell table:style-name="ce12N2" office:value-type="float" office:value="116.53">
            <text:p>116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8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32.71">
            <text:p>24632,71</text:p>
          </table:table-cell>
          <table:table-cell table:style-name="ce12N2" office:value-type="float" office:value="24.63">
            <text:p>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.69">
            <text:p>221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1538.41">
            <text:p>15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817928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8">
            <text:p>30930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56">
            <text:p>507,56</text:p>
          </table:table-cell>
          <table:table-cell table:style-name="ce12N2" office:value-type="float" office:value="33.31">
            <text:p>33,3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7.4">
            <text:p>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7">
            <text:p>0,023</text:p>
          </table:table-cell>
          <table:table-cell table:style-name="ce12N2" office:value-type="float" office:value="7.9">
            <text:p>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6">
            <text:p>395,6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454.09">
            <text:p>454,09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391867126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7">
            <text:p>30931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4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763.95">
            <text:p>897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82.375338">
            <text:p>2282,375</text:p>
          </table:table-cell>
          <table:table-cell table:style-name="ce12N2" office:value-type="float" office:value="486.5">
            <text:p>48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76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66.1">
            <text:p>74866,10</text:p>
          </table:table-cell>
          <table:table-cell table:style-name="ce12N2" office:value-type="float" office:value="74.87">
            <text:p>7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.84">
            <text:p>673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12.21">
            <text:p>1312,21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5955.92">
            <text:p>5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49931858413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3">
            <text:p>30932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65">
            <text:p>278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5">
            <text:p>0,080</text:p>
          </table:table-cell>
          <table:table-cell table:style-name="ce12N2" office:value-type="float" office:value="29.5">
            <text:p>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9.08">
            <text:p>2139,08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5">
            <text:p>19,2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177.42">
            <text:p>1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31582261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5">
            <text:p>30932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8.28">
            <text:p>215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5">
            <text:p>0,090</text:p>
          </table:table-cell>
          <table:table-cell table:style-name="ce12N2" office:value-type="float" office:value="23.35">
            <text:p>2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9.33">
            <text:p>1689,33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6.65">
            <text:p>156,65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140.12">
            <text:p>1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51580281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31">
            <text:p>309331</text:p>
          </table:table-cell>
          <table:table-cell table:style-name="ce0" table:number-columns-spanned="4" table:number-rows-spanned="1" office:value-type="string" calcext:value-type="string">
            <text:p>5.623 - ELGIN S/A</text:p>
          </table:table-cell>
          <table:covered-table-cell table:number-columns-repeated="3"/>
          <table:table-cell table:style-name="ce0" office:value-type="string" calcext:value-type="string">
            <text:p>649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92">
            <text:p>0,004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5.56">
            <text:p>2965,56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69">
            <text:p>26,69</text:p>
          </table:table-cell>
          <table:table-cell table:style-name="ce12N2" office:value-type="float" office:value="51">
            <text:p>5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136.16">
            <text:p>13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556578000122550010006490081696469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1">
            <text:p>30934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4.4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">
            <text:p>20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68">
            <text:p>0,227</text:p>
          </table:table-cell>
          <table:table-cell table:style-name="ce12N2" office:value-type="float" office:value="46.8">
            <text:p>4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4.87">
            <text:p>1674,87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07">
            <text:p>15,07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64.5">
            <text:p>64,5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138.92">
            <text:p>1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444610733338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2">
            <text:p>30934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4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604.02">
            <text:p>1666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1359.82">
            <text:p>161359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96618">
            <text:p>26,966</text:p>
          </table:table-cell>
          <table:table-cell table:style-name="ce12N2" office:value-type="float" office:value="2451.32">
            <text:p>245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6.6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183.65">
            <text:p>136183,65</text:p>
          </table:table-cell>
          <table:table-cell table:style-name="ce12N2" office:value-type="float" office:value="136.18">
            <text:p>13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5.65">
            <text:p>1225,65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244.2">
            <text:p>5244,20</text:p>
          </table:table-cell>
          <table:table-cell table:style-name="ce12N2" office:value-type="float" office:value="161359.82">
            <text:p>161359,82</text:p>
          </table:table-cell>
          <table:table-cell table:style-name="ce12N2" office:value-type="float" office:value="11295.19">
            <text:p>1129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4445141008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3">
            <text:p>309343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522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6.48">
            <text:p>72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79.64">
            <text:p>697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07">
            <text:p>1,658</text:p>
          </table:table-cell>
          <table:table-cell table:style-name="ce12N2" office:value-type="float" office:value="935.12">
            <text:p>93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73.93">
            <text:p>5573,93</text:p>
          </table:table-cell>
          <table:table-cell table:style-name="ce12N2" office:value-type="float" office:value="5.57">
            <text:p>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16">
            <text:p>50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226.84">
            <text:p>226,84</text:p>
          </table:table-cell>
          <table:table-cell table:style-name="ce12N2" office:value-type="float" office:value="6979.64">
            <text:p>6979,64</text:p>
          </table:table-cell>
          <table:table-cell table:style-name="ce12N2" office:value-type="float" office:value="837.56">
            <text:p>83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522177688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0">
            <text:p>309390</text:p>
          </table:table-cell>
          <table:table-cell table:style-name="ce0" table:number-columns-spanned="4" table:number-rows-spanned="1" office:value-type="string" calcext:value-type="string">
            <text:p>1.670 - ARQUA IND. BRASILEIRA DE MANGUEIRAS E TERMOPLASTICOS LTDA</text:p>
          </table:table-cell>
          <table:covered-table-cell table:number-columns-repeated="3"/>
          <table:table-cell table:style-name="ce0" office:value-type="string" calcext:value-type="string">
            <text:p>1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0.63">
            <text:p>1763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0258">
            <text:p>0,960</text:p>
          </table:table-cell>
          <table:table-cell table:style-name="ce12N2" office:value-type="float" office:value="660.09">
            <text:p>66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0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11.43">
            <text:p>14411,43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7">
            <text:p>129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1195.3">
            <text:p>119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81333150001195500100001754014402378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2">
            <text:p>309392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1.15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9.58">
            <text:p>843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136.14">
            <text:p>81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37198">
            <text:p>45,372</text:p>
          </table:table-cell>
          <table:table-cell table:style-name="ce12N2" office:value-type="float" office:value="68.97">
            <text:p>68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9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.43">
            <text:p>7290,43</text:p>
          </table:table-cell>
          <table:table-cell table:style-name="ce12N2" office:value-type="float" office:value="7.29">
            <text:p>7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1">
            <text:p>65,6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303.44">
            <text:p>303,44</text:p>
          </table:table-cell>
          <table:table-cell table:style-name="ce12N2" office:value-type="float" office:value="8136.14">
            <text:p>8136,14</text:p>
          </table:table-cell>
          <table:table-cell table:style-name="ce12N2" office:value-type="float" office:value="569.53">
            <text:p>56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280346200017255003000131153122624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4">
            <text:p>30939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4.14">
            <text:p>1794,14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210019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6">
            <text:p>30939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5.7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8.16">
            <text:p>569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732">
            <text:p>0,697</text:p>
          </table:table-cell>
          <table:table-cell table:style-name="ce12N2" office:value-type="float" office:value="117">
            <text:p>1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9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5.52">
            <text:p>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179.36">
            <text:p>179,36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386.32">
            <text:p>3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57201114655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1">
            <text:p>30941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95537">
            <text:p>37,955</text:p>
          </table:table-cell>
          <table:table-cell table:style-name="ce12N2" office:value-type="float" office:value="583">
            <text:p>5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4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288.36">
            <text:p>2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61242541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3">
            <text:p>309413</text:p>
          </table:table-cell>
          <table:table-cell table:style-name="ce0" table:number-columns-spanned="4" table:number-rows-spanned="1" office:value-type="string" calcext:value-type="string">
            <text:p>28.315 - BSB METAIS LTDA</text:p>
          </table:table-cell>
          <table:covered-table-cell table:number-columns-repeated="3"/>
          <table:table-cell table:style-name="ce0" office:value-type="string" calcext:value-type="string">
            <text:p>30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47.9">
            <text:p>93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347.9">
            <text:p>934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322">
            <text:p>0,653</text:p>
          </table:table-cell>
          <table:table-cell table:style-name="ce12N2" office:value-type="float" office:value="51">
            <text:p>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4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47.9">
            <text:p>9347,90</text:p>
          </table:table-cell>
          <table:table-cell table:style-name="ce12N2" office:value-type="float" office:value="334.65">
            <text:p>33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51098608000131550000000003031761160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2">
            <text:p>30942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43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907.77">
            <text:p>269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4.599">
            <text:p>244,599</text:p>
          </table:table-cell>
          <table:table-cell table:style-name="ce12N2" office:value-type="float" office:value="428.7">
            <text:p>42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907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94.65">
            <text:p>21994,65</text:p>
          </table:table-cell>
          <table:table-cell table:style-name="ce12N2" office:value-type="float" office:value="21.99">
            <text:p>2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.95">
            <text:p>197,95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46.98">
            <text:p>846,98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1824.26">
            <text:p>182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43214821014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48">
            <text:p>309448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699">
            <text:p>1,107</text:p>
          </table:table-cell>
          <table:table-cell table:style-name="ce12N2" office:value-type="float" office:value="97.92">
            <text:p>9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51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58.32">
            <text:p>14758,32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.81">
            <text:p>132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1156.22">
            <text:p>115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41001921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2">
            <text:p>30945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9683">
            <text:p>3,097</text:p>
          </table:table-cell>
          <table:table-cell table:style-name="ce12N2" office:value-type="float" office:value="380.07">
            <text:p>380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0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12.65">
            <text:p>6912,65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21">
            <text:p>62,2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573.35">
            <text:p>573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471442714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3">
            <text:p>30945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56">
            <text:p>16,56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0.72">
            <text:p>990,72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2">
            <text:p>8,9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82.15">
            <text:p>8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5710074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4">
            <text:p>30945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99">
            <text:p>206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549.21">
            <text:p>20549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778458">
            <text:p>9,778</text:p>
          </table:table-cell>
          <table:table-cell table:style-name="ce12N2" office:value-type="float" office:value="348.33">
            <text:p>348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15.93">
            <text:p>17415,93</text:p>
          </table:table-cell>
          <table:table-cell table:style-name="ce12N2" office:value-type="float" office:value="17.42">
            <text:p>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75">
            <text:p>156,7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20549.21">
            <text:p>20549,21</text:p>
          </table:table-cell>
          <table:table-cell table:style-name="ce12N2" office:value-type="float" office:value="1347.83">
            <text:p>134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5311124449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5">
            <text:p>30945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89.81">
            <text:p>366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5701.77">
            <text:p>35701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814824">
            <text:p>28,815</text:p>
          </table:table-cell>
          <table:table-cell table:style-name="ce12N2" office:value-type="float" office:value="570.23">
            <text:p>57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68.05">
            <text:p>30168,05</text:p>
          </table:table-cell>
          <table:table-cell table:style-name="ce12N2" office:value-type="float" office:value="30.16">
            <text:p>3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51">
            <text:p>271,5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988.04">
            <text:p>988,04</text:p>
          </table:table-cell>
          <table:table-cell table:style-name="ce12N2" office:value-type="float" office:value="35701.77">
            <text:p>35701,77</text:p>
          </table:table-cell>
          <table:table-cell table:style-name="ce12N2" office:value-type="float" office:value="2459.07">
            <text:p>245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40914330026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6">
            <text:p>30945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4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.17">
            <text:p>13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0.75">
            <text:p>1070,7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2.47">
            <text:p>82,47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88.81">
            <text:p>8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491267961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7">
            <text:p>309457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5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72">
            <text:p>106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6">
            <text:p>0,01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.96">
            <text:p>842,96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4.92">
            <text:p>64,92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69.92">
            <text:p>6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501375736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31">
            <text:p>131,00</text:p>
          </table:table-cell>
          <table:table-cell table:style-name="ce26N2" office:value-type="float" office:value="8895.59">
            <text:p>8895,59</text:p>
          </table:table-cell>
          <table:table-cell table:style-name="ce26N2" office:value-type="float" office:value="168.58">
            <text:p>16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8096.01">
            <text:p>58096,01</text:p>
          </table:table-cell>
          <table:table-cell table:style-name="ce26N2" office:value-type="float" office:value="4568159.92">
            <text:p>4568159,92</text:p>
          </table:table-cell>
          <table:table-cell table:style-name="ce26N2" office:value-type="float" office:value="300637.8">
            <text:p>300637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08011.86">
            <text:p>4708011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679.28">
            <text:p>76679,28</text:p>
          </table:table-cell>
          <table:table-cell table:style-name="ce26N2" office:value-type="float" office:value="10673.83">
            <text:p>10673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453.386837">
            <text:p>4453,387</text:p>
          </table:table-cell>
          <table:table-cell table:style-name="ce26N2" office:value-type="float" office:value="4647969.03">
            <text:p>4647969,03</text:p>
          </table:table-cell>
          <table:table-cell table:style-name="ce26N2" office:value-type="float" office:value="4708011.86">
            <text:p>4708011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65723">
            <text:p>3865723,00</text:p>
          </table:table-cell>
          <table:table-cell table:style-name="ce26N2" office:value-type="float" office:value="3865.72">
            <text:p>3865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4791.49">
            <text:p>34791,4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58026.12">
            <text:p>158026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.53">
            <text:p>47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08" meta:object-count="0"/>
    <meta:generator>LibreOffice/4.3.0.4$Windows_x86 LibreOffice_project/62ad5818884a2fc2e5780dd45466868d41009ec0</meta:generator>
  </office:meta>
</office:document-meta>
</file>