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8/05/2026 07:42:1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2">
            <text:p>3074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3">
            <text:p>0,006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.3">
            <text:p>878,30</text:p>
          </table:table-cell>
          <table:table-cell table:style-name="ce12N2" office:value-type="float" office:value="61.48">
            <text:p>6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31685412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3">
            <text:p>3074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.32">
            <text:p>351,32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21970174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4">
            <text:p>30749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7.78">
            <text:p>1960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5932">
            <text:p>0,386</text:p>
          </table:table-cell>
          <table:table-cell table:style-name="ce12N2" office:value-type="float" office:value="107.63">
            <text:p>1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0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914.63">
            <text:p>914,63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747.73">
            <text:p>7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31326491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5">
            <text:p>30749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35.71">
            <text:p>11173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32063">
            <text:p>2,832</text:p>
          </table:table-cell>
          <table:table-cell table:style-name="ce12N2" office:value-type="float" office:value="608.49">
            <text:p>608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73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6">
            <text:p>3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6875.59">
            <text:p>6875,59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4194.4">
            <text:p>4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61601434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6">
            <text:p>30749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.57">
            <text:p>216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15">
            <text:p>0,040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110.12">
            <text:p>110,12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41489216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0">
            <text:p>3075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0.48">
            <text:p>111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33">
            <text:p>0,295</text:p>
          </table:table-cell>
          <table:table-cell table:style-name="ce12N2" office:value-type="float" office:value="3.82">
            <text:p>3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7.78">
            <text:p>67,78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11715382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1">
            <text:p>3075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2.37">
            <text:p>809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5">
            <text:p>0,015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23.37">
            <text:p>623,37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298.76">
            <text:p>2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8157214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2">
            <text:p>30758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61">
            <text:p>66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">
            <text:p>0,01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90.47">
            <text:p>590,47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242.25">
            <text:p>2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7157214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3">
            <text:p>3075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65.07">
            <text:p>6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41975247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9">
            <text:p>307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66">
            <text:p>32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21.6">
            <text:p>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71296796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2">
            <text:p>307592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723.8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0.35">
            <text:p>578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025">
            <text:p>0,794</text:p>
          </table:table-cell>
          <table:table-cell table:style-name="ce12N2" office:value-type="float" office:value="145.05">
            <text:p>1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13.51">
            <text:p>513,51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210.68">
            <text:p>2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0213052500017755003000723800153158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6">
            <text:p>307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5.21">
            <text:p>21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7.21">
            <text:p>67,21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144.76">
            <text:p>14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21867579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7">
            <text:p>30760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1.72">
            <text:p>126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">
            <text:p>0,0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9.72">
            <text:p>39,72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85.54">
            <text:p>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311469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2">
            <text:p>30761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6.25">
            <text:p>525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125.98">
            <text:p>512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93093">
            <text:p>42,931</text:p>
          </table:table-cell>
          <table:table-cell table:style-name="ce12N2" office:value-type="float" office:value="332.15">
            <text:p>33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30.27">
            <text:p>130,27</text:p>
          </table:table-cell>
          <table:table-cell table:style-name="ce12N2" office:value-type="float" office:value="4912.66">
            <text:p>4912,66</text:p>
          </table:table-cell>
          <table:table-cell table:style-name="ce12N2" office:value-type="float" office:value="343.9">
            <text:p>3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1913681000134550010001798341462989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2">
            <text:p>3076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955.92">
            <text:p>190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">
            <text:p>41,00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252118">
            <text:p>12,252</text:p>
          </table:table-cell>
          <table:table-cell table:style-name="ce12N2" office:value-type="float" office:value="5183.76">
            <text:p>518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0.95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55.66">
            <text:p>255,66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12356.96">
            <text:p>123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1511727836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5">
            <text:p>307635</text:p>
          </table:table-cell>
          <table:table-cell table:style-name="ce0" table:number-columns-spanned="4" table:number-rows-spanned="1" office:value-type="string" calcext:value-type="string">
            <text:p>38.606 - FIOLUX INDUSTRIA E COMERCIO LTDA</text:p>
          </table:table-cell>
          <table:covered-table-cell table:number-columns-repeated="3"/>
          <table:table-cell table:style-name="ce0" office:value-type="string" calcext:value-type="string">
            <text:p>20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1.5">
            <text:p>47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94">
            <text:p>0,192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23.9">
            <text:p>423,9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521.72">
            <text:p>52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96420914000342550010000205081009327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3">
            <text:p>30764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4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05973">
            <text:p>3,606</text:p>
          </table:table-cell>
          <table:table-cell table:style-name="ce12N2" office:value-type="float" office:value="435.56">
            <text:p>435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4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1760.43">
            <text:p>17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4861238055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9">
            <text:p>307659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4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5">
            <text:p>0,02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62.37">
            <text:p>6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4811931368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8">
            <text:p>3076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3.8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8.3">
            <text:p>130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304">
            <text:p>0,157</text:p>
          </table:table-cell>
          <table:table-cell table:style-name="ce12N2" office:value-type="float" office:value="172.38">
            <text:p>17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1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09.79">
            <text:p>409,79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882.6">
            <text:p>88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683374000300550030006138381226820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3">
            <text:p>307723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3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8">
            <text:p>0,10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08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0432010001005500100075388511189148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8">
            <text:p>30774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2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.84">
            <text:p>5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88">
            <text:p>0,022</text:p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16.01">
            <text:p>1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2">
            <text:p>445,32</text:p>
          </table:table-cell>
          <table:table-cell table:style-name="ce12N2" office:value-type="float" office:value="80.54">
            <text:p>80,5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205114044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4">
            <text:p>307764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28.9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531.53">
            <text:p>5053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7457.12">
            <text:p>474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283">
            <text:p>1,253</text:p>
          </table:table-cell>
          <table:table-cell table:style-name="ce12N2" office:value-type="float" office:value="321.52">
            <text:p>3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53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074.41">
            <text:p>3074,41</text:p>
          </table:table-cell>
          <table:table-cell table:style-name="ce12N2" office:value-type="float" office:value="47457.12">
            <text:p>47457,12</text:p>
          </table:table-cell>
          <table:table-cell table:style-name="ce12N2" office:value-type="float" office:value="1898.3">
            <text:p>18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231436000107550010000289081073452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9">
            <text:p>307769</text:p>
          </table:table-cell>
          <table:table-cell table:style-name="ce0" table:number-columns-spanned="4" table:number-rows-spanned="1" office:value-type="string" calcext:value-type="string">
            <text:p>15.036 - MAXI RUBBER INDUSTRIAS QUIMICAS LTDA</text:p>
          </table:table-cell>
          <table:covered-table-cell table:number-columns-repeated="3"/>
          <table:table-cell table:style-name="ce0" office:value-type="string" calcext:value-type="string">
            <text:p>234.24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91.62">
            <text:p>38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344">
            <text:p>0,332</text:p>
          </table:table-cell>
          <table:table-cell table:style-name="ce12N2" office:value-type="float" office:value="655.98">
            <text:p>6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92.82">
            <text:p>492,82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2666.92">
            <text:p>266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283822000470550050002342431280518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4">
            <text:p>30777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">
            <text:p>0,006</text:p>
          </table:table-cell>
          <table:table-cell table:style-name="ce12N2" office:value-type="float" office:value="1329.5">
            <text:p>13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0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1218.07">
            <text:p>121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81761707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7">
            <text:p>3077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4">
            <text:p>0,023</text:p>
          </table:table-cell>
          <table:table-cell table:style-name="ce12N2" office:value-type="float" office:value="26.5">
            <text:p>2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08.96">
            <text:p>3508,96</text:p>
          </table:table-cell>
          <table:table-cell table:style-name="ce12N2" office:value-type="float" office:value="245.63">
            <text:p>24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301462841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8">
            <text:p>3077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90.45">
            <text:p>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91931360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9">
            <text:p>3077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63.92">
            <text:p>76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8">
            <text:p>0,075</text:p>
          </table:table-cell>
          <table:table-cell table:style-name="ce12N2" office:value-type="float" office:value="11.12">
            <text:p>1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7.75">
            <text:p>467,75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503.73">
            <text:p>50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81943773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1">
            <text:p>3077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39">
            <text:p>220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7">
            <text:p>0,006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34.36">
            <text:p>134,36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144.69">
            <text:p>14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71361895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2">
            <text:p>3077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9.37">
            <text:p>3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4">
            <text:p>0,011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262.87">
            <text:p>26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61974864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3">
            <text:p>307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98.75">
            <text:p>799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8">
            <text:p>0,022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9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525.74">
            <text:p>52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513791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4">
            <text:p>307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08">
            <text:p>0,001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18.09">
            <text:p>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415792392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5">
            <text:p>307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8">
            <text:p>0,008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31174760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6">
            <text:p>307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1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462.75">
            <text:p>46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11494764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8">
            <text:p>307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6">
            <text:p>0,014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39.96">
            <text:p>3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01154769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9">
            <text:p>3077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8.81">
            <text:p>398,81</text:p>
          </table:table-cell>
          <table:table-cell table:style-name="ce12N2" office:value-type="float" office:value="27.92">
            <text:p>2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91883203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0">
            <text:p>307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1.93">
            <text:p>323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336">
            <text:p>0,069</text:p>
          </table:table-cell>
          <table:table-cell table:style-name="ce12N2" office:value-type="float" office:value="7.38">
            <text:p>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31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97.25">
            <text:p>197,25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212.43">
            <text:p>2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814303930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1">
            <text:p>3077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752">
            <text:p>0,028</text:p>
          </table:table-cell>
          <table:table-cell table:style-name="ce12N2" office:value-type="float" office:value="76.12">
            <text:p>76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2701.06">
            <text:p>27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71619774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2">
            <text:p>3077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61356616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0">
            <text:p>307810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6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89.76">
            <text:p>1778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967">
            <text:p>1,897</text:p>
          </table:table-cell>
          <table:table-cell table:style-name="ce12N2" office:value-type="float" office:value="600">
            <text:p>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8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.5">
            <text:p>4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085.76">
            <text:p>1085,76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1169.28">
            <text:p>116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6212048000302550010000069471152455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4">
            <text:p>30781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9.97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37.63">
            <text:p>1801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0111.24">
            <text:p>18011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329116">
            <text:p>18,329</text:p>
          </table:table-cell>
          <table:table-cell table:style-name="ce12N2" office:value-type="float" office:value="23989.6">
            <text:p>239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0.13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6.39">
            <text:p>26,39</text:p>
          </table:table-cell>
          <table:table-cell table:style-name="ce12N2" office:value-type="float" office:value="180111.24">
            <text:p>180111,24</text:p>
          </table:table-cell>
          <table:table-cell table:style-name="ce12N2" office:value-type="float" office:value="12607.79">
            <text:p>1260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699731566510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5">
            <text:p>3078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68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36">
            <text:p>0,003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66.86">
            <text:p>6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68516254461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0">
            <text:p>30782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5.1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96">
            <text:p>0,073</text:p>
          </table:table-cell>
          <table:table-cell table:style-name="ce12N2" office:value-type="float" office:value="28.51">
            <text:p>2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46.03">
            <text:p>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510811000392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2">
            <text:p>307822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24.63">
            <text:p>368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27">
            <text:p>0,843</text:p>
          </table:table-cell>
          <table:table-cell table:style-name="ce12N2" office:value-type="float" office:value="445">
            <text:p>4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824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59.13">
            <text:p>1159,13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2496.59">
            <text:p>249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6371669273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3">
            <text:p>307823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5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29.3">
            <text:p>4012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7756">
            <text:p>4,478</text:p>
          </table:table-cell>
          <table:table-cell table:style-name="ce12N2" office:value-type="float" office:value="6044.42">
            <text:p>604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12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94">
            <text:p>44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63.47">
            <text:p>163,47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2797.62">
            <text:p>279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204129000106550010001415621939014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4">
            <text:p>3078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0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29">
            <text:p>0,403</text:p>
          </table:table-cell>
          <table:table-cell table:style-name="ce12N2" office:value-type="float" office:value="20.4">
            <text:p>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4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318.28">
            <text:p>31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041117539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6">
            <text:p>30782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3.62752">
            <text:p>173,628</text:p>
          </table:table-cell>
          <table:table-cell table:style-name="ce12N2" office:value-type="float" office:value="10950.72">
            <text:p>1095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.870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11540.96">
            <text:p>1154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41595075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7">
            <text:p>30782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6.05">
            <text:p>3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3">
            <text:p>0,01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6.97">
            <text:p>116,97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143.96">
            <text:p>14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69158114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8">
            <text:p>30782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.58">
            <text:p>1003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5">
            <text:p>0,02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3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519.48">
            <text:p>519,48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380.56">
            <text:p>38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215721587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6">
            <text:p>30784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063">
            <text:p>0,044</text:p>
          </table:table-cell>
          <table:table-cell table:style-name="ce12N2" office:value-type="float" office:value="10.31">
            <text:p>1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137.69">
            <text:p>13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351324832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7">
            <text:p>30784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93.68">
            <text:p>6839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65231.14">
            <text:p>6523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46851">
            <text:p>1,947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39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162.54">
            <text:p>3162,54</text:p>
          </table:table-cell>
          <table:table-cell table:style-name="ce12N2" office:value-type="float" office:value="64947.12">
            <text:p>64947,12</text:p>
          </table:table-cell>
          <table:table-cell table:style-name="ce12N2" office:value-type="float" office:value="3325.85">
            <text:p>33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915746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8">
            <text:p>3078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4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6">
            <text:p>0,006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199.9">
            <text:p>1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451488912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0">
            <text:p>30785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6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552">
            <text:p>0,262</text:p>
          </table:table-cell>
          <table:table-cell table:style-name="ce12N2" office:value-type="float" office:value="47.4">
            <text:p>4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55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458.86">
            <text:p>4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6351241633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1">
            <text:p>3078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6">
            <text:p>0,009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4.37">
            <text:p>14,37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19.35">
            <text:p>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81843624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3">
            <text:p>307853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63.18">
            <text:p>201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63.18">
            <text:p>2016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27734">
            <text:p>4,277</text:p>
          </table:table-cell>
          <table:table-cell table:style-name="ce12N2" office:value-type="float" office:value="944.34">
            <text:p>944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1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09.57">
            <text:p>11809,57</text:p>
          </table:table-cell>
          <table:table-cell table:style-name="ce12N2" office:value-type="float" office:value="826.67">
            <text:p>82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3109902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4">
            <text:p>3078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75.61">
            <text:p>627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9">
            <text:p>0,033</text:p>
          </table:table-cell>
          <table:table-cell table:style-name="ce12N2" office:value-type="float" office:value="284.1">
            <text:p>28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7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59.22">
            <text:p>359,22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280.59">
            <text:p>28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31570200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2">
            <text:p>307862</text:p>
          </table:table-cell>
          <table:table-cell table:style-name="ce0" table:number-columns-spanned="4" table:number-rows-spanned="1" office:value-type="string" calcext:value-type="string">
            <text:p>576 - BRASILUX INDUSTRIA COM IMP E EXP LTDA</text:p>
          </table:table-cell>
          <table:covered-table-cell table:number-columns-repeated="3"/>
          <table:table-cell table:style-name="ce0" office:value-type="string" calcext:value-type="string">
            <text:p>1.45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748.12">
            <text:p>10774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553028">
            <text:p>19,553</text:p>
          </table:table-cell>
          <table:table-cell table:style-name="ce12N2" office:value-type="float" office:value="2505">
            <text:p>250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74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9572.16">
            <text:p>9572,16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6872.32">
            <text:p>68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374121000101550010014500791725248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4">
            <text:p>3078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20.11">
            <text:p>772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7">
            <text:p>0,031</text:p>
          </table:table-cell>
          <table:table-cell table:style-name="ce12N2" office:value-type="float" office:value="47.04">
            <text:p>4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2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243.01">
            <text:p>243,01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523.4">
            <text:p>5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81170410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5">
            <text:p>3078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.88">
            <text:p>5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">
            <text:p>0,003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37.21">
            <text:p>3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421807808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4">
            <text:p>3078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3.82">
            <text:p>31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0.72">
            <text:p>297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344">
            <text:p>0,025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93.1">
            <text:p>193,10</text:p>
          </table:table-cell>
          <table:table-cell table:style-name="ce12N2" office:value-type="float" office:value="2970.72">
            <text:p>2970,72</text:p>
          </table:table-cell>
          <table:table-cell table:style-name="ce12N2" office:value-type="float" office:value="118.83">
            <text:p>1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499180355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5">
            <text:p>3078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96.51">
            <text:p>1859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437.22">
            <text:p>1843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456">
            <text:p>0,069</text:p>
          </table:table-cell>
          <table:table-cell table:style-name="ce12N2" office:value-type="float" office:value="62.14">
            <text:p>6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9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59.29">
            <text:p>159,29</text:p>
          </table:table-cell>
          <table:table-cell table:style-name="ce12N2" office:value-type="float" office:value="18437.22">
            <text:p>18437,22</text:p>
          </table:table-cell>
          <table:table-cell table:style-name="ce12N2" office:value-type="float" office:value="737.49">
            <text:p>73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017591236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6">
            <text:p>3078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1.6">
            <text:p>419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1.6">
            <text:p>419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">
            <text:p>0,019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9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7.89">
            <text:p>3077,89</text:p>
          </table:table-cell>
          <table:table-cell table:style-name="ce12N2" office:value-type="float" office:value="215.45">
            <text:p>2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41287532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6">
            <text:p>3079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64.14">
            <text:p>1766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61.76">
            <text:p>1756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">
            <text:p>0,06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6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02.38">
            <text:p>102,38</text:p>
          </table:table-cell>
          <table:table-cell table:style-name="ce12N2" office:value-type="float" office:value="17561.76">
            <text:p>17561,76</text:p>
          </table:table-cell>
          <table:table-cell table:style-name="ce12N2" office:value-type="float" office:value="749.73">
            <text:p>74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21135587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7">
            <text:p>3079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54.66">
            <text:p>112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567.76">
            <text:p>105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92">
            <text:p>0,081</text:p>
          </table:table-cell>
          <table:table-cell table:style-name="ce12N2" office:value-type="float" office:value="17.49">
            <text:p>17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86.9">
            <text:p>686,90</text:p>
          </table:table-cell>
          <table:table-cell table:style-name="ce12N2" office:value-type="float" office:value="10567.76">
            <text:p>10567,76</text:p>
          </table:table-cell>
          <table:table-cell table:style-name="ce12N2" office:value-type="float" office:value="739.74">
            <text:p>73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11779618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8">
            <text:p>307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888">
            <text:p>0,007</text:p>
          </table:table-cell>
          <table:table-cell table:style-name="ce12N2" office:value-type="float" office:value="4.74">
            <text:p>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113.82">
            <text:p>1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31149779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9">
            <text:p>30790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1">
            <text:p>0,001</text:p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3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1360.46">
            <text:p>136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61627295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0">
            <text:p>3079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6.64">
            <text:p>16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6.64">
            <text:p>16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8">
            <text:p>0,008</text:p>
          </table:table-cell>
          <table:table-cell table:style-name="ce12N2" office:value-type="float" office:value="8.83">
            <text:p>8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1.16">
            <text:p>1231,16</text:p>
          </table:table-cell>
          <table:table-cell table:style-name="ce12N2" office:value-type="float" office:value="86.18">
            <text:p>8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511910763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5">
            <text:p>307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.52">
            <text:p>70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1.74">
            <text:p>69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84">
            <text:p>0,007</text:p>
          </table:table-cell>
          <table:table-cell table:style-name="ce12N2" office:value-type="float" office:value="1.35">
            <text:p>1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9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7.78">
            <text:p>17,78</text:p>
          </table:table-cell>
          <table:table-cell table:style-name="ce12N2" office:value-type="float" office:value="691.74">
            <text:p>691,74</text:p>
          </table:table-cell>
          <table:table-cell table:style-name="ce12N2" office:value-type="float" office:value="48.42">
            <text:p>4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011163363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6">
            <text:p>307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3">
            <text:p>0,155</text:p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7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880.54">
            <text:p>8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11550065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7">
            <text:p>307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556">
            <text:p>0,116</text:p>
          </table:table-cell>
          <table:table-cell table:style-name="ce12N2" office:value-type="float" office:value="19.82">
            <text:p>1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323.85">
            <text:p>32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21946225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8">
            <text:p>307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6.09">
            <text:p>733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64.36">
            <text:p>7164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1">
            <text:p>0,032</text:p>
          </table:table-cell>
          <table:table-cell table:style-name="ce12N2" office:value-type="float" office:value="14.57">
            <text:p>1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71.73">
            <text:p>171,73</text:p>
          </table:table-cell>
          <table:table-cell table:style-name="ce12N2" office:value-type="float" office:value="7164.36">
            <text:p>7164,36</text:p>
          </table:table-cell>
          <table:table-cell table:style-name="ce12N2" office:value-type="float" office:value="365.84">
            <text:p>36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31934407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9">
            <text:p>307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28.09">
            <text:p>1692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642.24">
            <text:p>1664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1512">
            <text:p>0,112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2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5.85">
            <text:p>285,85</text:p>
          </table:table-cell>
          <table:table-cell table:style-name="ce12N2" office:value-type="float" office:value="16642.24">
            <text:p>16642,24</text:p>
          </table:table-cell>
          <table:table-cell table:style-name="ce12N2" office:value-type="float" office:value="1164.96">
            <text:p>116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41568815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0">
            <text:p>307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9.9">
            <text:p>183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6.84">
            <text:p>1767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92">
            <text:p>0,110</text:p>
          </table:table-cell>
          <table:table-cell table:style-name="ce12N2" office:value-type="float" office:value="38.67">
            <text:p>3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9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723.06">
            <text:p>723,06</text:p>
          </table:table-cell>
          <table:table-cell table:style-name="ce12N2" office:value-type="float" office:value="17676.84">
            <text:p>17676,84</text:p>
          </table:table-cell>
          <table:table-cell table:style-name="ce12N2" office:value-type="float" office:value="1062.83">
            <text:p>106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51868341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1">
            <text:p>3079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5105.76">
            <text:p>44510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">
            <text:p>93,00</text:p>
          </table:table-cell>
          <table:table-cell table:style-name="ce12N2" office:value-type="float" office:value="441507.04">
            <text:p>44150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004156">
            <text:p>12,004</text:p>
          </table:table-cell>
          <table:table-cell table:style-name="ce12N2" office:value-type="float" office:value="1901.11">
            <text:p>190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5.10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98.72">
            <text:p>3598,72</text:p>
          </table:table-cell>
          <table:table-cell table:style-name="ce12N2" office:value-type="float" office:value="435689.29">
            <text:p>435689,29</text:p>
          </table:table-cell>
          <table:table-cell table:style-name="ce12N2" office:value-type="float" office:value="26553.19">
            <text:p>2655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61219885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3">
            <text:p>307923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99">
            <text:p>0,980</text:p>
          </table:table-cell>
          <table:table-cell table:style-name="ce12N2" office:value-type="float" office:value="404.02">
            <text:p>40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14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2529.78">
            <text:p>252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622111019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2">
            <text:p>30793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6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58.73">
            <text:p>130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215.23">
            <text:p>1221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482">
            <text:p>0,090</text:p>
          </table:table-cell>
          <table:table-cell table:style-name="ce12N2" office:value-type="float" office:value="214.79">
            <text:p>21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58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843.5">
            <text:p>843,50</text:p>
          </table:table-cell>
          <table:table-cell table:style-name="ce12N2" office:value-type="float" office:value="12215.23">
            <text:p>12215,23</text:p>
          </table:table-cell>
          <table:table-cell table:style-name="ce12N2" office:value-type="float" office:value="562.95">
            <text:p>56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624015701755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7">
            <text:p>30793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5.2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1.98">
            <text:p>1492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508">
            <text:p>1,751</text:p>
          </table:table-cell>
          <table:table-cell table:style-name="ce12N2" office:value-type="float" office:value="933.2">
            <text:p>93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21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1.68">
            <text:p>61,68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1040.22">
            <text:p>10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42774001209550010002152021410874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5">
            <text:p>307945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045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072">
            <text:p>1,711</text:p>
          </table:table-cell>
          <table:table-cell table:style-name="ce12N2" office:value-type="float" office:value="549.12">
            <text:p>54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86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3223.76">
            <text:p>32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10524837000193550070000250451252822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6">
            <text:p>307946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050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33.6">
            <text:p>2943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33.6">
            <text:p>294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56">
            <text:p>3,456</text:p>
          </table:table-cell>
          <table:table-cell table:style-name="ce12N2" office:value-type="float" office:value="3279.36">
            <text:p>327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43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33.6">
            <text:p>29433,60</text:p>
          </table:table-cell>
          <table:table-cell table:style-name="ce12N2" office:value-type="float" office:value="3532.03">
            <text:p>353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61.09">
            <text:p>36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195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361,09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2260510524837000193550070000250501985363065</text:p>
          </table:table-cell>
          <table:table-cell table:style-name="ce0" office:value-type="string" calcext:value-type="string">
            <text:p>3226052874377700016557001000019195100022066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7">
            <text:p>307947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3.50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1.6">
            <text:p>960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9348.88">
            <text:p>93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98028">
            <text:p>3,098</text:p>
          </table:table-cell>
          <table:table-cell table:style-name="ce12N2" office:value-type="float" office:value="154.68">
            <text:p>154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0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52.72">
            <text:p>252,72</text:p>
          </table:table-cell>
          <table:table-cell table:style-name="ce12N2" office:value-type="float" office:value="9348.88">
            <text:p>9348,88</text:p>
          </table:table-cell>
          <table:table-cell table:style-name="ce12N2" office:value-type="float" office:value="609.84">
            <text:p>6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35091928895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0">
            <text:p>307950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8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9.09">
            <text:p>159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8.75">
            <text:p>154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">
            <text:p>0,007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0.34">
            <text:p>50,34</text:p>
          </table:table-cell>
          <table:table-cell table:style-name="ce12N2" office:value-type="float" office:value="1548.75">
            <text:p>1548,75</text:p>
          </table:table-cell>
          <table:table-cell table:style-name="ce12N2" office:value-type="float" office:value="108.41">
            <text:p>10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874148130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1">
            <text:p>307951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454.44">
            <text:p>11345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883.23">
            <text:p>109883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58192">
            <text:p>27,582</text:p>
          </table:table-cell>
          <table:table-cell table:style-name="ce12N2" office:value-type="float" office:value="5167.5">
            <text:p>516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454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71.21">
            <text:p>3571,21</text:p>
          </table:table-cell>
          <table:table-cell table:style-name="ce12N2" office:value-type="float" office:value="109883.23">
            <text:p>109883,23</text:p>
          </table:table-cell>
          <table:table-cell table:style-name="ce12N2" office:value-type="float" office:value="7691.83">
            <text:p>769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79157511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2">
            <text:p>307952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598.15">
            <text:p>4359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225.81">
            <text:p>4222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78405">
            <text:p>8,784</text:p>
          </table:table-cell>
          <table:table-cell table:style-name="ce12N2" office:value-type="float" office:value="1661">
            <text:p>166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598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372.34">
            <text:p>1372,34</text:p>
          </table:table-cell>
          <table:table-cell table:style-name="ce12N2" office:value-type="float" office:value="42225.81">
            <text:p>42225,81</text:p>
          </table:table-cell>
          <table:table-cell table:style-name="ce12N2" office:value-type="float" office:value="2955.81">
            <text:p>29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21575113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3">
            <text:p>307953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6.63">
            <text:p>1441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62.84">
            <text:p>1396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31518">
            <text:p>5,132</text:p>
          </table:table-cell>
          <table:table-cell table:style-name="ce12N2" office:value-type="float" office:value="803.25">
            <text:p>80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6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453.79">
            <text:p>453,79</text:p>
          </table:table-cell>
          <table:table-cell table:style-name="ce12N2" office:value-type="float" office:value="13962.84">
            <text:p>13962,84</text:p>
          </table:table-cell>
          <table:table-cell table:style-name="ce12N2" office:value-type="float" office:value="977.4">
            <text:p>97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31575112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4">
            <text:p>307954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782.05">
            <text:p>12678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2791.33">
            <text:p>122791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850963">
            <text:p>24,851</text:p>
          </table:table-cell>
          <table:table-cell table:style-name="ce12N2" office:value-type="float" office:value="5607.96">
            <text:p>5607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78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990.72">
            <text:p>3990,72</text:p>
          </table:table-cell>
          <table:table-cell table:style-name="ce12N2" office:value-type="float" office:value="122791.33">
            <text:p>122791,33</text:p>
          </table:table-cell>
          <table:table-cell table:style-name="ce12N2" office:value-type="float" office:value="8595.4">
            <text:p>85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4157511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5">
            <text:p>30795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4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7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593.23">
            <text:p>59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4228157457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6">
            <text:p>3079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25.36">
            <text:p>545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4813.12">
            <text:p>448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25808">
            <text:p>7,526</text:p>
          </table:table-cell>
          <table:table-cell table:style-name="ce12N2" office:value-type="float" office:value="751.49">
            <text:p>75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5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94.88">
            <text:p>2894,88</text:p>
          </table:table-cell>
          <table:table-cell table:style-name="ce12N2" office:value-type="float" office:value="42977.89">
            <text:p>42977,89</text:p>
          </table:table-cell>
          <table:table-cell table:style-name="ce12N2" office:value-type="float" office:value="1782.08">
            <text:p>17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037.94">
            <text:p>38037,94</text:p>
          </table:table-cell>
          <table:table-cell table:style-name="ce12N2" office:value-type="float" office:value="6817.36">
            <text:p>6817,3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4115120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94">
            <text:p>307994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23.34">
            <text:p>4552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90.4">
            <text:p>4409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08">
            <text:p>0,581</text:p>
          </table:table-cell>
          <table:table-cell table:style-name="ce12N2" office:value-type="float" office:value="630">
            <text:p>6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23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432.94">
            <text:p>1432,94</text:p>
          </table:table-cell>
          <table:table-cell table:style-name="ce12N2" office:value-type="float" office:value="44090.4">
            <text:p>44090,40</text:p>
          </table:table-cell>
          <table:table-cell table:style-name="ce12N2" office:value-type="float" office:value="3086.33">
            <text:p>308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18.98">
            <text:p>91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3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918,9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60398369000800550010006016341459019340</text:p>
          </table:table-cell>
          <table:table-cell table:style-name="ce0" office:value-type="string" calcext:value-type="string">
            <text:p>352605113895650002005700500039993710008620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95">
            <text:p>30799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86.51">
            <text:p>3548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69.5">
            <text:p>3436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8">
            <text:p>0,588</text:p>
          </table:table-cell>
          <table:table-cell table:style-name="ce12N2" office:value-type="float" office:value="420">
            <text:p>4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48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17.01">
            <text:p>1117,01</text:p>
          </table:table-cell>
          <table:table-cell table:style-name="ce12N2" office:value-type="float" office:value="34369.5">
            <text:p>34369,50</text:p>
          </table:table-cell>
          <table:table-cell table:style-name="ce12N2" office:value-type="float" office:value="2405.87">
            <text:p>240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6.37">
            <text:p>71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3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716,37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60398369000800550010006016351460937754</text:p>
          </table:table-cell>
          <table:table-cell table:style-name="ce0" office:value-type="string" calcext:value-type="string">
            <text:p>352605113895650002005700500039993710008620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98">
            <text:p>307998</text:p>
          </table:table-cell>
          <table:table-cell table:style-name="ce0" table:number-columns-spanned="4" table:number-rows-spanned="1" office:value-type="string" calcext:value-type="string">
            <text:p>584 - PONTO DAS DUCHAS COMERCIO E INDUSTRIA LTDA</text:p>
          </table:table-cell>
          <table:covered-table-cell table:number-columns-repeated="3"/>
          <table:table-cell table:style-name="ce0" office:value-type="string" calcext:value-type="string">
            <text:p>5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6994">
            <text:p>1,470</text:p>
          </table:table-cell>
          <table:table-cell table:style-name="ce12N2" office:value-type="float" office:value="512.26">
            <text:p>512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6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1388.45">
            <text:p>138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01130182000188550010000057711309846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2">
            <text:p>308002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60.41">
            <text:p>516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60.41">
            <text:p>5160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89">
            <text:p>0,041</text:p>
          </table:table-cell>
          <table:table-cell table:style-name="ce12N2" office:value-type="float" office:value="10.49">
            <text:p>1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6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60.41">
            <text:p>5160,41</text:p>
          </table:table-cell>
          <table:table-cell table:style-name="ce12N2" office:value-type="float" office:value="361.23">
            <text:p>36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0.99">
            <text:p>11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7.567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21/05/2026</text:p>
          </table:table-cell>
          <table:table-cell table:style-name="ce12" office:value-type="string" calcext:value-type="string">
            <text:p>110,99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5260513576045000150550010000052941001864243</text:p>
          </table:table-cell>
          <table:table-cell table:style-name="ce0" office:value-type="string" calcext:value-type="string">
            <text:p>3526050522209200076357002000477567100673015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3">
            <text:p>30800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4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8.39">
            <text:p>344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48.39">
            <text:p>3448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1">
            <text:p>0,021</text:p>
          </table:table-cell>
          <table:table-cell table:style-name="ce12N2" office:value-type="float" office:value="18.37">
            <text:p>18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4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48.39">
            <text:p>3448,39</text:p>
          </table:table-cell>
          <table:table-cell table:style-name="ce12N2" office:value-type="float" office:value="241.39">
            <text:p>24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4782138786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5">
            <text:p>30800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52.9">
            <text:p>160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547.6">
            <text:p>155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744">
            <text:p>0,277</text:p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5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05.3">
            <text:p>505,30</text:p>
          </table:table-cell>
          <table:table-cell table:style-name="ce12N2" office:value-type="float" office:value="15547.6">
            <text:p>15547,60</text:p>
          </table:table-cell>
          <table:table-cell table:style-name="ce12N2" office:value-type="float" office:value="1088.33">
            <text:p>108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24.06">
            <text:p>32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3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324,0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60398369000800550010006016361571234740</text:p>
          </table:table-cell>
          <table:table-cell table:style-name="ce0" office:value-type="string" calcext:value-type="string">
            <text:p>352605113895650002005700500039993710008620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6">
            <text:p>30800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1.42">
            <text:p>514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4979.58">
            <text:p>4979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713">
            <text:p>0,024</text:p>
          </table:table-cell>
          <table:table-cell table:style-name="ce12N2" office:value-type="float" office:value="30.35">
            <text:p>3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1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61.84">
            <text:p>161,84</text:p>
          </table:table-cell>
          <table:table-cell table:style-name="ce12N2" office:value-type="float" office:value="4979.58">
            <text:p>4979,58</text:p>
          </table:table-cell>
          <table:table-cell table:style-name="ce12N2" office:value-type="float" office:value="348.56">
            <text:p>34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3.79">
            <text:p>10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3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103,79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60398369000800550010006016381791672199</text:p>
          </table:table-cell>
          <table:table-cell table:style-name="ce0" office:value-type="string" calcext:value-type="string">
            <text:p>352605113895650002005700500039993710008620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4">
            <text:p>308014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76545">
            <text:p>14,677</text:p>
          </table:table-cell>
          <table:table-cell table:style-name="ce12N2" office:value-type="float" office:value="2098.89">
            <text:p>2098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1.62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9913.85">
            <text:p>9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56481567176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5">
            <text:p>308015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64.5743">
            <text:p>764,574</text:p>
          </table:table-cell>
          <table:table-cell table:style-name="ce12N2" office:value-type="float" office:value="7156.7">
            <text:p>715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8.03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29962.13">
            <text:p>2996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565012523439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8">
            <text:p>3080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0.15">
            <text:p>749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33">
            <text:p>703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">
            <text:p>0,000</text:p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57.15">
            <text:p>457,15</text:p>
          </table:table-cell>
          <table:table-cell table:style-name="ce12N2" office:value-type="float" office:value="7033">
            <text:p>7033,00</text:p>
          </table:table-cell>
          <table:table-cell table:style-name="ce12N2" office:value-type="float" office:value="492.31">
            <text:p>4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6177266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0">
            <text:p>308020</text:p>
          </table:table-cell>
          <table:table-cell table:style-name="ce0" table:number-columns-spanned="4" table:number-rows-spanned="1" office:value-type="string" calcext:value-type="string">
            <text:p>5.133 - CIA IND H CARLOS SCHNEIDER</text:p>
          </table:table-cell>
          <table:covered-table-cell table:number-columns-repeated="3"/>
          <table:table-cell table:style-name="ce0" office:value-type="string" calcext:value-type="string">
            <text:p>2.272.9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49.85">
            <text:p>3564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31713.92">
            <text:p>31713,92</text:p>
          </table:table-cell>
          <table:table-cell table:style-name="ce12N2" office:value-type="float" office:value="1760.13">
            <text:p>1760,13</text:p>
          </table:table-cell>
          <table:table-cell table:style-name="ce12N3" office:value-type="float" office:value="0.144621">
            <text:p>0,145</text:p>
          </table:table-cell>
          <table:table-cell table:style-name="ce12N2" office:value-type="float" office:value="227.72">
            <text:p>22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64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.69">
            <text:p>56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175.8">
            <text:p>2175,80</text:p>
          </table:table-cell>
          <table:table-cell table:style-name="ce12N2" office:value-type="float" office:value="33474.05">
            <text:p>33474,05</text:p>
          </table:table-cell>
          <table:table-cell table:style-name="ce12N2" office:value-type="float" office:value="2333.49">
            <text:p>233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709955001265550010022729501184351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1">
            <text:p>308021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3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1734">
            <text:p>0,342</text:p>
          </table:table-cell>
          <table:table-cell table:style-name="ce12N2" office:value-type="float" office:value="342">
            <text:p>3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248.4">
            <text:p>24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301207265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2">
            <text:p>30802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31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783.58">
            <text:p>25578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254587.36">
            <text:p>25458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543016">
            <text:p>20,543</text:p>
          </table:table-cell>
          <table:table-cell table:style-name="ce12N2" office:value-type="float" office:value="27385.1">
            <text:p>2738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78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96.22">
            <text:p>1196,22</text:p>
          </table:table-cell>
          <table:table-cell table:style-name="ce12N2" office:value-type="float" office:value="254587.36">
            <text:p>254587,36</text:p>
          </table:table-cell>
          <table:table-cell table:style-name="ce12N2" office:value-type="float" office:value="17821.12">
            <text:p>178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311175241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4">
            <text:p>30802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85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81.85">
            <text:p>13288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1387.76">
            <text:p>13138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182212">
            <text:p>19,182</text:p>
          </table:table-cell>
          <table:table-cell table:style-name="ce12N2" office:value-type="float" office:value="29152.4">
            <text:p>2915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2.88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494.09">
            <text:p>1494,09</text:p>
          </table:table-cell>
          <table:table-cell table:style-name="ce12N2" office:value-type="float" office:value="131387.76">
            <text:p>131387,76</text:p>
          </table:table-cell>
          <table:table-cell table:style-name="ce12N2" office:value-type="float" office:value="9197.14">
            <text:p>919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8516836611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5">
            <text:p>3080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2.48">
            <text:p>369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6.25">
            <text:p>357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75">
            <text:p>0,03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6.23">
            <text:p>116,23</text:p>
          </table:table-cell>
          <table:table-cell table:style-name="ce12N2" office:value-type="float" office:value="3576.25">
            <text:p>3576,25</text:p>
          </table:table-cell>
          <table:table-cell table:style-name="ce12N2" office:value-type="float" office:value="250.34">
            <text:p>25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61855007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6">
            <text:p>30802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821.32">
            <text:p>32082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">
            <text:p>106,00</text:p>
          </table:table-cell>
          <table:table-cell table:style-name="ce12N2" office:value-type="float" office:value="299635.29">
            <text:p>299635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9.717298">
            <text:p>709,717</text:p>
          </table:table-cell>
          <table:table-cell table:style-name="ce12N2" office:value-type="float" office:value="1826.71">
            <text:p>1826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0.821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1186.03">
            <text:p>21186,03</text:p>
          </table:table-cell>
          <table:table-cell table:style-name="ce12N2" office:value-type="float" office:value="299635.29">
            <text:p>299635,29</text:p>
          </table:table-cell>
          <table:table-cell table:style-name="ce12N2" office:value-type="float" office:value="20082.92">
            <text:p>2008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0913296226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7">
            <text:p>308027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4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59.89">
            <text:p>8865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7614.3">
            <text:p>876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651636">
            <text:p>18,652</text:p>
          </table:table-cell>
          <table:table-cell table:style-name="ce12N2" office:value-type="float" office:value="28773.2">
            <text:p>2877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59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.59">
            <text:p>1045,59</text:p>
          </table:table-cell>
          <table:table-cell table:style-name="ce12N2" office:value-type="float" office:value="87614.3">
            <text:p>87614,30</text:p>
          </table:table-cell>
          <table:table-cell table:style-name="ce12N2" office:value-type="float" office:value="6133">
            <text:p>61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401072654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8">
            <text:p>308028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51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151.17">
            <text:p>901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9288.6">
            <text:p>8928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33168">
            <text:p>17,633</text:p>
          </table:table-cell>
          <table:table-cell table:style-name="ce12N2" office:value-type="float" office:value="29055.16">
            <text:p>2905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1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62.57">
            <text:p>862,57</text:p>
          </table:table-cell>
          <table:table-cell table:style-name="ce12N2" office:value-type="float" office:value="89288.6">
            <text:p>89288,60</text:p>
          </table:table-cell>
          <table:table-cell table:style-name="ce12N2" office:value-type="float" office:value="6250.21">
            <text:p>625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5161566829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3">
            <text:p>308043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497.99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.9">
            <text:p>12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22.22">
            <text:p>1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28">
            <text:p>0,004</text:p>
          </table:table-cell>
          <table:table-cell table:style-name="ce12N2" office:value-type="float" office:value="0.62">
            <text:p>0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122.22">
            <text:p>122,22</text:p>
          </table:table-cell>
          <table:table-cell table:style-name="ce12N2" office:value-type="float" office:value="8.56">
            <text:p>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20366000195550020004979971120775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4">
            <text:p>308044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24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70.72">
            <text:p>2407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3696.04">
            <text:p>23696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878">
            <text:p>0,806</text:p>
          </table:table-cell>
          <table:table-cell table:style-name="ce12N2" office:value-type="float" office:value="1929.25">
            <text:p>192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7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74.68">
            <text:p>374,68</text:p>
          </table:table-cell>
          <table:table-cell table:style-name="ce12N2" office:value-type="float" office:value="23696.04">
            <text:p>23696,04</text:p>
          </table:table-cell>
          <table:table-cell table:style-name="ce12N2" office:value-type="float" office:value="1107.89">
            <text:p>110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064838016560550010005249161523029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5">
            <text:p>308045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2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58.06">
            <text:p>265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9">
            <text:p>2574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867">
            <text:p>0,099</text:p>
          </table:table-cell>
          <table:table-cell table:style-name="ce12N2" office:value-type="float" office:value="9.73">
            <text:p>9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5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3.67">
            <text:p>83,67</text:p>
          </table:table-cell>
          <table:table-cell table:style-name="ce12N2" office:value-type="float" office:value="2574.39">
            <text:p>2574,39</text:p>
          </table:table-cell>
          <table:table-cell table:style-name="ce12N2" office:value-type="float" office:value="180.21">
            <text:p>18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837457000187550010003628561337353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5">
            <text:p>30805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8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1.36">
            <text:p>333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26.5">
            <text:p>322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71">
            <text:p>0,043</text:p>
          </table:table-cell>
          <table:table-cell table:style-name="ce12N2" office:value-type="float" office:value="22.53">
            <text:p>22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.86">
            <text:p>104,86</text:p>
          </table:table-cell>
          <table:table-cell table:style-name="ce12N2" office:value-type="float" office:value="3226.5">
            <text:p>3226,50</text:p>
          </table:table-cell>
          <table:table-cell table:style-name="ce12N2" office:value-type="float" office:value="225.86">
            <text:p>2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8751114935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6">
            <text:p>3080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99.22">
            <text:p>1319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442.2">
            <text:p>944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24412">
            <text:p>4,524</text:p>
          </table:table-cell>
          <table:table-cell table:style-name="ce12N2" office:value-type="float" office:value="41.56">
            <text:p>41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99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96.33">
            <text:p>896,33</text:p>
          </table:table-cell>
          <table:table-cell table:style-name="ce12N2" office:value-type="float" office:value="8672.1">
            <text:p>8672,10</text:p>
          </table:table-cell>
          <table:table-cell table:style-name="ce12N2" office:value-type="float" office:value="346.89">
            <text:p>34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961.46">
            <text:p>15961,46</text:p>
          </table:table-cell>
          <table:table-cell table:style-name="ce12N2" office:value-type="float" office:value="2860.69">
            <text:p>2860,6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81300638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0">
            <text:p>3080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.93">
            <text:p>5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4.86">
            <text:p>554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06">
            <text:p>0,001</text:p>
          </table:table-cell>
          <table:table-cell table:style-name="ce12N2" office:value-type="float" office:value="0.87">
            <text:p>0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6.07">
            <text:p>36,07</text:p>
          </table:table-cell>
          <table:table-cell table:style-name="ce12N2" office:value-type="float" office:value="554.86">
            <text:p>554,86</text:p>
          </table:table-cell>
          <table:table-cell table:style-name="ce12N2" office:value-type="float" office:value="22.19">
            <text:p>2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71425379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5">
            <text:p>308075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21397152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6">
            <text:p>308076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191608810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7">
            <text:p>308077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418006834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8">
            <text:p>308078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11975927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9">
            <text:p>308079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31387877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0">
            <text:p>308080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01786907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2">
            <text:p>308082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80.08">
            <text:p>1868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55918">
            <text:p>5,756</text:p>
          </table:table-cell>
          <table:table-cell table:style-name="ce12N2" office:value-type="float" office:value="17640">
            <text:p>176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8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3.71">
            <text:p>15663,71</text:p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97">
            <text:p>140,9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20.64">
            <text:p>120,64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1299.16">
            <text:p>129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11214791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4">
            <text:p>3080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4.63317">
            <text:p>34,633</text:p>
          </table:table-cell>
          <table:table-cell table:style-name="ce12N2" office:value-type="float" office:value="13325.4">
            <text:p>1332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2.0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277.58">
            <text:p>228277,58</text:p>
          </table:table-cell>
          <table:table-cell table:style-name="ce12N2" office:value-type="float" office:value="228.28">
            <text:p>22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54.5">
            <text:p>2054,5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10481.06">
            <text:p>1048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56491651109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5">
            <text:p>308085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1.554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484.34">
            <text:p>844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82627.22">
            <text:p>8262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4.609874">
            <text:p>44,610</text:p>
          </table:table-cell>
          <table:table-cell table:style-name="ce12N2" office:value-type="float" office:value="3697.89">
            <text:p>3697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484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735.31">
            <text:p>69735,31</text:p>
          </table:table-cell>
          <table:table-cell table:style-name="ce12N2" office:value-type="float" office:value="69.72">
            <text:p>6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7.63">
            <text:p>627,6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857.12">
            <text:p>1857,12</text:p>
          </table:table-cell>
          <table:table-cell table:style-name="ce12N2" office:value-type="float" office:value="82627.22">
            <text:p>82627,22</text:p>
          </table:table-cell>
          <table:table-cell table:style-name="ce12N2" office:value-type="float" office:value="5783.91">
            <text:p>5783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155411651891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7">
            <text:p>30808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6.9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02.21">
            <text:p>2240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06.81">
            <text:p>20806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796">
            <text:p>0,818</text:p>
          </table:table-cell>
          <table:table-cell table:style-name="ce12N2" office:value-type="float" office:value="90.5">
            <text:p>9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02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60.43">
            <text:p>17560,43</text:p>
          </table:table-cell>
          <table:table-cell table:style-name="ce12N2" office:value-type="float" office:value="17.56">
            <text:p>1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04">
            <text:p>158,0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595.4">
            <text:p>1595,40</text:p>
          </table:table-cell>
          <table:table-cell table:style-name="ce12N2" office:value-type="float" office:value="20806.81">
            <text:p>20806,81</text:p>
          </table:table-cell>
          <table:table-cell table:style-name="ce12N2" office:value-type="float" office:value="1456.48">
            <text:p>145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69241570439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0">
            <text:p>308090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7.25">
            <text:p>244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496">
            <text:p>0,89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77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34.68">
            <text:p>20134,68</text:p>
          </table:table-cell>
          <table:table-cell table:style-name="ce12N2" office:value-type="float" office:value="20.13">
            <text:p>2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1">
            <text:p>181,21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20.28">
            <text:p>620,28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1669.99">
            <text:p>166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31932554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1">
            <text:p>308091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3.56">
            <text:p>8173,56</text:p>
          </table:table-cell>
          <table:table-cell table:style-name="ce12N2" office:value-type="float" office:value="674.24">
            <text:p>674,24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590.52">
            <text:p>859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137">
            <text:p>2,514</text:p>
          </table:table-cell>
          <table:table-cell table:style-name="ce12N2" office:value-type="float" office:value="144">
            <text:p>1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29.88">
            <text:p>6629,88</text:p>
          </table:table-cell>
          <table:table-cell table:style-name="ce12N2" office:value-type="float" office:value="6.63">
            <text:p>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67">
            <text:p>59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7916.28">
            <text:p>7916,28</text:p>
          </table:table-cell>
          <table:table-cell table:style-name="ce12N2" office:value-type="float" office:value="554.14">
            <text:p>55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5081122000180550010000163111000140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2">
            <text:p>30809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1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">
            <text:p>0,068</text:p>
          </table:table-cell>
          <table:table-cell table:style-name="ce12N2" office:value-type="float" office:value="5.76">
            <text:p>5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.64">
            <text:p>447,64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37.13">
            <text:p>3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1912451613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3">
            <text:p>308093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7.91">
            <text:p>23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88.16">
            <text:p>2288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">
            <text:p>7,200</text:p>
          </table:table-cell>
          <table:table-cell table:style-name="ce12N2" office:value-type="float" office:value="8.64">
            <text:p>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7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6.34">
            <text:p>1916,34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5">
            <text:p>17,25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9.75">
            <text:p>29,75</text:p>
          </table:table-cell>
          <table:table-cell table:style-name="ce12N2" office:value-type="float" office:value="2288.16">
            <text:p>2288,16</text:p>
          </table:table-cell>
          <table:table-cell table:style-name="ce12N2" office:value-type="float" office:value="160.17">
            <text:p>16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4542238000178550010000969781000967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4">
            <text:p>30809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8.39">
            <text:p>97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1.8">
            <text:p>9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3">
            <text:p>0,004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6.41">
            <text:p>786,4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08">
            <text:p>7,0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.59">
            <text:p>46,59</text:p>
          </table:table-cell>
          <table:table-cell table:style-name="ce12N2" office:value-type="float" office:value="931.8">
            <text:p>931,80</text:p>
          </table:table-cell>
          <table:table-cell table:style-name="ce12N2" office:value-type="float" office:value="65.23">
            <text:p>6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281021736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5">
            <text:p>30809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2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26">
            <text:p>132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5.7">
            <text:p>120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3">
            <text:p>0,001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7.58">
            <text:p>1017,58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7.56">
            <text:p>117,56</text:p>
          </table:table-cell>
          <table:table-cell table:style-name="ce12N2" office:value-type="float" office:value="1205.7">
            <text:p>1205,70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27193129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6">
            <text:p>30809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4.72">
            <text:p>21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77.2">
            <text:p>20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4">
            <text:p>0,060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11">
            <text:p>1753,1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7.52">
            <text:p>67,52</text:p>
          </table:table-cell>
          <table:table-cell table:style-name="ce12N2" office:value-type="float" office:value="2077.2">
            <text:p>2077,20</text:p>
          </table:table-cell>
          <table:table-cell table:style-name="ce12N2" office:value-type="float" office:value="145.4">
            <text:p>14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017213967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7">
            <text:p>30809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.46">
            <text:p>62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7.7">
            <text:p>58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36">
            <text:p>0,004</text:p>
          </table:table-cell>
          <table:table-cell table:style-name="ce12N2" office:value-type="float" office:value="3.29">
            <text:p>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2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6">
            <text:p>496,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6">
            <text:p>4,4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4.76">
            <text:p>34,76</text:p>
          </table:table-cell>
          <table:table-cell table:style-name="ce12N2" office:value-type="float" office:value="587.7">
            <text:p>587,70</text:p>
          </table:table-cell>
          <table:table-cell table:style-name="ce12N2" office:value-type="float" office:value="41.14">
            <text:p>4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81766936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8">
            <text:p>3080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88.19">
            <text:p>808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33.6">
            <text:p>78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04">
            <text:p>0,005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8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4.63">
            <text:p>6824,6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54.59">
            <text:p>254,59</text:p>
          </table:table-cell>
          <table:table-cell table:style-name="ce12N2" office:value-type="float" office:value="7833.6">
            <text:p>7833,60</text:p>
          </table:table-cell>
          <table:table-cell table:style-name="ce12N2" office:value-type="float" office:value="313.34">
            <text:p>31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71294483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9">
            <text:p>308099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3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582.38">
            <text:p>7658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76207.8">
            <text:p>7620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90.201388">
            <text:p>1490,201</text:p>
          </table:table-cell>
          <table:table-cell table:style-name="ce12N2" office:value-type="float" office:value="1189.38">
            <text:p>1189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58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843.3">
            <text:p>65843,30</text:p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2.6">
            <text:p>592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74.58">
            <text:p>374,58</text:p>
          </table:table-cell>
          <table:table-cell table:style-name="ce12N2" office:value-type="float" office:value="76207.8">
            <text:p>76207,80</text:p>
          </table:table-cell>
          <table:table-cell table:style-name="ce12N2" office:value-type="float" office:value="3653.23">
            <text:p>365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3671013769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0">
            <text:p>308100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2">
            <text:p>0,102</text:p>
          </table:table-cell>
          <table:table-cell table:style-name="ce12N2" office:value-type="float" office:value="10.2">
            <text:p>1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.72">
            <text:p>1566,72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65.28">
            <text:p>6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3681505111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1">
            <text:p>308101</text:p>
          </table:table-cell>
          <table:table-cell table:style-name="ce0" table:number-columns-spanned="4" table:number-rows-spanned="1" office:value-type="string" calcext:value-type="string">
            <text:p>8.415 - SIMAPPEL SIMAO PEREIRA IND COM DE PAPEIS LTDA</text:p>
          </table:table-cell>
          <table:covered-table-cell table:number-columns-repeated="3"/>
          <table:table-cell table:style-name="ce0" office:value-type="string" calcext:value-type="string">
            <text:p>21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234.26">
            <text:p>7023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8023.5">
            <text:p>6802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4.3664">
            <text:p>704,366</text:p>
          </table:table-cell>
          <table:table-cell table:style-name="ce12N2" office:value-type="float" office:value="13470">
            <text:p>134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23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52.79">
            <text:p>60952,79</text:p>
          </table:table-cell>
          <table:table-cell table:style-name="ce12N2" office:value-type="float" office:value="60.95">
            <text:p>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.57">
            <text:p>548,5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210.76">
            <text:p>2210,76</text:p>
          </table:table-cell>
          <table:table-cell table:style-name="ce12N2" office:value-type="float" office:value="68023.5">
            <text:p>68023,50</text:p>
          </table:table-cell>
          <table:table-cell table:style-name="ce12N2" office:value-type="float" office:value="4761.65">
            <text:p>476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3631764000173550010000210761888378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2">
            <text:p>308102</text:p>
          </table:table-cell>
          <table:table-cell table:style-name="ce0" table:number-columns-spanned="4" table:number-rows-spanned="1" office:value-type="string" calcext:value-type="string">
            <text:p>744 - INDUSAT INDUSTRIA E COMERCIO LTDA</text:p>
          </table:table-cell>
          <table:covered-table-cell table:number-columns-repeated="3"/>
          <table:table-cell table:style-name="ce0" office:value-type="string" calcext:value-type="string">
            <text:p>123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69.52">
            <text:p>356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">
            <text:p>0,000</text:p>
          </table:table-cell>
          <table:table-cell table:style-name="ce12N2" office:value-type="float" office:value="137.5">
            <text:p>13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9.76">
            <text:p>3109,76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99">
            <text:p>27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78.48">
            <text:p>178,48</text:p>
          </table:table-cell>
          <table:table-cell table:style-name="ce12N2" office:value-type="float" office:value="3569.52">
            <text:p>3569,52</text:p>
          </table:table-cell>
          <table:table-cell table:style-name="ce12N2" office:value-type="float" office:value="142.78">
            <text:p>14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65339590000127550010001234491048074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6">
            <text:p>308106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2.9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58">
            <text:p>4,758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59.58">
            <text:p>12259,58</text:p>
          </table:table-cell>
          <table:table-cell table:style-name="ce12N2" office:value-type="float" office:value="12.26">
            <text:p>1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.34">
            <text:p>110,3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1016.82">
            <text:p>101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29511059834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7">
            <text:p>308107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2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787">
            <text:p>2,079</text:p>
          </table:table-cell>
          <table:table-cell table:style-name="ce12N2" office:value-type="float" office:value="1076.4">
            <text:p>10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7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12.06">
            <text:p>16012,06</text:p>
          </table:table-cell>
          <table:table-cell table:style-name="ce12N2" office:value-type="float" office:value="16.02">
            <text:p>1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.11">
            <text:p>144,1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1328.05">
            <text:p>13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29501332655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8">
            <text:p>30810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1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93.46">
            <text:p>1209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15.36">
            <text:p>1201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51462">
            <text:p>2,351</text:p>
          </table:table-cell>
          <table:table-cell table:style-name="ce12N2" office:value-type="float" office:value="12799.99">
            <text:p>127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9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40.65">
            <text:p>10140,65</text:p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27">
            <text:p>91,2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8.1">
            <text:p>78,10</text:p>
          </table:table-cell>
          <table:table-cell table:style-name="ce12N2" office:value-type="float" office:value="12015.36">
            <text:p>12015,36</text:p>
          </table:table-cell>
          <table:table-cell table:style-name="ce12N2" office:value-type="float" office:value="841.08">
            <text:p>84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191496593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0">
            <text:p>30811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75.01">
            <text:p>877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18.34">
            <text:p>871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02182">
            <text:p>1,902</text:p>
          </table:table-cell>
          <table:table-cell table:style-name="ce12N2" office:value-type="float" office:value="10240">
            <text:p>10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75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58.07">
            <text:p>7358,07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22">
            <text:p>66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6.67">
            <text:p>56,67</text:p>
          </table:table-cell>
          <table:table-cell table:style-name="ce12N2" office:value-type="float" office:value="8718.34">
            <text:p>8718,34</text:p>
          </table:table-cell>
          <table:table-cell table:style-name="ce12N2" office:value-type="float" office:value="610.28">
            <text:p>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01652001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2">
            <text:p>30811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07.18">
            <text:p>13510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3629">
            <text:p>7,136</text:p>
          </table:table-cell>
          <table:table-cell table:style-name="ce12N2" office:value-type="float" office:value="1347.5">
            <text:p>134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5.10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596.02">
            <text:p>108596,02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36">
            <text:p>977,36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6.1">
            <text:p>10456,1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4986.05">
            <text:p>49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9381426612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3">
            <text:p>30811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5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997.6">
            <text:p>13999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9997.6">
            <text:p>1399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89974">
            <text:p>18,900</text:p>
          </table:table-cell>
          <table:table-cell table:style-name="ce12N2" office:value-type="float" office:value="5969.96">
            <text:p>5969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9.99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041.37">
            <text:p>121041,37</text:p>
          </table:table-cell>
          <table:table-cell table:style-name="ce12N2" office:value-type="float" office:value="121.04">
            <text:p>1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9.37">
            <text:p>1089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997.6">
            <text:p>139997,60</text:p>
          </table:table-cell>
          <table:table-cell table:style-name="ce12N2" office:value-type="float" office:value="6618.69">
            <text:p>661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56551601117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5">
            <text:p>308115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2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9.22">
            <text:p>810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11.96">
            <text:p>791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012">
            <text:p>2,301</text:p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09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77.51">
            <text:p>6677,51</text:p>
          </table:table-cell>
          <table:table-cell table:style-name="ce12N2" office:value-type="float" office:value="6.68">
            <text:p>6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97.26">
            <text:p>197,26</text:p>
          </table:table-cell>
          <table:table-cell table:style-name="ce12N2" office:value-type="float" office:value="7911.96">
            <text:p>7911,96</text:p>
          </table:table-cell>
          <table:table-cell table:style-name="ce12N2" office:value-type="float" office:value="553.84">
            <text:p>55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150751009135550010005626301477442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7">
            <text:p>308117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0.28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214.18">
            <text:p>214,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91.18">
            <text:p>6591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456">
            <text:p>6,346</text:p>
          </table:table-cell>
          <table:table-cell table:style-name="ce12N2" office:value-type="float" office:value="8000">
            <text:p>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7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29.7">
            <text:p>4629,70</text:p>
          </table:table-cell>
          <table:table-cell table:style-name="ce12N2" office:value-type="float" office:value="4.63">
            <text:p>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1275.4">
            <text:p>127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5028211656229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8">
            <text:p>308118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0.28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92">
            <text:p>19692,00</text:p>
          </table:table-cell>
          <table:table-cell table:style-name="ce12N2" office:value-type="float" office:value="661.43">
            <text:p>661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96.05">
            <text:p>1959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46">
            <text:p>23,460</text:p>
          </table:table-cell>
          <table:table-cell table:style-name="ce12N2" office:value-type="float" office:value="30000">
            <text:p>3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46.54">
            <text:p>13746,54</text:p>
          </table:table-cell>
          <table:table-cell table:style-name="ce12N2" office:value-type="float" office:value="13.75">
            <text:p>1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72">
            <text:p>123,72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34.62">
            <text:p>18934,62</text:p>
          </table:table-cell>
          <table:table-cell table:style-name="ce12N2" office:value-type="float" office:value="3786.92">
            <text:p>378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2721.54">
            <text:p>22721,54</text:p>
          </table:table-cell>
          <table:table-cell table:style-name="ce12N2" office:value-type="float" office:value="757.38">
            <text:p>757,3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5028316711415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9">
            <text:p>30811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12">
            <text:p>0,005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20">
            <text:p>30812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31524">
            <text:p>3,332</text:p>
          </table:table-cell>
          <table:table-cell table:style-name="ce12N2" office:value-type="float" office:value="514.4">
            <text:p>5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22">
            <text:p>308122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017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607.81">
            <text:p>6160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607.81">
            <text:p>6160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.008">
            <text:p>43,008</text:p>
          </table:table-cell>
          <table:table-cell table:style-name="ce12N2" office:value-type="float" office:value="37800">
            <text:p>37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60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199.99">
            <text:p>49199,99</text:p>
          </table:table-cell>
          <table:table-cell table:style-name="ce12N2" office:value-type="float" office:value="49.2">
            <text:p>4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2.8">
            <text:p>442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607.81">
            <text:p>61607,81</text:p>
          </table:table-cell>
          <table:table-cell table:style-name="ce12N2" office:value-type="float" office:value="7392.94">
            <text:p>739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501719605317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23">
            <text:p>308123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016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69.05">
            <text:p>1076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69.05">
            <text:p>1076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537216">
            <text:p>6,537</text:p>
          </table:table-cell>
          <table:table-cell table:style-name="ce12N2" office:value-type="float" office:value="5745.6">
            <text:p>57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69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0.16">
            <text:p>8600,16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69.05">
            <text:p>10769,05</text:p>
          </table:table-cell>
          <table:table-cell table:style-name="ce12N2" office:value-type="float" office:value="1292.29">
            <text:p>129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50161722470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25">
            <text:p>308125</text:p>
          </table:table-cell>
          <table:table-cell table:style-name="ce0" table:number-columns-spanned="4" table:number-rows-spanned="1" office:value-type="string" calcext:value-type="string">
            <text:p>15.543 - SAINT-GOBAIN DO BRASIL PROD IND E P/ CONSTRUCAO LTDA</text:p>
          </table:table-cell>
          <table:covered-table-cell table:number-columns-repeated="3"/>
          <table:table-cell table:style-name="ce0" office:value-type="string" calcext:value-type="string">
            <text:p>167.7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5.6">
            <text:p>2044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45.6">
            <text:p>2044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96">
            <text:p>0,470</text:p>
          </table:table-cell>
          <table:table-cell table:style-name="ce12N2" office:value-type="float" office:value="6015.2">
            <text:p>60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27.86">
            <text:p>16327,86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5">
            <text:p>146,9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5.6">
            <text:p>20445,60</text:p>
          </table:table-cell>
          <table:table-cell table:style-name="ce12N2" office:value-type="float" office:value="2453.47">
            <text:p>245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61064838014193550010001677421835198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70">
            <text:p>170,00</text:p>
          </table:table-cell>
          <table:table-cell table:style-name="ce26N2" office:value-type="float" office:value="1549.85">
            <text:p>1549,85</text:p>
          </table:table-cell>
          <table:table-cell table:style-name="ce26N2" office:value-type="float" office:value="1760.13">
            <text:p>1760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7459.44">
            <text:p>117459,44</text:p>
          </table:table-cell>
          <table:table-cell table:style-name="ce26N2" office:value-type="float" office:value="6152312.25">
            <text:p>6152312,25</text:p>
          </table:table-cell>
          <table:table-cell table:style-name="ce26N2" office:value-type="float" office:value="401172.8">
            <text:p>401172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535.28">
            <text:p>2535,28</text:p>
          </table:table-cell>
          <table:table-cell table:style-name="ce26N2" office:value-type="float" office:value="6316774.74">
            <text:p>6316774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7166.26">
            <text:p>77166,26</text:p>
          </table:table-cell>
          <table:table-cell table:style-name="ce26N2" office:value-type="float" office:value="10515.97">
            <text:p>10515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585.81254">
            <text:p>4585,813</text:p>
          </table:table-cell>
          <table:table-cell table:style-name="ce26N2" office:value-type="float" office:value="6188589.05">
            <text:p>6188589,05</text:p>
          </table:table-cell>
          <table:table-cell table:style-name="ce26N2" office:value-type="float" office:value="6316774.74">
            <text:p>6316774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42776.53">
            <text:p>942776,53</text:p>
          </table:table-cell>
          <table:table-cell table:style-name="ce26N2" office:value-type="float" office:value="942.81">
            <text:p>942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485">
            <text:p>8485,0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71192.83">
            <text:p>471192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6.98">
            <text:p>36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82" meta:object-count="0"/>
    <meta:generator>LibreOffice/4.3.0.4$Windows_x86 LibreOffice_project/62ad5818884a2fc2e5780dd45466868d41009ec0</meta:generator>
  </office:meta>
</office:document-meta>
</file>