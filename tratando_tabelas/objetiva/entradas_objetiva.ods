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2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1">
            <text:p>3101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39.84">
            <text:p>403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39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4.35">
            <text:p>3474,35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27">
            <text:p>31,27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1.84">
            <text:p>51,84</text:p>
          </table:table-cell>
          <table:table-cell table:style-name="ce12N2" office:value-type="float" office:value="3988">
            <text:p>3988,00</text:p>
          </table:table-cell>
          <table:table-cell table:style-name="ce12N2" office:value-type="float" office:value="159.52">
            <text:p>15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21711473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2">
            <text:p>31011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.97">
            <text:p>80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3.32">
            <text:p>13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88">
            <text:p>694,88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797.6">
            <text:p>797,60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31888436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1">
            <text:p>31012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1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88.68">
            <text:p>41088,68</text:p>
          </table:table-cell>
          <table:table-cell table:style-name="ce12N2" office:value-type="float" office:value="2412.77">
            <text:p>2412,77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9851.2">
            <text:p>3985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586">
            <text:p>6,286</text:p>
          </table:table-cell>
          <table:table-cell table:style-name="ce12N2" office:value-type="float" office:value="2047.2">
            <text:p>204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08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16.37">
            <text:p>32616,37</text:p>
          </table:table-cell>
          <table:table-cell table:style-name="ce12N2" office:value-type="float" office:value="32.62">
            <text:p>3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.55">
            <text:p>293,55</text:p>
          </table:table-cell>
          <table:table-cell table:style-name="ce12N2" office:value-type="float" office:value="79.03">
            <text:p>79,0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650.25">
            <text:p>3650,25</text:p>
          </table:table-cell>
          <table:table-cell table:style-name="ce12N2" office:value-type="float" office:value="37438.43">
            <text:p>37438,43</text:p>
          </table:table-cell>
          <table:table-cell table:style-name="ce12N2" office:value-type="float" office:value="1497.53">
            <text:p>149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31509154142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7">
            <text:p>31020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6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">
            <text:p>0,060</text:p>
          </table:table-cell>
          <table:table-cell table:style-name="ce12N2" office:value-type="float" office:value="301.5">
            <text:p>3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7.09">
            <text:p>5467,09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21">
            <text:p>49,2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90.6">
            <text:p>6290,60</text:p>
          </table:table-cell>
          <table:table-cell table:style-name="ce12N2" office:value-type="float" office:value="266.23">
            <text:p>26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663101770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8">
            <text:p>31020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5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142">
            <text:p>0,561</text:p>
          </table:table-cell>
          <table:table-cell table:style-name="ce12N2" office:value-type="float" office:value="619.21">
            <text:p>61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15.41">
            <text:p>6615,41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54">
            <text:p>59,5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38.4">
            <text:p>7838,40</text:p>
          </table:table-cell>
          <table:table-cell table:style-name="ce12N2" office:value-type="float" office:value="548.69">
            <text:p>54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1099539000102550010002557551163844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15">
            <text:p>310215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8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07.51466">
            <text:p>807,515</text:p>
          </table:table-cell>
          <table:table-cell table:style-name="ce12N2" office:value-type="float" office:value="3713.9">
            <text:p>37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3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21.48">
            <text:p>74221,48</text:p>
          </table:table-cell>
          <table:table-cell table:style-name="ce12N2" office:value-type="float" office:value="74.2">
            <text:p>7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98">
            <text:p>667,98</text:p>
          </table:table-cell>
          <table:table-cell table:style-name="ce12N2" office:value-type="float" office:value="37.5">
            <text:p>37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831.4">
            <text:p>82831,40</text:p>
          </table:table-cell>
          <table:table-cell table:style-name="ce12N2" office:value-type="float" office:value="5798.2">
            <text:p>579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827610000142550010000686801816218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3">
            <text:p>310263</text:p>
          </table:table-cell>
          <table:table-cell table:style-name="ce0" table:number-columns-spanned="4" table:number-rows-spanned="1" office:value-type="string" calcext:value-type="string">
            <text:p>8.753 - ANCORA GROUP LTDA</text:p>
          </table:table-cell>
          <table:covered-table-cell table:number-columns-repeated="3"/>
          <table:table-cell table:style-name="ce0" office:value-type="string" calcext:value-type="string">
            <text:p>59.47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2.11">
            <text:p>6567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898">
            <text:p>4,999</text:p>
          </table:table-cell>
          <table:table-cell table:style-name="ce12N2" office:value-type="float" office:value="2976.9">
            <text:p>2976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2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785.43">
            <text:p>56785,43</text:p>
          </table:table-cell>
          <table:table-cell table:style-name="ce12N2" office:value-type="float" office:value="56.78">
            <text:p>5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07">
            <text:p>511,07</text:p>
          </table:table-cell>
          <table:table-cell table:style-name="ce12N2" office:value-type="float" office:value="98.58">
            <text:p>98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91.41">
            <text:p>491,41</text:p>
          </table:table-cell>
          <table:table-cell table:style-name="ce12N2" office:value-type="float" office:value="65180.7">
            <text:p>65180,70</text:p>
          </table:table-cell>
          <table:table-cell table:style-name="ce12N2" office:value-type="float" office:value="2607.22">
            <text:p>260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67647412000350550100000594771103372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6">
            <text:p>31029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12.16">
            <text:p>336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3928">
            <text:p>2,004</text:p>
          </table:table-cell>
          <table:table-cell table:style-name="ce12N2" office:value-type="float" office:value="155.68">
            <text:p>15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367.66">
            <text:p>28367,66</text:p>
          </table:table-cell>
          <table:table-cell table:style-name="ce12N2" office:value-type="float" office:value="28.37">
            <text:p>2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32">
            <text:p>255,32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5.39">
            <text:p>25,39</text:p>
          </table:table-cell>
          <table:table-cell table:style-name="ce12N2" office:value-type="float" office:value="33586.77">
            <text:p>33586,77</text:p>
          </table:table-cell>
          <table:table-cell table:style-name="ce12N2" office:value-type="float" office:value="2327.64">
            <text:p>23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2110573457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4">
            <text:p>31047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6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293.88">
            <text:p>332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6196">
            <text:p>0,796</text:p>
          </table:table-cell>
          <table:table-cell table:style-name="ce12N2" office:value-type="float" office:value="1409">
            <text:p>140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2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77.95">
            <text:p>26477,95</text:p>
          </table:table-cell>
          <table:table-cell table:style-name="ce12N2" office:value-type="float" office:value="26.48">
            <text:p>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32">
            <text:p>238,32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2901.42">
            <text:p>2901,42</text:p>
          </table:table-cell>
          <table:table-cell table:style-name="ce12N2" office:value-type="float" office:value="30392.46">
            <text:p>30392,46</text:p>
          </table:table-cell>
          <table:table-cell table:style-name="ce12N2" office:value-type="float" office:value="1215.69">
            <text:p>12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64431589480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1">
            <text:p>310551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0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52131">
            <text:p>21,521</text:p>
          </table:table-cell>
          <table:table-cell table:style-name="ce12N2" office:value-type="float" office:value="6563.53">
            <text:p>656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297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40.19">
            <text:p>73440,19</text:p>
          </table:table-cell>
          <table:table-cell table:style-name="ce12N2" office:value-type="float" office:value="73.45">
            <text:p>7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0.97">
            <text:p>660,97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297.72">
            <text:p>84297,72</text:p>
          </table:table-cell>
          <table:table-cell table:style-name="ce12N2" office:value-type="float" office:value="3371.91">
            <text:p>337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01590328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2">
            <text:p>310552</text:p>
          </table:table-cell>
          <table:table-cell table:style-name="ce0" table:number-columns-spanned="4" table:number-rows-spanned="1" office:value-type="string" calcext:value-type="string">
            <text:p>21.365 - EUCATEX S A INDUSTRIA E COMERCIO</text:p>
          </table:table-cell>
          <table:covered-table-cell table:number-columns-repeated="3"/>
          <table:table-cell table:style-name="ce0" office:value-type="string" calcext:value-type="string">
            <text:p>43.741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.474514">
            <text:p>21,475</text:p>
          </table:table-cell>
          <table:table-cell table:style-name="ce12N2" office:value-type="float" office:value="14482.15">
            <text:p>14482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2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92.96">
            <text:p>83892,9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5.04">
            <text:p>755,0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295.86">
            <text:p>96295,86</text:p>
          </table:table-cell>
          <table:table-cell table:style-name="ce12N2" office:value-type="float" office:value="3851.83">
            <text:p>385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643018010390550400000437411596816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78">
            <text:p>310578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8.7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.18105">
            <text:p>150,181</text:p>
          </table:table-cell>
          <table:table-cell table:style-name="ce12N2" office:value-type="float" office:value="722">
            <text:p>7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25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412.3">
            <text:p>40412,30</text:p>
          </table:table-cell>
          <table:table-cell table:style-name="ce12N2" office:value-type="float" office:value="40.41">
            <text:p>4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.71">
            <text:p>363,71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53.5">
            <text:p>48253,50</text:p>
          </table:table-cell>
          <table:table-cell table:style-name="ce12N2" office:value-type="float" office:value="3377.75">
            <text:p>337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38506700014055001000048746117038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7">
            <text:p>310797</text:p>
          </table:table-cell>
          <table:table-cell table:style-name="ce0" table:number-columns-spanned="4" table:number-rows-spanned="1" office:value-type="string" calcext:value-type="string">
            <text:p>14.578 - CARBOGRAFITE EQUIPAMENTOS INDUSTRIAIS LTDA</text:p>
          </table:table-cell>
          <table:covered-table-cell table:number-columns-repeated="3"/>
          <table:table-cell table:style-name="ce0" office:value-type="string" calcext:value-type="string">
            <text:p>811.87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0">
            <text:p>2910,00</text:p>
          </table:table-cell>
          <table:table-cell table:style-name="ce12N2" office:value-type="float" office:value="7.99">
            <text:p>7,99</text:p>
          </table:table-cell>
          <table:table-cell table:style-name="ce12N3" office:value-type="float" office:value="0.6">
            <text:p>0,600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4.72">
            <text:p>2454,72</text:p>
          </table:table-cell>
          <table:table-cell table:style-name="ce12N2" office:value-type="float" office:value="2.45">
            <text:p>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09">
            <text:p>22,0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7.99">
            <text:p>2917,99</text:p>
          </table:table-cell>
          <table:table-cell table:style-name="ce12N2" office:value-type="float" office:value="204.26">
            <text:p>20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6427615000146550000008118791882593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2">
            <text:p>31082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73.86">
            <text:p>16827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92825">
            <text:p>32,928</text:p>
          </table:table-cell>
          <table:table-cell table:style-name="ce12N2" office:value-type="float" office:value="3047.75">
            <text:p>3047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.27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548.61">
            <text:p>137548,61</text:p>
          </table:table-cell>
          <table:table-cell table:style-name="ce12N2" office:value-type="float" office:value="137.55">
            <text:p>13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7.94">
            <text:p>1237,94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5296.76">
            <text:p>5296,76</text:p>
          </table:table-cell>
          <table:table-cell table:style-name="ce12N2" office:value-type="float" office:value="162977.1">
            <text:p>162977,10</text:p>
          </table:table-cell>
          <table:table-cell table:style-name="ce12N2" office:value-type="float" office:value="11408.4">
            <text:p>114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61942486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23">
            <text:p>310823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92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04.89">
            <text:p>5900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57181.49">
            <text:p>57181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612303">
            <text:p>19,612</text:p>
          </table:table-cell>
          <table:table-cell table:style-name="ce12N2" office:value-type="float" office:value="3489.36">
            <text:p>348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.004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892">
            <text:p>48892,00</text:p>
          </table:table-cell>
          <table:table-cell table:style-name="ce12N2" office:value-type="float" office:value="48.88">
            <text:p>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.05">
            <text:p>440,05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823.4">
            <text:p>1823,40</text:p>
          </table:table-cell>
          <table:table-cell table:style-name="ce12N2" office:value-type="float" office:value="51916.07">
            <text:p>51916,07</text:p>
          </table:table-cell>
          <table:table-cell table:style-name="ce12N2" office:value-type="float" office:value="3306.01">
            <text:p>330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0808396000521550010008923871682680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6">
            <text:p>310836</text:p>
          </table:table-cell>
          <table:table-cell table:style-name="ce0" table:number-columns-spanned="4" table:number-rows-spanned="1" office:value-type="string" calcext:value-type="string">
            <text:p>26.383 - INDUSTRIA DRYKO LTDA</text:p>
          </table:table-cell>
          <table:covered-table-cell table:number-columns-repeated="3"/>
          <table:table-cell table:style-name="ce0" office:value-type="string" calcext:value-type="string">
            <text:p>96.82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31.6">
            <text:p>1128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508">
            <text:p>49,508</text:p>
          </table:table-cell>
          <table:table-cell table:style-name="ce12N2" office:value-type="float" office:value="25000">
            <text:p>2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8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229.59">
            <text:p>92229,59</text:p>
          </table:table-cell>
          <table:table-cell table:style-name="ce12N2" office:value-type="float" office:value="92.23">
            <text:p>9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0.07">
            <text:p>830,07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3551.6">
            <text:p>3551,60</text:p>
          </table:table-cell>
          <table:table-cell table:style-name="ce12N2" office:value-type="float" office:value="109280">
            <text:p>109280,00</text:p>
          </table:table-cell>
          <table:table-cell table:style-name="ce12N2" office:value-type="float" office:value="7649.6">
            <text:p>764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0818950005585500500009682418378530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39">
            <text:p>310839</text:p>
          </table:table-cell>
          <table:table-cell table:style-name="ce0" table:number-columns-spanned="4" table:number-rows-spanned="1" office:value-type="string" calcext:value-type="string">
            <text:p>602 - DECORLUX MATERIAL ELETRICO LTDA</text:p>
          </table:table-cell>
          <table:covered-table-cell table:number-columns-repeated="3"/>
          <table:table-cell table:style-name="ce0" office:value-type="string" calcext:value-type="string">
            <text:p>204.8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04.41">
            <text:p>2860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7.699055">
            <text:p>377,699</text:p>
          </table:table-cell>
          <table:table-cell table:style-name="ce12N2" office:value-type="float" office:value="78.47">
            <text:p>78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0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047.16">
            <text:p>23047,16</text:p>
          </table:table-cell>
          <table:table-cell table:style-name="ce12N2" office:value-type="float" office:value="23.06">
            <text:p>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.43">
            <text:p>207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49.87">
            <text:p>2149,87</text:p>
          </table:table-cell>
          <table:table-cell table:style-name="ce12N2" office:value-type="float" office:value="26454.54">
            <text:p>26454,54</text:p>
          </table:table-cell>
          <table:table-cell table:style-name="ce12N2" office:value-type="float" office:value="1058.19">
            <text:p>105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2382942000107550010002048841235478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0">
            <text:p>310840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2.36">
            <text:p>3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4">
            <text:p>0,059</text:p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5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9.34">
            <text:p>2859,34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3">
            <text:p>25,73</text:p>
          </table:table-cell>
          <table:table-cell table:style-name="ce12N2" office:value-type="float" office:value="44.08">
            <text:p>44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3335.55">
            <text:p>3335,55</text:p>
          </table:table-cell>
          <table:table-cell table:style-name="ce12N2" office:value-type="float" office:value="133.42">
            <text:p>13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81820249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41">
            <text:p>3108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8.7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635">
            <text:p>0,038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33.65">
            <text:p>7033,65</text:p>
          </table:table-cell>
          <table:table-cell table:style-name="ce12N2" office:value-type="float" office:value="7.03">
            <text:p>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3">
            <text:p>63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33.95">
            <text:p>8333,95</text:p>
          </table:table-cell>
          <table:table-cell table:style-name="ce12N2" office:value-type="float" office:value="583.38">
            <text:p>58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87971397790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3">
            <text:p>310853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175">
            <text:p>2,317</text:p>
          </table:table-cell>
          <table:table-cell table:style-name="ce12N2" office:value-type="float" office:value="710.5">
            <text:p>7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44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255.92">
            <text:p>17255,92</text:p>
          </table:table-cell>
          <table:table-cell table:style-name="ce12N2" office:value-type="float" office:value="17.23">
            <text:p>1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.27">
            <text:p>155,27</text:p>
          </table:table-cell>
          <table:table-cell table:style-name="ce12N2" office:value-type="float" office:value="49.33">
            <text:p>49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46">
            <text:p>20446,00</text:p>
          </table:table-cell>
          <table:table-cell table:style-name="ce12N2" office:value-type="float" office:value="1431.22">
            <text:p>14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002961810001455500100001852710015324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4">
            <text:p>310854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75.7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.66">
            <text:p>184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712">
            <text:p>0,153</text:p>
          </table:table-cell>
          <table:table-cell table:style-name="ce12N2" office:value-type="float" office:value="26.6">
            <text:p>2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4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8.66">
            <text:p>1458,66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3">
            <text:p>13,1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112.34">
            <text:p>112,34</text:p>
          </table:table-cell>
          <table:table-cell table:style-name="ce12N2" office:value-type="float" office:value="1728.32">
            <text:p>1728,32</text:p>
          </table:table-cell>
          <table:table-cell table:style-name="ce12N2" office:value-type="float" office:value="120.98">
            <text:p>12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5023800011455001001375707121875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7">
            <text:p>310857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25">
            <text:p>13,125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69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71.75">
            <text:p>9871,75</text:p>
          </table:table-cell>
          <table:table-cell table:style-name="ce12N2" office:value-type="float" office:value="9.87">
            <text:p>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85">
            <text:p>88,85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96.73">
            <text:p>11696,73</text:p>
          </table:table-cell>
          <table:table-cell table:style-name="ce12N2" office:value-type="float" office:value="818.77">
            <text:p>8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6051068935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59">
            <text:p>310859</text:p>
          </table:table-cell>
          <table:table-cell table:style-name="ce0" table:number-columns-spanned="4" table:number-rows-spanned="1" office:value-type="string" calcext:value-type="string">
            <text:p>13.600 - ANJO QUIMICA DO BRASIL LTDA</text:p>
          </table:table-cell>
          <table:covered-table-cell table:number-columns-repeated="3"/>
          <table:table-cell table:style-name="ce0" office:value-type="string" calcext:value-type="string">
            <text:p>481.10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567">
            <text:p>5,457</text:p>
          </table:table-cell>
          <table:table-cell table:style-name="ce12N2" office:value-type="float" office:value="3753">
            <text:p>37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69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787">
            <text:p>42787,00</text:p>
          </table:table-cell>
          <table:table-cell table:style-name="ce12N2" office:value-type="float" office:value="42.79">
            <text:p>42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08">
            <text:p>385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697">
            <text:p>50697,00</text:p>
          </table:table-cell>
          <table:table-cell table:style-name="ce12N2" office:value-type="float" office:value="3548.79">
            <text:p>354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92134600015855002000481107191591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1">
            <text:p>31087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3.38">
            <text:p>14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9">
            <text:p>0,054</text:p>
          </table:table-cell>
          <table:table-cell table:style-name="ce12N2" office:value-type="float" office:value="14.22">
            <text:p>14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.62">
            <text:p>1185,62</text:p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67">
            <text:p>10,67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89.49">
            <text:p>89,49</text:p>
          </table:table-cell>
          <table:table-cell table:style-name="ce12N2" office:value-type="float" office:value="1403.89">
            <text:p>1403,89</text:p>
          </table:table-cell>
          <table:table-cell table:style-name="ce12N2" office:value-type="float" office:value="97.42">
            <text:p>9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29815704430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74">
            <text:p>310874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7.906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141.2">
            <text:p>7514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005">
            <text:p>0,192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14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46.9">
            <text:p>65346,90</text:p>
          </table:table-cell>
          <table:table-cell table:style-name="ce12N2" office:value-type="float" office:value="65.35">
            <text:p>6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12">
            <text:p>588,1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33.27">
            <text:p>133,27</text:p>
          </table:table-cell>
          <table:table-cell table:style-name="ce12N2" office:value-type="float" office:value="75007.93">
            <text:p>75007,93</text:p>
          </table:table-cell>
          <table:table-cell table:style-name="ce12N2" office:value-type="float" office:value="3000.32">
            <text:p>300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274105100018555055000307906161402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1">
            <text:p>3108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7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">
            <text:p>0,017</text:p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0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8.9">
            <text:p>2368,90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2">
            <text:p>2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6.8">
            <text:p>2806,80</text:p>
          </table:table-cell>
          <table:table-cell table:style-name="ce12N2" office:value-type="float" office:value="196.48">
            <text:p>1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727165890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2">
            <text:p>31088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125">
            <text:p>0,829</text:p>
          </table:table-cell>
          <table:table-cell table:style-name="ce12N2" office:value-type="float" office:value="279.25">
            <text:p>27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8.17">
            <text:p>6828,17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5">
            <text:p>61,4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90.5">
            <text:p>8090,50</text:p>
          </table:table-cell>
          <table:table-cell table:style-name="ce12N2" office:value-type="float" office:value="566.34">
            <text:p>56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51118249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5">
            <text:p>310885</text:p>
          </table:table-cell>
          <table:table-cell table:style-name="ce0" table:number-columns-spanned="4" table:number-rows-spanned="1" office:value-type="string" calcext:value-type="string">
            <text:p>619 - CAST METAIS E SOLDAS LTDA</text:p>
          </table:table-cell>
          <table:covered-table-cell table:number-columns-repeated="3"/>
          <table:table-cell table:style-name="ce0" office:value-type="string" calcext:value-type="string">
            <text:p>123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31">
            <text:p>0,067</text:p>
          </table:table-cell>
          <table:table-cell table:style-name="ce12N2" office:value-type="float" office:value="119.64">
            <text:p>11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0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21.94">
            <text:p>14521,94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.7">
            <text:p>130,7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06.6">
            <text:p>17206,60</text:p>
          </table:table-cell>
          <table:table-cell table:style-name="ce12N2" office:value-type="float" office:value="1204.46">
            <text:p>12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34079510001785500100012377318509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6">
            <text:p>3108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9.81">
            <text:p>311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6">
            <text:p>0,014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1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2.09">
            <text:p>2552,09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7">
            <text:p>22,9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0.41">
            <text:p>190,41</text:p>
          </table:table-cell>
          <table:table-cell table:style-name="ce12N2" office:value-type="float" office:value="2929.4">
            <text:p>2929,40</text:p>
          </table:table-cell>
          <table:table-cell table:style-name="ce12N2" office:value-type="float" office:value="117.18">
            <text:p>1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41458752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7">
            <text:p>3108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3.77">
            <text:p>374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32">
            <text:p>0,017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62.52">
            <text:p>3062,52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56">
            <text:p>27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28.49">
            <text:p>228,49</text:p>
          </table:table-cell>
          <table:table-cell table:style-name="ce12N2" office:value-type="float" office:value="3515.28">
            <text:p>3515,28</text:p>
          </table:table-cell>
          <table:table-cell table:style-name="ce12N2" office:value-type="float" office:value="140.61">
            <text:p>14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51512384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8">
            <text:p>31088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21967939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89">
            <text:p>31088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572">
            <text:p>0,136</text:p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1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7.89">
            <text:p>11247,89</text:p>
          </table:table-cell>
          <table:table-cell table:style-name="ce12N2" office:value-type="float" office:value="11.25">
            <text:p>1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23">
            <text:p>101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10.8">
            <text:p>12910,80</text:p>
          </table:table-cell>
          <table:table-cell table:style-name="ce12N2" office:value-type="float" office:value="516.43">
            <text:p>51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51165764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0">
            <text:p>31089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3.41">
            <text:p>3339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2">
            <text:p>0,001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393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507.83">
            <text:p>26507,83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57">
            <text:p>238,57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966.61">
            <text:p>2966,61</text:p>
          </table:table-cell>
          <table:table-cell table:style-name="ce12N2" office:value-type="float" office:value="30426.8">
            <text:p>30426,80</text:p>
          </table:table-cell>
          <table:table-cell table:style-name="ce12N2" office:value-type="float" office:value="1217.07">
            <text:p>121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01802576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1">
            <text:p>31089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94">
            <text:p>9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58">
            <text:p>0,004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5.63">
            <text:p>765,63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878.82">
            <text:p>878,82</text:p>
          </table:table-cell>
          <table:table-cell table:style-name="ce12N2" office:value-type="float" office:value="35.15">
            <text:p>3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6197941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2">
            <text:p>3108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9.9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42.92">
            <text:p>303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68">
            <text:p>0,107</text:p>
          </table:table-cell>
          <table:table-cell table:style-name="ce12N2" office:value-type="float" office:value="51.24">
            <text:p>5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4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45.6">
            <text:p>24045,60</text:p>
          </table:table-cell>
          <table:table-cell table:style-name="ce12N2" office:value-type="float" office:value="24.05">
            <text:p>2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.41">
            <text:p>216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851.92">
            <text:p>1851,92</text:p>
          </table:table-cell>
          <table:table-cell table:style-name="ce12N2" office:value-type="float" office:value="28491">
            <text:p>28491,00</text:p>
          </table:table-cell>
          <table:table-cell table:style-name="ce12N2" office:value-type="float" office:value="1994.37">
            <text:p>199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996911767002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3">
            <text:p>31089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297">
            <text:p>0,092</text:p>
          </table:table-cell>
          <table:table-cell table:style-name="ce12N2" office:value-type="float" office:value="65.7">
            <text:p>6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14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76.8">
            <text:p>11076,80</text:p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.7">
            <text:p>99,70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14.41">
            <text:p>12714,41</text:p>
          </table:table-cell>
          <table:table-cell table:style-name="ce12N2" office:value-type="float" office:value="508.58">
            <text:p>50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71849426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4">
            <text:p>3108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71795115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5">
            <text:p>31089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71.62">
            <text:p>3517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36">
            <text:p>0,009</text:p>
          </table:table-cell>
          <table:table-cell table:style-name="ce12N2" office:value-type="float" office:value="20.97">
            <text:p>2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17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62.45">
            <text:p>27962,45</text:p>
          </table:table-cell>
          <table:table-cell table:style-name="ce12N2" office:value-type="float" office:value="27.96">
            <text:p>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.66">
            <text:p>251,6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75.14">
            <text:p>3075,14</text:p>
          </table:table-cell>
          <table:table-cell table:style-name="ce12N2" office:value-type="float" office:value="32096.48">
            <text:p>32096,48</text:p>
          </table:table-cell>
          <table:table-cell table:style-name="ce12N2" office:value-type="float" office:value="1283.86">
            <text:p>12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111865940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6">
            <text:p>31089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93">
            <text:p>0,034</text:p>
          </table:table-cell>
          <table:table-cell table:style-name="ce12N2" office:value-type="float" office:value="16.5">
            <text:p>1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11.97">
            <text:p>2811,97</text:p>
          </table:table-cell>
          <table:table-cell table:style-name="ce12N2" office:value-type="float" office:value="2.81">
            <text:p>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31">
            <text:p>25,3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7.7">
            <text:p>3227,70</text:p>
          </table:table-cell>
          <table:table-cell table:style-name="ce12N2" office:value-type="float" office:value="129.11">
            <text:p>12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41427856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8">
            <text:p>31089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1.77">
            <text:p>4174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74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4.79">
            <text:p>33134,79</text:p>
          </table:table-cell>
          <table:table-cell table:style-name="ce12N2" office:value-type="float" office:value="33.13">
            <text:p>3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21">
            <text:p>298,21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708.27">
            <text:p>3708,27</text:p>
          </table:table-cell>
          <table:table-cell table:style-name="ce12N2" office:value-type="float" office:value="38033.5">
            <text:p>38033,50</text:p>
          </table:table-cell>
          <table:table-cell table:style-name="ce12N2" office:value-type="float" office:value="1521.34">
            <text:p>152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21194405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9">
            <text:p>31089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1.89">
            <text:p>187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316">
            <text:p>0,008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25">
            <text:p>1531,2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14.25">
            <text:p>114,25</text:p>
          </table:table-cell>
          <table:table-cell table:style-name="ce12N2" office:value-type="float" office:value="1757.64">
            <text:p>1757,64</text:p>
          </table:table-cell>
          <table:table-cell table:style-name="ce12N2" office:value-type="float" office:value="70.31">
            <text:p>7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91715890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0">
            <text:p>31090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5.48">
            <text:p>796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34">
            <text:p>0,007</text:p>
          </table:table-cell>
          <table:table-cell table:style-name="ce12N2" office:value-type="float" office:value="4.52">
            <text:p>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65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23.04">
            <text:p>6323,04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91">
            <text:p>56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7.64">
            <text:p>707,64</text:p>
          </table:table-cell>
          <table:table-cell table:style-name="ce12N2" office:value-type="float" office:value="7257.84">
            <text:p>7257,84</text:p>
          </table:table-cell>
          <table:table-cell table:style-name="ce12N2" office:value-type="float" office:value="290.31">
            <text:p>2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91710227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1">
            <text:p>31090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960.65">
            <text:p>21096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71492">
            <text:p>14,715</text:p>
          </table:table-cell>
          <table:table-cell table:style-name="ce12N2" office:value-type="float" office:value="1036">
            <text:p>103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0.960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656.11">
            <text:p>183656,11</text:p>
          </table:table-cell>
          <table:table-cell table:style-name="ce12N2" office:value-type="float" office:value="183.65">
            <text:p>18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2.9">
            <text:p>1652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52.45">
            <text:p>152,45</text:p>
          </table:table-cell>
          <table:table-cell table:style-name="ce12N2" office:value-type="float" office:value="210808.2">
            <text:p>210808,20</text:p>
          </table:table-cell>
          <table:table-cell table:style-name="ce12N2" office:value-type="float" office:value="8432.33">
            <text:p>843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61092477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2">
            <text:p>31090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090.12">
            <text:p>500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090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761.74">
            <text:p>39761,74</text:p>
          </table:table-cell>
          <table:table-cell table:style-name="ce12N2" office:value-type="float" office:value="39.76">
            <text:p>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.86">
            <text:p>357,8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449.92">
            <text:p>4449,92</text:p>
          </table:table-cell>
          <table:table-cell table:style-name="ce12N2" office:value-type="float" office:value="45640.2">
            <text:p>45640,20</text:p>
          </table:table-cell>
          <table:table-cell table:style-name="ce12N2" office:value-type="float" office:value="1825.61">
            <text:p>182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9192894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3">
            <text:p>3109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6.96">
            <text:p>710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22">
            <text:p>0,091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2">
            <text:p>5632,00</text:p>
          </table:table-cell>
          <table:table-cell table:style-name="ce12N2" office:value-type="float" office:value="5.63">
            <text:p>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69">
            <text:p>50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33.76">
            <text:p>433,76</text:p>
          </table:table-cell>
          <table:table-cell table:style-name="ce12N2" office:value-type="float" office:value="6673.2">
            <text:p>6673,20</text:p>
          </table:table-cell>
          <table:table-cell table:style-name="ce12N2" office:value-type="float" office:value="467.12">
            <text:p>46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0751355786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06">
            <text:p>310906</text:p>
          </table:table-cell>
          <table:table-cell table:style-name="ce0" table:number-columns-spanned="4" table:number-rows-spanned="1" office:value-type="string" calcext:value-type="string">
            <text:p>20.496 - REMAS METAIS SANITARIOS LTDA</text:p>
          </table:table-cell>
          <table:covered-table-cell table:number-columns-repeated="3"/>
          <table:table-cell table:style-name="ce0" office:value-type="string" calcext:value-type="string">
            <text:p>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76">
            <text:p>0,003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8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7.17">
            <text:p>2987,17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7.43">
            <text:p>10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391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0/07/2026</text:p>
          </table:table-cell>
          <table:table-cell table:style-name="ce12" office:value-type="string" calcext:value-type="string">
            <text:p>107,43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35260735481273000180550010000007951001969221</text:p>
          </table:table-cell>
          <table:table-cell table:style-name="ce0" office:value-type="string" calcext:value-type="string">
            <text:p>3526070522209200076357002000483391100732642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3">
            <text:p>31091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3.65475">
            <text:p>63,655</text:p>
          </table:table-cell>
          <table:table-cell table:style-name="ce12N2" office:value-type="float" office:value="1092">
            <text:p>109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0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4.7">
            <text:p>16004,70</text:p>
          </table:table-cell>
          <table:table-cell table:style-name="ce12N2" office:value-type="float" office:value="608.18">
            <text:p>60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722242808000118550010000028271603114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19">
            <text:p>310919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2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834.56">
            <text:p>7083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37.64155">
            <text:p>337,642</text:p>
          </table:table-cell>
          <table:table-cell table:style-name="ce12N2" office:value-type="float" office:value="1117.01">
            <text:p>1117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83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938.72">
            <text:p>57938,72</text:p>
          </table:table-cell>
          <table:table-cell table:style-name="ce12N2" office:value-type="float" office:value="57.94">
            <text:p>5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1.45">
            <text:p>521,45</text:p>
          </table:table-cell>
          <table:table-cell table:style-name="ce12N2" office:value-type="float" office:value="44.54">
            <text:p>44,5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2184.75">
            <text:p>2184,75</text:p>
          </table:table-cell>
          <table:table-cell table:style-name="ce12N2" office:value-type="float" office:value="68649.81">
            <text:p>68649,81</text:p>
          </table:table-cell>
          <table:table-cell table:style-name="ce12N2" office:value-type="float" office:value="4805.49">
            <text:p>480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291226023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1">
            <text:p>310921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8.25">
            <text:p>89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397">
            <text:p>1,234</text:p>
          </table:table-cell>
          <table:table-cell table:style-name="ce12N2" office:value-type="float" office:value="250.5">
            <text:p>25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4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0.93">
            <text:p>6960,93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5">
            <text:p>62,65</text:p>
          </table:table-cell>
          <table:table-cell table:style-name="ce12N2" office:value-type="float" office:value="43.83">
            <text:p>43,8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700.46">
            <text:p>700,46</text:p>
          </table:table-cell>
          <table:table-cell table:style-name="ce12N2" office:value-type="float" office:value="8247.79">
            <text:p>8247,79</text:p>
          </table:table-cell>
          <table:table-cell table:style-name="ce12N2" office:value-type="float" office:value="577.35">
            <text:p>57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5391890656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3">
            <text:p>31093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30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82">
            <text:p>0,009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60.34">
            <text:p>1060,34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4">
            <text:p>9,5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7.1">
            <text:p>1217,10</text:p>
          </table:table-cell>
          <table:table-cell table:style-name="ce12N2" office:value-type="float" office:value="48.68">
            <text:p>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3061286122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4">
            <text:p>310934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8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006">
            <text:p>0,500</text:p>
          </table:table-cell>
          <table:table-cell table:style-name="ce12N2" office:value-type="float" office:value="156.39">
            <text:p>15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75">
            <text:p>15475,00</text:p>
          </table:table-cell>
          <table:table-cell table:style-name="ce12N2" office:value-type="float" office:value="15.48">
            <text:p>1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28">
            <text:p>139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35.86">
            <text:p>18335,86</text:p>
          </table:table-cell>
          <table:table-cell table:style-name="ce12N2" office:value-type="float" office:value="1283.51">
            <text:p>128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642774001209550010002282661328272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6">
            <text:p>3109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7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9.71">
            <text:p>1038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728">
            <text:p>2,8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9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99.08">
            <text:p>8499,08</text:p>
          </table:table-cell>
          <table:table-cell table:style-name="ce12N2" office:value-type="float" office:value="8.5">
            <text:p>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49">
            <text:p>76,4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634.11">
            <text:p>634,11</text:p>
          </table:table-cell>
          <table:table-cell table:style-name="ce12N2" office:value-type="float" office:value="9755.6">
            <text:p>9755,60</text:p>
          </table:table-cell>
          <table:table-cell table:style-name="ce12N2" office:value-type="float" office:value="390.22">
            <text:p>3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81044274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8">
            <text:p>31093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02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5">
            <text:p>164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092">
            <text:p>0,4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1.97">
            <text:p>1341,97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08">
            <text:p>12,08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1540.38">
            <text:p>1540,38</text:p>
          </table:table-cell>
          <table:table-cell table:style-name="ce12N2" office:value-type="float" office:value="61.62">
            <text:p>6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0116877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4">
            <text:p>31094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5.25">
            <text:p>45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976">
            <text:p>0,206</text:p>
          </table:table-cell>
          <table:table-cell table:style-name="ce12N2" office:value-type="float" office:value="34.58">
            <text:p>3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26.53">
            <text:p>3526,53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54.52">
            <text:p>354,52</text:p>
          </table:table-cell>
          <table:table-cell table:style-name="ce12N2" office:value-type="float" office:value="4170.73">
            <text:p>4170,73</text:p>
          </table:table-cell>
          <table:table-cell table:style-name="ce12N2" office:value-type="float" office:value="284.74">
            <text:p>2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595158099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5">
            <text:p>310945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91.62">
            <text:p>243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62621">
            <text:p>24,626</text:p>
          </table:table-cell>
          <table:table-cell table:style-name="ce12N2" office:value-type="float" office:value="1424.65">
            <text:p>1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3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300.13">
            <text:p>20300,13</text:p>
          </table:table-cell>
          <table:table-cell table:style-name="ce12N2" office:value-type="float" office:value="20.31">
            <text:p>2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7">
            <text:p>182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736.57">
            <text:p>1736,57</text:p>
          </table:table-cell>
          <table:table-cell table:style-name="ce12N2" office:value-type="float" office:value="22655.05">
            <text:p>22655,05</text:p>
          </table:table-cell>
          <table:table-cell table:style-name="ce12N2" office:value-type="float" office:value="1585.87">
            <text:p>158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68698860002405500100009679018251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7">
            <text:p>310947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2.4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64">
            <text:p>1164,000</text:p>
          </table:table-cell>
          <table:table-cell table:style-name="ce12N2" office:value-type="float" office:value="116.4">
            <text:p>1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62.43">
            <text:p>13862,43</text:p>
          </table:table-cell>
          <table:table-cell table:style-name="ce12N2" office:value-type="float" office:value="13.86">
            <text:p>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76">
            <text:p>124,7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11.88">
            <text:p>15911,88</text:p>
          </table:table-cell>
          <table:table-cell table:style-name="ce12N2" office:value-type="float" office:value="636.48">
            <text:p>63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5858780000129550010002124441267617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48">
            <text:p>3109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4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115">
            <text:p>0,221</text:p>
          </table:table-cell>
          <table:table-cell table:style-name="ce12N2" office:value-type="float" office:value="13.9">
            <text:p>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80.43">
            <text:p>2880,43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92">
            <text:p>25,9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7.24">
            <text:p>3097,24</text:p>
          </table:table-cell>
          <table:table-cell table:style-name="ce12N2" office:value-type="float" office:value="216.81">
            <text:p>21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421849075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3">
            <text:p>3109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7.88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9.94">
            <text:p>4979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">
            <text:p>0,288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9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3.73">
            <text:p>4073,73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6">
            <text:p>36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03.94">
            <text:p>303,94</text:p>
          </table:table-cell>
          <table:table-cell table:style-name="ce12N2" office:value-type="float" office:value="4676">
            <text:p>4676,00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78841410960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4">
            <text:p>31095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8">
            <text:p>0,173</text:p>
          </table:table-cell>
          <table:table-cell table:style-name="ce12N2" office:value-type="float" office:value="45.8">
            <text:p>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7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1.01">
            <text:p>3171,01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4">
            <text:p>28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7.24">
            <text:p>3757,24</text:p>
          </table:table-cell>
          <table:table-cell table:style-name="ce12N2" office:value-type="float" office:value="263.01">
            <text:p>26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7114832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8">
            <text:p>310998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45.326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35.72">
            <text:p>886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84538.19">
            <text:p>8453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325382">
            <text:p>49,325</text:p>
          </table:table-cell>
          <table:table-cell table:style-name="ce12N2" office:value-type="float" office:value="462.79">
            <text:p>462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3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455.48">
            <text:p>73455,48</text:p>
          </table:table-cell>
          <table:table-cell table:style-name="ce12N2" office:value-type="float" office:value="73.42">
            <text:p>7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06">
            <text:p>661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4097.53">
            <text:p>4097,53</text:p>
          </table:table-cell>
          <table:table-cell table:style-name="ce12N2" office:value-type="float" office:value="83238.63">
            <text:p>83238,63</text:p>
          </table:table-cell>
          <table:table-cell table:style-name="ce12N2" office:value-type="float" office:value="3595.53">
            <text:p>359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3296273003298550230024453261905487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2">
            <text:p>3110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0.5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">
            <text:p>0,056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98">
            <text:p>2668,98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2">
            <text:p>24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2.38">
            <text:p>3162,38</text:p>
          </table:table-cell>
          <table:table-cell table:style-name="ce12N2" office:value-type="float" office:value="221.36">
            <text:p>2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05001147376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26">
            <text:p>31102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9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8.59">
            <text:p>12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0">
            <text:p>1500,000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6.96">
            <text:p>1036,96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3">
            <text:p>9,3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39.93">
            <text:p>39,93</text:p>
          </table:table-cell>
          <table:table-cell table:style-name="ce12N2" office:value-type="float" office:value="1228.66">
            <text:p>1228,66</text:p>
          </table:table-cell>
          <table:table-cell table:style-name="ce12N2" office:value-type="float" office:value="86.01">
            <text:p>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299001584299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2">
            <text:p>31103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2">
            <text:p>5,312</text:p>
          </table:table-cell>
          <table:table-cell table:style-name="ce12N2" office:value-type="float" office:value="2298.78">
            <text:p>2298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.6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483.6">
            <text:p>49483,60</text:p>
          </table:table-cell>
          <table:table-cell table:style-name="ce12N2" office:value-type="float" office:value="49.48">
            <text:p>4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5">
            <text:p>445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631.6">
            <text:p>58631,60</text:p>
          </table:table-cell>
          <table:table-cell table:style-name="ce12N2" office:value-type="float" office:value="4104.21">
            <text:p>410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2981183537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1">
            <text:p>31104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6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8.87">
            <text:p>304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68">
            <text:p>0,085</text:p>
          </table:table-cell>
          <table:table-cell table:style-name="ce12N2" office:value-type="float" office:value="9.4">
            <text:p>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2.18">
            <text:p>2492,18</text:p>
          </table:table-cell>
          <table:table-cell table:style-name="ce12N2" office:value-type="float" office:value="2.49">
            <text:p>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3">
            <text:p>22,4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95.97">
            <text:p>95,97</text:p>
          </table:table-cell>
          <table:table-cell table:style-name="ce12N2" office:value-type="float" office:value="2952.9">
            <text:p>2952,90</text:p>
          </table:table-cell>
          <table:table-cell table:style-name="ce12N2" office:value-type="float" office:value="206.7">
            <text:p>20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651905436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2">
            <text:p>31104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7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4.43">
            <text:p>61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56">
            <text:p>1,183</text:p>
          </table:table-cell>
          <table:table-cell table:style-name="ce12N2" office:value-type="float" office:value="222">
            <text:p>2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6.44">
            <text:p>4746,44</text:p>
          </table:table-cell>
          <table:table-cell table:style-name="ce12N2" office:value-type="float" office:value="4.75">
            <text:p>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72">
            <text:p>42,72</text:p>
          </table:table-cell>
          <table:table-cell table:style-name="ce12N2" office:value-type="float" office:value="43.71">
            <text:p>43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530.52">
            <text:p>530,52</text:p>
          </table:table-cell>
          <table:table-cell table:style-name="ce12N2" office:value-type="float" office:value="5623.91">
            <text:p>5623,91</text:p>
          </table:table-cell>
          <table:table-cell table:style-name="ce12N2" office:value-type="float" office:value="393.67">
            <text:p>39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7261363308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43">
            <text:p>311043</text:p>
          </table:table-cell>
          <table:table-cell table:style-name="ce0" table:number-columns-spanned="4" table:number-rows-spanned="1" office:value-type="string" calcext:value-type="string">
            <text:p>681 - UNIAO MUNDIAL INDUSTRIA DE FERRAGENS LTDA</text:p>
          </table:table-cell>
          <table:covered-table-cell table:number-columns-repeated="3"/>
          <table:table-cell table:style-name="ce0" office:value-type="string" calcext:value-type="string">
            <text:p>276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48.35">
            <text:p>1139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">
            <text:p>141,00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06714">
            <text:p>5,407</text:p>
          </table:table-cell>
          <table:table-cell table:style-name="ce12N2" office:value-type="float" office:value="33121.72">
            <text:p>3312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9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82.6">
            <text:p>101182,60</text:p>
          </table:table-cell>
          <table:table-cell table:style-name="ce12N2" office:value-type="float" office:value="101.18">
            <text:p>10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64">
            <text:p>910,64</text:p>
          </table:table-cell>
          <table:table-cell table:style-name="ce12N2" office:value-type="float" office:value="62.84">
            <text:p>62,8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028.28">
            <text:p>1028,28</text:p>
          </table:table-cell>
          <table:table-cell table:style-name="ce12N2" office:value-type="float" office:value="112920.07">
            <text:p>112920,07</text:p>
          </table:table-cell>
          <table:table-cell table:style-name="ce12N2" office:value-type="float" office:value="7904.4">
            <text:p>790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732223414000176550010002766191319287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73">
            <text:p>3110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1.58">
            <text:p>1231,5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8">
            <text:p>11,0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9.26">
            <text:p>1459,26</text:p>
          </table:table-cell>
          <table:table-cell table:style-name="ce12N2" office:value-type="float" office:value="102.15">
            <text:p>10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31638008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1">
            <text:p>31109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08.24">
            <text:p>14460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0181">
            <text:p>1,120</text:p>
          </table:table-cell>
          <table:table-cell table:style-name="ce12N2" office:value-type="float" office:value="569.29">
            <text:p>56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4.60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722.72">
            <text:p>121722,72</text:p>
          </table:table-cell>
          <table:table-cell table:style-name="ce12N2" office:value-type="float" office:value="121.87">
            <text:p>12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51">
            <text:p>1095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031.55">
            <text:p>1031,55</text:p>
          </table:table-cell>
          <table:table-cell table:style-name="ce12N2" office:value-type="float" office:value="143576.69">
            <text:p>143576,69</text:p>
          </table:table-cell>
          <table:table-cell table:style-name="ce12N2" office:value-type="float" office:value="9446.96">
            <text:p>944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41585957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3">
            <text:p>311093</text:p>
          </table:table-cell>
          <table:table-cell table:style-name="ce0" table:number-columns-spanned="4" table:number-rows-spanned="1" office:value-type="string" calcext:value-type="string">
            <text:p>706 - IKEDA EMPRESARIAL LTDA</text:p>
          </table:table-cell>
          <table:covered-table-cell table:number-columns-repeated="3"/>
          <table:table-cell table:style-name="ce0" office:value-type="string" calcext:value-type="string">
            <text:p>11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68.21">
            <text:p>1916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20274">
            <text:p>3,620</text:p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68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127.46">
            <text:p>16127,46</text:p>
          </table:table-cell>
          <table:table-cell table:style-name="ce12N2" office:value-type="float" office:value="16.12">
            <text:p>1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.14">
            <text:p>145,1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69.9">
            <text:p>1169,90</text:p>
          </table:table-cell>
          <table:table-cell table:style-name="ce12N2" office:value-type="float" office:value="17998.31">
            <text:p>17998,31</text:p>
          </table:table-cell>
          <table:table-cell table:style-name="ce12N2" office:value-type="float" office:value="1259.88">
            <text:p>125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50646610001725500100011313616399673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5">
            <text:p>3110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25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4">
            <text:p>0,007</text:p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1.05">
            <text:p>821,05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9">
            <text:p>7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2.84">
            <text:p>972,84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252189949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6">
            <text:p>311096</text:p>
          </table:table-cell>
          <table:table-cell table:style-name="ce0" table:number-columns-spanned="4" table:number-rows-spanned="1" office:value-type="string" calcext:value-type="string">
            <text:p>16.982 - PENINSULA IMPORTACAO E EXPORTACAO EIRELI</text:p>
          </table:table-cell>
          <table:covered-table-cell table:number-columns-repeated="3"/>
          <table:table-cell table:style-name="ce0" office:value-type="string" calcext:value-type="string">
            <text:p>30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240.17">
            <text:p>4324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2776">
            <text:p>2,363</text:p>
          </table:table-cell>
          <table:table-cell table:style-name="ce12N2" office:value-type="float" office:value="252.34">
            <text:p>25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24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8.97">
            <text:p>37628,97</text:p>
          </table:table-cell>
          <table:table-cell table:style-name="ce12N2" office:value-type="float" office:value="37.64">
            <text:p>3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8">
            <text:p>338,6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557.19">
            <text:p>2557,19</text:p>
          </table:table-cell>
          <table:table-cell table:style-name="ce12N2" office:value-type="float" office:value="40682.98">
            <text:p>40682,98</text:p>
          </table:table-cell>
          <table:table-cell table:style-name="ce12N2" office:value-type="float" office:value="1628.51">
            <text:p>162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231436000107550010000305751238762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8">
            <text:p>3110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8.3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99">
            <text:p>1,990</text:p>
          </table:table-cell>
          <table:table-cell table:style-name="ce12N2" office:value-type="float" office:value="670.2">
            <text:p>67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1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87.62">
            <text:p>16387,62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49">
            <text:p>147,4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7.2">
            <text:p>19417,20</text:p>
          </table:table-cell>
          <table:table-cell table:style-name="ce12N2" office:value-type="float" office:value="1359.21">
            <text:p>13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580190200012655000001388310123185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1">
            <text:p>3111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7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936">
            <text:p>0,118</text:p>
          </table:table-cell>
          <table:table-cell table:style-name="ce12N2" office:value-type="float" office:value="5.83">
            <text:p>5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32.87">
            <text:p>1432,87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9">
            <text:p>12,90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7.76">
            <text:p>1697,76</text:p>
          </table:table-cell>
          <table:table-cell table:style-name="ce12N2" office:value-type="float" office:value="118.84">
            <text:p>11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78181805435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4">
            <text:p>31110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90.68">
            <text:p>3279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790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495.8">
            <text:p>27495,80</text:p>
          </table:table-cell>
          <table:table-cell table:style-name="ce12N2" office:value-type="float" office:value="27.5">
            <text:p>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46">
            <text:p>247,4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1.76">
            <text:p>211,76</text:p>
          </table:table-cell>
          <table:table-cell table:style-name="ce12N2" office:value-type="float" office:value="32578.92">
            <text:p>32578,92</text:p>
          </table:table-cell>
          <table:table-cell table:style-name="ce12N2" office:value-type="float" office:value="2280.52">
            <text:p>2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81718434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5">
            <text:p>31110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5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31.09">
            <text:p>1123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5784">
            <text:p>1,296</text:p>
          </table:table-cell>
          <table:table-cell table:style-name="ce12N2" office:value-type="float" office:value="5792.4">
            <text:p>579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31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17.54">
            <text:p>9417,54</text:p>
          </table:table-cell>
          <table:table-cell table:style-name="ce12N2" office:value-type="float" office:value="9.42">
            <text:p>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.76">
            <text:p>84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72.53">
            <text:p>72,53</text:p>
          </table:table-cell>
          <table:table-cell table:style-name="ce12N2" office:value-type="float" office:value="11158.56">
            <text:p>11158,56</text:p>
          </table:table-cell>
          <table:table-cell table:style-name="ce12N2" office:value-type="float" office:value="781.1">
            <text:p>78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5091502648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7">
            <text:p>311107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4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77.46">
            <text:p>4897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7474">
            <text:p>1,237</text:p>
          </table:table-cell>
          <table:table-cell table:style-name="ce12N2" office:value-type="float" office:value="1403.67">
            <text:p>1403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977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302.47">
            <text:p>41302,47</text:p>
          </table:table-cell>
          <table:table-cell table:style-name="ce12N2" office:value-type="float" office:value="41.3">
            <text:p>4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1.72">
            <text:p>371,7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39.43">
            <text:p>39,43</text:p>
          </table:table-cell>
          <table:table-cell table:style-name="ce12N2" office:value-type="float" office:value="48938.03">
            <text:p>48938,03</text:p>
          </table:table-cell>
          <table:table-cell table:style-name="ce12N2" office:value-type="float" office:value="3425.65">
            <text:p>342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777131003473550050009044251482238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09">
            <text:p>31110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639.48">
            <text:p>4636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">
            <text:p>221,00</text:p>
          </table:table-cell>
          <table:table-cell table:style-name="ce12N2" office:value-type="float" office:value="459510.87">
            <text:p>45951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6.58952">
            <text:p>196,590</text:p>
          </table:table-cell>
          <table:table-cell table:style-name="ce12N2" office:value-type="float" office:value="5460.61">
            <text:p>546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3.6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12.41">
            <text:p>388812,41</text:p>
          </table:table-cell>
          <table:table-cell table:style-name="ce12N2" office:value-type="float" office:value="388.9">
            <text:p>38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99.35">
            <text:p>3499,3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4128.61">
            <text:p>4128,61</text:p>
          </table:table-cell>
          <table:table-cell table:style-name="ce12N2" office:value-type="float" office:value="453623.21">
            <text:p>453623,21</text:p>
          </table:table-cell>
          <table:table-cell table:style-name="ce12N2" office:value-type="float" office:value="31017.96">
            <text:p>3101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911693133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0">
            <text:p>31111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895">
            <text:p>0,091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4.95">
            <text:p>2184,95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7">
            <text:p>19,6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4.65">
            <text:p>2584,65</text:p>
          </table:table-cell>
          <table:table-cell table:style-name="ce12N2" office:value-type="float" office:value="177">
            <text:p>17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51828096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1">
            <text:p>31111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036944">
            <text:p>40,037</text:p>
          </table:table-cell>
          <table:table-cell table:style-name="ce12N2" office:value-type="float" office:value="293.6">
            <text:p>29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9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832.5">
            <text:p>26832,50</text:p>
          </table:table-cell>
          <table:table-cell table:style-name="ce12N2" office:value-type="float" office:value="26.84">
            <text:p>2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.48">
            <text:p>241,4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95.16">
            <text:p>31795,16</text:p>
          </table:table-cell>
          <table:table-cell table:style-name="ce12N2" office:value-type="float" office:value="2225.66">
            <text:p>222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614918413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2">
            <text:p>31111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04">
            <text:p>0,150</text:p>
          </table:table-cell>
          <table:table-cell table:style-name="ce12N2" office:value-type="float" office:value="119.1">
            <text:p>11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8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24.7">
            <text:p>18824,70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.42">
            <text:p>169,4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84">
            <text:p>22284,00</text:p>
          </table:table-cell>
          <table:table-cell table:style-name="ce12N2" office:value-type="float" office:value="1546.65">
            <text:p>154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41811619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3">
            <text:p>31111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55.3">
            <text:p>15985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59855.3">
            <text:p>15985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0.436865">
            <text:p>160,437</text:p>
          </table:table-cell>
          <table:table-cell table:style-name="ce12N2" office:value-type="float" office:value="2016.36">
            <text:p>201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9.855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13.05">
            <text:p>135713,05</text:p>
          </table:table-cell>
          <table:table-cell table:style-name="ce12N2" office:value-type="float" office:value="135.72">
            <text:p>13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1.4">
            <text:p>1221,40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428.8">
            <text:p>150428,80</text:p>
          </table:table-cell>
          <table:table-cell table:style-name="ce12N2" office:value-type="float" office:value="10386.26">
            <text:p>103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31148012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5">
            <text:p>3111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8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1.14">
            <text:p>208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96">
            <text:p>0,00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1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49.22">
            <text:p>1649,22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84">
            <text:p>14,8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27.02">
            <text:p>127,02</text:p>
          </table:table-cell>
          <table:table-cell table:style-name="ce12N2" office:value-type="float" office:value="1954.12">
            <text:p>1954,12</text:p>
          </table:table-cell>
          <table:table-cell table:style-name="ce12N2" office:value-type="float" office:value="136.79">
            <text:p>13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8801381961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7">
            <text:p>31111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2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55.94">
            <text:p>1125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255.94">
            <text:p>1125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41823">
            <text:p>26,418</text:p>
          </table:table-cell>
          <table:table-cell table:style-name="ce12N2" office:value-type="float" office:value="106.73">
            <text:p>10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5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82.28">
            <text:p>9682,28</text:p>
          </table:table-cell>
          <table:table-cell table:style-name="ce12N2" office:value-type="float" office:value="9.68">
            <text:p>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14">
            <text:p>87,1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70.6">
            <text:p>11170,60</text:p>
          </table:table-cell>
          <table:table-cell table:style-name="ce12N2" office:value-type="float" office:value="585.15">
            <text:p>58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2687141380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18">
            <text:p>3111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9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44">
            <text:p>1,074</text:p>
          </table:table-cell>
          <table:table-cell table:style-name="ce12N2" office:value-type="float" office:value="54.4">
            <text:p>5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8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39.2">
            <text:p>10539,20</text:p>
          </table:table-cell>
          <table:table-cell table:style-name="ce12N2" office:value-type="float" office:value="10.54">
            <text:p>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4.85">
            <text:p>94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87.2">
            <text:p>12487,20</text:p>
          </table:table-cell>
          <table:table-cell table:style-name="ce12N2" office:value-type="float" office:value="874.1">
            <text:p>87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9121317733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1">
            <text:p>31112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08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9.69">
            <text:p>484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53.7">
            <text:p>455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17">
            <text:p>0,128</text:p>
          </table:table-cell>
          <table:table-cell table:style-name="ce12N2" office:value-type="float" office:value="11.36">
            <text:p>11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49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3.2">
            <text:p>3843,20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59">
            <text:p>34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95.99">
            <text:p>295,99</text:p>
          </table:table-cell>
          <table:table-cell table:style-name="ce12N2" office:value-type="float" office:value="4553.7">
            <text:p>4553,70</text:p>
          </table:table-cell>
          <table:table-cell table:style-name="ce12N2" office:value-type="float" office:value="318.76">
            <text:p>31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0831895179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4">
            <text:p>31112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75">
            <text:p>16,87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92.24">
            <text:p>12692,24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.23">
            <text:p>114,23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038.64">
            <text:p>15038,64</text:p>
          </table:table-cell>
          <table:table-cell table:style-name="ce12N2" office:value-type="float" office:value="1052.7">
            <text:p>105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611726738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8">
            <text:p>3111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516">
            <text:p>0,675</text:p>
          </table:table-cell>
          <table:table-cell table:style-name="ce12N2" office:value-type="float" office:value="162.75">
            <text:p>16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87.8">
            <text:p>6087,80</text:p>
          </table:table-cell>
          <table:table-cell table:style-name="ce12N2" office:value-type="float" office:value="6.09">
            <text:p>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79">
            <text:p>54,79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1.1">
            <text:p>7211,10</text:p>
          </table:table-cell>
          <table:table-cell table:style-name="ce12N2" office:value-type="float" office:value="504.78">
            <text:p>50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201657491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9">
            <text:p>31112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3.2">
            <text:p>58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59">
            <text:p>0,007</text:p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3.9">
            <text:p>493,9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.92">
            <text:p>553,92</text:p>
          </table:table-cell>
          <table:table-cell table:style-name="ce12N2" office:value-type="float" office:value="38.77">
            <text:p>3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531569115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0">
            <text:p>3111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621635320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1">
            <text:p>3111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1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">
            <text:p>0,015</text:p>
          </table:table-cell>
          <table:table-cell table:style-name="ce12N2" office:value-type="float" office:value="0.6">
            <text:p>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0.4">
            <text:p>920,4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8">
            <text:p>8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0.8">
            <text:p>1090,80</text:p>
          </table:table-cell>
          <table:table-cell table:style-name="ce12N2" office:value-type="float" office:value="76.36">
            <text:p>7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1781097495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2">
            <text:p>311132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11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5">
            <text:p>0,025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55.04">
            <text:p>5555,04</text:p>
          </table:table-cell>
          <table:table-cell table:style-name="ce12N2" office:value-type="float" office:value="5.56">
            <text:p>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82">
            <text:p>6582,00</text:p>
          </table:table-cell>
          <table:table-cell table:style-name="ce12N2" office:value-type="float" office:value="460.74">
            <text:p>46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1101268067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3">
            <text:p>31113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3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455.18">
            <text:p>103455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5207">
            <text:p>1,952</text:p>
          </table:table-cell>
          <table:table-cell table:style-name="ce12N2" office:value-type="float" office:value="565.64">
            <text:p>565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3.45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577.1">
            <text:p>85577,10</text:p>
          </table:table-cell>
          <table:table-cell table:style-name="ce12N2" office:value-type="float" office:value="85.55">
            <text:p>8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0.2">
            <text:p>770,20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5226.19">
            <text:p>5226,19</text:p>
          </table:table-cell>
          <table:table-cell table:style-name="ce12N2" office:value-type="float" office:value="98228.99">
            <text:p>98228,99</text:p>
          </table:table-cell>
          <table:table-cell table:style-name="ce12N2" office:value-type="float" office:value="3929.17">
            <text:p>392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33311575994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4">
            <text:p>311134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46.68">
            <text:p>14146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3928.78">
            <text:p>13928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370918">
            <text:p>32,371</text:p>
          </table:table-cell>
          <table:table-cell table:style-name="ce12N2" office:value-type="float" office:value="708.06">
            <text:p>708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146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3.89">
            <text:p>11853,89</text:p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68">
            <text:p>106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217.9">
            <text:p>217,90</text:p>
          </table:table-cell>
          <table:table-cell table:style-name="ce12N2" office:value-type="float" office:value="12381">
            <text:p>12381,00</text:p>
          </table:table-cell>
          <table:table-cell table:style-name="ce12N2" office:value-type="float" office:value="866.65">
            <text:p>86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61556428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6">
            <text:p>31113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20.10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116">
            <text:p>0,281</text:p>
          </table:table-cell>
          <table:table-cell table:style-name="ce12N2" office:value-type="float" office:value="21.3">
            <text:p>2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59.46">
            <text:p>4759,46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4">
            <text:p>42,8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7.7">
            <text:p>5117,70</text:p>
          </table:table-cell>
          <table:table-cell table:style-name="ce12N2" office:value-type="float" office:value="358.24">
            <text:p>35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927021500010555006000220109168318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7">
            <text:p>311137</text:p>
          </table:table-cell>
          <table:table-cell table:style-name="ce0" table:number-columns-spanned="4" table:number-rows-spanned="1" office:value-type="string" calcext:value-type="string">
            <text:p>14.587 - GFC INDUSTRIA E COMERCIO TUBOS E CONEXOES LTDA</text:p>
          </table:table-cell>
          <table:covered-table-cell table:number-columns-repeated="3"/>
          <table:table-cell table:style-name="ce0" office:value-type="string" calcext:value-type="string">
            <text:p>116.26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90.8">
            <text:p>3669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813182">
            <text:p>6,813</text:p>
          </table:table-cell>
          <table:table-cell table:style-name="ce12N2" office:value-type="float" office:value="3409.36">
            <text:p>3409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9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91.4">
            <text:p>29991,4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9.92">
            <text:p>269,92</text:p>
          </table:table-cell>
          <table:table-cell table:style-name="ce12N2" office:value-type="float" office:value="46.67">
            <text:p>46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1154.92">
            <text:p>1154,92</text:p>
          </table:table-cell>
          <table:table-cell table:style-name="ce12N2" office:value-type="float" office:value="35535.88">
            <text:p>35535,88</text:p>
          </table:table-cell>
          <table:table-cell table:style-name="ce12N2" office:value-type="float" office:value="2487.52">
            <text:p>248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05338810001605500000011626118027960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38">
            <text:p>311138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81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42.04">
            <text:p>144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0552">
            <text:p>3,271</text:p>
          </table:table-cell>
          <table:table-cell table:style-name="ce12N2" office:value-type="float" office:value="95.13">
            <text:p>95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4.64">
            <text:p>844,64</text:p>
          </table:table-cell>
          <table:table-cell table:style-name="ce12N2" office:value-type="float" office:value="59.11">
            <text:p>5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1913681000134550010001818571228130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3">
            <text:p>3111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69.61">
            <text:p>686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6506.58">
            <text:p>650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88">
            <text:p>0,206</text:p>
          </table:table-cell>
          <table:table-cell table:style-name="ce12N2" office:value-type="float" office:value="24.19">
            <text:p>24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6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04.56">
            <text:p>5504,56</text:p>
          </table:table-cell>
          <table:table-cell table:style-name="ce12N2" office:value-type="float" office:value="5.5">
            <text:p>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54">
            <text:p>49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63.03">
            <text:p>363,03</text:p>
          </table:table-cell>
          <table:table-cell table:style-name="ce12N2" office:value-type="float" office:value="6506.58">
            <text:p>6506,58</text:p>
          </table:table-cell>
          <table:table-cell table:style-name="ce12N2" office:value-type="float" office:value="440.94">
            <text:p>4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471036237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9">
            <text:p>3111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72">
            <text:p>0,507</text:p>
          </table:table-cell>
          <table:table-cell table:style-name="ce12N2" office:value-type="float" office:value="281.25">
            <text:p>28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90.89">
            <text:p>2990,89</text:p>
          </table:table-cell>
          <table:table-cell table:style-name="ce12N2" office:value-type="float" office:value="2.99">
            <text:p>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92">
            <text:p>26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3.8">
            <text:p>3543,80</text:p>
          </table:table-cell>
          <table:table-cell table:style-name="ce12N2" office:value-type="float" office:value="248.06">
            <text:p>24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51252168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0">
            <text:p>3111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925">
            <text:p>0,689</text:p>
          </table:table-cell>
          <table:table-cell table:style-name="ce12N2" office:value-type="float" office:value="448.29">
            <text:p>448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93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60.79">
            <text:p>11760,79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.85">
            <text:p>105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5">
            <text:p>13935,00</text:p>
          </table:table-cell>
          <table:table-cell table:style-name="ce12N2" office:value-type="float" office:value="975.45">
            <text:p>97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41269331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2">
            <text:p>31117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8.6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3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0.46">
            <text:p>7590,46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1">
            <text:p>68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3.7">
            <text:p>8993,70</text:p>
          </table:table-cell>
          <table:table-cell table:style-name="ce12N2" office:value-type="float" office:value="629.56">
            <text:p>6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86561187492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4">
            <text:p>311174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8.7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624">
            <text:p>8,962</text:p>
          </table:table-cell>
          <table:table-cell table:style-name="ce12N2" office:value-type="float" office:value="2197.32">
            <text:p>219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5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27.44">
            <text:p>21227,44</text:p>
          </table:table-cell>
          <table:table-cell table:style-name="ce12N2" office:value-type="float" office:value="21.21">
            <text:p>2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.04">
            <text:p>191,0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51.75">
            <text:p>25151,75</text:p>
          </table:table-cell>
          <table:table-cell table:style-name="ce12N2" office:value-type="float" office:value="1760.62">
            <text:p>176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87874820001375500100010875919284364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6">
            <text:p>311176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7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36">
            <text:p>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.18">
            <text:p>6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E-5">
            <text:p>0,000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7">
            <text:p>56,70</text:p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41.56">
            <text:p>41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67.18">
            <text:p>67,18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0837457000187550010003674961711965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7">
            <text:p>31117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5.8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3.84">
            <text:p>267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10.65">
            <text:p>251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">
            <text:p>0,027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3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7.27">
            <text:p>2187,2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9">
            <text:p>19,69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3.19">
            <text:p>163,19</text:p>
          </table:table-cell>
          <table:table-cell table:style-name="ce12N2" office:value-type="float" office:value="2510.65">
            <text:p>2510,65</text:p>
          </table:table-cell>
          <table:table-cell table:style-name="ce12N2" office:value-type="float" office:value="100.43">
            <text:p>10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7642862000248550020000158721410215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9">
            <text:p>311179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83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.52">
            <text:p>53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33.52">
            <text:p>53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456">
            <text:p>0,245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0.36">
            <text:p>450,36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5">
            <text:p>4,0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3.52">
            <text:p>533,52</text:p>
          </table:table-cell>
          <table:table-cell table:style-name="ce12N2" office:value-type="float" office:value="37.35">
            <text:p>3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33064262000250550010002833161850109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0">
            <text:p>31118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7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8.04">
            <text:p>12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96.68">
            <text:p>1196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888">
            <text:p>0,003</text:p>
          </table:table-cell>
          <table:table-cell table:style-name="ce12N2" office:value-type="float" office:value="2.34">
            <text:p>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42.54">
            <text:p>1042,54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9">
            <text:p>9,39</text:p>
          </table:table-cell>
          <table:table-cell table:style-name="ce12N2" office:value-type="float" office:value="55.01">
            <text:p>55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1196.68">
            <text:p>1196,68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7771932284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2">
            <text:p>311182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4.3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7.11">
            <text:p>481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9">
            <text:p>45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">
            <text:p>0,040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17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4.57">
            <text:p>3864,57</text:p>
          </table:table-cell>
          <table:table-cell table:style-name="ce12N2" office:value-type="float" office:value="3.86">
            <text:p>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78">
            <text:p>34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38.11">
            <text:p>238,11</text:p>
          </table:table-cell>
          <table:table-cell table:style-name="ce12N2" office:value-type="float" office:value="4579">
            <text:p>4579,00</text:p>
          </table:table-cell>
          <table:table-cell table:style-name="ce12N2" office:value-type="float" office:value="320.53">
            <text:p>3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43741100037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6">
            <text:p>3111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6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.01">
            <text:p>1569,01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2">
            <text:p>14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9.08">
            <text:p>1859,08</text:p>
          </table:table-cell>
          <table:table-cell table:style-name="ce12N2" office:value-type="float" office:value="130.14">
            <text:p>13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41775468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7">
            <text:p>3111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436">
            <text:p>0,065</text:p>
          </table:table-cell>
          <table:table-cell table:style-name="ce12N2" office:value-type="float" office:value="45.03">
            <text:p>45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62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9.68">
            <text:p>14029,68</text:p>
          </table:table-cell>
          <table:table-cell table:style-name="ce12N2" office:value-type="float" office:value="14.03">
            <text:p>1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.26">
            <text:p>126,2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23.33">
            <text:p>16623,33</text:p>
          </table:table-cell>
          <table:table-cell table:style-name="ce12N2" office:value-type="float" office:value="1163.63">
            <text:p>116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51784919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8">
            <text:p>3111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3">
            <text:p>0,165</text:p>
          </table:table-cell>
          <table:table-cell table:style-name="ce12N2" office:value-type="float" office:value="78.25">
            <text:p>78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8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25.29">
            <text:p>28425,29</text:p>
          </table:table-cell>
          <table:table-cell table:style-name="ce12N2" office:value-type="float" office:value="28.43">
            <text:p>2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83">
            <text:p>255,8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80.25">
            <text:p>33680,25</text:p>
          </table:table-cell>
          <table:table-cell table:style-name="ce12N2" office:value-type="float" office:value="2357.62">
            <text:p>235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6186110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9">
            <text:p>3111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5464">
            <text:p>0,145</text:p>
          </table:table-cell>
          <table:table-cell table:style-name="ce12N2" office:value-type="float" office:value="68.86">
            <text:p>68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6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014.26">
            <text:p>25014,26</text:p>
          </table:table-cell>
          <table:table-cell table:style-name="ce12N2" office:value-type="float" office:value="25.01">
            <text:p>2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.13">
            <text:p>225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38.62">
            <text:p>29638,62</text:p>
          </table:table-cell>
          <table:table-cell table:style-name="ce12N2" office:value-type="float" office:value="2074.7">
            <text:p>20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711316526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0">
            <text:p>3111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.28">
            <text:p>21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.26">
            <text:p>2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82">
            <text:p>0,000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.02">
            <text:p>169,02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200.26">
            <text:p>200,26</text:p>
          </table:table-cell>
          <table:table-cell table:style-name="ce12N2" office:value-type="float" office:value="14.02">
            <text:p>1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81351500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1">
            <text:p>3111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.55">
            <text:p>42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0.52">
            <text:p>40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64">
            <text:p>0,000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6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.02">
            <text:p>338,02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6.03">
            <text:p>26,03</text:p>
          </table:table-cell>
          <table:table-cell table:style-name="ce12N2" office:value-type="float" office:value="400.52">
            <text:p>400,52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913318907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2">
            <text:p>3111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5.47">
            <text:p>398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946.42">
            <text:p>394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8">
            <text:p>0,005</text:p>
          </table:table-cell>
          <table:table-cell table:style-name="ce12N2" office:value-type="float" office:value="4.41">
            <text:p>4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85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0.69">
            <text:p>3330,69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7">
            <text:p>29,9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3946.42">
            <text:p>3946,42</text:p>
          </table:table-cell>
          <table:table-cell table:style-name="ce12N2" office:value-type="float" office:value="276.24">
            <text:p>27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01580179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3">
            <text:p>3111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792">
            <text:p>0,029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4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84.11">
            <text:p>2484,11</text:p>
          </table:table-cell>
          <table:table-cell table:style-name="ce12N2" office:value-type="float" office:value="2.48">
            <text:p>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36">
            <text:p>22,3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3.36">
            <text:p>2943,36</text:p>
          </table:table-cell>
          <table:table-cell table:style-name="ce12N2" office:value-type="float" office:value="206.04">
            <text:p>20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1163288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5">
            <text:p>3111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21.16">
            <text:p>5152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1226.98">
            <text:p>51226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29">
            <text:p>0,295</text:p>
          </table:table-cell>
          <table:table-cell table:style-name="ce12N2" office:value-type="float" office:value="192.98">
            <text:p>19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52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369.56">
            <text:p>43369,56</text:p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33">
            <text:p>390,3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94.18">
            <text:p>294,18</text:p>
          </table:table-cell>
          <table:table-cell table:style-name="ce12N2" office:value-type="float" office:value="49097.54">
            <text:p>49097,54</text:p>
          </table:table-cell>
          <table:table-cell table:style-name="ce12N2" office:value-type="float" office:value="3436.84">
            <text:p>34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31793631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6">
            <text:p>3111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8">
            <text:p>0,00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8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19.81">
            <text:p>3619,81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58">
            <text:p>32,5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9">
            <text:p>4289,00</text:p>
          </table:table-cell>
          <table:table-cell table:style-name="ce12N2" office:value-type="float" office:value="300.23">
            <text:p>30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41208427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7">
            <text:p>3111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4.13">
            <text:p>89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5">
            <text:p>0,001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2.94">
            <text:p>712,94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2">
            <text:p>6,4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4.57">
            <text:p>54,57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3.95">
            <text:p>5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61713105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8">
            <text:p>3111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466.22">
            <text:p>20466,22</text:p>
          </table:table-cell>
          <table:table-cell table:style-name="ce12N2" office:value-type="float" office:value="20.47">
            <text:p>2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2">
            <text:p>184,2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249.78">
            <text:p>24249,78</text:p>
          </table:table-cell>
          <table:table-cell table:style-name="ce12N2" office:value-type="float" office:value="1697.48">
            <text:p>169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71697067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9">
            <text:p>3111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58">
            <text:p>18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2.56">
            <text:p>169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28.48">
            <text:p>1428,48</text:p>
          </table:table-cell>
          <table:table-cell table:style-name="ce12N2" office:value-type="float" office:value="1.43">
            <text:p>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86">
            <text:p>12,8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0.02">
            <text:p>110,02</text:p>
          </table:table-cell>
          <table:table-cell table:style-name="ce12N2" office:value-type="float" office:value="1692.56">
            <text:p>1692,56</text:p>
          </table:table-cell>
          <table:table-cell table:style-name="ce12N2" office:value-type="float" office:value="118.48">
            <text:p>1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8131508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0">
            <text:p>3112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9.83">
            <text:p>6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.78">
            <text:p>60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46">
            <text:p>0,001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7.05">
            <text:p>507,05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6">
            <text:p>4,5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600.78">
            <text:p>600,78</text:p>
          </table:table-cell>
          <table:table-cell table:style-name="ce12N2" office:value-type="float" office:value="42.05">
            <text:p>4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91278907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1">
            <text:p>3112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1.83">
            <text:p>1551,83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7">
            <text:p>13,9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8.72">
            <text:p>1838,72</text:p>
          </table:table-cell>
          <table:table-cell table:style-name="ce12N2" office:value-type="float" office:value="128.71">
            <text:p>128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017555361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2">
            <text:p>3112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624">
            <text:p>0,044</text:p>
          </table:table-cell>
          <table:table-cell table:style-name="ce12N2" office:value-type="float" office:value="30.02">
            <text:p>30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3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71.22">
            <text:p>7371,22</text:p>
          </table:table-cell>
          <table:table-cell table:style-name="ce12N2" office:value-type="float" office:value="7.37">
            <text:p>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34">
            <text:p>66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3.92">
            <text:p>8733,92</text:p>
          </table:table-cell>
          <table:table-cell table:style-name="ce12N2" office:value-type="float" office:value="611.37">
            <text:p>61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11339007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3">
            <text:p>3112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6">
            <text:p>0,023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9.58">
            <text:p>3879,58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92">
            <text:p>3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321.78">
            <text:p>32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21568192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4">
            <text:p>3112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5.78">
            <text:p>42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9.79">
            <text:p>399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115">
            <text:p>0,010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.41">
            <text:p>337,41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.99">
            <text:p>25,99</text:p>
          </table:table-cell>
          <table:table-cell table:style-name="ce12N2" office:value-type="float" office:value="399.79">
            <text:p>399,79</text:p>
          </table:table-cell>
          <table:table-cell table:style-name="ce12N2" office:value-type="float" office:value="27.99">
            <text:p>2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31950718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6">
            <text:p>3112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6">
            <text:p>0,023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79.58">
            <text:p>3879,58</text:p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92">
            <text:p>34,9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6.8">
            <text:p>4596,80</text:p>
          </table:table-cell>
          <table:table-cell table:style-name="ce12N2" office:value-type="float" office:value="321.78">
            <text:p>32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4129225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7">
            <text:p>3112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24.72">
            <text:p>742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24.72">
            <text:p>7424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9">
            <text:p>0,001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2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66.45">
            <text:p>6466,45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19">
            <text:p>58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74.19">
            <text:p>7374,19</text:p>
          </table:table-cell>
          <table:table-cell table:style-name="ce12N2" office:value-type="float" office:value="299.15">
            <text:p>29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61848831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8">
            <text:p>3112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430.1">
            <text:p>1043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378.03">
            <text:p>10378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81">
            <text:p>0,031</text:p>
          </table:table-cell>
          <table:table-cell table:style-name="ce12N2" office:value-type="float" office:value="13.94">
            <text:p>1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43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60.51">
            <text:p>8960,51</text:p>
          </table:table-cell>
          <table:table-cell table:style-name="ce12N2" office:value-type="float" office:value="8.96">
            <text:p>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64">
            <text:p>80,6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2.07">
            <text:p>52,07</text:p>
          </table:table-cell>
          <table:table-cell table:style-name="ce12N2" office:value-type="float" office:value="8862.26">
            <text:p>8862,26</text:p>
          </table:table-cell>
          <table:table-cell table:style-name="ce12N2" office:value-type="float" office:value="504.19">
            <text:p>50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712084318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09">
            <text:p>31120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32">
            <text:p>0,090</text:p>
          </table:table-cell>
          <table:table-cell table:style-name="ce12N2" office:value-type="float" office:value="3.95">
            <text:p>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8.93">
            <text:p>298,93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3.12">
            <text:p>343,12</text:p>
          </table:table-cell>
          <table:table-cell table:style-name="ce12N2" office:value-type="float" office:value="13.72">
            <text:p>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816709936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0">
            <text:p>3112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2.67">
            <text:p>126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18">
            <text:p>119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7">
            <text:p>0,036</text:p>
          </table:table-cell>
          <table:table-cell table:style-name="ce12N2" office:value-type="float" office:value="13.24">
            <text:p>13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92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58.5">
            <text:p>10058,50</text:p>
          </table:table-cell>
          <table:table-cell table:style-name="ce12N2" office:value-type="float" office:value="10.06">
            <text:p>1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53">
            <text:p>90,5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774.67">
            <text:p>774,67</text:p>
          </table:table-cell>
          <table:table-cell table:style-name="ce12N2" office:value-type="float" office:value="11918">
            <text:p>11918,00</text:p>
          </table:table-cell>
          <table:table-cell table:style-name="ce12N2" office:value-type="float" office:value="834.26">
            <text:p>83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91541216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1">
            <text:p>3112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8688">
            <text:p>0,159</text:p>
          </table:table-cell>
          <table:table-cell table:style-name="ce12N2" office:value-type="float" office:value="75.12">
            <text:p>7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3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724.39">
            <text:p>28724,39</text:p>
          </table:table-cell>
          <table:table-cell table:style-name="ce12N2" office:value-type="float" office:value="28.72">
            <text:p>2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.52">
            <text:p>258,5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34.64">
            <text:p>34034,64</text:p>
          </table:table-cell>
          <table:table-cell table:style-name="ce12N2" office:value-type="float" office:value="2382.42">
            <text:p>238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014131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2">
            <text:p>3112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7.86">
            <text:p>380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5.46">
            <text:p>3575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71">
            <text:p>0,011</text:p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7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7.6">
            <text:p>3017,60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32.4">
            <text:p>232,40</text:p>
          </table:table-cell>
          <table:table-cell table:style-name="ce12N2" office:value-type="float" office:value="3575.46">
            <text:p>3575,46</text:p>
          </table:table-cell>
          <table:table-cell table:style-name="ce12N2" office:value-type="float" office:value="250.28">
            <text:p>2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111125709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3">
            <text:p>3112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40.85">
            <text:p>1514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773.79">
            <text:p>14773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25307">
            <text:p>1,925</text:p>
          </table:table-cell>
          <table:table-cell table:style-name="ce12N2" office:value-type="float" office:value="36.3">
            <text:p>3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4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20.55">
            <text:p>12820,55</text:p>
          </table:table-cell>
          <table:table-cell table:style-name="ce12N2" office:value-type="float" office:value="12.82">
            <text:p>1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.39">
            <text:p>115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67.06">
            <text:p>367,06</text:p>
          </table:table-cell>
          <table:table-cell table:style-name="ce12N2" office:value-type="float" office:value="14773.79">
            <text:p>14773,79</text:p>
          </table:table-cell>
          <table:table-cell table:style-name="ce12N2" office:value-type="float" office:value="646.46">
            <text:p>6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21136350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4">
            <text:p>3112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5.26">
            <text:p>49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97.5">
            <text:p>489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53">
            <text:p>0,026</text:p>
          </table:table-cell>
          <table:table-cell table:style-name="ce12N2" office:value-type="float" office:value="26.02">
            <text:p>2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5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61.76">
            <text:p>4161,76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45">
            <text:p>37,45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67.76">
            <text:p>67,76</text:p>
          </table:table-cell>
          <table:table-cell table:style-name="ce12N2" office:value-type="float" office:value="4897.5">
            <text:p>4897,50</text:p>
          </table:table-cell>
          <table:table-cell table:style-name="ce12N2" office:value-type="float" office:value="311.55">
            <text:p>3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31533488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5">
            <text:p>3112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72">
            <text:p>0,091</text:p>
          </table:table-cell>
          <table:table-cell table:style-name="ce12N2" office:value-type="float" office:value="66.82">
            <text:p>6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97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91.34">
            <text:p>20891,34</text:p>
          </table:table-cell>
          <table:table-cell table:style-name="ce12N2" office:value-type="float" office:value="20.89">
            <text:p>2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.02">
            <text:p>188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979.96">
            <text:p>23979,96</text:p>
          </table:table-cell>
          <table:table-cell table:style-name="ce12N2" office:value-type="float" office:value="959.2">
            <text:p>95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511083210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6">
            <text:p>311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88.47">
            <text:p>2888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8737.37">
            <text:p>28737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72632">
            <text:p>1,073</text:p>
          </table:table-cell>
          <table:table-cell table:style-name="ce12N2" office:value-type="float" office:value="176.95">
            <text:p>176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888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373.56">
            <text:p>24373,56</text:p>
          </table:table-cell>
          <table:table-cell table:style-name="ce12N2" office:value-type="float" office:value="24.37">
            <text:p>2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.36">
            <text:p>219,36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51.1">
            <text:p>151,10</text:p>
          </table:table-cell>
          <table:table-cell table:style-name="ce12N2" office:value-type="float" office:value="28737.37">
            <text:p>28737,37</text:p>
          </table:table-cell>
          <table:table-cell table:style-name="ce12N2" office:value-type="float" office:value="1879.43">
            <text:p>187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611124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7">
            <text:p>3112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42">
            <text:p>0,008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06.04">
            <text:p>5206,04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85">
            <text:p>46,8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68.45">
            <text:p>6168,45</text:p>
          </table:table-cell>
          <table:table-cell table:style-name="ce12N2" office:value-type="float" office:value="431.79">
            <text:p>43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71711649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9">
            <text:p>311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9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2.04">
            <text:p>1682,04</text:p>
          </table:table-cell>
          <table:table-cell table:style-name="ce12N2" office:value-type="float" office:value="1.68">
            <text:p>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4">
            <text:p>15,14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3">
            <text:p>1993,00</text:p>
          </table:table-cell>
          <table:table-cell table:style-name="ce12N2" office:value-type="float" office:value="139.51">
            <text:p>13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018382461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0">
            <text:p>311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24">
            <text:p>0,000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1.65">
            <text:p>2591,65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2">
            <text:p>23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0.76">
            <text:p>3070,76</text:p>
          </table:table-cell>
          <table:table-cell table:style-name="ce12N2" office:value-type="float" office:value="214.95">
            <text:p>21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11804764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1">
            <text:p>311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">
            <text:p>0,002</text:p>
          </table:table-cell>
          <table:table-cell table:style-name="ce12N2" office:value-type="float" office:value="48.8">
            <text:p>4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63.81">
            <text:p>5363,81</text:p>
          </table:table-cell>
          <table:table-cell table:style-name="ce12N2" office:value-type="float" office:value="5.36">
            <text:p>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27">
            <text:p>48,2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6.8">
            <text:p>6156,80</text:p>
          </table:table-cell>
          <table:table-cell table:style-name="ce12N2" office:value-type="float" office:value="246.27">
            <text:p>24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214256620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2">
            <text:p>311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28">
            <text:p>0,046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2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26.03">
            <text:p>2726,03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53">
            <text:p>24,53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29.98">
            <text:p>3229,98</text:p>
          </table:table-cell>
          <table:table-cell table:style-name="ce12N2" office:value-type="float" office:value="226.1">
            <text:p>2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41714379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3">
            <text:p>311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8">
            <text:p>0,033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5.04">
            <text:p>2235,04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2">
            <text:p>20,1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8.24">
            <text:p>2648,24</text:p>
          </table:table-cell>
          <table:table-cell table:style-name="ce12N2" office:value-type="float" office:value="185.38">
            <text:p>18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514369062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4">
            <text:p>311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28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.17">
            <text:p>694,17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25">
            <text:p>6,2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2.5">
            <text:p>822,50</text:p>
          </table:table-cell>
          <table:table-cell table:style-name="ce12N2" office:value-type="float" office:value="57.58">
            <text:p>5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61226118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5">
            <text:p>311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2.1">
            <text:p>362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42.08">
            <text:p>354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4">
            <text:p>0,011</text:p>
          </table:table-cell>
          <table:table-cell table:style-name="ce12N2" office:value-type="float" office:value="5.45">
            <text:p>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89.44">
            <text:p>2989,44</text:p>
          </table:table-cell>
          <table:table-cell table:style-name="ce12N2" office:value-type="float" office:value="2.99">
            <text:p>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9">
            <text:p>26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3542.08">
            <text:p>3542,08</text:p>
          </table:table-cell>
          <table:table-cell table:style-name="ce12N2" office:value-type="float" office:value="247.94">
            <text:p>24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719905049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6">
            <text:p>311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4">
            <text:p>0,006</text:p>
          </table:table-cell>
          <table:table-cell table:style-name="ce12N2" office:value-type="float" office:value="3.95">
            <text:p>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6.83">
            <text:p>1116,83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5">
            <text:p>10,0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3.3">
            <text:p>1323,30</text:p>
          </table:table-cell>
          <table:table-cell table:style-name="ce12N2" office:value-type="float" office:value="92.63">
            <text:p>9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81971825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7">
            <text:p>311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32">
            <text:p>0,036</text:p>
          </table:table-cell>
          <table:table-cell table:style-name="ce12N2" office:value-type="float" office:value="14.56">
            <text:p>1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39.13">
            <text:p>6339,13</text:p>
          </table:table-cell>
          <table:table-cell table:style-name="ce12N2" office:value-type="float" office:value="6.34">
            <text:p>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.05">
            <text:p>57,0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6.32">
            <text:p>7276,32</text:p>
          </table:table-cell>
          <table:table-cell table:style-name="ce12N2" office:value-type="float" office:value="291.05">
            <text:p>2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918460909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8">
            <text:p>311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404">
            <text:p>0,026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4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3.06">
            <text:p>1473,06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6">
            <text:p>13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5.38">
            <text:p>1745,38</text:p>
          </table:table-cell>
          <table:table-cell table:style-name="ce12N2" office:value-type="float" office:value="122.18">
            <text:p>12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301769428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0">
            <text:p>31123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11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">
            <text:p>0,010</text:p>
          </table:table-cell>
          <table:table-cell table:style-name="ce12N2" office:value-type="float" office:value="244">
            <text:p>2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5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757.35">
            <text:p>59757,35</text:p>
          </table:table-cell>
          <table:table-cell table:style-name="ce12N2" office:value-type="float" office:value="59.76">
            <text:p>5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7.82">
            <text:p>537,82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92">
            <text:p>68592,00</text:p>
          </table:table-cell>
          <table:table-cell table:style-name="ce12N2" office:value-type="float" office:value="2743.68">
            <text:p>274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532143448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6">
            <text:p>311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234.71">
            <text:p>66623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">
            <text:p>65,00</text:p>
          </table:table-cell>
          <table:table-cell table:style-name="ce12N2" office:value-type="float" office:value="664454.88">
            <text:p>6644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.230666">
            <text:p>32,231</text:p>
          </table:table-cell>
          <table:table-cell table:style-name="ce12N2" office:value-type="float" office:value="1091.22">
            <text:p>109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6.23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5737.83">
            <text:p>565737,83</text:p>
          </table:table-cell>
          <table:table-cell table:style-name="ce12N2" office:value-type="float" office:value="565.74">
            <text:p>56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91.65">
            <text:p>5091,6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779.83">
            <text:p>1779,83</text:p>
          </table:table-cell>
          <table:table-cell table:style-name="ce12N2" office:value-type="float" office:value="660568.58">
            <text:p>660568,58</text:p>
          </table:table-cell>
          <table:table-cell table:style-name="ce12N2" office:value-type="float" office:value="41052.33">
            <text:p>4105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231484104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7">
            <text:p>311237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595.86">
            <text:p>1025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942">
            <text:p>31,942</text:p>
          </table:table-cell>
          <table:table-cell table:style-name="ce12N2" office:value-type="float" office:value="6000">
            <text:p>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59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2.8">
            <text:p>83862,80</text:p>
          </table:table-cell>
          <table:table-cell table:style-name="ce12N2" office:value-type="float" office:value="83.86">
            <text:p>8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.77">
            <text:p>754,7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229.41">
            <text:p>3229,41</text:p>
          </table:table-cell>
          <table:table-cell table:style-name="ce12N2" office:value-type="float" office:value="99366.45">
            <text:p>99366,45</text:p>
          </table:table-cell>
          <table:table-cell table:style-name="ce12N2" office:value-type="float" office:value="6955.65">
            <text:p>695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21575113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9">
            <text:p>31123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9.78">
            <text:p>610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67">
            <text:p>556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3">
            <text:p>0,108</text:p>
          </table:table-cell>
          <table:table-cell table:style-name="ce12N2" office:value-type="float" office:value="8.74">
            <text:p>8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0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98.4">
            <text:p>4698,40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29">
            <text:p>42,2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42.78">
            <text:p>542,78</text:p>
          </table:table-cell>
          <table:table-cell table:style-name="ce12N2" office:value-type="float" office:value="5567">
            <text:p>5567,00</text:p>
          </table:table-cell>
          <table:table-cell table:style-name="ce12N2" office:value-type="float" office:value="389.69">
            <text:p>38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51519807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0">
            <text:p>3112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9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6">
            <text:p>0,011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0.84">
            <text:p>2230,84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08">
            <text:p>20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3.24">
            <text:p>2643,24</text:p>
          </table:table-cell>
          <table:table-cell table:style-name="ce12N2" office:value-type="float" office:value="185.03">
            <text:p>185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9741082884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1">
            <text:p>311241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26.32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62">
            <text:p>0,042</text:p>
          </table:table-cell>
          <table:table-cell table:style-name="ce12N2" office:value-type="float" office:value="246.25">
            <text:p>24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27.39">
            <text:p>8227,39</text:p>
          </table:table-cell>
          <table:table-cell table:style-name="ce12N2" office:value-type="float" office:value="8.22">
            <text:p>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03">
            <text:p>74,0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48.35">
            <text:p>9748,35</text:p>
          </table:table-cell>
          <table:table-cell table:style-name="ce12N2" office:value-type="float" office:value="682.39">
            <text:p>68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263251005398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2">
            <text:p>31124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826.32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28">
            <text:p>0,031</text:p>
          </table:table-cell>
          <table:table-cell table:style-name="ce12N2" office:value-type="float" office:value="157.25">
            <text:p>15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8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96.64">
            <text:p>5896,64</text:p>
          </table:table-cell>
          <table:table-cell table:style-name="ce12N2" office:value-type="float" office:value="5.88">
            <text:p>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05">
            <text:p>53,0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86.7">
            <text:p>6986,70</text:p>
          </table:table-cell>
          <table:table-cell table:style-name="ce12N2" office:value-type="float" office:value="489.07">
            <text:p>4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45985371000108550250008263261007678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43">
            <text:p>311243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25.0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16.08">
            <text:p>3151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30524.05">
            <text:p>30524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1553">
            <text:p>0,242</text:p>
          </table:table-cell>
          <table:table-cell table:style-name="ce12N2" office:value-type="float" office:value="193.95">
            <text:p>193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16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1.51">
            <text:p>25761,51</text:p>
          </table:table-cell>
          <table:table-cell table:style-name="ce12N2" office:value-type="float" office:value="25.76">
            <text:p>2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.85">
            <text:p>231,85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92.03">
            <text:p>992,03</text:p>
          </table:table-cell>
          <table:table-cell table:style-name="ce12N2" office:value-type="float" office:value="30524.05">
            <text:p>30524,05</text:p>
          </table:table-cell>
          <table:table-cell table:style-name="ce12N2" office:value-type="float" office:value="2136.69">
            <text:p>21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468337400030055003000625066166129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1">
            <text:p>311251</text:p>
          </table:table-cell>
          <table:table-cell table:style-name="ce0" table:number-columns-spanned="4" table:number-rows-spanned="1" office:value-type="string" calcext:value-type="string">
            <text:p>10.606 - ZMA- PERFIL DE ALUMINIO EIRELI-ME</text:p>
          </table:table-cell>
          <table:covered-table-cell table:number-columns-repeated="3"/>
          <table:table-cell table:style-name="ce0" office:value-type="string" calcext:value-type="string">
            <text:p>18.5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7">
            <text:p>11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7">
            <text:p>11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2.72">
            <text:p>942,72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8">
            <text:p>8,4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7">
            <text:p>1117,00</text:p>
          </table:table-cell>
          <table:table-cell table:style-name="ce12N2" office:value-type="float" office:value="78.19">
            <text:p>7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.77">
            <text:p>2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83.853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15/07/2026</text:p>
          </table:table-cell>
          <table:table-cell table:style-name="ce12" office:value-type="string" calcext:value-type="string">
            <text:p>24,77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41260700296181000145550010000185261001532293</text:p>
          </table:table-cell>
          <table:table-cell table:style-name="ce0" office:value-type="string" calcext:value-type="string">
            <text:p>3526070522209200076357002000483853100737858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3">
            <text:p>311253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2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0.76">
            <text:p>4230,76</text:p>
          </table:table-cell>
          <table:table-cell table:style-name="ce12N2" office:value-type="float" office:value="4.23">
            <text:p>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12.89">
            <text:p>5012,89</text:p>
          </table:table-cell>
          <table:table-cell table:style-name="ce12N2" office:value-type="float" office:value="350.9">
            <text:p>35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1507510091355500100056685318124142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4">
            <text:p>3112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7.63">
            <text:p>142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00.8">
            <text:p>13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4">
            <text:p>0,00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7.84">
            <text:p>1097,84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88">
            <text:p>9,88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26.83">
            <text:p>126,83</text:p>
          </table:table-cell>
          <table:table-cell table:style-name="ce12N2" office:value-type="float" office:value="1300.8">
            <text:p>1300,80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38127057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5">
            <text:p>311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64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02.59">
            <text:p>159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4929.74">
            <text:p>14929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215732">
            <text:p>61,216</text:p>
          </table:table-cell>
          <table:table-cell table:style-name="ce12N2" office:value-type="float" office:value="48.99">
            <text:p>4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0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1.53">
            <text:p>12831,53</text:p>
          </table:table-cell>
          <table:table-cell table:style-name="ce12N2" office:value-type="float" office:value="12.84">
            <text:p>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.48">
            <text:p>115,48</text:p>
          </table:table-cell>
          <table:table-cell table:style-name="ce12N2" office:value-type="float" office:value="55.14">
            <text:p>55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72.85">
            <text:p>972,85</text:p>
          </table:table-cell>
          <table:table-cell table:style-name="ce12N2" office:value-type="float" office:value="14929.74">
            <text:p>14929,74</text:p>
          </table:table-cell>
          <table:table-cell table:style-name="ce12N2" office:value-type="float" office:value="790.31">
            <text:p>79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6481098659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8">
            <text:p>311258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81.2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887.6">
            <text:p>1658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5887.6">
            <text:p>1658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600">
            <text:p>11600,000</text:p>
          </table:table-cell>
          <table:table-cell table:style-name="ce12N2" office:value-type="float" office:value="5001.04">
            <text:p>500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.8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004.98">
            <text:p>140004,98</text:p>
          </table:table-cell>
          <table:table-cell table:style-name="ce12N2" office:value-type="float" office:value="140">
            <text:p>1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0.04">
            <text:p>1260,0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887.6">
            <text:p>165887,60</text:p>
          </table:table-cell>
          <table:table-cell table:style-name="ce12N2" office:value-type="float" office:value="11612.13">
            <text:p>1161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25440420001195500100048120616627262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9">
            <text:p>31125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629.7">
            <text:p>15562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155242.85">
            <text:p>15524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425175">
            <text:p>17,425</text:p>
          </table:table-cell>
          <table:table-cell table:style-name="ce12N2" office:value-type="float" office:value="4543.62">
            <text:p>454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629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998.97">
            <text:p>132998,97</text:p>
          </table:table-cell>
          <table:table-cell table:style-name="ce12N2" office:value-type="float" office:value="133">
            <text:p>1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98">
            <text:p>1196,9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86.85">
            <text:p>386,85</text:p>
          </table:table-cell>
          <table:table-cell table:style-name="ce12N2" office:value-type="float" office:value="155242.85">
            <text:p>155242,85</text:p>
          </table:table-cell>
          <table:table-cell table:style-name="ce12N2" office:value-type="float" office:value="8694.68">
            <text:p>869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3941077111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1">
            <text:p>31126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63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423.11">
            <text:p>8542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85370.45">
            <text:p>85370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15.054388">
            <text:p>815,054</text:p>
          </table:table-cell>
          <table:table-cell table:style-name="ce12N2" office:value-type="float" office:value="5188.43">
            <text:p>5188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42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067.54">
            <text:p>72067,54</text:p>
          </table:table-cell>
          <table:table-cell table:style-name="ce12N2" office:value-type="float" office:value="72.07">
            <text:p>7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8.61">
            <text:p>648,6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85370.45">
            <text:p>85370,45</text:p>
          </table:table-cell>
          <table:table-cell table:style-name="ce12N2" office:value-type="float" office:value="5975.95">
            <text:p>597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088625300011225500100206352213265148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5">
            <text:p>3112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38">
            <text:p>0,008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.61">
            <text:p>431,6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35.8">
            <text:p>3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51371936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6">
            <text:p>3112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20.66">
            <text:p>1522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127.16">
            <text:p>15127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2084">
            <text:p>0,182</text:p>
          </table:table-cell>
          <table:table-cell table:style-name="ce12N2" office:value-type="float" office:value="68.31">
            <text:p>68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22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39.62">
            <text:p>13139,62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26">
            <text:p>11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93.5">
            <text:p>93,50</text:p>
          </table:table-cell>
          <table:table-cell table:style-name="ce12N2" office:value-type="float" office:value="15127.16">
            <text:p>15127,16</text:p>
          </table:table-cell>
          <table:table-cell table:style-name="ce12N2" office:value-type="float" office:value="648.25">
            <text:p>64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051257037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7">
            <text:p>3112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6.98">
            <text:p>446,9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2">
            <text:p>4,0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.61">
            <text:p>529,61</text:p>
          </table:table-cell>
          <table:table-cell table:style-name="ce12N2" office:value-type="float" office:value="37.07">
            <text:p>3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41336564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8">
            <text:p>3112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0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738">
            <text:p>0,008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.61">
            <text:p>431,61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88">
            <text:p>3,8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.41">
            <text:p>511,41</text:p>
          </table:table-cell>
          <table:table-cell table:style-name="ce12N2" office:value-type="float" office:value="35.8">
            <text:p>3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91222490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0">
            <text:p>31127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7.9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69.42">
            <text:p>4486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579.65">
            <text:p>44579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5114">
            <text:p>5,735</text:p>
          </table:table-cell>
          <table:table-cell table:style-name="ce12N2" office:value-type="float" office:value="32123.76">
            <text:p>3212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869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24.12">
            <text:p>37624,12</text:p>
          </table:table-cell>
          <table:table-cell table:style-name="ce12N2" office:value-type="float" office:value="37.62">
            <text:p>37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8.62">
            <text:p>338,62</text:p>
          </table:table-cell>
          <table:table-cell table:style-name="ce12N2" office:value-type="float" office:value="98.04">
            <text:p>98,0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89.77">
            <text:p>289,77</text:p>
          </table:table-cell>
          <table:table-cell table:style-name="ce12N2" office:value-type="float" office:value="44579.65">
            <text:p>44579,65</text:p>
          </table:table-cell>
          <table:table-cell table:style-name="ce12N2" office:value-type="float" office:value="3120.58">
            <text:p>31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4423880000145550030012279421646860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3">
            <text:p>311273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97.1">
            <text:p>5309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1425.76">
            <text:p>51425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9675">
            <text:p>17,968</text:p>
          </table:table-cell>
          <table:table-cell table:style-name="ce12N2" office:value-type="float" office:value="2904">
            <text:p>29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09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402.05">
            <text:p>43402,05</text:p>
          </table:table-cell>
          <table:table-cell table:style-name="ce12N2" office:value-type="float" office:value="43.4">
            <text:p>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.62">
            <text:p>390,6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71.34">
            <text:p>1671,34</text:p>
          </table:table-cell>
          <table:table-cell table:style-name="ce12N2" office:value-type="float" office:value="51425.76">
            <text:p>51425,76</text:p>
          </table:table-cell>
          <table:table-cell table:style-name="ce12N2" office:value-type="float" office:value="3599.8">
            <text:p>359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31575113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4">
            <text:p>311274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449.13">
            <text:p>3444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364.77">
            <text:p>33364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81854">
            <text:p>11,819</text:p>
          </table:table-cell>
          <table:table-cell table:style-name="ce12N2" office:value-type="float" office:value="2220">
            <text:p>22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449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29.24">
            <text:p>31029,2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9.26">
            <text:p>279,2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84.36">
            <text:p>1084,36</text:p>
          </table:table-cell>
          <table:table-cell table:style-name="ce12N2" office:value-type="float" office:value="33364.77">
            <text:p>33364,77</text:p>
          </table:table-cell>
          <table:table-cell table:style-name="ce12N2" office:value-type="float" office:value="2335.53">
            <text:p>233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886740800003735500100000636415751136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6">
            <text:p>31127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9.83">
            <text:p>581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02.8">
            <text:p>53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831">
            <text:p>0,098</text:p>
          </table:table-cell>
          <table:table-cell table:style-name="ce12N2" office:value-type="float" office:value="8.23">
            <text:p>8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5.43">
            <text:p>4475,43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7">
            <text:p>40,2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517.03">
            <text:p>517,03</text:p>
          </table:table-cell>
          <table:table-cell table:style-name="ce12N2" office:value-type="float" office:value="5302.8">
            <text:p>5302,80</text:p>
          </table:table-cell>
          <table:table-cell table:style-name="ce12N2" office:value-type="float" office:value="371.2">
            <text:p>37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413080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8">
            <text:p>31127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0.9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8.49">
            <text:p>464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79.16">
            <text:p>447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4">
            <text:p>0,002</text:p>
          </table:table-cell>
          <table:table-cell table:style-name="ce12N2" office:value-type="float" office:value="0.82">
            <text:p>0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8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0.26">
            <text:p>3790,26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12">
            <text:p>34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9.33">
            <text:p>169,33</text:p>
          </table:table-cell>
          <table:table-cell table:style-name="ce12N2" office:value-type="float" office:value="4479.16">
            <text:p>4479,16</text:p>
          </table:table-cell>
          <table:table-cell table:style-name="ce12N2" office:value-type="float" office:value="302.57">
            <text:p>30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09471738077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9">
            <text:p>31127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704.72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7.49">
            <text:p>10033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99480.68">
            <text:p>9948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810542">
            <text:p>14,811</text:p>
          </table:table-cell>
          <table:table-cell table:style-name="ce12N2" office:value-type="float" office:value="1696.89">
            <text:p>1696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33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67.85">
            <text:p>84267,85</text:p>
          </table:table-cell>
          <table:table-cell table:style-name="ce12N2" office:value-type="float" office:value="84.26">
            <text:p>8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8.4">
            <text:p>758,4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56.81">
            <text:p>856,81</text:p>
          </table:table-cell>
          <table:table-cell table:style-name="ce12N2" office:value-type="float" office:value="99480.68">
            <text:p>99480,68</text:p>
          </table:table-cell>
          <table:table-cell table:style-name="ce12N2" office:value-type="float" office:value="6623.46">
            <text:p>662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723837000172550000007047291093606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0">
            <text:p>31128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1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5.6">
            <text:p>391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3708.6">
            <text:p>370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21">
            <text:p>0,041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3.6">
            <text:p>3173,60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7">
            <text:p>28,57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07">
            <text:p>207,00</text:p>
          </table:table-cell>
          <table:table-cell table:style-name="ce12N2" office:value-type="float" office:value="3708.6">
            <text:p>3708,60</text:p>
          </table:table-cell>
          <table:table-cell table:style-name="ce12N2" office:value-type="float" office:value="211.49">
            <text:p>21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1211190130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1">
            <text:p>31128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.97">
            <text:p>8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0.88">
            <text:p>77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308">
            <text:p>0,007</text:p>
          </table:table-cell>
          <table:table-cell table:style-name="ce12N2" office:value-type="float" office:value="3.27">
            <text:p>3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0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0.04">
            <text:p>740,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0.09">
            <text:p>40,09</text:p>
          </table:table-cell>
          <table:table-cell table:style-name="ce12N2" office:value-type="float" office:value="770.88">
            <text:p>770,88</text:p>
          </table:table-cell>
          <table:table-cell table:style-name="ce12N2" office:value-type="float" office:value="30.84">
            <text:p>3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21454733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2">
            <text:p>311282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.25">
            <text:p>68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.38">
            <text:p>65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88">
            <text:p>0,011</text:p>
          </table:table-cell>
          <table:table-cell table:style-name="ce12N2" office:value-type="float" office:value="6.24">
            <text:p>6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9.74">
            <text:p>549,74</text:p>
          </table:table-cell>
          <table:table-cell table:style-name="ce12N2" office:value-type="float" office:value="0.55">
            <text:p>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95">
            <text:p>4,95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651.38">
            <text:p>651,38</text:p>
          </table:table-cell>
          <table:table-cell table:style-name="ce12N2" office:value-type="float" office:value="45.6">
            <text:p>4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31486921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85">
            <text:p>311285</text:p>
          </table:table-cell>
          <table:table-cell table:style-name="ce0" table:number-columns-spanned="4" table:number-rows-spanned="1" office:value-type="string" calcext:value-type="string">
            <text:p>31.248 - GV DO BRASIL INDUSTRIA E COMERCIO DE ACO LTDA</text:p>
          </table:table-cell>
          <table:covered-table-cell table:number-columns-repeated="3"/>
          <table:table-cell table:style-name="ce0" office:value-type="string" calcext:value-type="string">
            <text:p>154.46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113.6">
            <text:p>17511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113.6">
            <text:p>17511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316">
            <text:p>0,076</text:p>
          </table:table-cell>
          <table:table-cell table:style-name="ce12N2" office:value-type="float" office:value="39429.07">
            <text:p>39429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5.11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791.5">
            <text:p>147791,50</text:p>
          </table:table-cell>
          <table:table-cell table:style-name="ce12N2" office:value-type="float" office:value="147.79">
            <text:p>14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0.12">
            <text:p>1330,12</text:p>
          </table:table-cell>
          <table:table-cell table:style-name="ce12N2" office:value-type="float" office:value="52.5">
            <text:p>52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113.6">
            <text:p>175113,60</text:p>
          </table:table-cell>
          <table:table-cell table:style-name="ce12N2" office:value-type="float" office:value="12257.95">
            <text:p>1225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2884632000144550020001544691465029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19">
            <text:p>31131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1044">
            <text:p>1,210</text:p>
          </table:table-cell>
          <table:table-cell table:style-name="ce12N2" office:value-type="float" office:value="480.08">
            <text:p>48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97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63.61">
            <text:p>9263,61</text:p>
          </table:table-cell>
          <table:table-cell table:style-name="ce12N2" office:value-type="float" office:value="9.26">
            <text:p>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.37">
            <text:p>8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76.16">
            <text:p>10976,16</text:p>
          </table:table-cell>
          <table:table-cell table:style-name="ce12N2" office:value-type="float" office:value="768.33">
            <text:p>76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91346712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0">
            <text:p>31132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2">
            <text:p>3,072</text:p>
          </table:table-cell>
          <table:table-cell table:style-name="ce12N2" office:value-type="float" office:value="1289.45">
            <text:p>1289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1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489.44">
            <text:p>30489,44</text:p>
          </table:table-cell>
          <table:table-cell table:style-name="ce12N2" office:value-type="float" office:value="30.49">
            <text:p>3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4.4">
            <text:p>27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126">
            <text:p>36126,00</text:p>
          </table:table-cell>
          <table:table-cell table:style-name="ce12N2" office:value-type="float" office:value="2528.82">
            <text:p>252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4175876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1">
            <text:p>311321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74.4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8.55">
            <text:p>335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53.57">
            <text:p>3153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95">
            <text:p>0,018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8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1.53">
            <text:p>2661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5">
            <text:p>23,9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204.98">
            <text:p>204,98</text:p>
          </table:table-cell>
          <table:table-cell table:style-name="ce12N2" office:value-type="float" office:value="3153.57">
            <text:p>3153,57</text:p>
          </table:table-cell>
          <table:table-cell table:style-name="ce12N2" office:value-type="float" office:value="220.75">
            <text:p>22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7834883000113550010006744841659747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2">
            <text:p>311322</text:p>
          </table:table-cell>
          <table:table-cell table:style-name="ce0" table:number-columns-spanned="4" table:number-rows-spanned="1" office:value-type="string" calcext:value-type="string">
            <text:p>12.833 - MULTI- BARRAS INDUSTRIA E COMERCIO EIRELI-EPP</text:p>
          </table:table-cell>
          <table:covered-table-cell table:number-columns-repeated="3"/>
          <table:table-cell table:style-name="ce0" office:value-type="string" calcext:value-type="string">
            <text:p>32.0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186.33">
            <text:p>24218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27405">
            <text:p>22740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7837">
            <text:p>13,784</text:p>
          </table:table-cell>
          <table:table-cell table:style-name="ce12N2" office:value-type="float" office:value="32000">
            <text:p>3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2.186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924.14">
            <text:p>191924,14</text:p>
          </table:table-cell>
          <table:table-cell table:style-name="ce12N2" office:value-type="float" office:value="191.93">
            <text:p>19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27.31">
            <text:p>1727,31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4781.33">
            <text:p>14781,33</text:p>
          </table:table-cell>
          <table:table-cell table:style-name="ce12N2" office:value-type="float" office:value="227405">
            <text:p>227405,00</text:p>
          </table:table-cell>
          <table:table-cell table:style-name="ce12N2" office:value-type="float" office:value="15918.35">
            <text:p>1591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27404236000140550010000320061105223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23">
            <text:p>31132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24">
            <text:p>1,382</text:p>
          </table:table-cell>
          <table:table-cell table:style-name="ce12N2" office:value-type="float" office:value="635.54">
            <text:p>63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962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40.08">
            <text:p>10940,08</text:p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62.56">
            <text:p>12962,56</text:p>
          </table:table-cell>
          <table:table-cell table:style-name="ce12N2" office:value-type="float" office:value="907.38">
            <text:p>907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8171295406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5">
            <text:p>3113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896">
            <text:p>0,077</text:p>
          </table:table-cell>
          <table:table-cell table:style-name="ce12N2" office:value-type="float" office:value="44.4">
            <text:p>4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08.84">
            <text:p>2708,84</text:p>
          </table:table-cell>
          <table:table-cell table:style-name="ce12N2" office:value-type="float" office:value="2.71">
            <text:p>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38">
            <text:p>24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09.32">
            <text:p>3109,32</text:p>
          </table:table-cell>
          <table:table-cell table:style-name="ce12N2" office:value-type="float" office:value="124.37">
            <text:p>12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71161852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7">
            <text:p>3113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6964">
            <text:p>1,470</text:p>
          </table:table-cell>
          <table:table-cell table:style-name="ce12N2" office:value-type="float" office:value="570">
            <text:p>5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3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82.69">
            <text:p>10582,69</text:p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.24">
            <text:p>95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39.1">
            <text:p>12539,10</text:p>
          </table:table-cell>
          <table:table-cell table:style-name="ce12N2" office:value-type="float" office:value="877.74">
            <text:p>87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61287323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8">
            <text:p>31133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1517">
            <text:p>6,152</text:p>
          </table:table-cell>
          <table:table-cell table:style-name="ce12N2" office:value-type="float" office:value="1963.57">
            <text:p>1963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752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216.56">
            <text:p>53216,56</text:p>
          </table:table-cell>
          <table:table-cell table:style-name="ce12N2" office:value-type="float" office:value="53.22">
            <text:p>5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.94">
            <text:p>478,9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752.94">
            <text:p>62752,94</text:p>
          </table:table-cell>
          <table:table-cell table:style-name="ce12N2" office:value-type="float" office:value="4112.1">
            <text:p>411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51102320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1">
            <text:p>311341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13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26.98">
            <text:p>7426,98</text:p>
          </table:table-cell>
          <table:table-cell table:style-name="ce12N2" office:value-type="float" office:value="7.43">
            <text:p>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84">
            <text:p>66,84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00">
            <text:p>8800,00</text:p>
          </table:table-cell>
          <table:table-cell table:style-name="ce12N2" office:value-type="float" office:value="616">
            <text:p>6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064150000518550010002139011427549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3">
            <text:p>31134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2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8.01">
            <text:p>99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6.6">
            <text:p>96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">
            <text:p>0,017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8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.11">
            <text:p>842,1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8">
            <text:p>7,5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1.41">
            <text:p>31,41</text:p>
          </table:table-cell>
          <table:table-cell table:style-name="ce12N2" office:value-type="float" office:value="966.6">
            <text:p>966,60</text:p>
          </table:table-cell>
          <table:table-cell table:style-name="ce12N2" office:value-type="float" office:value="38.66">
            <text:p>3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221542365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4">
            <text:p>31134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03">
            <text:p>110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65.4">
            <text:p>106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87">
            <text:p>0,065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28.18">
            <text:p>928,18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35">
            <text:p>8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4.63">
            <text:p>34,63</text:p>
          </table:table-cell>
          <table:table-cell table:style-name="ce12N2" office:value-type="float" office:value="1065.4">
            <text:p>1065,40</text:p>
          </table:table-cell>
          <table:table-cell table:style-name="ce12N2" office:value-type="float" office:value="42.62">
            <text:p>4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181841383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5">
            <text:p>31134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9.46">
            <text:p>99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8">
            <text:p>9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8">
            <text:p>0,023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3.32">
            <text:p>843,32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1.46">
            <text:p>31,46</text:p>
          </table:table-cell>
          <table:table-cell table:style-name="ce12N2" office:value-type="float" office:value="968">
            <text:p>968,00</text:p>
          </table:table-cell>
          <table:table-cell table:style-name="ce12N2" office:value-type="float" office:value="38.72">
            <text:p>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241203830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6">
            <text:p>31134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.05">
            <text:p>13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86.25">
            <text:p>128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315">
            <text:p>0,012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8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0.58">
            <text:p>1120,58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41.8">
            <text:p>41,80</text:p>
          </table:table-cell>
          <table:table-cell table:style-name="ce12N2" office:value-type="float" office:value="1286.25">
            <text:p>1286,25</text:p>
          </table:table-cell>
          <table:table-cell table:style-name="ce12N2" office:value-type="float" office:value="51.45">
            <text:p>5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131991439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7">
            <text:p>31134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.03">
            <text:p>4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.4">
            <text:p>4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4">
            <text:p>0,006</text:p>
          </table:table-cell>
          <table:table-cell table:style-name="ce12N2" office:value-type="float" office:value="4.92">
            <text:p>4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5.38">
            <text:p>365,38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29">
            <text:p>3,2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3.63">
            <text:p>13,63</text:p>
          </table:table-cell>
          <table:table-cell table:style-name="ce12N2" office:value-type="float" office:value="419.4">
            <text:p>419,40</text:p>
          </table:table-cell>
          <table:table-cell table:style-name="ce12N2" office:value-type="float" office:value="16.78">
            <text:p>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341672934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8">
            <text:p>31134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77.3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0.1">
            <text:p>170,100</text:p>
          </table:table-cell>
          <table:table-cell table:style-name="ce12N2" office:value-type="float" office:value="16170">
            <text:p>161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86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70.39">
            <text:p>69370,39</text:p>
          </table:table-cell>
          <table:table-cell table:style-name="ce12N2" office:value-type="float" office:value="69.37">
            <text:p>6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.33">
            <text:p>624,3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865">
            <text:p>86865,00</text:p>
          </table:table-cell>
          <table:table-cell table:style-name="ce12N2" office:value-type="float" office:value="10423.8">
            <text:p>104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707933914000154550010008773761423554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1">
            <text:p>31135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6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1.22">
            <text:p>53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4.5">
            <text:p>51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1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8.23">
            <text:p>448,23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6.72">
            <text:p>16,72</text:p>
          </table:table-cell>
          <table:table-cell table:style-name="ce12N2" office:value-type="float" office:value="514.5">
            <text:p>514,50</text:p>
          </table:table-cell>
          <table:table-cell table:style-name="ce12N2" office:value-type="float" office:value="20.58">
            <text:p>2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651238193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2">
            <text:p>3113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31.1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4.54">
            <text:p>195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17.18">
            <text:p>181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5">
            <text:p>0,073</text:p>
          </table:table-cell>
          <table:table-cell table:style-name="ce12N2" office:value-type="float" office:value="13.3">
            <text:p>1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3.66">
            <text:p>1533,66</text:p>
          </table:table-cell>
          <table:table-cell table:style-name="ce12N2" office:value-type="float" office:value="1.54">
            <text:p>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8">
            <text:p>13,8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37.36">
            <text:p>137,36</text:p>
          </table:table-cell>
          <table:table-cell table:style-name="ce12N2" office:value-type="float" office:value="1817.18">
            <text:p>1817,18</text:p>
          </table:table-cell>
          <table:table-cell table:style-name="ce12N2" office:value-type="float" office:value="127.2">
            <text:p>12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86740800001015500100093113815804616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4">
            <text:p>311354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74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03">
            <text:p>0,152</text:p>
          </table:table-cell>
          <table:table-cell table:style-name="ce12N2" office:value-type="float" office:value="66.7">
            <text:p>6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9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3">
            <text:p>9750,30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5">
            <text:p>87,7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91.8">
            <text:p>11191,80</text:p>
          </table:table-cell>
          <table:table-cell table:style-name="ce12N2" office:value-type="float" office:value="447.67">
            <text:p>44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756994700000365550010000749751100007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6">
            <text:p>311356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8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504">
            <text:p>6,350</text:p>
          </table:table-cell>
          <table:table-cell table:style-name="ce12N2" office:value-type="float" office:value="4334.04">
            <text:p>433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618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061.02">
            <text:p>30061,02</text:p>
          </table:table-cell>
          <table:table-cell table:style-name="ce12N2" office:value-type="float" office:value="30.06">
            <text:p>3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.55">
            <text:p>270,5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618.38">
            <text:p>35618,38</text:p>
          </table:table-cell>
          <table:table-cell table:style-name="ce12N2" office:value-type="float" office:value="2493.29">
            <text:p>249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816531616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7">
            <text:p>311357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9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553">
            <text:p>1,455</text:p>
          </table:table-cell>
          <table:table-cell table:style-name="ce12N2" office:value-type="float" office:value="1070.01">
            <text:p>1070,0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8.98">
            <text:p>7488,98</text:p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41">
            <text:p>67,4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73.46">
            <text:p>8873,46</text:p>
          </table:table-cell>
          <table:table-cell table:style-name="ce12N2" office:value-type="float" office:value="621.14">
            <text:p>62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91767064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8">
            <text:p>311358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518">
            <text:p>0,065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0.79">
            <text:p>1460,79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15">
            <text:p>13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6.76">
            <text:p>1676,76</text:p>
          </table:table-cell>
          <table:table-cell table:style-name="ce12N2" office:value-type="float" office:value="67.07">
            <text:p>6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431023264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9">
            <text:p>311359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036">
            <text:p>0,129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1.59">
            <text:p>2921,59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134.14">
            <text:p>13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461024738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60">
            <text:p>311360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75.9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036">
            <text:p>0,129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1.59">
            <text:p>2921,59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9">
            <text:p>26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3.52">
            <text:p>3353,52</text:p>
          </table:table-cell>
          <table:table-cell table:style-name="ce12N2" office:value-type="float" office:value="134.14">
            <text:p>13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6840537000121550010003759651363548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61">
            <text:p>311361</text:p>
          </table:table-cell>
          <table:table-cell table:style-name="ce0" table:number-columns-spanned="4" table:number-rows-spanned="1" office:value-type="string" calcext:value-type="string">
            <text:p>13.118 - FORTLEV INDUST.E COMERC. DE PLASTICOS LTDA</text:p>
          </table:table-cell>
          <table:covered-table-cell table:number-columns-repeated="3"/>
          <table:table-cell table:style-name="ce0" office:value-type="string" calcext:value-type="string">
            <text:p>262.6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82.57">
            <text:p>2388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482.48">
            <text:p>2048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6.876774">
            <text:p>56,877</text:p>
          </table:table-cell>
          <table:table-cell table:style-name="ce12N2" office:value-type="float" office:value="699.96">
            <text:p>699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882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57.3">
            <text:p>16357,30</text:p>
          </table:table-cell>
          <table:table-cell table:style-name="ce12N2" office:value-type="float" office:value="16.36">
            <text:p>1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.22">
            <text:p>147,2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482.48">
            <text:p>20482,48</text:p>
          </table:table-cell>
          <table:table-cell table:style-name="ce12N2" office:value-type="float" office:value="2457.9">
            <text:p>245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9289.95">
            <text:p>29289,95</text:p>
          </table:table-cell>
          <table:table-cell table:style-name="ce12N2" office:value-type="float" office:value="3400.09">
            <text:p>3400,0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710921911001004550010002626391119670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06">
            <text:p>206,00</text:p>
          </table:table-cell>
          <table:table-cell table:style-name="ce26N2" office:value-type="float" office:value="2412.77">
            <text:p>2412,77</text:p>
          </table:table-cell>
          <table:table-cell table:style-name="ce26N2" office:value-type="float" office:value="7.99">
            <text:p>7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1175.68">
            <text:p>101175,68</text:p>
          </table:table-cell>
          <table:table-cell table:style-name="ce26N2" office:value-type="float" office:value="5921167.83">
            <text:p>5921167,83</text:p>
          </table:table-cell>
          <table:table-cell table:style-name="ce26N2" office:value-type="float" office:value="369523.61">
            <text:p>369523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2.2">
            <text:p>132,20</text:p>
          </table:table-cell>
          <table:table-cell table:style-name="ce26N2" office:value-type="float" office:value="6066300.58">
            <text:p>6066300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9289.95">
            <text:p>29289,95</text:p>
          </table:table-cell>
          <table:table-cell table:style-name="ce26N2" office:value-type="float" office:value="3400.09">
            <text:p>3400,09</text:p>
          </table:table-cell>
          <table:table-cell table:style-name="ce26N2" office:value-type="float" office:value="719.83">
            <text:p>719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8125.032407">
            <text:p>18125,032</text:p>
          </table:table-cell>
          <table:table-cell table:style-name="ce26N2" office:value-type="float" office:value="5964129.59">
            <text:p>5964129,59</text:p>
          </table:table-cell>
          <table:table-cell table:style-name="ce26N2" office:value-type="float" office:value="6066300.58">
            <text:p>6066300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50826.09">
            <text:p>5050826,09</text:p>
          </table:table-cell>
          <table:table-cell table:style-name="ce26N2" office:value-type="float" office:value="5050.99">
            <text:p>5050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5457.34">
            <text:p>45457,34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38099.16">
            <text:p>338099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">
            <text:p>4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58" meta:object-count="0"/>
    <meta:generator>LibreOffice/4.3.0.4$Windows_x86 LibreOffice_project/62ad5818884a2fc2e5780dd45466868d41009ec0</meta:generator>
  </office:meta>
</office:document-meta>
</file>