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7:42:27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6">
            <text:p>30995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40.03">
            <text:p>22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21409">
            <text:p>2,221</text:p>
          </table:table-cell>
          <table:table-cell table:style-name="ce12N2" office:value-type="float" office:value="25919.97">
            <text:p>2591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8.07">
            <text:p>19068,07</text:p>
          </table:table-cell>
          <table:table-cell table:style-name="ce12N2" office:value-type="float" office:value="19.07">
            <text:p>1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61">
            <text:p>171,6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6.86">
            <text:p>146,86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1581.52">
            <text:p>158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11818219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9">
            <text:p>3099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2.36">
            <text:p>107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47602">
            <text:p>3,348</text:p>
          </table:table-cell>
          <table:table-cell table:style-name="ce12N2" office:value-type="float" office:value="7680">
            <text:p>7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24.51">
            <text:p>9024,51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22">
            <text:p>81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51614387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1">
            <text:p>3100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63925">
            <text:p>41,639</text:p>
          </table:table-cell>
          <table:table-cell table:style-name="ce12N2" office:value-type="float" office:value="84">
            <text:p>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5.4">
            <text:p>2885,40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7">
            <text:p>25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240.03">
            <text:p>2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41442548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2">
            <text:p>3100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81967211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3">
            <text:p>3100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04">
            <text:p>0,504</text:p>
          </table:table-cell>
          <table:table-cell table:style-name="ce12N2" office:value-type="float" office:value="32.27">
            <text:p>3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.56">
            <text:p>1906,56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158.17">
            <text:p>15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921297706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5">
            <text:p>3100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1">
            <text:p>0,408</text:p>
          </table:table-cell>
          <table:table-cell table:style-name="ce12N2" office:value-type="float" office:value="91.81">
            <text:p>91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31.7">
            <text:p>7431,7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8">
            <text:p>66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616.36">
            <text:p>61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4417292165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6">
            <text:p>3100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527">
            <text:p>0,895</text:p>
          </table:table-cell>
          <table:table-cell table:style-name="ce12N2" office:value-type="float" office:value="200.91">
            <text:p>20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9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47.4">
            <text:p>14347,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13">
            <text:p>129,1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1189.92">
            <text:p>118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921199550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3">
            <text:p>310103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4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1">
            <text:p>0,171</text:p>
          </table:table-cell>
          <table:table-cell table:style-name="ce12N2" office:value-type="float" office:value="314.64">
            <text:p>3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12.27">
            <text:p>4612,27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211.77">
            <text:p>21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40961175157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4">
            <text:p>3101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599">
            <text:p>2,286</text:p>
          </table:table-cell>
          <table:table-cell table:style-name="ce12N2" office:value-type="float" office:value="494.04">
            <text:p>49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81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52.94">
            <text:p>103652,94</text:p>
          </table:table-cell>
          <table:table-cell table:style-name="ce12N2" office:value-type="float" office:value="103.65">
            <text:p>10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2.88">
            <text:p>932,8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8597.06">
            <text:p>859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71399133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5">
            <text:p>3101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8">
            <text:p>0,122</text:p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43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48.09">
            <text:p>59448,09</text:p>
          </table:table-cell>
          <table:table-cell table:style-name="ce12N2" office:value-type="float" office:value="59.45">
            <text:p>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5.03">
            <text:p>535,0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4930.67">
            <text:p>493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81076534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6">
            <text:p>3101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77.76">
            <text:p>3667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4">
            <text:p>0,155</text:p>
          </table:table-cell>
          <table:table-cell table:style-name="ce12N2" office:value-type="float" office:value="80.52">
            <text:p>80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7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64.93">
            <text:p>31264,93</text:p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38">
            <text:p>28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1435.49">
            <text:p>143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91839726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7">
            <text:p>3101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584.96">
            <text:p>7258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44">
            <text:p>0,141</text:p>
          </table:table-cell>
          <table:table-cell table:style-name="ce12N2" office:value-type="float" office:value="524.8">
            <text:p>5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58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23.8">
            <text:p>60923,80</text:p>
          </table:table-cell>
          <table:table-cell table:style-name="ce12N2" office:value-type="float" office:value="60.93">
            <text:p>6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31">
            <text:p>548,3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4660.74">
            <text:p>46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200144834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0">
            <text:p>31012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20.93">
            <text:p>165120,93</text:p>
          </table:table-cell>
          <table:table-cell table:style-name="ce12N2" office:value-type="float" office:value="9999.98">
            <text:p>9999,98</text:p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155417.94">
            <text:p>155417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191065">
            <text:p>18,191</text:p>
          </table:table-cell>
          <table:table-cell table:style-name="ce12N2" office:value-type="float" office:value="8053.66">
            <text:p>805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.12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678.95">
            <text:p>126678,95</text:p>
          </table:table-cell>
          <table:table-cell table:style-name="ce12N2" office:value-type="float" office:value="126.65">
            <text:p>12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0.1">
            <text:p>1140,10</text:p>
          </table:table-cell>
          <table:table-cell table:style-name="ce12N2" office:value-type="float" office:value="79">
            <text:p>7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3816.99">
            <text:p>13816,99</text:p>
          </table:table-cell>
          <table:table-cell table:style-name="ce12N2" office:value-type="float" office:value="145417.96">
            <text:p>145417,96</text:p>
          </table:table-cell>
          <table:table-cell table:style-name="ce12N2" office:value-type="float" office:value="5826.78">
            <text:p>582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541.6">
            <text:p>32541,60</text:p>
          </table:table-cell>
          <table:table-cell table:style-name="ce12N2" office:value-type="float" office:value="5885.98">
            <text:p>5885,9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8174538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7">
            <text:p>310127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81.97">
            <text:p>1068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359.9">
            <text:p>1035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968">
            <text:p>0,284</text:p>
          </table:table-cell>
          <table:table-cell table:style-name="ce12N2" office:value-type="float" office:value="575.61">
            <text:p>575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8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70.77">
            <text:p>9370,77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34">
            <text:p>84,3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22.07">
            <text:p>322,07</text:p>
          </table:table-cell>
          <table:table-cell table:style-name="ce12N2" office:value-type="float" office:value="8728.37">
            <text:p>8728,37</text:p>
          </table:table-cell>
          <table:table-cell table:style-name="ce12N2" office:value-type="float" office:value="610.99">
            <text:p>6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672584800011855001000058595100000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8">
            <text:p>310128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3.74">
            <text:p>610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9767">
            <text:p>1,230</text:p>
          </table:table-cell>
          <table:table-cell table:style-name="ce12N2" office:value-type="float" office:value="232.54">
            <text:p>23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89.26">
            <text:p>4989,26</text:p>
          </table:table-cell>
          <table:table-cell table:style-name="ce12N2" office:value-type="float" office:value="4.99">
            <text:p>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">
            <text:p>44,9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92.13">
            <text:p>192,13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413.81">
            <text:p>41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88674080000373550010000063351575113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1">
            <text:p>310191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32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5">
            <text:p>864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27052">
            <text:p>1,027</text:p>
          </table:table-cell>
          <table:table-cell table:style-name="ce12N2" office:value-type="float" office:value="163.3">
            <text:p>16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9.99">
            <text:p>7239,99</text:p>
          </table:table-cell>
          <table:table-cell table:style-name="ce12N2" office:value-type="float" office:value="7.24">
            <text:p>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15">
            <text:p>65,1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600.49">
            <text:p>60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0.22">
            <text:p>340,22</text:p>
          </table:table-cell>
          <table:table-cell table:style-name="ce12N2" office:value-type="float" office:value="52.81">
            <text:p>52,8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7110960000178550010016328841768637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5">
            <text:p>310195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6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8.09">
            <text:p>86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1537">
            <text:p>0,722</text:p>
          </table:table-cell>
          <table:table-cell table:style-name="ce12N2" office:value-type="float" office:value="134.57">
            <text:p>13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11">
            <text:p>75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73.52">
            <text:p>273,52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464.98">
            <text:p>46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65531457323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7">
            <text:p>31019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50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20.84">
            <text:p>229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977.47">
            <text:p>21977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73773">
            <text:p>1,374</text:p>
          </table:table-cell>
          <table:table-cell table:style-name="ce12N2" office:value-type="float" office:value="101.63">
            <text:p>10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2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46.37">
            <text:p>19046,37</text:p>
          </table:table-cell>
          <table:table-cell table:style-name="ce12N2" office:value-type="float" office:value="19.05">
            <text:p>1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41">
            <text:p>171,41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943.37">
            <text:p>943,37</text:p>
          </table:table-cell>
          <table:table-cell table:style-name="ce12N2" office:value-type="float" office:value="21594.85">
            <text:p>21594,85</text:p>
          </table:table-cell>
          <table:table-cell table:style-name="ce12N2" office:value-type="float" office:value="989.74">
            <text:p>98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5011561092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6">
            <text:p>31020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9.2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452.81">
            <text:p>1444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24165">
            <text:p>21,124</text:p>
          </table:table-cell>
          <table:table-cell table:style-name="ce12N2" office:value-type="float" office:value="2946.85">
            <text:p>294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452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077.07">
            <text:p>118077,07</text:p>
          </table:table-cell>
          <table:table-cell table:style-name="ce12N2" office:value-type="float" office:value="118.09">
            <text:p>1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68">
            <text:p>1062,68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546.94">
            <text:p>4546,94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9793.41">
            <text:p>9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92771587449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9">
            <text:p>310209</text:p>
          </table:table-cell>
          <table:table-cell table:style-name="ce0" table:number-columns-spanned="4" table:number-rows-spanned="1" office:value-type="string" calcext:value-type="string">
            <text:p>8.501 - WAGO ELETROELETRONICOS LTDA</text:p>
          </table:table-cell>
          <table:covered-table-cell table:number-columns-repeated="3"/>
          <table:table-cell table:style-name="ce0" office:value-type="string" calcext:value-type="string">
            <text:p>231.5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74.77">
            <text:p>4777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55">
            <text:p>1,644</text:p>
          </table:table-cell>
          <table:table-cell table:style-name="ce12N2" office:value-type="float" office:value="214.75">
            <text:p>2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7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23.81">
            <text:p>37923,81</text:p>
          </table:table-cell>
          <table:table-cell table:style-name="ce12N2" office:value-type="float" office:value="37.92">
            <text:p>3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31">
            <text:p>341,3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244.22">
            <text:p>4244,22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1741.23">
            <text:p>174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38482700019555003000231504169899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9">
            <text:p>310219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68688">
            <text:p>4,669</text:p>
          </table:table-cell>
          <table:table-cell table:style-name="ce12N2" office:value-type="float" office:value="1663.98">
            <text:p>1663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93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10.06">
            <text:p>50810,06</text:p>
          </table:table-cell>
          <table:table-cell table:style-name="ce12N2" office:value-type="float" office:value="50.83">
            <text:p>5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29">
            <text:p>457,29</text:p>
          </table:table-cell>
          <table:table-cell table:style-name="ce12N2" office:value-type="float" office:value="60.85">
            <text:p>60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2197.28">
            <text:p>21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2462148000134550010000051121951744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7">
            <text:p>31022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3.51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.41">
            <text:p>1801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2">
            <text:p>1,45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1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5.47">
            <text:p>14735,47</text:p>
          </table:table-cell>
          <table:table-cell table:style-name="ce12N2" office:value-type="float" office:value="14.74">
            <text:p>1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62">
            <text:p>132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99.41">
            <text:p>1099,41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676.56">
            <text:p>67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35181083754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8">
            <text:p>310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52">
            <text:p>0,039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0.01">
            <text:p>1370,01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113.63">
            <text:p>11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71178878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9">
            <text:p>310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55.26">
            <text:p>5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3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81.93">
            <text:p>19781,93</text:p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04">
            <text:p>178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1640.73">
            <text:p>16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81696327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0">
            <text:p>310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5123">
            <text:p>0,345</text:p>
          </table:table-cell>
          <table:table-cell table:style-name="ce12N2" office:value-type="float" office:value="126.48">
            <text:p>12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8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87.4">
            <text:p>34587,40</text:p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29">
            <text:p>311,2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2868.7">
            <text:p>286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91519264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1">
            <text:p>310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2">
            <text:p>0,151</text:p>
          </table:table-cell>
          <table:table-cell table:style-name="ce12N2" office:value-type="float" office:value="111.36">
            <text:p>1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96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8.91">
            <text:p>34818,91</text:p>
          </table:table-cell>
          <table:table-cell table:style-name="ce12N2" office:value-type="float" office:value="34.82">
            <text:p>3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.37">
            <text:p>31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1598.66">
            <text:p>159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40199050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2">
            <text:p>310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17.86">
            <text:p>10411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3974.9">
            <text:p>10397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8314">
            <text:p>0,308</text:p>
          </table:table-cell>
          <table:table-cell table:style-name="ce12N2" office:value-type="float" office:value="343.06">
            <text:p>34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4.11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350.6">
            <text:p>88350,60</text:p>
          </table:table-cell>
          <table:table-cell table:style-name="ce12N2" office:value-type="float" office:value="88.35">
            <text:p>8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5.16">
            <text:p>795,1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96">
            <text:p>142,96</text:p>
          </table:table-cell>
          <table:table-cell table:style-name="ce12N2" office:value-type="float" office:value="97615.32">
            <text:p>97615,32</text:p>
          </table:table-cell>
          <table:table-cell table:style-name="ce12N2" office:value-type="float" office:value="6618.86">
            <text:p>661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7136666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3">
            <text:p>310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15.93">
            <text:p>3571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525.32">
            <text:p>35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7675">
            <text:p>0,278</text:p>
          </table:table-cell>
          <table:table-cell table:style-name="ce12N2" office:value-type="float" office:value="113">
            <text:p>1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1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6.61">
            <text:p>30216,61</text:p>
          </table:table-cell>
          <table:table-cell table:style-name="ce12N2" office:value-type="float" office:value="30.21">
            <text:p>3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94">
            <text:p>271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32981.49">
            <text:p>32981,49</text:p>
          </table:table-cell>
          <table:table-cell table:style-name="ce12N2" office:value-type="float" office:value="2228.77">
            <text:p>22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817386503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4">
            <text:p>310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9.51">
            <text:p>7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.8">
            <text:p>609,8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6.97">
            <text:p>46,97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50.58">
            <text:p>5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91290288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5">
            <text:p>310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">
            <text:p>0,072</text:p>
          </table:table-cell>
          <table:table-cell table:style-name="ce12N2" office:value-type="float" office:value="83.66">
            <text:p>8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6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88.44">
            <text:p>36788,44</text:p>
          </table:table-cell>
          <table:table-cell table:style-name="ce12N2" office:value-type="float" office:value="36.79">
            <text:p>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.09">
            <text:p>331,0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47.58">
            <text:p>43247,58</text:p>
          </table:table-cell>
          <table:table-cell table:style-name="ce12N2" office:value-type="float" office:value="3027.33">
            <text:p>302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01733056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6">
            <text:p>310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3">
            <text:p>0,026</text:p>
          </table:table-cell>
          <table:table-cell table:style-name="ce12N2" office:value-type="float" office:value="70.13">
            <text:p>7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4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91.03">
            <text:p>10891,03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02">
            <text:p>9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5.03">
            <text:p>10625,03</text:p>
          </table:table-cell>
          <table:table-cell table:style-name="ce12N2" office:value-type="float" office:value="743.75">
            <text:p>7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114616809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7">
            <text:p>310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3.09">
            <text:p>312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12">
            <text:p>0,023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4.94">
            <text:p>2474,94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7">
            <text:p>22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205.27">
            <text:p>20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21586851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8">
            <text:p>310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2">
            <text:p>0,052</text:p>
          </table:table-cell>
          <table:table-cell table:style-name="ce12N2" office:value-type="float" office:value="55.8">
            <text:p>5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18.66">
            <text:p>26818,66</text:p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37">
            <text:p>241,3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2224.36">
            <text:p>222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31675406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9">
            <text:p>310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05">
            <text:p>0,091</text:p>
          </table:table-cell>
          <table:table-cell table:style-name="ce12N2" office:value-type="float" office:value="106.9">
            <text:p>10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75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243.11">
            <text:p>46243,11</text:p>
          </table:table-cell>
          <table:table-cell table:style-name="ce12N2" office:value-type="float" office:value="46.25">
            <text:p>4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.19">
            <text:p>416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79.17">
            <text:p>54279,17</text:p>
          </table:table-cell>
          <table:table-cell table:style-name="ce12N2" office:value-type="float" office:value="3799.54">
            <text:p>379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415256796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0">
            <text:p>310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90.29">
            <text:p>6439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4199.68">
            <text:p>64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2712">
            <text:p>0,243</text:p>
          </table:table-cell>
          <table:table-cell table:style-name="ce12N2" office:value-type="float" office:value="212.7">
            <text:p>2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90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68.38">
            <text:p>55768,38</text:p>
          </table:table-cell>
          <table:table-cell table:style-name="ce12N2" office:value-type="float" office:value="55.77">
            <text:p>5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.91">
            <text:p>501,9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62079.82">
            <text:p>62079,82</text:p>
          </table:table-cell>
          <table:table-cell table:style-name="ce12N2" office:value-type="float" office:value="2746.92">
            <text:p>27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7190947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1">
            <text:p>310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.69">
            <text:p>565,69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9">
            <text:p>5,0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8841285328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2">
            <text:p>310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17">
            <text:p>0,079</text:p>
          </table:table-cell>
          <table:table-cell table:style-name="ce12N2" office:value-type="float" office:value="84.63">
            <text:p>84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74.96">
            <text:p>40674,9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6.07">
            <text:p>366,0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3373.62">
            <text:p>337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61712877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4">
            <text:p>310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515">
            <text:p>0,107</text:p>
          </table:table-cell>
          <table:table-cell table:style-name="ce12N2" office:value-type="float" office:value="24.62">
            <text:p>2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29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0.53">
            <text:p>6530,53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433">
            <text:p>4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31436187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5">
            <text:p>310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57.57">
            <text:p>5435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515">
            <text:p>0,224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357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19.82">
            <text:p>47119,82</text:p>
          </table:table-cell>
          <table:table-cell table:style-name="ce12N2" office:value-type="float" office:value="47.11">
            <text:p>4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07">
            <text:p>424,0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2321.97">
            <text:p>232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41830611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0">
            <text:p>31026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13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66.95">
            <text:p>2936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84">
            <text:p>1,288</text:p>
          </table:table-cell>
          <table:table-cell table:style-name="ce12N2" office:value-type="float" office:value="781.33">
            <text:p>78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6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75.81">
            <text:p>23375,81</text:p>
          </table:table-cell>
          <table:table-cell table:style-name="ce12N2" office:value-type="float" office:value="23.39">
            <text:p>2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.37">
            <text:p>210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345.17">
            <text:p>2345,17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1263.32">
            <text:p>12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1723086000143550010004138971241076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6">
            <text:p>31027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13.38">
            <text:p>841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132">
            <text:p>0,123</text:p>
          </table:table-cell>
          <table:table-cell table:style-name="ce12N2" office:value-type="float" office:value="51.03">
            <text:p>5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1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77.6">
            <text:p>7677,60</text:p>
          </table:table-cell>
          <table:table-cell table:style-name="ce12N2" office:value-type="float" office:value="7.68">
            <text:p>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">
            <text:p>69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5.87">
            <text:p>415,87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319.91">
            <text:p>3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61300156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7">
            <text:p>31027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.6">
            <text:p>1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64">
            <text:p>0,001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16">
            <text:p>103,16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6.36">
            <text:p>6,36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7138517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8">
            <text:p>310278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.61">
            <text:p>2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25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3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87">
            <text:p>234,87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10.78">
            <text:p>1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81380461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9">
            <text:p>31028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">
            <text:p>0,138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2.93">
            <text:p>2452,93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203.45">
            <text:p>20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6991417667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5">
            <text:p>310295</text:p>
          </table:table-cell>
          <table:table-cell table:style-name="ce0" table:number-columns-spanned="4" table:number-rows-spanned="1" office:value-type="string" calcext:value-type="string">
            <text:p>29.228 - CONDOR PINCEIS LTDA</text:p>
          </table:table-cell>
          <table:covered-table-cell table:number-columns-repeated="3"/>
          <table:table-cell table:style-name="ce0" office:value-type="string" calcext:value-type="string">
            <text:p>109.59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28.65">
            <text:p>2712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6973.16">
            <text:p>2697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2269">
            <text:p>0,452</text:p>
          </table:table-cell>
          <table:table-cell table:style-name="ce12N2" office:value-type="float" office:value="590.7">
            <text:p>59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28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64.67">
            <text:p>22764,67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89">
            <text:p>204,89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5.49">
            <text:p>155,49</text:p>
          </table:table-cell>
          <table:table-cell table:style-name="ce12N2" office:value-type="float" office:value="26973.16">
            <text:p>26973,16</text:p>
          </table:table-cell>
          <table:table-cell table:style-name="ce12N2" office:value-type="float" office:value="1888.12">
            <text:p>188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217430000304550050001095991083361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5">
            <text:p>31031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45.61">
            <text:p>2804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7266">
            <text:p>0,607</text:p>
          </table:table-cell>
          <table:table-cell table:style-name="ce12N2" office:value-type="float" office:value="486.28">
            <text:p>486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4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58.97">
            <text:p>22858,97</text:p>
          </table:table-cell>
          <table:table-cell table:style-name="ce12N2" office:value-type="float" office:value="22.87">
            <text:p>2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.74">
            <text:p>205,7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356.6">
            <text:p>1356,6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1500.03">
            <text:p>15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91491306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8">
            <text:p>310318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0.6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5.3">
            <text:p>933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221.36">
            <text:p>9221,36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56168">
            <text:p>0,656</text:p>
          </table:table-cell>
          <table:table-cell table:style-name="ce12N2" office:value-type="float" office:value="108">
            <text:p>1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3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88.39">
            <text:p>7988,39</text:p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.9">
            <text:p>71,90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5.95">
            <text:p>105,95</text:p>
          </table:table-cell>
          <table:table-cell table:style-name="ce12N2" office:value-type="float" office:value="9229.35">
            <text:p>9229,35</text:p>
          </table:table-cell>
          <table:table-cell table:style-name="ce12N2" office:value-type="float" office:value="417.91">
            <text:p>4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06591329160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9">
            <text:p>310319</text:p>
          </table:table-cell>
          <table:table-cell table:style-name="ce0" table:number-columns-spanned="4" table:number-rows-spanned="1" office:value-type="string" calcext:value-type="string">
            <text:p>13.126 - ALMA TEXTIL LTDA</text:p>
          </table:table-cell>
          <table:covered-table-cell table:number-columns-repeated="3"/>
          <table:table-cell table:style-name="ce0" office:value-type="string" calcext:value-type="string">
            <text:p>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11.484">
            <text:p>3611,484</text:p>
          </table:table-cell>
          <table:table-cell table:style-name="ce12N2" office:value-type="float" office:value="1951">
            <text:p>19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17.11">
            <text:p>38817,11</text:p>
          </table:table-cell>
          <table:table-cell table:style-name="ce12N2" office:value-type="float" office:value="38.82">
            <text:p>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36">
            <text:p>349,36</text:p>
          </table:table-cell>
          <table:table-cell table:style-name="ce12N2" office:value-type="float" office:value="32">
            <text:p>3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3032.4">
            <text:p>30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796564000194550010000167131260167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4">
            <text:p>310344</text:p>
          </table:table-cell>
          <table:table-cell table:style-name="ce0" table:number-columns-spanned="4" table:number-rows-spanned="1" office:value-type="string" calcext:value-type="string">
            <text:p>32.610 - NEWELL BRANDS BRASIL LTDA</text:p>
          </table:table-cell>
          <table:covered-table-cell table:number-columns-repeated="3"/>
          <table:table-cell table:style-name="ce0" office:value-type="string" calcext:value-type="string">
            <text:p>17.9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4">
            <text:p>0,003</text:p>
          </table:table-cell>
          <table:table-cell table:style-name="ce12N2" office:value-type="float" office:value="90">
            <text:p>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9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6.16">
            <text:p>6066,16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911.52">
            <text:p>91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60594538001680550020000179701252913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9">
            <text:p>31036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2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08.44">
            <text:p>12208,44</text:p>
          </table:table-cell>
          <table:table-cell table:style-name="ce12N2" office:value-type="float" office:value="780.03">
            <text:p>780,0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972.16">
            <text:p>119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85">
            <text:p>1,399</text:p>
          </table:table-cell>
          <table:table-cell table:style-name="ce12N2" office:value-type="float" office:value="523.5">
            <text:p>52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0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57">
            <text:p>9750,57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5">
            <text:p>87,75</text:p>
          </table:table-cell>
          <table:table-cell table:style-name="ce12N2" office:value-type="float" office:value="79.34">
            <text:p>79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16.31">
            <text:p>1016,31</text:p>
          </table:table-cell>
          <table:table-cell table:style-name="ce12N2" office:value-type="float" office:value="11192.13">
            <text:p>11192,13</text:p>
          </table:table-cell>
          <table:table-cell table:style-name="ce12N2" office:value-type="float" office:value="447.68">
            <text:p>44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236415441060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79">
            <text:p>310379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5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2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39.68">
            <text:p>21039,68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36">
            <text:p>189,36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1745.05">
            <text:p>174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57651483938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1">
            <text:p>31042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1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68.09">
            <text:p>309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88948">
            <text:p>4,589</text:p>
          </table:table-cell>
          <table:table-cell table:style-name="ce12N2" office:value-type="float" office:value="422.54">
            <text:p>4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58.05">
            <text:p>25758,05</text:p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7">
            <text:p>231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850.8">
            <text:p>850,8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1733.74">
            <text:p>17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1921367116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6">
            <text:p>3104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09">
            <text:p>0,00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14.89">
            <text:p>1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91848323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8">
            <text:p>31044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4">
            <text:p>0,003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8184898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6">
            <text:p>3104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9.4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6198">
            <text:p>7,462</text:p>
          </table:table-cell>
          <table:table-cell table:style-name="ce12N2" office:value-type="float" office:value="1304">
            <text:p>1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9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87.23">
            <text:p>19687,23</text:p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19">
            <text:p>177,19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1711.8">
            <text:p>17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6557984000499550010000194321236381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3">
            <text:p>310483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5.23">
            <text:p>806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95.01">
            <text:p>7695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784">
            <text:p>0,192</text:p>
          </table:table-cell>
          <table:table-cell table:style-name="ce12N2" office:value-type="float" office:value="26.1">
            <text:p>2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94.4">
            <text:p>6494,40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45">
            <text:p>5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370.22">
            <text:p>370,22</text:p>
          </table:table-cell>
          <table:table-cell table:style-name="ce12N2" office:value-type="float" office:value="7695.01">
            <text:p>7695,01</text:p>
          </table:table-cell>
          <table:table-cell table:style-name="ce12N2" office:value-type="float" office:value="538.65">
            <text:p>53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38311000317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7">
            <text:p>3104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.17">
            <text:p>88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8.39">
            <text:p>678,39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1">
            <text:p>6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8.37">
            <text:p>78,37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56.27">
            <text:p>5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21376157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9">
            <text:p>31049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0.3">
            <text:p>11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3">
            <text:p>0,021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0.41">
            <text:p>950,41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5">
            <text:p>8,5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57.1">
            <text:p>57,1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65.92">
            <text:p>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0132220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6">
            <text:p>310506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94215">
            <text:p>2,794</text:p>
          </table:table-cell>
          <table:table-cell table:style-name="ce12N2" office:value-type="float" office:value="245.03">
            <text:p>2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613.49">
            <text:p>61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3179526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5">
            <text:p>31053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6.59">
            <text:p>344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2.46">
            <text:p>327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8">
            <text:p>0,023</text:p>
          </table:table-cell>
          <table:table-cell table:style-name="ce12N2" office:value-type="float" office:value="9.04">
            <text:p>9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4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3.87">
            <text:p>2833,87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1">
            <text:p>25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74.13">
            <text:p>174,13</text:p>
          </table:table-cell>
          <table:table-cell table:style-name="ce12N2" office:value-type="float" office:value="3272.46">
            <text:p>3272,46</text:p>
          </table:table-cell>
          <table:table-cell table:style-name="ce12N2" office:value-type="float" office:value="149.74">
            <text:p>14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1140766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7">
            <text:p>310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8.92">
            <text:p>2718,92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7">
            <text:p>24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225.51">
            <text:p>22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991236095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8">
            <text:p>3105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5.03">
            <text:p>364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22">
            <text:p>0,039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9.5">
            <text:p>2979,50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4.73">
            <text:p>114,73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4916370235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9">
            <text:p>310539</text:p>
          </table:table-cell>
          <table:table-cell table:style-name="ce0" table:number-columns-spanned="4" table:number-rows-spanned="1" office:value-type="string" calcext:value-type="string">
            <text:p>3.931 - INTELLI IND. TERM. ELETR. LTDA</text:p>
          </table:table-cell>
          <table:covered-table-cell table:number-columns-repeated="3"/>
          <table:table-cell table:style-name="ce0" office:value-type="string" calcext:value-type="string">
            <text:p>695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43.2">
            <text:p>378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333">
            <text:p>0,035</text:p>
          </table:table-cell>
          <table:table-cell table:style-name="ce12N2" office:value-type="float" office:value="342.51">
            <text:p>34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8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33.37">
            <text:p>30933,37</text:p>
          </table:table-cell>
          <table:table-cell table:style-name="ce12N2" office:value-type="float" office:value="30.96">
            <text:p>3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3">
            <text:p>278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91.19">
            <text:p>1191,19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2565.64">
            <text:p>25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6754545000194550000006955941202607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6">
            <text:p>310546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91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6">
            <text:p>0,021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">
            <text:p>4074,00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337.89">
            <text:p>3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1385550020000199181408301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2">
            <text:p>310562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4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6.8">
            <text:p>145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519.4">
            <text:p>115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7736">
            <text:p>0,848</text:p>
          </table:table-cell>
          <table:table-cell table:style-name="ce12N2" office:value-type="float" office:value="456.91">
            <text:p>45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4.12">
            <text:p>10834,1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274.85">
            <text:p>27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936.96">
            <text:p>14936,96</text:p>
          </table:table-cell>
          <table:table-cell table:style-name="ce12N2" office:value-type="float" office:value="2987.4">
            <text:p>2987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626088400010855002000001490143027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1">
            <text:p>310581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75">
            <text:p>0,030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0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16.96">
            <text:p>3916,96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25">
            <text:p>35,2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588.57">
            <text:p>5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0771965201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93">
            <text:p>310593</text:p>
          </table:table-cell>
          <table:table-cell table:style-name="ce0" table:number-columns-spanned="4" table:number-rows-spanned="1" office:value-type="string" calcext:value-type="string">
            <text:p>31.250 - MONT MAGNO FIXADORES LTDA</text:p>
          </table:table-cell>
          <table:covered-table-cell table:number-columns-repeated="3"/>
          <table:table-cell table:style-name="ce0" office:value-type="string" calcext:value-type="string">
            <text:p>2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89.1">
            <text:p>6698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6640">
            <text:p>6640,00</text:p>
          </table:table-cell>
          <table:table-cell table:style-name="ce12N3" office:value-type="float" office:value="8.36472">
            <text:p>8,365</text:p>
          </table:table-cell>
          <table:table-cell table:style-name="ce12N2" office:value-type="float" office:value="5675.82">
            <text:p>567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98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2432.06">
            <text:p>24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5420578000181550010000029031226870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25">
            <text:p>310625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17403">
            <text:p>12,017</text:p>
          </table:table-cell>
          <table:table-cell table:style-name="ce12N2" office:value-type="float" office:value="479.56">
            <text:p>47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64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1290.86">
            <text:p>12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41233523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5">
            <text:p>310665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9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31.4">
            <text:p>120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31.4">
            <text:p>120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2772">
            <text:p>2,933</text:p>
          </table:table-cell>
          <table:table-cell table:style-name="ce12N2" office:value-type="float" office:value="1702.8">
            <text:p>170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08.27">
            <text:p>9608,27</text:p>
          </table:table-cell>
          <table:table-cell table:style-name="ce12N2" office:value-type="float" office:value="9.61">
            <text:p>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47">
            <text:p>86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31.4">
            <text:p>12031,40</text:p>
          </table:table-cell>
          <table:table-cell table:style-name="ce12N2" office:value-type="float" office:value="1443.77">
            <text:p>14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610648380141935500100016939416211171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1">
            <text:p>31067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0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38.23">
            <text:p>2903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9038.23">
            <text:p>29038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63672">
            <text:p>2,264</text:p>
          </table:table-cell>
          <table:table-cell table:style-name="ce12N2" office:value-type="float" office:value="261.75">
            <text:p>26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03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12.17">
            <text:p>24512,17</text:p>
          </table:table-cell>
          <table:table-cell table:style-name="ce12N2" office:value-type="float" office:value="24.51">
            <text:p>2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.62">
            <text:p>220,6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38.23">
            <text:p>29038,23</text:p>
          </table:table-cell>
          <table:table-cell table:style-name="ce12N2" office:value-type="float" office:value="2032.68">
            <text:p>203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08512859905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3">
            <text:p>31067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0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80">
            <text:p>102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80">
            <text:p>10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6">
            <text:p>3,460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80">
            <text:p>8680,00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80">
            <text:p>10280,00</text:p>
          </table:table-cell>
          <table:table-cell table:style-name="ce12N2" office:value-type="float" office:value="719.6">
            <text:p>7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0861451663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4">
            <text:p>31067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2.20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11">
            <text:p>22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9348">
            <text:p>0,579</text:p>
          </table:table-cell>
          <table:table-cell table:style-name="ce12N2" office:value-type="float" office:value="78.41">
            <text:p>7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3.68">
            <text:p>1863,68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73.43">
            <text:p>73,43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132.05">
            <text:p>1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2200131011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7">
            <text:p>310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5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122">
            <text:p>0,097</text:p>
          </table:table-cell>
          <table:table-cell table:style-name="ce12N2" office:value-type="float" office:value="60.45">
            <text:p>6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9.75">
            <text:p>12179,75</text:p>
          </table:table-cell>
          <table:table-cell table:style-name="ce12N2" office:value-type="float" office:value="12.18">
            <text:p>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62">
            <text:p>109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1.6">
            <text:p>14431,60</text:p>
          </table:table-cell>
          <table:table-cell table:style-name="ce12N2" office:value-type="float" office:value="1010.21">
            <text:p>10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57331451216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8">
            <text:p>31067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926.2">
            <text:p>5892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926.2">
            <text:p>5892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0.96624">
            <text:p>60,966</text:p>
          </table:table-cell>
          <table:table-cell table:style-name="ce12N2" office:value-type="float" office:value="4863.62">
            <text:p>486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92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29">
            <text:p>49729,00</text:p>
          </table:table-cell>
          <table:table-cell table:style-name="ce12N2" office:value-type="float" office:value="49.73">
            <text:p>4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56">
            <text:p>447,5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926.2">
            <text:p>58926,20</text:p>
          </table:table-cell>
          <table:table-cell table:style-name="ce12N2" office:value-type="float" office:value="4124.83">
            <text:p>412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46124770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9">
            <text:p>31067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4.08">
            <text:p>1124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44.08">
            <text:p>1124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77456">
            <text:p>1,677</text:p>
          </table:table-cell>
          <table:table-cell table:style-name="ce12N2" office:value-type="float" office:value="209.77">
            <text:p>209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44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.68">
            <text:p>9493,68</text:p>
          </table:table-cell>
          <table:table-cell table:style-name="ce12N2" office:value-type="float" office:value="9.5">
            <text:p>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44">
            <text:p>85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4.08">
            <text:p>11244,08</text:p>
          </table:table-cell>
          <table:table-cell table:style-name="ce12N2" office:value-type="float" office:value="787.08">
            <text:p>78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841349610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0">
            <text:p>31068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2">
            <text:p>90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82">
            <text:p>90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35">
            <text:p>0,835</text:p>
          </table:table-cell>
          <table:table-cell table:style-name="ce12N2" office:value-type="float" office:value="224.4">
            <text:p>2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66.6">
            <text:p>7666,60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2">
            <text:p>9082,00</text:p>
          </table:table-cell>
          <table:table-cell table:style-name="ce12N2" office:value-type="float" office:value="635.74">
            <text:p>63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7315053973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1">
            <text:p>31068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9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31.5">
            <text:p>48031,50</text:p>
          </table:table-cell>
          <table:table-cell table:style-name="ce12N2" office:value-type="float" office:value="48.03">
            <text:p>4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28">
            <text:p>432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3983.98">
            <text:p>398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5871282709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6">
            <text:p>3106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7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94115">
            <text:p>43,941</text:p>
          </table:table-cell>
          <table:table-cell table:style-name="ce12N2" office:value-type="float" office:value="4134.26">
            <text:p>413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25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43.77">
            <text:p>52543,77</text:p>
          </table:table-cell>
          <table:table-cell table:style-name="ce12N2" office:value-type="float" office:value="52.54">
            <text:p>5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2.89">
            <text:p>472,8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4358.02">
            <text:p>435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78716549158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8">
            <text:p>3106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94115">
            <text:p>43,941</text:p>
          </table:table-cell>
          <table:table-cell table:style-name="ce12N2" office:value-type="float" office:value="4134.26">
            <text:p>413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25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43.77">
            <text:p>52543,77</text:p>
          </table:table-cell>
          <table:table-cell table:style-name="ce12N2" office:value-type="float" office:value="52.54">
            <text:p>5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2.89">
            <text:p>472,8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57.36">
            <text:p>62257,36</text:p>
          </table:table-cell>
          <table:table-cell table:style-name="ce12N2" office:value-type="float" office:value="4358.02">
            <text:p>435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87771830891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3">
            <text:p>31069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9.07">
            <text:p>94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5.78">
            <text:p>775,78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98">
            <text:p>6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9.87">
            <text:p>29,87</text:p>
          </table:table-cell>
          <table:table-cell table:style-name="ce12N2" office:value-type="float" office:value="919.2">
            <text:p>919,20</text:p>
          </table:table-cell>
          <table:table-cell table:style-name="ce12N2" office:value-type="float" office:value="64.34">
            <text:p>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6731489814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0">
            <text:p>31070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29.21">
            <text:p>38829,21</text:p>
          </table:table-cell>
          <table:table-cell table:style-name="ce12N2" office:value-type="float" office:value="2271.96">
            <text:p>2271,96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7289.14">
            <text:p>3728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092937">
            <text:p>18,093</text:p>
          </table:table-cell>
          <table:table-cell table:style-name="ce12N2" office:value-type="float" office:value="305.38">
            <text:p>30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2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8.86">
            <text:p>30488,86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78.42">
            <text:p>78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3350.5">
            <text:p>3350,50</text:p>
          </table:table-cell>
          <table:table-cell table:style-name="ce12N2" office:value-type="float" office:value="35017.18">
            <text:p>35017,18</text:p>
          </table:table-cell>
          <table:table-cell table:style-name="ce12N2" office:value-type="float" office:value="1420.63">
            <text:p>142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61">
            <text:p>2551,61</text:p>
          </table:table-cell>
          <table:table-cell table:style-name="ce12N2" office:value-type="float" office:value="461.53">
            <text:p>461,5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711124270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1">
            <text:p>31070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52">
            <text:p>23,520</text:p>
          </table:table-cell>
          <table:table-cell table:style-name="ce12N2" office:value-type="float" office:value="6443">
            <text:p>64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9.42">
            <text:p>31129,42</text:p>
          </table:table-cell>
          <table:table-cell table:style-name="ce12N2" office:value-type="float" office:value="31.13">
            <text:p>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.16">
            <text:p>280,16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980">
            <text:p>38980,00</text:p>
          </table:table-cell>
          <table:table-cell table:style-name="ce12N2" office:value-type="float" office:value="4677.6">
            <text:p>46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171638322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2">
            <text:p>31070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509.14">
            <text:p>7950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000.179148">
            <text:p>42000,179</text:p>
          </table:table-cell>
          <table:table-cell table:style-name="ce12N2" office:value-type="float" office:value="311.3">
            <text:p>3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50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049.28">
            <text:p>67049,28</text:p>
          </table:table-cell>
          <table:table-cell table:style-name="ce12N2" office:value-type="float" office:value="67.03">
            <text:p>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.42">
            <text:p>603,4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64.58">
            <text:p>64,58</text:p>
          </table:table-cell>
          <table:table-cell table:style-name="ce12N2" office:value-type="float" office:value="79444.56">
            <text:p>79444,56</text:p>
          </table:table-cell>
          <table:table-cell table:style-name="ce12N2" office:value-type="float" office:value="5561.11">
            <text:p>556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810042528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3">
            <text:p>31070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96">
            <text:p>0,065</text:p>
          </table:table-cell>
          <table:table-cell table:style-name="ce12N2" office:value-type="float" office:value="259">
            <text:p>25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6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89.99">
            <text:p>2589,99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68.8">
            <text:p>3068,80</text:p>
          </table:table-cell>
          <table:table-cell table:style-name="ce12N2" office:value-type="float" office:value="214.82">
            <text:p>21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71007539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4">
            <text:p>31070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1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52.17">
            <text:p>345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125">
            <text:p>0,398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5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2.89">
            <text:p>2912,89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9">
            <text:p>26,1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08.67">
            <text:p>108,67</text:p>
          </table:table-cell>
          <table:table-cell table:style-name="ce12N2" office:value-type="float" office:value="3343.5">
            <text:p>3343,50</text:p>
          </table:table-cell>
          <table:table-cell table:style-name="ce12N2" office:value-type="float" office:value="133.74">
            <text:p>1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11000334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6">
            <text:p>310706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0.31268">
            <text:p>120,313</text:p>
          </table:table-cell>
          <table:table-cell table:style-name="ce12N2" office:value-type="float" office:value="1306">
            <text:p>130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89.93">
            <text:p>17089,93</text:p>
          </table:table-cell>
          <table:table-cell table:style-name="ce12N2" office:value-type="float" office:value="17.07">
            <text:p>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.79">
            <text:p>153,7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49.28">
            <text:p>20249,28</text:p>
          </table:table-cell>
          <table:table-cell table:style-name="ce12N2" office:value-type="float" office:value="1417.45">
            <text:p>141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6100053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7">
            <text:p>31070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6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73.68">
            <text:p>1492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2424">
            <text:p>1,162</text:p>
          </table:table-cell>
          <table:table-cell table:style-name="ce12N2" office:value-type="float" office:value="2341.96">
            <text:p>234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27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829.3">
            <text:p>124829,30</text:p>
          </table:table-cell>
          <table:table-cell table:style-name="ce12N2" office:value-type="float" office:value="124.81">
            <text:p>12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3.44">
            <text:p>1123,4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67.32">
            <text:p>1367,32</text:p>
          </table:table-cell>
          <table:table-cell table:style-name="ce12N2" office:value-type="float" office:value="147906.36">
            <text:p>147906,36</text:p>
          </table:table-cell>
          <table:table-cell table:style-name="ce12N2" office:value-type="float" office:value="10353.44">
            <text:p>1035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691004599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8">
            <text:p>310708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18.870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6.63">
            <text:p>154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376">
            <text:p>0,029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0.22">
            <text:p>1000,2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5.12">
            <text:p>1185,12</text:p>
          </table:table-cell>
          <table:table-cell table:style-name="ce12N2" office:value-type="float" office:value="82.96">
            <text:p>8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22.34">
            <text:p>2222,34</text:p>
          </table:table-cell>
          <table:table-cell table:style-name="ce12N2" office:value-type="float" office:value="361.51">
            <text:p>361,5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188701006366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9">
            <text:p>31070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4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08">
            <text:p>283,080</text:p>
          </table:table-cell>
          <table:table-cell table:style-name="ce12N2" office:value-type="float" office:value="14970">
            <text:p>149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6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90.12">
            <text:p>63590,12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2.32">
            <text:p>572,32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627">
            <text:p>79627,00</text:p>
          </table:table-cell>
          <table:table-cell table:style-name="ce12N2" office:value-type="float" office:value="9555.24">
            <text:p>955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44791381521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0">
            <text:p>3107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8.94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54.59">
            <text:p>2485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21827">
            <text:p>3,422</text:p>
          </table:table-cell>
          <table:table-cell table:style-name="ce12N2" office:value-type="float" office:value="759.8">
            <text:p>75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5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60.05">
            <text:p>20860,05</text:p>
          </table:table-cell>
          <table:table-cell table:style-name="ce12N2" office:value-type="float" office:value="20.84">
            <text:p>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.72">
            <text:p>187,7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8.2">
            <text:p>138,2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1730.15">
            <text:p>173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6220550140009789461008086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5">
            <text:p>310715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05249">
            <text:p>2,605</text:p>
          </table:table-cell>
          <table:table-cell table:style-name="ce12N2" office:value-type="float" office:value="381.67">
            <text:p>38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36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43.29">
            <text:p>61343,29</text:p>
          </table:table-cell>
          <table:table-cell table:style-name="ce12N2" office:value-type="float" office:value="61.35">
            <text:p>6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09">
            <text:p>55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7.34">
            <text:p>74367,34</text:p>
          </table:table-cell>
          <table:table-cell table:style-name="ce12N2" office:value-type="float" office:value="6771.43">
            <text:p>677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4661947286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73">
            <text:p>173,00</text:p>
          </table:table-cell>
          <table:table-cell table:style-name="ce26N2" office:value-type="float" office:value="26606.96">
            <text:p>26606,96</text:p>
          </table:table-cell>
          <table:table-cell table:style-name="ce26N2" office:value-type="float" office:value="7577.38">
            <text:p>7577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1332.58">
            <text:p>101332,58</text:p>
          </table:table-cell>
          <table:table-cell table:style-name="ce26N2" office:value-type="float" office:value="7070108.16">
            <text:p>7070108,16</text:p>
          </table:table-cell>
          <table:table-cell table:style-name="ce26N2" office:value-type="float" office:value="438027.41">
            <text:p>438027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758.2">
            <text:p>5758,20</text:p>
          </table:table-cell>
          <table:table-cell table:style-name="ce26N2" office:value-type="float" office:value="7306606.27">
            <text:p>730660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5803.67">
            <text:p>75803,67</text:p>
          </table:table-cell>
          <table:table-cell table:style-name="ce26N2" office:value-type="float" office:value="13947.53">
            <text:p>13947,53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8765.506602">
            <text:p>48765,507</text:p>
          </table:table-cell>
          <table:table-cell table:style-name="ce26N2" office:value-type="float" office:value="7210355.74">
            <text:p>7210355,74</text:p>
          </table:table-cell>
          <table:table-cell table:style-name="ce26N2" office:value-type="float" office:value="7306606.27">
            <text:p>7306606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904643.43">
            <text:p>5904643,43</text:p>
          </table:table-cell>
          <table:table-cell table:style-name="ce26N2" office:value-type="float" office:value="5904.59">
            <text:p>5904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141.8">
            <text:p>53141,8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75135.53">
            <text:p>275135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65">
            <text:p>72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80" meta:object-count="0"/>
    <meta:generator>LibreOffice/4.3.0.4$Windows_x86 LibreOffice_project/62ad5818884a2fc2e5780dd45466868d41009ec0</meta:generator>
  </office:meta>
</office:document-meta>
</file>