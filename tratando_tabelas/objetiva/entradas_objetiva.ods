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9/05/2026 05:30:3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299145">
            <text:p>299145</text:p>
          </table:table-cell>
          <table:table-cell table:style-name="ce0" table:number-columns-spanned="4" table:number-rows-spanned="1" office:value-type="string" calcext:value-type="string">
            <text:p>5.700 - MARSCHALL IND. COM. IMP. EXP. LTDA</text:p>
          </table:table-cell>
          <table:covered-table-cell table:number-columns-repeated="3"/>
          <table:table-cell table:style-name="ce0" office:value-type="string" calcext:value-type="string">
            <text:p>696.5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1/2026</text:p>
          </table:table-cell>
          <table:table-cell table:style-name="ce0" office:value-type="string" calcext:value-type="string">
            <text:p>12/01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5.43">
            <text:p>122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1/2026</text:p>
          </table:table-cell>
          <table:table-cell table:style-name="ce12N2" office:value-type="float" office:value="118.13">
            <text:p>118,13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40.76">
            <text:p>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88.19">
            <text:p>488,19</text:p>
          </table:table-cell>
          <table:table-cell table:style-name="ce12N2" office:value-type="float" office:value="88.3">
            <text:p>88,3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102130525000177550030006965601356118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520">
            <text:p>302520</text:p>
          </table:table-cell>
          <table:table-cell table:style-name="ce0" table:number-columns-spanned="4" table:number-rows-spanned="1" office:value-type="string" calcext:value-type="string">
            <text:p>15.690 - CLI CENTRAL DE LOGISTICA INTEGRADA LTDA</text:p>
          </table:table-cell>
          <table:covered-table-cell table:number-columns-repeated="3"/>
          <table:table-cell table:style-name="ce0" office:value-type="string" calcext:value-type="string">
            <text:p>38.09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4/02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24.82">
            <text:p>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213528071000103550040000380921000371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9">
            <text:p>305929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09.0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77.5">
            <text:p>1707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6539.96">
            <text:p>16539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227">
            <text:p>0,155</text:p>
          </table:table-cell>
          <table:table-cell table:style-name="ce12N2" office:value-type="float" office:value="210.19">
            <text:p>21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07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">
            <text:p>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37.54">
            <text:p>537,54</text:p>
          </table:table-cell>
          <table:table-cell table:style-name="ce12N2" office:value-type="float" office:value="16539.96">
            <text:p>16539,96</text:p>
          </table:table-cell>
          <table:table-cell table:style-name="ce12N2" office:value-type="float" office:value="1157.8">
            <text:p>115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46833740003005500300060904719988376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5">
            <text:p>306055</text:p>
          </table:table-cell>
          <table:table-cell table:style-name="ce0" table:number-columns-spanned="4" table:number-rows-spanned="1" office:value-type="string" calcext:value-type="string">
            <text:p>674 - ESFERA ESTAMPARIA DE FERRO E ACO LTDA</text:p>
          </table:table-cell>
          <table:covered-table-cell table:number-columns-repeated="3"/>
          <table:table-cell table:style-name="ce0" office:value-type="string" calcext:value-type="string">
            <text:p>145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8.74792">
            <text:p>38,748</text:p>
          </table:table-cell>
          <table:table-cell table:style-name="ce12N2" office:value-type="float" office:value="2302.6">
            <text:p>230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8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86.36">
            <text:p>25486,36</text:p>
          </table:table-cell>
          <table:table-cell table:style-name="ce12N2" office:value-type="float" office:value="1784.05">
            <text:p>1784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21260419000152550010001459071219908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97">
            <text:p>30609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4.64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2">
            <text:p>0,011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8.4">
            <text:p>3398,40</text:p>
          </table:table-cell>
          <table:table-cell table:style-name="ce12N2" office:value-type="float" office:value="237.89">
            <text:p>237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464519799933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9">
            <text:p>306129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2.15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59.85">
            <text:p>377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63164">
            <text:p>4,063</text:p>
          </table:table-cell>
          <table:table-cell table:style-name="ce12N2" office:value-type="float" office:value="21489.76">
            <text:p>2148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759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243.86">
            <text:p>243,86</text:p>
          </table:table-cell>
          <table:table-cell table:style-name="ce12N2" office:value-type="float" office:value="37515.99">
            <text:p>37515,99</text:p>
          </table:table-cell>
          <table:table-cell table:style-name="ce12N2" office:value-type="float" office:value="2626.12">
            <text:p>262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21571808125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2">
            <text:p>306202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556">
            <text:p>0,018</text:p>
          </table:table-cell>
          <table:table-cell table:style-name="ce12N2" office:value-type="float" office:value="2.1">
            <text:p>2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9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9.48">
            <text:p>339,48</text:p>
          </table:table-cell>
          <table:table-cell table:style-name="ce12N2" office:value-type="float" office:value="23.76">
            <text:p>2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712804182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03">
            <text:p>306203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5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04">
            <text:p>0,020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08">
            <text:p>379,08</text:p>
          </table:table-cell>
          <table:table-cell table:style-name="ce12N2" office:value-type="float" office:value="26.54">
            <text:p>2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594911898592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73">
            <text:p>306273</text:p>
          </table:table-cell>
          <table:table-cell table:style-name="ce0" table:number-columns-spanned="4" table:number-rows-spanned="1" office:value-type="string" calcext:value-type="string">
            <text:p>17.748 - ACQUALIMP INDUSTRIA E COMERCIO DE MATERIAIS PLASTICOS LTDA</text:p>
          </table:table-cell>
          <table:covered-table-cell table:number-columns-repeated="3"/>
          <table:table-cell table:style-name="ce0" office:value-type="string" calcext:value-type="string">
            <text:p>106.0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768.78">
            <text:p>1976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088.08">
            <text:p>1608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336646">
            <text:p>30,337</text:p>
          </table:table-cell>
          <table:table-cell table:style-name="ce12N2" office:value-type="float" office:value="263.02">
            <text:p>26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768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88.08">
            <text:p>16088,08</text:p>
          </table:table-cell>
          <table:table-cell table:style-name="ce12N2" office:value-type="float" office:value="1126.17">
            <text:p>1126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949.99">
            <text:p>23949,99</text:p>
          </table:table-cell>
          <table:table-cell table:style-name="ce12N2" office:value-type="float" office:value="3680.7">
            <text:p>3680,7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37008145000149550010001060021577655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50">
            <text:p>30635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3.0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33.44">
            <text:p>1893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99997">
            <text:p>2,900</text:p>
          </table:table-cell>
          <table:table-cell table:style-name="ce12N2" office:value-type="float" office:value="11804.18">
            <text:p>11804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33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22.27">
            <text:p>122,27</text:p>
          </table:table-cell>
          <table:table-cell table:style-name="ce12N2" office:value-type="float" office:value="18811.17">
            <text:p>18811,17</text:p>
          </table:table-cell>
          <table:table-cell table:style-name="ce12N2" office:value-type="float" office:value="1316.78">
            <text:p>131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30281564338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5">
            <text:p>30638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4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6">
            <text:p>8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6">
            <text:p>8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48">
            <text:p>0,155</text:p>
          </table:table-cell>
          <table:table-cell table:style-name="ce12N2" office:value-type="float" office:value="22.32">
            <text:p>22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6">
            <text:p>816,00</text:p>
          </table:table-cell>
          <table:table-cell table:style-name="ce12N2" office:value-type="float" office:value="57.12">
            <text:p>5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42619763100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6">
            <text:p>30638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4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4">
            <text:p>156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4">
            <text:p>156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67">
            <text:p>0,297</text:p>
          </table:table-cell>
          <table:table-cell table:style-name="ce12N2" office:value-type="float" office:value="42.78">
            <text:p>42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4">
            <text:p>1564,00</text:p>
          </table:table-cell>
          <table:table-cell table:style-name="ce12N2" office:value-type="float" office:value="109.48">
            <text:p>10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43818883216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7">
            <text:p>30638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4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31.27">
            <text:p>1643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677.2">
            <text:p>1567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48">
            <text:p>0,086</text:p>
          </table:table-cell>
          <table:table-cell table:style-name="ce12N2" office:value-type="float" office:value="70.92">
            <text:p>7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31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754.07">
            <text:p>754,07</text:p>
          </table:table-cell>
          <table:table-cell table:style-name="ce12N2" office:value-type="float" office:value="15677.2">
            <text:p>15677,20</text:p>
          </table:table-cell>
          <table:table-cell table:style-name="ce12N2" office:value-type="float" office:value="1097.4">
            <text:p>109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44513501675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0">
            <text:p>306390</text:p>
          </table:table-cell>
          <table:table-cell table:style-name="ce0" table:number-columns-spanned="4" table:number-rows-spanned="1" office:value-type="string" calcext:value-type="string">
            <text:p>7.087 - VELLORE S/A</text:p>
          </table:table-cell>
          <table:covered-table-cell table:number-columns-repeated="3"/>
          <table:table-cell table:style-name="ce0" office:value-type="string" calcext:value-type="string">
            <text:p>405.9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45.11">
            <text:p>2034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9419.38">
            <text:p>1941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24">
            <text:p>0,023</text:p>
          </table:table-cell>
          <table:table-cell table:style-name="ce12N2" office:value-type="float" office:value="70.03">
            <text:p>70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45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925.73">
            <text:p>925,73</text:p>
          </table:table-cell>
          <table:table-cell table:style-name="ce12N2" office:value-type="float" office:value="19419.38">
            <text:p>19419,38</text:p>
          </table:table-cell>
          <table:table-cell table:style-name="ce12N2" office:value-type="float" office:value="778.34">
            <text:p>778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17230860001435500100040594414999656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91">
            <text:p>306391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6236">
            <text:p>0,496</text:p>
          </table:table-cell>
          <table:table-cell table:style-name="ce12N2" office:value-type="float" office:value="246.07">
            <text:p>246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648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48.1">
            <text:p>20648,10</text:p>
          </table:table-cell>
          <table:table-cell table:style-name="ce12N2" office:value-type="float" office:value="2477.78">
            <text:p>24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4231597020001185500100002100810660879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45">
            <text:p>306445</text:p>
          </table:table-cell>
          <table:table-cell table:style-name="ce0" table:number-columns-spanned="4" table:number-rows-spanned="1" office:value-type="string" calcext:value-type="string">
            <text:p>15.950 - D. PLASTIC IND. E COM. DE ARTIGOS DE PLASTICOS - EIRELI</text:p>
          </table:table-cell>
          <table:covered-table-cell table:number-columns-repeated="3"/>
          <table:table-cell table:style-name="ce0" office:value-type="string" calcext:value-type="string">
            <text:p>47.1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09">
            <text:p>25,131</text:p>
          </table:table-cell>
          <table:table-cell table:style-name="ce12N2" office:value-type="float" office:value="134.5">
            <text:p>13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11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11.75">
            <text:p>12011,75</text:p>
          </table:table-cell>
          <table:table-cell table:style-name="ce12N2" office:value-type="float" office:value="840.82">
            <text:p>840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38506700014055001000047165142051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6">
            <text:p>306526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232">
            <text:p>1,523</text:p>
          </table:table-cell>
          <table:table-cell table:style-name="ce12N2" office:value-type="float" office:value="272">
            <text:p>2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465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65.77">
            <text:p>23465,77</text:p>
          </table:table-cell>
          <table:table-cell table:style-name="ce12N2" office:value-type="float" office:value="1642.6">
            <text:p>164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017340084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28">
            <text:p>306528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95">
            <text:p>0,071</text:p>
          </table:table-cell>
          <table:table-cell table:style-name="ce12N2" office:value-type="float" office:value="16.81">
            <text:p>16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4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47.87">
            <text:p>2447,87</text:p>
          </table:table-cell>
          <table:table-cell table:style-name="ce12N2" office:value-type="float" office:value="97.91">
            <text:p>9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11454297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7">
            <text:p>30654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9.4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8.54">
            <text:p>255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78">
            <text:p>247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08">
            <text:p>0,241</text:p>
          </table:table-cell>
          <table:table-cell table:style-name="ce12N2" office:value-type="float" office:value="70.7">
            <text:p>7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5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80.54">
            <text:p>80,54</text:p>
          </table:table-cell>
          <table:table-cell table:style-name="ce12N2" office:value-type="float" office:value="2478">
            <text:p>2478,00</text:p>
          </table:table-cell>
          <table:table-cell table:style-name="ce12N2" office:value-type="float" office:value="173.46">
            <text:p>1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194211528224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8">
            <text:p>30654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9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49.1">
            <text:p>734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349.1">
            <text:p>734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277">
            <text:p>0,683</text:p>
          </table:table-cell>
          <table:table-cell table:style-name="ce12N2" office:value-type="float" office:value="99.99">
            <text:p>99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4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49.1">
            <text:p>7349,10</text:p>
          </table:table-cell>
          <table:table-cell table:style-name="ce12N2" office:value-type="float" office:value="514.44">
            <text:p>514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194041851497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49">
            <text:p>30654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9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.92">
            <text:p>30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4.92">
            <text:p>304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">
            <text:p>0,002</text:p>
          </table:table-cell>
          <table:table-cell table:style-name="ce12N2" office:value-type="float" office:value="2.09">
            <text:p>2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4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4.92">
            <text:p>304,92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19380135421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2">
            <text:p>306552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3.2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309.56">
            <text:p>98130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3.070619">
            <text:p>53,071</text:p>
          </table:table-cell>
          <table:table-cell table:style-name="ce12N2" office:value-type="float" office:value="6522.54">
            <text:p>6522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1.30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35072.51">
            <text:p>35072,51</text:p>
          </table:table-cell>
          <table:table-cell table:style-name="ce12N2" office:value-type="float" office:value="946237.05">
            <text:p>946237,05</text:p>
          </table:table-cell>
          <table:table-cell table:style-name="ce12N2" office:value-type="float" office:value="57537.74">
            <text:p>5753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554846000136550010006832621683519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64">
            <text:p>30656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7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96.77">
            <text:p>689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34232">
            <text:p>1,334</text:p>
          </table:table-cell>
          <table:table-cell table:style-name="ce12N2" office:value-type="float" office:value="257.3">
            <text:p>257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96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17.09">
            <text:p>217,09</text:p>
          </table:table-cell>
          <table:table-cell table:style-name="ce12N2" office:value-type="float" office:value="6679.68">
            <text:p>6679,68</text:p>
          </table:table-cell>
          <table:table-cell table:style-name="ce12N2" office:value-type="float" office:value="267.19">
            <text:p>26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74314412013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7">
            <text:p>30669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8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2.4">
            <text:p>267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72.4">
            <text:p>267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828">
            <text:p>0,248</text:p>
          </table:table-cell>
          <table:table-cell table:style-name="ce12N2" office:value-type="float" office:value="36.36">
            <text:p>3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7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72.4">
            <text:p>2672,40</text:p>
          </table:table-cell>
          <table:table-cell table:style-name="ce12N2" office:value-type="float" office:value="187.07">
            <text:p>187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860710173074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6">
            <text:p>306706</text:p>
          </table:table-cell>
          <table:table-cell table:style-name="ce0" table:number-columns-spanned="4" table:number-rows-spanned="1" office:value-type="string" calcext:value-type="string">
            <text:p>11.272 - POLYSPACE INDUSTRIA DE ACESSORIOS PARA CASA E BANHO LTDA</text:p>
          </table:table-cell>
          <table:covered-table-cell table:number-columns-repeated="3"/>
          <table:table-cell table:style-name="ce0" office:value-type="string" calcext:value-type="string">
            <text:p>21.0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482">
            <text:p>0,019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4.84">
            <text:p>744,84</text:p>
          </table:table-cell>
          <table:table-cell table:style-name="ce12N2" office:value-type="float" office:value="89.38">
            <text:p>89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3260423159702000118550010000210091159426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8">
            <text:p>30673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5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517.12">
            <text:p>4651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87684">
            <text:p>3,388</text:p>
          </table:table-cell>
          <table:table-cell table:style-name="ce12N2" office:value-type="float" office:value="521.03">
            <text:p>52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51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35.06">
            <text:p>635,06</text:p>
          </table:table-cell>
          <table:table-cell table:style-name="ce12N2" office:value-type="float" office:value="45882.06">
            <text:p>45882,06</text:p>
          </table:table-cell>
          <table:table-cell table:style-name="ce12N2" office:value-type="float" office:value="2573.89">
            <text:p>2573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56191248127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00">
            <text:p>306800</text:p>
          </table:table-cell>
          <table:table-cell table:style-name="ce0" table:number-columns-spanned="4" table:number-rows-spanned="1" office:value-type="string" calcext:value-type="string">
            <text:p>6.059 - TECNO-FLEX INDUSTRIA E COMERCIO LTDA</text:p>
          </table:table-cell>
          <table:covered-table-cell table:number-columns-repeated="3"/>
          <table:table-cell table:style-name="ce0" office:value-type="string" calcext:value-type="string">
            <text:p>50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22.13">
            <text:p>2232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11095">
            <text:p>26,111</text:p>
          </table:table-cell>
          <table:table-cell table:style-name="ce12N2" office:value-type="float" office:value="250.16">
            <text:p>25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322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702.63">
            <text:p>702,63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1513.37">
            <text:p>15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7039802000122550010000508131390370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2">
            <text:p>306812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870.93">
            <text:p>9587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58885">
            <text:p>7,959</text:p>
          </table:table-cell>
          <table:table-cell table:style-name="ce12N2" office:value-type="float" office:value="10340">
            <text:p>103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87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17.73">
            <text:p>3017,73</text:p>
          </table:table-cell>
          <table:table-cell table:style-name="ce12N2" office:value-type="float" office:value="92853.2">
            <text:p>92853,20</text:p>
          </table:table-cell>
          <table:table-cell table:style-name="ce12N2" office:value-type="float" office:value="6499.72">
            <text:p>649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01015665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3">
            <text:p>306813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28.42">
            <text:p>1141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7456">
            <text:p>3,275</text:p>
          </table:table-cell>
          <table:table-cell table:style-name="ce12N2" office:value-type="float" office:value="13000">
            <text:p>13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28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592.42">
            <text:p>3592,42</text:p>
          </table:table-cell>
          <table:table-cell table:style-name="ce12N2" office:value-type="float" office:value="110536">
            <text:p>110536,00</text:p>
          </table:table-cell>
          <table:table-cell table:style-name="ce12N2" office:value-type="float" office:value="7737.52">
            <text:p>77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11015665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15">
            <text:p>306815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94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056.53">
            <text:p>9805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6816">
            <text:p>2,468</text:p>
          </table:table-cell>
          <table:table-cell table:style-name="ce12N2" office:value-type="float" office:value="7300">
            <text:p>73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.056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3086.53">
            <text:p>3086,53</text:p>
          </table:table-cell>
          <table:table-cell table:style-name="ce12N2" office:value-type="float" office:value="94970">
            <text:p>94970,00</text:p>
          </table:table-cell>
          <table:table-cell table:style-name="ce12N2" office:value-type="float" office:value="6647.9">
            <text:p>664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16674070001305500000001594210156650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6">
            <text:p>306836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3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90">
            <text:p>138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890">
            <text:p>138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454">
            <text:p>0,175</text:p>
          </table:table-cell>
          <table:table-cell table:style-name="ce12N2" office:value-type="float" office:value="47.7">
            <text:p>47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8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90">
            <text:p>13890,00</text:p>
          </table:table-cell>
          <table:table-cell table:style-name="ce12N2" office:value-type="float" office:value="972.3">
            <text:p>97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2296669000169550030000013861946977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39">
            <text:p>30683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4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3.25">
            <text:p>207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46.71">
            <text:p>1946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64">
            <text:p>0,057</text:p>
          </table:table-cell>
          <table:table-cell table:style-name="ce12N2" office:value-type="float" office:value="41.28">
            <text:p>4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3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126.54">
            <text:p>126,54</text:p>
          </table:table-cell>
          <table:table-cell table:style-name="ce12N2" office:value-type="float" office:value="1946.71">
            <text:p>1946,71</text:p>
          </table:table-cell>
          <table:table-cell table:style-name="ce12N2" office:value-type="float" office:value="77.87">
            <text:p>7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144315892254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47">
            <text:p>30684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1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1.62">
            <text:p>155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02.78">
            <text:p>150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2">
            <text:p>0,025</text:p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5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5/2026</text:p>
          </table:table-cell>
          <table:table-cell table:style-name="ce12N2" office:value-type="float" office:value="48.84">
            <text:p>48,84</text:p>
          </table:table-cell>
          <table:table-cell table:style-name="ce12N2" office:value-type="float" office:value="1502.78">
            <text:p>1502,78</text:p>
          </table:table-cell>
          <table:table-cell table:style-name="ce12N2" office:value-type="float" office:value="105.19">
            <text:p>10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14421570254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67">
            <text:p>306867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6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647.22">
            <text:p>10264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101741.04">
            <text:p>10174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26.31291">
            <text:p>2726,313</text:p>
          </table:table-cell>
          <table:table-cell table:style-name="ce12N2" office:value-type="float" office:value="418.76">
            <text:p>41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647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906.18">
            <text:p>906,18</text:p>
          </table:table-cell>
          <table:table-cell table:style-name="ce12N2" office:value-type="float" office:value="101741.04">
            <text:p>101741,04</text:p>
          </table:table-cell>
          <table:table-cell table:style-name="ce12N2" office:value-type="float" office:value="7076.1">
            <text:p>707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330642620002505500100026623910233051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891">
            <text:p>306891</text:p>
          </table:table-cell>
          <table:table-cell table:style-name="ce0" table:number-columns-spanned="4" table:number-rows-spanned="1" office:value-type="string" calcext:value-type="string">
            <text:p>3.848 - HIDROSSOL IND. E COM. DE PLASTICOS LTDA.</text:p>
          </table:table-cell>
          <table:covered-table-cell table:number-columns-repeated="3"/>
          <table:table-cell table:style-name="ce0" office:value-type="string" calcext:value-type="string">
            <text:p>57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5/2026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12312">
            <text:p>2,112</text:p>
          </table:table-cell>
          <table:table-cell table:style-name="ce12N2" office:value-type="float" office:value="764.31">
            <text:p>764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04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904.76">
            <text:p>18904,76</text:p>
          </table:table-cell>
          <table:table-cell table:style-name="ce12N2" office:value-type="float" office:value="1323.32">
            <text:p>1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75045140001555500100005752919057529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20">
            <text:p>306920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022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71.57">
            <text:p>3837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33615">
            <text:p>2,934</text:p>
          </table:table-cell>
          <table:table-cell table:style-name="ce12N2" office:value-type="float" office:value="3392.82">
            <text:p>339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371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298.71">
            <text:p>298,71</text:p>
          </table:table-cell>
          <table:table-cell table:style-name="ce12N2" office:value-type="float" office:value="38072.86">
            <text:p>38072,86</text:p>
          </table:table-cell>
          <table:table-cell table:style-name="ce12N2" office:value-type="float" office:value="1524.62">
            <text:p>152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0221675054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44">
            <text:p>30694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5.9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94">
            <text:p>1289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894">
            <text:p>1289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2">
            <text:p>0,037</text:p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89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94">
            <text:p>12894,00</text:p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595710659782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56">
            <text:p>306956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1.1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0.15">
            <text:p>3380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73.75">
            <text:p>3273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84">
            <text:p>0,218</text:p>
          </table:table-cell>
          <table:table-cell table:style-name="ce12N2" office:value-type="float" office:value="35.4">
            <text:p>3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0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12">
            <text:p>55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106.4">
            <text:p>106,40</text:p>
          </table:table-cell>
          <table:table-cell table:style-name="ce12N2" office:value-type="float" office:value="3273.75">
            <text:p>3273,75</text:p>
          </table:table-cell>
          <table:table-cell table:style-name="ce12N2" office:value-type="float" office:value="229.16">
            <text:p>22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11031424740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964">
            <text:p>306964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89.83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5">
            <text:p>0,001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6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26.15">
            <text:p>1126,15</text:p>
          </table:table-cell>
          <table:table-cell table:style-name="ce12N2" office:value-type="float" office:value="78.83">
            <text:p>78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777131003473550050008898381431941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3">
            <text:p>307053</text:p>
          </table:table-cell>
          <table:table-cell table:style-name="ce0" table:number-columns-spanned="4" table:number-rows-spanned="1" office:value-type="string" calcext:value-type="string">
            <text:p>23.993 - KARCHER INDUSTRIA E COMERCIO LIMITADA</text:p>
          </table:table-cell>
          <table:covered-table-cell table:number-columns-repeated="3"/>
          <table:table-cell table:style-name="ce0" office:value-type="string" calcext:value-type="string">
            <text:p>1.612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96.29">
            <text:p>339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189">
            <text:p>31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49587">
            <text:p>0,450</text:p>
          </table:table-cell>
          <table:table-cell table:style-name="ce12N2" office:value-type="float" office:value="40.4">
            <text:p>4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96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207.29">
            <text:p>207,29</text:p>
          </table:table-cell>
          <table:table-cell table:style-name="ce12N2" office:value-type="float" office:value="3189">
            <text:p>3189,00</text:p>
          </table:table-cell>
          <table:table-cell table:style-name="ce12N2" office:value-type="float" office:value="160.68">
            <text:p>160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71109600001785500100161219514263370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58">
            <text:p>30705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4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198.37">
            <text:p>38219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381701.86">
            <text:p>381701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8.38815">
            <text:p>58,388</text:p>
          </table:table-cell>
          <table:table-cell table:style-name="ce12N2" office:value-type="float" office:value="2277.92">
            <text:p>2277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2.198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5/2026</text:p>
          </table:table-cell>
          <table:table-cell table:style-name="ce12N2" office:value-type="float" office:value="496.51">
            <text:p>496,51</text:p>
          </table:table-cell>
          <table:table-cell table:style-name="ce12N2" office:value-type="float" office:value="381701.86">
            <text:p>381701,86</text:p>
          </table:table-cell>
          <table:table-cell table:style-name="ce12N2" office:value-type="float" office:value="26719.13">
            <text:p>26719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49311133567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3">
            <text:p>30706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75.4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999.6">
            <text:p>44899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48999.6">
            <text:p>44899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835">
            <text:p>2,284</text:p>
          </table:table-cell>
          <table:table-cell table:style-name="ce12N2" office:value-type="float" office:value="899.02">
            <text:p>899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8.99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999.6">
            <text:p>448999,60</text:p>
          </table:table-cell>
          <table:table-cell table:style-name="ce12N2" office:value-type="float" office:value="31429.97">
            <text:p>3142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7549514312068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6">
            <text:p>30706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5.08">
            <text:p>685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55.08">
            <text:p>685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93292">
            <text:p>1,293</text:p>
          </table:table-cell>
          <table:table-cell table:style-name="ce12N2" office:value-type="float" office:value="376.21">
            <text:p>376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55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55.08">
            <text:p>6855,08</text:p>
          </table:table-cell>
          <table:table-cell table:style-name="ce12N2" office:value-type="float" office:value="479.86">
            <text:p>47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4113506339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7">
            <text:p>30706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1.54">
            <text:p>3771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71.54">
            <text:p>377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5296">
            <text:p>0,553</text:p>
          </table:table-cell>
          <table:table-cell table:style-name="ce12N2" office:value-type="float" office:value="180">
            <text:p>18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71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71.54">
            <text:p>3771,54</text:p>
          </table:table-cell>
          <table:table-cell table:style-name="ce12N2" office:value-type="float" office:value="264.01">
            <text:p>26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4010051908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8">
            <text:p>30706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9.44">
            <text:p>241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9.44">
            <text:p>241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6456">
            <text:p>0,456</text:p>
          </table:table-cell>
          <table:table-cell table:style-name="ce12N2" office:value-type="float" office:value="132.78">
            <text:p>132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9.44">
            <text:p>2419,44</text:p>
          </table:table-cell>
          <table:table-cell table:style-name="ce12N2" office:value-type="float" office:value="169.36">
            <text:p>16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391018201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69">
            <text:p>30706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9.4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46788">
            <text:p>0,347</text:p>
          </table:table-cell>
          <table:table-cell table:style-name="ce12N2" office:value-type="float" office:value="71.76">
            <text:p>7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92.74">
            <text:p>9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494421014824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1">
            <text:p>307071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5.06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81.76">
            <text:p>342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33669.3">
            <text:p>3366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315998">
            <text:p>5,316</text:p>
          </table:table-cell>
          <table:table-cell table:style-name="ce12N2" office:value-type="float" office:value="740.61">
            <text:p>74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281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12.46">
            <text:p>612,46</text:p>
          </table:table-cell>
          <table:table-cell table:style-name="ce12N2" office:value-type="float" office:value="33669.3">
            <text:p>33669,30</text:p>
          </table:table-cell>
          <table:table-cell table:style-name="ce12N2" office:value-type="float" office:value="2057.24">
            <text:p>205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9723837000172550000006850661708155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74">
            <text:p>30707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4.7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196.87">
            <text:p>4819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6679.78">
            <text:p>46679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8794">
            <text:p>0,319</text:p>
          </table:table-cell>
          <table:table-cell table:style-name="ce12N2" office:value-type="float" office:value="1291.05">
            <text:p>1291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.196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517.09">
            <text:p>1517,09</text:p>
          </table:table-cell>
          <table:table-cell table:style-name="ce12N2" office:value-type="float" office:value="46679.78">
            <text:p>46679,78</text:p>
          </table:table-cell>
          <table:table-cell table:style-name="ce12N2" office:value-type="float" office:value="2909.39">
            <text:p>2909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47951293807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1">
            <text:p>307081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3.49">
            <text:p>249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25.11">
            <text:p>2425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18">
            <text:p>0,091</text:p>
          </table:table-cell>
          <table:table-cell table:style-name="ce12N2" office:value-type="float" office:value="25.5">
            <text:p>2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93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2425.11">
            <text:p>2425,11</text:p>
          </table:table-cell>
          <table:table-cell table:style-name="ce12N2" office:value-type="float" office:value="169.75">
            <text:p>16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0511570260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7">
            <text:p>3070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412">
            <text:p>0,092</text:p>
          </table:table-cell>
          <table:table-cell table:style-name="ce12N2" office:value-type="float" office:value="11.41">
            <text:p>1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99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99.68">
            <text:p>6199,68</text:p>
          </table:table-cell>
          <table:table-cell table:style-name="ce12N2" office:value-type="float" office:value="433.98">
            <text:p>43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11395890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8">
            <text:p>3070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624">
            <text:p>0,006</text:p>
          </table:table-cell>
          <table:table-cell table:style-name="ce12N2" office:value-type="float" office:value="2.96">
            <text:p>2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2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2.52">
            <text:p>1672,52</text:p>
          </table:table-cell>
          <table:table-cell table:style-name="ce12N2" office:value-type="float" office:value="117.08">
            <text:p>11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217992861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89">
            <text:p>3070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58.4">
            <text:p>15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158.4">
            <text:p>151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">
            <text:p>0,036</text:p>
          </table:table-cell>
          <table:table-cell table:style-name="ce12N2" office:value-type="float" office:value="123.52">
            <text:p>12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15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30.81">
            <text:p>11130,81</text:p>
          </table:table-cell>
          <table:table-cell table:style-name="ce12N2" office:value-type="float" office:value="779.16">
            <text:p>77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317588986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0">
            <text:p>3070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86.95">
            <text:p>1038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53">
            <text:p>975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758">
            <text:p>3,076</text:p>
          </table:table-cell>
          <table:table-cell table:style-name="ce12N2" office:value-type="float" office:value="112.2">
            <text:p>112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8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33.95">
            <text:p>633,95</text:p>
          </table:table-cell>
          <table:table-cell table:style-name="ce12N2" office:value-type="float" office:value="9753">
            <text:p>9753,00</text:p>
          </table:table-cell>
          <table:table-cell table:style-name="ce12N2" office:value-type="float" office:value="390.12">
            <text:p>39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416360108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1">
            <text:p>3070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5">
            <text:p>0,015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366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66.78">
            <text:p>19366,78</text:p>
          </table:table-cell>
          <table:table-cell table:style-name="ce12N2" office:value-type="float" office:value="1355.67">
            <text:p>1355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51165422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2">
            <text:p>3070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00.1">
            <text:p>1210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61.6">
            <text:p>113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504">
            <text:p>0,120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10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38.5">
            <text:p>738,50</text:p>
          </table:table-cell>
          <table:table-cell table:style-name="ce12N2" office:value-type="float" office:value="11361.6">
            <text:p>11361,60</text:p>
          </table:table-cell>
          <table:table-cell table:style-name="ce12N2" office:value-type="float" office:value="795.31">
            <text:p>79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610767865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3">
            <text:p>3070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92">
            <text:p>0,005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8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18.32">
            <text:p>1918,32</text:p>
          </table:table-cell>
          <table:table-cell table:style-name="ce12N2" office:value-type="float" office:value="134.28">
            <text:p>134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718081381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4">
            <text:p>3070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59">
            <text:p>0,058</text:p>
          </table:table-cell>
          <table:table-cell table:style-name="ce12N2" office:value-type="float" office:value="33.61">
            <text:p>3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29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293.8">
            <text:p>16293,80</text:p>
          </table:table-cell>
          <table:table-cell table:style-name="ce12N2" office:value-type="float" office:value="756.6">
            <text:p>7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815078911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5">
            <text:p>3070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26.6">
            <text:p>85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26.6">
            <text:p>852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5">
            <text:p>0,020</text:p>
          </table:table-cell>
          <table:table-cell table:style-name="ce12N2" office:value-type="float" office:value="69.48">
            <text:p>69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61.08">
            <text:p>6261,08</text:p>
          </table:table-cell>
          <table:table-cell table:style-name="ce12N2" office:value-type="float" office:value="438.28">
            <text:p>438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091582957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6">
            <text:p>3070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42.39">
            <text:p>15342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06">
            <text:p>1440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04">
            <text:p>0,074</text:p>
          </table:table-cell>
          <table:table-cell table:style-name="ce12N2" office:value-type="float" office:value="36.36">
            <text:p>36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342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36.39">
            <text:p>936,39</text:p>
          </table:table-cell>
          <table:table-cell table:style-name="ce12N2" office:value-type="float" office:value="14406">
            <text:p>14406,00</text:p>
          </table:table-cell>
          <table:table-cell table:style-name="ce12N2" office:value-type="float" office:value="1008.42">
            <text:p>100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517002464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7">
            <text:p>3070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5.93">
            <text:p>2910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182.8">
            <text:p>2818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34">
            <text:p>0,293</text:p>
          </table:table-cell>
          <table:table-cell table:style-name="ce12N2" office:value-type="float" office:value="28">
            <text:p>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05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23.13">
            <text:p>923,13</text:p>
          </table:table-cell>
          <table:table-cell table:style-name="ce12N2" office:value-type="float" office:value="28182.8">
            <text:p>28182,80</text:p>
          </table:table-cell>
          <table:table-cell table:style-name="ce12N2" office:value-type="float" office:value="1972.8">
            <text:p>197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612840297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8">
            <text:p>3070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0.4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37.54">
            <text:p>453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60.6">
            <text:p>426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814">
            <text:p>0,045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3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276.94">
            <text:p>276,94</text:p>
          </table:table-cell>
          <table:table-cell table:style-name="ce12N2" office:value-type="float" office:value="4260.6">
            <text:p>4260,60</text:p>
          </table:table-cell>
          <table:table-cell table:style-name="ce12N2" office:value-type="float" office:value="298.24">
            <text:p>29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049714842720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099">
            <text:p>307099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8.70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90.08">
            <text:p>559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0.08">
            <text:p>559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7024">
            <text:p>0,570</text:p>
          </table:table-cell>
          <table:table-cell table:style-name="ce12N2" office:value-type="float" office:value="230.4">
            <text:p>23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9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90.08">
            <text:p>5590,08</text:p>
          </table:table-cell>
          <table:table-cell table:style-name="ce12N2" office:value-type="float" office:value="391.31">
            <text:p>39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87041743852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11">
            <text:p>307111</text:p>
          </table:table-cell>
          <table:table-cell table:style-name="ce0" table:number-columns-spanned="4" table:number-rows-spanned="1" office:value-type="string" calcext:value-type="string">
            <text:p>756 - SFERA COMERCIAL IMPORTADORA LTDA</text:p>
          </table:table-cell>
          <table:covered-table-cell table:number-columns-repeated="3"/>
          <table:table-cell table:style-name="ce0" office:value-type="string" calcext:value-type="string">
            <text:p>304.149</text:p>
          </table:table-cell>
          <table:table-cell table:style-name="ce9" office:value-type="string" calcext:value-type="string">
            <text:p>55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352.72">
            <text:p>4635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">
            <text:p>31,00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152523">
            <text:p>7,153</text:p>
          </table:table-cell>
          <table:table-cell table:style-name="ce12N2" office:value-type="float" office:value="8613.53">
            <text:p>86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352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53.82">
            <text:p>753,82</text:p>
          </table:table-cell>
          <table:table-cell table:style-name="ce12N2" office:value-type="float" office:value="45598.9">
            <text:p>45598,90</text:p>
          </table:table-cell>
          <table:table-cell table:style-name="ce12N2" office:value-type="float" office:value="1832.5">
            <text:p>183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2741051000185550550003041491306894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19">
            <text:p>30711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6.6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201.51">
            <text:p>115201,51</text:p>
          </table:table-cell>
          <table:table-cell table:style-name="ce12N2" office:value-type="float" office:value="5458.35">
            <text:p>5458,35</text:p>
          </table:table-cell>
          <table:table-cell table:style-name="ce12N2" office:value-type="float" office:value="70">
            <text:p>70,00</text:p>
          </table:table-cell>
          <table:table-cell table:style-name="ce12N2" office:value-type="float" office:value="109166.42">
            <text:p>10916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38377">
            <text:p>5,738</text:p>
          </table:table-cell>
          <table:table-cell table:style-name="ce12N2" office:value-type="float" office:value="5043.2">
            <text:p>504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5.201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.38">
            <text:p>96,3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9811.13">
            <text:p>9811,13</text:p>
          </table:table-cell>
          <table:table-cell table:style-name="ce12N2" office:value-type="float" office:value="103708.07">
            <text:p>103708,07</text:p>
          </table:table-cell>
          <table:table-cell table:style-name="ce12N2" office:value-type="float" office:value="4377.25">
            <text:p>437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300.9">
            <text:p>9300,90</text:p>
          </table:table-cell>
          <table:table-cell table:style-name="ce12N2" office:value-type="float" office:value="1682.31">
            <text:p>1682,31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66851272645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4">
            <text:p>307124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6.7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9.86">
            <text:p>3809,86</text:p>
          </table:table-cell>
          <table:table-cell table:style-name="ce12N2" office:value-type="float" office:value="107.4">
            <text:p>107,40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78.8">
            <text:p>357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9184">
            <text:p>8,918</text:p>
          </table:table-cell>
          <table:table-cell table:style-name="ce12N2" office:value-type="float" office:value="308">
            <text:p>30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0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38.46">
            <text:p>338,46</text:p>
          </table:table-cell>
          <table:table-cell table:style-name="ce12N2" office:value-type="float" office:value="3471.4">
            <text:p>3471,40</text:p>
          </table:table-cell>
          <table:table-cell table:style-name="ce12N2" office:value-type="float" office:value="138.86">
            <text:p>13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67371763048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1">
            <text:p>307131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7.0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5.18">
            <text:p>1325,18</text:p>
          </table:table-cell>
          <table:table-cell table:style-name="ce12N2" office:value-type="float" office:value="63.55">
            <text:p>63,55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71">
            <text:p>127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87">
            <text:p>0,071</text:p>
          </table:table-cell>
          <table:table-cell table:style-name="ce12N2" office:value-type="float" office:value="167.8">
            <text:p>16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5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4.41">
            <text:p>94,4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17.73">
            <text:p>117,73</text:p>
          </table:table-cell>
          <table:table-cell table:style-name="ce12N2" office:value-type="float" office:value="1207.45">
            <text:p>1207,45</text:p>
          </table:table-cell>
          <table:table-cell table:style-name="ce12N2" office:value-type="float" office:value="48.3">
            <text:p>4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70191133141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34">
            <text:p>307134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2.5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49.7">
            <text:p>18949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7706.49">
            <text:p>17706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1169">
            <text:p>1,641</text:p>
          </table:table-cell>
          <table:table-cell table:style-name="ce12N2" office:value-type="float" office:value="416.82">
            <text:p>416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949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">
            <text:p>5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243.21">
            <text:p>1243,21</text:p>
          </table:table-cell>
          <table:table-cell table:style-name="ce12N2" office:value-type="float" office:value="17706.49">
            <text:p>17706,49</text:p>
          </table:table-cell>
          <table:table-cell table:style-name="ce12N2" office:value-type="float" office:value="1239.46">
            <text:p>12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25771477606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8">
            <text:p>3071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6.76">
            <text:p>1036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616">
            <text:p>0,054</text:p>
          </table:table-cell>
          <table:table-cell table:style-name="ce12N2" office:value-type="float" office:value="11.62">
            <text:p>11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6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7.22">
            <text:p>67,22</text:p>
          </table:table-cell>
          <table:table-cell table:style-name="ce12N2" office:value-type="float" office:value="969.54">
            <text:p>969,54</text:p>
          </table:table-cell>
          <table:table-cell table:style-name="ce12N2" office:value-type="float" office:value="67.87">
            <text:p>6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315702955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49">
            <text:p>3071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.45">
            <text:p>144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04">
            <text:p>0,041</text:p>
          </table:table-cell>
          <table:table-cell table:style-name="ce12N2" office:value-type="float" office:value="28.8">
            <text:p>2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6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88.28">
            <text:p>88,28</text:p>
          </table:table-cell>
          <table:table-cell table:style-name="ce12N2" office:value-type="float" office:value="1358.17">
            <text:p>1358,17</text:p>
          </table:table-cell>
          <table:table-cell table:style-name="ce12N2" office:value-type="float" office:value="54.33">
            <text:p>5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151589236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0">
            <text:p>307150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0.72">
            <text:p>37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5">
            <text:p>0,137</text:p>
          </table:table-cell>
          <table:table-cell table:style-name="ce12N2" office:value-type="float" office:value="171.6">
            <text:p>1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85.4">
            <text:p>185,40</text:p>
          </table:table-cell>
          <table:table-cell table:style-name="ce12N2" office:value-type="float" office:value="3565.32">
            <text:p>3565,32</text:p>
          </table:table-cell>
          <table:table-cell table:style-name="ce12N2" office:value-type="float" office:value="249.57">
            <text:p>24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719398157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1">
            <text:p>307151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24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68.74">
            <text:p>626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1299.236">
            <text:p>21299,236</text:p>
          </table:table-cell>
          <table:table-cell table:style-name="ce12N2" office:value-type="float" office:value="207.81">
            <text:p>207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6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97.32">
            <text:p>197,32</text:p>
          </table:table-cell>
          <table:table-cell table:style-name="ce12N2" office:value-type="float" office:value="6071.42">
            <text:p>6071,42</text:p>
          </table:table-cell>
          <table:table-cell table:style-name="ce12N2" office:value-type="float" office:value="425">
            <text:p>4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497920001815500100132498818391826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3">
            <text:p>3071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7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03">
            <text:p>4390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03">
            <text:p>4390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">
            <text:p>0,150</text:p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90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903">
            <text:p>43903,00</text:p>
          </table:table-cell>
          <table:table-cell table:style-name="ce12N2" office:value-type="float" office:value="3073.21">
            <text:p>307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73791008430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4">
            <text:p>307154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634.51">
            <text:p>5563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199">
            <text:p>1,720</text:p>
          </table:table-cell>
          <table:table-cell table:style-name="ce12N2" office:value-type="float" office:value="50">
            <text:p>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63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">
            <text:p>4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3395.53">
            <text:p>3395,53</text:p>
          </table:table-cell>
          <table:table-cell table:style-name="ce12N2" office:value-type="float" office:value="52238.98">
            <text:p>52238,98</text:p>
          </table:table-cell>
          <table:table-cell table:style-name="ce12N2" office:value-type="float" office:value="2089.56">
            <text:p>208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0391839776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5">
            <text:p>30715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2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9.28">
            <text:p>1230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7161">
            <text:p>0,672</text:p>
          </table:table-cell>
          <table:table-cell table:style-name="ce12N2" office:value-type="float" office:value="143.71">
            <text:p>143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309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653.16">
            <text:p>653,16</text:p>
          </table:table-cell>
          <table:table-cell table:style-name="ce12N2" office:value-type="float" office:value="11656.12">
            <text:p>11656,12</text:p>
          </table:table-cell>
          <table:table-cell table:style-name="ce12N2" office:value-type="float" office:value="815.92">
            <text:p>81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25091570355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7">
            <text:p>307157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4.3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1785.78">
            <text:p>41178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411785.78">
            <text:p>411785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5.7711">
            <text:p>175,771</text:p>
          </table:table-cell>
          <table:table-cell table:style-name="ce12N2" office:value-type="float" office:value="5413.9">
            <text:p>541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1.785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1785.78">
            <text:p>411785,78</text:p>
          </table:table-cell>
          <table:table-cell table:style-name="ce12N2" office:value-type="float" office:value="28825">
            <text:p>288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43721449861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58">
            <text:p>30715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98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9.75">
            <text:p>288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52.4">
            <text:p>275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73">
            <text:p>0,055</text:p>
          </table:table-cell>
          <table:table-cell table:style-name="ce12N2" office:value-type="float" office:value="32.57">
            <text:p>32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89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37.35">
            <text:p>137,35</text:p>
          </table:table-cell>
          <table:table-cell table:style-name="ce12N2" office:value-type="float" office:value="2752.4">
            <text:p>2752,40</text:p>
          </table:table-cell>
          <table:table-cell table:style-name="ce12N2" office:value-type="float" office:value="192.67">
            <text:p>19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9851651758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0">
            <text:p>30716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9.9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5.52">
            <text:p>352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377.7">
            <text:p>337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06">
            <text:p>0,035</text:p>
          </table:table-cell>
          <table:table-cell table:style-name="ce12N2" office:value-type="float" office:value="4.21">
            <text:p>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5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147.82">
            <text:p>147,82</text:p>
          </table:table-cell>
          <table:table-cell table:style-name="ce12N2" office:value-type="float" office:value="3377.7">
            <text:p>3377,70</text:p>
          </table:table-cell>
          <table:table-cell table:style-name="ce12N2" office:value-type="float" office:value="236.44">
            <text:p>23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6998718625095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64">
            <text:p>307164</text:p>
          </table:table-cell>
          <table:table-cell table:style-name="ce0" table:number-columns-spanned="4" table:number-rows-spanned="1" office:value-type="string" calcext:value-type="string">
            <text:p>4.879 - AIEDEM COMERCIO DE PERFI DE METAIS LTDA</text:p>
          </table:table-cell>
          <table:covered-table-cell table:number-columns-repeated="3"/>
          <table:table-cell table:style-name="ce0" office:value-type="string" calcext:value-type="string">
            <text:p>67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85">
            <text:p>3,948</text:p>
          </table:table-cell>
          <table:table-cell table:style-name="ce12N2" office:value-type="float" office:value="1124.8">
            <text:p>1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4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48">
            <text:p>39048,00</text:p>
          </table:table-cell>
          <table:table-cell table:style-name="ce12N2" office:value-type="float" office:value="2733.36">
            <text:p>273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12827610000142550010000675741814316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4">
            <text:p>3071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4775">
            <text:p>1,648</text:p>
          </table:table-cell>
          <table:table-cell table:style-name="ce12N2" office:value-type="float" office:value="299.7">
            <text:p>29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81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13.3">
            <text:p>18813,30</text:p>
          </table:table-cell>
          <table:table-cell table:style-name="ce12N2" office:value-type="float" office:value="1316.93">
            <text:p>131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41805086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5">
            <text:p>30718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591">
            <text:p>0,659</text:p>
          </table:table-cell>
          <table:table-cell table:style-name="ce12N2" office:value-type="float" office:value="119.88">
            <text:p>119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525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25.32">
            <text:p>7525,32</text:p>
          </table:table-cell>
          <table:table-cell table:style-name="ce12N2" office:value-type="float" office:value="526.77">
            <text:p>52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51093286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6">
            <text:p>3071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5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62494">
            <text:p>11,625</text:p>
          </table:table-cell>
          <table:table-cell table:style-name="ce12N2" office:value-type="float" office:value="4137.72">
            <text:p>4137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5.32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321.24">
            <text:p>95321,24</text:p>
          </table:table-cell>
          <table:table-cell table:style-name="ce12N2" office:value-type="float" office:value="5341.03">
            <text:p>534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59635500100004457718884725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7">
            <text:p>3071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4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4.44">
            <text:p>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17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17.54">
            <text:p>4017,54</text:p>
          </table:table-cell>
          <table:table-cell table:style-name="ce12N2" office:value-type="float" office:value="281.23">
            <text:p>28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4601465598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8">
            <text:p>30718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86.85">
            <text:p>2378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00">
            <text:p>3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78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48.74">
            <text:p>748,74</text:p>
          </table:table-cell>
          <table:table-cell table:style-name="ce12N2" office:value-type="float" office:value="23038.11">
            <text:p>23038,11</text:p>
          </table:table-cell>
          <table:table-cell table:style-name="ce12N2" office:value-type="float" office:value="1612.67">
            <text:p>1612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41584130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9">
            <text:p>30718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49.06">
            <text:p>2404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2000">
            <text:p>32000,000</text:p>
          </table:table-cell>
          <table:table-cell table:style-name="ce12N2" office:value-type="float" office:value="3275">
            <text:p>327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04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772.03">
            <text:p>772,03</text:p>
          </table:table-cell>
          <table:table-cell table:style-name="ce12N2" office:value-type="float" office:value="23277.03">
            <text:p>23277,03</text:p>
          </table:table-cell>
          <table:table-cell table:style-name="ce12N2" office:value-type="float" office:value="1622.23">
            <text:p>162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04615684904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3">
            <text:p>307213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077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85.76">
            <text:p>898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743.23">
            <text:p>8743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472">
            <text:p>0,020</text:p>
          </table:table-cell>
          <table:table-cell table:style-name="ce12N2" office:value-type="float" office:value="47.51">
            <text:p>47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985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42.53">
            <text:p>242,53</text:p>
          </table:table-cell>
          <table:table-cell table:style-name="ce12N2" office:value-type="float" office:value="8743.23">
            <text:p>8743,23</text:p>
          </table:table-cell>
          <table:table-cell table:style-name="ce12N2" office:value-type="float" office:value="612.03">
            <text:p>61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07717420732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14">
            <text:p>3072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0.09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52">
            <text:p>0,367</text:p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10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10.52">
            <text:p>2610,52</text:p>
          </table:table-cell>
          <table:table-cell table:style-name="ce12N2" office:value-type="float" office:value="182.74">
            <text:p>18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009817572009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0">
            <text:p>3072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.1">
            <text:p>1542,10</text:p>
          </table:table-cell>
          <table:table-cell table:style-name="ce12N2" office:value-type="float" office:value="107.95">
            <text:p>10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415303875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3">
            <text:p>3072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3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3.08">
            <text:p>2753,08</text:p>
          </table:table-cell>
          <table:table-cell table:style-name="ce12N2" office:value-type="float" office:value="192.72">
            <text:p>19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01044736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5">
            <text:p>3072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8.85">
            <text:p>908,85</text:p>
          </table:table-cell>
          <table:table-cell table:style-name="ce12N2" office:value-type="float" office:value="63.62">
            <text:p>6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6142473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6">
            <text:p>3072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8">
            <text:p>0,003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8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84.2">
            <text:p>3084,20</text:p>
          </table:table-cell>
          <table:table-cell table:style-name="ce12N2" office:value-type="float" office:value="215.89">
            <text:p>215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31559226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7">
            <text:p>3072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52">
            <text:p>0,001</text:p>
          </table:table-cell>
          <table:table-cell table:style-name="ce12N2" office:value-type="float" office:value="9.65">
            <text:p>9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33.12">
            <text:p>8433,12</text:p>
          </table:table-cell>
          <table:table-cell table:style-name="ce12N2" office:value-type="float" office:value="590.32">
            <text:p>59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791857476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8">
            <text:p>307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8">
            <text:p>0,000</text:p>
          </table:table-cell>
          <table:table-cell table:style-name="ce12N2" office:value-type="float" office:value="3.89">
            <text:p>3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05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05.66">
            <text:p>2705,66</text:p>
          </table:table-cell>
          <table:table-cell table:style-name="ce12N2" office:value-type="float" office:value="189.4">
            <text:p>18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21807035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29">
            <text:p>3072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64.3">
            <text:p>316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656">
            <text:p>0,047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64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93.13">
            <text:p>193,13</text:p>
          </table:table-cell>
          <table:table-cell table:style-name="ce12N2" office:value-type="float" office:value="2971.17">
            <text:p>2971,17</text:p>
          </table:table-cell>
          <table:table-cell table:style-name="ce12N2" office:value-type="float" office:value="118.85">
            <text:p>11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811277077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0">
            <text:p>3072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84">
            <text:p>0,000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9.6">
            <text:p>2929,60</text:p>
          </table:table-cell>
          <table:table-cell table:style-name="ce12N2" office:value-type="float" office:value="205.07">
            <text:p>205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11819923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2">
            <text:p>3072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2.45">
            <text:p>424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056">
            <text:p>0,012</text:p>
          </table:table-cell>
          <table:table-cell table:style-name="ce12N2" office:value-type="float" office:value="4.7">
            <text:p>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258.93">
            <text:p>258,93</text:p>
          </table:table-cell>
          <table:table-cell table:style-name="ce12N2" office:value-type="float" office:value="3983.52">
            <text:p>3983,52</text:p>
          </table:table-cell>
          <table:table-cell table:style-name="ce12N2" office:value-type="float" office:value="278.85">
            <text:p>27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916878592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3">
            <text:p>3072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63.67">
            <text:p>6363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84">
            <text:p>0,018</text:p>
          </table:table-cell>
          <table:table-cell table:style-name="ce12N2" office:value-type="float" office:value="7.06">
            <text:p>7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63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88.39">
            <text:p>388,39</text:p>
          </table:table-cell>
          <table:table-cell table:style-name="ce12N2" office:value-type="float" office:value="5975.28">
            <text:p>5975,28</text:p>
          </table:table-cell>
          <table:table-cell table:style-name="ce12N2" office:value-type="float" office:value="418.27">
            <text:p>41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819941113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4">
            <text:p>3072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4">
            <text:p>0,00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84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4.24">
            <text:p>1684,24</text:p>
          </table:table-cell>
          <table:table-cell table:style-name="ce12N2" office:value-type="float" office:value="117.9">
            <text:p>11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51611884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6">
            <text:p>3072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26">
            <text:p>0,001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2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29.62">
            <text:p>4129,62</text:p>
          </table:table-cell>
          <table:table-cell table:style-name="ce12N2" office:value-type="float" office:value="289.07">
            <text:p>289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71533603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7">
            <text:p>3072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2">
            <text:p>0,001</text:p>
          </table:table-cell>
          <table:table-cell table:style-name="ce12N2" office:value-type="float" office:value="15.55">
            <text:p>15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9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92.16">
            <text:p>11392,16</text:p>
          </table:table-cell>
          <table:table-cell table:style-name="ce12N2" office:value-type="float" office:value="797.45">
            <text:p>797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313228677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8">
            <text:p>3072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5.34">
            <text:p>96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28">
            <text:p>0,005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5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8.92">
            <text:p>58,92</text:p>
          </table:table-cell>
          <table:table-cell table:style-name="ce12N2" office:value-type="float" office:value="906.42">
            <text:p>906,42</text:p>
          </table:table-cell>
          <table:table-cell table:style-name="ce12N2" office:value-type="float" office:value="63.45">
            <text:p>63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8710700137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39">
            <text:p>3072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102">
            <text:p>0,060</text:p>
          </table:table-cell>
          <table:table-cell table:style-name="ce12N2" office:value-type="float" office:value="36.35">
            <text:p>36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812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812.15">
            <text:p>21812,15</text:p>
          </table:table-cell>
          <table:table-cell table:style-name="ce12N2" office:value-type="float" office:value="1526.85">
            <text:p>15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01617954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0">
            <text:p>30724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4782.27">
            <text:p>43478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433693.99">
            <text:p>433693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679331">
            <text:p>17,679</text:p>
          </table:table-cell>
          <table:table-cell table:style-name="ce12N2" office:value-type="float" office:value="1691.18">
            <text:p>169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4.782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088.28">
            <text:p>1088,28</text:p>
          </table:table-cell>
          <table:table-cell table:style-name="ce12N2" office:value-type="float" office:value="430570.54">
            <text:p>430570,54</text:p>
          </table:table-cell>
          <table:table-cell table:style-name="ce12N2" office:value-type="float" office:value="25868.84">
            <text:p>2586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91906483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1">
            <text:p>3072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2.9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4">
            <text:p>0,001</text:p>
          </table:table-cell>
          <table:table-cell table:style-name="ce12N2" office:value-type="float" office:value="50.85">
            <text:p>50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508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08.75">
            <text:p>29508,75</text:p>
          </table:table-cell>
          <table:table-cell table:style-name="ce12N2" office:value-type="float" office:value="2065.61">
            <text:p>2065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29911926848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6">
            <text:p>30724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0.6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71.78">
            <text:p>10637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13816">
            <text:p>7,414</text:p>
          </table:table-cell>
          <table:table-cell table:style-name="ce12N2" office:value-type="float" office:value="3329.13">
            <text:p>3329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371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28.18">
            <text:p>128,18</text:p>
          </table:table-cell>
          <table:table-cell table:style-name="ce12N2" office:value-type="float" office:value="106243.6">
            <text:p>106243,60</text:p>
          </table:table-cell>
          <table:table-cell table:style-name="ce12N2" office:value-type="float" office:value="6817.63">
            <text:p>681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06791202127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7">
            <text:p>30724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96.46">
            <text:p>1689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63408">
            <text:p>0,663</text:p>
          </table:table-cell>
          <table:table-cell table:style-name="ce12N2" office:value-type="float" office:value="243.9">
            <text:p>2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9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531.85">
            <text:p>531,85</text:p>
          </table:table-cell>
          <table:table-cell table:style-name="ce12N2" office:value-type="float" office:value="16364.61">
            <text:p>16364,61</text:p>
          </table:table-cell>
          <table:table-cell table:style-name="ce12N2" office:value-type="float" office:value="1145.52">
            <text:p>114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01571134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8">
            <text:p>307248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63.3">
            <text:p>1026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9232">
            <text:p>0,389</text:p>
          </table:table-cell>
          <table:table-cell table:style-name="ce12N2" office:value-type="float" office:value="143.1">
            <text:p>14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6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23.06">
            <text:p>323,06</text:p>
          </table:table-cell>
          <table:table-cell table:style-name="ce12N2" office:value-type="float" office:value="9940.24">
            <text:p>9940,24</text:p>
          </table:table-cell>
          <table:table-cell table:style-name="ce12N2" office:value-type="float" office:value="695.82">
            <text:p>695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21571134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49">
            <text:p>30724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2.12">
            <text:p>542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632">
            <text:p>0,206</text:p>
          </table:table-cell>
          <table:table-cell table:style-name="ce12N2" office:value-type="float" office:value="75.6">
            <text:p>7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22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70.67">
            <text:p>170,67</text:p>
          </table:table-cell>
          <table:table-cell table:style-name="ce12N2" office:value-type="float" office:value="5251.45">
            <text:p>5251,45</text:p>
          </table:table-cell>
          <table:table-cell table:style-name="ce12N2" office:value-type="float" office:value="367.6">
            <text:p>3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35615711347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6">
            <text:p>307266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61.2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002.38">
            <text:p>20500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203736.89">
            <text:p>203736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3.74442">
            <text:p>283,744</text:p>
          </table:table-cell>
          <table:table-cell table:style-name="ce12N2" office:value-type="float" office:value="4482">
            <text:p>448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5.00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265.49">
            <text:p>1265,49</text:p>
          </table:table-cell>
          <table:table-cell table:style-name="ce12N2" office:value-type="float" office:value="203736.89">
            <text:p>203736,89</text:p>
          </table:table-cell>
          <table:table-cell table:style-name="ce12N2" office:value-type="float" office:value="13924.14">
            <text:p>1392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150751009135550010005612691904040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67">
            <text:p>30726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1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44.2">
            <text:p>39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625.47">
            <text:p>3625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69">
            <text:p>0,006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4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87">
            <text:p>54,8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318.73">
            <text:p>318,73</text:p>
          </table:table-cell>
          <table:table-cell table:style-name="ce12N2" office:value-type="float" office:value="3625.47">
            <text:p>3625,47</text:p>
          </table:table-cell>
          <table:table-cell table:style-name="ce12N2" office:value-type="float" office:value="229.32">
            <text:p>22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1610614618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0">
            <text:p>3072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8.16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6.93">
            <text:p>315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64.25">
            <text:p>296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9">
            <text:p>0,002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56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92.68">
            <text:p>192,68</text:p>
          </table:table-cell>
          <table:table-cell table:style-name="ce12N2" office:value-type="float" office:value="2964.25">
            <text:p>2964,25</text:p>
          </table:table-cell>
          <table:table-cell table:style-name="ce12N2" office:value-type="float" office:value="207.5">
            <text:p>20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816713377291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4">
            <text:p>30727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0.09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5366">
            <text:p>4,054</text:p>
          </table:table-cell>
          <table:table-cell table:style-name="ce12N2" office:value-type="float" office:value="869">
            <text:p>86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19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92.6">
            <text:p>29192,60</text:p>
          </table:table-cell>
          <table:table-cell table:style-name="ce12N2" office:value-type="float" office:value="2043.48">
            <text:p>204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00991380246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9">
            <text:p>307279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3.2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03.95">
            <text:p>2410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">
            <text:p>0,520</text:p>
          </table:table-cell>
          <table:table-cell table:style-name="ce12N2" office:value-type="float" office:value="16.25">
            <text:p>1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03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1191.45">
            <text:p>1191,45</text:p>
          </table:table-cell>
          <table:table-cell table:style-name="ce12N2" office:value-type="float" office:value="22912.5">
            <text:p>22912,50</text:p>
          </table:table-cell>
          <table:table-cell table:style-name="ce12N2" office:value-type="float" office:value="1603.88">
            <text:p>160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327611000128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1">
            <text:p>307291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0.01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153.96">
            <text:p>4315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1795.6">
            <text:p>4179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4">
            <text:p>0,046</text:p>
          </table:table-cell>
          <table:table-cell table:style-name="ce12N2" office:value-type="float" office:value="17.28">
            <text:p>17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15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358.36">
            <text:p>1358,36</text:p>
          </table:table-cell>
          <table:table-cell table:style-name="ce12N2" office:value-type="float" office:value="41795.6">
            <text:p>41795,60</text:p>
          </table:table-cell>
          <table:table-cell table:style-name="ce12N2" office:value-type="float" office:value="2925.69">
            <text:p>2925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00151736654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5">
            <text:p>307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3.0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052">
            <text:p>0,074</text:p>
          </table:table-cell>
          <table:table-cell table:style-name="ce12N2" office:value-type="float" office:value="87.34">
            <text:p>8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37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375.12">
            <text:p>36375,12</text:p>
          </table:table-cell>
          <table:table-cell table:style-name="ce12N2" office:value-type="float" office:value="1455">
            <text:p>14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3078105097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98">
            <text:p>307298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5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0.48">
            <text:p>7830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52">
            <text:p>1,152</text:p>
          </table:table-cell>
          <table:table-cell table:style-name="ce12N2" office:value-type="float" office:value="864">
            <text:p>86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0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46.48">
            <text:p>246,48</text:p>
          </table:table-cell>
          <table:table-cell table:style-name="ce12N2" office:value-type="float" office:value="7584">
            <text:p>7584,00</text:p>
          </table:table-cell>
          <table:table-cell table:style-name="ce12N2" office:value-type="float" office:value="530.88">
            <text:p>53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0641500005185500100020555811940990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6">
            <text:p>307316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4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070.1">
            <text:p>155070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5070.1">
            <text:p>15507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3.6909">
            <text:p>223,691</text:p>
          </table:table-cell>
          <table:table-cell table:style-name="ce12N2" office:value-type="float" office:value="3083.2">
            <text:p>308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.070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5070.1">
            <text:p>155070,10</text:p>
          </table:table-cell>
          <table:table-cell table:style-name="ce12N2" office:value-type="float" office:value="10854.91">
            <text:p>1085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25440420001195500100047458514328658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4">
            <text:p>3073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6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675">
            <text:p>0,127</text:p>
          </table:table-cell>
          <table:table-cell table:style-name="ce12N2" office:value-type="float" office:value="135.4">
            <text:p>13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75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759.5">
            <text:p>47759,50</text:p>
          </table:table-cell>
          <table:table-cell table:style-name="ce12N2" office:value-type="float" office:value="3343.17">
            <text:p>334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6841818745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7">
            <text:p>3073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544">
            <text:p>0,021</text:p>
          </table:table-cell>
          <table:table-cell table:style-name="ce12N2" office:value-type="float" office:value="4.28">
            <text:p>4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29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9.56">
            <text:p>2229,56</text:p>
          </table:table-cell>
          <table:table-cell table:style-name="ce12N2" office:value-type="float" office:value="156.07">
            <text:p>15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041084287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9">
            <text:p>3073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46">
            <text:p>0,125</text:p>
          </table:table-cell>
          <table:table-cell table:style-name="ce12N2" office:value-type="float" office:value="28.5">
            <text:p>2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06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062">
            <text:p>20062,00</text:p>
          </table:table-cell>
          <table:table-cell table:style-name="ce12N2" office:value-type="float" office:value="1404.34">
            <text:p>140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3013490194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5">
            <text:p>30733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4.35">
            <text:p>118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776">
            <text:p>0,020</text:p>
          </table:table-cell>
          <table:table-cell table:style-name="ce12N2" office:value-type="float" office:value="10.37">
            <text:p>1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4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7.28">
            <text:p>37,28</text:p>
          </table:table-cell>
          <table:table-cell table:style-name="ce12N2" office:value-type="float" office:value="1147.07">
            <text:p>1147,07</text:p>
          </table:table-cell>
          <table:table-cell table:style-name="ce12N2" office:value-type="float" office:value="80.29">
            <text:p>8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01570337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6">
            <text:p>30733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3.7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3.86">
            <text:p>1713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08">
            <text:p>0,094</text:p>
          </table:table-cell>
          <table:table-cell table:style-name="ce12N2" office:value-type="float" office:value="15.68">
            <text:p>1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13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2.26">
            <text:p>152,26</text:p>
          </table:table-cell>
          <table:table-cell table:style-name="ce12N2" office:value-type="float" office:value="1561.6">
            <text:p>1561,60</text:p>
          </table:table-cell>
          <table:table-cell table:style-name="ce12N2" office:value-type="float" office:value="109.31">
            <text:p>10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375515815482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7">
            <text:p>307337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3.6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16.32">
            <text:p>2111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075.02">
            <text:p>19075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82057">
            <text:p>1,182</text:p>
          </table:table-cell>
          <table:table-cell table:style-name="ce12N2" office:value-type="float" office:value="310.91">
            <text:p>310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116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912.37">
            <text:p>912,37</text:p>
          </table:table-cell>
          <table:table-cell table:style-name="ce12N2" office:value-type="float" office:value="18771.12">
            <text:p>18771,12</text:p>
          </table:table-cell>
          <table:table-cell table:style-name="ce12N2" office:value-type="float" office:value="783.29">
            <text:p>78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298.96">
            <text:p>6298,96</text:p>
          </table:table-cell>
          <table:table-cell table:style-name="ce12N2" office:value-type="float" office:value="1128.93">
            <text:p>1128,93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050940030001555500100018366013927242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8">
            <text:p>307338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9.12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6.51">
            <text:p>557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576.51">
            <text:p>5576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546">
            <text:p>0,018</text:p>
          </table:table-cell>
          <table:table-cell table:style-name="ce12N2" office:value-type="float" office:value="6.52">
            <text:p>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6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6.51">
            <text:p>5576,51</text:p>
          </table:table-cell>
          <table:table-cell table:style-name="ce12N2" office:value-type="float" office:value="390.36">
            <text:p>39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9270215000105550060002191281805822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0">
            <text:p>30734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63.6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74.94">
            <text:p>66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45">
            <text:p>63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4">
            <text:p>0,144</text:p>
          </table:table-cell>
          <table:table-cell table:style-name="ce12N2" office:value-type="float" office:value="4.5">
            <text:p>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74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329.94">
            <text:p>329,94</text:p>
          </table:table-cell>
          <table:table-cell table:style-name="ce12N2" office:value-type="float" office:value="6345">
            <text:p>6345,00</text:p>
          </table:table-cell>
          <table:table-cell table:style-name="ce12N2" office:value-type="float" office:value="444.15">
            <text:p>444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569947000003655500100006367811000189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5">
            <text:p>307345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26.85">
            <text:p>1682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502">
            <text:p>0,050</text:p>
          </table:table-cell>
          <table:table-cell table:style-name="ce12N2" office:value-type="float" office:value="107.16">
            <text:p>107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2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529.66">
            <text:p>529,66</text:p>
          </table:table-cell>
          <table:table-cell table:style-name="ce12N2" office:value-type="float" office:value="16297.19">
            <text:p>16297,19</text:p>
          </table:table-cell>
          <table:table-cell table:style-name="ce12N2" office:value-type="float" office:value="1140.81">
            <text:p>114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11455403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6">
            <text:p>307346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601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5.31">
            <text:p>91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">
            <text:p>0,000</text:p>
          </table:table-cell>
          <table:table-cell table:style-name="ce12N2" office:value-type="float" office:value="9.7">
            <text:p>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5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886.5">
            <text:p>886,50</text:p>
          </table:table-cell>
          <table:table-cell table:style-name="ce12N2" office:value-type="float" office:value="62.06">
            <text:p>6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03983690008005500100060104211115962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49">
            <text:p>30734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73">
            <text:p>0,025</text:p>
          </table:table-cell>
          <table:table-cell table:style-name="ce12N2" office:value-type="float" office:value="8.77">
            <text:p>8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7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6.7">
            <text:p>6576,70</text:p>
          </table:table-cell>
          <table:table-cell table:style-name="ce12N2" office:value-type="float" office:value="460.37">
            <text:p>46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3519092375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0">
            <text:p>307350</text:p>
          </table:table-cell>
          <table:table-cell table:style-name="ce0" table:number-columns-spanned="4" table:number-rows-spanned="1" office:value-type="string" calcext:value-type="string">
            <text:p>12.999 - SAGA DISTRIBUICAO E LOGISTICA LTDA</text:p>
          </table:table-cell>
          <table:covered-table-cell table:number-columns-repeated="3"/>
          <table:table-cell table:style-name="ce0" office:value-type="string" calcext:value-type="string">
            <text:p>1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50">
            <text:p>1425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50">
            <text:p>142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795">
            <text:p>0,218</text:p>
          </table:table-cell>
          <table:table-cell table:style-name="ce12N2" office:value-type="float" office:value="88.5">
            <text:p>88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25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50">
            <text:p>14250,00</text:p>
          </table:table-cell>
          <table:table-cell table:style-name="ce12N2" office:value-type="float" office:value="591.38">
            <text:p>59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29682263000100550010000014221958895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1">
            <text:p>307351</text:p>
          </table:table-cell>
          <table:table-cell table:style-name="ce0" table:number-columns-spanned="4" table:number-rows-spanned="1" office:value-type="string" calcext:value-type="string">
            <text:p>29.857 - J.H. DE OLIVEIRA FABRICACAO DE MANGUEIRAS LTDA</text:p>
          </table:table-cell>
          <table:covered-table-cell table:number-columns-repeated="3"/>
          <table:table-cell table:style-name="ce0" office:value-type="string" calcext:value-type="string">
            <text:p>6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92">
            <text:p>1939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392">
            <text:p>193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5.7469">
            <text:p>75,747</text:p>
          </table:table-cell>
          <table:table-cell table:style-name="ce12N2" office:value-type="float" office:value="1472">
            <text:p>147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39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92">
            <text:p>19392,00</text:p>
          </table:table-cell>
          <table:table-cell table:style-name="ce12N2" office:value-type="float" office:value="733.02">
            <text:p>73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20482520001165500100000067515047175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2">
            <text:p>307352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59.6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628.88">
            <text:p>11162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1628.88">
            <text:p>11162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1.445306">
            <text:p>31,445</text:p>
          </table:table-cell>
          <table:table-cell table:style-name="ce12N2" office:value-type="float" office:value="23632.4">
            <text:p>2363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1.62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628.88">
            <text:p>111628,88</text:p>
          </table:table-cell>
          <table:table-cell table:style-name="ce12N2" office:value-type="float" office:value="13395.47">
            <text:p>1339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5966010717435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4">
            <text:p>3073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46">
            <text:p>0,049</text:p>
          </table:table-cell>
          <table:table-cell table:style-name="ce12N2" office:value-type="float" office:value="17.54">
            <text:p>17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15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53.4">
            <text:p>13153,40</text:p>
          </table:table-cell>
          <table:table-cell table:style-name="ce12N2" office:value-type="float" office:value="920.74">
            <text:p>92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361597315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55">
            <text:p>3073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0.5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4">
            <text:p>417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4">
            <text:p>417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26">
            <text:p>0,036</text:p>
          </table:table-cell>
          <table:table-cell table:style-name="ce12N2" office:value-type="float" office:value="24.4">
            <text:p>2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4">
            <text:p>4174,00</text:p>
          </table:table-cell>
          <table:table-cell table:style-name="ce12N2" office:value-type="float" office:value="292.18">
            <text:p>29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05441969649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3">
            <text:p>30737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1.37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42">
            <text:p>4,420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4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90">
            <text:p>25490,00</text:p>
          </table:table-cell>
          <table:table-cell table:style-name="ce12N2" office:value-type="float" office:value="1784.3">
            <text:p>178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13741092917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4">
            <text:p>307374</text:p>
          </table:table-cell>
          <table:table-cell table:style-name="ce0" table:number-columns-spanned="4" table:number-rows-spanned="1" office:value-type="string" calcext:value-type="string">
            <text:p>29.615 - TENASTEEL INDUSTRIA E COMERCIO LTDA</text:p>
          </table:table-cell>
          <table:covered-table-cell table:number-columns-repeated="3"/>
          <table:table-cell table:style-name="ce0" office:value-type="string" calcext:value-type="string">
            <text:p>9.05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57.55">
            <text:p>1955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8801.4">
            <text:p>1880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159">
            <text:p>0,292</text:p>
          </table:table-cell>
          <table:table-cell table:style-name="ce12N2" office:value-type="float" office:value="743.76">
            <text:p>74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5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7.42">
            <text:p>47,4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756.15">
            <text:p>756,15</text:p>
          </table:table-cell>
          <table:table-cell table:style-name="ce12N2" office:value-type="float" office:value="18801.4">
            <text:p>18801,40</text:p>
          </table:table-cell>
          <table:table-cell table:style-name="ce12N2" office:value-type="float" office:value="1316.09">
            <text:p>131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5140487720001085500400000905511395877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7">
            <text:p>307377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477.2">
            <text:p>1347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477.2">
            <text:p>1347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98">
            <text:p>0,890</text:p>
          </table:table-cell>
          <table:table-cell table:style-name="ce12N2" office:value-type="float" office:value="59.52">
            <text:p>5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47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477.2">
            <text:p>13477,20</text:p>
          </table:table-cell>
          <table:table-cell table:style-name="ce12N2" office:value-type="float" office:value="943.4">
            <text:p>94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22913200355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9">
            <text:p>307379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0.0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18.02">
            <text:p>1811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18.02">
            <text:p>18118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421416">
            <text:p>12,421</text:p>
          </table:table-cell>
          <table:table-cell table:style-name="ce12N2" office:value-type="float" office:value="4128.05">
            <text:p>412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118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18.02">
            <text:p>18118,02</text:p>
          </table:table-cell>
          <table:table-cell table:style-name="ce12N2" office:value-type="float" office:value="2174.16">
            <text:p>217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6006219909902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0">
            <text:p>307380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0.0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53.54">
            <text:p>10015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0153.54">
            <text:p>10015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33.52985">
            <text:p>433,530</text:p>
          </table:table-cell>
          <table:table-cell table:style-name="ce12N2" office:value-type="float" office:value="19912.63">
            <text:p>19912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0.15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53.54">
            <text:p>100153,54</text:p>
          </table:table-cell>
          <table:table-cell table:style-name="ce12N2" office:value-type="float" office:value="12018.43">
            <text:p>1201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600611903760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3">
            <text:p>3073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926">
            <text:p>0,019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4.12">
            <text:p>704,12</text:p>
          </table:table-cell>
          <table:table-cell table:style-name="ce12N2" office:value-type="float" office:value="49.29">
            <text:p>4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41945775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4">
            <text:p>3073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84">
            <text:p>0,001</text:p>
          </table:table-cell>
          <table:table-cell table:style-name="ce12N2" office:value-type="float" office:value="30.51">
            <text:p>3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05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05.25">
            <text:p>17705,25</text:p>
          </table:table-cell>
          <table:table-cell table:style-name="ce12N2" office:value-type="float" office:value="1239.37">
            <text:p>123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51607923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5">
            <text:p>3073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32">
            <text:p>0,001</text:p>
          </table:table-cell>
          <table:table-cell table:style-name="ce12N2" office:value-type="float" office:value="23.73">
            <text:p>23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77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770.75">
            <text:p>13770,75</text:p>
          </table:table-cell>
          <table:table-cell table:style-name="ce12N2" office:value-type="float" office:value="963.95">
            <text:p>96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61828839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7">
            <text:p>3073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8">
            <text:p>0,006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1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14.32">
            <text:p>1114,32</text:p>
          </table:table-cell>
          <table:table-cell table:style-name="ce12N2" office:value-type="float" office:value="44.57">
            <text:p>44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81357376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88">
            <text:p>3073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0.29">
            <text:p>0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58">
            <text:p>278,58</text:p>
          </table:table-cell>
          <table:table-cell table:style-name="ce12N2" office:value-type="float" office:value="11.14">
            <text:p>1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691827152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0">
            <text:p>307390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72.9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376.69">
            <text:p>6437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61795.15">
            <text:p>61795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230413">
            <text:p>14,230</text:p>
          </table:table-cell>
          <table:table-cell table:style-name="ce12N2" office:value-type="float" office:value="491.4">
            <text:p>49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4.376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88">
            <text:p>54,8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2581.54">
            <text:p>2581,54</text:p>
          </table:table-cell>
          <table:table-cell table:style-name="ce12N2" office:value-type="float" office:value="59923.43">
            <text:p>59923,43</text:p>
          </table:table-cell>
          <table:table-cell table:style-name="ce12N2" office:value-type="float" office:value="3000.7">
            <text:p>300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08083960005215500100087294914886627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3">
            <text:p>307393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0.1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69.5">
            <text:p>10636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6369.5">
            <text:p>10636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5.90415">
            <text:p>35,904</text:p>
          </table:table-cell>
          <table:table-cell table:style-name="ce12N2" office:value-type="float" office:value="22569.47">
            <text:p>22569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36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369.5">
            <text:p>106369,50</text:p>
          </table:table-cell>
          <table:table-cell table:style-name="ce12N2" office:value-type="float" office:value="12764.34">
            <text:p>1276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6013013432948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4">
            <text:p>307394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0.1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83.7">
            <text:p>878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83.7">
            <text:p>878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7683">
            <text:p>2,177</text:p>
          </table:table-cell>
          <table:table-cell table:style-name="ce12N2" office:value-type="float" office:value="2006.48">
            <text:p>200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83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83.7">
            <text:p>8783,70</text:p>
          </table:table-cell>
          <table:table-cell table:style-name="ce12N2" office:value-type="float" office:value="1054.04">
            <text:p>105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6013110858594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5">
            <text:p>307395</text:p>
          </table:table-cell>
          <table:table-cell table:style-name="ce0" table:number-columns-spanned="4" table:number-rows-spanned="1" office:value-type="string" calcext:value-type="string">
            <text:p>26.665 - SIDERURGICA NORTE BRASIL S/A</text:p>
          </table:table-cell>
          <table:covered-table-cell table:number-columns-repeated="3"/>
          <table:table-cell table:style-name="ce0" office:value-type="string" calcext:value-type="string">
            <text:p>860.1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57.99">
            <text:p>885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57.99">
            <text:p>885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22245">
            <text:p>3,922</text:p>
          </table:table-cell>
          <table:table-cell table:style-name="ce12N2" office:value-type="float" office:value="2022.3">
            <text:p>2022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5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57.99">
            <text:p>8857,99</text:p>
          </table:table-cell>
          <table:table-cell table:style-name="ce12N2" office:value-type="float" office:value="1062.96">
            <text:p>106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5260507933914000154550010008601321423509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8">
            <text:p>3073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2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2.06">
            <text:p>352,06</text:p>
          </table:table-cell>
          <table:table-cell table:style-name="ce12N2" office:value-type="float" office:value="24.64">
            <text:p>2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91462833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9">
            <text:p>3073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78">
            <text:p>0,058</text:p>
          </table:table-cell>
          <table:table-cell table:style-name="ce12N2" office:value-type="float" office:value="9.91">
            <text:p>9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2.36">
            <text:p>2112,36</text:p>
          </table:table-cell>
          <table:table-cell table:style-name="ce12N2" office:value-type="float" office:value="147.87">
            <text:p>14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011808725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0">
            <text:p>3074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0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9016">
            <text:p>0,119</text:p>
          </table:table-cell>
          <table:table-cell table:style-name="ce12N2" office:value-type="float" office:value="56.34">
            <text:p>56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209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209.66">
            <text:p>22209,66</text:p>
          </table:table-cell>
          <table:table-cell table:style-name="ce12N2" office:value-type="float" office:value="1554.68">
            <text:p>155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11902782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1">
            <text:p>307401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68.7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7.36">
            <text:p>352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386.1">
            <text:p>338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55">
            <text:p>0,078</text:p>
          </table:table-cell>
          <table:table-cell table:style-name="ce12N2" office:value-type="float" office:value="21.88">
            <text:p>2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2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41.26">
            <text:p>141,26</text:p>
          </table:table-cell>
          <table:table-cell table:style-name="ce12N2" office:value-type="float" office:value="3386.1">
            <text:p>3386,10</text:p>
          </table:table-cell>
          <table:table-cell table:style-name="ce12N2" office:value-type="float" office:value="233.98">
            <text:p>23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330642620002505500100026874712051631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3">
            <text:p>307403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1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9.43">
            <text:p>266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482.39">
            <text:p>2482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436">
            <text:p>0,041</text:p>
          </table:table-cell>
          <table:table-cell table:style-name="ce12N2" office:value-type="float" office:value="24.17">
            <text:p>24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187.04">
            <text:p>187,04</text:p>
          </table:table-cell>
          <table:table-cell table:style-name="ce12N2" office:value-type="float" office:value="2482.39">
            <text:p>2482,39</text:p>
          </table:table-cell>
          <table:table-cell table:style-name="ce12N2" office:value-type="float" office:value="173.77">
            <text:p>17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1011570291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9">
            <text:p>307409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7.46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17.6">
            <text:p>22317,60</text:p>
          </table:table-cell>
          <table:table-cell table:style-name="ce12N2" office:value-type="float" office:value="749.73">
            <text:p>749,73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08.96">
            <text:p>2220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588">
            <text:p>26,588</text:p>
          </table:table-cell>
          <table:table-cell table:style-name="ce12N2" office:value-type="float" office:value="34000">
            <text:p>3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31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459.23">
            <text:p>21459,23</text:p>
          </table:table-cell>
          <table:table-cell table:style-name="ce12N2" office:value-type="float" office:value="4291.85">
            <text:p>429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751.08">
            <text:p>25751,08</text:p>
          </table:table-cell>
          <table:table-cell table:style-name="ce12N2" office:value-type="float" office:value="858.37">
            <text:p>858,37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4746819070308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12">
            <text:p>307412</text:p>
          </table:table-cell>
          <table:table-cell table:style-name="ce0" table:number-columns-spanned="4" table:number-rows-spanned="1" office:value-type="string" calcext:value-type="string">
            <text:p>30.874 - PACK61 DISTRIBUICAO E EMBALAGENS LTDA</text:p>
          </table:table-cell>
          <table:covered-table-cell table:number-columns-repeated="3"/>
          <table:table-cell table:style-name="ce0" office:value-type="string" calcext:value-type="string">
            <text:p>4.0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138">
            <text:p>99138,00</text:p>
          </table:table-cell>
          <table:table-cell table:style-name="ce12N2" office:value-type="float" office:value="642">
            <text:p>642,0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780">
            <text:p>997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7.5">
            <text:p>37,500</text:p>
          </table:table-cell>
          <table:table-cell table:style-name="ce12N2" office:value-type="float" office:value="4800">
            <text:p>48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9.1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">
            <text:p>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138">
            <text:p>99138,00</text:p>
          </table:table-cell>
          <table:table-cell table:style-name="ce12N2" office:value-type="float" office:value="19827.6">
            <text:p>1982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7085410001315500100000408510193500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13">
            <text:p>307413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7.482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6.5">
            <text:p>2546,50</text:p>
          </table:table-cell>
          <table:table-cell table:style-name="ce12N2" office:value-type="float" office:value="85.53">
            <text:p>85,53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632.03">
            <text:p>2632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728">
            <text:p>3,173</text:p>
          </table:table-cell>
          <table:table-cell table:style-name="ce12N2" office:value-type="float" office:value="4000">
            <text:p>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4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6.5">
            <text:p>2546,50</text:p>
          </table:table-cell>
          <table:table-cell table:style-name="ce12N2" office:value-type="float" office:value="509.3">
            <text:p>50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4748213092603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14">
            <text:p>307414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7.483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17.6">
            <text:p>22317,60</text:p>
          </table:table-cell>
          <table:table-cell table:style-name="ce12N2" office:value-type="float" office:value="749.73">
            <text:p>749,73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08.96">
            <text:p>2220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.588">
            <text:p>26,588</text:p>
          </table:table-cell>
          <table:table-cell table:style-name="ce12N2" office:value-type="float" office:value="34000">
            <text:p>3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31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459.23">
            <text:p>21459,23</text:p>
          </table:table-cell>
          <table:table-cell table:style-name="ce12N2" office:value-type="float" office:value="4291.85">
            <text:p>429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751.08">
            <text:p>25751,08</text:p>
          </table:table-cell>
          <table:table-cell table:style-name="ce12N2" office:value-type="float" office:value="858.37">
            <text:p>858,37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5016378950074985500600144748316492539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0">
            <text:p>307430</text:p>
          </table:table-cell>
          <table:table-cell table:style-name="ce0" table:number-columns-spanned="4" table:number-rows-spanned="1" office:value-type="string" calcext:value-type="string">
            <text:p>16.329 - CSM-COMPONENTES SISTEMAS E MAQUINAS PARA CONSTRUCAO LTD</text:p>
          </table:table-cell>
          <table:covered-table-cell table:number-columns-repeated="3"/>
          <table:table-cell table:style-name="ce0" office:value-type="string" calcext:value-type="string">
            <text:p>368.7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776">
            <text:p>827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2776">
            <text:p>827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7.053904">
            <text:p>57,054</text:p>
          </table:table-cell>
          <table:table-cell table:style-name="ce12N2" office:value-type="float" office:value="4260">
            <text:p>42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77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782.42">
            <text:p>60782,42</text:p>
          </table:table-cell>
          <table:table-cell table:style-name="ce12N2" office:value-type="float" office:value="4254.77">
            <text:p>425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6840537000121550010003687571045571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4">
            <text:p>30743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4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33.4">
            <text:p>843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05.72">
            <text:p>780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9048">
            <text:p>0,489</text:p>
          </table:table-cell>
          <table:table-cell table:style-name="ce12N2" office:value-type="float" office:value="69.4">
            <text:p>69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33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627.68">
            <text:p>627,68</text:p>
          </table:table-cell>
          <table:table-cell table:style-name="ce12N2" office:value-type="float" office:value="7805.72">
            <text:p>7805,72</text:p>
          </table:table-cell>
          <table:table-cell table:style-name="ce12N2" office:value-type="float" office:value="312.23">
            <text:p>312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410080034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5">
            <text:p>307435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8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854.54">
            <text:p>1585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786.56">
            <text:p>13786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6">
            <text:p>0,015</text:p>
          </table:table-cell>
          <table:table-cell table:style-name="ce12N2" office:value-type="float" office:value="0.48">
            <text:p>0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85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067.98">
            <text:p>2067,98</text:p>
          </table:table-cell>
          <table:table-cell table:style-name="ce12N2" office:value-type="float" office:value="13786.56">
            <text:p>13786,56</text:p>
          </table:table-cell>
          <table:table-cell table:style-name="ce12N2" office:value-type="float" office:value="965.06">
            <text:p>96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810007985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6">
            <text:p>30743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7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3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931996">
            <text:p>7,932</text:p>
          </table:table-cell>
          <table:table-cell table:style-name="ce12N2" office:value-type="float" office:value="1295.38">
            <text:p>1295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886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886.3">
            <text:p>47886,30</text:p>
          </table:table-cell>
          <table:table-cell table:style-name="ce12N2" office:value-type="float" office:value="3251.68">
            <text:p>325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75991998297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7">
            <text:p>307437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7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98.4">
            <text:p>1749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7498.4">
            <text:p>1749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1156">
            <text:p>0,712</text:p>
          </table:table-cell>
          <table:table-cell table:style-name="ce12N2" office:value-type="float" office:value="41.14">
            <text:p>41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9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498.4">
            <text:p>17498,40</text:p>
          </table:table-cell>
          <table:table-cell table:style-name="ce12N2" office:value-type="float" office:value="1224.88">
            <text:p>1224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710078338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38">
            <text:p>307438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7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5.5">
            <text:p>557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00">
            <text:p>54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4">
            <text:p>1,44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7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">
            <text:p>5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75.5">
            <text:p>175,50</text:p>
          </table:table-cell>
          <table:table-cell table:style-name="ce12N2" office:value-type="float" office:value="5400">
            <text:p>5400,00</text:p>
          </table:table-cell>
          <table:table-cell table:style-name="ce12N2" office:value-type="float" office:value="378">
            <text:p>37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740112592901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0">
            <text:p>30744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5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334">
            <text:p>0,053</text:p>
          </table:table-cell>
          <table:table-cell table:style-name="ce12N2" office:value-type="float" office:value="26.86">
            <text:p>26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9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96.2">
            <text:p>8496,20</text:p>
          </table:table-cell>
          <table:table-cell table:style-name="ce12N2" office:value-type="float" office:value="594.73">
            <text:p>59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5711504332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1">
            <text:p>30744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7.9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158.25">
            <text:p>5115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158.25">
            <text:p>51158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.6888">
            <text:p>42,689</text:p>
          </table:table-cell>
          <table:table-cell table:style-name="ce12N2" office:value-type="float" office:value="2268.22">
            <text:p>2268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15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158.25">
            <text:p>51158,25</text:p>
          </table:table-cell>
          <table:table-cell table:style-name="ce12N2" office:value-type="float" office:value="3581.08">
            <text:p>358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797313890493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2">
            <text:p>30744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27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61.5">
            <text:p>5686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6861.5">
            <text:p>5686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1.7055">
            <text:p>61,706</text:p>
          </table:table-cell>
          <table:table-cell table:style-name="ce12N2" office:value-type="float" office:value="5025.8">
            <text:p>502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.86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861.5">
            <text:p>56861,50</text:p>
          </table:table-cell>
          <table:table-cell table:style-name="ce12N2" office:value-type="float" office:value="3980.31">
            <text:p>3980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08862530001122550010020279831648881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5">
            <text:p>3074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8.96">
            <text:p>31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28">
            <text:p>0,002</text:p>
          </table:table-cell>
          <table:table-cell table:style-name="ce12N2" office:value-type="float" office:value="1.11">
            <text:p>1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.21">
            <text:p>234,21</text:p>
          </table:table-cell>
          <table:table-cell table:style-name="ce12N2" office:value-type="float" office:value="16.39">
            <text:p>16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51599363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6">
            <text:p>3074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224">
            <text:p>0,013</text:p>
          </table:table-cell>
          <table:table-cell table:style-name="ce12N2" office:value-type="float" office:value="6.26">
            <text:p>6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67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67.74">
            <text:p>2467,74</text:p>
          </table:table-cell>
          <table:table-cell table:style-name="ce12N2" office:value-type="float" office:value="172.74">
            <text:p>17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617416353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7">
            <text:p>3074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836">
            <text:p>0,198</text:p>
          </table:table-cell>
          <table:table-cell table:style-name="ce12N2" office:value-type="float" office:value="93.9">
            <text:p>9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016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16.1">
            <text:p>37016,10</text:p>
          </table:table-cell>
          <table:table-cell table:style-name="ce12N2" office:value-type="float" office:value="2591.13">
            <text:p>259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71798311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8">
            <text:p>3074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84">
            <text:p>0,002</text:p>
          </table:table-cell>
          <table:table-cell table:style-name="ce12N2" office:value-type="float" office:value="2.69">
            <text:p>2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2.16">
            <text:p>1072,16</text:p>
          </table:table-cell>
          <table:table-cell table:style-name="ce12N2" office:value-type="float" office:value="75.05">
            <text:p>7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811667505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49">
            <text:p>3074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6.5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831.73">
            <text:p>450831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">
            <text:p>91,00</text:p>
          </table:table-cell>
          <table:table-cell table:style-name="ce12N2" office:value-type="float" office:value="448672.28">
            <text:p>44867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811394">
            <text:p>17,811</text:p>
          </table:table-cell>
          <table:table-cell table:style-name="ce12N2" office:value-type="float" office:value="1457.6">
            <text:p>145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0.831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159.45">
            <text:p>2159,45</text:p>
          </table:table-cell>
          <table:table-cell table:style-name="ce12N2" office:value-type="float" office:value="442130.72">
            <text:p>442130,72</text:p>
          </table:table-cell>
          <table:table-cell table:style-name="ce12N2" office:value-type="float" office:value="27913.85">
            <text:p>279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658914790971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0">
            <text:p>307450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56.8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4.37">
            <text:p>115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3.92">
            <text:p>108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926">
            <text:p>0,086</text:p>
          </table:table-cell>
          <table:table-cell table:style-name="ce12N2" office:value-type="float" office:value="13.08">
            <text:p>13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5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70.45">
            <text:p>70,45</text:p>
          </table:table-cell>
          <table:table-cell table:style-name="ce12N2" office:value-type="float" office:value="1083.92">
            <text:p>1083,92</text:p>
          </table:table-cell>
          <table:table-cell table:style-name="ce12N2" office:value-type="float" office:value="75.87">
            <text:p>7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5688212194930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1">
            <text:p>307451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56.8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6.84">
            <text:p>303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851.5">
            <text:p>285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6912">
            <text:p>0,277</text:p>
          </table:table-cell>
          <table:table-cell table:style-name="ce12N2" office:value-type="float" office:value="34.44">
            <text:p>34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36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85.34">
            <text:p>185,34</text:p>
          </table:table-cell>
          <table:table-cell table:style-name="ce12N2" office:value-type="float" office:value="2851.5">
            <text:p>2851,50</text:p>
          </table:table-cell>
          <table:table-cell table:style-name="ce12N2" office:value-type="float" office:value="199.6">
            <text:p>19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900502380001145500100135688012995634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2">
            <text:p>307452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14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4.18">
            <text:p>122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72">
            <text:p>0,067</text:p>
          </table:table-cell>
          <table:table-cell table:style-name="ce12N2" office:value-type="float" office:value="11.2">
            <text:p>1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08.75">
            <text:p>108,75</text:p>
          </table:table-cell>
          <table:table-cell table:style-name="ce12N2" office:value-type="float" office:value="1115.43">
            <text:p>1115,43</text:p>
          </table:table-cell>
          <table:table-cell table:style-name="ce12N2" office:value-type="float" office:value="78.08">
            <text:p>7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674080000101550010009144591581555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4">
            <text:p>307454</text:p>
          </table:table-cell>
          <table:table-cell table:style-name="ce0" table:number-columns-spanned="4" table:number-rows-spanned="1" office:value-type="string" calcext:value-type="string">
            <text:p>5.467 - DVG INDUSTRIAL S.A.</text:p>
          </table:table-cell>
          <table:covered-table-cell table:number-columns-repeated="3"/>
          <table:table-cell table:style-name="ce0" office:value-type="string" calcext:value-type="string">
            <text:p>105.1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88">
            <text:p>1018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188">
            <text:p>1018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9425">
            <text:p>10,943</text:p>
          </table:table-cell>
          <table:table-cell table:style-name="ce12N2" office:value-type="float" office:value="18000">
            <text:p>18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8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88">
            <text:p>10188,00</text:p>
          </table:table-cell>
          <table:table-cell table:style-name="ce12N2" office:value-type="float" office:value="1222.56">
            <text:p>122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23452238001710550010001051961013497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55">
            <text:p>307455</text:p>
          </table:table-cell>
          <table:table-cell table:style-name="ce0" table:number-columns-spanned="4" table:number-rows-spanned="1" office:value-type="string" calcext:value-type="string">
            <text:p>5.467 - DVG INDUSTRIAL S.A.</text:p>
          </table:table-cell>
          <table:covered-table-cell table:number-columns-repeated="3"/>
          <table:table-cell table:style-name="ce0" office:value-type="string" calcext:value-type="string">
            <text:p>105.1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95">
            <text:p>1249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95">
            <text:p>1249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.5925">
            <text:p>15,592</text:p>
          </table:table-cell>
          <table:table-cell table:style-name="ce12N2" office:value-type="float" office:value="14000">
            <text:p>14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9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495">
            <text:p>12495,00</text:p>
          </table:table-cell>
          <table:table-cell table:style-name="ce12N2" office:value-type="float" office:value="1499.4">
            <text:p>149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5234522380017105500100010519711628848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8">
            <text:p>307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85.24">
            <text:p>19885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671.59">
            <text:p>18671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01827">
            <text:p>5,602</text:p>
          </table:table-cell>
          <table:table-cell table:style-name="ce12N2" office:value-type="float" office:value="34.86">
            <text:p>34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885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213.65">
            <text:p>1213,65</text:p>
          </table:table-cell>
          <table:table-cell table:style-name="ce12N2" office:value-type="float" office:value="18671.59">
            <text:p>18671,59</text:p>
          </table:table-cell>
          <table:table-cell table:style-name="ce12N2" office:value-type="float" office:value="746.86">
            <text:p>74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01191149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9">
            <text:p>30746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398">
            <text:p>0,114</text:p>
          </table:table-cell>
          <table:table-cell table:style-name="ce12N2" office:value-type="float" office:value="32.04">
            <text:p>3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2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3.8">
            <text:p>2023,80</text:p>
          </table:table-cell>
          <table:table-cell table:style-name="ce12N2" office:value-type="float" office:value="141.67">
            <text:p>14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20871140136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3">
            <text:p>307473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5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1.8">
            <text:p>666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661.8">
            <text:p>666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062">
            <text:p>0,461</text:p>
          </table:table-cell>
          <table:table-cell table:style-name="ce12N2" office:value-type="float" office:value="116.46">
            <text:p>116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1.8">
            <text:p>6661,80</text:p>
          </table:table-cell>
          <table:table-cell table:style-name="ce12N2" office:value-type="float" office:value="466.33">
            <text:p>46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510007744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4">
            <text:p>307474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64.356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6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110.54">
            <text:p>5411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654.08">
            <text:p>5265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3968">
            <text:p>0,974</text:p>
          </table:table-cell>
          <table:table-cell table:style-name="ce12N2" office:value-type="float" office:value="2222.66">
            <text:p>222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110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456.46">
            <text:p>1456,46</text:p>
          </table:table-cell>
          <table:table-cell table:style-name="ce12N2" office:value-type="float" office:value="52654.08">
            <text:p>52654,08</text:p>
          </table:table-cell>
          <table:table-cell table:style-name="ce12N2" office:value-type="float" office:value="3685.78">
            <text:p>368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459853710001085502500076435610041572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79">
            <text:p>179,00</text:p>
          </table:table-cell>
          <table:table-cell table:style-name="ce26N2" office:value-type="float" office:value="7856.29">
            <text:p>7856,2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7339.32">
            <text:p>97339,32</text:p>
          </table:table-cell>
          <table:table-cell table:style-name="ce26N2" office:value-type="float" office:value="6636573.4">
            <text:p>6636573,40</text:p>
          </table:table-cell>
          <table:table-cell table:style-name="ce26N2" office:value-type="float" office:value="469893.67">
            <text:p>469893,6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782421.77">
            <text:p>6782421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1540.2">
            <text:p>91540,20</text:p>
          </table:table-cell>
          <table:table-cell table:style-name="ce26N2" office:value-type="float" office:value="8296.98">
            <text:p>8296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90003.573287">
            <text:p>90003,573</text:p>
          </table:table-cell>
          <table:table-cell table:style-name="ce26N2" office:value-type="float" office:value="6684641.76">
            <text:p>6684641,76</text:p>
          </table:table-cell>
          <table:table-cell table:style-name="ce26N2" office:value-type="float" office:value="6782421.77">
            <text:p>6782421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38745.8">
            <text:p>338745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9.26">
            <text:p>49,2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OBJETIV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248" meta:object-count="0"/>
    <meta:generator>LibreOffice/4.3.0.4$Windows_x86 LibreOffice_project/62ad5818884a2fc2e5780dd45466868d41009ec0</meta:generator>
  </office:meta>
</office:document-meta>
</file>