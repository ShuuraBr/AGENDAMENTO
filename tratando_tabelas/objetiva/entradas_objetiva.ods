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1/05/2026 05:30:3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2535">
            <text:p>3025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30.01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">
            <text:p>30,000</text:p>
          </table:table-cell>
          <table:table-cell table:style-name="ce12N2" office:value-type="float" office:value="3425.1">
            <text:p>342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8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301637895007498550060014300181495666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5">
            <text:p>306055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5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74792">
            <text:p>38,748</text:p>
          </table:table-cell>
          <table:table-cell table:style-name="ce12N2" office:value-type="float" office:value="2302.6">
            <text:p>23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8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1784.05">
            <text:p>178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1260419000152550010001459071219908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9">
            <text:p>3061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5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59.85">
            <text:p>377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3164">
            <text:p>4,063</text:p>
          </table:table-cell>
          <table:table-cell table:style-name="ce12N2" office:value-type="float" office:value="21489.76">
            <text:p>214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75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43.86">
            <text:p>243,86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2626.12">
            <text:p>262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57180812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2">
            <text:p>30620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56">
            <text:p>0,018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7128041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3">
            <text:p>30620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04">
            <text:p>0,020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26.54">
            <text:p>2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91189859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50">
            <text:p>30635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3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3.44">
            <text:p>1893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99997">
            <text:p>2,900</text:p>
          </table:table-cell>
          <table:table-cell table:style-name="ce12N2" office:value-type="float" office:value="11804.18">
            <text:p>1180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33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22.27">
            <text:p>122,27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1316.78">
            <text:p>13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30281564338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6">
            <text:p>30652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32">
            <text:p>1,523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6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1642.6">
            <text:p>164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017340084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8">
            <text:p>306528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95">
            <text:p>0,071</text:p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4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97.91">
            <text:p>9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11454297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2">
            <text:p>30655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309.56">
            <text:p>9813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3.070619">
            <text:p>53,071</text:p>
          </table:table-cell>
          <table:table-cell table:style-name="ce12N2" office:value-type="float" office:value="6522.54">
            <text:p>65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.3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5072.51">
            <text:p>35072,51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57537.74">
            <text:p>5753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21683519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684">
            <text:p>3,388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9">
            <text:p>30683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3.25">
            <text:p>207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64">
            <text:p>0,057</text:p>
          </table:table-cell>
          <table:table-cell table:style-name="ce12N2" office:value-type="float" office:value="41.28">
            <text:p>4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26.54">
            <text:p>126,54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31589225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7">
            <text:p>3068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1.62">
            <text:p>155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8.84">
            <text:p>48,84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105.19">
            <text:p>10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21570254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1">
            <text:p>306891</text:p>
          </table:table-cell>
          <table:table-cell table:style-name="ce0" table:number-columns-spanned="4" table:number-rows-spanned="1" office:value-type="string" calcext:value-type="string">
            <text:p>3.848 - HIDROSSOL IND. E COM. DE PLASTICOS LTDA.</text:p>
          </table:table-cell>
          <table:covered-table-cell table:number-columns-repeated="3"/>
          <table:table-cell table:style-name="ce0" office:value-type="string" calcext:value-type="string">
            <text:p>57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12312">
            <text:p>2,112</text:p>
          </table:table-cell>
          <table:table-cell table:style-name="ce12N2" office:value-type="float" office:value="764.31">
            <text:p>76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0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1323.32">
            <text:p>1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504514000155550010000575291905752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0">
            <text:p>306920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022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71.57">
            <text:p>3837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3615">
            <text:p>2,934</text:p>
          </table:table-cell>
          <table:table-cell table:style-name="ce12N2" office:value-type="float" office:value="3392.82">
            <text:p>339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37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298.71">
            <text:p>298,71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1524.62">
            <text:p>15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022167505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1">
            <text:p>3070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3.49">
            <text:p>249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18">
            <text:p>0,091</text:p>
          </table:table-cell>
          <table:table-cell table:style-name="ce12N2" office:value-type="float" office:value="25.5">
            <text:p>2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3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169.75">
            <text:p>1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0511570260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7">
            <text:p>3070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412">
            <text:p>0,092</text:p>
          </table:table-cell>
          <table:table-cell table:style-name="ce12N2" office:value-type="float" office:value="11.41">
            <text:p>1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9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433.98">
            <text:p>4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1139589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8">
            <text:p>3070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624">
            <text:p>0,006</text:p>
          </table:table-cell>
          <table:table-cell table:style-name="ce12N2" office:value-type="float" office:value="2.96">
            <text:p>2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2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21799286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9">
            <text:p>3070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123.52">
            <text:p>12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15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0.81">
            <text:p>11130,81</text:p>
          </table:table-cell>
          <table:table-cell table:style-name="ce12N2" office:value-type="float" office:value="779.16">
            <text:p>7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317588986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0">
            <text:p>3070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6.95">
            <text:p>1038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758">
            <text:p>3,076</text:p>
          </table:table-cell>
          <table:table-cell table:style-name="ce12N2" office:value-type="float" office:value="112.2">
            <text:p>1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33.95">
            <text:p>633,95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390.12">
            <text:p>3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41636010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1">
            <text:p>3070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5">
            <text:p>0,015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66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1355.67">
            <text:p>135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51165422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2">
            <text:p>3070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00.1">
            <text:p>1210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504">
            <text:p>0,120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0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38.5">
            <text:p>738,5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795.31">
            <text:p>79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610767865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3">
            <text:p>3070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92">
            <text:p>0,005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134.28">
            <text:p>13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71808138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4">
            <text:p>3070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59">
            <text:p>0,058</text:p>
          </table:table-cell>
          <table:table-cell table:style-name="ce12N2" office:value-type="float" office:value="33.61">
            <text:p>3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9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756.6">
            <text:p>7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81507891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5">
            <text:p>3070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5">
            <text:p>0,020</text:p>
          </table:table-cell>
          <table:table-cell table:style-name="ce12N2" office:value-type="float" office:value="69.48">
            <text:p>6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08">
            <text:p>6261,08</text:p>
          </table:table-cell>
          <table:table-cell table:style-name="ce12N2" office:value-type="float" office:value="438.28">
            <text:p>43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91582957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6">
            <text:p>3070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2.39">
            <text:p>153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4">
            <text:p>0,074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42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36.39">
            <text:p>936,39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1008.42">
            <text:p>10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51700246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7">
            <text:p>3070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5.93">
            <text:p>2910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34">
            <text:p>0,293</text:p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3.13">
            <text:p>923,13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1972.8">
            <text:p>197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61284029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8">
            <text:p>3070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7.54">
            <text:p>453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814">
            <text:p>0,04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276.94">
            <text:p>276,94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298.24">
            <text:p>29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71484272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1">
            <text:p>307111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149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52.72">
            <text:p>4635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52523">
            <text:p>7,153</text:p>
          </table:table-cell>
          <table:table-cell table:style-name="ce12N2" office:value-type="float" office:value="8613.53">
            <text:p>86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35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3.82">
            <text:p>753,82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1832.5">
            <text:p>183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149130689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8">
            <text:p>3071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6.76">
            <text:p>103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616">
            <text:p>0,054</text:p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7.22">
            <text:p>67,22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67.87">
            <text:p>6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315702955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9">
            <text:p>3071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45">
            <text:p>144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04">
            <text:p>0,041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88.28">
            <text:p>88,28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54.33">
            <text:p>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5158923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0">
            <text:p>30715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0.72">
            <text:p>37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">
            <text:p>0,137</text:p>
          </table:table-cell>
          <table:table-cell table:style-name="ce12N2" office:value-type="float" office:value="171.6">
            <text:p>1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249.57">
            <text:p>24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71939815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1">
            <text:p>3071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8.74">
            <text:p>626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299.236">
            <text:p>21299,236</text:p>
          </table:table-cell>
          <table:table-cell table:style-name="ce12N2" office:value-type="float" office:value="207.81">
            <text:p>207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97.32">
            <text:p>197,32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425">
            <text:p>4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81839182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4">
            <text:p>307154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634.51">
            <text:p>5563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99">
            <text:p>1,72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63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95.53">
            <text:p>3395,53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2089.56">
            <text:p>208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0391839776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5">
            <text:p>30715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9.28">
            <text:p>1230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161">
            <text:p>0,672</text:p>
          </table:table-cell>
          <table:table-cell table:style-name="ce12N2" office:value-type="float" office:value="143.71">
            <text:p>143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53.16">
            <text:p>653,16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815.92">
            <text:p>81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09157035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4">
            <text:p>3071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775">
            <text:p>1,648</text:p>
          </table:table-cell>
          <table:table-cell table:style-name="ce12N2" office:value-type="float" office:value="299.7">
            <text:p>29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81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1316.93">
            <text:p>131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41805086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5">
            <text:p>30718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591">
            <text:p>0,659</text:p>
          </table:table-cell>
          <table:table-cell table:style-name="ce12N2" office:value-type="float" office:value="119.88">
            <text:p>119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2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526.77">
            <text:p>52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51093286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6">
            <text:p>3071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2494">
            <text:p>11,625</text:p>
          </table:table-cell>
          <table:table-cell table:style-name="ce12N2" office:value-type="float" office:value="4137.72">
            <text:p>41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2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5341.03">
            <text:p>534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71888472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7">
            <text:p>3071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4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281.23">
            <text:p>2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4601465598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8">
            <text:p>30718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86.85">
            <text:p>2378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00">
            <text:p>3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78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48.74">
            <text:p>748,74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1612.67">
            <text:p>161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41584130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9">
            <text:p>3071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49.06">
            <text:p>2404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4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72.03">
            <text:p>772,03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1622.23">
            <text:p>162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6156849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4">
            <text:p>3072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52">
            <text:p>0,367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0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182.74">
            <text:p>18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817572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0">
            <text:p>307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107.95">
            <text:p>1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41530387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3">
            <text:p>307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192.72">
            <text:p>19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01044736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5">
            <text:p>307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63.62">
            <text:p>6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6142473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6">
            <text:p>307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8">
            <text:p>0,003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215.89">
            <text:p>21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3155922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7">
            <text:p>307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52">
            <text:p>0,001</text:p>
          </table:table-cell>
          <table:table-cell table:style-name="ce12N2" office:value-type="float" office:value="9.65">
            <text:p>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590.32">
            <text:p>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91857476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8">
            <text:p>307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21807035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9">
            <text:p>307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4.3">
            <text:p>31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656">
            <text:p>0,047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3.13">
            <text:p>193,13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118.85">
            <text:p>11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11277077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0">
            <text:p>307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11819923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2">
            <text:p>307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2.45">
            <text:p>424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056">
            <text:p>0,012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58.93">
            <text:p>258,93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278.85">
            <text:p>27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91687859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3">
            <text:p>307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3.67">
            <text:p>636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84">
            <text:p>0,018</text:p>
          </table:table-cell>
          <table:table-cell table:style-name="ce12N2" office:value-type="float" office:value="7.06">
            <text:p>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3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88.39">
            <text:p>388,39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418.27">
            <text:p>41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81994111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4">
            <text:p>307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4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117.9">
            <text:p>11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51611884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6">
            <text:p>307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26">
            <text:p>0,001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289.07">
            <text:p>2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71533603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7">
            <text:p>307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2">
            <text:p>0,001</text:p>
          </table:table-cell>
          <table:table-cell table:style-name="ce12N2" office:value-type="float" office:value="15.55">
            <text:p>1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797.45">
            <text:p>79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31322867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8">
            <text:p>307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5.34">
            <text:p>96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28">
            <text:p>0,005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5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8.92">
            <text:p>58,92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63.45">
            <text:p>6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710700137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9">
            <text:p>307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02">
            <text:p>0,060</text:p>
          </table:table-cell>
          <table:table-cell table:style-name="ce12N2" office:value-type="float" office:value="36.35">
            <text:p>3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2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1526.85">
            <text:p>15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01617954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0">
            <text:p>307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782.27">
            <text:p>4347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433693.99">
            <text:p>433693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79331">
            <text:p>17,679</text:p>
          </table:table-cell>
          <table:table-cell table:style-name="ce12N2" office:value-type="float" office:value="1691.18">
            <text:p>169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4.7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088.28">
            <text:p>1088,28</text:p>
          </table:table-cell>
          <table:table-cell table:style-name="ce12N2" office:value-type="float" office:value="430570.54">
            <text:p>430570,54</text:p>
          </table:table-cell>
          <table:table-cell table:style-name="ce12N2" office:value-type="float" office:value="25868.84">
            <text:p>258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91906483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1">
            <text:p>307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">
            <text:p>0,001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0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2065.61">
            <text:p>206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11926848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6">
            <text:p>30724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0.6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71.78">
            <text:p>10637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13816">
            <text:p>7,414</text:p>
          </table:table-cell>
          <table:table-cell table:style-name="ce12N2" office:value-type="float" office:value="3329.13">
            <text:p>3329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371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8.18">
            <text:p>128,18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6817.63">
            <text:p>681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06791202127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7">
            <text:p>3072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96.46">
            <text:p>1689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3408">
            <text:p>0,663</text:p>
          </table:table-cell>
          <table:table-cell table:style-name="ce12N2" office:value-type="float" office:value="243.9">
            <text:p>2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9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31.85">
            <text:p>531,85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1145.52">
            <text:p>114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01571134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8">
            <text:p>3072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3.3">
            <text:p>102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9232">
            <text:p>0,389</text:p>
          </table:table-cell>
          <table:table-cell table:style-name="ce12N2" office:value-type="float" office:value="143.1">
            <text:p>14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23.06">
            <text:p>323,06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695.82">
            <text:p>69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2157113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9">
            <text:p>3072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2.12">
            <text:p>542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632">
            <text:p>0,206</text:p>
          </table:table-cell>
          <table:table-cell table:style-name="ce12N2" office:value-type="float" office:value="75.6">
            <text:p>7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67">
            <text:p>170,67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367.6">
            <text:p>3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61571134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0">
            <text:p>3072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16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6.93">
            <text:p>315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9">
            <text:p>0,002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2.68">
            <text:p>192,68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207.5">
            <text:p>20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1671337729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4">
            <text:p>30727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5366">
            <text:p>4,054</text:p>
          </table:table-cell>
          <table:table-cell table:style-name="ce12N2" office:value-type="float" office:value="869">
            <text:p>8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9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2043.48">
            <text:p>20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91380246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9">
            <text:p>307279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03.95">
            <text:p>2410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">
            <text:p>0,520</text:p>
          </table:table-cell>
          <table:table-cell table:style-name="ce12N2" office:value-type="float" office:value="16.25">
            <text:p>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0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1.45">
            <text:p>1191,45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1603.88">
            <text:p>16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27611000128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5">
            <text:p>307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52">
            <text:p>0,074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3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1455">
            <text:p>14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8105097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4">
            <text:p>3073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75">
            <text:p>0,127</text:p>
          </table:table-cell>
          <table:table-cell table:style-name="ce12N2" office:value-type="float" office:value="135.4">
            <text:p>1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75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3343.17">
            <text:p>334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841818745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7">
            <text:p>307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544">
            <text:p>0,021</text:p>
          </table:table-cell>
          <table:table-cell table:style-name="ce12N2" office:value-type="float" office:value="4.28">
            <text:p>4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156.07">
            <text:p>1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41084287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9">
            <text:p>307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46">
            <text:p>0,125</text:p>
          </table:table-cell>
          <table:table-cell table:style-name="ce12N2" office:value-type="float" office:value="28.5">
            <text:p>2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1404.34">
            <text:p>140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301349019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5">
            <text:p>30733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4.35">
            <text:p>11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76">
            <text:p>0,020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4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80.29">
            <text:p>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01570337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6">
            <text:p>30733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3.86">
            <text:p>17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08">
            <text:p>0,094</text:p>
          </table:table-cell>
          <table:table-cell table:style-name="ce12N2" office:value-type="float" office:value="15.68">
            <text:p>1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2.26">
            <text:p>152,26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109.31">
            <text:p>10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51581548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0">
            <text:p>30734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4.94">
            <text:p>66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">
            <text:p>0,144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74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29.94">
            <text:p>329,94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444.15">
            <text:p>44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678110001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5">
            <text:p>30734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6.85">
            <text:p>168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502">
            <text:p>0,050</text:p>
          </table:table-cell>
          <table:table-cell table:style-name="ce12N2" office:value-type="float" office:value="107.16">
            <text:p>107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2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529.66">
            <text:p>529,66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1140.81">
            <text:p>114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11455403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6">
            <text:p>30734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.31">
            <text:p>91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62.06">
            <text:p>6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21111596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9">
            <text:p>3073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73">
            <text:p>0,025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460.37">
            <text:p>46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51909237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4">
            <text:p>3073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46">
            <text:p>0,049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5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920.74">
            <text:p>92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6159731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5">
            <text:p>3073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26">
            <text:p>0,036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292.18">
            <text:p>29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441969649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3">
            <text:p>3073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1.37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2">
            <text:p>4,42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1784.3">
            <text:p>178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13741092917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4">
            <text:p>307374</text:p>
          </table:table-cell>
          <table:table-cell table:style-name="ce0" table:number-columns-spanned="4" table:number-rows-spanned="1" office:value-type="string" calcext:value-type="string">
            <text:p>29.615 - TENASTEEL INDUSTRIA E COMERCIO LTDA</text:p>
          </table:table-cell>
          <table:covered-table-cell table:number-columns-repeated="3"/>
          <table:table-cell table:style-name="ce0" office:value-type="string" calcext:value-type="string">
            <text:p>9.05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57.55">
            <text:p>1955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8801.4">
            <text:p>1880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159">
            <text:p>0,292</text:p>
          </table:table-cell>
          <table:table-cell table:style-name="ce12N2" office:value-type="float" office:value="743.76">
            <text:p>74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5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.42">
            <text:p>47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756.15">
            <text:p>756,15</text:p>
          </table:table-cell>
          <table:table-cell table:style-name="ce12N2" office:value-type="float" office:value="18801.4">
            <text:p>18801,40</text:p>
          </table:table-cell>
          <table:table-cell table:style-name="ce12N2" office:value-type="float" office:value="1316.09">
            <text:p>131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14048772000108550040000090551139587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7">
            <text:p>307377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98">
            <text:p>0,890</text:p>
          </table:table-cell>
          <table:table-cell table:style-name="ce12N2" office:value-type="float" office:value="59.52">
            <text:p>5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47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22913200355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3">
            <text:p>3073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6">
            <text:p>0,019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49.29">
            <text:p>4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41945775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4">
            <text:p>3073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84">
            <text:p>0,001</text:p>
          </table:table-cell>
          <table:table-cell table:style-name="ce12N2" office:value-type="float" office:value="30.51">
            <text:p>3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0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1239.37">
            <text:p>123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51607923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5">
            <text:p>3073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32">
            <text:p>0,001</text:p>
          </table:table-cell>
          <table:table-cell table:style-name="ce12N2" office:value-type="float" office:value="23.73">
            <text:p>23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7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963.95">
            <text:p>9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61828839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7">
            <text:p>3073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8">
            <text:p>0,006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44.57">
            <text:p>44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81357376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8">
            <text:p>3073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0.29">
            <text:p>0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9182715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0">
            <text:p>30739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76.69">
            <text:p>643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61795.15">
            <text:p>61795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230413">
            <text:p>14,230</text:p>
          </table:table-cell>
          <table:table-cell table:style-name="ce12N2" office:value-type="float" office:value="491.4">
            <text:p>49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8">
            <text:p>54,8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581.54">
            <text:p>2581,54</text:p>
          </table:table-cell>
          <table:table-cell table:style-name="ce12N2" office:value-type="float" office:value="59923.43">
            <text:p>59923,43</text:p>
          </table:table-cell>
          <table:table-cell table:style-name="ce12N2" office:value-type="float" office:value="3000.7">
            <text:p>300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49148866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8">
            <text:p>3073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24.64">
            <text:p>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91462833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9">
            <text:p>3073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78">
            <text:p>0,058</text:p>
          </table:table-cell>
          <table:table-cell table:style-name="ce12N2" office:value-type="float" office:value="9.91">
            <text:p>9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147.87">
            <text:p>1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0118087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0">
            <text:p>3074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09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1554.68">
            <text:p>155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11902782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1">
            <text:p>307401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8.7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7.36">
            <text:p>352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5">
            <text:p>0,078</text:p>
          </table:table-cell>
          <table:table-cell table:style-name="ce12N2" office:value-type="float" office:value="21.88">
            <text:p>2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41.26">
            <text:p>141,26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233.98">
            <text:p>2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8747120516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3">
            <text:p>30740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1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9.43">
            <text:p>26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36">
            <text:p>0,041</text:p>
          </table:table-cell>
          <table:table-cell table:style-name="ce12N2" office:value-type="float" office:value="24.17">
            <text:p>2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173.77">
            <text:p>17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1011570291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0">
            <text:p>307430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68.7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76">
            <text:p>827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776">
            <text:p>827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.053904">
            <text:p>57,054</text:p>
          </table:table-cell>
          <table:table-cell table:style-name="ce12N2" office:value-type="float" office:value="4260">
            <text:p>42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82.42">
            <text:p>60782,42</text:p>
          </table:table-cell>
          <table:table-cell table:style-name="ce12N2" office:value-type="float" office:value="4254.77">
            <text:p>425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6840537000121550010003687571045571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4">
            <text:p>30743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4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4">
            <text:p>843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05.72">
            <text:p>780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9048">
            <text:p>0,489</text:p>
          </table:table-cell>
          <table:table-cell table:style-name="ce12N2" office:value-type="float" office:value="69.4">
            <text:p>6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27.68">
            <text:p>627,68</text:p>
          </table:table-cell>
          <table:table-cell table:style-name="ce12N2" office:value-type="float" office:value="7805.72">
            <text:p>7805,72</text:p>
          </table:table-cell>
          <table:table-cell table:style-name="ce12N2" office:value-type="float" office:value="312.23">
            <text:p>31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410080034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5">
            <text:p>307435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54.54">
            <text:p>1585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86.56">
            <text:p>1378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6">
            <text:p>0,015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5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067.98">
            <text:p>2067,98</text:p>
          </table:table-cell>
          <table:table-cell table:style-name="ce12N2" office:value-type="float" office:value="13786.56">
            <text:p>13786,56</text:p>
          </table:table-cell>
          <table:table-cell table:style-name="ce12N2" office:value-type="float" office:value="965.06">
            <text:p>96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81000798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6">
            <text:p>30743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31996">
            <text:p>7,932</text:p>
          </table:table-cell>
          <table:table-cell table:style-name="ce12N2" office:value-type="float" office:value="1295.38">
            <text:p>129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8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3251.68">
            <text:p>325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5991998297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7">
            <text:p>307437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1156">
            <text:p>0,712</text:p>
          </table:table-cell>
          <table:table-cell table:style-name="ce12N2" office:value-type="float" office:value="41.14">
            <text:p>4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1224.88">
            <text:p>122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710078338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8">
            <text:p>3074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7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5.5">
            <text:p>557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4">
            <text:p>1,44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5.5">
            <text:p>175,5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378">
            <text:p>37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74011259290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0">
            <text:p>3074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5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34">
            <text:p>0,053</text:p>
          </table:table-cell>
          <table:table-cell table:style-name="ce12N2" office:value-type="float" office:value="26.86">
            <text:p>26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9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594.73">
            <text:p>59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5711504332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5">
            <text:p>307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28">
            <text:p>0,002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21">
            <text:p>234,21</text:p>
          </table:table-cell>
          <table:table-cell table:style-name="ce12N2" office:value-type="float" office:value="16.39">
            <text:p>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51599363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6">
            <text:p>307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24">
            <text:p>0,013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7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172.74">
            <text:p>1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61741635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7">
            <text:p>307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36">
            <text:p>0,198</text:p>
          </table:table-cell>
          <table:table-cell table:style-name="ce12N2" office:value-type="float" office:value="93.9">
            <text:p>9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01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2591.13">
            <text:p>259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71798311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8">
            <text:p>3074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75.05">
            <text:p>7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811667505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9">
            <text:p>307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31.73">
            <text:p>4508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448672.28">
            <text:p>44867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11394">
            <text:p>17,811</text:p>
          </table:table-cell>
          <table:table-cell table:style-name="ce12N2" office:value-type="float" office:value="1457.6">
            <text:p>145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.8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159.45">
            <text:p>2159,45</text:p>
          </table:table-cell>
          <table:table-cell table:style-name="ce12N2" office:value-type="float" office:value="442130.72">
            <text:p>442130,72</text:p>
          </table:table-cell>
          <table:table-cell table:style-name="ce12N2" office:value-type="float" office:value="27913.85">
            <text:p>27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91479097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0">
            <text:p>30745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4.37">
            <text:p>11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926">
            <text:p>0,086</text:p>
          </table:table-cell>
          <table:table-cell table:style-name="ce12N2" office:value-type="float" office:value="13.08">
            <text:p>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75.87">
            <text:p>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21219493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1">
            <text:p>307451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6.84">
            <text:p>30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912">
            <text:p>0,277</text:p>
          </table:table-cell>
          <table:table-cell table:style-name="ce12N2" office:value-type="float" office:value="34.44">
            <text:p>3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6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85.34">
            <text:p>185,34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199.6">
            <text:p>1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012995634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2">
            <text:p>3074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18">
            <text:p>12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2">
            <text:p>0,067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.75">
            <text:p>108,75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78.08">
            <text:p>7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91581555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8">
            <text:p>307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85.24">
            <text:p>1988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01827">
            <text:p>5,602</text:p>
          </table:table-cell>
          <table:table-cell table:style-name="ce12N2" office:value-type="float" office:value="34.86">
            <text:p>34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8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213.65">
            <text:p>1213,65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746.86">
            <text:p>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0119114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9">
            <text:p>30746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398">
            <text:p>0,114</text:p>
          </table:table-cell>
          <table:table-cell table:style-name="ce12N2" office:value-type="float" office:value="32.04">
            <text:p>3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2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141.67">
            <text:p>14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2087114013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3">
            <text:p>30747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062">
            <text:p>0,461</text:p>
          </table:table-cell>
          <table:table-cell table:style-name="ce12N2" office:value-type="float" office:value="116.46">
            <text:p>11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466.33">
            <text:p>46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510007744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4">
            <text:p>30747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10.54">
            <text:p>541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654.08">
            <text:p>5265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3968">
            <text:p>0,974</text:p>
          </table:table-cell>
          <table:table-cell table:style-name="ce12N2" office:value-type="float" office:value="2222.66">
            <text:p>222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11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456.46">
            <text:p>1456,46</text:p>
          </table:table-cell>
          <table:table-cell table:style-name="ce12N2" office:value-type="float" office:value="52654.08">
            <text:p>52654,08</text:p>
          </table:table-cell>
          <table:table-cell table:style-name="ce12N2" office:value-type="float" office:value="3685.78">
            <text:p>368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610041572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2">
            <text:p>3074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3">
            <text:p>0,006</text:p>
          </table:table-cell>
          <table:table-cell table:style-name="ce12N2" office:value-type="float" office:value="4.17">
            <text:p>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8.3">
            <text:p>878,30</text:p>
          </table:table-cell>
          <table:table-cell table:style-name="ce12N2" office:value-type="float" office:value="61.48">
            <text:p>6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31685412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3">
            <text:p>3074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.32">
            <text:p>351,32</text:p>
          </table:table-cell>
          <table:table-cell table:style-name="ce12N2" office:value-type="float" office:value="24.59">
            <text:p>2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21970174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4">
            <text:p>307494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7.78">
            <text:p>1960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5932">
            <text:p>0,386</text:p>
          </table:table-cell>
          <table:table-cell table:style-name="ce12N2" office:value-type="float" office:value="107.63">
            <text:p>1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0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914.63">
            <text:p>914,63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747.73">
            <text:p>7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31326491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5">
            <text:p>30749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735.71">
            <text:p>11173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32063">
            <text:p>2,832</text:p>
          </table:table-cell>
          <table:table-cell table:style-name="ce12N2" office:value-type="float" office:value="608.49">
            <text:p>608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73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">
            <text:p>3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6875.59">
            <text:p>6875,59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4194.4">
            <text:p>4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61601434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6">
            <text:p>30749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.57">
            <text:p>216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15">
            <text:p>0,040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6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110.12">
            <text:p>110,12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41489216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19">
            <text:p>30751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8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877.44">
            <text:p>25887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">
            <text:p>144,00</text:p>
          </table:table-cell>
          <table:table-cell table:style-name="ce12N2" office:value-type="float" office:value="258783.1">
            <text:p>25878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5.698145">
            <text:p>95,698</text:p>
          </table:table-cell>
          <table:table-cell table:style-name="ce12N2" office:value-type="float" office:value="3814.33">
            <text:p>3814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8.877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94.34">
            <text:p>94,34</text:p>
          </table:table-cell>
          <table:table-cell table:style-name="ce12N2" office:value-type="float" office:value="258591">
            <text:p>258591,00</text:p>
          </table:table-cell>
          <table:table-cell table:style-name="ce12N2" office:value-type="float" office:value="17677.95">
            <text:p>1767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81471185481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20">
            <text:p>30752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350.65">
            <text:p>20835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">
            <text:p>146,00</text:p>
          </table:table-cell>
          <table:table-cell table:style-name="ce12N2" office:value-type="float" office:value="205582.83">
            <text:p>205582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2.033295">
            <text:p>172,033</text:p>
          </table:table-cell>
          <table:table-cell table:style-name="ce12N2" office:value-type="float" office:value="4387.54">
            <text:p>438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8.350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2767.82">
            <text:p>2767,82</text:p>
          </table:table-cell>
          <table:table-cell table:style-name="ce12N2" office:value-type="float" office:value="205099.2">
            <text:p>205099,20</text:p>
          </table:table-cell>
          <table:table-cell table:style-name="ce12N2" office:value-type="float" office:value="13431.74">
            <text:p>1343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84231828009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21">
            <text:p>30752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8.5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368.9">
            <text:p>31336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">
            <text:p>79,00</text:p>
          </table:table-cell>
          <table:table-cell table:style-name="ce12N2" office:value-type="float" office:value="310972.34">
            <text:p>31097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0.048432">
            <text:p>380,048</text:p>
          </table:table-cell>
          <table:table-cell table:style-name="ce12N2" office:value-type="float" office:value="3627.3">
            <text:p>362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3.36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2396.56">
            <text:p>2396,56</text:p>
          </table:table-cell>
          <table:table-cell table:style-name="ce12N2" office:value-type="float" office:value="309813">
            <text:p>309813,00</text:p>
          </table:table-cell>
          <table:table-cell table:style-name="ce12N2" office:value-type="float" office:value="20787.77">
            <text:p>2078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85781769008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44">
            <text:p>307544</text:p>
          </table:table-cell>
          <table:table-cell table:style-name="ce0" table:number-columns-spanned="4" table:number-rows-spanned="1" office:value-type="string" calcext:value-type="string">
            <text:p>27.064 - LINNI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35">
            <text:p>177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775.35">
            <text:p>1775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0.200848">
            <text:p>40,201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35">
            <text:p>1775,35</text:p>
          </table:table-cell>
          <table:table-cell table:style-name="ce12N2" office:value-type="float" office:value="355.05">
            <text:p>35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399825550001115500100000368913169621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66">
            <text:p>30756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9.0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207.44">
            <text:p>10620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06190.4">
            <text:p>10619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4.874736">
            <text:p>34,875</text:p>
          </table:table-cell>
          <table:table-cell table:style-name="ce12N2" office:value-type="float" office:value="5377.33">
            <text:p>537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207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17.04">
            <text:p>17,04</text:p>
          </table:table-cell>
          <table:table-cell table:style-name="ce12N2" office:value-type="float" office:value="106190.4">
            <text:p>106190,40</text:p>
          </table:table-cell>
          <table:table-cell table:style-name="ce12N2" office:value-type="float" office:value="7433.33">
            <text:p>743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90141469448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67">
            <text:p>30756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9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211.34">
            <text:p>18421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183696.06">
            <text:p>183696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1.064597">
            <text:p>261,065</text:p>
          </table:table-cell>
          <table:table-cell table:style-name="ce12N2" office:value-type="float" office:value="5998.95">
            <text:p>599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4.21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515.28">
            <text:p>515,28</text:p>
          </table:table-cell>
          <table:table-cell table:style-name="ce12N2" office:value-type="float" office:value="178526.59">
            <text:p>178526,59</text:p>
          </table:table-cell>
          <table:table-cell table:style-name="ce12N2" office:value-type="float" office:value="12491.08">
            <text:p>1249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91511757478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0">
            <text:p>3075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0.48">
            <text:p>111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33">
            <text:p>0,295</text:p>
          </table:table-cell>
          <table:table-cell table:style-name="ce12N2" office:value-type="float" office:value="3.82">
            <text:p>3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7.78">
            <text:p>67,78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41.71">
            <text:p>4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11715382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1">
            <text:p>3075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2.37">
            <text:p>809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5">
            <text:p>0,015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23.37">
            <text:p>623,37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298.76">
            <text:p>2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81572145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2">
            <text:p>30758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46.61">
            <text:p>66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">
            <text:p>0,012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4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590.47">
            <text:p>590,47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242.25">
            <text:p>2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7157214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3">
            <text:p>3075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8">
            <text:p>0,00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65.07">
            <text:p>6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41975247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33">
            <text:p>13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454.57">
            <text:p>89454,57</text:p>
          </table:table-cell>
          <table:table-cell table:style-name="ce26N2" office:value-type="float" office:value="4953102.09">
            <text:p>4953102,09</text:p>
          </table:table-cell>
          <table:table-cell table:style-name="ce26N2" office:value-type="float" office:value="313471.66">
            <text:p>313471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89914.29">
            <text:p>5089914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86644.268985">
            <text:p>86644,269</text:p>
          </table:table-cell>
          <table:table-cell table:style-name="ce26N2" office:value-type="float" office:value="5000459.72">
            <text:p>5000459,72</text:p>
          </table:table-cell>
          <table:table-cell table:style-name="ce26N2" office:value-type="float" office:value="5089914.29">
            <text:p>5089914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46604.65">
            <text:p>146604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.41">
            <text:p>42,4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96" meta:object-count="0"/>
    <meta:generator>LibreOffice/4.3.0.4$Windows_x86 LibreOffice_project/62ad5818884a2fc2e5780dd45466868d41009ec0</meta:generator>
  </office:meta>
</office:document-meta>
</file>