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6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9">
            <text:p>30810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80.32">
            <text:p>4348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1614">
            <text:p>7,222</text:p>
          </table:table-cell>
          <table:table-cell table:style-name="ce12N2" office:value-type="float" office:value="22559.95">
            <text:p>2255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48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459.31">
            <text:p>36459,31</text:p>
          </table:table-cell>
          <table:table-cell table:style-name="ce12N2" office:value-type="float" office:value="36.46">
            <text:p>3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13">
            <text:p>328,1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3023.97">
            <text:p>30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2017361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1">
            <text:p>3081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12.09">
            <text:p>184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646">
            <text:p>2,889</text:p>
          </table:table-cell>
          <table:table-cell table:style-name="ce12N2" office:value-type="float" office:value="9023.94">
            <text:p>902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38.99">
            <text:p>15438,99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8.91">
            <text:p>118,91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1280.52">
            <text:p>1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1183825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8">
            <text:p>30819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44.72">
            <text:p>212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57069">
            <text:p>5,057</text:p>
          </table:table-cell>
          <table:table-cell table:style-name="ce12N2" office:value-type="float" office:value="22015.99">
            <text:p>2201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4.22">
            <text:p>17814,22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3">
            <text:p>160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7.2">
            <text:p>137,2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1477.53">
            <text:p>147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61549419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6">
            <text:p>30820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18.58">
            <text:p>1051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1109">
            <text:p>1,611</text:p>
          </table:table-cell>
          <table:table-cell table:style-name="ce12N2" office:value-type="float" office:value="7024.08">
            <text:p>702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1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20.08">
            <text:p>8820,08</text:p>
          </table:table-cell>
          <table:table-cell table:style-name="ce12N2" office:value-type="float" office:value="8.82">
            <text:p>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38">
            <text:p>79,3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7.93">
            <text:p>67,93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731.55">
            <text:p>73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01235240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9">
            <text:p>3082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9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78">
            <text:p>20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70087">
            <text:p>3,370</text:p>
          </table:table-cell>
          <table:table-cell table:style-name="ce12N2" office:value-type="float" office:value="10528">
            <text:p>105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79.94">
            <text:p>16979,94</text:p>
          </table:table-cell>
          <table:table-cell table:style-name="ce12N2" office:value-type="float" office:value="16.98">
            <text:p>1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82">
            <text:p>152,82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30.77">
            <text:p>130,77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1408.33">
            <text:p>14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952137648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4">
            <text:p>30826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5.02">
            <text:p>132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1958">
            <text:p>0,752</text:p>
          </table:table-cell>
          <table:table-cell table:style-name="ce12N2" office:value-type="float" office:value="5953.15">
            <text:p>595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9.82">
            <text:p>11139,82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6">
            <text:p>100,2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5.79">
            <text:p>85,79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923.95">
            <text:p>92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41188285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0">
            <text:p>30834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6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1.3">
            <text:p>2415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60216">
            <text:p>4,860</text:p>
          </table:table-cell>
          <table:table-cell table:style-name="ce12N2" office:value-type="float" office:value="18788.4">
            <text:p>1878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1.46">
            <text:p>20251,46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7">
            <text:p>182,27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5.97">
            <text:p>155,97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1679.67">
            <text:p>167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6521385536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1">
            <text:p>30834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8.39">
            <text:p>511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1826">
            <text:p>0,592</text:p>
          </table:table-cell>
          <table:table-cell table:style-name="ce12N2" office:value-type="float" office:value="4084.48">
            <text:p>408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91.91">
            <text:p>4291,91</text:p>
          </table:table-cell>
          <table:table-cell table:style-name="ce12N2" office:value-type="float" office:value="4.29">
            <text:p>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63">
            <text:p>38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3.05">
            <text:p>33,05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355.97">
            <text:p>35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071683356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8">
            <text:p>30843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7166289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0">
            <text:p>30844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39.07">
            <text:p>1143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2008">
            <text:p>3,382</text:p>
          </table:table-cell>
          <table:table-cell table:style-name="ce12N2" office:value-type="float" office:value="11520">
            <text:p>115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3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91.95">
            <text:p>9591,95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33">
            <text:p>86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3.87">
            <text:p>73,87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795.56">
            <text:p>79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81828823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7">
            <text:p>30844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21771390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9">
            <text:p>30844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9.54">
            <text:p>57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1004">
            <text:p>1,691</text:p>
          </table:table-cell>
          <table:table-cell table:style-name="ce12N2" office:value-type="float" office:value="5760">
            <text:p>5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1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95.97">
            <text:p>4795,97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16">
            <text:p>43,16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6.94">
            <text:p>36,94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397.78">
            <text:p>39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31522978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4">
            <text:p>308454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717">
            <text:p>0,357</text:p>
          </table:table-cell>
          <table:table-cell table:style-name="ce12N2" office:value-type="float" office:value="374.4">
            <text:p>3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2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70.22">
            <text:p>12670,22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04">
            <text:p>114,04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1802.54">
            <text:p>180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3919735015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3">
            <text:p>30846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26.25">
            <text:p>3492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00045">
            <text:p>2,800</text:p>
          </table:table-cell>
          <table:table-cell table:style-name="ce12N2" office:value-type="float" office:value="300.85">
            <text:p>30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92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25.59">
            <text:p>30125,59</text:p>
          </table:table-cell>
          <table:table-cell table:style-name="ce12N2" office:value-type="float" office:value="30.14">
            <text:p>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14">
            <text:p>271,14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8.92">
            <text:p>28,92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1701.07">
            <text:p>170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3311732807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6">
            <text:p>308496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76.06">
            <text:p>1107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1048">
            <text:p>2,410</text:p>
          </table:table-cell>
          <table:table-cell table:style-name="ce12N2" office:value-type="float" office:value="860.9">
            <text:p>86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76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76.5">
            <text:p>9976,50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.78">
            <text:p>89,7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48.64">
            <text:p>348,64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750.92">
            <text:p>7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2164439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7">
            <text:p>308497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1.08">
            <text:p>436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28.15">
            <text:p>3928,15</text:p>
          </table:table-cell>
          <table:table-cell table:style-name="ce12N2" office:value-type="float" office:value="3.93">
            <text:p>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34">
            <text:p>35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7.26">
            <text:p>137,26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295.67">
            <text:p>29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091748272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8">
            <text:p>308498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35.78">
            <text:p>11063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9.13361">
            <text:p>29,134</text:p>
          </table:table-cell>
          <table:table-cell table:style-name="ce12N2" office:value-type="float" office:value="8729.32">
            <text:p>872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0.63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048.12">
            <text:p>90048,12</text:p>
          </table:table-cell>
          <table:table-cell table:style-name="ce12N2" office:value-type="float" office:value="90.05">
            <text:p>9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0.43">
            <text:p>810,4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984.76">
            <text:p>3984,76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7424.44">
            <text:p>742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31084140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9">
            <text:p>308499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7.03">
            <text:p>227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88">
            <text:p>0,795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0.98">
            <text:p>2050,98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46">
            <text:p>18,4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1.67">
            <text:p>71,67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154.38">
            <text:p>15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11531791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0">
            <text:p>308500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5.21">
            <text:p>8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16">
            <text:p>0,056</text:p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.3">
            <text:p>752,30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7">
            <text:p>6,7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56.62">
            <text:p>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0114454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5">
            <text:p>3085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02.53">
            <text:p>3510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93168">
            <text:p>3,693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0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47.35">
            <text:p>29347,35</text:p>
          </table:table-cell>
          <table:table-cell table:style-name="ce12N2" office:value-type="float" office:value="29.34">
            <text:p>2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12">
            <text:p>264,1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32.23">
            <text:p>632,23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2131.63">
            <text:p>213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614736633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6">
            <text:p>3085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44">
            <text:p>5,644</text:p>
          </table:table-cell>
          <table:table-cell table:style-name="ce12N2" office:value-type="float" office:value="349.4">
            <text:p>34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94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966.16">
            <text:p>53966,16</text:p>
          </table:table-cell>
          <table:table-cell table:style-name="ce12N2" office:value-type="float" office:value="53.97">
            <text:p>5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.7">
            <text:p>485,7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4476">
            <text:p>44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8321063213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8">
            <text:p>308558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9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98.32">
            <text:p>9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401619827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1">
            <text:p>30856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91.43">
            <text:p>2629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8025">
            <text:p>1,258</text:p>
          </table:table-cell>
          <table:table-cell table:style-name="ce12N2" office:value-type="float" office:value="933.36">
            <text:p>93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291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01.23">
            <text:p>21001,23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01">
            <text:p>189,01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2185.36">
            <text:p>2185,36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964.24">
            <text:p>96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2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41589400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2">
            <text:p>30856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2.75">
            <text:p>484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6">
            <text:p>0,005</text:p>
          </table:table-cell>
          <table:table-cell table:style-name="ce12N2" office:value-type="float" office:value="390">
            <text:p>3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4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36.03">
            <text:p>4236,03</text:p>
          </table:table-cell>
          <table:table-cell table:style-name="ce12N2" office:value-type="float" office:value="4.24">
            <text:p>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12">
            <text:p>38,1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30.22">
            <text:p>430,22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176.5">
            <text:p>1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51589447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0">
            <text:p>3085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4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104">
            <text:p>0,371</text:p>
          </table:table-cell>
          <table:table-cell table:style-name="ce12N2" office:value-type="float" office:value="44.76">
            <text:p>44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8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7.76">
            <text:p>4397,76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8">
            <text:p>39,5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183.24">
            <text:p>18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43481610762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2">
            <text:p>308582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4.1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88.48">
            <text:p>5318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223574">
            <text:p>9,224</text:p>
          </table:table-cell>
          <table:table-cell table:style-name="ce12N2" office:value-type="float" office:value="1769.07">
            <text:p>1769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18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14.18">
            <text:p>43414,18</text:p>
          </table:table-cell>
          <table:table-cell table:style-name="ce12N2" office:value-type="float" office:value="43.42">
            <text:p>4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74">
            <text:p>390,7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860.04">
            <text:p>1860,04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3489.09">
            <text:p>34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41921627051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2">
            <text:p>308622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22.96">
            <text:p>262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184.24">
            <text:p>1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61852688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7">
            <text:p>3086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2.32">
            <text:p>13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05">
            <text:p>0,004</text:p>
          </table:table-cell>
          <table:table-cell table:style-name="ce12N2" office:value-type="float" office:value="450">
            <text:p>4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4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73.32">
            <text:p>10573,32</text:p>
          </table:table-cell>
          <table:table-cell table:style-name="ce12N2" office:value-type="float" office:value="10.57">
            <text:p>1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16">
            <text:p>95,16</text:p>
          </table:table-cell>
          <table:table-cell table:style-name="ce12N2" office:value-type="float" office:value="42.5">
            <text:p>4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14.32">
            <text:p>814,32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876.96">
            <text:p>87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2817804288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8">
            <text:p>30866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2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18.31">
            <text:p>2001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2554">
            <text:p>1,426</text:p>
          </table:table-cell>
          <table:table-cell table:style-name="ce12N2" office:value-type="float" office:value="253.86">
            <text:p>253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18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99.27">
            <text:p>15399,27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6">
            <text:p>138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772.18">
            <text:p>1772,18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1277.23">
            <text:p>127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2921570463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1">
            <text:p>3086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3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2.1">
            <text:p>260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252">
            <text:p>0,032</text:p>
          </table:table-cell>
          <table:table-cell table:style-name="ce12N2" office:value-type="float" office:value="42.62">
            <text:p>4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48.36">
            <text:p>2148,36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33">
            <text:p>1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2.3">
            <text:p>112,3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122.45">
            <text:p>12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3001586193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6">
            <text:p>30872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440.76">
            <text:p>764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1452">
            <text:p>9,145</text:p>
          </table:table-cell>
          <table:table-cell table:style-name="ce12N2" office:value-type="float" office:value="697.5">
            <text:p>69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44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483.38">
            <text:p>62483,38</text:p>
          </table:table-cell>
          <table:table-cell table:style-name="ce12N2" office:value-type="float" office:value="62.48">
            <text:p>6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2.35">
            <text:p>562,35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406.13">
            <text:p>2406,13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5182.42">
            <text:p>518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51256120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7">
            <text:p>30872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0.5">
            <text:p>23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46">
            <text:p>0,265</text:p>
          </table:table-cell>
          <table:table-cell table:style-name="ce12N2" office:value-type="float" office:value="54.6">
            <text:p>5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4.01">
            <text:p>1954,01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9">
            <text:p>17,59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75.25">
            <text:p>75,25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162.07">
            <text:p>16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41098736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4">
            <text:p>30873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6.5">
            <text:p>433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2">
            <text:p>0,000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4.69">
            <text:p>3544,69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36.5">
            <text:p>136,5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631262305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4">
            <text:p>3087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7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1.2">
            <text:p>267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7">
            <text:p>0,026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0.44">
            <text:p>2110,44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108.33">
            <text:p>1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7231581187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7">
            <text:p>30878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7.86">
            <text:p>568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896">
            <text:p>0,889</text:p>
          </table:table-cell>
          <table:table-cell table:style-name="ce12N2" office:value-type="float" office:value="245.6">
            <text:p>2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8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34.6">
            <text:p>4734,60</text:p>
          </table:table-cell>
          <table:table-cell table:style-name="ce12N2" office:value-type="float" office:value="4.73">
            <text:p>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61">
            <text:p>42,61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330.11">
            <text:p>33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2651607305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3">
            <text:p>308793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6818408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4">
            <text:p>30879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1.0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33772">
            <text:p>15,338</text:p>
          </table:table-cell>
          <table:table-cell table:style-name="ce12N2" office:value-type="float" office:value="4014.56">
            <text:p>40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28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002.86">
            <text:p>153002,86</text:p>
          </table:table-cell>
          <table:table-cell table:style-name="ce12N2" office:value-type="float" office:value="153.05">
            <text:p>15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.02">
            <text:p>137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12690.21">
            <text:p>1269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101419589447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7">
            <text:p>3087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4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7">
            <text:p>3525,57</text:p>
          </table:table-cell>
          <table:table-cell table:style-name="ce12N2" office:value-type="float" office:value="228.84">
            <text:p>228,8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1.2">
            <text:p>344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32">
            <text:p>0,362</text:p>
          </table:table-cell>
          <table:table-cell table:style-name="ce12N2" office:value-type="float" office:value="89.6">
            <text:p>8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8.62">
            <text:p>2798,62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19">
            <text:p>25,19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313.21">
            <text:p>313,21</text:p>
          </table:table-cell>
          <table:table-cell table:style-name="ce12N2" office:value-type="float" office:value="3212.36">
            <text:p>3212,36</text:p>
          </table:table-cell>
          <table:table-cell table:style-name="ce12N2" office:value-type="float" office:value="128.49">
            <text:p>12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4572158382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8">
            <text:p>30879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625">
            <text:p>12,863</text:p>
          </table:table-cell>
          <table:table-cell table:style-name="ce12N2" office:value-type="float" office:value="8015">
            <text:p>80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71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306.2">
            <text:p>37306,20</text:p>
          </table:table-cell>
          <table:table-cell table:style-name="ce12N2" office:value-type="float" office:value="37.31">
            <text:p>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76">
            <text:p>335,76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5605.74">
            <text:p>560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1141767568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9">
            <text:p>308859</text:p>
          </table:table-cell>
          <table:table-cell table:style-name="ce0" table:number-columns-spanned="4" table:number-rows-spanned="1" office:value-type="string" calcext:value-type="string">
            <text:p>36.654 - AZIMUT ALUMINIOS LTDA</text:p>
          </table:table-cell>
          <table:covered-table-cell table:number-columns-repeated="3"/>
          <table:table-cell table:style-name="ce0" office:value-type="string" calcext:value-type="string">
            <text:p>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3556">
            <text:p>16,836</text:p>
          </table:table-cell>
          <table:table-cell table:style-name="ce12N2" office:value-type="float" office:value="894.4">
            <text:p>89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83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47.59">
            <text:p>28447,59</text:p>
          </table:table-cell>
          <table:table-cell table:style-name="ce12N2" office:value-type="float" office:value="28.44">
            <text:p>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03">
            <text:p>256,0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2228.7">
            <text:p>222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4921000158550010000001181817952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0">
            <text:p>308860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5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51.5">
            <text:p>1635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8128">
            <text:p>0,638</text:p>
          </table:table-cell>
          <table:table-cell table:style-name="ce12N2" office:value-type="float" office:value="697.13">
            <text:p>697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5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65.86">
            <text:p>13365,86</text:p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29">
            <text:p>120,29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514.7">
            <text:p>514,7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1108.58">
            <text:p>11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5431802276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4">
            <text:p>30886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7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0.7">
            <text:p>14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0.02">
            <text:p>0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1.85">
            <text:p>1171,8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2.2">
            <text:p>72,2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97.2">
            <text:p>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74291100002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5">
            <text:p>30886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36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5252">
            <text:p>12,525</text:p>
          </table:table-cell>
          <table:table-cell table:style-name="ce12N2" office:value-type="float" office:value="2875.3">
            <text:p>287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59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32.5">
            <text:p>58732,50</text:p>
          </table:table-cell>
          <table:table-cell table:style-name="ce12N2" office:value-type="float" office:value="58.74">
            <text:p>5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59">
            <text:p>528,5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4871.32">
            <text:p>48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3601662398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1">
            <text:p>308871</text:p>
          </table:table-cell>
          <table:table-cell table:style-name="ce0" table:number-columns-spanned="4" table:number-rows-spanned="1" office:value-type="string" calcext:value-type="string">
            <text:p>37.660 - BF LIMP COMERCIO DE PRODUTOS DE HIGIENE E LIMPEZA LTDA</text:p>
          </table:table-cell>
          <table:covered-table-cell table:number-columns-repeated="3"/>
          <table:table-cell table:style-name="ce0" office:value-type="string" calcext:value-type="string">
            <text:p>2.2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535">
            <text:p>0,074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2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21.31">
            <text:p>5421,31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79">
            <text:p>48,7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421.49">
            <text:p>42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7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24101070001655500100000228817357780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2">
            <text:p>308872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9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65">
            <text:p>482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9">
            <text:p>0,210</text:p>
          </table:table-cell>
          <table:table-cell table:style-name="ce12N2" office:value-type="float" office:value="110">
            <text:p>1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5.59">
            <text:p>4115,59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4">
            <text:p>37,04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9.65">
            <text:p>229,65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321.51">
            <text:p>3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45123710000147550010000139181192001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5">
            <text:p>30887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2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9.32">
            <text:p>349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358">
            <text:p>0,230</text:p>
          </table:table-cell>
          <table:table-cell table:style-name="ce12N2" office:value-type="float" office:value="44.71">
            <text:p>44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9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5.1">
            <text:p>2845,10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">
            <text:p>25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28.25">
            <text:p>128,25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235.98">
            <text:p>23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20915704022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4">
            <text:p>30888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5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528">
            <text:p>0,457</text:p>
          </table:table-cell>
          <table:table-cell table:style-name="ce12N2" office:value-type="float" office:value="30.61">
            <text:p>3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8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67.2">
            <text:p>6067,20</text:p>
          </table:table-cell>
          <table:table-cell table:style-name="ce12N2" office:value-type="float" office:value="6.07">
            <text:p>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61">
            <text:p>54,6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503.22">
            <text:p>50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52321604502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5">
            <text:p>308885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5">
            <text:p>0,172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8.43">
            <text:p>998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82.81">
            <text:p>8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725157429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9">
            <text:p>308889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9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378">
            <text:p>3,384</text:p>
          </table:table-cell>
          <table:table-cell table:style-name="ce12N2" office:value-type="float" office:value="2932">
            <text:p>29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1.96">
            <text:p>17391,96</text:p>
          </table:table-cell>
          <table:table-cell table:style-name="ce12N2" office:value-type="float" office:value="17.39">
            <text:p>1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53">
            <text:p>156,5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1442.5">
            <text:p>14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199231897214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1">
            <text:p>3088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5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3.42">
            <text:p>468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28">
            <text:p>0,152</text:p>
          </table:table-cell>
          <table:table-cell table:style-name="ce12N2" office:value-type="float" office:value="19.44">
            <text:p>19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8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28.28">
            <text:p>3828,28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45">
            <text:p>34,45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47.42">
            <text:p>147,42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317.52">
            <text:p>3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5591099196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5">
            <text:p>3089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0.16">
            <text:p>1033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05">
            <text:p>1000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43">
            <text:p>0,324</text:p>
          </table:table-cell>
          <table:table-cell table:style-name="ce12N2" office:value-type="float" office:value="41.4">
            <text:p>4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3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43.97">
            <text:p>8443,97</text:p>
          </table:table-cell>
          <table:table-cell table:style-name="ce12N2" office:value-type="float" office:value="8.44">
            <text:p>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25.16">
            <text:p>325,16</text:p>
          </table:table-cell>
          <table:table-cell table:style-name="ce12N2" office:value-type="float" office:value="10005">
            <text:p>10005,00</text:p>
          </table:table-cell>
          <table:table-cell table:style-name="ce12N2" office:value-type="float" office:value="700.35">
            <text:p>70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4210398455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6">
            <text:p>3089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5.15">
            <text:p>461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257.6">
            <text:p>425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6">
            <text:p>0,09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15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3.32">
            <text:p>3593,32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3">
            <text:p>32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57.55">
            <text:p>357,55</text:p>
          </table:table-cell>
          <table:table-cell table:style-name="ce12N2" office:value-type="float" office:value="4257.6">
            <text:p>4257,60</text:p>
          </table:table-cell>
          <table:table-cell table:style-name="ce12N2" office:value-type="float" office:value="298.03">
            <text:p>29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411195200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7">
            <text:p>30895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5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9.62">
            <text:p>363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403.4">
            <text:p>340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894">
            <text:p>0,059</text:p>
          </table:table-cell>
          <table:table-cell table:style-name="ce12N2" office:value-type="float" office:value="10.77">
            <text:p>1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72.37">
            <text:p>2872,37</text:p>
          </table:table-cell>
          <table:table-cell table:style-name="ce12N2" office:value-type="float" office:value="2.87">
            <text:p>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84">
            <text:p>25,8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36.22">
            <text:p>236,22</text:p>
          </table:table-cell>
          <table:table-cell table:style-name="ce12N2" office:value-type="float" office:value="3403.4">
            <text:p>3403,40</text:p>
          </table:table-cell>
          <table:table-cell table:style-name="ce12N2" office:value-type="float" office:value="238.24">
            <text:p>23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5561303922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9">
            <text:p>30895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46.4">
            <text:p>2074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16.0124">
            <text:p>8016,012</text:p>
          </table:table-cell>
          <table:table-cell table:style-name="ce12N2" office:value-type="float" office:value="841.6">
            <text:p>84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4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8.29">
            <text:p>16958,29</text:p>
          </table:table-cell>
          <table:table-cell table:style-name="ce12N2" office:value-type="float" office:value="16.96">
            <text:p>1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63">
            <text:p>152,6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653.04">
            <text:p>653,04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1406.54">
            <text:p>140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520158161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0">
            <text:p>308960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38.68">
            <text:p>703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56">
            <text:p>0,032</text:p>
          </table:table-cell>
          <table:table-cell table:style-name="ce12N2" office:value-type="float" office:value="264.08">
            <text:p>26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3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95.82">
            <text:p>6295,82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66">
            <text:p>56,66</text:p>
          </table:table-cell>
          <table:table-cell table:style-name="ce12N2" office:value-type="float" office:value="44.97">
            <text:p>44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.52">
            <text:p>12,52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491.84">
            <text:p>49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204129000106550010001419651121064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1">
            <text:p>308961</text:p>
          </table:table-cell>
          <table:table-cell table:style-name="ce0" table:number-columns-spanned="4" table:number-rows-spanned="1" office:value-type="string" calcext:value-type="string">
            <text:p>1.634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239.6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71.95">
            <text:p>787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82.84">
            <text:p>748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75">
            <text:p>0,068</text:p>
          </table:table-cell>
          <table:table-cell table:style-name="ce12N2" office:value-type="float" office:value="49.44">
            <text:p>49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71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9.05">
            <text:p>6519,05</text:p>
          </table:table-cell>
          <table:table-cell table:style-name="ce12N2" office:value-type="float" office:value="6.52">
            <text:p>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7">
            <text:p>58,6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89.11">
            <text:p>389,11</text:p>
          </table:table-cell>
          <table:table-cell table:style-name="ce12N2" office:value-type="float" office:value="7482.84">
            <text:p>7482,84</text:p>
          </table:table-cell>
          <table:table-cell table:style-name="ce12N2" office:value-type="float" office:value="299.31">
            <text:p>29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865920000615550030002396021282265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3">
            <text:p>308963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5.09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64.66">
            <text:p>8156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747536">
            <text:p>17,748</text:p>
          </table:table-cell>
          <table:table-cell table:style-name="ce12N2" office:value-type="float" office:value="7346.29">
            <text:p>7346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56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671.68">
            <text:p>66671,68</text:p>
          </table:table-cell>
          <table:table-cell table:style-name="ce12N2" office:value-type="float" office:value="66.67">
            <text:p>6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0.04">
            <text:p>600,04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567.42">
            <text:p>2567,42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5529.81">
            <text:p>552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33881000160550000001150971836501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8">
            <text:p>308968</text:p>
          </table:table-cell>
          <table:table-cell table:style-name="ce0" table:number-columns-spanned="4" table:number-rows-spanned="1" office:value-type="string" calcext:value-type="string">
            <text:p>5.002 - ELETRICA DANUBIO IND E COM DE MAT ELET LTDA</text:p>
          </table:table-cell>
          <table:covered-table-cell table:number-columns-repeated="3"/>
          <table:table-cell table:style-name="ce0" office:value-type="string" calcext:value-type="string">
            <text:p>488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300">
            <text:p>8300,000</text:p>
          </table:table-cell>
          <table:table-cell table:style-name="ce12N2" office:value-type="float" office:value="1460.8">
            <text:p>146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7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89.88">
            <text:p>17789,88</text:p>
          </table:table-cell>
          <table:table-cell table:style-name="ce12N2" office:value-type="float" office:value="17.79">
            <text:p>1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11">
            <text:p>160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1475.51">
            <text:p>147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3102560001905500100048883511893283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3">
            <text:p>30897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3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4.72">
            <text:p>9214,72</text:p>
          </table:table-cell>
          <table:table-cell table:style-name="ce12N2" office:value-type="float" office:value="441.9">
            <text:p>441,9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38">
            <text:p>88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3445">
            <text:p>0,803</text:p>
          </table:table-cell>
          <table:table-cell table:style-name="ce12N2" office:value-type="float" office:value="312">
            <text:p>3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14.69">
            <text:p>7314,69</text:p>
          </table:table-cell>
          <table:table-cell table:style-name="ce12N2" office:value-type="float" office:value="7.32">
            <text:p>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3">
            <text:p>65,83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18.62">
            <text:p>818,62</text:p>
          </table:table-cell>
          <table:table-cell table:style-name="ce12N2" office:value-type="float" office:value="8396.1">
            <text:p>8396,10</text:p>
          </table:table-cell>
          <table:table-cell table:style-name="ce12N2" office:value-type="float" office:value="335.85">
            <text:p>33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30510808738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6">
            <text:p>308976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6.05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899.97">
            <text:p>4089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41555">
            <text:p>2,942</text:p>
          </table:table-cell>
          <table:table-cell table:style-name="ce12N2" office:value-type="float" office:value="310.78">
            <text:p>31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899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21.4">
            <text:p>35521,40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9">
            <text:p>319,6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7.01">
            <text:p>127,01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1630.92">
            <text:p>163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2741051000185550550003060561455871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7">
            <text:p>30897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4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9.37">
            <text:p>5439,37</text:p>
          </table:table-cell>
          <table:table-cell table:style-name="ce12N2" office:value-type="float" office:value="260.85">
            <text:p>260,85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17">
            <text:p>52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9598">
            <text:p>4,696</text:p>
          </table:table-cell>
          <table:table-cell table:style-name="ce12N2" office:value-type="float" office:value="223">
            <text:p>22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7.79">
            <text:p>4317,79</text:p>
          </table:table-cell>
          <table:table-cell table:style-name="ce12N2" office:value-type="float" office:value="4.32">
            <text:p>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96.58">
            <text:p>96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483.22">
            <text:p>483,22</text:p>
          </table:table-cell>
          <table:table-cell table:style-name="ce12N2" office:value-type="float" office:value="4956.15">
            <text:p>4956,15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4411354541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9">
            <text:p>308979</text:p>
          </table:table-cell>
          <table:table-cell table:style-name="ce0" table:number-columns-spanned="4" table:number-rows-spanned="1" office:value-type="string" calcext:value-type="string">
            <text:p>977 - POLIERG INDUSTRIA E COMERCIO LTDA</text:p>
          </table:table-cell>
          <table:covered-table-cell table:number-columns-repeated="3"/>
          <table:table-cell table:style-name="ce0" office:value-type="string" calcext:value-type="string">
            <text:p>120.7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5">
            <text:p>0,408</text:p>
          </table:table-cell>
          <table:table-cell table:style-name="ce12N2" office:value-type="float" office:value="409.5">
            <text:p>40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66.1">
            <text:p>14066,10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6">
            <text:p>126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88.1">
            <text:p>13288,10</text:p>
          </table:table-cell>
          <table:table-cell table:style-name="ce12N2" office:value-type="float" office:value="930.17">
            <text:p>93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010717000152550030001207581079396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4">
            <text:p>3090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00.5">
            <text:p>6980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67530.76">
            <text:p>6753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05312">
            <text:p>2,405</text:p>
          </table:table-cell>
          <table:table-cell table:style-name="ce12N2" office:value-type="float" office:value="831.62">
            <text:p>83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80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221.73">
            <text:p>57221,73</text:p>
          </table:table-cell>
          <table:table-cell table:style-name="ce12N2" office:value-type="float" office:value="57.21">
            <text:p>5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">
            <text:p>515,0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2269.74">
            <text:p>2269,74</text:p>
          </table:table-cell>
          <table:table-cell table:style-name="ce12N2" office:value-type="float" office:value="67530.76">
            <text:p>67530,76</text:p>
          </table:table-cell>
          <table:table-cell table:style-name="ce12N2" office:value-type="float" office:value="4476.54">
            <text:p>447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7161568557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1">
            <text:p>309021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2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305.5">
            <text:p>7730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7305.5">
            <text:p>7730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773">
            <text:p>5,877</text:p>
          </table:table-cell>
          <table:table-cell table:style-name="ce12N2" office:value-type="float" office:value="2358.05">
            <text:p>235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.30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243.91">
            <text:p>65243,91</text:p>
          </table:table-cell>
          <table:table-cell table:style-name="ce12N2" office:value-type="float" office:value="65.19">
            <text:p>6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.14">
            <text:p>587,14</text:p>
          </table:table-cell>
          <table:table-cell table:style-name="ce12N2" office:value-type="float" office:value="45.67">
            <text:p>4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305.5">
            <text:p>77305,50</text:p>
          </table:table-cell>
          <table:table-cell table:style-name="ce12N2" office:value-type="float" office:value="5411.39">
            <text:p>541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83.25">
            <text:p>168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9.743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6/2026</text:p>
          </table:table-cell>
          <table:table-cell table:style-name="ce12" office:value-type="string" calcext:value-type="string">
            <text:p>1.683,25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41260600296181000145550010000182671001488262</text:p>
          </table:table-cell>
          <table:table-cell table:style-name="ce0" office:value-type="string" calcext:value-type="string">
            <text:p>352606052220920007635700200047974310069643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8">
            <text:p>30902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55.56">
            <text:p>6055,56</text:p>
          </table:table-cell>
          <table:table-cell table:style-name="ce12N2" office:value-type="float" office:value="290.4">
            <text:p>290,4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08">
            <text:p>5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5015">
            <text:p>0,815</text:p>
          </table:table-cell>
          <table:table-cell table:style-name="ce12N2" office:value-type="float" office:value="176">
            <text:p>17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5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06.93">
            <text:p>4806,9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26">
            <text:p>43,26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37.96">
            <text:p>537,96</text:p>
          </table:table-cell>
          <table:table-cell table:style-name="ce12N2" office:value-type="float" office:value="5517.6">
            <text:p>5517,60</text:p>
          </table:table-cell>
          <table:table-cell table:style-name="ce12N2" office:value-type="float" office:value="220.7">
            <text:p>22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4341127745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9">
            <text:p>30902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0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29.17">
            <text:p>35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4724.94">
            <text:p>3472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1.24628">
            <text:p>201,246</text:p>
          </table:table-cell>
          <table:table-cell table:style-name="ce12N2" office:value-type="float" office:value="427.48">
            <text:p>42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929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06.98">
            <text:p>29306,98</text:p>
          </table:table-cell>
          <table:table-cell table:style-name="ce12N2" office:value-type="float" office:value="29.31">
            <text:p>2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.76">
            <text:p>263,76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204.23">
            <text:p>1204,23</text:p>
          </table:table-cell>
          <table:table-cell table:style-name="ce12N2" office:value-type="float" office:value="34724.94">
            <text:p>34724,94</text:p>
          </table:table-cell>
          <table:table-cell table:style-name="ce12N2" office:value-type="float" office:value="2430.75">
            <text:p>243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013173876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1">
            <text:p>309031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3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75">
            <text:p>18,75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0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182.62">
            <text:p>14182,62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.64">
            <text:p>127,64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1176.32">
            <text:p>11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35861045058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3">
            <text:p>309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49748">
            <text:p>1,750</text:p>
          </table:table-cell>
          <table:table-cell table:style-name="ce12N2" office:value-type="float" office:value="508.99">
            <text:p>50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7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27.46">
            <text:p>7827,46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649.22">
            <text:p>64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11042095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4">
            <text:p>309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49">
            <text:p>0,013</text:p>
          </table:table-cell>
          <table:table-cell table:style-name="ce12N2" office:value-type="float" office:value="352.5">
            <text:p>35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10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228.63">
            <text:p>26228,63</text:p>
          </table:table-cell>
          <table:table-cell table:style-name="ce12N2" office:value-type="float" office:value="26.23">
            <text:p>2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.06">
            <text:p>236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1204.25">
            <text:p>120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2109334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5">
            <text:p>309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152">
            <text:p>1,522</text:p>
          </table:table-cell>
          <table:table-cell table:style-name="ce12N2" office:value-type="float" office:value="442.6">
            <text:p>44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06.49">
            <text:p>6806,49</text:p>
          </table:table-cell>
          <table:table-cell table:style-name="ce12N2" office:value-type="float" office:value="6.81">
            <text:p>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26">
            <text:p>61,2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564.54">
            <text:p>56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314507262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9">
            <text:p>309039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9.5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79936">
            <text:p>32,799</text:p>
          </table:table-cell>
          <table:table-cell table:style-name="ce12N2" office:value-type="float" office:value="307.8">
            <text:p>30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29.29">
            <text:p>18829,29</text:p>
          </table:table-cell>
          <table:table-cell table:style-name="ce12N2" office:value-type="float" office:value="18.83">
            <text:p>1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47">
            <text:p>169,4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71.95">
            <text:p>12671,95</text:p>
          </table:table-cell>
          <table:table-cell table:style-name="ce12N2" office:value-type="float" office:value="887.04">
            <text:p>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19959017090732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0">
            <text:p>3090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7.7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.34">
            <text:p>1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.4">
            <text:p>13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0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.06">
            <text:p>124,06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133.4">
            <text:p>133,40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77261100009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2">
            <text:p>3090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.38">
            <text:p>75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.43">
            <text:p>595,43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45.86">
            <text:p>45,86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21010391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4">
            <text:p>3090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52">
            <text:p>0,000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62">
            <text:p>3320,62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9">
            <text:p>29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275.42">
            <text:p>27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81146696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5">
            <text:p>3090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69">
            <text:p>3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.73">
            <text:p>297,7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22.93">
            <text:p>22,93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24.69">
            <text:p>2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11784758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7">
            <text:p>3090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52">
            <text:p>0,008</text:p>
          </table:table-cell>
          <table:table-cell table:style-name="ce12N2" office:value-type="float" office:value="10.75">
            <text:p>10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4.78">
            <text:p>1644,78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">
            <text:p>14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2.98">
            <text:p>1402,98</text:p>
          </table:table-cell>
          <table:table-cell table:style-name="ce12N2" office:value-type="float" office:value="98.21">
            <text:p>9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01762169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8">
            <text:p>3090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12">
            <text:p>0,06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3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6.17">
            <text:p>9396,17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57">
            <text:p>84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779.33">
            <text:p>7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91810445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9">
            <text:p>3090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6.24">
            <text:p>64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26">
            <text:p>0,087</text:p>
          </table:table-cell>
          <table:table-cell table:style-name="ce12N2" office:value-type="float" office:value="18.4">
            <text:p>1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48.67">
            <text:p>5248,6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4">
            <text:p>4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1.6">
            <text:p>391,6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240.98">
            <text:p>2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3137611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0">
            <text:p>309050</text:p>
          </table:table-cell>
          <table:table-cell table:style-name="ce0" table:number-columns-spanned="4" table:number-rows-spanned="1" office:value-type="string" calcext:value-type="string">
            <text:p>9.315 - BRASIPLA INDUSTRIA E COMERCIO LTDA</text:p>
          </table:table-cell>
          <table:covered-table-cell table:number-columns-repeated="3"/>
          <table:table-cell table:style-name="ce0" office:value-type="string" calcext:value-type="string">
            <text:p>27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72">
            <text:p>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2.23">
            <text:p>2222,23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184.31">
            <text:p>18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22595300011055001000027678149200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1">
            <text:p>309051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19.262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1.74">
            <text:p>489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4792.89">
            <text:p>479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736">
            <text:p>0,018</text:p>
          </table:table-cell>
          <table:table-cell table:style-name="ce12N2" office:value-type="float" office:value="163.39">
            <text:p>16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42.5">
            <text:p>4142,5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98.85">
            <text:p>98,85</text:p>
          </table:table-cell>
          <table:table-cell table:style-name="ce12N2" office:value-type="float" office:value="4792.89">
            <text:p>4792,89</text:p>
          </table:table-cell>
          <table:table-cell table:style-name="ce12N2" office:value-type="float" office:value="228.18">
            <text:p>22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192621635949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6">
            <text:p>3090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95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52.53">
            <text:p>825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7692.1">
            <text:p>769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85">
            <text:p>0,109</text:p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5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09.38">
            <text:p>6509,38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58">
            <text:p>58,5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60.43">
            <text:p>560,43</text:p>
          </table:table-cell>
          <table:table-cell table:style-name="ce12N2" office:value-type="float" office:value="7692.1">
            <text:p>7692,10</text:p>
          </table:table-cell>
          <table:table-cell table:style-name="ce12N2" office:value-type="float" office:value="519.25">
            <text:p>5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9551457738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0">
            <text:p>309060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7.26">
            <text:p>1445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270.78">
            <text:p>142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864">
            <text:p>0,089</text:p>
          </table:table-cell>
          <table:table-cell table:style-name="ce12N2" office:value-type="float" office:value="232.43">
            <text:p>23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7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44.22">
            <text:p>12044,22</text:p>
          </table:table-cell>
          <table:table-cell table:style-name="ce12N2" office:value-type="float" office:value="12.03">
            <text:p>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39">
            <text:p>108,3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86.48">
            <text:p>186,48</text:p>
          </table:table-cell>
          <table:table-cell table:style-name="ce12N2" office:value-type="float" office:value="14270.78">
            <text:p>14270,78</text:p>
          </table:table-cell>
          <table:table-cell table:style-name="ce12N2" office:value-type="float" office:value="998.96">
            <text:p>99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71008710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1">
            <text:p>309061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9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2.43">
            <text:p>125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3">
            <text:p>121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05">
            <text:p>0,039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78">
            <text:p>1056,78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">
            <text:p>9,5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.43">
            <text:p>39,43</text:p>
          </table:table-cell>
          <table:table-cell table:style-name="ce12N2" office:value-type="float" office:value="1213">
            <text:p>1213,00</text:p>
          </table:table-cell>
          <table:table-cell table:style-name="ce12N2" office:value-type="float" office:value="48.52">
            <text:p>4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910055569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2">
            <text:p>30906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37.6">
            <text:p>173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194.08">
            <text:p>171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53754">
            <text:p>36,538</text:p>
          </table:table-cell>
          <table:table-cell table:style-name="ce12N2" office:value-type="float" office:value="117.42">
            <text:p>11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3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11.42">
            <text:p>14511,42</text:p>
          </table:table-cell>
          <table:table-cell table:style-name="ce12N2" office:value-type="float" office:value="14.48">
            <text:p>1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59">
            <text:p>130,5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43.52">
            <text:p>143,52</text:p>
          </table:table-cell>
          <table:table-cell table:style-name="ce12N2" office:value-type="float" office:value="17194.08">
            <text:p>17194,08</text:p>
          </table:table-cell>
          <table:table-cell table:style-name="ce12N2" office:value-type="float" office:value="1203.59">
            <text:p>120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5100493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3">
            <text:p>30906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39.76">
            <text:p>656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564.82">
            <text:p>6456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6.228464">
            <text:p>506,228</text:p>
          </table:table-cell>
          <table:table-cell table:style-name="ce12N2" office:value-type="float" office:value="1897.19">
            <text:p>1897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491.13">
            <text:p>54491,13</text:p>
          </table:table-cell>
          <table:table-cell table:style-name="ce12N2" office:value-type="float" office:value="54.46">
            <text:p>5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.41">
            <text:p>490,4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074.94">
            <text:p>1074,94</text:p>
          </table:table-cell>
          <table:table-cell table:style-name="ce12N2" office:value-type="float" office:value="64564.82">
            <text:p>64564,82</text:p>
          </table:table-cell>
          <table:table-cell table:style-name="ce12N2" office:value-type="float" office:value="4519.54">
            <text:p>45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6100363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4">
            <text:p>30906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08.8">
            <text:p>360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5.28">
            <text:p>276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544">
            <text:p>0,069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0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3.84">
            <text:p>2333,84</text:p>
          </table:table-cell>
          <table:table-cell table:style-name="ce12N2" office:value-type="float" office:value="2.33">
            <text:p>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5.28">
            <text:p>2765,28</text:p>
          </table:table-cell>
          <table:table-cell table:style-name="ce12N2" office:value-type="float" office:value="193.57">
            <text:p>19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185.45">
            <text:p>5185,45</text:p>
          </table:table-cell>
          <table:table-cell table:style-name="ce12N2" office:value-type="float" office:value="843.52">
            <text:p>843,52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81000658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6">
            <text:p>309066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9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1.58">
            <text:p>5941,58</text:p>
          </table:table-cell>
          <table:table-cell table:style-name="ce12N2" office:value-type="float" office:value="5.94">
            <text:p>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492.8">
            <text:p>4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90801321469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7">
            <text:p>3090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1.5">
            <text:p>4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244113715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9">
            <text:p>30906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5.465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40.37">
            <text:p>24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504.6">
            <text:p>245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47">
            <text:p>0,685</text:p>
          </table:table-cell>
          <table:table-cell table:style-name="ce12N2" office:value-type="float" office:value="1440">
            <text:p>14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81.27">
            <text:p>20681,27</text:p>
          </table:table-cell>
          <table:table-cell table:style-name="ce12N2" office:value-type="float" office:value="20.69">
            <text:p>2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6.13">
            <text:p>186,1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35.77">
            <text:p>135,77</text:p>
          </table:table-cell>
          <table:table-cell table:style-name="ce12N2" office:value-type="float" office:value="24504.6">
            <text:p>24504,60</text:p>
          </table:table-cell>
          <table:table-cell table:style-name="ce12N2" office:value-type="float" office:value="1715.32">
            <text:p>171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54651579012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3">
            <text:p>309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6556">
            <text:p>0,417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26.6">
            <text:p>8326,60</text:p>
          </table:table-cell>
          <table:table-cell table:style-name="ce12N2" office:value-type="float" office:value="8.33">
            <text:p>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3341666424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7">
            <text:p>309087</text:p>
          </table:table-cell>
          <table:table-cell table:style-name="ce0" table:number-columns-spanned="4" table:number-rows-spanned="1" office:value-type="string" calcext:value-type="string">
            <text:p>38.144 - INDUSTRIA DE PLASTICOS E ACOS FARROUPILHA LTDA</text:p>
          </table:table-cell>
          <table:covered-table-cell table:number-columns-repeated="3"/>
          <table:table-cell table:style-name="ce0" office:value-type="string" calcext:value-type="string">
            <text:p>36.7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24.83">
            <text:p>1752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93">
            <text:p>0,063</text:p>
          </table:table-cell>
          <table:table-cell table:style-name="ce12N2" office:value-type="float" office:value="576.02">
            <text:p>57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52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80.51">
            <text:p>14880,51</text:p>
          </table:table-cell>
          <table:table-cell table:style-name="ce12N2" office:value-type="float" office:value="14.9">
            <text:p>1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94">
            <text:p>133,9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47.88">
            <text:p>947,88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1056.79">
            <text:p>105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0188978400011355001000036732100090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9">
            <text:p>309089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2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61.36">
            <text:p>2256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1503.64">
            <text:p>21503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69781">
            <text:p>3,170</text:p>
          </table:table-cell>
          <table:table-cell table:style-name="ce12N2" office:value-type="float" office:value="1245.05">
            <text:p>12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56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66.61">
            <text:p>18466,61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.18">
            <text:p>166,18</text:p>
          </table:table-cell>
          <table:table-cell table:style-name="ce12N2" office:value-type="float" office:value="54.69">
            <text:p>54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057.72">
            <text:p>1057,72</text:p>
          </table:table-cell>
          <table:table-cell table:style-name="ce12N2" office:value-type="float" office:value="20360.71">
            <text:p>20360,71</text:p>
          </table:table-cell>
          <table:table-cell table:style-name="ce12N2" office:value-type="float" office:value="1154.76">
            <text:p>11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293813194044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2">
            <text:p>30909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2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039.34">
            <text:p>12603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2072">
            <text:p>1220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697844">
            <text:p>13,698</text:p>
          </table:table-cell>
          <table:table-cell table:style-name="ce12N2" office:value-type="float" office:value="1865.95">
            <text:p>1865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.039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025.72">
            <text:p>103025,72</text:p>
          </table:table-cell>
          <table:table-cell table:style-name="ce12N2" office:value-type="float" office:value="103.03">
            <text:p>10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.23">
            <text:p>927,23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967.34">
            <text:p>3967,34</text:p>
          </table:table-cell>
          <table:table-cell table:style-name="ce12N2" office:value-type="float" office:value="122072">
            <text:p>122072,00</text:p>
          </table:table-cell>
          <table:table-cell table:style-name="ce12N2" office:value-type="float" office:value="8545.04">
            <text:p>854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29361100779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3">
            <text:p>309093</text:p>
          </table:table-cell>
          <table:table-cell table:style-name="ce0" table:number-columns-spanned="4" table:number-rows-spanned="1" office:value-type="string" calcext:value-type="string">
            <text:p>13.198 - SDSTK INDUSTRIA E COMERCIO LTDA</text:p>
          </table:table-cell>
          <table:covered-table-cell table:number-columns-repeated="3"/>
          <table:table-cell table:style-name="ce0" office:value-type="string" calcext:value-type="string">
            <text:p>1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52.8">
            <text:p>5252,80</text:p>
          </table:table-cell>
          <table:table-cell table:style-name="ce12N2" office:value-type="float" office:value="168.58">
            <text:p>168,58</text:p>
          </table:table-cell>
          <table:table-cell table:style-name="ce12N3" office:value-type="float" office:value="0.14673">
            <text:p>0,147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14.56">
            <text:p>5014,56</text:p>
          </table:table-cell>
          <table:table-cell table:style-name="ce12N2" office:value-type="float" office:value="5.01">
            <text:p>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4">
            <text:p>45,1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216.85">
            <text:p>2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8678638000103550010000131481923666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7">
            <text:p>3090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9.25">
            <text:p>34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499.25">
            <text:p>349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378">
            <text:p>0,064</text:p>
          </table:table-cell>
          <table:table-cell table:style-name="ce12N2" office:value-type="float" office:value="32.14">
            <text:p>3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9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7">
            <text:p>3047,00</text:p>
          </table:table-cell>
          <table:table-cell table:style-name="ce12N2" office:value-type="float" office:value="3.05">
            <text:p>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42">
            <text:p>27,4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9.25">
            <text:p>3499,25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1810004671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8">
            <text:p>30909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4">
            <text:p>45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4">
            <text:p>45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4">
            <text:p>0,075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1.6">
            <text:p>381,60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4">
            <text:p>452,40</text:p>
          </table:table-cell>
          <table:table-cell table:style-name="ce12N2" office:value-type="float" office:value="31.67">
            <text:p>3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2117169786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9">
            <text:p>30909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14.95">
            <text:p>4931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49314.95">
            <text:p>4931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39347">
            <text:p>4,639</text:p>
          </table:table-cell>
          <table:table-cell table:style-name="ce12N2" office:value-type="float" office:value="867.09">
            <text:p>867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314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608.92">
            <text:p>41608,92</text:p>
          </table:table-cell>
          <table:table-cell table:style-name="ce12N2" office:value-type="float" office:value="41.58">
            <text:p>4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.47">
            <text:p>374,4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314.95">
            <text:p>49314,95</text:p>
          </table:table-cell>
          <table:table-cell table:style-name="ce12N2" office:value-type="float" office:value="3452.06">
            <text:p>34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141970337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0">
            <text:p>30910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7.95">
            <text:p>1684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6847.95">
            <text:p>16847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24413">
            <text:p>2,524</text:p>
          </table:table-cell>
          <table:table-cell table:style-name="ce12N2" office:value-type="float" office:value="510.13">
            <text:p>51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4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25.94">
            <text:p>14225,94</text:p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.06">
            <text:p>128,0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7.95">
            <text:p>16847,95</text:p>
          </table:table-cell>
          <table:table-cell table:style-name="ce12N2" office:value-type="float" office:value="1164.97">
            <text:p>116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1516737520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1">
            <text:p>30910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67.86">
            <text:p>906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067.86">
            <text:p>9067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308">
            <text:p>0,693</text:p>
          </table:table-cell>
          <table:table-cell table:style-name="ce12N2" office:value-type="float" office:value="85.66">
            <text:p>8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6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3.58">
            <text:p>7653,58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88">
            <text:p>68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67.86">
            <text:p>9067,86</text:p>
          </table:table-cell>
          <table:table-cell table:style-name="ce12N2" office:value-type="float" office:value="634.76">
            <text:p>63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221377652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2">
            <text:p>309102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1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856">
            <text:p>0,807</text:p>
          </table:table-cell>
          <table:table-cell table:style-name="ce12N2" office:value-type="float" office:value="1731.53">
            <text:p>173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9.72">
            <text:p>6659,72</text:p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94">
            <text:p>59,9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554.2">
            <text:p>5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298926000103550010001713531525277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3">
            <text:p>309103</text:p>
          </table:table-cell>
          <table:table-cell table:style-name="ce0" table:number-columns-spanned="4" table:number-rows-spanned="1" office:value-type="string" calcext:value-type="string">
            <text:p>13.002 - TECNYL IND E COM DE TELAS LTDA</text:p>
          </table:table-cell>
          <table:covered-table-cell table:number-columns-repeated="3"/>
          <table:table-cell table:style-name="ce0" office:value-type="string" calcext:value-type="string">
            <text:p>23.3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44.5">
            <text:p>1614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44.5">
            <text:p>1614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4111">
            <text:p>8,411</text:p>
          </table:table-cell>
          <table:table-cell table:style-name="ce12N2" office:value-type="float" office:value="1284">
            <text:p>12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4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66.37">
            <text:p>14466,37</text:p>
          </table:table-cell>
          <table:table-cell table:style-name="ce12N2" office:value-type="float" office:value="14.47">
            <text:p>1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2">
            <text:p>130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44.5">
            <text:p>16144,50</text:p>
          </table:table-cell>
          <table:table-cell table:style-name="ce12N2" office:value-type="float" office:value="1130.12">
            <text:p>113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311173000144550010000233151027912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5">
            <text:p>30910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6</text:p>
          </table:table-cell>
          <table:table-cell table:style-name="ce9" office:value-type="string" calcext:value-type="string">
            <text:p>13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27392">
            <text:p>4,927</text:p>
          </table:table-cell>
          <table:table-cell table:style-name="ce12N2" office:value-type="float" office:value="7499.94">
            <text:p>749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566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28.35">
            <text:p>49428,35</text:p>
          </table:table-cell>
          <table:table-cell table:style-name="ce12N2" office:value-type="float" office:value="49.43">
            <text:p>4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.84">
            <text:p>444,8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4099.62">
            <text:p>409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30000000961557606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7">
            <text:p>30910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8.2">
            <text:p>466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68.2">
            <text:p>466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699">
            <text:p>1,657</text:p>
          </table:table-cell>
          <table:table-cell table:style-name="ce12N2" office:value-type="float" office:value="343.91">
            <text:p>343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39.75">
            <text:p>3939,75</text:p>
          </table:table-cell>
          <table:table-cell table:style-name="ce12N2" office:value-type="float" office:value="3.94">
            <text:p>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46">
            <text:p>35,4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68.2">
            <text:p>4668,20</text:p>
          </table:table-cell>
          <table:table-cell table:style-name="ce12N2" office:value-type="float" office:value="326.77">
            <text:p>32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7311694302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0">
            <text:p>30911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12.18">
            <text:p>873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7312.18">
            <text:p>87312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5.53167">
            <text:p>185,532</text:p>
          </table:table-cell>
          <table:table-cell table:style-name="ce12N2" office:value-type="float" office:value="5773.53">
            <text:p>577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.31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86.66">
            <text:p>73686,66</text:p>
          </table:table-cell>
          <table:table-cell table:style-name="ce12N2" office:value-type="float" office:value="73.68">
            <text:p>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3.17">
            <text:p>663,1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12.18">
            <text:p>87312,18</text:p>
          </table:table-cell>
          <table:table-cell table:style-name="ce12N2" office:value-type="float" office:value="6111.85">
            <text:p>61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7501533273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3">
            <text:p>309113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2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7.32">
            <text:p>24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04">
            <text:p>0,350</text:p>
          </table:table-cell>
          <table:table-cell table:style-name="ce12N2" office:value-type="float" office:value="269">
            <text:p>2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76.86">
            <text:p>2076,86</text:p>
          </table:table-cell>
          <table:table-cell table:style-name="ce12N2" office:value-type="float" office:value="2.07">
            <text:p>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69">
            <text:p>18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172.25">
            <text:p>1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287181769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23">
            <text:p>309123</text:p>
          </table:table-cell>
          <table:table-cell table:style-name="ce0" table:number-columns-spanned="4" table:number-rows-spanned="1" office:value-type="string" calcext:value-type="string">
            <text:p>35.459 - TRENTO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85.2">
            <text:p>433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3385.2">
            <text:p>4338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5.00075">
            <text:p>925,001</text:p>
          </table:table-cell>
          <table:table-cell table:style-name="ce12N2" office:value-type="float" office:value="161.25">
            <text:p>16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38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385.2">
            <text:p>43385,20</text:p>
          </table:table-cell>
          <table:table-cell table:style-name="ce12N2" office:value-type="float" office:value="802.65">
            <text:p>80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539433900001085500100000037111655457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1">
            <text:p>30913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8.9502">
            <text:p>208,950</text:p>
          </table:table-cell>
          <table:table-cell table:style-name="ce12N2" office:value-type="float" office:value="2286.3">
            <text:p>228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.17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7.87">
            <text:p>109867,87</text:p>
          </table:table-cell>
          <table:table-cell table:style-name="ce12N2" office:value-type="float" office:value="109.87">
            <text:p>10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81">
            <text:p>988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9112.53">
            <text:p>91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699169305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2">
            <text:p>309132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4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3.9">
            <text:p>28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6">
            <text:p>0,002</text:p>
          </table:table-cell>
          <table:table-cell table:style-name="ce12N2" office:value-type="float" office:value="20.34">
            <text:p>2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24.62">
            <text:p>2324,62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92">
            <text:p>20,92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89.52">
            <text:p>89,52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192.81">
            <text:p>1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83745700018755001000364331150795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4">
            <text:p>30913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1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.77">
            <text:p>103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96">
            <text:p>0,068</text:p>
          </table:table-cell>
          <table:table-cell table:style-name="ce12N2" office:value-type="float" office:value="8.98">
            <text:p>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.01">
            <text:p>845,0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1">
            <text:p>7,6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2.54">
            <text:p>32,54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70.08">
            <text:p>7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1316157038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5">
            <text:p>3091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503.43">
            <text:p>12950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77488">
            <text:p>11,677</text:p>
          </table:table-cell>
          <table:table-cell table:style-name="ce12N2" office:value-type="float" office:value="3587.9">
            <text:p>358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9.50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2.14">
            <text:p>109862,14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76">
            <text:p>988,7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3.33">
            <text:p>23,33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8419.91">
            <text:p>84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21810491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6">
            <text:p>3091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108">
            <text:p>1,051</text:p>
          </table:table-cell>
          <table:table-cell table:style-name="ce12N2" office:value-type="float" office:value="228">
            <text:p>2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47.85">
            <text:p>21047,85</text:p>
          </table:table-cell>
          <table:table-cell table:style-name="ce12N2" office:value-type="float" office:value="21.05">
            <text:p>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43">
            <text:p>18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966.38">
            <text:p>9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31882076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7">
            <text:p>30913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8.81">
            <text:p>49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04">
            <text:p>0,003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.73">
            <text:p>407,73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33.82">
            <text:p>3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9194172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9">
            <text:p>30913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2.53">
            <text:p>7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48">
            <text:p>0,018</text:p>
          </table:table-cell>
          <table:table-cell table:style-name="ce12N2" office:value-type="float" office:value="6.91">
            <text:p>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.64">
            <text:p>571,64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5.22">
            <text:p>35,22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8190130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0">
            <text:p>3091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">
            <text:p>0,126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61.99">
            <text:p>37961,99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66">
            <text:p>341,6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3148.6">
            <text:p>314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11345831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3">
            <text:p>309143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5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972">
            <text:p>11,972</text:p>
          </table:table-cell>
          <table:table-cell table:style-name="ce12N2" office:value-type="float" office:value="4480.35">
            <text:p>448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81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63.8">
            <text:p>67363,80</text:p>
          </table:table-cell>
          <table:table-cell table:style-name="ce12N2" office:value-type="float" office:value="67.37">
            <text:p>6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6.28">
            <text:p>606,2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5587.21">
            <text:p>558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5063185968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7">
            <text:p>3091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">
            <text:p>0,087</text:p>
          </table:table-cell>
          <table:table-cell table:style-name="ce12N2" office:value-type="float" office:value="94.5">
            <text:p>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4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14.09">
            <text:p>13014,09</text:p>
          </table:table-cell>
          <table:table-cell table:style-name="ce12N2" office:value-type="float" office:value="13.01">
            <text:p>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.13">
            <text:p>117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1079.4">
            <text:p>107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31922228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8">
            <text:p>3091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">
            <text:p>0,001</text:p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7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03.1">
            <text:p>16603,10</text:p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43">
            <text:p>14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1377.08">
            <text:p>137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41896471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9">
            <text:p>3091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51442441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7">
            <text:p>30915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319.33">
            <text:p>28931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287374.47">
            <text:p>287374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15.052346">
            <text:p>815,052</text:p>
          </table:table-cell>
          <table:table-cell table:style-name="ce12N2" office:value-type="float" office:value="3126.75">
            <text:p>312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9.319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2897.95">
            <text:p>242897,95</text:p>
          </table:table-cell>
          <table:table-cell table:style-name="ce12N2" office:value-type="float" office:value="242.9">
            <text:p>24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6.09">
            <text:p>2186,0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1944.86">
            <text:p>1944,86</text:p>
          </table:table-cell>
          <table:table-cell table:style-name="ce12N2" office:value-type="float" office:value="282052.65">
            <text:p>282052,65</text:p>
          </table:table-cell>
          <table:table-cell table:style-name="ce12N2" office:value-type="float" office:value="19743.69">
            <text:p>197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621330830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8">
            <text:p>30915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110.28">
            <text:p>2301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">
            <text:p>169,00</text:p>
          </table:table-cell>
          <table:table-cell table:style-name="ce12N2" office:value-type="float" office:value="229939.21">
            <text:p>229939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9.554388">
            <text:p>59,554</text:p>
          </table:table-cell>
          <table:table-cell table:style-name="ce12N2" office:value-type="float" office:value="2120.81">
            <text:p>212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0.11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4835.26">
            <text:p>194835,26</text:p>
          </table:table-cell>
          <table:table-cell table:style-name="ce12N2" office:value-type="float" office:value="194.84">
            <text:p>19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3.55">
            <text:p>1753,5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171.07">
            <text:p>171,07</text:p>
          </table:table-cell>
          <table:table-cell table:style-name="ce12N2" office:value-type="float" office:value="227958.84">
            <text:p>227958,84</text:p>
          </table:table-cell>
          <table:table-cell table:style-name="ce12N2" office:value-type="float" office:value="15246.46">
            <text:p>152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7115560358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69">
            <text:p>309169</text:p>
          </table:table-cell>
          <table:table-cell table:style-name="ce0" table:number-columns-spanned="4" table:number-rows-spanned="1" office:value-type="string" calcext:value-type="string">
            <text:p>6.879 - GELPLASTICOS EMBALAGENS PLASTICAS EIRELI ME</text:p>
          </table:table-cell>
          <table:covered-table-cell table:number-columns-repeated="3"/>
          <table:table-cell table:style-name="ce0" office:value-type="string" calcext:value-type="string">
            <text:p>11.8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50">
            <text:p>283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350">
            <text:p>283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0.15708">
            <text:p>60,157</text:p>
          </table:table-cell>
          <table:table-cell table:style-name="ce12N2" office:value-type="float" office:value="648">
            <text:p>6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3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350">
            <text:p>28350,00</text:p>
          </table:table-cell>
          <table:table-cell table:style-name="ce12N2" office:value-type="float" office:value="4819.5">
            <text:p>48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19811185000142550010000118751476114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71">
            <text:p>309171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7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98.68">
            <text:p>5329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298.68">
            <text:p>5329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072088">
            <text:p>8,072</text:p>
          </table:table-cell>
          <table:table-cell table:style-name="ce12N2" office:value-type="float" office:value="10731.46">
            <text:p>10731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29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564.32">
            <text:p>42564,32</text:p>
          </table:table-cell>
          <table:table-cell table:style-name="ce12N2" office:value-type="float" office:value="42.57">
            <text:p>4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3.08">
            <text:p>383,08</text:p>
          </table:table-cell>
          <table:table-cell table:style-name="ce12N2" office:value-type="float" office:value="11">
            <text:p>1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98.68">
            <text:p>53298,68</text:p>
          </table:table-cell>
          <table:table-cell table:style-name="ce12N2" office:value-type="float" office:value="6395.84">
            <text:p>6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746814490489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72">
            <text:p>30917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7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28.64">
            <text:p>11162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28.64">
            <text:p>11162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2224">
            <text:p>21,472</text:p>
          </table:table-cell>
          <table:table-cell table:style-name="ce12N2" office:value-type="float" office:value="20949.34">
            <text:p>2094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62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146.62">
            <text:p>89146,62</text:p>
          </table:table-cell>
          <table:table-cell table:style-name="ce12N2" office:value-type="float" office:value="89.15">
            <text:p>8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.32">
            <text:p>802,32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628.64">
            <text:p>111628,64</text:p>
          </table:table-cell>
          <table:table-cell table:style-name="ce12N2" office:value-type="float" office:value="13395.44">
            <text:p>1339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769811338028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73">
            <text:p>309173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7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90.42">
            <text:p>5789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7890.42">
            <text:p>57890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228772">
            <text:p>20,229</text:p>
          </table:table-cell>
          <table:table-cell table:style-name="ce12N2" office:value-type="float" office:value="10050.34">
            <text:p>1005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89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231.28">
            <text:p>46231,28</text:p>
          </table:table-cell>
          <table:table-cell table:style-name="ce12N2" office:value-type="float" office:value="46.23">
            <text:p>4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6.08">
            <text:p>416,0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890.42">
            <text:p>57890,42</text:p>
          </table:table-cell>
          <table:table-cell table:style-name="ce12N2" office:value-type="float" office:value="6946.85">
            <text:p>694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788512151233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74">
            <text:p>309174</text:p>
          </table:table-cell>
          <table:table-cell table:style-name="ce0" table:number-columns-spanned="4" table:number-rows-spanned="1" office:value-type="string" calcext:value-type="string">
            <text:p>31.248 - GV DO BRASIL INDUSTRIA E COMERCIO DE ACO LTDA</text:p>
          </table:table-cell>
          <table:covered-table-cell table:number-columns-repeated="3"/>
          <table:table-cell table:style-name="ce0" office:value-type="string" calcext:value-type="string">
            <text:p>5.77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439.4">
            <text:p>16643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6439.4">
            <text:p>16643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443">
            <text:p>0,039</text:p>
          </table:table-cell>
          <table:table-cell table:style-name="ce12N2" office:value-type="float" office:value="36412.87">
            <text:p>3641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6.43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470.69">
            <text:p>140470,69</text:p>
          </table:table-cell>
          <table:table-cell table:style-name="ce12N2" office:value-type="float" office:value="140.47">
            <text:p>14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4.24">
            <text:p>1264,2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439.4">
            <text:p>166439,40</text:p>
          </table:table-cell>
          <table:table-cell table:style-name="ce12N2" office:value-type="float" office:value="11650.76">
            <text:p>1165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84632000144550050000057761439551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47">
            <text:p>147,00</text:p>
          </table:table-cell>
          <table:table-cell table:style-name="ce26N2" office:value-type="float" office:value="1221.99">
            <text:p>1221,99</text:p>
          </table:table-cell>
          <table:table-cell table:style-name="ce26N2" office:value-type="float" office:value="168.58">
            <text:p>16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5103.13">
            <text:p>45103,13</text:p>
          </table:table-cell>
          <table:table-cell table:style-name="ce26N2" office:value-type="float" office:value="4306158.49">
            <text:p>4306158,49</text:p>
          </table:table-cell>
          <table:table-cell table:style-name="ce26N2" office:value-type="float" office:value="304698.01">
            <text:p>304698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83.25">
            <text:p>1683,25</text:p>
          </table:table-cell>
          <table:table-cell table:style-name="ce26N2" office:value-type="float" office:value="4431763.35">
            <text:p>4431763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185.45">
            <text:p>5185,45</text:p>
          </table:table-cell>
          <table:table-cell table:style-name="ce26N2" office:value-type="float" office:value="843.52">
            <text:p>843,52</text:p>
          </table:table-cell>
          <table:table-cell table:style-name="ce26N2" office:value-type="float" office:value="2108.32">
            <text:p>2108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9717.858545">
            <text:p>19717,859</text:p>
          </table:table-cell>
          <table:table-cell table:style-name="ce26N2" office:value-type="float" office:value="4386870.11">
            <text:p>4386870,11</text:p>
          </table:table-cell>
          <table:table-cell table:style-name="ce26N2" office:value-type="float" office:value="4431763.35">
            <text:p>4431763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615706.1">
            <text:p>3615706,10</text:p>
          </table:table-cell>
          <table:table-cell table:style-name="ce26N2" office:value-type="float" office:value="3615.66">
            <text:p>3615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2541.28">
            <text:p>32541,2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89017.72">
            <text:p>389017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.06">
            <text:p>45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64" meta:object-count="0"/>
    <meta:generator>LibreOffice/4.3.0.4$Windows_x86 LibreOffice_project/62ad5818884a2fc2e5780dd45466868d41009ec0</meta:generator>
  </office:meta>
</office:document-meta>
</file>