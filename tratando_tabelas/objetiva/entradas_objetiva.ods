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5/06/2026 07:40:1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2">
            <text:p>309102</text:p>
          </table:table-cell>
          <table:table-cell table:style-name="ce0" table:number-columns-spanned="4" table:number-rows-spanned="1" office:value-type="string" calcext:value-type="string">
            <text:p>780 - INDUSTRIA E COMERCIO RIOMAR CORDAS LTDA</text:p>
          </table:table-cell>
          <table:covered-table-cell table:number-columns-repeated="3"/>
          <table:table-cell table:style-name="ce0" office:value-type="string" calcext:value-type="string">
            <text:p>171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6856">
            <text:p>0,807</text:p>
          </table:table-cell>
          <table:table-cell table:style-name="ce12N2" office:value-type="float" office:value="1731.53">
            <text:p>173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9.72">
            <text:p>6659,72</text:p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94">
            <text:p>59,9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554.2">
            <text:p>5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298926000103550010001713531525277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1">
            <text:p>30921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">
            <text:p>0,000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1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19.99">
            <text:p>35519,99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2673.55">
            <text:p>267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913116267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4">
            <text:p>309234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2.04">
            <text:p>127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02">
            <text:p>0,007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7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9.77">
            <text:p>1039,77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6">
            <text:p>9,36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.04">
            <text:p>40,04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86.24">
            <text:p>8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81518696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2">
            <text:p>309282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96">
            <text:p>0,553</text:p>
          </table:table-cell>
          <table:table-cell table:style-name="ce12N2" office:value-type="float" office:value="127.06">
            <text:p>12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291.9">
            <text:p>29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0703302000197550010000076251584111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8">
            <text:p>3092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8.7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82.58">
            <text:p>160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612">
            <text:p>0,145</text:p>
          </table:table-cell>
          <table:table-cell table:style-name="ce12N2" office:value-type="float" office:value="193.25">
            <text:p>19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46.06">
            <text:p>13146,06</text:p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.33">
            <text:p>118,3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06.23">
            <text:p>506,23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1090.36">
            <text:p>109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683374000300550030006187791889129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0">
            <text:p>309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68">
            <text:p>0,000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5.6">
            <text:p>675,60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8">
            <text:p>6,0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6.28">
            <text:p>576,28</text:p>
          </table:table-cell>
          <table:table-cell table:style-name="ce12N2" office:value-type="float" office:value="40.34">
            <text:p>4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31896874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1">
            <text:p>309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14">
            <text:p>0,049</text:p>
          </table:table-cell>
          <table:table-cell table:style-name="ce12N2" office:value-type="float" office:value="13.02">
            <text:p>1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3.67">
            <text:p>3283,67</text:p>
          </table:table-cell>
          <table:table-cell table:style-name="ce12N2" office:value-type="float" office:value="3.28">
            <text:p>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55">
            <text:p>29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150.77">
            <text:p>15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718724356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2">
            <text:p>309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23">
            <text:p>0,086</text:p>
          </table:table-cell>
          <table:table-cell table:style-name="ce12N2" office:value-type="float" office:value="112.44">
            <text:p>11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7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54.01">
            <text:p>32854,01</text:p>
          </table:table-cell>
          <table:table-cell table:style-name="ce12N2" office:value-type="float" office:value="32.86">
            <text:p>3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.68">
            <text:p>295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2667.61">
            <text:p>266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41579617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3">
            <text:p>3092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76">
            <text:p>0,033</text:p>
          </table:table-cell>
          <table:table-cell table:style-name="ce12N2" office:value-type="float" office:value="8.68">
            <text:p>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12">
            <text:p>2189,12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">
            <text:p>19,7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100.51">
            <text:p>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61520138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4">
            <text:p>309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6.52">
            <text:p>291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4">
            <text:p>0,000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24">
            <text:p>2311,24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8">
            <text:p>178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21439709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5">
            <text:p>309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1">
            <text:p>0,016</text:p>
          </table:table-cell>
          <table:table-cell table:style-name="ce12N2" office:value-type="float" office:value="26.09">
            <text:p>26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3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84.02">
            <text:p>7284,02</text:p>
          </table:table-cell>
          <table:table-cell table:style-name="ce12N2" office:value-type="float" office:value="7.28">
            <text:p>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604.14">
            <text:p>60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51848717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6">
            <text:p>309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58.8">
            <text:p>5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77.99">
            <text:p>3377,99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">
            <text:p>30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81.39">
            <text:p>2881,39</text:p>
          </table:table-cell>
          <table:table-cell table:style-name="ce12N2" office:value-type="float" office:value="201.7">
            <text:p>20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010058889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7">
            <text:p>3092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616">
            <text:p>0,450</text:p>
          </table:table-cell>
          <table:table-cell table:style-name="ce12N2" office:value-type="float" office:value="212.84">
            <text:p>212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61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316.79">
            <text:p>77316,79</text:p>
          </table:table-cell>
          <table:table-cell table:style-name="ce12N2" office:value-type="float" office:value="77.32">
            <text:p>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.85">
            <text:p>695,8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6412.72">
            <text:p>64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91509323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8">
            <text:p>3092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1584">
            <text:p>0,212</text:p>
          </table:table-cell>
          <table:table-cell table:style-name="ce12N2" office:value-type="float" office:value="100.16">
            <text:p>10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11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384.37">
            <text:p>36384,37</text:p>
          </table:table-cell>
          <table:table-cell table:style-name="ce12N2" office:value-type="float" office:value="36.38">
            <text:p>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.46">
            <text:p>327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3017.75">
            <text:p>301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11329675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9">
            <text:p>3092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9766">
            <text:p>0,230</text:p>
          </table:table-cell>
          <table:table-cell table:style-name="ce12N2" office:value-type="float" office:value="116.53">
            <text:p>116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8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32.71">
            <text:p>24632,71</text:p>
          </table:table-cell>
          <table:table-cell table:style-name="ce12N2" office:value-type="float" office:value="24.63">
            <text:p>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.69">
            <text:p>221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1538.41">
            <text:p>15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8179289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7">
            <text:p>309307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1.49">
            <text:p>4431,49</text:p>
          </table:table-cell>
          <table:table-cell table:style-name="ce12N2" office:value-type="float" office:value="273.96">
            <text:p>273,9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65.96">
            <text:p>45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6768">
            <text:p>1,397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4.55">
            <text:p>3594,55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5">
            <text:p>3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9.49">
            <text:p>139,49</text:p>
          </table:table-cell>
          <table:table-cell table:style-name="ce12N2" office:value-type="float" office:value="4292">
            <text:p>4292,00</text:p>
          </table:table-cell>
          <table:table-cell table:style-name="ce12N2" office:value-type="float" office:value="300.44">
            <text:p>30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5081122000180550010000163861000142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7">
            <text:p>30931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4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763.95">
            <text:p>897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82.375338">
            <text:p>2282,375</text:p>
          </table:table-cell>
          <table:table-cell table:style-name="ce12N2" office:value-type="float" office:value="486.5">
            <text:p>48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.76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66.1">
            <text:p>74866,10</text:p>
          </table:table-cell>
          <table:table-cell table:style-name="ce12N2" office:value-type="float" office:value="74.87">
            <text:p>7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.84">
            <text:p>673,8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12.21">
            <text:p>1312,21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5955.92">
            <text:p>5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49931858413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8">
            <text:p>30931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8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2">
            <text:p>0,018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5.18">
            <text:p>1265,18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9">
            <text:p>11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58.09">
            <text:p>5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8711110002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3">
            <text:p>30932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1.65">
            <text:p>278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5">
            <text:p>0,080</text:p>
          </table:table-cell>
          <table:table-cell table:style-name="ce12N2" office:value-type="float" office:value="29.5">
            <text:p>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1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9.08">
            <text:p>2139,08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5">
            <text:p>19,25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47.12">
            <text:p>247,12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177.42">
            <text:p>1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315822614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5">
            <text:p>30932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8.28">
            <text:p>215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55">
            <text:p>0,090</text:p>
          </table:table-cell>
          <table:table-cell table:style-name="ce12N2" office:value-type="float" office:value="23.35">
            <text:p>2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9.33">
            <text:p>1689,33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6.65">
            <text:p>156,65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140.12">
            <text:p>1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51580281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0">
            <text:p>30934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5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7.547153">
            <text:p>227,547</text:p>
          </table:table-cell>
          <table:table-cell table:style-name="ce12N2" office:value-type="float" office:value="765.94">
            <text:p>765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7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98.62">
            <text:p>23698,62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29">
            <text:p>213,2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1965.58">
            <text:p>196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59157517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5">
            <text:p>30934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0948">
            <text:p>5,191</text:p>
          </table:table-cell>
          <table:table-cell table:style-name="ce12N2" office:value-type="float" office:value="473.37">
            <text:p>473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65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19.47">
            <text:p>47819,47</text:p>
          </table:table-cell>
          <table:table-cell table:style-name="ce12N2" office:value-type="float" office:value="47.82">
            <text:p>4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38">
            <text:p>430,3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3966.19">
            <text:p>396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631990171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0">
            <text:p>309390</text:p>
          </table:table-cell>
          <table:table-cell table:style-name="ce0" table:number-columns-spanned="4" table:number-rows-spanned="1" office:value-type="string" calcext:value-type="string">
            <text:p>1.670 - ARQUA IND. BRASILEIRA DE MANGUEIRAS E TERMOPLASTICOS LTDA</text:p>
          </table:table-cell>
          <table:covered-table-cell table:number-columns-repeated="3"/>
          <table:table-cell table:style-name="ce0" office:value-type="string" calcext:value-type="string">
            <text:p>17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0.63">
            <text:p>1763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0258">
            <text:p>0,960</text:p>
          </table:table-cell>
          <table:table-cell table:style-name="ce12N2" office:value-type="float" office:value="660.09">
            <text:p>660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0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11.43">
            <text:p>14411,43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7">
            <text:p>129,7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1195.3">
            <text:p>119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81333150001195500100001754014402378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11">
            <text:p>309411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.95537">
            <text:p>37,955</text:p>
          </table:table-cell>
          <table:table-cell table:style-name="ce12N2" office:value-type="float" office:value="583">
            <text:p>5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4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288.36">
            <text:p>28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61242541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2">
            <text:p>30942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43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907.77">
            <text:p>269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060.79">
            <text:p>26060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4.599">
            <text:p>244,599</text:p>
          </table:table-cell>
          <table:table-cell table:style-name="ce12N2" office:value-type="float" office:value="428.7">
            <text:p>42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907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94.65">
            <text:p>21994,65</text:p>
          </table:table-cell>
          <table:table-cell table:style-name="ce12N2" office:value-type="float" office:value="21.99">
            <text:p>2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.95">
            <text:p>197,95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46.98">
            <text:p>846,98</text:p>
          </table:table-cell>
          <table:table-cell table:style-name="ce12N2" office:value-type="float" office:value="26060.79">
            <text:p>26060,79</text:p>
          </table:table-cell>
          <table:table-cell table:style-name="ce12N2" office:value-type="float" office:value="1824.26">
            <text:p>182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43214821014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2">
            <text:p>30943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8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5.06">
            <text:p>266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1105">
            <text:p>2,121</text:p>
          </table:table-cell>
          <table:table-cell table:style-name="ce12N2" office:value-type="float" office:value="334.97">
            <text:p>334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5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6.81">
            <text:p>21356,81</text:p>
          </table:table-cell>
          <table:table-cell table:style-name="ce12N2" office:value-type="float" office:value="21.36">
            <text:p>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21">
            <text:p>192,21</text:p>
          </table:table-cell>
          <table:table-cell table:style-name="ce12N2" office:value-type="float" office:value="61.58">
            <text:p>6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1350.01">
            <text:p>1350,01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1771.36">
            <text:p>17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89911022671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6">
            <text:p>30945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4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1.17">
            <text:p>13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8.7">
            <text:p>126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0.75">
            <text:p>1070,7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64">
            <text:p>9,6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2.47">
            <text:p>82,47</text:p>
          </table:table-cell>
          <table:table-cell table:style-name="ce12N2" office:value-type="float" office:value="1268.7">
            <text:p>1268,70</text:p>
          </table:table-cell>
          <table:table-cell table:style-name="ce12N2" office:value-type="float" office:value="88.81">
            <text:p>8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491267961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7">
            <text:p>309457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5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.72">
            <text:p>106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8.8">
            <text:p>99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6">
            <text:p>0,013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.96">
            <text:p>842,96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64.92">
            <text:p>64,92</text:p>
          </table:table-cell>
          <table:table-cell table:style-name="ce12N2" office:value-type="float" office:value="998.8">
            <text:p>998,80</text:p>
          </table:table-cell>
          <table:table-cell table:style-name="ce12N2" office:value-type="float" office:value="69.92">
            <text:p>6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501375736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5">
            <text:p>309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4.16">
            <text:p>1230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756">
            <text:p>0,338</text:p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62">
            <text:p>9750,62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6">
            <text:p>87,7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750.96">
            <text:p>750,96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808.72">
            <text:p>8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71829829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6">
            <text:p>309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952">
            <text:p>0,031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.97">
            <text:p>1580,97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23">
            <text:p>14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131.13">
            <text:p>13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11546280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7">
            <text:p>309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3.39">
            <text:p>1058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162">
            <text:p>0,134</text:p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3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.97">
            <text:p>8386,97</text:p>
          </table:table-cell>
          <table:table-cell table:style-name="ce12N2" office:value-type="float" office:value="8.39">
            <text:p>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48">
            <text:p>75,4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645.93">
            <text:p>645,93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695.62">
            <text:p>69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31315605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9">
            <text:p>309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9">
            <text:p>0,000</text:p>
          </table:table-cell>
          <table:table-cell table:style-name="ce12N2" office:value-type="float" office:value="9.15">
            <text:p>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31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19.22">
            <text:p>4819,22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37">
            <text:p>43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221.27">
            <text:p>22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017898775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0">
            <text:p>309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8">
            <text:p>0,052</text:p>
          </table:table-cell>
          <table:table-cell table:style-name="ce12N2" office:value-type="float" office:value="71.68">
            <text:p>7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65.2">
            <text:p>10965,20</text:p>
          </table:table-cell>
          <table:table-cell table:style-name="ce12N2" office:value-type="float" office:value="10.97">
            <text:p>1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69">
            <text:p>98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3.22">
            <text:p>9353,22</text:p>
          </table:table-cell>
          <table:table-cell table:style-name="ce12N2" office:value-type="float" office:value="654.73">
            <text:p>65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61131213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1">
            <text:p>309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">
            <text:p>0,003</text:p>
          </table:table-cell>
          <table:table-cell table:style-name="ce12N2" office:value-type="float" office:value="7.36">
            <text:p>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2.78">
            <text:p>1202,78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83">
            <text:p>10,8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5.96">
            <text:p>1025,9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51452877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2">
            <text:p>309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">
            <text:p>0,001</text:p>
          </table:table-cell>
          <table:table-cell table:style-name="ce12N2" office:value-type="float" office:value="27.45">
            <text:p>27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26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0.81">
            <text:p>12430,81</text:p>
          </table:table-cell>
          <table:table-cell table:style-name="ce12N2" office:value-type="float" office:value="12.43">
            <text:p>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8">
            <text:p>111,8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570.74">
            <text:p>57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21203983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3">
            <text:p>3094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8.68">
            <text:p>51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268">
            <text:p>0,065</text:p>
          </table:table-cell>
          <table:table-cell table:style-name="ce12N2" office:value-type="float" office:value="14.87">
            <text:p>14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.15">
            <text:p>4080,15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2">
            <text:p>36,7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314.24">
            <text:p>314,24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338.41">
            <text:p>3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41567041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4">
            <text:p>309494</text:p>
          </table:table-cell>
          <table:table-cell table:style-name="ce0" table:number-columns-spanned="4" table:number-rows-spanned="1" office:value-type="string" calcext:value-type="string">
            <text:p>34.313 - LYNUS INDUSTRIA, COMERCIO, IMPORTACAO E EXPORTACAO LTDA</text:p>
          </table:table-cell>
          <table:covered-table-cell table:number-columns-repeated="3"/>
          <table:table-cell table:style-name="ce0" office:value-type="string" calcext:value-type="string">
            <text:p>238.13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60.54">
            <text:p>1246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437.7">
            <text:p>1243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6958">
            <text:p>1,170</text:p>
          </table:table-cell>
          <table:table-cell table:style-name="ce12N2" office:value-type="float" office:value="135.3">
            <text:p>13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6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5.72">
            <text:p>10835,7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52">
            <text:p>97,5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22.84">
            <text:p>22,84</text:p>
          </table:table-cell>
          <table:table-cell table:style-name="ce12N2" office:value-type="float" office:value="12437.7">
            <text:p>12437,70</text:p>
          </table:table-cell>
          <table:table-cell table:style-name="ce12N2" office:value-type="float" office:value="497.52">
            <text:p>49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71629640001855500200023813714662464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5">
            <text:p>309495</text:p>
          </table:table-cell>
          <table:table-cell table:style-name="ce0" table:number-columns-spanned="4" table:number-rows-spanned="1" office:value-type="string" calcext:value-type="string">
            <text:p>6.638 - MECANICA MABELINI LTDA</text:p>
          </table:table-cell>
          <table:covered-table-cell table:number-columns-repeated="3"/>
          <table:table-cell table:style-name="ce0" office:value-type="string" calcext:value-type="string">
            <text:p>7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08">
            <text:p>0,210</text:p>
          </table:table-cell>
          <table:table-cell table:style-name="ce12N2" office:value-type="float" office:value="2473">
            <text:p>247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65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9.67">
            <text:p>49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1326.41">
            <text:p>13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845890000011055001000007290161218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3">
            <text:p>30953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5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6.81">
            <text:p>204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487">
            <text:p>0,345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6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">
            <text:p>1702,0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2">
            <text:p>15,3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.88">
            <text:p>59,88</text:p>
          </table:table-cell>
          <table:table-cell table:style-name="ce12N2" office:value-type="float" office:value="1986.93">
            <text:p>1986,93</text:p>
          </table:table-cell>
          <table:table-cell table:style-name="ce12N2" office:value-type="float" office:value="111.45">
            <text:p>11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8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57115722262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46">
            <text:p>309546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6.5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46">
            <text:p>20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8.68">
            <text:p>197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216">
            <text:p>0,021</text:p>
          </table:table-cell>
          <table:table-cell table:style-name="ce12N2" office:value-type="float" office:value="1.87">
            <text:p>1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5.64">
            <text:p>1685,64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17">
            <text:p>15,1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30.78">
            <text:p>30,78</text:p>
          </table:table-cell>
          <table:table-cell table:style-name="ce12N2" office:value-type="float" office:value="1978.68">
            <text:p>1978,68</text:p>
          </table:table-cell>
          <table:table-cell table:style-name="ce12N2" office:value-type="float" office:value="120.75">
            <text:p>12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650413311183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2">
            <text:p>30955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36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26.52">
            <text:p>1362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7.6">
            <text:p>131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4.2">
            <text:p>304,200</text:p>
          </table:table-cell>
          <table:table-cell table:style-name="ce12N2" office:value-type="float" office:value="268.8">
            <text:p>2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62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8.44">
            <text:p>11138,44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5">
            <text:p>100,25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28.92">
            <text:p>428,92</text:p>
          </table:table-cell>
          <table:table-cell table:style-name="ce12N2" office:value-type="float" office:value="13197.6">
            <text:p>13197,60</text:p>
          </table:table-cell>
          <table:table-cell table:style-name="ce12N2" office:value-type="float" office:value="923.83">
            <text:p>92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3641904330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8">
            <text:p>309558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99.8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47.55">
            <text:p>5084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0847.55">
            <text:p>50847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513">
            <text:p>0,046</text:p>
          </table:table-cell>
          <table:table-cell table:style-name="ce12N2" office:value-type="float" office:value="871.61">
            <text:p>871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84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040.57">
            <text:p>44040,57</text:p>
          </table:table-cell>
          <table:table-cell table:style-name="ce12N2" office:value-type="float" office:value="44.05">
            <text:p>4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.36">
            <text:p>396,3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47.55">
            <text:p>50847,55</text:p>
          </table:table-cell>
          <table:table-cell table:style-name="ce12N2" office:value-type="float" office:value="2318">
            <text:p>231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8998091990966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9">
            <text:p>309559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99.810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7.63">
            <text:p>90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7.63">
            <text:p>90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21">
            <text:p>0,001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6.02">
            <text:p>766,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89">
            <text:p>6,8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7.63">
            <text:p>907,63</text:p>
          </table:table-cell>
          <table:table-cell table:style-name="ce12N2" office:value-type="float" office:value="63.53">
            <text:p>6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89981010179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0">
            <text:p>309560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99.821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.36">
            <text:p>30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.36">
            <text:p>309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6">
            <text:p>0,001</text:p>
          </table:table-cell>
          <table:table-cell table:style-name="ce12N2" office:value-type="float" office:value="0.76">
            <text:p>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.08">
            <text:p>261,08</text:p>
          </table:table-cell>
          <table:table-cell table:style-name="ce12N2" office:value-type="float" office:value="0.26">
            <text:p>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35">
            <text:p>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.36">
            <text:p>309,36</text:p>
          </table:table-cell>
          <table:table-cell table:style-name="ce12N2" office:value-type="float" office:value="21.66">
            <text:p>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8998211582216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2">
            <text:p>30956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9.37">
            <text:p>499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48">
            <text:p>0,006</text:p>
          </table:table-cell>
          <table:table-cell table:style-name="ce12N2" office:value-type="float" office:value="29.52">
            <text:p>2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6.53">
            <text:p>4086,53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8">
            <text:p>36,78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7.37">
            <text:p>157,37</text:p>
          </table:table-cell>
          <table:table-cell table:style-name="ce12N2" office:value-type="float" office:value="4842">
            <text:p>4842,00</text:p>
          </table:table-cell>
          <table:table-cell table:style-name="ce12N2" office:value-type="float" office:value="338.94">
            <text:p>33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11423552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5">
            <text:p>3095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13.92">
            <text:p>713,92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43">
            <text:p>6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5.9">
            <text:p>845,90</text:p>
          </table:table-cell>
          <table:table-cell table:style-name="ce12N2" office:value-type="float" office:value="59.21">
            <text:p>5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516129107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2">
            <text:p>30960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5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59">
            <text:p>138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78.32">
            <text:p>137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91">
            <text:p>0,059</text:p>
          </table:table-cell>
          <table:table-cell table:style-name="ce12N2" office:value-type="float" office:value="15.22">
            <text:p>15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3.04">
            <text:p>1163,04</text:p>
          </table:table-cell>
          <table:table-cell table:style-name="ce12N2" office:value-type="float" office:value="1.16">
            <text:p>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7">
            <text:p>10,4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6.27">
            <text:p>6,27</text:p>
          </table:table-cell>
          <table:table-cell table:style-name="ce12N2" office:value-type="float" office:value="1378.32">
            <text:p>1378,32</text:p>
          </table:table-cell>
          <table:table-cell table:style-name="ce12N2" office:value-type="float" office:value="96.48">
            <text:p>9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51615072919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3">
            <text:p>30960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5.7">
            <text:p>304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045.7">
            <text:p>304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332">
            <text:p>0,283</text:p>
          </table:table-cell>
          <table:table-cell table:style-name="ce12N2" office:value-type="float" office:value="58.33">
            <text:p>58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0.4">
            <text:p>2570,40</text:p>
          </table:table-cell>
          <table:table-cell table:style-name="ce12N2" office:value-type="float" office:value="2.57">
            <text:p>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5.7">
            <text:p>3045,70</text:p>
          </table:table-cell>
          <table:table-cell table:style-name="ce12N2" office:value-type="float" office:value="213.2">
            <text:p>21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54114568597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6">
            <text:p>30960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8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6.6">
            <text:p>497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76.6">
            <text:p>497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4">
            <text:p>0,007</text:p>
          </table:table-cell>
          <table:table-cell table:style-name="ce12N2" office:value-type="float" office:value="3.4">
            <text:p>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00.12">
            <text:p>4200,12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8">
            <text:p>37,80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76.6">
            <text:p>4976,60</text:p>
          </table:table-cell>
          <table:table-cell table:style-name="ce12N2" office:value-type="float" office:value="348.36">
            <text:p>34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851495465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2">
            <text:p>309622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.53405">
            <text:p>57,534</text:p>
          </table:table-cell>
          <table:table-cell table:style-name="ce12N2" office:value-type="float" office:value="1858">
            <text:p>185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6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266.7">
            <text:p>25266,70</text:p>
          </table:table-cell>
          <table:table-cell table:style-name="ce12N2" office:value-type="float" office:value="965.19">
            <text:p>96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1116667845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3">
            <text:p>309623</text:p>
          </table:table-cell>
          <table:table-cell table:style-name="ce0" table:number-columns-spanned="4" table:number-rows-spanned="1" office:value-type="string" calcext:value-type="string">
            <text:p>7.484 - AFORT INDUSTRIA DE PLASTICOS LTDA-ME</text:p>
          </table:table-cell>
          <table:covered-table-cell table:number-columns-repeated="3"/>
          <table:table-cell table:style-name="ce0" office:value-type="string" calcext:value-type="string">
            <text:p>278.9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87.05">
            <text:p>2148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10.7">
            <text:p>2081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7798">
            <text:p>17,780</text:p>
          </table:table-cell>
          <table:table-cell table:style-name="ce12N2" office:value-type="float" office:value="635.45">
            <text:p>635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48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19.43">
            <text:p>16619,43</text:p>
          </table:table-cell>
          <table:table-cell table:style-name="ce12N2" office:value-type="float" office:value="16.62">
            <text:p>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.57">
            <text:p>149,57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676.35">
            <text:p>676,35</text:p>
          </table:table-cell>
          <table:table-cell table:style-name="ce12N2" office:value-type="float" office:value="20810.7">
            <text:p>20810,70</text:p>
          </table:table-cell>
          <table:table-cell table:style-name="ce12N2" office:value-type="float" office:value="2497.28">
            <text:p>249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617289826000115550010002789631567035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4">
            <text:p>309624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3.4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.76">
            <text:p>48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9.5">
            <text:p>46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5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6.25">
            <text:p>396,25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7">
            <text:p>3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5.26">
            <text:p>15,26</text:p>
          </table:table-cell>
          <table:table-cell table:style-name="ce12N2" office:value-type="float" office:value="469.5">
            <text:p>469,50</text:p>
          </table:table-cell>
          <table:table-cell table:style-name="ce12N2" office:value-type="float" office:value="32.87">
            <text:p>3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398369000800550010006034921282329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5">
            <text:p>309625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3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1.64">
            <text:p>1561,64</text:p>
          </table:table-cell>
          <table:table-cell table:style-name="ce12N2" office:value-type="float" office:value="74.89">
            <text:p>74,89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7.8">
            <text:p>149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">
            <text:p>0,036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9.63">
            <text:p>1239,63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6">
            <text:p>11,16</text:p>
          </table:table-cell>
          <table:table-cell table:style-name="ce12N2" office:value-type="float" office:value="48.38">
            <text:p>48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38.73">
            <text:p>138,73</text:p>
          </table:table-cell>
          <table:table-cell table:style-name="ce12N2" office:value-type="float" office:value="1422.91">
            <text:p>1422,9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31417831852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6">
            <text:p>30962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3.4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20.82">
            <text:p>1892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25.25">
            <text:p>1832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4">
            <text:p>0,018</text:p>
          </table:table-cell>
          <table:table-cell table:style-name="ce12N2" office:value-type="float" office:value="201.82">
            <text:p>20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20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66.05">
            <text:p>15466,05</text:p>
          </table:table-cell>
          <table:table-cell table:style-name="ce12N2" office:value-type="float" office:value="15.47">
            <text:p>1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19">
            <text:p>139,1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595.57">
            <text:p>595,57</text:p>
          </table:table-cell>
          <table:table-cell table:style-name="ce12N2" office:value-type="float" office:value="18325.25">
            <text:p>18325,25</text:p>
          </table:table-cell>
          <table:table-cell table:style-name="ce12N2" office:value-type="float" office:value="1282.77">
            <text:p>128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398369000800550010006034931051095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7">
            <text:p>309627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3.4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83.17">
            <text:p>1338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961.9">
            <text:p>12961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41">
            <text:p>0,077</text:p>
          </table:table-cell>
          <table:table-cell table:style-name="ce12N2" office:value-type="float" office:value="121.63">
            <text:p>121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83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39.51">
            <text:p>10939,51</text:p>
          </table:table-cell>
          <table:table-cell table:style-name="ce12N2" office:value-type="float" office:value="10.94">
            <text:p>1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21.27">
            <text:p>421,27</text:p>
          </table:table-cell>
          <table:table-cell table:style-name="ce12N2" office:value-type="float" office:value="12961.9">
            <text:p>12961,90</text:p>
          </table:table-cell>
          <table:table-cell table:style-name="ce12N2" office:value-type="float" office:value="907.34">
            <text:p>90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398369000800550010006034911095649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1">
            <text:p>30963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8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023.03">
            <text:p>40902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405954.46">
            <text:p>405954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3.589819">
            <text:p>73,590</text:p>
          </table:table-cell>
          <table:table-cell table:style-name="ce12N2" office:value-type="float" office:value="5710.72">
            <text:p>571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9.02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4222.47">
            <text:p>344222,47</text:p>
          </table:table-cell>
          <table:table-cell table:style-name="ce12N2" office:value-type="float" office:value="344.28">
            <text:p>34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8.02">
            <text:p>3098,0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068.57">
            <text:p>3068,57</text:p>
          </table:table-cell>
          <table:table-cell table:style-name="ce12N2" office:value-type="float" office:value="401604.51">
            <text:p>401604,51</text:p>
          </table:table-cell>
          <table:table-cell table:style-name="ce12N2" office:value-type="float" office:value="26644.59">
            <text:p>2664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83916369031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3">
            <text:p>3096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51194191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5">
            <text:p>309635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6.4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6">
            <text:p>1,296</text:p>
          </table:table-cell>
          <table:table-cell table:style-name="ce12N2" office:value-type="float" office:value="473.8">
            <text:p>4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3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42.1">
            <text:p>7542,10</text:p>
          </table:table-cell>
          <table:table-cell table:style-name="ce12N2" office:value-type="float" office:value="7.55">
            <text:p>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88">
            <text:p>67,8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36.4">
            <text:p>8936,40</text:p>
          </table:table-cell>
          <table:table-cell table:style-name="ce12N2" office:value-type="float" office:value="625.55">
            <text:p>62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801902002501550000008264451850239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6">
            <text:p>30963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9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322.8">
            <text:p>1113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322.8">
            <text:p>1113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1.2427">
            <text:p>81,243</text:p>
          </table:table-cell>
          <table:table-cell table:style-name="ce12N2" office:value-type="float" office:value="8734.38">
            <text:p>8734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3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951.9">
            <text:p>93951,90</text:p>
          </table:table-cell>
          <table:table-cell table:style-name="ce12N2" office:value-type="float" office:value="93.95">
            <text:p>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5.57">
            <text:p>845,57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22.8">
            <text:p>111322,80</text:p>
          </table:table-cell>
          <table:table-cell table:style-name="ce12N2" office:value-type="float" office:value="7792.6">
            <text:p>779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98351360147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7">
            <text:p>309637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40.3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1862">
            <text:p>1,482</text:p>
          </table:table-cell>
          <table:table-cell table:style-name="ce12N2" office:value-type="float" office:value="387.37">
            <text:p>387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80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21.34">
            <text:p>12221,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99">
            <text:p>109,9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80.7">
            <text:p>14480,70</text:p>
          </table:table-cell>
          <table:table-cell table:style-name="ce12N2" office:value-type="float" office:value="1013.65">
            <text:p>101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403961351912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0">
            <text:p>3096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6.3">
            <text:p>27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3">
            <text:p>0,006</text:p>
          </table:table-cell>
          <table:table-cell table:style-name="ce12N2" office:value-type="float" office:value="12.91">
            <text:p>1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08.03">
            <text:p>2208,03</text:p>
          </table:table-cell>
          <table:table-cell table:style-name="ce12N2" office:value-type="float" office:value="2.21">
            <text:p>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87">
            <text:p>19,8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70.06">
            <text:p>170,06</text:p>
          </table:table-cell>
          <table:table-cell table:style-name="ce12N2" office:value-type="float" office:value="2616.24">
            <text:p>2616,24</text:p>
          </table:table-cell>
          <table:table-cell table:style-name="ce12N2" office:value-type="float" office:value="183.14">
            <text:p>18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7179834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1">
            <text:p>3096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2.43">
            <text:p>17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7.05">
            <text:p>1357,05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1">
            <text:p>12,2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4.51">
            <text:p>104,51</text:p>
          </table:table-cell>
          <table:table-cell table:style-name="ce12N2" office:value-type="float" office:value="1607.92">
            <text:p>1607,92</text:p>
          </table:table-cell>
          <table:table-cell table:style-name="ce12N2" office:value-type="float" office:value="112.55">
            <text:p>11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81637324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2">
            <text:p>3096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9.46">
            <text:p>2060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65413">
            <text:p>0,565</text:p>
          </table:table-cell>
          <table:table-cell table:style-name="ce12N2" office:value-type="float" office:value="55.34">
            <text:p>5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32.28">
            <text:p>16332,28</text:p>
          </table:table-cell>
          <table:table-cell table:style-name="ce12N2" office:value-type="float" office:value="16.33">
            <text:p>1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.99">
            <text:p>146,9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257.85">
            <text:p>1257,85</text:p>
          </table:table-cell>
          <table:table-cell table:style-name="ce12N2" office:value-type="float" office:value="19351.61">
            <text:p>19351,61</text:p>
          </table:table-cell>
          <table:table-cell table:style-name="ce12N2" office:value-type="float" office:value="1354.61">
            <text:p>135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71392529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3">
            <text:p>309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2.59">
            <text:p>55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66">
            <text:p>0,013</text:p>
          </table:table-cell>
          <table:table-cell table:style-name="ce12N2" office:value-type="float" office:value="25.82">
            <text:p>2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16.09">
            <text:p>4416,09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4">
            <text:p>39,7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40.11">
            <text:p>340,11</text:p>
          </table:table-cell>
          <table:table-cell table:style-name="ce12N2" office:value-type="float" office:value="5232.48">
            <text:p>5232,48</text:p>
          </table:table-cell>
          <table:table-cell table:style-name="ce12N2" office:value-type="float" office:value="366.27">
            <text:p>36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11262576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4">
            <text:p>3096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15">
            <text:p>139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65">
            <text:p>0,003</text:p>
          </table:table-cell>
          <table:table-cell table:style-name="ce12N2" office:value-type="float" office:value="6.46">
            <text:p>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04.02">
            <text:p>1104,02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94">
            <text:p>9,9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85.03">
            <text:p>85,03</text:p>
          </table:table-cell>
          <table:table-cell table:style-name="ce12N2" office:value-type="float" office:value="1308.12">
            <text:p>1308,12</text:p>
          </table:table-cell>
          <table:table-cell table:style-name="ce12N2" office:value-type="float" office:value="91.57">
            <text:p>9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61306152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6">
            <text:p>3096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56.24">
            <text:p>1845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634">
            <text:p>0,506</text:p>
          </table:table-cell>
          <table:table-cell table:style-name="ce12N2" office:value-type="float" office:value="49.56">
            <text:p>49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5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25.91">
            <text:p>14625,91</text:p>
          </table:table-cell>
          <table:table-cell table:style-name="ce12N2" office:value-type="float" office:value="14.63">
            <text:p>1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.63">
            <text:p>131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26.44">
            <text:p>1126,44</text:p>
          </table:table-cell>
          <table:table-cell table:style-name="ce12N2" office:value-type="float" office:value="17329.8">
            <text:p>17329,80</text:p>
          </table:table-cell>
          <table:table-cell table:style-name="ce12N2" office:value-type="float" office:value="1213.09">
            <text:p>12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91570710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7">
            <text:p>3096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8.77">
            <text:p>9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6.01">
            <text:p>736,01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2">
            <text:p>6,6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56.69">
            <text:p>56,69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61.05">
            <text:p>6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201727392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8">
            <text:p>3096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2">
            <text:p>19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2">
            <text:p>0,000</text:p>
          </table:table-cell>
          <table:table-cell table:style-name="ce12N2" office:value-type="float" office:value="29.4">
            <text:p>2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8.99">
            <text:p>1688,99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0.7">
            <text:p>1440,70</text:p>
          </table:table-cell>
          <table:table-cell table:style-name="ce12N2" office:value-type="float" office:value="100.85">
            <text:p>1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9160833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49">
            <text:p>3096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8.85">
            <text:p>399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707">
            <text:p>0,110</text:p>
          </table:table-cell>
          <table:table-cell table:style-name="ce12N2" office:value-type="float" office:value="10.74">
            <text:p>1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9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8.94">
            <text:p>3168,9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2">
            <text:p>28,5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44.06">
            <text:p>244,06</text:p>
          </table:table-cell>
          <table:table-cell table:style-name="ce12N2" office:value-type="float" office:value="3754.79">
            <text:p>3754,79</text:p>
          </table:table-cell>
          <table:table-cell table:style-name="ce12N2" office:value-type="float" office:value="262.84">
            <text:p>26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9813994527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1">
            <text:p>3096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8872">
            <text:p>0,979</text:p>
          </table:table-cell>
          <table:table-cell table:style-name="ce12N2" office:value-type="float" office:value="324.04">
            <text:p>32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48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933.48">
            <text:p>94933,48</text:p>
          </table:table-cell>
          <table:table-cell table:style-name="ce12N2" office:value-type="float" office:value="94.93">
            <text:p>9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4.4">
            <text:p>854,4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484.74">
            <text:p>112484,74</text:p>
          </table:table-cell>
          <table:table-cell table:style-name="ce12N2" office:value-type="float" office:value="7873.94">
            <text:p>787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361235109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3">
            <text:p>3096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2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979.98">
            <text:p>18197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9901">
            <text:p>1,060</text:p>
          </table:table-cell>
          <table:table-cell table:style-name="ce12N2" office:value-type="float" office:value="250.33">
            <text:p>250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.979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423.22">
            <text:p>153423,22</text:p>
          </table:table-cell>
          <table:table-cell table:style-name="ce12N2" office:value-type="float" office:value="153.4">
            <text:p>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0.81">
            <text:p>1380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94.68">
            <text:p>194,68</text:p>
          </table:table-cell>
          <table:table-cell table:style-name="ce12N2" office:value-type="float" office:value="181785.3">
            <text:p>181785,30</text:p>
          </table:table-cell>
          <table:table-cell table:style-name="ce12N2" office:value-type="float" office:value="12724.97">
            <text:p>1272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2821816538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6">
            <text:p>30966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0.0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94.2">
            <text:p>579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94.2">
            <text:p>579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21184">
            <text:p>2,021</text:p>
          </table:table-cell>
          <table:table-cell table:style-name="ce12N2" office:value-type="float" office:value="423.69">
            <text:p>423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9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90.27">
            <text:p>4890,27</text:p>
          </table:table-cell>
          <table:table-cell table:style-name="ce12N2" office:value-type="float" office:value="4.89">
            <text:p>4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01">
            <text:p>44,0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94.2">
            <text:p>5794,20</text:p>
          </table:table-cell>
          <table:table-cell table:style-name="ce12N2" office:value-type="float" office:value="405.59">
            <text:p>40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00151353595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7">
            <text:p>30966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0.0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466.78">
            <text:p>9046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90466.78">
            <text:p>9046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9.706024">
            <text:p>39,706</text:p>
          </table:table-cell>
          <table:table-cell table:style-name="ce12N2" office:value-type="float" office:value="4426.81">
            <text:p>442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.466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364.3">
            <text:p>76364,30</text:p>
          </table:table-cell>
          <table:table-cell table:style-name="ce12N2" office:value-type="float" office:value="76.37">
            <text:p>7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7.28">
            <text:p>687,28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466.78">
            <text:p>90466,78</text:p>
          </table:table-cell>
          <table:table-cell table:style-name="ce12N2" office:value-type="float" office:value="6324.19">
            <text:p>632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001411991107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0">
            <text:p>309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347.27">
            <text:p>7534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5828">
            <text:p>0,336</text:p>
          </table:table-cell>
          <table:table-cell table:style-name="ce12N2" office:value-type="float" office:value="136.56">
            <text:p>136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34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372.48">
            <text:p>61372,48</text:p>
          </table:table-cell>
          <table:table-cell table:style-name="ce12N2" office:value-type="float" office:value="61.38">
            <text:p>6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687.08">
            <text:p>2687,08</text:p>
          </table:table-cell>
          <table:table-cell table:style-name="ce12N2" office:value-type="float" office:value="72660.19">
            <text:p>72660,19</text:p>
          </table:table-cell>
          <table:table-cell table:style-name="ce12N2" office:value-type="float" office:value="5031.18">
            <text:p>50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315519558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1">
            <text:p>30967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50.0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.642632">
            <text:p>70,643</text:p>
          </table:table-cell>
          <table:table-cell table:style-name="ce12N2" office:value-type="float" office:value="7076.2">
            <text:p>7076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577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857.56">
            <text:p>68857,56</text:p>
          </table:table-cell>
          <table:table-cell table:style-name="ce12N2" office:value-type="float" office:value="68.86">
            <text:p>6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9.72">
            <text:p>619,7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577.84">
            <text:p>81577,84</text:p>
          </table:table-cell>
          <table:table-cell table:style-name="ce12N2" office:value-type="float" office:value="5710.45">
            <text:p>571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5001613607763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2">
            <text:p>30967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5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869.85">
            <text:p>217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40671">
            <text:p>4,441</text:p>
          </table:table-cell>
          <table:table-cell table:style-name="ce12N2" office:value-type="float" office:value="518.91">
            <text:p>518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7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899.43">
            <text:p>178899,43</text:p>
          </table:table-cell>
          <table:table-cell table:style-name="ce12N2" office:value-type="float" office:value="178.88">
            <text:p>17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10.1">
            <text:p>1610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6131.13">
            <text:p>6131,13</text:p>
          </table:table-cell>
          <table:table-cell table:style-name="ce12N2" office:value-type="float" office:value="211738.72">
            <text:p>211738,72</text:p>
          </table:table-cell>
          <table:table-cell table:style-name="ce12N2" office:value-type="float" office:value="14606.92">
            <text:p>1460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5461417438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5">
            <text:p>3096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8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2.62">
            <text:p>912,62</text:p>
          </table:table-cell>
          <table:table-cell table:style-name="ce12N2" office:value-type="float" office:value="0.91">
            <text:p>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21">
            <text:p>8,2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1.34">
            <text:p>1081,34</text:p>
          </table:table-cell>
          <table:table-cell table:style-name="ce12N2" office:value-type="float" office:value="75.69">
            <text:p>7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101952739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6">
            <text:p>30968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5.92">
            <text:p>158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6">
            <text:p>1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8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6.35">
            <text:p>1296,35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67">
            <text:p>11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9.92">
            <text:p>49,92</text:p>
          </table:table-cell>
          <table:table-cell table:style-name="ce12N2" office:value-type="float" office:value="1536">
            <text:p>1536,00</text:p>
          </table:table-cell>
          <table:table-cell table:style-name="ce12N2" office:value-type="float" office:value="107.52">
            <text:p>10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51462314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8">
            <text:p>30968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3.56">
            <text:p>470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55.5">
            <text:p>455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3">
            <text:p>0,003</text:p>
          </table:table-cell>
          <table:table-cell table:style-name="ce12N2" office:value-type="float" office:value="4.16">
            <text:p>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0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44.73">
            <text:p>3844,73</text:p>
          </table:table-cell>
          <table:table-cell table:style-name="ce12N2" office:value-type="float" office:value="3.85">
            <text:p>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61">
            <text:p>34,6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48.06">
            <text:p>148,06</text:p>
          </table:table-cell>
          <table:table-cell table:style-name="ce12N2" office:value-type="float" office:value="4555.5">
            <text:p>4555,50</text:p>
          </table:table-cell>
          <table:table-cell table:style-name="ce12N2" office:value-type="float" office:value="318.89">
            <text:p>31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81109093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1">
            <text:p>3096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1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6.95">
            <text:p>327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73.8">
            <text:p>317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8">
            <text:p>0,002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8.6">
            <text:p>2678,60</text:p>
          </table:table-cell>
          <table:table-cell table:style-name="ce12N2" office:value-type="float" office:value="2.68">
            <text:p>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11">
            <text:p>24,1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03.15">
            <text:p>103,15</text:p>
          </table:table-cell>
          <table:table-cell table:style-name="ce12N2" office:value-type="float" office:value="3173.8">
            <text:p>3173,80</text:p>
          </table:table-cell>
          <table:table-cell table:style-name="ce12N2" office:value-type="float" office:value="222.17">
            <text:p>22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1816394499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2">
            <text:p>309692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202.0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67.27">
            <text:p>526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37.43">
            <text:p>5237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36">
            <text:p>0,011</text:p>
          </table:table-cell>
          <table:table-cell table:style-name="ce12N2" office:value-type="float" office:value="100.76">
            <text:p>10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67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46.02">
            <text:p>4546,02</text:p>
          </table:table-cell>
          <table:table-cell table:style-name="ce12N2" office:value-type="float" office:value="4.55">
            <text:p>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92">
            <text:p>40,92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3257.78">
            <text:p>3257,78</text:p>
          </table:table-cell>
          <table:table-cell table:style-name="ce12N2" office:value-type="float" office:value="228.05">
            <text:p>2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037668000154550010012020221425431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98">
            <text:p>3096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.74">
            <text:p>107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0.04">
            <text:p>0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76.04">
            <text:p>876,04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88">
            <text:p>7,8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3.74">
            <text:p>33,74</text:p>
          </table:table-cell>
          <table:table-cell table:style-name="ce12N2" office:value-type="float" office:value="1038">
            <text:p>1038,00</text:p>
          </table:table-cell>
          <table:table-cell table:style-name="ce12N2" office:value-type="float" office:value="72.66">
            <text:p>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010800228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0">
            <text:p>30970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7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5.81">
            <text:p>225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3.91">
            <text:p>1843,9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71.01">
            <text:p>71,01</text:p>
          </table:table-cell>
          <table:table-cell table:style-name="ce12N2" office:value-type="float" office:value="2184.8">
            <text:p>2184,80</text:p>
          </table:table-cell>
          <table:table-cell table:style-name="ce12N2" office:value-type="float" office:value="152.94">
            <text:p>152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711917369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2">
            <text:p>30970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9.00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59.64">
            <text:p>159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3.1">
            <text:p>2863,10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7">
            <text:p>25,77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2.4">
            <text:p>3392,40</text:p>
          </table:table-cell>
          <table:table-cell table:style-name="ce12N2" office:value-type="float" office:value="237.47">
            <text:p>2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56171900950355021001979003122621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4">
            <text:p>309704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4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761">
            <text:p>4,761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3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90.51">
            <text:p>2390,51</text:p>
          </table:table-cell>
          <table:table-cell table:style-name="ce12N2" office:value-type="float" office:value="2.39">
            <text:p>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51">
            <text:p>21,51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32.44">
            <text:p>2832,44</text:p>
          </table:table-cell>
          <table:table-cell table:style-name="ce12N2" office:value-type="float" office:value="198.27">
            <text:p>19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150751009135550010005648011895254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5">
            <text:p>3097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82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53.54">
            <text:p>3935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36133.4">
            <text:p>3613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436211">
            <text:p>25,436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35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383.18">
            <text:p>31383,18</text:p>
          </table:table-cell>
          <table:table-cell table:style-name="ce12N2" office:value-type="float" office:value="31.41">
            <text:p>3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2.45">
            <text:p>282,45</text:p>
          </table:table-cell>
          <table:table-cell table:style-name="ce12N2" office:value-type="float" office:value="54.86">
            <text:p>54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220.14">
            <text:p>3220,14</text:p>
          </table:table-cell>
          <table:table-cell table:style-name="ce12N2" office:value-type="float" office:value="36133.4">
            <text:p>36133,40</text:p>
          </table:table-cell>
          <table:table-cell table:style-name="ce12N2" office:value-type="float" office:value="1551.37">
            <text:p>155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82117192292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6">
            <text:p>309726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9.9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8.63">
            <text:p>383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24.08">
            <text:p>382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60786">
            <text:p>0,761</text:p>
          </table:table-cell>
          <table:table-cell table:style-name="ce12N2" office:value-type="float" office:value="3.62">
            <text:p>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3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31.53">
            <text:p>3331,53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8">
            <text:p>29,9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4.55">
            <text:p>14,55</text:p>
          </table:table-cell>
          <table:table-cell table:style-name="ce12N2" office:value-type="float" office:value="3824.08">
            <text:p>3824,08</text:p>
          </table:table-cell>
          <table:table-cell table:style-name="ce12N2" office:value-type="float" office:value="152.97">
            <text:p>15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99561100008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8">
            <text:p>30972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7.87">
            <text:p>541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06.35">
            <text:p>520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03">
            <text:p>0,020</text:p>
          </table:table-cell>
          <table:table-cell table:style-name="ce12N2" office:value-type="float" office:value="9.29">
            <text:p>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1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94.05">
            <text:p>4394,05</text:p>
          </table:table-cell>
          <table:table-cell table:style-name="ce12N2" office:value-type="float" office:value="4.4">
            <text:p>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56">
            <text:p>39,5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211.52">
            <text:p>211,52</text:p>
          </table:table-cell>
          <table:table-cell table:style-name="ce12N2" office:value-type="float" office:value="5206.35">
            <text:p>5206,35</text:p>
          </table:table-cell>
          <table:table-cell table:style-name="ce12N2" office:value-type="float" office:value="364.44">
            <text:p>36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91584523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5">
            <text:p>309735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7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.7">
            <text:p>715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55.7">
            <text:p>715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96278">
            <text:p>13,963</text:p>
          </table:table-cell>
          <table:table-cell table:style-name="ce12N2" office:value-type="float" office:value="242.99">
            <text:p>242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39.24">
            <text:p>6039,24</text:p>
          </table:table-cell>
          <table:table-cell table:style-name="ce12N2" office:value-type="float" office:value="6.04">
            <text:p>6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35">
            <text:p>54,3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.7">
            <text:p>7155,70</text:p>
          </table:table-cell>
          <table:table-cell table:style-name="ce12N2" office:value-type="float" office:value="500.9">
            <text:p>50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370081450001495500100010798518136568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6">
            <text:p>309736</text:p>
          </table:table-cell>
          <table:table-cell table:style-name="ce0" table:number-columns-spanned="4" table:number-rows-spanned="1" office:value-type="string" calcext:value-type="string">
            <text:p>11.849 - SCHULZ COMPRESSORES S.A</text:p>
          </table:table-cell>
          <table:covered-table-cell table:number-columns-repeated="3"/>
          <table:table-cell table:style-name="ce0" office:value-type="string" calcext:value-type="string">
            <text:p>640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7.48">
            <text:p>1116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67.48">
            <text:p>1116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1832">
            <text:p>0,822</text:p>
          </table:table-cell>
          <table:table-cell table:style-name="ce12N2" office:value-type="float" office:value="219.39">
            <text:p>219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167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3.57">
            <text:p>9613,57</text:p>
          </table:table-cell>
          <table:table-cell table:style-name="ce12N2" office:value-type="float" office:value="9.62">
            <text:p>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3">
            <text:p>86,53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00.28">
            <text:p>8200,28</text:p>
          </table:table-cell>
          <table:table-cell table:style-name="ce12N2" office:value-type="float" office:value="574.02">
            <text:p>57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36357980001435500100064065215694671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7">
            <text:p>30973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8368">
            <text:p>0,168</text:p>
          </table:table-cell>
          <table:table-cell table:style-name="ce12N2" office:value-type="float" office:value="43.66">
            <text:p>4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7.53">
            <text:p>1657,53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92">
            <text:p>14,9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3.96">
            <text:p>1963,96</text:p>
          </table:table-cell>
          <table:table-cell table:style-name="ce12N2" office:value-type="float" office:value="137.48">
            <text:p>13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11571727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8">
            <text:p>30973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199">
            <text:p>0,262</text:p>
          </table:table-cell>
          <table:table-cell table:style-name="ce12N2" office:value-type="float" office:value="113.13">
            <text:p>11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1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19.45">
            <text:p>4719,45</text:p>
          </table:table-cell>
          <table:table-cell table:style-name="ce12N2" office:value-type="float" office:value="4.72">
            <text:p>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48">
            <text:p>42,4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1.94">
            <text:p>5591,94</text:p>
          </table:table-cell>
          <table:table-cell table:style-name="ce12N2" office:value-type="float" office:value="391.44">
            <text:p>39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21861940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9">
            <text:p>30973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41657">
            <text:p>0,542</text:p>
          </table:table-cell>
          <table:table-cell table:style-name="ce12N2" office:value-type="float" office:value="134.79">
            <text:p>13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69.77">
            <text:p>4369,77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33">
            <text:p>39,3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6">
            <text:p>5177,60</text:p>
          </table:table-cell>
          <table:table-cell table:style-name="ce12N2" office:value-type="float" office:value="362.43">
            <text:p>36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31486507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0">
            <text:p>3097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785">
            <text:p>0,138</text:p>
          </table:table-cell>
          <table:table-cell table:style-name="ce12N2" office:value-type="float" office:value="89.66">
            <text:p>89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1.96">
            <text:p>2161,96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6">
            <text:p>19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1.64">
            <text:p>2561,64</text:p>
          </table:table-cell>
          <table:table-cell table:style-name="ce12N2" office:value-type="float" office:value="179.31">
            <text:p>17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14641438738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1">
            <text:p>3097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8.45">
            <text:p>156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8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2.94">
            <text:p>1242,94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95.73">
            <text:p>95,73</text:p>
          </table:table-cell>
          <table:table-cell table:style-name="ce12N2" office:value-type="float" office:value="1472.72">
            <text:p>1472,72</text:p>
          </table:table-cell>
          <table:table-cell table:style-name="ce12N2" office:value-type="float" office:value="103.09">
            <text:p>10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815299255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2">
            <text:p>3097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70.3">
            <text:p>11370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0218">
            <text:p>0,602</text:p>
          </table:table-cell>
          <table:table-cell table:style-name="ce12N2" office:value-type="float" office:value="27.34">
            <text:p>2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70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07.43">
            <text:p>9807,43</text:p>
          </table:table-cell>
          <table:table-cell table:style-name="ce12N2" office:value-type="float" office:value="9.8">
            <text:p>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.26">
            <text:p>88,2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2.94">
            <text:p>112,94</text:p>
          </table:table-cell>
          <table:table-cell table:style-name="ce12N2" office:value-type="float" office:value="11257.36">
            <text:p>11257,36</text:p>
          </table:table-cell>
          <table:table-cell table:style-name="ce12N2" office:value-type="float" office:value="450.29">
            <text:p>45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491518820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3">
            <text:p>3097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46.92">
            <text:p>181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062.21">
            <text:p>18062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7">
            <text:p>0,500</text:p>
          </table:table-cell>
          <table:table-cell table:style-name="ce12N2" office:value-type="float" office:value="75.06">
            <text:p>7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146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92.36">
            <text:p>15692,36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.24">
            <text:p>141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4.71">
            <text:p>84,71</text:p>
          </table:table-cell>
          <table:table-cell table:style-name="ce12N2" office:value-type="float" office:value="17367.14">
            <text:p>17367,14</text:p>
          </table:table-cell>
          <table:table-cell table:style-name="ce12N2" office:value-type="float" office:value="770.35">
            <text:p>77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01143860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4">
            <text:p>3097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75">
            <text:p>0,038</text:p>
          </table:table-cell>
          <table:table-cell table:style-name="ce12N2" office:value-type="float" office:value="16.48">
            <text:p>1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47.76">
            <text:p>5847,76</text:p>
          </table:table-cell>
          <table:table-cell table:style-name="ce12N2" office:value-type="float" office:value="5.85">
            <text:p>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63">
            <text:p>52,6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28.81">
            <text:p>6928,81</text:p>
          </table:table-cell>
          <table:table-cell table:style-name="ce12N2" office:value-type="float" office:value="485.01">
            <text:p>48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315588101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5">
            <text:p>3097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10.25">
            <text:p>201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1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93.06">
            <text:p>1593,06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34">
            <text:p>14,3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22.69">
            <text:p>122,69</text:p>
          </table:table-cell>
          <table:table-cell table:style-name="ce12N2" office:value-type="float" office:value="1887.56">
            <text:p>1887,56</text:p>
          </table:table-cell>
          <table:table-cell table:style-name="ce12N2" office:value-type="float" office:value="132.13">
            <text:p>13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11987638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6">
            <text:p>3097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4.64">
            <text:p>82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6">
            <text:p>0,00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9.89">
            <text:p>709,89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9">
            <text:p>6,3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5.53">
            <text:p>605,53</text:p>
          </table:table-cell>
          <table:table-cell table:style-name="ce12N2" office:value-type="float" office:value="42.39">
            <text:p>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21050230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7">
            <text:p>3097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">
            <text:p>0,002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9.78">
            <text:p>669,78</text:p>
          </table:table-cell>
          <table:table-cell table:style-name="ce12N2" office:value-type="float" office:value="0.67">
            <text:p>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3.6">
            <text:p>793,60</text:p>
          </table:table-cell>
          <table:table-cell table:style-name="ce12N2" office:value-type="float" office:value="55.55">
            <text:p>5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61786983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9">
            <text:p>3097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4.14">
            <text:p>6244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262">
            <text:p>0,047</text:p>
          </table:table-cell>
          <table:table-cell table:style-name="ce12N2" office:value-type="float" office:value="20.93">
            <text:p>2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00.76">
            <text:p>5300,76</text:p>
          </table:table-cell>
          <table:table-cell table:style-name="ce12N2" office:value-type="float" office:value="5.3">
            <text:p>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71">
            <text:p>47,7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58.15">
            <text:p>5758,15</text:p>
          </table:table-cell>
          <table:table-cell table:style-name="ce12N2" office:value-type="float" office:value="403.07">
            <text:p>40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51698337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0">
            <text:p>3097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26.1">
            <text:p>572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64">
            <text:p>0,052</text:p>
          </table:table-cell>
          <table:table-cell table:style-name="ce12N2" office:value-type="float" office:value="7.48">
            <text:p>7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2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65.15">
            <text:p>4765,15</text:p>
          </table:table-cell>
          <table:table-cell table:style-name="ce12N2" office:value-type="float" office:value="4.77">
            <text:p>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89">
            <text:p>42,8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5646.08">
            <text:p>5646,08</text:p>
          </table:table-cell>
          <table:table-cell table:style-name="ce12N2" office:value-type="float" office:value="395.22">
            <text:p>39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41478725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1">
            <text:p>3097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71">
            <text:p>0,047</text:p>
          </table:table-cell>
          <table:table-cell table:style-name="ce12N2" office:value-type="float" office:value="237.71">
            <text:p>237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08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384.43">
            <text:p>65384,43</text:p>
          </table:table-cell>
          <table:table-cell table:style-name="ce12N2" office:value-type="float" office:value="65.38">
            <text:p>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46">
            <text:p>588,4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088.2">
            <text:p>75088,20</text:p>
          </table:table-cell>
          <table:table-cell table:style-name="ce12N2" office:value-type="float" office:value="3039.24">
            <text:p>303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71775280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7">
            <text:p>309757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58.1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51.12">
            <text:p>785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50.37">
            <text:p>775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914">
            <text:p>3,491</text:p>
          </table:table-cell>
          <table:table-cell table:style-name="ce12N2" office:value-type="float" office:value="5000">
            <text:p>5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5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89.44">
            <text:p>6189,44</text:p>
          </table:table-cell>
          <table:table-cell table:style-name="ce12N2" office:value-type="float" office:value="6.19">
            <text:p>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.7">
            <text:p>55,7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00.75">
            <text:p>100,75</text:p>
          </table:table-cell>
          <table:table-cell table:style-name="ce12N2" office:value-type="float" office:value="7750.37">
            <text:p>7750,37</text:p>
          </table:table-cell>
          <table:table-cell table:style-name="ce12N2" office:value-type="float" office:value="930.04">
            <text:p>93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3005123000103550010005581901341714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8">
            <text:p>3097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49.03">
            <text:p>1504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12.1">
            <text:p>1371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">
            <text:p>0,004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49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945.98">
            <text:p>11945,98</text:p>
          </table:table-cell>
          <table:table-cell table:style-name="ce12N2" office:value-type="float" office:value="11.95">
            <text:p>1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.51">
            <text:p>107,5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336.93">
            <text:p>1336,93</text:p>
          </table:table-cell>
          <table:table-cell table:style-name="ce12N2" office:value-type="float" office:value="13712.1">
            <text:p>13712,10</text:p>
          </table:table-cell>
          <table:table-cell table:style-name="ce12N2" office:value-type="float" office:value="548.48">
            <text:p>54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4514989168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9">
            <text:p>30975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0.6">
            <text:p>176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4.4">
            <text:p>164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13">
            <text:p>0,023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6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7.84">
            <text:p>1387,84</text:p>
          </table:table-cell>
          <table:table-cell table:style-name="ce12N2" office:value-type="float" office:value="1.38">
            <text:p>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49">
            <text:p>12,4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6.2">
            <text:p>116,20</text:p>
          </table:table-cell>
          <table:table-cell table:style-name="ce12N2" office:value-type="float" office:value="1644.4">
            <text:p>1644,4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0130643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0">
            <text:p>3097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19.61">
            <text:p>60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84.84">
            <text:p>54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6">
            <text:p>0,002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1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78.4">
            <text:p>4778,40</text:p>
          </table:table-cell>
          <table:table-cell table:style-name="ce12N2" office:value-type="float" office:value="4.78">
            <text:p>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01">
            <text:p>43,01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34.77">
            <text:p>534,77</text:p>
          </table:table-cell>
          <table:table-cell table:style-name="ce12N2" office:value-type="float" office:value="5484.84">
            <text:p>5484,84</text:p>
          </table:table-cell>
          <table:table-cell table:style-name="ce12N2" office:value-type="float" office:value="219.39">
            <text:p>21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81507392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1">
            <text:p>30976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1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62.02">
            <text:p>996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48.45">
            <text:p>9648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98">
            <text:p>0,005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62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05.73">
            <text:p>8405,73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65">
            <text:p>75,6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13.57">
            <text:p>313,57</text:p>
          </table:table-cell>
          <table:table-cell table:style-name="ce12N2" office:value-type="float" office:value="9648.45">
            <text:p>9648,45</text:p>
          </table:table-cell>
          <table:table-cell table:style-name="ce12N2" office:value-type="float" office:value="385.94">
            <text:p>38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1591441479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6">
            <text:p>3097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1575">
            <text:p>0,062</text:p>
          </table:table-cell>
          <table:table-cell table:style-name="ce12N2" office:value-type="float" office:value="28.45">
            <text:p>2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4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97.15">
            <text:p>4597,15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37">
            <text:p>41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47">
            <text:p>5447,00</text:p>
          </table:table-cell>
          <table:table-cell table:style-name="ce12N2" office:value-type="float" office:value="381.29">
            <text:p>38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441701124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8">
            <text:p>309768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900.510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9696">
            <text:p>0,130</text:p>
          </table:table-cell>
          <table:table-cell table:style-name="ce12N2" office:value-type="float" office:value="268.8">
            <text:p>26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7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43.14">
            <text:p>8243,14</text:p>
          </table:table-cell>
          <table:table-cell table:style-name="ce12N2" office:value-type="float" office:value="8.24">
            <text:p>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19">
            <text:p>74,1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67.04">
            <text:p>9767,04</text:p>
          </table:table-cell>
          <table:table-cell table:style-name="ce12N2" office:value-type="float" office:value="683.69">
            <text:p>68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7771310034735500500090051019137096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9">
            <text:p>309769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30.23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5.02">
            <text:p>89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0.78">
            <text:p>85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6">
            <text:p>0,004</text:p>
          </table:table-cell>
          <table:table-cell table:style-name="ce12N2" office:value-type="float" office:value="4.53">
            <text:p>4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1.19">
            <text:p>741,19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67">
            <text:p>6,6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4.24">
            <text:p>44,24</text:p>
          </table:table-cell>
          <table:table-cell table:style-name="ce12N2" office:value-type="float" office:value="850.78">
            <text:p>850,78</text:p>
          </table:table-cell>
          <table:table-cell table:style-name="ce12N2" office:value-type="float" office:value="34.03">
            <text:p>3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302391316675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70">
            <text:p>309770</text:p>
          </table:table-cell>
          <table:table-cell table:style-name="ce0" table:number-columns-spanned="4" table:number-rows-spanned="1" office:value-type="string" calcext:value-type="string">
            <text:p>15.599 - FUNDICAO CLAUDIENSE EIRELI</text:p>
          </table:table-cell>
          <table:covered-table-cell table:number-columns-repeated="3"/>
          <table:table-cell table:style-name="ce0" office:value-type="string" calcext:value-type="string">
            <text:p>2.0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9/07/2026</text:p>
          </table:table-cell>
          <table:table-cell table:style-name="ce141" office:value-type="string" calcext:value-type="string">
            <text:p>Nota</text:p>
          </table:table-cell>
          <table:table-cell table:style-name="ce12N2" office:value-type="float" office:value="121271.3">
            <text:p>12127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13869.75">
            <text:p>113869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9565">
            <text:p>6,396</text:p>
          </table:table-cell>
          <table:table-cell table:style-name="ce12N2" office:value-type="float" office:value="10691">
            <text:p>1069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1.27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.17">
            <text:p>58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7401.55">
            <text:p>7401,55</text:p>
          </table:table-cell>
          <table:table-cell table:style-name="ce12N2" office:value-type="float" office:value="113869.75">
            <text:p>113869,75</text:p>
          </table:table-cell>
          <table:table-cell table:style-name="ce12N2" office:value-type="float" office:value="7970.89">
            <text:p>797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332564950001735500100000201613563014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31">
            <text:p>131,00</text:p>
          </table:table-cell>
          <table:table-cell table:style-name="ce26N2" office:value-type="float" office:value="348.85">
            <text:p>348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643.92">
            <text:p>44643,92</text:p>
          </table:table-cell>
          <table:table-cell table:style-name="ce26N2" office:value-type="float" office:value="3362349.03">
            <text:p>3362349,03</text:p>
          </table:table-cell>
          <table:table-cell table:style-name="ce26N2" office:value-type="float" office:value="220869.18">
            <text:p>220869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82033.97">
            <text:p>3482033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8.51">
            <text:p>348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786.527107">
            <text:p>3786,527</text:p>
          </table:table-cell>
          <table:table-cell table:style-name="ce26N2" office:value-type="float" office:value="3437738.9">
            <text:p>3437738,90</text:p>
          </table:table-cell>
          <table:table-cell table:style-name="ce26N2" office:value-type="float" office:value="3482033.97">
            <text:p>3482033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714253.51">
            <text:p>2714253,51</text:p>
          </table:table-cell>
          <table:table-cell table:style-name="ce26N2" office:value-type="float" office:value="2714.38">
            <text:p>2714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4428.38">
            <text:p>24428,3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5819.69">
            <text:p>85819,6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02">
            <text:p>40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08" meta:object-count="0"/>
    <meta:generator>LibreOffice/4.3.0.4$Windows_x86 LibreOffice_project/62ad5818884a2fc2e5780dd45466868d41009ec0</meta:generator>
  </office:meta>
</office:document-meta>
</file>