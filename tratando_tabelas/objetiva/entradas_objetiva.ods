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5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0">
            <text:p>3075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0.48">
            <text:p>111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33">
            <text:p>0,295</text:p>
          </table:table-cell>
          <table:table-cell table:style-name="ce12N2" office:value-type="float" office:value="3.82">
            <text:p>3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7.78">
            <text:p>67,78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11715382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3">
            <text:p>3075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41975247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9">
            <text:p>307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66">
            <text:p>32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21.6">
            <text:p>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71296796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2">
            <text:p>307592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723.8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0.35">
            <text:p>578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025">
            <text:p>0,794</text:p>
          </table:table-cell>
          <table:table-cell table:style-name="ce12N2" office:value-type="float" office:value="145.05">
            <text:p>1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13.51">
            <text:p>513,51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210.68">
            <text:p>2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0213052500017755003000723800153158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6">
            <text:p>307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5.21">
            <text:p>21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7.21">
            <text:p>67,21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144.76">
            <text:p>14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21867579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7">
            <text:p>30760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1.72">
            <text:p>126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">
            <text:p>0,0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9.72">
            <text:p>39,72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85.54">
            <text:p>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311469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2">
            <text:p>30761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6.25">
            <text:p>525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125.98">
            <text:p>512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93093">
            <text:p>42,931</text:p>
          </table:table-cell>
          <table:table-cell table:style-name="ce12N2" office:value-type="float" office:value="332.15">
            <text:p>33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0.27">
            <text:p>130,27</text:p>
          </table:table-cell>
          <table:table-cell table:style-name="ce12N2" office:value-type="float" office:value="4912.66">
            <text:p>4912,66</text:p>
          </table:table-cell>
          <table:table-cell table:style-name="ce12N2" office:value-type="float" office:value="343.9">
            <text:p>3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1913681000134550010001798341462989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2">
            <text:p>3076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955.92">
            <text:p>190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252118">
            <text:p>12,252</text:p>
          </table:table-cell>
          <table:table-cell table:style-name="ce12N2" office:value-type="float" office:value="5183.76">
            <text:p>5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.95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55.66">
            <text:p>255,66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12356.96">
            <text:p>123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1511727836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5">
            <text:p>307635</text:p>
          </table:table-cell>
          <table:table-cell table:style-name="ce0" table:number-columns-spanned="4" table:number-rows-spanned="1" office:value-type="string" calcext:value-type="string">
            <text:p>38.606 - FIOLUX INDUSTRIA E COMERCIO LTDA</text:p>
          </table:table-cell>
          <table:covered-table-cell table:number-columns-repeated="3"/>
          <table:table-cell table:style-name="ce0" office:value-type="string" calcext:value-type="string">
            <text:p>20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1.5">
            <text:p>47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94">
            <text:p>0,192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23.9">
            <text:p>423,9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521.72">
            <text:p>52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96420914000342550010000205081009327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3">
            <text:p>30764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4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05973">
            <text:p>3,606</text:p>
          </table:table-cell>
          <table:table-cell table:style-name="ce12N2" office:value-type="float" office:value="435.56">
            <text:p>435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4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1760.43">
            <text:p>17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4861238055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9">
            <text:p>307659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4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5">
            <text:p>0,02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62.37">
            <text:p>6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4811931368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8">
            <text:p>3076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3.8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8.3">
            <text:p>130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304">
            <text:p>0,157</text:p>
          </table:table-cell>
          <table:table-cell table:style-name="ce12N2" office:value-type="float" office:value="172.38">
            <text:p>17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09.79">
            <text:p>409,79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882.6">
            <text:p>88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683374000300550030006138381226820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3">
            <text:p>307723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8">
            <text:p>0,10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08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511189148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8">
            <text:p>30774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2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.84">
            <text:p>5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88">
            <text:p>0,022</text:p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16.01">
            <text:p>1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2">
            <text:p>445,32</text:p>
          </table:table-cell>
          <table:table-cell table:style-name="ce12N2" office:value-type="float" office:value="80.54">
            <text:p>80,5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205114044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9">
            <text:p>307769</text:p>
          </table:table-cell>
          <table:table-cell table:style-name="ce0" table:number-columns-spanned="4" table:number-rows-spanned="1" office:value-type="string" calcext:value-type="string">
            <text:p>15.036 - MAXI RUBBER INDUSTRIAS QUIMICAS LTDA</text:p>
          </table:table-cell>
          <table:covered-table-cell table:number-columns-repeated="3"/>
          <table:table-cell table:style-name="ce0" office:value-type="string" calcext:value-type="string">
            <text:p>234.24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91.62">
            <text:p>38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344">
            <text:p>0,332</text:p>
          </table:table-cell>
          <table:table-cell table:style-name="ce12N2" office:value-type="float" office:value="655.98">
            <text:p>6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92.82">
            <text:p>492,82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2666.92">
            <text:p>266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283822000470550050002342431280518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4">
            <text:p>30777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">
            <text:p>0,006</text:p>
          </table:table-cell>
          <table:table-cell table:style-name="ce12N2" office:value-type="float" office:value="1329.5">
            <text:p>13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0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1218.07">
            <text:p>121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81761707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7">
            <text:p>3077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4">
            <text:p>0,023</text:p>
          </table:table-cell>
          <table:table-cell table:style-name="ce12N2" office:value-type="float" office:value="26.5">
            <text:p>2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08.96">
            <text:p>3508,96</text:p>
          </table:table-cell>
          <table:table-cell table:style-name="ce12N2" office:value-type="float" office:value="245.63">
            <text:p>24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301462841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8">
            <text:p>3077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90.45">
            <text:p>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91931360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9">
            <text:p>3077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63.92">
            <text:p>76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8">
            <text:p>0,075</text:p>
          </table:table-cell>
          <table:table-cell table:style-name="ce12N2" office:value-type="float" office:value="11.12">
            <text:p>1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7.75">
            <text:p>467,75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503.73">
            <text:p>50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81943773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1">
            <text:p>3077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39">
            <text:p>220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7">
            <text:p>0,006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34.36">
            <text:p>134,36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144.69">
            <text:p>14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71361895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2">
            <text:p>3077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9.37">
            <text:p>3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4">
            <text:p>0,011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262.87">
            <text:p>26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61974864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3">
            <text:p>307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98.75">
            <text:p>799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8">
            <text:p>0,022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9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525.74">
            <text:p>52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513791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4">
            <text:p>307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08">
            <text:p>0,001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18.09">
            <text:p>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415792392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5">
            <text:p>307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31174760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6">
            <text:p>307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1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462.75">
            <text:p>4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11494764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8">
            <text:p>307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39.96">
            <text:p>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01154769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9">
            <text:p>3077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8.81">
            <text:p>398,81</text:p>
          </table:table-cell>
          <table:table-cell table:style-name="ce12N2" office:value-type="float" office:value="27.92">
            <text:p>2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91883203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0">
            <text:p>307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1.93">
            <text:p>323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336">
            <text:p>0,069</text:p>
          </table:table-cell>
          <table:table-cell table:style-name="ce12N2" office:value-type="float" office:value="7.38">
            <text:p>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97.25">
            <text:p>197,25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212.43">
            <text:p>2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814303930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1">
            <text:p>307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752">
            <text:p>0,028</text:p>
          </table:table-cell>
          <table:table-cell table:style-name="ce12N2" office:value-type="float" office:value="76.12">
            <text:p>76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2701.06">
            <text:p>27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71619774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2">
            <text:p>307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61356616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0">
            <text:p>307810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6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89.76">
            <text:p>1778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67">
            <text:p>1,897</text:p>
          </table:table-cell>
          <table:table-cell table:style-name="ce12N2" office:value-type="float" office:value="600">
            <text:p>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8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.5">
            <text:p>4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085.76">
            <text:p>1085,76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1169.28">
            <text:p>116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6212048000302550010000069471152455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5">
            <text:p>3078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6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36">
            <text:p>0,003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66.86">
            <text:p>6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68516254461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0">
            <text:p>30782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5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96">
            <text:p>0,073</text:p>
          </table:table-cell>
          <table:table-cell table:style-name="ce12N2" office:value-type="float" office:value="28.51">
            <text:p>2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46.03">
            <text:p>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510811000392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2">
            <text:p>307822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24.63">
            <text:p>368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27">
            <text:p>0,843</text:p>
          </table:table-cell>
          <table:table-cell table:style-name="ce12N2" office:value-type="float" office:value="445">
            <text:p>4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824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59.13">
            <text:p>1159,13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2496.59">
            <text:p>249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6371669273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3">
            <text:p>307823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5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29.3">
            <text:p>4012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7756">
            <text:p>4,478</text:p>
          </table:table-cell>
          <table:table-cell table:style-name="ce12N2" office:value-type="float" office:value="6044.42">
            <text:p>604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12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94">
            <text:p>44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63.47">
            <text:p>163,47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2797.62">
            <text:p>279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204129000106550010001415621939014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4">
            <text:p>3078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0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29">
            <text:p>0,403</text:p>
          </table:table-cell>
          <table:table-cell table:style-name="ce12N2" office:value-type="float" office:value="20.4">
            <text:p>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4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318.28">
            <text:p>31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041117539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6">
            <text:p>30782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3.62752">
            <text:p>173,628</text:p>
          </table:table-cell>
          <table:table-cell table:style-name="ce12N2" office:value-type="float" office:value="10950.72">
            <text:p>1095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.870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11540.96">
            <text:p>1154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41595075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7">
            <text:p>30782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6.05">
            <text:p>3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3">
            <text:p>0,01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6.97">
            <text:p>116,97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143.96">
            <text:p>14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69158114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8">
            <text:p>30782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.58">
            <text:p>1003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5">
            <text:p>0,02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3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519.48">
            <text:p>519,48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380.56">
            <text:p>38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215721587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6">
            <text:p>30784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063">
            <text:p>0,044</text:p>
          </table:table-cell>
          <table:table-cell table:style-name="ce12N2" office:value-type="float" office:value="10.31">
            <text:p>1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137.69">
            <text:p>13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351324832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7">
            <text:p>30784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93.68">
            <text:p>6839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65231.14">
            <text:p>6523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46851">
            <text:p>1,947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39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162.54">
            <text:p>3162,54</text:p>
          </table:table-cell>
          <table:table-cell table:style-name="ce12N2" office:value-type="float" office:value="64947.12">
            <text:p>64947,12</text:p>
          </table:table-cell>
          <table:table-cell table:style-name="ce12N2" office:value-type="float" office:value="3325.85">
            <text:p>33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915746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8">
            <text:p>3078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4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6">
            <text:p>0,006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199.9">
            <text:p>1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451488912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0">
            <text:p>30785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6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552">
            <text:p>0,262</text:p>
          </table:table-cell>
          <table:table-cell table:style-name="ce12N2" office:value-type="float" office:value="47.4">
            <text:p>4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5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458.86">
            <text:p>4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6351241633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1">
            <text:p>3078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6">
            <text:p>0,009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4.37">
            <text:p>14,37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19.35">
            <text:p>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81843624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3">
            <text:p>307853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27734">
            <text:p>4,277</text:p>
          </table:table-cell>
          <table:table-cell table:style-name="ce12N2" office:value-type="float" office:value="944.34">
            <text:p>944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1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9.57">
            <text:p>11809,57</text:p>
          </table:table-cell>
          <table:table-cell table:style-name="ce12N2" office:value-type="float" office:value="826.67">
            <text:p>82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3109902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4">
            <text:p>3078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.61">
            <text:p>627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9">
            <text:p>0,033</text:p>
          </table:table-cell>
          <table:table-cell table:style-name="ce12N2" office:value-type="float" office:value="284.1">
            <text:p>28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7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59.22">
            <text:p>359,22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280.59">
            <text:p>28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31570200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2">
            <text:p>307862</text:p>
          </table:table-cell>
          <table:table-cell table:style-name="ce0" table:number-columns-spanned="4" table:number-rows-spanned="1" office:value-type="string" calcext:value-type="string">
            <text:p>576 - BRASILUX INDUSTRIA COM IMP E EXP LTDA</text:p>
          </table:table-cell>
          <table:covered-table-cell table:number-columns-repeated="3"/>
          <table:table-cell table:style-name="ce0" office:value-type="string" calcext:value-type="string">
            <text:p>1.45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748.12">
            <text:p>1077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553028">
            <text:p>19,553</text:p>
          </table:table-cell>
          <table:table-cell table:style-name="ce12N2" office:value-type="float" office:value="2505">
            <text:p>250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74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9572.16">
            <text:p>9572,16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6872.32">
            <text:p>68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374121000101550010014500791725248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4">
            <text:p>3078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20.11">
            <text:p>77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7">
            <text:p>0,031</text:p>
          </table:table-cell>
          <table:table-cell table:style-name="ce12N2" office:value-type="float" office:value="47.04">
            <text:p>4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2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243.01">
            <text:p>243,01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523.4">
            <text:p>5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81170410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5">
            <text:p>3078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.88">
            <text:p>5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">
            <text:p>0,003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37.21">
            <text:p>3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421807808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4">
            <text:p>3078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3.82">
            <text:p>31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344">
            <text:p>0,025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93.1">
            <text:p>193,1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118.83">
            <text:p>1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499180355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5">
            <text:p>3078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6.51">
            <text:p>1859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456">
            <text:p>0,069</text:p>
          </table:table-cell>
          <table:table-cell table:style-name="ce12N2" office:value-type="float" office:value="62.14">
            <text:p>6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9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59.29">
            <text:p>159,29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737.49">
            <text:p>7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017591236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6">
            <text:p>3078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">
            <text:p>0,019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7.89">
            <text:p>3077,89</text:p>
          </table:table-cell>
          <table:table-cell table:style-name="ce12N2" office:value-type="float" office:value="215.45">
            <text:p>2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41287532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6">
            <text:p>3079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64.14">
            <text:p>1766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">
            <text:p>0,06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6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02.38">
            <text:p>102,38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749.73">
            <text:p>74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21135587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7">
            <text:p>3079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4.66">
            <text:p>112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92">
            <text:p>0,081</text:p>
          </table:table-cell>
          <table:table-cell table:style-name="ce12N2" office:value-type="float" office:value="17.49">
            <text:p>17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86.9">
            <text:p>686,9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739.74">
            <text:p>73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11779618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8">
            <text:p>307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888">
            <text:p>0,007</text:p>
          </table:table-cell>
          <table:table-cell table:style-name="ce12N2" office:value-type="float" office:value="4.74">
            <text:p>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113.82">
            <text:p>1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31149779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9">
            <text:p>3079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1">
            <text:p>0,001</text:p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3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1360.46">
            <text:p>136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61627295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0">
            <text:p>3079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8.83">
            <text:p>8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1.16">
            <text:p>1231,16</text:p>
          </table:table-cell>
          <table:table-cell table:style-name="ce12N2" office:value-type="float" office:value="86.18">
            <text:p>8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51191076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5">
            <text:p>307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.52">
            <text:p>70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84">
            <text:p>0,007</text:p>
          </table:table-cell>
          <table:table-cell table:style-name="ce12N2" office:value-type="float" office:value="1.35">
            <text:p>1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.78">
            <text:p>17,78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48.42">
            <text:p>4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01116336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6">
            <text:p>307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3">
            <text:p>0,155</text:p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7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880.54">
            <text:p>8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11550065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7">
            <text:p>307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56">
            <text:p>0,116</text:p>
          </table:table-cell>
          <table:table-cell table:style-name="ce12N2" office:value-type="float" office:value="19.82">
            <text:p>1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323.85">
            <text:p>32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21946225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8">
            <text:p>307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6.09">
            <text:p>733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1">
            <text:p>0,032</text:p>
          </table:table-cell>
          <table:table-cell table:style-name="ce12N2" office:value-type="float" office:value="14.57">
            <text:p>1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1.73">
            <text:p>171,73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365.84">
            <text:p>36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3193440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9">
            <text:p>307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28.09">
            <text:p>1692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1512">
            <text:p>0,112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2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5.85">
            <text:p>285,85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1164.96">
            <text:p>116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41568815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0">
            <text:p>307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9.9">
            <text:p>183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92">
            <text:p>0,110</text:p>
          </table:table-cell>
          <table:table-cell table:style-name="ce12N2" office:value-type="float" office:value="38.67">
            <text:p>3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9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723.06">
            <text:p>723,06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1062.83">
            <text:p>106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51868341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1">
            <text:p>307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5105.76">
            <text:p>44510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441507.04">
            <text:p>44150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004156">
            <text:p>12,004</text:p>
          </table:table-cell>
          <table:table-cell table:style-name="ce12N2" office:value-type="float" office:value="1901.11">
            <text:p>190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5.10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98.72">
            <text:p>3598,72</text:p>
          </table:table-cell>
          <table:table-cell table:style-name="ce12N2" office:value-type="float" office:value="435689.29">
            <text:p>435689,29</text:p>
          </table:table-cell>
          <table:table-cell table:style-name="ce12N2" office:value-type="float" office:value="26553.19">
            <text:p>2655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61219885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3">
            <text:p>307923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99">
            <text:p>0,980</text:p>
          </table:table-cell>
          <table:table-cell table:style-name="ce12N2" office:value-type="float" office:value="404.02">
            <text:p>40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4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2529.78">
            <text:p>252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622111019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2">
            <text:p>30793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6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58.73">
            <text:p>130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482">
            <text:p>0,090</text:p>
          </table:table-cell>
          <table:table-cell table:style-name="ce12N2" office:value-type="float" office:value="214.79">
            <text:p>21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5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843.5">
            <text:p>843,5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562.95">
            <text:p>56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624015701755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7">
            <text:p>30793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5.2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1.98">
            <text:p>1492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508">
            <text:p>1,751</text:p>
          </table:table-cell>
          <table:table-cell table:style-name="ce12N2" office:value-type="float" office:value="933.2">
            <text:p>93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21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1.68">
            <text:p>61,68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1040.22">
            <text:p>10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42774001209550010002152021410874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5">
            <text:p>307945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045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072">
            <text:p>1,711</text:p>
          </table:table-cell>
          <table:table-cell table:style-name="ce12N2" office:value-type="float" office:value="549.12">
            <text:p>54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86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3223.76">
            <text:p>32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10524837000193550070000250451252822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6">
            <text:p>307946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050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33.6">
            <text:p>2943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33.6">
            <text:p>294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56">
            <text:p>3,456</text:p>
          </table:table-cell>
          <table:table-cell table:style-name="ce12N2" office:value-type="float" office:value="3279.36">
            <text:p>327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43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33.6">
            <text:p>29433,60</text:p>
          </table:table-cell>
          <table:table-cell table:style-name="ce12N2" office:value-type="float" office:value="3532.03">
            <text:p>353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61.09">
            <text:p>36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195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361,09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2260510524837000193550070000250501985363065</text:p>
          </table:table-cell>
          <table:table-cell table:style-name="ce0" office:value-type="string" calcext:value-type="string">
            <text:p>3226052874377700016557001000019195100022066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7">
            <text:p>307947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3.50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1.6">
            <text:p>960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98028">
            <text:p>3,098</text:p>
          </table:table-cell>
          <table:table-cell table:style-name="ce12N2" office:value-type="float" office:value="154.68">
            <text:p>154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0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52.72">
            <text:p>252,72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609.84">
            <text:p>6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35091928895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0">
            <text:p>307950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8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9.09">
            <text:p>159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">
            <text:p>0,007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0.34">
            <text:p>50,34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108.41">
            <text:p>10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874148130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1">
            <text:p>307951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454.44">
            <text:p>11345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58192">
            <text:p>27,582</text:p>
          </table:table-cell>
          <table:table-cell table:style-name="ce12N2" office:value-type="float" office:value="5167.5">
            <text:p>516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454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71.21">
            <text:p>3571,21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7691.83">
            <text:p>769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79157511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2">
            <text:p>307952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598.15">
            <text:p>4359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225.81">
            <text:p>4222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78405">
            <text:p>8,784</text:p>
          </table:table-cell>
          <table:table-cell table:style-name="ce12N2" office:value-type="float" office:value="1661">
            <text:p>166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598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372.34">
            <text:p>1372,34</text:p>
          </table:table-cell>
          <table:table-cell table:style-name="ce12N2" office:value-type="float" office:value="42225.81">
            <text:p>42225,81</text:p>
          </table:table-cell>
          <table:table-cell table:style-name="ce12N2" office:value-type="float" office:value="2955.81">
            <text:p>29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21575113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3">
            <text:p>30795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6.63">
            <text:p>1441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31518">
            <text:p>5,132</text:p>
          </table:table-cell>
          <table:table-cell table:style-name="ce12N2" office:value-type="float" office:value="803.25">
            <text:p>80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453.79">
            <text:p>453,79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31575112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4">
            <text:p>30795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782.05">
            <text:p>12678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850963">
            <text:p>24,851</text:p>
          </table:table-cell>
          <table:table-cell table:style-name="ce12N2" office:value-type="float" office:value="5607.96">
            <text:p>5607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78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990.72">
            <text:p>3990,72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8595.4">
            <text:p>85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4157511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5">
            <text:p>30795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4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7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593.23">
            <text:p>59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4228157457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94">
            <text:p>30799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23.34">
            <text:p>4552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90.4">
            <text:p>4409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08">
            <text:p>0,581</text:p>
          </table:table-cell>
          <table:table-cell table:style-name="ce12N2" office:value-type="float" office:value="630">
            <text:p>6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23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432.94">
            <text:p>1432,94</text:p>
          </table:table-cell>
          <table:table-cell table:style-name="ce12N2" office:value-type="float" office:value="44090.4">
            <text:p>44090,40</text:p>
          </table:table-cell>
          <table:table-cell table:style-name="ce12N2" office:value-type="float" office:value="3086.33">
            <text:p>308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18.98">
            <text:p>91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918,9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41459019340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95">
            <text:p>30799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86.51">
            <text:p>3548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69.5">
            <text:p>3436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8">
            <text:p>0,588</text:p>
          </table:table-cell>
          <table:table-cell table:style-name="ce12N2" office:value-type="float" office:value="420">
            <text:p>4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48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34369.5">
            <text:p>34369,50</text:p>
          </table:table-cell>
          <table:table-cell table:style-name="ce12N2" office:value-type="float" office:value="2405.87">
            <text:p>240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6.37">
            <text:p>71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716,37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51460937754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98">
            <text:p>307998</text:p>
          </table:table-cell>
          <table:table-cell table:style-name="ce0" table:number-columns-spanned="4" table:number-rows-spanned="1" office:value-type="string" calcext:value-type="string">
            <text:p>584 - PONTO DAS DUCHAS COMERCIO E INDUSTRIA LTDA</text:p>
          </table:table-cell>
          <table:covered-table-cell table:number-columns-repeated="3"/>
          <table:table-cell table:style-name="ce0" office:value-type="string" calcext:value-type="string">
            <text:p>5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6994">
            <text:p>1,470</text:p>
          </table:table-cell>
          <table:table-cell table:style-name="ce12N2" office:value-type="float" office:value="512.26">
            <text:p>512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6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1388.45">
            <text:p>138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01130182000188550010000057711309846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2">
            <text:p>308002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60.41">
            <text:p>516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60.41">
            <text:p>5160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89">
            <text:p>0,041</text:p>
          </table:table-cell>
          <table:table-cell table:style-name="ce12N2" office:value-type="float" office:value="10.49">
            <text:p>1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6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60.41">
            <text:p>5160,41</text:p>
          </table:table-cell>
          <table:table-cell table:style-name="ce12N2" office:value-type="float" office:value="361.23">
            <text:p>36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0.99">
            <text:p>1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7.567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21/05/2026</text:p>
          </table:table-cell>
          <table:table-cell table:style-name="ce12" office:value-type="string" calcext:value-type="string">
            <text:p>110,99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3576045000150550010000052941001864243</text:p>
          </table:table-cell>
          <table:table-cell table:style-name="ce0" office:value-type="string" calcext:value-type="string">
            <text:p>3526050522209200076357002000477567100673015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5">
            <text:p>30800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52.9">
            <text:p>160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547.6">
            <text:p>155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744">
            <text:p>0,277</text:p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5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05.3">
            <text:p>505,30</text:p>
          </table:table-cell>
          <table:table-cell table:style-name="ce12N2" office:value-type="float" office:value="15547.6">
            <text:p>15547,60</text:p>
          </table:table-cell>
          <table:table-cell table:style-name="ce12N2" office:value-type="float" office:value="1088.33">
            <text:p>108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24.06">
            <text:p>32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324,0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61571234740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6">
            <text:p>30800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1.42">
            <text:p>514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4979.58">
            <text:p>4979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713">
            <text:p>0,024</text:p>
          </table:table-cell>
          <table:table-cell table:style-name="ce12N2" office:value-type="float" office:value="30.35">
            <text:p>3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1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61.84">
            <text:p>161,84</text:p>
          </table:table-cell>
          <table:table-cell table:style-name="ce12N2" office:value-type="float" office:value="4979.58">
            <text:p>4979,58</text:p>
          </table:table-cell>
          <table:table-cell table:style-name="ce12N2" office:value-type="float" office:value="348.56">
            <text:p>34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3.79">
            <text:p>10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3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103,79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5260560398369000800550010006016381791672199</text:p>
          </table:table-cell>
          <table:table-cell table:style-name="ce0" office:value-type="string" calcext:value-type="string">
            <text:p>352605113895650002005700500039993710008620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4">
            <text:p>308014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76545">
            <text:p>14,677</text:p>
          </table:table-cell>
          <table:table-cell table:style-name="ce12N2" office:value-type="float" office:value="2098.89">
            <text:p>2098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1.62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9913.85">
            <text:p>9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6481567176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5">
            <text:p>308015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64.5743">
            <text:p>764,574</text:p>
          </table:table-cell>
          <table:table-cell table:style-name="ce12N2" office:value-type="float" office:value="7156.7">
            <text:p>715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8.03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29962.13">
            <text:p>2996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65012523439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8">
            <text:p>3080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0.15">
            <text:p>749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33">
            <text:p>703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">
            <text:p>0,000</text:p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57.15">
            <text:p>457,15</text:p>
          </table:table-cell>
          <table:table-cell table:style-name="ce12N2" office:value-type="float" office:value="7033">
            <text:p>7033,00</text:p>
          </table:table-cell>
          <table:table-cell table:style-name="ce12N2" office:value-type="float" office:value="492.31">
            <text:p>4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6177266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0">
            <text:p>308020</text:p>
          </table:table-cell>
          <table:table-cell table:style-name="ce0" table:number-columns-spanned="4" table:number-rows-spanned="1" office:value-type="string" calcext:value-type="string">
            <text:p>5.133 - CIA IND H CARLOS SCHNEIDER</text:p>
          </table:table-cell>
          <table:covered-table-cell table:number-columns-repeated="3"/>
          <table:table-cell table:style-name="ce0" office:value-type="string" calcext:value-type="string">
            <text:p>2.272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49.85">
            <text:p>3564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31713.92">
            <text:p>31713,92</text:p>
          </table:table-cell>
          <table:table-cell table:style-name="ce12N2" office:value-type="float" office:value="1760.13">
            <text:p>1760,13</text:p>
          </table:table-cell>
          <table:table-cell table:style-name="ce12N3" office:value-type="float" office:value="0.144621">
            <text:p>0,145</text:p>
          </table:table-cell>
          <table:table-cell table:style-name="ce12N2" office:value-type="float" office:value="227.72">
            <text:p>22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4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.69">
            <text:p>56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175.8">
            <text:p>2175,80</text:p>
          </table:table-cell>
          <table:table-cell table:style-name="ce12N2" office:value-type="float" office:value="33474.05">
            <text:p>33474,05</text:p>
          </table:table-cell>
          <table:table-cell table:style-name="ce12N2" office:value-type="float" office:value="2333.49">
            <text:p>233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709955001265550010022729501184351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1">
            <text:p>308021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3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1734">
            <text:p>0,342</text:p>
          </table:table-cell>
          <table:table-cell table:style-name="ce12N2" office:value-type="float" office:value="342">
            <text:p>3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248.4">
            <text:p>24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301207265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2">
            <text:p>30802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31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783.58">
            <text:p>25578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54587.36">
            <text:p>25458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543016">
            <text:p>20,543</text:p>
          </table:table-cell>
          <table:table-cell table:style-name="ce12N2" office:value-type="float" office:value="27385.1">
            <text:p>2738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78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96.22">
            <text:p>1196,22</text:p>
          </table:table-cell>
          <table:table-cell table:style-name="ce12N2" office:value-type="float" office:value="254587.36">
            <text:p>254587,36</text:p>
          </table:table-cell>
          <table:table-cell table:style-name="ce12N2" office:value-type="float" office:value="17821.12">
            <text:p>178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311175241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4">
            <text:p>30802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8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81.85">
            <text:p>13288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1387.76">
            <text:p>13138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182212">
            <text:p>19,182</text:p>
          </table:table-cell>
          <table:table-cell table:style-name="ce12N2" office:value-type="float" office:value="29152.4">
            <text:p>2915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2.88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494.09">
            <text:p>1494,09</text:p>
          </table:table-cell>
          <table:table-cell table:style-name="ce12N2" office:value-type="float" office:value="131387.76">
            <text:p>131387,76</text:p>
          </table:table-cell>
          <table:table-cell table:style-name="ce12N2" office:value-type="float" office:value="9197.14">
            <text:p>919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851683661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5">
            <text:p>3080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2.48">
            <text:p>369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6.25">
            <text:p>357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75">
            <text:p>0,03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6.23">
            <text:p>116,23</text:p>
          </table:table-cell>
          <table:table-cell table:style-name="ce12N2" office:value-type="float" office:value="3576.25">
            <text:p>3576,25</text:p>
          </table:table-cell>
          <table:table-cell table:style-name="ce12N2" office:value-type="float" office:value="250.34">
            <text:p>25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61855007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6">
            <text:p>30802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821.32">
            <text:p>32082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">
            <text:p>106,00</text:p>
          </table:table-cell>
          <table:table-cell table:style-name="ce12N2" office:value-type="float" office:value="299635.29">
            <text:p>299635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9.717298">
            <text:p>709,717</text:p>
          </table:table-cell>
          <table:table-cell table:style-name="ce12N2" office:value-type="float" office:value="1826.71">
            <text:p>1826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0.82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1186.03">
            <text:p>21186,03</text:p>
          </table:table-cell>
          <table:table-cell table:style-name="ce12N2" office:value-type="float" office:value="299635.29">
            <text:p>299635,29</text:p>
          </table:table-cell>
          <table:table-cell table:style-name="ce12N2" office:value-type="float" office:value="20082.92">
            <text:p>2008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0913296226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7">
            <text:p>308027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4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59.89">
            <text:p>8865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7614.3">
            <text:p>876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651636">
            <text:p>18,652</text:p>
          </table:table-cell>
          <table:table-cell table:style-name="ce12N2" office:value-type="float" office:value="28773.2">
            <text:p>2877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59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.59">
            <text:p>1045,59</text:p>
          </table:table-cell>
          <table:table-cell table:style-name="ce12N2" office:value-type="float" office:value="87614.3">
            <text:p>87614,30</text:p>
          </table:table-cell>
          <table:table-cell table:style-name="ce12N2" office:value-type="float" office:value="6133">
            <text:p>61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401072654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8">
            <text:p>308028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51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151.17">
            <text:p>901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9288.6">
            <text:p>8928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33168">
            <text:p>17,633</text:p>
          </table:table-cell>
          <table:table-cell table:style-name="ce12N2" office:value-type="float" office:value="29055.16">
            <text:p>2905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1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62.57">
            <text:p>862,57</text:p>
          </table:table-cell>
          <table:table-cell table:style-name="ce12N2" office:value-type="float" office:value="89288.6">
            <text:p>89288,60</text:p>
          </table:table-cell>
          <table:table-cell table:style-name="ce12N2" office:value-type="float" office:value="6250.21">
            <text:p>625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5161566829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3">
            <text:p>308043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497.99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.9">
            <text:p>1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22.22">
            <text:p>1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28">
            <text:p>0,004</text:p>
          </table:table-cell>
          <table:table-cell table:style-name="ce12N2" office:value-type="float" office:value="0.62">
            <text:p>0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122.22">
            <text:p>122,22</text:p>
          </table:table-cell>
          <table:table-cell table:style-name="ce12N2" office:value-type="float" office:value="8.56">
            <text:p>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20366000195550020004979971120775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4">
            <text:p>308044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24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70.72">
            <text:p>2407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3696.04">
            <text:p>23696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878">
            <text:p>0,806</text:p>
          </table:table-cell>
          <table:table-cell table:style-name="ce12N2" office:value-type="float" office:value="1929.25">
            <text:p>192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7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74.68">
            <text:p>374,68</text:p>
          </table:table-cell>
          <table:table-cell table:style-name="ce12N2" office:value-type="float" office:value="23696.04">
            <text:p>23696,04</text:p>
          </table:table-cell>
          <table:table-cell table:style-name="ce12N2" office:value-type="float" office:value="1107.89">
            <text:p>110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064838016560550010005249161523029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5">
            <text:p>308045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2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58.06">
            <text:p>265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9">
            <text:p>2574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867">
            <text:p>0,099</text:p>
          </table:table-cell>
          <table:table-cell table:style-name="ce12N2" office:value-type="float" office:value="9.73">
            <text:p>9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5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3.67">
            <text:p>83,67</text:p>
          </table:table-cell>
          <table:table-cell table:style-name="ce12N2" office:value-type="float" office:value="2574.39">
            <text:p>2574,39</text:p>
          </table:table-cell>
          <table:table-cell table:style-name="ce12N2" office:value-type="float" office:value="180.21">
            <text:p>18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837457000187550010003628561337353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5">
            <text:p>30805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8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1.36">
            <text:p>333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26.5">
            <text:p>322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71">
            <text:p>0,043</text:p>
          </table:table-cell>
          <table:table-cell table:style-name="ce12N2" office:value-type="float" office:value="22.53">
            <text:p>22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.86">
            <text:p>104,86</text:p>
          </table:table-cell>
          <table:table-cell table:style-name="ce12N2" office:value-type="float" office:value="3226.5">
            <text:p>3226,50</text:p>
          </table:table-cell>
          <table:table-cell table:style-name="ce12N2" office:value-type="float" office:value="225.86">
            <text:p>2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8751114935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6">
            <text:p>3080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99.22">
            <text:p>131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442.2">
            <text:p>944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24412">
            <text:p>4,524</text:p>
          </table:table-cell>
          <table:table-cell table:style-name="ce12N2" office:value-type="float" office:value="41.56">
            <text:p>41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9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96.33">
            <text:p>896,33</text:p>
          </table:table-cell>
          <table:table-cell table:style-name="ce12N2" office:value-type="float" office:value="8672.1">
            <text:p>8672,10</text:p>
          </table:table-cell>
          <table:table-cell table:style-name="ce12N2" office:value-type="float" office:value="346.89">
            <text:p>34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961.46">
            <text:p>15961,46</text:p>
          </table:table-cell>
          <table:table-cell table:style-name="ce12N2" office:value-type="float" office:value="2860.69">
            <text:p>2860,6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81300638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0">
            <text:p>3080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.93">
            <text:p>5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4.86">
            <text:p>554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06">
            <text:p>0,001</text:p>
          </table:table-cell>
          <table:table-cell table:style-name="ce12N2" office:value-type="float" office:value="0.87">
            <text:p>0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6.07">
            <text:p>36,07</text:p>
          </table:table-cell>
          <table:table-cell table:style-name="ce12N2" office:value-type="float" office:value="554.86">
            <text:p>554,86</text:p>
          </table:table-cell>
          <table:table-cell table:style-name="ce12N2" office:value-type="float" office:value="22.19">
            <text:p>2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71425379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5">
            <text:p>308075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21397152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6">
            <text:p>3080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191608810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7">
            <text:p>308077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418006834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8">
            <text:p>308078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11975927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9">
            <text:p>308079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31387877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0">
            <text:p>308080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81201786907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2">
            <text:p>308082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80.08">
            <text:p>1868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55918">
            <text:p>5,756</text:p>
          </table:table-cell>
          <table:table-cell table:style-name="ce12N2" office:value-type="float" office:value="17640">
            <text:p>176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8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3.71">
            <text:p>15663,71</text:p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97">
            <text:p>140,9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20.64">
            <text:p>120,64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1299.16">
            <text:p>129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11214791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4">
            <text:p>3080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4.63317">
            <text:p>34,633</text:p>
          </table:table-cell>
          <table:table-cell table:style-name="ce12N2" office:value-type="float" office:value="13325.4">
            <text:p>1332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2.0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277.58">
            <text:p>228277,58</text:p>
          </table:table-cell>
          <table:table-cell table:style-name="ce12N2" office:value-type="float" office:value="228.28">
            <text:p>22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54.5">
            <text:p>2054,5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10481.06">
            <text:p>1048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56491651109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5">
            <text:p>308085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1.55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484.34">
            <text:p>844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82627.22">
            <text:p>8262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4.609874">
            <text:p>44,610</text:p>
          </table:table-cell>
          <table:table-cell table:style-name="ce12N2" office:value-type="float" office:value="3697.89">
            <text:p>3697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484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735.31">
            <text:p>69735,31</text:p>
          </table:table-cell>
          <table:table-cell table:style-name="ce12N2" office:value-type="float" office:value="69.72">
            <text:p>6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7.63">
            <text:p>627,6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857.12">
            <text:p>1857,12</text:p>
          </table:table-cell>
          <table:table-cell table:style-name="ce12N2" office:value-type="float" office:value="82627.22">
            <text:p>82627,22</text:p>
          </table:table-cell>
          <table:table-cell table:style-name="ce12N2" office:value-type="float" office:value="5783.91">
            <text:p>578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155411651891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7">
            <text:p>30808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6.9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02.21">
            <text:p>2240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06.81">
            <text:p>20806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796">
            <text:p>0,818</text:p>
          </table:table-cell>
          <table:table-cell table:style-name="ce12N2" office:value-type="float" office:value="90.5">
            <text:p>9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02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60.43">
            <text:p>17560,43</text:p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04">
            <text:p>158,0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595.4">
            <text:p>1595,40</text:p>
          </table:table-cell>
          <table:table-cell table:style-name="ce12N2" office:value-type="float" office:value="20806.81">
            <text:p>20806,81</text:p>
          </table:table-cell>
          <table:table-cell table:style-name="ce12N2" office:value-type="float" office:value="1456.48">
            <text:p>145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69241570439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0">
            <text:p>308090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7.25">
            <text:p>244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496">
            <text:p>0,89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77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34.68">
            <text:p>20134,68</text:p>
          </table:table-cell>
          <table:table-cell table:style-name="ce12N2" office:value-type="float" office:value="20.13">
            <text:p>2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1">
            <text:p>181,21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20.28">
            <text:p>620,28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1669.99">
            <text:p>166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31932554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1">
            <text:p>308091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3.56">
            <text:p>8173,56</text:p>
          </table:table-cell>
          <table:table-cell table:style-name="ce12N2" office:value-type="float" office:value="674.24">
            <text:p>674,24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590.52">
            <text:p>859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137">
            <text:p>2,514</text:p>
          </table:table-cell>
          <table:table-cell table:style-name="ce12N2" office:value-type="float" office:value="144">
            <text:p>1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29.88">
            <text:p>6629,88</text:p>
          </table:table-cell>
          <table:table-cell table:style-name="ce12N2" office:value-type="float" office:value="6.63">
            <text:p>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67">
            <text:p>59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7916.28">
            <text:p>7916,28</text:p>
          </table:table-cell>
          <table:table-cell table:style-name="ce12N2" office:value-type="float" office:value="554.14">
            <text:p>55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5081122000180550010000163111000140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2">
            <text:p>30809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1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">
            <text:p>0,068</text:p>
          </table:table-cell>
          <table:table-cell table:style-name="ce12N2" office:value-type="float" office:value="5.76">
            <text:p>5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.64">
            <text:p>447,64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37.13">
            <text:p>3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191245161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3">
            <text:p>308093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7.91">
            <text:p>23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88.16">
            <text:p>2288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">
            <text:p>7,200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7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6.34">
            <text:p>1916,34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5">
            <text:p>17,25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9.75">
            <text:p>29,75</text:p>
          </table:table-cell>
          <table:table-cell table:style-name="ce12N2" office:value-type="float" office:value="2288.16">
            <text:p>2288,16</text:p>
          </table:table-cell>
          <table:table-cell table:style-name="ce12N2" office:value-type="float" office:value="160.17">
            <text:p>16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69781000967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4">
            <text:p>30809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8.39">
            <text:p>97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1.8">
            <text:p>9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3">
            <text:p>0,004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6.41">
            <text:p>786,4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8">
            <text:p>7,0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.59">
            <text:p>46,59</text:p>
          </table:table-cell>
          <table:table-cell table:style-name="ce12N2" office:value-type="float" office:value="931.8">
            <text:p>931,80</text:p>
          </table:table-cell>
          <table:table-cell table:style-name="ce12N2" office:value-type="float" office:value="65.23">
            <text:p>6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281021736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5">
            <text:p>30809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26">
            <text:p>132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5.7">
            <text:p>120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3">
            <text:p>0,001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7.58">
            <text:p>1017,58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7.56">
            <text:p>117,56</text:p>
          </table:table-cell>
          <table:table-cell table:style-name="ce12N2" office:value-type="float" office:value="1205.7">
            <text:p>1205,70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27193129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6">
            <text:p>30809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4.72">
            <text:p>21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77.2">
            <text:p>20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4">
            <text:p>0,060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11">
            <text:p>1753,1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7.52">
            <text:p>67,52</text:p>
          </table:table-cell>
          <table:table-cell table:style-name="ce12N2" office:value-type="float" office:value="2077.2">
            <text:p>2077,20</text:p>
          </table:table-cell>
          <table:table-cell table:style-name="ce12N2" office:value-type="float" office:value="145.4">
            <text:p>14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017213967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7">
            <text:p>30809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.46">
            <text:p>62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7.7">
            <text:p>58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6">
            <text:p>0,004</text:p>
          </table:table-cell>
          <table:table-cell table:style-name="ce12N2" office:value-type="float" office:value="3.29">
            <text:p>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2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6">
            <text:p>496,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6">
            <text:p>4,4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4.76">
            <text:p>34,76</text:p>
          </table:table-cell>
          <table:table-cell table:style-name="ce12N2" office:value-type="float" office:value="587.7">
            <text:p>587,70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81766936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8">
            <text:p>3080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88.19">
            <text:p>808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33.6">
            <text:p>78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4">
            <text:p>0,005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8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4.63">
            <text:p>6824,6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54.59">
            <text:p>254,59</text:p>
          </table:table-cell>
          <table:table-cell table:style-name="ce12N2" office:value-type="float" office:value="7833.6">
            <text:p>7833,60</text:p>
          </table:table-cell>
          <table:table-cell table:style-name="ce12N2" office:value-type="float" office:value="313.34">
            <text:p>31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71294483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9">
            <text:p>308099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582.38">
            <text:p>7658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90.201388">
            <text:p>1490,201</text:p>
          </table:table-cell>
          <table:table-cell table:style-name="ce12N2" office:value-type="float" office:value="1189.38">
            <text:p>118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58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843.3">
            <text:p>65843,30</text:p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2.6">
            <text:p>592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74.58">
            <text:p>374,58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3653.23">
            <text:p>365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71013769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0">
            <text:p>308100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2">
            <text:p>0,10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.72">
            <text:p>1566,72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65.28">
            <text:p>6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81505111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1">
            <text:p>308101</text:p>
          </table:table-cell>
          <table:table-cell table:style-name="ce0" table:number-columns-spanned="4" table:number-rows-spanned="1" office:value-type="string" calcext:value-type="string">
            <text:p>8.415 - SIMAPPEL SIMAO PEREIRA IND COM DE PAPEIS LTDA</text:p>
          </table:table-cell>
          <table:covered-table-cell table:number-columns-repeated="3"/>
          <table:table-cell table:style-name="ce0" office:value-type="string" calcext:value-type="string">
            <text:p>21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34.26">
            <text:p>7023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8023.5">
            <text:p>6802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4.3664">
            <text:p>704,366</text:p>
          </table:table-cell>
          <table:table-cell table:style-name="ce12N2" office:value-type="float" office:value="13470">
            <text:p>134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23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52.79">
            <text:p>60952,79</text:p>
          </table:table-cell>
          <table:table-cell table:style-name="ce12N2" office:value-type="float" office:value="60.95">
            <text:p>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.57">
            <text:p>548,5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210.76">
            <text:p>2210,76</text:p>
          </table:table-cell>
          <table:table-cell table:style-name="ce12N2" office:value-type="float" office:value="68023.5">
            <text:p>68023,50</text:p>
          </table:table-cell>
          <table:table-cell table:style-name="ce12N2" office:value-type="float" office:value="4761.65">
            <text:p>476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3631764000173550010000210761888378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2">
            <text:p>308102</text:p>
          </table:table-cell>
          <table:table-cell table:style-name="ce0" table:number-columns-spanned="4" table:number-rows-spanned="1" office:value-type="string" calcext:value-type="string">
            <text:p>744 - INDUSAT INDUSTRIA E COMERCIO LTDA</text:p>
          </table:table-cell>
          <table:covered-table-cell table:number-columns-repeated="3"/>
          <table:table-cell table:style-name="ce0" office:value-type="string" calcext:value-type="string">
            <text:p>123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69.52">
            <text:p>356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">
            <text:p>0,000</text:p>
          </table:table-cell>
          <table:table-cell table:style-name="ce12N2" office:value-type="float" office:value="137.5">
            <text:p>13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9.76">
            <text:p>3109,76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99">
            <text:p>27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78.48">
            <text:p>178,48</text:p>
          </table:table-cell>
          <table:table-cell table:style-name="ce12N2" office:value-type="float" office:value="3569.52">
            <text:p>3569,52</text:p>
          </table:table-cell>
          <table:table-cell table:style-name="ce12N2" office:value-type="float" office:value="142.78">
            <text:p>14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65339590000127550010001234491048074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6">
            <text:p>308106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2.9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58">
            <text:p>4,758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59.58">
            <text:p>12259,58</text:p>
          </table:table-cell>
          <table:table-cell table:style-name="ce12N2" office:value-type="float" office:value="12.26">
            <text:p>1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.34">
            <text:p>110,3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1016.82">
            <text:p>101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29511059834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7">
            <text:p>308107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2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787">
            <text:p>2,079</text:p>
          </table:table-cell>
          <table:table-cell table:style-name="ce12N2" office:value-type="float" office:value="1076.4">
            <text:p>10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7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12.06">
            <text:p>16012,06</text:p>
          </table:table-cell>
          <table:table-cell table:style-name="ce12N2" office:value-type="float" office:value="16.02">
            <text:p>1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.11">
            <text:p>144,1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1328.05">
            <text:p>13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29501332655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8">
            <text:p>30810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1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93.46">
            <text:p>1209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15.36">
            <text:p>1201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51462">
            <text:p>2,351</text:p>
          </table:table-cell>
          <table:table-cell table:style-name="ce12N2" office:value-type="float" office:value="12799.99">
            <text:p>127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9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40.65">
            <text:p>10140,65</text:p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27">
            <text:p>91,2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8.1">
            <text:p>78,10</text:p>
          </table:table-cell>
          <table:table-cell table:style-name="ce12N2" office:value-type="float" office:value="12015.36">
            <text:p>12015,36</text:p>
          </table:table-cell>
          <table:table-cell table:style-name="ce12N2" office:value-type="float" office:value="841.08">
            <text:p>84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191496593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0">
            <text:p>30811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75.01">
            <text:p>877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8.34">
            <text:p>871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02182">
            <text:p>1,902</text:p>
          </table:table-cell>
          <table:table-cell table:style-name="ce12N2" office:value-type="float" office:value="10240">
            <text:p>10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75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8.07">
            <text:p>7358,07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22">
            <text:p>66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6.67">
            <text:p>56,67</text:p>
          </table:table-cell>
          <table:table-cell table:style-name="ce12N2" office:value-type="float" office:value="8718.34">
            <text:p>8718,34</text:p>
          </table:table-cell>
          <table:table-cell table:style-name="ce12N2" office:value-type="float" office:value="610.28">
            <text:p>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01652001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2">
            <text:p>30811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07.18">
            <text:p>13510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3629">
            <text:p>7,136</text:p>
          </table:table-cell>
          <table:table-cell table:style-name="ce12N2" office:value-type="float" office:value="1347.5">
            <text:p>134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5.10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596.02">
            <text:p>108596,02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36">
            <text:p>977,36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6.1">
            <text:p>10456,1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4986.05">
            <text:p>49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9381426612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3">
            <text:p>30811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5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997.6">
            <text:p>13999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9997.6">
            <text:p>1399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89974">
            <text:p>18,900</text:p>
          </table:table-cell>
          <table:table-cell table:style-name="ce12N2" office:value-type="float" office:value="5969.96">
            <text:p>5969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9.99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41.37">
            <text:p>121041,37</text:p>
          </table:table-cell>
          <table:table-cell table:style-name="ce12N2" office:value-type="float" office:value="121.04">
            <text:p>1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9.37">
            <text:p>1089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997.6">
            <text:p>139997,60</text:p>
          </table:table-cell>
          <table:table-cell table:style-name="ce12N2" office:value-type="float" office:value="6618.69">
            <text:p>661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56551601117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5">
            <text:p>308115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2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9.22">
            <text:p>810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11.96">
            <text:p>791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012">
            <text:p>2,301</text:p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0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77.51">
            <text:p>6677,51</text:p>
          </table:table-cell>
          <table:table-cell table:style-name="ce12N2" office:value-type="float" office:value="6.68">
            <text:p>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97.26">
            <text:p>197,26</text:p>
          </table:table-cell>
          <table:table-cell table:style-name="ce12N2" office:value-type="float" office:value="7911.96">
            <text:p>7911,96</text:p>
          </table:table-cell>
          <table:table-cell table:style-name="ce12N2" office:value-type="float" office:value="553.84">
            <text:p>55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26301477442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25">
            <text:p>308125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7.7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5.6">
            <text:p>204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45.6">
            <text:p>2044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96">
            <text:p>0,470</text:p>
          </table:table-cell>
          <table:table-cell table:style-name="ce12N2" office:value-type="float" office:value="6015.2">
            <text:p>60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27.86">
            <text:p>16327,86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5">
            <text:p>146,9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5.6">
            <text:p>20445,60</text:p>
          </table:table-cell>
          <table:table-cell table:style-name="ce12N2" office:value-type="float" office:value="2453.47">
            <text:p>245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61064838014193550010001677421835198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26">
            <text:p>308126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7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93.6">
            <text:p>3249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493.6">
            <text:p>3249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4400">
            <text:p>144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9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49.39">
            <text:p>25949,39</text:p>
          </table:table-cell>
          <table:table-cell table:style-name="ce12N2" office:value-type="float" office:value="25.95">
            <text:p>2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3.54">
            <text:p>23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93.6">
            <text:p>32493,60</text:p>
          </table:table-cell>
          <table:table-cell table:style-name="ce12N2" office:value-type="float" office:value="3899.23">
            <text:p>38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610648380141935500100016777815808528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8">
            <text:p>308138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90">
            <text:p>42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90">
            <text:p>42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9.7375">
            <text:p>39,737</text:p>
          </table:table-cell>
          <table:table-cell table:style-name="ce12N2" office:value-type="float" office:value="340">
            <text:p>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90">
            <text:p>4290,00</text:p>
          </table:table-cell>
          <table:table-cell table:style-name="ce12N2" office:value-type="float" office:value="164.31">
            <text:p>16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22242808000118550010000027831254761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9">
            <text:p>308139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26.7">
            <text:p>276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6.7">
            <text:p>2762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6.86004">
            <text:p>56,860</text:p>
          </table:table-cell>
          <table:table-cell table:style-name="ce12N2" office:value-type="float" office:value="1875">
            <text:p>18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6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26.7">
            <text:p>27626,70</text:p>
          </table:table-cell>
          <table:table-cell table:style-name="ce12N2" office:value-type="float" office:value="1058.1">
            <text:p>105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22242808000118550010000027841846980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0">
            <text:p>308140</text:p>
          </table:table-cell>
          <table:table-cell table:style-name="ce0" table:number-columns-spanned="4" table:number-rows-spanned="1" office:value-type="string" calcext:value-type="string">
            <text:p>37.726 - CARMEM LUCIA DE SOUZA LUVAS</text:p>
          </table:table-cell>
          <table:covered-table-cell table:number-columns-repeated="3"/>
          <table:table-cell table:style-name="ce0" office:value-type="string" calcext:value-type="string">
            <text:p>3.2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37">
            <text:p>3,237</text:p>
          </table:table-cell>
          <table:table-cell table:style-name="ce12N2" office:value-type="float" office:value="1582">
            <text:p>15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7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907.11">
            <text:p>90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34153406000126550000000032451140065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1">
            <text:p>308141</text:p>
          </table:table-cell>
          <table:table-cell table:style-name="ce0" table:number-columns-spanned="4" table:number-rows-spanned="1" office:value-type="string" calcext:value-type="string">
            <text:p>37.726 - CARMEM LUCIA DE SOUZA LUVAS</text:p>
          </table:table-cell>
          <table:covered-table-cell table:number-columns-repeated="3"/>
          <table:table-cell table:style-name="ce0" office:value-type="string" calcext:value-type="string">
            <text:p>3.2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5">
            <text:p>0,051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124.09">
            <text:p>12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34153406000126550000000032461810587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7">
            <text:p>30814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4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8.39">
            <text:p>344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48.39">
            <text:p>3448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1">
            <text:p>0,021</text:p>
          </table:table-cell>
          <table:table-cell table:style-name="ce12N2" office:value-type="float" office:value="18.37">
            <text:p>18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4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48.39">
            <text:p>3448,39</text:p>
          </table:table-cell>
          <table:table-cell table:style-name="ce12N2" office:value-type="float" office:value="241.39">
            <text:p>24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4782138786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9">
            <text:p>308149</text:p>
          </table:table-cell>
          <table:table-cell table:style-name="ce0" table:number-columns-spanned="4" table:number-rows-spanned="1" office:value-type="string" calcext:value-type="string">
            <text:p>35.601 - COPPERFIO INDUSTRIA E COMERCIO LTDA</text:p>
          </table:table-cell>
          <table:covered-table-cell table:number-columns-repeated="3"/>
          <table:table-cell table:style-name="ce0" office:value-type="string" calcext:value-type="string">
            <text:p>41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82">
            <text:p>257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782">
            <text:p>257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84">
            <text:p>2,484</text:p>
          </table:table-cell>
          <table:table-cell table:style-name="ce12N2" office:value-type="float" office:value="172.5">
            <text:p>17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7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82">
            <text:p>25782,00</text:p>
          </table:table-cell>
          <table:table-cell table:style-name="ce12N2" office:value-type="float" office:value="1804.74">
            <text:p>180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44.49">
            <text:p>5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929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5/2026</text:p>
          </table:table-cell>
          <table:table-cell table:style-name="ce12" office:value-type="string" calcext:value-type="string">
            <text:p>544,49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56059702000103550010000411881918878569</text:p>
          </table:table-cell>
          <table:table-cell table:style-name="ce0" office:value-type="string" calcext:value-type="string">
            <text:p>3526051138956500020057005000399929100086199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3">
            <text:p>308153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3.5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45.37">
            <text:p>8214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0450.58">
            <text:p>7045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6.67066">
            <text:p>496,671</text:p>
          </table:table-cell>
          <table:table-cell table:style-name="ce12N2" office:value-type="float" office:value="3105">
            <text:p>310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14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261.84">
            <text:p>56261,84</text:p>
          </table:table-cell>
          <table:table-cell table:style-name="ce12N2" office:value-type="float" office:value="56.27">
            <text:p>5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.36">
            <text:p>506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50.58">
            <text:p>70450,58</text:p>
          </table:table-cell>
          <table:table-cell table:style-name="ce12N2" office:value-type="float" office:value="8454.07">
            <text:p>845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744.33">
            <text:p>100744,33</text:p>
          </table:table-cell>
          <table:table-cell table:style-name="ce12N2" office:value-type="float" office:value="11694.79">
            <text:p>11694,7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109219110010045500100025351418439652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9">
            <text:p>30815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5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870.58">
            <text:p>150870,58</text:p>
          </table:table-cell>
          <table:table-cell table:style-name="ce12N2" office:value-type="float" office:value="9351.44">
            <text:p>9351,44</text:p>
          </table:table-cell>
          <table:table-cell table:style-name="ce12N2" office:value-type="float" office:value="87">
            <text:p>87,00</text:p>
          </table:table-cell>
          <table:table-cell table:style-name="ce12N2" office:value-type="float" office:value="140570.11">
            <text:p>14057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825203">
            <text:p>27,825</text:p>
          </table:table-cell>
          <table:table-cell table:style-name="ce12N2" office:value-type="float" office:value="7854.73">
            <text:p>785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0.8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7.31">
            <text:p>77,3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2244.87">
            <text:p>12244,87</text:p>
          </table:table-cell>
          <table:table-cell table:style-name="ce12N2" office:value-type="float" office:value="131218.67">
            <text:p>131218,67</text:p>
          </table:table-cell>
          <table:table-cell table:style-name="ce12N2" office:value-type="float" office:value="5284.48">
            <text:p>528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950.83">
            <text:p>40950,83</text:p>
          </table:table-cell>
          <table:table-cell table:style-name="ce12N2" office:value-type="float" office:value="7407.04">
            <text:p>7407,0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5761166754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68">
            <text:p>308168</text:p>
          </table:table-cell>
          <table:table-cell table:style-name="ce0" table:number-columns-spanned="4" table:number-rows-spanned="1" office:value-type="string" calcext:value-type="string">
            <text:p>37.894 - GYPSUM MINERACAO INDUSTRIA E COMERCIO LTDA</text:p>
          </table:table-cell>
          <table:covered-table-cell table:number-columns-repeated="3"/>
          <table:table-cell table:style-name="ce0" office:value-type="string" calcext:value-type="string">
            <text:p>104.1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21.44">
            <text:p>6662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132.23">
            <text:p>56132,23</text:p>
          </table:table-cell>
          <table:table-cell table:style-name="ce12N2" office:value-type="float" office:value="10489.21">
            <text:p>10489,21</text:p>
          </table:table-cell>
          <table:table-cell table:style-name="ce12N3" office:value-type="float" office:value="48.6">
            <text:p>48,600</text:p>
          </table:table-cell>
          <table:table-cell table:style-name="ce12N2" office:value-type="float" office:value="32192.64">
            <text:p>3219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62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499.96">
            <text:p>57499,96</text:p>
          </table:table-cell>
          <table:table-cell table:style-name="ce12N2" office:value-type="float" office:value="57.5">
            <text:p>5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.5">
            <text:p>517,50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21.44">
            <text:p>66621,44</text:p>
          </table:table-cell>
          <table:table-cell table:style-name="ce12N2" office:value-type="float" office:value="4663.5">
            <text:p>466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24443608001040550010001041441587406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69">
            <text:p>308169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3.6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4.07">
            <text:p>1643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94.4">
            <text:p>140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924">
            <text:p>42,924</text:p>
          </table:table-cell>
          <table:table-cell table:style-name="ce12N2" office:value-type="float" office:value="406.8">
            <text:p>40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4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55.79">
            <text:p>11255,79</text:p>
          </table:table-cell>
          <table:table-cell table:style-name="ce12N2" office:value-type="float" office:value="11.26">
            <text:p>1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94.4">
            <text:p>14094,40</text:p>
          </table:table-cell>
          <table:table-cell table:style-name="ce12N2" office:value-type="float" office:value="1691.33">
            <text:p>169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154.99">
            <text:p>20154,99</text:p>
          </table:table-cell>
          <table:table-cell table:style-name="ce12N2" office:value-type="float" office:value="2339.67">
            <text:p>2339,6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10921911001004550010002536921568553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4">
            <text:p>30817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1.27">
            <text:p>56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4.76">
            <text:p>53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42">
            <text:p>0,001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1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.88">
            <text:p>465,88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9">
            <text:p>4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534.76">
            <text:p>534,76</text:p>
          </table:table-cell>
          <table:table-cell table:style-name="ce12N2" office:value-type="float" office:value="21.39">
            <text:p>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2132388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6">
            <text:p>30817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57.31">
            <text:p>1135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83.96">
            <text:p>1128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1608">
            <text:p>1,332</text:p>
          </table:table-cell>
          <table:table-cell table:style-name="ce12N2" office:value-type="float" office:value="9190.08">
            <text:p>919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5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23.38">
            <text:p>9523,38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73.35">
            <text:p>73,35</text:p>
          </table:table-cell>
          <table:table-cell table:style-name="ce12N2" office:value-type="float" office:value="11283.96">
            <text:p>11283,96</text:p>
          </table:table-cell>
          <table:table-cell table:style-name="ce12N2" office:value-type="float" office:value="789.88">
            <text:p>78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71861467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0">
            <text:p>308180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088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142.72">
            <text:p>6214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142.72">
            <text:p>6214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232">
            <text:p>6,523</text:p>
          </table:table-cell>
          <table:table-cell table:style-name="ce12N2" office:value-type="float" office:value="3556.32">
            <text:p>355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14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627.18">
            <text:p>49627,18</text:p>
          </table:table-cell>
          <table:table-cell table:style-name="ce12N2" office:value-type="float" office:value="49.63">
            <text:p>4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.64">
            <text:p>446,6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142.72">
            <text:p>62142,72</text:p>
          </table:table-cell>
          <table:table-cell table:style-name="ce12N2" office:value-type="float" office:value="7457.13">
            <text:p>745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46.46">
            <text:p>7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216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27/05/2026</text:p>
          </table:table-cell>
          <table:table-cell table:style-name="ce12" office:value-type="string" calcext:value-type="string">
            <text:p>746,4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32260510524837000193550070000250881191429008</text:p>
          </table:table-cell>
          <table:table-cell table:style-name="ce0" office:value-type="string" calcext:value-type="string">
            <text:p>322605287437770001655700100001921610002208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7">
            <text:p>308187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08.557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5.2">
            <text:p>382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1.74">
            <text:p>359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232">
            <text:p>0,119</text:p>
          </table:table-cell>
          <table:table-cell table:style-name="ce12N2" office:value-type="float" office:value="14.11">
            <text:p>14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9.13">
            <text:p>3129,13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6">
            <text:p>28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33.46">
            <text:p>233,46</text:p>
          </table:table-cell>
          <table:table-cell table:style-name="ce12N2" office:value-type="float" office:value="3591.74">
            <text:p>3591,74</text:p>
          </table:table-cell>
          <table:table-cell table:style-name="ce12N2" office:value-type="float" office:value="143.67">
            <text:p>14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3296273003298550230024085571302531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8">
            <text:p>308188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7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105.12">
            <text:p>8310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80523.51">
            <text:p>80523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6.021932">
            <text:p>96,022</text:p>
          </table:table-cell>
          <table:table-cell table:style-name="ce12N2" office:value-type="float" office:value="1340.59">
            <text:p>1340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.10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63.76">
            <text:p>69463,76</text:p>
          </table:table-cell>
          <table:table-cell table:style-name="ce12N2" office:value-type="float" office:value="69.46">
            <text:p>6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16">
            <text:p>625,16</text:p>
          </table:table-cell>
          <table:table-cell table:style-name="ce12N2" office:value-type="float" office:value="55.13">
            <text:p>55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581.61">
            <text:p>2581,61</text:p>
          </table:table-cell>
          <table:table-cell table:style-name="ce12N2" office:value-type="float" office:value="75058.15">
            <text:p>75058,15</text:p>
          </table:table-cell>
          <table:table-cell table:style-name="ce12N2" office:value-type="float" office:value="3979.41">
            <text:p>397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77771679784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9">
            <text:p>308189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7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741.19">
            <text:p>20274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6359.51">
            <text:p>19635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710192">
            <text:p>25,710</text:p>
          </table:table-cell>
          <table:table-cell table:style-name="ce12N2" office:value-type="float" office:value="3453.27">
            <text:p>345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.741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722.53">
            <text:p>165722,53</text:p>
          </table:table-cell>
          <table:table-cell table:style-name="ce12N2" office:value-type="float" office:value="165.72">
            <text:p>16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1.5">
            <text:p>1491,50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381.68">
            <text:p>6381,68</text:p>
          </table:table-cell>
          <table:table-cell table:style-name="ce12N2" office:value-type="float" office:value="196359.51">
            <text:p>196359,51</text:p>
          </table:table-cell>
          <table:table-cell table:style-name="ce12N2" office:value-type="float" office:value="13745.17">
            <text:p>13745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777815549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0">
            <text:p>308190</text:p>
          </table:table-cell>
          <table:table-cell table:style-name="ce0" table:number-columns-spanned="4" table:number-rows-spanned="1" office:value-type="string" calcext:value-type="string">
            <text:p>11.013 - PRECON INDUSTRIAL S/A AL</text:p>
          </table:table-cell>
          <table:covered-table-cell table:number-columns-repeated="3"/>
          <table:table-cell table:style-name="ce0" office:value-type="string" calcext:value-type="string">
            <text:p>38.9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.6">
            <text:p>487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26">
            <text:p>47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4">
            <text:p>0,120</text:p>
          </table:table-cell>
          <table:table-cell table:style-name="ce12N2" office:value-type="float" office:value="300">
            <text:p>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7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74.18">
            <text:p>3774,18</text:p>
          </table:table-cell>
          <table:table-cell table:style-name="ce12N2" office:value-type="float" office:value="3.78">
            <text:p>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6">
            <text:p>33,9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53.6">
            <text:p>153,60</text:p>
          </table:table-cell>
          <table:table-cell table:style-name="ce12N2" office:value-type="float" office:value="4726">
            <text:p>4726,00</text:p>
          </table:table-cell>
          <table:table-cell table:style-name="ce12N2" office:value-type="float" office:value="567.12">
            <text:p>5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7260523452238002016550010000389371738457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3">
            <text:p>308193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2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28.5">
            <text:p>502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28.5">
            <text:p>502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2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43.93">
            <text:p>4243,93</text:p>
          </table:table-cell>
          <table:table-cell table:style-name="ce12N2" office:value-type="float" office:value="4.24">
            <text:p>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28.5">
            <text:p>5028,50</text:p>
          </table:table-cell>
          <table:table-cell table:style-name="ce12N2" office:value-type="float" office:value="352">
            <text:p>35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26801870611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4">
            <text:p>30819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7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97.69">
            <text:p>5149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65345">
            <text:p>15,653</text:p>
          </table:table-cell>
          <table:table-cell table:style-name="ce12N2" office:value-type="float" office:value="1609.55">
            <text:p>1609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9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137.98">
            <text:p>42137,98</text:p>
          </table:table-cell>
          <table:table-cell table:style-name="ce12N2" office:value-type="float" office:value="42.14">
            <text:p>4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24">
            <text:p>379,2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569.69">
            <text:p>1569,69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3494.96">
            <text:p>3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73931211190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5">
            <text:p>3081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89.16">
            <text:p>868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89.16">
            <text:p>868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92">
            <text:p>0,015</text:p>
          </table:table-cell>
          <table:table-cell table:style-name="ce12N2" office:value-type="float" office:value="6.47">
            <text:p>6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8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33.4">
            <text:p>7333,40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89.16">
            <text:p>8689,16</text:p>
          </table:table-cell>
          <table:table-cell table:style-name="ce12N2" office:value-type="float" office:value="608.24">
            <text:p>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2910946946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9">
            <text:p>30819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7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32.35">
            <text:p>3953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9277.05">
            <text:p>3927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740173">
            <text:p>6,740</text:p>
          </table:table-cell>
          <table:table-cell table:style-name="ce12N2" office:value-type="float" office:value="21055.89">
            <text:p>21055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532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48.85">
            <text:p>33148,85</text:p>
          </table:table-cell>
          <table:table-cell table:style-name="ce12N2" office:value-type="float" office:value="33.15">
            <text:p>3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34">
            <text:p>298,34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55.3">
            <text:p>255,30</text:p>
          </table:table-cell>
          <table:table-cell table:style-name="ce12N2" office:value-type="float" office:value="39277.05">
            <text:p>39277,05</text:p>
          </table:table-cell>
          <table:table-cell table:style-name="ce12N2" office:value-type="float" office:value="2749.39">
            <text:p>27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741534771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0">
            <text:p>30820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6.73">
            <text:p>60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7.68">
            <text:p>600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75731">
            <text:p>1,176</text:p>
          </table:table-cell>
          <table:table-cell table:style-name="ce12N2" office:value-type="float" office:value="6399.99">
            <text:p>63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70.33">
            <text:p>5070,33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63">
            <text:p>45,6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6007.68">
            <text:p>6007,68</text:p>
          </table:table-cell>
          <table:table-cell table:style-name="ce12N2" office:value-type="float" office:value="420.54">
            <text:p>42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731725451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8">
            <text:p>30820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57.37">
            <text:p>1435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264.65">
            <text:p>14264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54979">
            <text:p>2,055</text:p>
          </table:table-cell>
          <table:table-cell table:style-name="ce12N2" office:value-type="float" office:value="10087.44">
            <text:p>10087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35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39">
            <text:p>12039,00</text:p>
          </table:table-cell>
          <table:table-cell table:style-name="ce12N2" office:value-type="float" office:value="12.04">
            <text:p>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35">
            <text:p>108,35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2.72">
            <text:p>92,72</text:p>
          </table:table-cell>
          <table:table-cell table:style-name="ce12N2" office:value-type="float" office:value="14264.65">
            <text:p>14264,65</text:p>
          </table:table-cell>
          <table:table-cell table:style-name="ce12N2" office:value-type="float" office:value="998.53">
            <text:p>99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212710243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9">
            <text:p>30820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37.16">
            <text:p>2103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048.16">
            <text:p>14048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37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640.18">
            <text:p>17640,18</text:p>
          </table:table-cell>
          <table:table-cell table:style-name="ce12N2" office:value-type="float" office:value="17.64">
            <text:p>1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76">
            <text:p>158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5.86">
            <text:p>135,86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1463.09">
            <text:p>146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31365520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0">
            <text:p>30821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379.54">
            <text:p>1243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464.45">
            <text:p>120464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6368">
            <text:p>31,637</text:p>
          </table:table-cell>
          <table:table-cell table:style-name="ce12N2" office:value-type="float" office:value="3159">
            <text:p>315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4.37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668.98">
            <text:p>101668,98</text:p>
          </table:table-cell>
          <table:table-cell table:style-name="ce12N2" office:value-type="float" office:value="101.67">
            <text:p>10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5.02">
            <text:p>915,02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3915.09">
            <text:p>3915,09</text:p>
          </table:table-cell>
          <table:table-cell table:style-name="ce12N2" office:value-type="float" office:value="120464.45">
            <text:p>120464,45</text:p>
          </table:table-cell>
          <table:table-cell table:style-name="ce12N2" office:value-type="float" office:value="8432.51">
            <text:p>843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061129552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1">
            <text:p>30821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10.61">
            <text:p>2631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82.43">
            <text:p>25482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32">
            <text:p>8,832</text:p>
          </table:table-cell>
          <table:table-cell table:style-name="ce12N2" office:value-type="float" office:value="1329.6">
            <text:p>13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31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06.53">
            <text:p>21506,53</text:p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.56">
            <text:p>193,56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828.18">
            <text:p>828,18</text:p>
          </table:table-cell>
          <table:table-cell table:style-name="ce12N2" office:value-type="float" office:value="25482.43">
            <text:p>25482,43</text:p>
          </table:table-cell>
          <table:table-cell table:style-name="ce12N2" office:value-type="float" office:value="1783.77">
            <text:p>178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0621650788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2">
            <text:p>30821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">
            <text:p>0,00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2.72">
            <text:p>2892,72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239.93">
            <text:p>23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3101772105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4">
            <text:p>308214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9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98.82">
            <text:p>3199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31911">
            <text:p>319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9182">
            <text:p>16,392</text:p>
          </table:table-cell>
          <table:table-cell table:style-name="ce12N2" office:value-type="float" office:value="7494">
            <text:p>749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99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25.44">
            <text:p>26725,44</text:p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.53">
            <text:p>240,5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87.82">
            <text:p>87,82</text:p>
          </table:table-cell>
          <table:table-cell table:style-name="ce12N2" office:value-type="float" office:value="31911">
            <text:p>31911,00</text:p>
          </table:table-cell>
          <table:table-cell table:style-name="ce12N2" office:value-type="float" office:value="2233.79">
            <text:p>223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69991000968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9">
            <text:p>3082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3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80.2">
            <text:p>1358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0.2">
            <text:p>1358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762">
            <text:p>0,948</text:p>
          </table:table-cell>
          <table:table-cell table:style-name="ce12N2" office:value-type="float" office:value="194.5">
            <text:p>1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580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461.35">
            <text:p>11461,35</text:p>
          </table:table-cell>
          <table:table-cell table:style-name="ce12N2" office:value-type="float" office:value="11.47">
            <text:p>1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.15">
            <text:p>103,1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80.2">
            <text:p>13580,20</text:p>
          </table:table-cell>
          <table:table-cell table:style-name="ce12N2" office:value-type="float" office:value="950.61">
            <text:p>95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3131662344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20">
            <text:p>308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6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0.64">
            <text:p>78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0.64">
            <text:p>78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9">
            <text:p>0,006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8.84">
            <text:p>658,84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3">
            <text:p>5,9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0.64">
            <text:p>780,64</text:p>
          </table:table-cell>
          <table:table-cell table:style-name="ce12N2" office:value-type="float" office:value="54.64">
            <text:p>5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6679150129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21">
            <text:p>308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6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2.4">
            <text:p>1338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82.4">
            <text:p>1338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4">
            <text:p>0,104</text:p>
          </table:table-cell>
          <table:table-cell table:style-name="ce12N2" office:value-type="float" office:value="113.4">
            <text:p>11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94.41">
            <text:p>11294,41</text:p>
          </table:table-cell>
          <table:table-cell table:style-name="ce12N2" office:value-type="float" office:value="11.29">
            <text:p>1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65">
            <text:p>101,6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82.4">
            <text:p>13382,40</text:p>
          </table:table-cell>
          <table:table-cell table:style-name="ce12N2" office:value-type="float" office:value="936.77">
            <text:p>93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66801622035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95">
            <text:p>195,00</text:p>
          </table:table-cell>
          <table:table-cell table:style-name="ce26N2" office:value-type="float" office:value="10025.68">
            <text:p>10025,68</text:p>
          </table:table-cell>
          <table:table-cell table:style-name="ce26N2" office:value-type="float" office:value="12249.34">
            <text:p>12249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2330.41">
            <text:p>142330,41</text:p>
          </table:table-cell>
          <table:table-cell table:style-name="ce26N2" office:value-type="float" office:value="6916987.03">
            <text:p>6916987,03</text:p>
          </table:table-cell>
          <table:table-cell table:style-name="ce26N2" office:value-type="float" office:value="451760.66">
            <text:p>451760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26.23">
            <text:p>3826,23</text:p>
          </table:table-cell>
          <table:table-cell table:style-name="ce26N2" office:value-type="float" office:value="7132469.97">
            <text:p>7132469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6294.87">
            <text:p>216294,87</text:p>
          </table:table-cell>
          <table:table-cell table:style-name="ce26N2" office:value-type="float" office:value="31200.09">
            <text:p>31200,09</text:p>
          </table:table-cell>
          <table:table-cell table:style-name="ce26N2" office:value-type="float" office:value="701.58">
            <text:p>701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5425.211604">
            <text:p>5425,212</text:p>
          </table:table-cell>
          <table:table-cell table:style-name="ce26N2" office:value-type="float" office:value="6956715.81">
            <text:p>6956715,81</text:p>
          </table:table-cell>
          <table:table-cell table:style-name="ce26N2" office:value-type="float" office:value="7132469.97">
            <text:p>7132469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43729.4">
            <text:p>1643729,40</text:p>
          </table:table-cell>
          <table:table-cell table:style-name="ce26N2" office:value-type="float" office:value="1643.77">
            <text:p>1643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793.54">
            <text:p>14793,5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39085.22">
            <text:p>539085,2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69">
            <text:p>40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32" meta:object-count="0"/>
    <meta:generator>LibreOffice/4.3.0.4$Windows_x86 LibreOffice_project/62ad5818884a2fc2e5780dd45466868d41009ec0</meta:generator>
  </office:meta>
</office:document-meta>
</file>