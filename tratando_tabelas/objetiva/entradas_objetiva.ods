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8/05/2026 07:30:58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299145">
            <text:p>299145</text:p>
          </table:table-cell>
          <table:table-cell table:style-name="ce0" table:number-columns-spanned="4" table:number-rows-spanned="1" office:value-type="string" calcext:value-type="string">
            <text:p>5.700 - MARSCHALL IND. COM. IMP. EXP. LTDA</text:p>
          </table:table-cell>
          <table:covered-table-cell table:number-columns-repeated="3"/>
          <table:table-cell table:style-name="ce0" office:value-type="string" calcext:value-type="string">
            <text:p>696.56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1/2026</text:p>
          </table:table-cell>
          <table:table-cell table:style-name="ce0" office:value-type="string" calcext:value-type="string">
            <text:p>12/01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5.43">
            <text:p>122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19">
            <text:p>101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25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1/2026</text:p>
          </table:table-cell>
          <table:table-cell table:style-name="ce12N2" office:value-type="float" office:value="118.13">
            <text:p>118,13</text:p>
          </table:table-cell>
          <table:table-cell table:style-name="ce12N2" office:value-type="float" office:value="1019">
            <text:p>1019,00</text:p>
          </table:table-cell>
          <table:table-cell table:style-name="ce12N2" office:value-type="float" office:value="40.76">
            <text:p>4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88.19">
            <text:p>488,19</text:p>
          </table:table-cell>
          <table:table-cell table:style-name="ce12N2" office:value-type="float" office:value="88.3">
            <text:p>88,3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1021305250001775500300069656013561187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2520">
            <text:p>302520</text:p>
          </table:table-cell>
          <table:table-cell table:style-name="ce0" table:number-columns-spanned="4" table:number-rows-spanned="1" office:value-type="string" calcext:value-type="string">
            <text:p>15.690 - CLI CENTRAL DE LOGISTICA INTEGRADA LTDA</text:p>
          </table:table-cell>
          <table:covered-table-cell table:number-columns-repeated="3"/>
          <table:table-cell table:style-name="ce0" office:value-type="string" calcext:value-type="string">
            <text:p>38.09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4/02/2026</text:p>
          </table:table-cell>
          <table:table-cell table:style-name="ce0" office:value-type="string" calcext:value-type="string">
            <text:p>04/03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4.51">
            <text:p>35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4.51">
            <text:p>354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4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4.51">
            <text:p>354,51</text:p>
          </table:table-cell>
          <table:table-cell table:style-name="ce12N2" office:value-type="float" office:value="24.82">
            <text:p>2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213528071000103550040000380921000371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2535">
            <text:p>302535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30.018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03/03/2026</text:p>
          </table:table-cell>
          <table:table-cell table:style-name="ce0" office:value-type="string" calcext:value-type="string">
            <text:p>04/03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.79">
            <text:p>10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.79">
            <text:p>108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">
            <text:p>30,000</text:p>
          </table:table-cell>
          <table:table-cell table:style-name="ce12N2" office:value-type="float" office:value="3425.1">
            <text:p>3425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8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.79">
            <text:p>108,79</text:p>
          </table:table-cell>
          <table:table-cell table:style-name="ce12N2" office:value-type="float" office:value="21.76">
            <text:p>2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1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3016378950074985500600143001814956667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7">
            <text:p>30439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199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36.55">
            <text:p>3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606427740012095500100019933110060851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9">
            <text:p>305929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09.04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77.5">
            <text:p>1707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6539.96">
            <text:p>16539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5227">
            <text:p>0,155</text:p>
          </table:table-cell>
          <table:table-cell table:style-name="ce12N2" office:value-type="float" office:value="210.19">
            <text:p>210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07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">
            <text:p>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37.54">
            <text:p>537,54</text:p>
          </table:table-cell>
          <table:table-cell table:style-name="ce12N2" office:value-type="float" office:value="16539.96">
            <text:p>16539,96</text:p>
          </table:table-cell>
          <table:table-cell table:style-name="ce12N2" office:value-type="float" office:value="1157.8">
            <text:p>115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46833740003005500300060904719988376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55">
            <text:p>306055</text:p>
          </table:table-cell>
          <table:table-cell table:style-name="ce0" table:number-columns-spanned="4" table:number-rows-spanned="1" office:value-type="string" calcext:value-type="string">
            <text:p>674 - ESFERA ESTAMPARIA DE FERRO E ACO LTDA</text:p>
          </table:table-cell>
          <table:covered-table-cell table:number-columns-repeated="3"/>
          <table:table-cell table:style-name="ce0" office:value-type="string" calcext:value-type="string">
            <text:p>145.9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8.74792">
            <text:p>38,748</text:p>
          </table:table-cell>
          <table:table-cell table:style-name="ce12N2" office:value-type="float" office:value="2302.6">
            <text:p>230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486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1784.05">
            <text:p>1784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21260419000152550010001459071219908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97">
            <text:p>30609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4.64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8.4">
            <text:p>339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98.4">
            <text:p>339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2">
            <text:p>0,011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9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98.4">
            <text:p>3398,40</text:p>
          </table:table-cell>
          <table:table-cell table:style-name="ce12N2" office:value-type="float" office:value="237.89">
            <text:p>237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464519799933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29">
            <text:p>30612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2.15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759.85">
            <text:p>3775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7515.99">
            <text:p>3751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063164">
            <text:p>4,063</text:p>
          </table:table-cell>
          <table:table-cell table:style-name="ce12N2" office:value-type="float" office:value="21489.76">
            <text:p>21489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75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243.86">
            <text:p>243,86</text:p>
          </table:table-cell>
          <table:table-cell table:style-name="ce12N2" office:value-type="float" office:value="37515.99">
            <text:p>37515,99</text:p>
          </table:table-cell>
          <table:table-cell table:style-name="ce12N2" office:value-type="float" office:value="2626.12">
            <text:p>262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215718081254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02">
            <text:p>306202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5.9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.48">
            <text:p>33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9.48">
            <text:p>339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556">
            <text:p>0,018</text:p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9.48">
            <text:p>339,48</text:p>
          </table:table-cell>
          <table:table-cell table:style-name="ce12N2" office:value-type="float" office:value="23.76">
            <text:p>2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37008145000149550010001059471280418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03">
            <text:p>306203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5.9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.08">
            <text:p>379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.08">
            <text:p>379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704">
            <text:p>0,020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9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08">
            <text:p>379,08</text:p>
          </table:table-cell>
          <table:table-cell table:style-name="ce12N2" office:value-type="float" office:value="26.54">
            <text:p>2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370081450001495500100010594911898592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73">
            <text:p>306273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6.0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768.78">
            <text:p>19768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6088.08">
            <text:p>16088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.336646">
            <text:p>30,337</text:p>
          </table:table-cell>
          <table:table-cell table:style-name="ce12N2" office:value-type="float" office:value="263.02">
            <text:p>263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768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88.08">
            <text:p>16088,08</text:p>
          </table:table-cell>
          <table:table-cell table:style-name="ce12N2" office:value-type="float" office:value="1126.17">
            <text:p>1126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3949.99">
            <text:p>23949,99</text:p>
          </table:table-cell>
          <table:table-cell table:style-name="ce12N2" office:value-type="float" office:value="3680.7">
            <text:p>3680,7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370081450001495500100010600215776550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50">
            <text:p>306350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3.0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33.44">
            <text:p>1893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11.17">
            <text:p>1881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99997">
            <text:p>2,900</text:p>
          </table:table-cell>
          <table:table-cell table:style-name="ce12N2" office:value-type="float" office:value="11804.18">
            <text:p>11804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933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22.27">
            <text:p>122,27</text:p>
          </table:table-cell>
          <table:table-cell table:style-name="ce12N2" office:value-type="float" office:value="18811.17">
            <text:p>18811,17</text:p>
          </table:table-cell>
          <table:table-cell table:style-name="ce12N2" office:value-type="float" office:value="1316.78">
            <text:p>131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302815643380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85">
            <text:p>30638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8.4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6">
            <text:p>81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6">
            <text:p>81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48">
            <text:p>0,155</text:p>
          </table:table-cell>
          <table:table-cell table:style-name="ce12N2" office:value-type="float" office:value="22.32">
            <text:p>22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6">
            <text:p>816,00</text:p>
          </table:table-cell>
          <table:table-cell table:style-name="ce12N2" office:value-type="float" office:value="57.12">
            <text:p>5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842619763100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86">
            <text:p>30638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8.4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4">
            <text:p>156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4">
            <text:p>156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67">
            <text:p>0,297</text:p>
          </table:table-cell>
          <table:table-cell table:style-name="ce12N2" office:value-type="float" office:value="42.78">
            <text:p>42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6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4">
            <text:p>1564,00</text:p>
          </table:table-cell>
          <table:table-cell table:style-name="ce12N2" office:value-type="float" office:value="109.48">
            <text:p>10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843818883216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87">
            <text:p>30638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8.4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31.27">
            <text:p>1643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677.2">
            <text:p>1567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648">
            <text:p>0,086</text:p>
          </table:table-cell>
          <table:table-cell table:style-name="ce12N2" office:value-type="float" office:value="70.92">
            <text:p>70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431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754.07">
            <text:p>754,07</text:p>
          </table:table-cell>
          <table:table-cell table:style-name="ce12N2" office:value-type="float" office:value="15677.2">
            <text:p>15677,20</text:p>
          </table:table-cell>
          <table:table-cell table:style-name="ce12N2" office:value-type="float" office:value="1097.4">
            <text:p>109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844513501675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90">
            <text:p>306390</text:p>
          </table:table-cell>
          <table:table-cell table:style-name="ce0" table:number-columns-spanned="4" table:number-rows-spanned="1" office:value-type="string" calcext:value-type="string">
            <text:p>7.087 - VELLORE S/A</text:p>
          </table:table-cell>
          <table:covered-table-cell table:number-columns-repeated="3"/>
          <table:table-cell table:style-name="ce0" office:value-type="string" calcext:value-type="string">
            <text:p>405.9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45.11">
            <text:p>20345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9419.38">
            <text:p>19419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24">
            <text:p>0,023</text:p>
          </table:table-cell>
          <table:table-cell table:style-name="ce12N2" office:value-type="float" office:value="70.03">
            <text:p>70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345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925.73">
            <text:p>925,73</text:p>
          </table:table-cell>
          <table:table-cell table:style-name="ce12N2" office:value-type="float" office:value="19419.38">
            <text:p>19419,38</text:p>
          </table:table-cell>
          <table:table-cell table:style-name="ce12N2" office:value-type="float" office:value="778.34">
            <text:p>778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17230860001435500100040594414999656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91">
            <text:p>306391</text:p>
          </table:table-cell>
          <table:table-cell table:style-name="ce0" table:number-columns-spanned="4" table:number-rows-spanned="1" office:value-type="string" calcext:value-type="string">
            <text:p>11.272 - POLYSPACE INDUSTRIA DE ACESSORIOS PARA CASA E BANHO LTDA</text:p>
          </table:table-cell>
          <table:covered-table-cell table:number-columns-repeated="3"/>
          <table:table-cell table:style-name="ce0" office:value-type="string" calcext:value-type="string">
            <text:p>21.0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48.1">
            <text:p>2064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0648.1">
            <text:p>20648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96236">
            <text:p>0,496</text:p>
          </table:table-cell>
          <table:table-cell table:style-name="ce12N2" office:value-type="float" office:value="246.07">
            <text:p>246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648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48.1">
            <text:p>20648,10</text:p>
          </table:table-cell>
          <table:table-cell table:style-name="ce12N2" office:value-type="float" office:value="2477.78">
            <text:p>247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32604231597020001185500100002100810660879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45">
            <text:p>306445</text:p>
          </table:table-cell>
          <table:table-cell table:style-name="ce0" table:number-columns-spanned="4" table:number-rows-spanned="1" office:value-type="string" calcext:value-type="string">
            <text:p>15.950 - D. PLASTIC IND. E COM. DE ARTIGOS DE PLASTICOS - EIRELI</text:p>
          </table:table-cell>
          <table:covered-table-cell table:number-columns-repeated="3"/>
          <table:table-cell table:style-name="ce0" office:value-type="string" calcext:value-type="string">
            <text:p>47.1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1309">
            <text:p>25,131</text:p>
          </table:table-cell>
          <table:table-cell table:style-name="ce12N2" office:value-type="float" office:value="134.5">
            <text:p>13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011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840.82">
            <text:p>840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33385067000140550010000471651420518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6">
            <text:p>306526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2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465.77">
            <text:p>23465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465.77">
            <text:p>2346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232">
            <text:p>1,523</text:p>
          </table:table-cell>
          <table:table-cell table:style-name="ce12N2" office:value-type="float" office:value="272">
            <text:p>2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465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65.77">
            <text:p>23465,77</text:p>
          </table:table-cell>
          <table:table-cell table:style-name="ce12N2" office:value-type="float" office:value="1642.6">
            <text:p>164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015548460001365500100068326017340084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8">
            <text:p>306528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2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47.87">
            <text:p>244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47.87">
            <text:p>2447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095">
            <text:p>0,071</text:p>
          </table:table-cell>
          <table:table-cell table:style-name="ce12N2" office:value-type="float" office:value="16.81">
            <text:p>16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47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47.87">
            <text:p>2447,87</text:p>
          </table:table-cell>
          <table:table-cell table:style-name="ce12N2" office:value-type="float" office:value="97.91">
            <text:p>97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015548460001365500100068326114542976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7">
            <text:p>30654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9.4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8.54">
            <text:p>255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78">
            <text:p>247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08">
            <text:p>0,241</text:p>
          </table:table-cell>
          <table:table-cell table:style-name="ce12N2" office:value-type="float" office:value="70.7">
            <text:p>70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58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80.54">
            <text:p>80,54</text:p>
          </table:table-cell>
          <table:table-cell table:style-name="ce12N2" office:value-type="float" office:value="2478">
            <text:p>2478,00</text:p>
          </table:table-cell>
          <table:table-cell table:style-name="ce12N2" office:value-type="float" office:value="173.46">
            <text:p>17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1942115282245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8">
            <text:p>30654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9.4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49.1">
            <text:p>734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349.1">
            <text:p>7349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8277">
            <text:p>0,683</text:p>
          </table:table-cell>
          <table:table-cell table:style-name="ce12N2" office:value-type="float" office:value="99.99">
            <text:p>99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49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349.1">
            <text:p>7349,10</text:p>
          </table:table-cell>
          <table:table-cell table:style-name="ce12N2" office:value-type="float" office:value="514.44">
            <text:p>514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194041851497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9">
            <text:p>30654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9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4.92">
            <text:p>30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4.92">
            <text:p>304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">
            <text:p>0,002</text:p>
          </table:table-cell>
          <table:table-cell table:style-name="ce12N2" office:value-type="float" office:value="2.09">
            <text:p>2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4.92">
            <text:p>304,92</text:p>
          </table:table-cell>
          <table:table-cell table:style-name="ce12N2" office:value-type="float" office:value="12.2">
            <text:p>1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193801354214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52">
            <text:p>306552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2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309.56">
            <text:p>98130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">
            <text:p>43,00</text:p>
          </table:table-cell>
          <table:table-cell table:style-name="ce12N2" office:value-type="float" office:value="946237.05">
            <text:p>946237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3.070619">
            <text:p>53,071</text:p>
          </table:table-cell>
          <table:table-cell table:style-name="ce12N2" office:value-type="float" office:value="6522.54">
            <text:p>6522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1.309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35072.51">
            <text:p>35072,51</text:p>
          </table:table-cell>
          <table:table-cell table:style-name="ce12N2" office:value-type="float" office:value="946237.05">
            <text:p>946237,05</text:p>
          </table:table-cell>
          <table:table-cell table:style-name="ce12N2" office:value-type="float" office:value="57537.74">
            <text:p>5753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015548460001365500100068326216835195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4">
            <text:p>306564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5.7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96.77">
            <text:p>689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79.68">
            <text:p>667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34232">
            <text:p>1,334</text:p>
          </table:table-cell>
          <table:table-cell table:style-name="ce12N2" office:value-type="float" office:value="257.3">
            <text:p>257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96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17.09">
            <text:p>217,09</text:p>
          </table:table-cell>
          <table:table-cell table:style-name="ce12N2" office:value-type="float" office:value="6679.68">
            <text:p>6679,68</text:p>
          </table:table-cell>
          <table:table-cell table:style-name="ce12N2" office:value-type="float" office:value="267.19">
            <text:p>26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574314412013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2">
            <text:p>306572</text:p>
          </table:table-cell>
          <table:table-cell table:style-name="ce0" table:number-columns-spanned="4" table:number-rows-spanned="1" office:value-type="string" calcext:value-type="string">
            <text:p>571 - MAX METALURGICA</text:p>
          </table:table-cell>
          <table:covered-table-cell table:number-columns-repeated="3"/>
          <table:table-cell table:style-name="ce0" office:value-type="string" calcext:value-type="string">
            <text:p>179.3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764.25">
            <text:p>15764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15568.08">
            <text:p>15568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4.844636">
            <text:p>134,845</text:p>
          </table:table-cell>
          <table:table-cell table:style-name="ce12N2" office:value-type="float" office:value="530.69">
            <text:p>530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764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96.17">
            <text:p>196,17</text:p>
          </table:table-cell>
          <table:table-cell table:style-name="ce12N2" office:value-type="float" office:value="15093.76">
            <text:p>15093,76</text:p>
          </table:table-cell>
          <table:table-cell table:style-name="ce12N2" office:value-type="float" office:value="1056.55">
            <text:p>105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919136810001345500100017934118958294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97">
            <text:p>30669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8.6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72.4">
            <text:p>267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72.4">
            <text:p>267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828">
            <text:p>0,248</text:p>
          </table:table-cell>
          <table:table-cell table:style-name="ce12N2" office:value-type="float" office:value="36.36">
            <text:p>36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7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72.4">
            <text:p>2672,40</text:p>
          </table:table-cell>
          <table:table-cell table:style-name="ce12N2" office:value-type="float" office:value="187.07">
            <text:p>18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86071017307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06">
            <text:p>306706</text:p>
          </table:table-cell>
          <table:table-cell table:style-name="ce0" table:number-columns-spanned="4" table:number-rows-spanned="1" office:value-type="string" calcext:value-type="string">
            <text:p>11.272 - POLYSPACE INDUSTRIA DE ACESSORIOS PARA CASA E BANHO LTDA</text:p>
          </table:table-cell>
          <table:covered-table-cell table:number-columns-repeated="3"/>
          <table:table-cell table:style-name="ce0" office:value-type="string" calcext:value-type="string">
            <text:p>21.0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4.84">
            <text:p>744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4.84">
            <text:p>74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482">
            <text:p>0,019</text:p>
          </table:table-cell>
          <table:table-cell table:style-name="ce12N2" office:value-type="float" office:value="9.3">
            <text:p>9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44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4.84">
            <text:p>744,84</text:p>
          </table:table-cell>
          <table:table-cell table:style-name="ce12N2" office:value-type="float" office:value="89.38">
            <text:p>89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32604231597020001185500100002100911594269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38">
            <text:p>306738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5.6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517.12">
            <text:p>4651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5882.06">
            <text:p>45882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87684">
            <text:p>3,388</text:p>
          </table:table-cell>
          <table:table-cell table:style-name="ce12N2" office:value-type="float" office:value="521.03">
            <text:p>521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.51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35.06">
            <text:p>635,06</text:p>
          </table:table-cell>
          <table:table-cell table:style-name="ce12N2" office:value-type="float" office:value="45882.06">
            <text:p>45882,06</text:p>
          </table:table-cell>
          <table:table-cell table:style-name="ce12N2" office:value-type="float" office:value="2573.89">
            <text:p>2573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56191248127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00">
            <text:p>306800</text:p>
          </table:table-cell>
          <table:table-cell table:style-name="ce0" table:number-columns-spanned="4" table:number-rows-spanned="1" office:value-type="string" calcext:value-type="string">
            <text:p>6.059 - TECNO-FLEX INDUSTRIA E COMERCIO LTDA</text:p>
          </table:table-cell>
          <table:covered-table-cell table:number-columns-repeated="3"/>
          <table:table-cell table:style-name="ce0" office:value-type="string" calcext:value-type="string">
            <text:p>50.8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22.13">
            <text:p>2232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1619.5">
            <text:p>2161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6.11095">
            <text:p>26,111</text:p>
          </table:table-cell>
          <table:table-cell table:style-name="ce12N2" office:value-type="float" office:value="250.16">
            <text:p>250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322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702.63">
            <text:p>702,63</text:p>
          </table:table-cell>
          <table:table-cell table:style-name="ce12N2" office:value-type="float" office:value="21619.5">
            <text:p>21619,50</text:p>
          </table:table-cell>
          <table:table-cell table:style-name="ce12N2" office:value-type="float" office:value="1513.37">
            <text:p>151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7039802000122550010000508131390370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2">
            <text:p>306812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870.93">
            <text:p>9587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2853.2">
            <text:p>9285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958885">
            <text:p>7,959</text:p>
          </table:table-cell>
          <table:table-cell table:style-name="ce12N2" office:value-type="float" office:value="10340">
            <text:p>103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87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17.73">
            <text:p>3017,73</text:p>
          </table:table-cell>
          <table:table-cell table:style-name="ce12N2" office:value-type="float" office:value="92853.2">
            <text:p>92853,20</text:p>
          </table:table-cell>
          <table:table-cell table:style-name="ce12N2" office:value-type="float" office:value="6499.72">
            <text:p>649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010156650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3">
            <text:p>306813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28.42">
            <text:p>11412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0536">
            <text:p>11053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7456">
            <text:p>3,275</text:p>
          </table:table-cell>
          <table:table-cell table:style-name="ce12N2" office:value-type="float" office:value="13000">
            <text:p>13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4.128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592.42">
            <text:p>3592,42</text:p>
          </table:table-cell>
          <table:table-cell table:style-name="ce12N2" office:value-type="float" office:value="110536">
            <text:p>110536,00</text:p>
          </table:table-cell>
          <table:table-cell table:style-name="ce12N2" office:value-type="float" office:value="7737.52">
            <text:p>773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110156650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5">
            <text:p>306815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056.53">
            <text:p>9805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4970">
            <text:p>9497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6816">
            <text:p>2,468</text:p>
          </table:table-cell>
          <table:table-cell table:style-name="ce12N2" office:value-type="float" office:value="7300">
            <text:p>73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056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86.53">
            <text:p>3086,53</text:p>
          </table:table-cell>
          <table:table-cell table:style-name="ce12N2" office:value-type="float" office:value="94970">
            <text:p>94970,00</text:p>
          </table:table-cell>
          <table:table-cell table:style-name="ce12N2" office:value-type="float" office:value="6647.9">
            <text:p>664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210156650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36">
            <text:p>306836</text:p>
          </table:table-cell>
          <table:table-cell table:style-name="ce0" table:number-columns-spanned="4" table:number-rows-spanned="1" office:value-type="string" calcext:value-type="string">
            <text:p>29.444 - PRIME BRAS SEGURANCA LTDA</text:p>
          </table:table-cell>
          <table:covered-table-cell table:number-columns-repeated="3"/>
          <table:table-cell table:style-name="ce0" office:value-type="string" calcext:value-type="string">
            <text:p>1.38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90">
            <text:p>1389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890">
            <text:p>138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454">
            <text:p>0,175</text:p>
          </table:table-cell>
          <table:table-cell table:style-name="ce12N2" office:value-type="float" office:value="47.7">
            <text:p>47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89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90">
            <text:p>13890,00</text:p>
          </table:table-cell>
          <table:table-cell table:style-name="ce12N2" office:value-type="float" office:value="972.3">
            <text:p>97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22966690001695500300000138619469776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37">
            <text:p>306837</text:p>
          </table:table-cell>
          <table:table-cell table:style-name="ce0" table:number-columns-spanned="4" table:number-rows-spanned="1" office:value-type="string" calcext:value-type="string">
            <text:p>35.393 - METALURGICA LOTH LTDA</text:p>
          </table:table-cell>
          <table:covered-table-cell table:number-columns-repeated="3"/>
          <table:table-cell table:style-name="ce0" office:value-type="string" calcext:value-type="string">
            <text:p>73.7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08.91">
            <text:p>3408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3389.95">
            <text:p>3389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222">
            <text:p>0,332</text:p>
          </table:table-cell>
          <table:table-cell table:style-name="ce12N2" office:value-type="float" office:value="113.08">
            <text:p>113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08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8.96">
            <text:p>18,96</text:p>
          </table:table-cell>
          <table:table-cell table:style-name="ce12N2" office:value-type="float" office:value="3389.95">
            <text:p>3389,95</text:p>
          </table:table-cell>
          <table:table-cell table:style-name="ce12N2" office:value-type="float" office:value="237.3">
            <text:p>23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72756890001075500100007372217527869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39">
            <text:p>30683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1.4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3.25">
            <text:p>207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46.71">
            <text:p>1946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64">
            <text:p>0,057</text:p>
          </table:table-cell>
          <table:table-cell table:style-name="ce12N2" office:value-type="float" office:value="41.28">
            <text:p>41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3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26.54">
            <text:p>126,54</text:p>
          </table:table-cell>
          <table:table-cell table:style-name="ce12N2" office:value-type="float" office:value="1946.71">
            <text:p>1946,71</text:p>
          </table:table-cell>
          <table:table-cell table:style-name="ce12N2" office:value-type="float" office:value="77.87">
            <text:p>7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14431589225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47">
            <text:p>306847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1.4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1.62">
            <text:p>155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02.78">
            <text:p>1502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2">
            <text:p>0,025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5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8.84">
            <text:p>48,84</text:p>
          </table:table-cell>
          <table:table-cell table:style-name="ce12N2" office:value-type="float" office:value="1502.78">
            <text:p>1502,78</text:p>
          </table:table-cell>
          <table:table-cell table:style-name="ce12N2" office:value-type="float" office:value="105.19">
            <text:p>10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144215702544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67">
            <text:p>306867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66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647.22">
            <text:p>102647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12N2" office:value-type="float" office:value="101741.04">
            <text:p>10174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726.31291">
            <text:p>2726,313</text:p>
          </table:table-cell>
          <table:table-cell table:style-name="ce12N2" office:value-type="float" office:value="418.76">
            <text:p>41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2.647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906.18">
            <text:p>906,18</text:p>
          </table:table-cell>
          <table:table-cell table:style-name="ce12N2" office:value-type="float" office:value="101741.04">
            <text:p>101741,04</text:p>
          </table:table-cell>
          <table:table-cell table:style-name="ce12N2" office:value-type="float" office:value="7076.1">
            <text:p>707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330642620002505500100026623910233051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91">
            <text:p>306891</text:p>
          </table:table-cell>
          <table:table-cell table:style-name="ce0" table:number-columns-spanned="4" table:number-rows-spanned="1" office:value-type="string" calcext:value-type="string">
            <text:p>3.848 - HIDROSSOL IND. E COM. DE PLASTICOS LTDA.</text:p>
          </table:table-cell>
          <table:covered-table-cell table:number-columns-repeated="3"/>
          <table:table-cell table:style-name="ce0" office:value-type="string" calcext:value-type="string">
            <text:p>57.5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04.76">
            <text:p>1890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18904.76">
            <text:p>18904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112312">
            <text:p>2,112</text:p>
          </table:table-cell>
          <table:table-cell table:style-name="ce12N2" office:value-type="float" office:value="764.31">
            <text:p>764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904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04.76">
            <text:p>18904,76</text:p>
          </table:table-cell>
          <table:table-cell table:style-name="ce12N2" office:value-type="float" office:value="1323.32">
            <text:p>132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75045140001555500100005752919057529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20">
            <text:p>306920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4.022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371.57">
            <text:p>3837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8072.86">
            <text:p>38072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33615">
            <text:p>2,934</text:p>
          </table:table-cell>
          <table:table-cell table:style-name="ce12N2" office:value-type="float" office:value="3392.82">
            <text:p>3392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371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298.71">
            <text:p>298,71</text:p>
          </table:table-cell>
          <table:table-cell table:style-name="ce12N2" office:value-type="float" office:value="38072.86">
            <text:p>38072,86</text:p>
          </table:table-cell>
          <table:table-cell table:style-name="ce12N2" office:value-type="float" office:value="1524.62">
            <text:p>1524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2741051000185550550003040221675054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44">
            <text:p>30694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5.95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94">
            <text:p>1289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894">
            <text:p>1289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2">
            <text:p>0,037</text:p>
          </table:table-cell>
          <table:table-cell table:style-name="ce12N2" office:value-type="float" office:value="42">
            <text:p>4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89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894">
            <text:p>12894,00</text:p>
          </table:table-cell>
          <table:table-cell table:style-name="ce12N2" office:value-type="float" office:value="902.58">
            <text:p>90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595710659782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56">
            <text:p>306956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1.1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80.15">
            <text:p>3380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273.75">
            <text:p>3273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84">
            <text:p>0,218</text:p>
          </table:table-cell>
          <table:table-cell table:style-name="ce12N2" office:value-type="float" office:value="35.4">
            <text:p>3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80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106.4">
            <text:p>106,40</text:p>
          </table:table-cell>
          <table:table-cell table:style-name="ce12N2" office:value-type="float" office:value="3273.75">
            <text:p>3273,75</text:p>
          </table:table-cell>
          <table:table-cell table:style-name="ce12N2" office:value-type="float" office:value="229.16">
            <text:p>22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110314247404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64">
            <text:p>306964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889.83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6.15">
            <text:p>1126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6.15">
            <text:p>1126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55">
            <text:p>0,001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6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6.15">
            <text:p>1126,15</text:p>
          </table:table-cell>
          <table:table-cell table:style-name="ce12N2" office:value-type="float" office:value="78.83">
            <text:p>78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7771310034735500500088983814319414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86">
            <text:p>306986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2.2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838.72">
            <text:p>2383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838.72">
            <text:p>23838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91936">
            <text:p>1,192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838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38.72">
            <text:p>23838,72</text:p>
          </table:table-cell>
          <table:table-cell table:style-name="ce12N2" office:value-type="float" office:value="953.55">
            <text:p>953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227611000314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87">
            <text:p>306987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2.2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2.24">
            <text:p>100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2.24">
            <text:p>100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7072">
            <text:p>0,207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0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2.24">
            <text:p>1002,24</text:p>
          </table:table-cell>
          <table:table-cell table:style-name="ce12N2" office:value-type="float" office:value="40.09">
            <text:p>4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228611000311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53">
            <text:p>307053</text:p>
          </table:table-cell>
          <table:table-cell table:style-name="ce0" table:number-columns-spanned="4" table:number-rows-spanned="1" office:value-type="string" calcext:value-type="string">
            <text:p>23.993 - KARCHER INDUSTRIA E COMERCIO LIMITADA</text:p>
          </table:table-cell>
          <table:covered-table-cell table:number-columns-repeated="3"/>
          <table:table-cell table:style-name="ce0" office:value-type="string" calcext:value-type="string">
            <text:p>1.612.1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6.29">
            <text:p>3396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189">
            <text:p>318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49587">
            <text:p>0,450</text:p>
          </table:table-cell>
          <table:table-cell table:style-name="ce12N2" office:value-type="float" office:value="40.4">
            <text:p>4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96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207.29">
            <text:p>207,29</text:p>
          </table:table-cell>
          <table:table-cell table:style-name="ce12N2" office:value-type="float" office:value="3189">
            <text:p>3189,00</text:p>
          </table:table-cell>
          <table:table-cell table:style-name="ce12N2" office:value-type="float" office:value="160.68">
            <text:p>16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71109600001785500100161219514263370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58">
            <text:p>307058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5.4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2198.37">
            <text:p>38219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381701.86">
            <text:p>381701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8.38815">
            <text:p>58,388</text:p>
          </table:table-cell>
          <table:table-cell table:style-name="ce12N2" office:value-type="float" office:value="2277.92">
            <text:p>2277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2.198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496.51">
            <text:p>496,51</text:p>
          </table:table-cell>
          <table:table-cell table:style-name="ce12N2" office:value-type="float" office:value="381701.86">
            <text:p>381701,86</text:p>
          </table:table-cell>
          <table:table-cell table:style-name="ce12N2" office:value-type="float" office:value="26719.13">
            <text:p>26719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7549311133567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3">
            <text:p>307063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5.4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999.6">
            <text:p>44899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448999.6">
            <text:p>44899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2835">
            <text:p>2,284</text:p>
          </table:table-cell>
          <table:table-cell table:style-name="ce12N2" office:value-type="float" office:value="899.02">
            <text:p>899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8.99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8999.6">
            <text:p>448999,60</text:p>
          </table:table-cell>
          <table:table-cell table:style-name="ce12N2" office:value-type="float" office:value="31429.97">
            <text:p>31429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7549514312068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6">
            <text:p>30706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9.4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55.08">
            <text:p>6855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55.08">
            <text:p>6855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93292">
            <text:p>1,293</text:p>
          </table:table-cell>
          <table:table-cell table:style-name="ce12N2" office:value-type="float" office:value="376.21">
            <text:p>376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55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55.08">
            <text:p>6855,08</text:p>
          </table:table-cell>
          <table:table-cell table:style-name="ce12N2" office:value-type="float" office:value="479.86">
            <text:p>479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4944113506339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7">
            <text:p>30706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9.4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71.54">
            <text:p>3771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71.54">
            <text:p>3771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296">
            <text:p>0,553</text:p>
          </table:table-cell>
          <table:table-cell table:style-name="ce12N2" office:value-type="float" office:value="180">
            <text:p>1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71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71.54">
            <text:p>3771,54</text:p>
          </table:table-cell>
          <table:table-cell table:style-name="ce12N2" office:value-type="float" office:value="264.01">
            <text:p>26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4944010051908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8">
            <text:p>30706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9.4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9.44">
            <text:p>2419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19.44">
            <text:p>241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56456">
            <text:p>0,456</text:p>
          </table:table-cell>
          <table:table-cell table:style-name="ce12N2" office:value-type="float" office:value="132.78">
            <text:p>132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19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9.44">
            <text:p>2419,44</text:p>
          </table:table-cell>
          <table:table-cell table:style-name="ce12N2" office:value-type="float" office:value="169.36">
            <text:p>16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494391018201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9">
            <text:p>30706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9.4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4.8">
            <text:p>132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4.8">
            <text:p>132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6788">
            <text:p>0,347</text:p>
          </table:table-cell>
          <table:table-cell table:style-name="ce12N2" office:value-type="float" office:value="71.76">
            <text:p>7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4.8">
            <text:p>1324,80</text:p>
          </table:table-cell>
          <table:table-cell table:style-name="ce12N2" office:value-type="float" office:value="92.74">
            <text:p>9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494421014824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70">
            <text:p>307070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8.38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016.8">
            <text:p>14401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144016.8">
            <text:p>14401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86501">
            <text:p>11,865</text:p>
          </table:table-cell>
          <table:table-cell table:style-name="ce12N2" office:value-type="float" office:value="3127.43">
            <text:p>3127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4.01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016.8">
            <text:p>144016,80</text:p>
          </table:table-cell>
          <table:table-cell table:style-name="ce12N2" office:value-type="float" office:value="10081.18">
            <text:p>1008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5838316067141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71">
            <text:p>307071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5.06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281.76">
            <text:p>3428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">
            <text:p>53,00</text:p>
          </table:table-cell>
          <table:table-cell table:style-name="ce12N2" office:value-type="float" office:value="33669.3">
            <text:p>3366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15998">
            <text:p>5,316</text:p>
          </table:table-cell>
          <table:table-cell table:style-name="ce12N2" office:value-type="float" office:value="740.61">
            <text:p>74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281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12.46">
            <text:p>612,46</text:p>
          </table:table-cell>
          <table:table-cell table:style-name="ce12N2" office:value-type="float" office:value="33669.3">
            <text:p>33669,30</text:p>
          </table:table-cell>
          <table:table-cell table:style-name="ce12N2" office:value-type="float" office:value="2057.24">
            <text:p>205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8506617081554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74">
            <text:p>307074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4.7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196.87">
            <text:p>48196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46679.78">
            <text:p>46679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8794">
            <text:p>0,319</text:p>
          </table:table-cell>
          <table:table-cell table:style-name="ce12N2" office:value-type="float" office:value="1291.05">
            <text:p>1291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196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517.09">
            <text:p>1517,09</text:p>
          </table:table-cell>
          <table:table-cell table:style-name="ce12N2" office:value-type="float" office:value="46679.78">
            <text:p>46679,78</text:p>
          </table:table-cell>
          <table:table-cell table:style-name="ce12N2" office:value-type="float" office:value="2909.39">
            <text:p>290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064150000518550010002047951293807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77">
            <text:p>307077</text:p>
          </table:table-cell>
          <table:table-cell table:style-name="ce0" table:number-columns-spanned="4" table:number-rows-spanned="1" office:value-type="string" calcext:value-type="string">
            <text:p>10.396 - VIAPOL LTDA</text:p>
          </table:table-cell>
          <table:covered-table-cell table:number-columns-repeated="3"/>
          <table:table-cell table:style-name="ce0" office:value-type="string" calcext:value-type="string">
            <text:p>948.3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285.43">
            <text:p>5528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5274.88">
            <text:p>5527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46736">
            <text:p>16,467</text:p>
          </table:table-cell>
          <table:table-cell table:style-name="ce12N2" office:value-type="float" office:value="19056">
            <text:p>1905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.285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.14">
            <text:p>56,1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0.55">
            <text:p>10,55</text:p>
          </table:table-cell>
          <table:table-cell table:style-name="ce12N2" office:value-type="float" office:value="55274.88">
            <text:p>55274,88</text:p>
          </table:table-cell>
          <table:table-cell table:style-name="ce12N2" office:value-type="float" office:value="3869.23">
            <text:p>3869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681867000130550010009483351777182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1">
            <text:p>30708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0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93.49">
            <text:p>249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25.11">
            <text:p>2425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18">
            <text:p>0,091</text:p>
          </table:table-cell>
          <table:table-cell table:style-name="ce12N2" office:value-type="float" office:value="25.5">
            <text:p>25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93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">
            <text:p>2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8.38">
            <text:p>68,38</text:p>
          </table:table-cell>
          <table:table-cell table:style-name="ce12N2" office:value-type="float" office:value="2425.11">
            <text:p>2425,11</text:p>
          </table:table-cell>
          <table:table-cell table:style-name="ce12N2" office:value-type="float" office:value="169.75">
            <text:p>16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0511570260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7">
            <text:p>3070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99.68">
            <text:p>619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199.68">
            <text:p>619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2412">
            <text:p>0,092</text:p>
          </table:table-cell>
          <table:table-cell table:style-name="ce12N2" office:value-type="float" office:value="11.41">
            <text:p>11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99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99.68">
            <text:p>6199,68</text:p>
          </table:table-cell>
          <table:table-cell table:style-name="ce12N2" office:value-type="float" office:value="433.98">
            <text:p>43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11395890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8">
            <text:p>3070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2.52">
            <text:p>1672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72.52">
            <text:p>1672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624">
            <text:p>0,006</text:p>
          </table:table-cell>
          <table:table-cell table:style-name="ce12N2" office:value-type="float" office:value="2.96">
            <text:p>2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72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72.52">
            <text:p>1672,52</text:p>
          </table:table-cell>
          <table:table-cell table:style-name="ce12N2" office:value-type="float" office:value="117.08">
            <text:p>117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217992861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9">
            <text:p>3070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158.4">
            <text:p>1515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158.4">
            <text:p>1515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">
            <text:p>0,036</text:p>
          </table:table-cell>
          <table:table-cell table:style-name="ce12N2" office:value-type="float" office:value="123.52">
            <text:p>123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15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30.81">
            <text:p>11130,81</text:p>
          </table:table-cell>
          <table:table-cell table:style-name="ce12N2" office:value-type="float" office:value="779.16">
            <text:p>77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317588986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0">
            <text:p>3070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86.95">
            <text:p>1038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53">
            <text:p>975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758">
            <text:p>3,076</text:p>
          </table:table-cell>
          <table:table-cell table:style-name="ce12N2" office:value-type="float" office:value="112.2">
            <text:p>11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8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33.95">
            <text:p>633,95</text:p>
          </table:table-cell>
          <table:table-cell table:style-name="ce12N2" office:value-type="float" office:value="9753">
            <text:p>9753,00</text:p>
          </table:table-cell>
          <table:table-cell table:style-name="ce12N2" office:value-type="float" office:value="390.12">
            <text:p>39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416360108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1">
            <text:p>3070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366.78">
            <text:p>1936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366.78">
            <text:p>19366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935">
            <text:p>0,015</text:p>
          </table:table-cell>
          <table:table-cell table:style-name="ce12N2" office:value-type="float" office:value="1.45">
            <text:p>1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366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66.78">
            <text:p>19366,78</text:p>
          </table:table-cell>
          <table:table-cell table:style-name="ce12N2" office:value-type="float" office:value="1355.67">
            <text:p>1355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511654221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2">
            <text:p>3070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00.1">
            <text:p>12100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61.6">
            <text:p>1136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9504">
            <text:p>0,120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100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38.5">
            <text:p>738,50</text:p>
          </table:table-cell>
          <table:table-cell table:style-name="ce12N2" office:value-type="float" office:value="11361.6">
            <text:p>11361,60</text:p>
          </table:table-cell>
          <table:table-cell table:style-name="ce12N2" office:value-type="float" office:value="795.31">
            <text:p>795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610767865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3">
            <text:p>3070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8.32">
            <text:p>191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18.32">
            <text:p>1918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592">
            <text:p>0,005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18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18.32">
            <text:p>1918,32</text:p>
          </table:table-cell>
          <table:table-cell table:style-name="ce12N2" office:value-type="float" office:value="134.28">
            <text:p>134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718081381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4">
            <text:p>3070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293.8">
            <text:p>1629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293.8">
            <text:p>1629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59">
            <text:p>0,058</text:p>
          </table:table-cell>
          <table:table-cell table:style-name="ce12N2" office:value-type="float" office:value="33.61">
            <text:p>33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29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293.8">
            <text:p>16293,80</text:p>
          </table:table-cell>
          <table:table-cell table:style-name="ce12N2" office:value-type="float" office:value="756.6">
            <text:p>75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815078911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5">
            <text:p>3070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26.6">
            <text:p>852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526.6">
            <text:p>852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25">
            <text:p>0,020</text:p>
          </table:table-cell>
          <table:table-cell table:style-name="ce12N2" office:value-type="float" office:value="69.48">
            <text:p>69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52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61.08">
            <text:p>6261,08</text:p>
          </table:table-cell>
          <table:table-cell table:style-name="ce12N2" office:value-type="float" office:value="438.28">
            <text:p>43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915829571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6">
            <text:p>3070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342.39">
            <text:p>15342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406">
            <text:p>1440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04">
            <text:p>0,074</text:p>
          </table:table-cell>
          <table:table-cell table:style-name="ce12N2" office:value-type="float" office:value="36.36">
            <text:p>36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342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936.39">
            <text:p>936,39</text:p>
          </table:table-cell>
          <table:table-cell table:style-name="ce12N2" office:value-type="float" office:value="14406">
            <text:p>14406,00</text:p>
          </table:table-cell>
          <table:table-cell table:style-name="ce12N2" office:value-type="float" office:value="1008.42">
            <text:p>100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9517002464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7">
            <text:p>3070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5.93">
            <text:p>29105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8182.8">
            <text:p>2818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334">
            <text:p>0,293</text:p>
          </table:table-cell>
          <table:table-cell table:style-name="ce12N2" office:value-type="float" office:value="28">
            <text:p>2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105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923.13">
            <text:p>923,13</text:p>
          </table:table-cell>
          <table:table-cell table:style-name="ce12N2" office:value-type="float" office:value="28182.8">
            <text:p>28182,80</text:p>
          </table:table-cell>
          <table:table-cell table:style-name="ce12N2" office:value-type="float" office:value="1972.8">
            <text:p>197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9612840297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8">
            <text:p>30709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37.54">
            <text:p>453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60.6">
            <text:p>426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814">
            <text:p>0,045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37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276.94">
            <text:p>276,94</text:p>
          </table:table-cell>
          <table:table-cell table:style-name="ce12N2" office:value-type="float" office:value="4260.6">
            <text:p>4260,60</text:p>
          </table:table-cell>
          <table:table-cell table:style-name="ce12N2" office:value-type="float" office:value="298.24">
            <text:p>29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9714842720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9">
            <text:p>307099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88.70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90.08">
            <text:p>559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0.08">
            <text:p>5590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7024">
            <text:p>0,570</text:p>
          </table:table-cell>
          <table:table-cell table:style-name="ce12N2" office:value-type="float" office:value="230.4">
            <text:p>23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90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90.08">
            <text:p>5590,08</text:p>
          </table:table-cell>
          <table:table-cell table:style-name="ce12N2" office:value-type="float" office:value="391.31">
            <text:p>391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300018870417438524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11">
            <text:p>307111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4.149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352.72">
            <text:p>4635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">
            <text:p>31,00</text:p>
          </table:table-cell>
          <table:table-cell table:style-name="ce12N2" office:value-type="float" office:value="45598.9">
            <text:p>4559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152523">
            <text:p>7,153</text:p>
          </table:table-cell>
          <table:table-cell table:style-name="ce12N2" office:value-type="float" office:value="8613.53">
            <text:p>861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.352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53.82">
            <text:p>753,82</text:p>
          </table:table-cell>
          <table:table-cell table:style-name="ce12N2" office:value-type="float" office:value="45598.9">
            <text:p>45598,90</text:p>
          </table:table-cell>
          <table:table-cell table:style-name="ce12N2" office:value-type="float" office:value="1832.5">
            <text:p>183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2741051000185550550003041491306894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19">
            <text:p>30711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6.6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201.51">
            <text:p>115201,51</text:p>
          </table:table-cell>
          <table:table-cell table:style-name="ce12N2" office:value-type="float" office:value="5458.35">
            <text:p>5458,35</text:p>
          </table:table-cell>
          <table:table-cell table:style-name="ce12N2" office:value-type="float" office:value="70">
            <text:p>70,00</text:p>
          </table:table-cell>
          <table:table-cell table:style-name="ce12N2" office:value-type="float" office:value="109166.42">
            <text:p>109166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738377">
            <text:p>5,738</text:p>
          </table:table-cell>
          <table:table-cell table:style-name="ce12N2" office:value-type="float" office:value="5043.2">
            <text:p>504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5.201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.38">
            <text:p>96,3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9811.13">
            <text:p>9811,13</text:p>
          </table:table-cell>
          <table:table-cell table:style-name="ce12N2" office:value-type="float" office:value="103708.07">
            <text:p>103708,07</text:p>
          </table:table-cell>
          <table:table-cell table:style-name="ce12N2" office:value-type="float" office:value="4377.25">
            <text:p>4377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300.9">
            <text:p>9300,90</text:p>
          </table:table-cell>
          <table:table-cell table:style-name="ce12N2" office:value-type="float" office:value="1682.31">
            <text:p>1682,31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668512726456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3">
            <text:p>307123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2.67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35.72">
            <text:p>1123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882.05">
            <text:p>10882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1373">
            <text:p>25,137</text:p>
          </table:table-cell>
          <table:table-cell table:style-name="ce12N2" office:value-type="float" office:value="490.74">
            <text:p>49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35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53">
            <text:p>44,5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353.67">
            <text:p>353,67</text:p>
          </table:table-cell>
          <table:table-cell table:style-name="ce12N2" office:value-type="float" office:value="10882.05">
            <text:p>10882,05</text:p>
          </table:table-cell>
          <table:table-cell table:style-name="ce12N2" office:value-type="float" office:value="761.74">
            <text:p>76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7642862000248550020000126701349019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4">
            <text:p>307124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6.7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9.86">
            <text:p>3809,86</text:p>
          </table:table-cell>
          <table:table-cell table:style-name="ce12N2" office:value-type="float" office:value="107.4">
            <text:p>107,40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78.8">
            <text:p>357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9184">
            <text:p>8,918</text:p>
          </table:table-cell>
          <table:table-cell table:style-name="ce12N2" office:value-type="float" office:value="308">
            <text:p>30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09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.51">
            <text:p>53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338.46">
            <text:p>338,46</text:p>
          </table:table-cell>
          <table:table-cell table:style-name="ce12N2" office:value-type="float" office:value="3471.4">
            <text:p>3471,40</text:p>
          </table:table-cell>
          <table:table-cell table:style-name="ce12N2" office:value-type="float" office:value="138.86">
            <text:p>13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673717630488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5">
            <text:p>307125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2.68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81.63">
            <text:p>198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860.69">
            <text:p>1860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4">
            <text:p>0,023</text:p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81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20.94">
            <text:p>120,94</text:p>
          </table:table-cell>
          <table:table-cell table:style-name="ce12N2" office:value-type="float" office:value="1860.69">
            <text:p>1860,69</text:p>
          </table:table-cell>
          <table:table-cell table:style-name="ce12N2" office:value-type="float" office:value="74.43">
            <text:p>7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76428620002485500200001268116242455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31">
            <text:p>307131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7.0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5.18">
            <text:p>1325,18</text:p>
          </table:table-cell>
          <table:table-cell table:style-name="ce12N2" office:value-type="float" office:value="63.55">
            <text:p>63,55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71">
            <text:p>127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087">
            <text:p>0,071</text:p>
          </table:table-cell>
          <table:table-cell table:style-name="ce12N2" office:value-type="float" office:value="167.8">
            <text:p>16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5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4.41">
            <text:p>94,4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17.73">
            <text:p>117,73</text:p>
          </table:table-cell>
          <table:table-cell table:style-name="ce12N2" office:value-type="float" office:value="1207.45">
            <text:p>1207,45</text:p>
          </table:table-cell>
          <table:table-cell table:style-name="ce12N2" office:value-type="float" office:value="48.3">
            <text:p>4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70191133141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34">
            <text:p>307134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2.5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49.7">
            <text:p>18949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7706.49">
            <text:p>17706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41169">
            <text:p>1,641</text:p>
          </table:table-cell>
          <table:table-cell table:style-name="ce12N2" office:value-type="float" office:value="416.82">
            <text:p>416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949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">
            <text:p>5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243.21">
            <text:p>1243,21</text:p>
          </table:table-cell>
          <table:table-cell table:style-name="ce12N2" office:value-type="float" office:value="17706.49">
            <text:p>17706,49</text:p>
          </table:table-cell>
          <table:table-cell table:style-name="ce12N2" office:value-type="float" office:value="1239.46">
            <text:p>123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257714776061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38">
            <text:p>307138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2.5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7.95">
            <text:p>42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6.8">
            <text:p>40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3">
            <text:p>0,021</text:p>
          </table:table-cell>
          <table:table-cell table:style-name="ce12N2" office:value-type="float" office:value="8.52">
            <text:p>8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7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21.15">
            <text:p>21,15</text:p>
          </table:table-cell>
          <table:table-cell table:style-name="ce12N2" office:value-type="float" office:value="406.8">
            <text:p>406,80</text:p>
          </table:table-cell>
          <table:table-cell table:style-name="ce12N2" office:value-type="float" office:value="28.48">
            <text:p>2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256611000028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48">
            <text:p>30714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5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6.76">
            <text:p>1036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69.54">
            <text:p>969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616">
            <text:p>0,054</text:p>
          </table:table-cell>
          <table:table-cell table:style-name="ce12N2" office:value-type="float" office:value="11.62">
            <text:p>11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36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7.22">
            <text:p>67,22</text:p>
          </table:table-cell>
          <table:table-cell table:style-name="ce12N2" office:value-type="float" office:value="969.54">
            <text:p>969,54</text:p>
          </table:table-cell>
          <table:table-cell table:style-name="ce12N2" office:value-type="float" office:value="67.87">
            <text:p>6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51315702955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49">
            <text:p>30714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5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6.45">
            <text:p>1446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58.17">
            <text:p>1358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04">
            <text:p>0,041</text:p>
          </table:table-cell>
          <table:table-cell table:style-name="ce12N2" office:value-type="float" office:value="28.8">
            <text:p>2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6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88.28">
            <text:p>88,28</text:p>
          </table:table-cell>
          <table:table-cell table:style-name="ce12N2" office:value-type="float" office:value="1358.17">
            <text:p>1358,17</text:p>
          </table:table-cell>
          <table:table-cell table:style-name="ce12N2" office:value-type="float" office:value="54.33">
            <text:p>5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51515892361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0">
            <text:p>307150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4.9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0.72">
            <text:p>375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65.32">
            <text:p>356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65">
            <text:p>0,137</text:p>
          </table:table-cell>
          <table:table-cell table:style-name="ce12N2" office:value-type="float" office:value="171.6">
            <text:p>17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5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85.4">
            <text:p>185,40</text:p>
          </table:table-cell>
          <table:table-cell table:style-name="ce12N2" office:value-type="float" office:value="3565.32">
            <text:p>3565,32</text:p>
          </table:table-cell>
          <table:table-cell table:style-name="ce12N2" office:value-type="float" office:value="249.57">
            <text:p>24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498719398157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1">
            <text:p>307151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4.9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68.74">
            <text:p>626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071.42">
            <text:p>6071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299.236">
            <text:p>21299,236</text:p>
          </table:table-cell>
          <table:table-cell table:style-name="ce12N2" office:value-type="float" office:value="207.81">
            <text:p>207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68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97.32">
            <text:p>197,32</text:p>
          </table:table-cell>
          <table:table-cell table:style-name="ce12N2" office:value-type="float" office:value="6071.42">
            <text:p>6071,42</text:p>
          </table:table-cell>
          <table:table-cell table:style-name="ce12N2" office:value-type="float" office:value="425">
            <text:p>42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498818391826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3">
            <text:p>30715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7.3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903">
            <text:p>4390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903">
            <text:p>4390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">
            <text:p>0,150</text:p>
          </table:table-cell>
          <table:table-cell table:style-name="ce12N2" office:value-type="float" office:value="50">
            <text:p>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90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903">
            <text:p>43903,00</text:p>
          </table:table-cell>
          <table:table-cell table:style-name="ce12N2" office:value-type="float" office:value="3073.21">
            <text:p>3073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737910084305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4">
            <text:p>307154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4.0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634.51">
            <text:p>5563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238.98">
            <text:p>52238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199">
            <text:p>1,720</text:p>
          </table:table-cell>
          <table:table-cell table:style-name="ce12N2" office:value-type="float" office:value="50">
            <text:p>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.634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3395.53">
            <text:p>3395,53</text:p>
          </table:table-cell>
          <table:table-cell table:style-name="ce12N2" office:value-type="float" office:value="52238.98">
            <text:p>52238,98</text:p>
          </table:table-cell>
          <table:table-cell table:style-name="ce12N2" office:value-type="float" office:value="2089.56">
            <text:p>208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40391839776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5">
            <text:p>30715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5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09.28">
            <text:p>1230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1656.12">
            <text:p>11656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7161">
            <text:p>0,672</text:p>
          </table:table-cell>
          <table:table-cell table:style-name="ce12N2" office:value-type="float" office:value="143.71">
            <text:p>143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309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53.16">
            <text:p>653,16</text:p>
          </table:table-cell>
          <table:table-cell table:style-name="ce12N2" office:value-type="float" office:value="11656.12">
            <text:p>11656,12</text:p>
          </table:table-cell>
          <table:table-cell table:style-name="ce12N2" office:value-type="float" office:value="815.92">
            <text:p>81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50915703551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7">
            <text:p>307157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4.3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1785.78">
            <text:p>41178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411785.78">
            <text:p>411785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5.7711">
            <text:p>175,771</text:p>
          </table:table-cell>
          <table:table-cell table:style-name="ce12N2" office:value-type="float" office:value="5413.9">
            <text:p>541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1.785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1785.78">
            <text:p>411785,78</text:p>
          </table:table-cell>
          <table:table-cell table:style-name="ce12N2" office:value-type="float" office:value="28825">
            <text:p>2882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5440420001195500100047437214498613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8">
            <text:p>30715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9.98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89.75">
            <text:p>288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752.4">
            <text:p>275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73">
            <text:p>0,055</text:p>
          </table:table-cell>
          <table:table-cell table:style-name="ce12N2" office:value-type="float" office:value="32.57">
            <text:p>32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89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37.35">
            <text:p>137,35</text:p>
          </table:table-cell>
          <table:table-cell table:style-name="ce12N2" office:value-type="float" office:value="2752.4">
            <text:p>2752,40</text:p>
          </table:table-cell>
          <table:table-cell table:style-name="ce12N2" office:value-type="float" office:value="192.67">
            <text:p>19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699851651758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0">
            <text:p>30716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9.9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25.52">
            <text:p>352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377.7">
            <text:p>337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06">
            <text:p>0,035</text:p>
          </table:table-cell>
          <table:table-cell table:style-name="ce12N2" office:value-type="float" office:value="4.21">
            <text:p>4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25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47.82">
            <text:p>147,82</text:p>
          </table:table-cell>
          <table:table-cell table:style-name="ce12N2" office:value-type="float" office:value="3377.7">
            <text:p>3377,70</text:p>
          </table:table-cell>
          <table:table-cell table:style-name="ce12N2" office:value-type="float" office:value="236.44">
            <text:p>23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6998718625095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4">
            <text:p>307164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7.5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85">
            <text:p>3,948</text:p>
          </table:table-cell>
          <table:table-cell table:style-name="ce12N2" office:value-type="float" office:value="1124.8">
            <text:p>11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04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2733.36">
            <text:p>273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28276100001425500100006757418143161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4">
            <text:p>30718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5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813.3">
            <text:p>1881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13.3">
            <text:p>18813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4775">
            <text:p>1,648</text:p>
          </table:table-cell>
          <table:table-cell table:style-name="ce12N2" office:value-type="float" office:value="299.7">
            <text:p>299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81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13.3">
            <text:p>18813,30</text:p>
          </table:table-cell>
          <table:table-cell table:style-name="ce12N2" office:value-type="float" office:value="1316.93">
            <text:p>131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59635500100004457418050860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5">
            <text:p>30718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5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25.32">
            <text:p>7525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25.32">
            <text:p>752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591">
            <text:p>0,659</text:p>
          </table:table-cell>
          <table:table-cell table:style-name="ce12N2" office:value-type="float" office:value="119.88">
            <text:p>119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25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25.32">
            <text:p>7525,32</text:p>
          </table:table-cell>
          <table:table-cell table:style-name="ce12N2" office:value-type="float" office:value="526.77">
            <text:p>52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5963550010000445751093286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6">
            <text:p>30718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5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321.24">
            <text:p>9532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5321.24">
            <text:p>9532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62494">
            <text:p>11,625</text:p>
          </table:table-cell>
          <table:table-cell table:style-name="ce12N2" office:value-type="float" office:value="4137.72">
            <text:p>4137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321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321.24">
            <text:p>95321,24</text:p>
          </table:table-cell>
          <table:table-cell table:style-name="ce12N2" office:value-type="float" office:value="5341.03">
            <text:p>534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59635500100004457718884725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7">
            <text:p>30718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4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17.54">
            <text:p>401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17.54">
            <text:p>4017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4.44">
            <text:p>4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17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17.54">
            <text:p>4017,54</text:p>
          </table:table-cell>
          <table:table-cell table:style-name="ce12N2" office:value-type="float" office:value="281.23">
            <text:p>28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46014655987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8">
            <text:p>30718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0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786.85">
            <text:p>2378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038.11">
            <text:p>23038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000">
            <text:p>32000,000</text:p>
          </table:table-cell>
          <table:table-cell table:style-name="ce12N2" office:value-type="float" office:value="3200">
            <text:p>3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78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48.74">
            <text:p>748,74</text:p>
          </table:table-cell>
          <table:table-cell table:style-name="ce12N2" office:value-type="float" office:value="23038.11">
            <text:p>23038,11</text:p>
          </table:table-cell>
          <table:table-cell table:style-name="ce12N2" office:value-type="float" office:value="1612.67">
            <text:p>161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04415841308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9">
            <text:p>30718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0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49.06">
            <text:p>2404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277.03">
            <text:p>23277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000">
            <text:p>32000,000</text:p>
          </table:table-cell>
          <table:table-cell table:style-name="ce12N2" office:value-type="float" office:value="3275">
            <text:p>327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049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72.03">
            <text:p>772,03</text:p>
          </table:table-cell>
          <table:table-cell table:style-name="ce12N2" office:value-type="float" office:value="23277.03">
            <text:p>23277,03</text:p>
          </table:table-cell>
          <table:table-cell table:style-name="ce12N2" office:value-type="float" office:value="1622.23">
            <text:p>162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04615684904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08">
            <text:p>307208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3.5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8.77">
            <text:p>379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79.2">
            <text:p>367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6488">
            <text:p>0,465</text:p>
          </table:table-cell>
          <table:table-cell table:style-name="ce12N2" office:value-type="float" office:value="78">
            <text:p>7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98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19.57">
            <text:p>119,57</text:p>
          </table:table-cell>
          <table:table-cell table:style-name="ce12N2" office:value-type="float" office:value="3679.2">
            <text:p>3679,20</text:p>
          </table:table-cell>
          <table:table-cell table:style-name="ce12N2" office:value-type="float" office:value="257.54">
            <text:p>25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50940030001555500100018350018557382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11">
            <text:p>307211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81.83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06.74">
            <text:p>3760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363.87">
            <text:p>37363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258732">
            <text:p>6,259</text:p>
          </table:table-cell>
          <table:table-cell table:style-name="ce12N2" office:value-type="float" office:value="19552">
            <text:p>1955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606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242.87">
            <text:p>242,87</text:p>
          </table:table-cell>
          <table:table-cell table:style-name="ce12N2" office:value-type="float" office:value="37363.87">
            <text:p>37363,87</text:p>
          </table:table-cell>
          <table:table-cell table:style-name="ce12N2" office:value-type="float" office:value="2615.47">
            <text:p>261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8183215415565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13">
            <text:p>307213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077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85.76">
            <text:p>8985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743.23">
            <text:p>8743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472">
            <text:p>0,020</text:p>
          </table:table-cell>
          <table:table-cell table:style-name="ce12N2" office:value-type="float" office:value="47.51">
            <text:p>47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985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242.53">
            <text:p>242,53</text:p>
          </table:table-cell>
          <table:table-cell table:style-name="ce12N2" office:value-type="float" office:value="8743.23">
            <text:p>8743,23</text:p>
          </table:table-cell>
          <table:table-cell table:style-name="ce12N2" office:value-type="float" office:value="612.03">
            <text:p>61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907717420732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14">
            <text:p>30721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0.09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10.52">
            <text:p>261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10.52">
            <text:p>2610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652">
            <text:p>0,367</text:p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10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10.52">
            <text:p>2610,52</text:p>
          </table:table-cell>
          <table:table-cell table:style-name="ce12N2" office:value-type="float" office:value="182.74">
            <text:p>18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00981757200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17">
            <text:p>307217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4.610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58.87">
            <text:p>495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02.78">
            <text:p>4802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5775">
            <text:p>1,658</text:p>
          </table:table-cell>
          <table:table-cell table:style-name="ce12N2" office:value-type="float" office:value="940">
            <text:p>9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58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56.09">
            <text:p>156,09</text:p>
          </table:table-cell>
          <table:table-cell table:style-name="ce12N2" office:value-type="float" office:value="4802.78">
            <text:p>4802,78</text:p>
          </table:table-cell>
          <table:table-cell table:style-name="ce12N2" office:value-type="float" office:value="576.33">
            <text:p>57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33081704002210550180000846101160176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18">
            <text:p>307218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4.596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86.93">
            <text:p>1288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886.93">
            <text:p>12886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45">
            <text:p>0,054</text:p>
          </table:table-cell>
          <table:table-cell table:style-name="ce12N2" office:value-type="float" office:value="150">
            <text:p>1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886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886.93">
            <text:p>12886,93</text:p>
          </table:table-cell>
          <table:table-cell table:style-name="ce12N2" office:value-type="float" office:value="1546.43">
            <text:p>1546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330817040022105501800008459612071161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0">
            <text:p>3072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2.1">
            <text:p>154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2.1">
            <text:p>154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4">
            <text:p>0,002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2.1">
            <text:p>1542,10</text:p>
          </table:table-cell>
          <table:table-cell table:style-name="ce12N2" office:value-type="float" office:value="107.95">
            <text:p>10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415303875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3">
            <text:p>30722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3.08">
            <text:p>275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53.08">
            <text:p>2753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84">
            <text:p>0,000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53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53.08">
            <text:p>2753,08</text:p>
          </table:table-cell>
          <table:table-cell table:style-name="ce12N2" office:value-type="float" office:value="192.72">
            <text:p>19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010447366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5">
            <text:p>30722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8.85">
            <text:p>90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8.85">
            <text:p>908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">
            <text:p>0,001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8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8.85">
            <text:p>908,85</text:p>
          </table:table-cell>
          <table:table-cell table:style-name="ce12N2" office:value-type="float" office:value="63.62">
            <text:p>6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61424734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6">
            <text:p>30722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84.2">
            <text:p>308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84.2">
            <text:p>308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08">
            <text:p>0,003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8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84.2">
            <text:p>3084,20</text:p>
          </table:table-cell>
          <table:table-cell table:style-name="ce12N2" office:value-type="float" office:value="215.89">
            <text:p>215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315592269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7">
            <text:p>30722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33.12">
            <text:p>843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33.12">
            <text:p>843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452">
            <text:p>0,001</text:p>
          </table:table-cell>
          <table:table-cell table:style-name="ce12N2" office:value-type="float" office:value="9.65">
            <text:p>9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3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33.12">
            <text:p>8433,12</text:p>
          </table:table-cell>
          <table:table-cell table:style-name="ce12N2" office:value-type="float" office:value="590.32">
            <text:p>59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91857476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8">
            <text:p>3072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88">
            <text:p>0,000</text:p>
          </table:table-cell>
          <table:table-cell table:style-name="ce12N2" office:value-type="float" office:value="3.89">
            <text:p>3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05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189.4">
            <text:p>18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21807035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9">
            <text:p>30722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4.3">
            <text:p>316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71.17">
            <text:p>297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656">
            <text:p>0,047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93.13">
            <text:p>193,13</text:p>
          </table:table-cell>
          <table:table-cell table:style-name="ce12N2" office:value-type="float" office:value="2971.17">
            <text:p>2971,17</text:p>
          </table:table-cell>
          <table:table-cell table:style-name="ce12N2" office:value-type="float" office:value="118.85">
            <text:p>11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8112770773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0">
            <text:p>3072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84">
            <text:p>0,000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205.07">
            <text:p>20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118199233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2">
            <text:p>3072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2.45">
            <text:p>424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83.52">
            <text:p>3983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056">
            <text:p>0,012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42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258.93">
            <text:p>258,93</text:p>
          </table:table-cell>
          <table:table-cell table:style-name="ce12N2" office:value-type="float" office:value="3983.52">
            <text:p>3983,52</text:p>
          </table:table-cell>
          <table:table-cell table:style-name="ce12N2" office:value-type="float" office:value="278.85">
            <text:p>27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916878592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3">
            <text:p>30723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63.67">
            <text:p>636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75.28">
            <text:p>597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084">
            <text:p>0,018</text:p>
          </table:table-cell>
          <table:table-cell table:style-name="ce12N2" office:value-type="float" office:value="7.06">
            <text:p>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63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388.39">
            <text:p>388,39</text:p>
          </table:table-cell>
          <table:table-cell table:style-name="ce12N2" office:value-type="float" office:value="5975.28">
            <text:p>5975,28</text:p>
          </table:table-cell>
          <table:table-cell table:style-name="ce12N2" office:value-type="float" office:value="418.27">
            <text:p>418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819941113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4">
            <text:p>30723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4.24">
            <text:p>1684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84.24">
            <text:p>1684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4">
            <text:p>0,002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84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4.24">
            <text:p>1684,24</text:p>
          </table:table-cell>
          <table:table-cell table:style-name="ce12N2" office:value-type="float" office:value="117.9">
            <text:p>11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51611884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6">
            <text:p>30723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29.62">
            <text:p>412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29.62">
            <text:p>412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26">
            <text:p>0,001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2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29.62">
            <text:p>4129,62</text:p>
          </table:table-cell>
          <table:table-cell table:style-name="ce12N2" office:value-type="float" office:value="289.07">
            <text:p>28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715336035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7">
            <text:p>3072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92.16">
            <text:p>1139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92.16">
            <text:p>1139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52">
            <text:p>0,001</text:p>
          </table:table-cell>
          <table:table-cell table:style-name="ce12N2" office:value-type="float" office:value="15.55">
            <text:p>1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9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392.16">
            <text:p>11392,16</text:p>
          </table:table-cell>
          <table:table-cell table:style-name="ce12N2" office:value-type="float" office:value="797.45">
            <text:p>797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313228677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8">
            <text:p>3072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5.34">
            <text:p>965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6.42">
            <text:p>906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28">
            <text:p>0,005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5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58.92">
            <text:p>58,92</text:p>
          </table:table-cell>
          <table:table-cell table:style-name="ce12N2" office:value-type="float" office:value="906.42">
            <text:p>906,42</text:p>
          </table:table-cell>
          <table:table-cell table:style-name="ce12N2" office:value-type="float" office:value="63.45">
            <text:p>6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710700137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9">
            <text:p>30723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812.15">
            <text:p>21812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812.15">
            <text:p>21812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102">
            <text:p>0,060</text:p>
          </table:table-cell>
          <table:table-cell table:style-name="ce12N2" office:value-type="float" office:value="36.35">
            <text:p>36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812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812.15">
            <text:p>21812,15</text:p>
          </table:table-cell>
          <table:table-cell table:style-name="ce12N2" office:value-type="float" office:value="1526.85">
            <text:p>152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01617954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0">
            <text:p>30724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4782.27">
            <text:p>43478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433693.99">
            <text:p>433693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679331">
            <text:p>17,679</text:p>
          </table:table-cell>
          <table:table-cell table:style-name="ce12N2" office:value-type="float" office:value="1691.18">
            <text:p>1691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4.782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088.28">
            <text:p>1088,28</text:p>
          </table:table-cell>
          <table:table-cell table:style-name="ce12N2" office:value-type="float" office:value="430570.54">
            <text:p>430570,54</text:p>
          </table:table-cell>
          <table:table-cell table:style-name="ce12N2" office:value-type="float" office:value="25868.84">
            <text:p>2586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91906483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1">
            <text:p>3072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508.75">
            <text:p>29508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508.75">
            <text:p>29508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4">
            <text:p>0,001</text:p>
          </table:table-cell>
          <table:table-cell table:style-name="ce12N2" office:value-type="float" office:value="50.85">
            <text:p>50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508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508.75">
            <text:p>29508,75</text:p>
          </table:table-cell>
          <table:table-cell table:style-name="ce12N2" office:value-type="float" office:value="2065.61">
            <text:p>206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119268481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6">
            <text:p>30724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0.6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371.78">
            <text:p>10637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106243.6">
            <text:p>10624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413816">
            <text:p>7,414</text:p>
          </table:table-cell>
          <table:table-cell table:style-name="ce12N2" office:value-type="float" office:value="3329.13">
            <text:p>3329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.371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28.18">
            <text:p>128,18</text:p>
          </table:table-cell>
          <table:table-cell table:style-name="ce12N2" office:value-type="float" office:value="106243.6">
            <text:p>106243,60</text:p>
          </table:table-cell>
          <table:table-cell table:style-name="ce12N2" office:value-type="float" office:value="6817.63">
            <text:p>681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06791202127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7">
            <text:p>307247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96.46">
            <text:p>1689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364.61">
            <text:p>16364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3408">
            <text:p>0,663</text:p>
          </table:table-cell>
          <table:table-cell table:style-name="ce12N2" office:value-type="float" office:value="243.9">
            <text:p>24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896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531.85">
            <text:p>531,85</text:p>
          </table:table-cell>
          <table:table-cell table:style-name="ce12N2" office:value-type="float" office:value="16364.61">
            <text:p>16364,61</text:p>
          </table:table-cell>
          <table:table-cell table:style-name="ce12N2" office:value-type="float" office:value="1145.52">
            <text:p>114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35015711347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8">
            <text:p>30724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3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63.3">
            <text:p>1026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40.24">
            <text:p>9940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89232">
            <text:p>0,389</text:p>
          </table:table-cell>
          <table:table-cell table:style-name="ce12N2" office:value-type="float" office:value="143.1">
            <text:p>14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26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323.06">
            <text:p>323,06</text:p>
          </table:table-cell>
          <table:table-cell table:style-name="ce12N2" office:value-type="float" office:value="9940.24">
            <text:p>9940,24</text:p>
          </table:table-cell>
          <table:table-cell table:style-name="ce12N2" office:value-type="float" office:value="695.82">
            <text:p>695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35215711347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9">
            <text:p>30724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3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22.12">
            <text:p>5422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51.45">
            <text:p>5251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632">
            <text:p>0,206</text:p>
          </table:table-cell>
          <table:table-cell table:style-name="ce12N2" office:value-type="float" office:value="75.6">
            <text:p>7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22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">
            <text:p>2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70.67">
            <text:p>170,67</text:p>
          </table:table-cell>
          <table:table-cell table:style-name="ce12N2" office:value-type="float" office:value="5251.45">
            <text:p>5251,45</text:p>
          </table:table-cell>
          <table:table-cell table:style-name="ce12N2" office:value-type="float" office:value="367.6">
            <text:p>3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35615711347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66">
            <text:p>307266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1.2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5002.38">
            <text:p>20500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203736.89">
            <text:p>203736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83.74442">
            <text:p>283,744</text:p>
          </table:table-cell>
          <table:table-cell table:style-name="ce12N2" office:value-type="float" office:value="4482">
            <text:p>448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5.002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265.49">
            <text:p>1265,49</text:p>
          </table:table-cell>
          <table:table-cell table:style-name="ce12N2" office:value-type="float" office:value="203736.89">
            <text:p>203736,89</text:p>
          </table:table-cell>
          <table:table-cell table:style-name="ce12N2" office:value-type="float" office:value="13924.14">
            <text:p>1392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150751009135550010005612691904040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67">
            <text:p>30726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0.01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44.2">
            <text:p>394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625.47">
            <text:p>3625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969">
            <text:p>0,006</text:p>
          </table:table-cell>
          <table:table-cell table:style-name="ce12N2" office:value-type="float" office:value="0.44">
            <text:p>0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4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.87">
            <text:p>54,8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318.73">
            <text:p>318,73</text:p>
          </table:table-cell>
          <table:table-cell table:style-name="ce12N2" office:value-type="float" office:value="3625.47">
            <text:p>3625,47</text:p>
          </table:table-cell>
          <table:table-cell table:style-name="ce12N2" office:value-type="float" office:value="229.32">
            <text:p>22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001610614618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0">
            <text:p>30727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16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6.93">
            <text:p>315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64.25">
            <text:p>2964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39">
            <text:p>0,002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56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92.68">
            <text:p>192,68</text:p>
          </table:table-cell>
          <table:table-cell table:style-name="ce12N2" office:value-type="float" office:value="2964.25">
            <text:p>2964,25</text:p>
          </table:table-cell>
          <table:table-cell table:style-name="ce12N2" office:value-type="float" office:value="207.5">
            <text:p>20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16713377291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4">
            <text:p>30727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0.09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92.6">
            <text:p>2919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192.6">
            <text:p>2919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05366">
            <text:p>4,054</text:p>
          </table:table-cell>
          <table:table-cell table:style-name="ce12N2" office:value-type="float" office:value="869">
            <text:p>86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192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92.6">
            <text:p>29192,60</text:p>
          </table:table-cell>
          <table:table-cell table:style-name="ce12N2" office:value-type="float" office:value="2043.48">
            <text:p>204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009913802466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9">
            <text:p>307279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3.2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03.95">
            <text:p>2410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912.5">
            <text:p>2291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">
            <text:p>0,520</text:p>
          </table:table-cell>
          <table:table-cell table:style-name="ce12N2" office:value-type="float" office:value="16.25">
            <text:p>16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103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191.45">
            <text:p>1191,45</text:p>
          </table:table-cell>
          <table:table-cell table:style-name="ce12N2" office:value-type="float" office:value="22912.5">
            <text:p>22912,50</text:p>
          </table:table-cell>
          <table:table-cell table:style-name="ce12N2" office:value-type="float" office:value="1603.88">
            <text:p>160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327611000128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1">
            <text:p>30729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0.01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153.96">
            <text:p>4315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795.6">
            <text:p>4179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4">
            <text:p>0,046</text:p>
          </table:table-cell>
          <table:table-cell table:style-name="ce12N2" office:value-type="float" office:value="17.28">
            <text:p>17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15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358.36">
            <text:p>1358,36</text:p>
          </table:table-cell>
          <table:table-cell table:style-name="ce12N2" office:value-type="float" office:value="41795.6">
            <text:p>41795,60</text:p>
          </table:table-cell>
          <table:table-cell table:style-name="ce12N2" office:value-type="float" office:value="2925.69">
            <text:p>292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00151736654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5">
            <text:p>3072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375.12">
            <text:p>36375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375.12">
            <text:p>36375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052">
            <text:p>0,074</text:p>
          </table:table-cell>
          <table:table-cell table:style-name="ce12N2" office:value-type="float" office:value="87.34">
            <text:p>87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375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375.12">
            <text:p>36375,12</text:p>
          </table:table-cell>
          <table:table-cell table:style-name="ce12N2" office:value-type="float" office:value="1455">
            <text:p>145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81050978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8">
            <text:p>307298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5.5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0.48">
            <text:p>783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84">
            <text:p>758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52">
            <text:p>1,152</text:p>
          </table:table-cell>
          <table:table-cell table:style-name="ce12N2" office:value-type="float" office:value="864">
            <text:p>8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0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46.48">
            <text:p>246,48</text:p>
          </table:table-cell>
          <table:table-cell table:style-name="ce12N2" office:value-type="float" office:value="7584">
            <text:p>7584,00</text:p>
          </table:table-cell>
          <table:table-cell table:style-name="ce12N2" office:value-type="float" office:value="530.88">
            <text:p>53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0641500005185500100020555811940990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6">
            <text:p>307316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4.5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070.1">
            <text:p>155070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5070.1">
            <text:p>15507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3.6909">
            <text:p>223,691</text:p>
          </table:table-cell>
          <table:table-cell table:style-name="ce12N2" office:value-type="float" office:value="3083.2">
            <text:p>308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5.070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5070.1">
            <text:p>155070,10</text:p>
          </table:table-cell>
          <table:table-cell table:style-name="ce12N2" office:value-type="float" office:value="10854.91">
            <text:p>1085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5440420001195500100047458514328658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4">
            <text:p>3073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6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59.5">
            <text:p>4775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759.5">
            <text:p>4775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675">
            <text:p>0,127</text:p>
          </table:table-cell>
          <table:table-cell table:style-name="ce12N2" office:value-type="float" office:value="135.4">
            <text:p>13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75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759.5">
            <text:p>47759,50</text:p>
          </table:table-cell>
          <table:table-cell table:style-name="ce12N2" office:value-type="float" office:value="3343.17">
            <text:p>334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68418187450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7">
            <text:p>3073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7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29.56">
            <text:p>222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29.56">
            <text:p>2229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544">
            <text:p>0,021</text:p>
          </table:table-cell>
          <table:table-cell table:style-name="ce12N2" office:value-type="float" office:value="4.28">
            <text:p>4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29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29.56">
            <text:p>2229,56</text:p>
          </table:table-cell>
          <table:table-cell table:style-name="ce12N2" office:value-type="float" office:value="156.07">
            <text:p>15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70410842873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9">
            <text:p>3073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7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62">
            <text:p>200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062">
            <text:p>200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46">
            <text:p>0,125</text:p>
          </table:table-cell>
          <table:table-cell table:style-name="ce12N2" office:value-type="float" office:value="28.5">
            <text:p>28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0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062">
            <text:p>20062,00</text:p>
          </table:table-cell>
          <table:table-cell table:style-name="ce12N2" office:value-type="float" office:value="1404.34">
            <text:p>140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73013490194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5">
            <text:p>30733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7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4.35">
            <text:p>118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47.07">
            <text:p>1147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776">
            <text:p>0,020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4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37.28">
            <text:p>37,28</text:p>
          </table:table-cell>
          <table:table-cell table:style-name="ce12N2" office:value-type="float" office:value="1147.07">
            <text:p>1147,07</text:p>
          </table:table-cell>
          <table:table-cell table:style-name="ce12N2" office:value-type="float" office:value="80.29">
            <text:p>80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7501570337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6">
            <text:p>307336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7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13.86">
            <text:p>171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1.6">
            <text:p>156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408">
            <text:p>0,094</text:p>
          </table:table-cell>
          <table:table-cell table:style-name="ce12N2" office:value-type="float" office:value="15.68">
            <text:p>15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13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52.26">
            <text:p>152,26</text:p>
          </table:table-cell>
          <table:table-cell table:style-name="ce12N2" office:value-type="float" office:value="1561.6">
            <text:p>1561,60</text:p>
          </table:table-cell>
          <table:table-cell table:style-name="ce12N2" office:value-type="float" office:value="109.31">
            <text:p>10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75515815482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7">
            <text:p>307337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3.6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116.32">
            <text:p>2111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9075.02">
            <text:p>19075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82057">
            <text:p>1,182</text:p>
          </table:table-cell>
          <table:table-cell table:style-name="ce12N2" office:value-type="float" office:value="310.91">
            <text:p>310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116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912.37">
            <text:p>912,37</text:p>
          </table:table-cell>
          <table:table-cell table:style-name="ce12N2" office:value-type="float" office:value="18771.12">
            <text:p>18771,12</text:p>
          </table:table-cell>
          <table:table-cell table:style-name="ce12N2" office:value-type="float" office:value="783.29">
            <text:p>78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298.96">
            <text:p>6298,96</text:p>
          </table:table-cell>
          <table:table-cell table:style-name="ce12N2" office:value-type="float" office:value="1128.93">
            <text:p>1128,93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50940030001555500100018366013927242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8">
            <text:p>307338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128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6.51">
            <text:p>557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576.51">
            <text:p>5576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546">
            <text:p>0,018</text:p>
          </table:table-cell>
          <table:table-cell table:style-name="ce12N2" office:value-type="float" office:value="6.52">
            <text:p>6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76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76.51">
            <text:p>5576,51</text:p>
          </table:table-cell>
          <table:table-cell table:style-name="ce12N2" office:value-type="float" office:value="390.36">
            <text:p>390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912818058224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0">
            <text:p>307340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3.6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74.94">
            <text:p>667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45">
            <text:p>634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">
            <text:p>0,144</text:p>
          </table:table-cell>
          <table:table-cell table:style-name="ce12N2" office:value-type="float" office:value="4.5">
            <text:p>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74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329.94">
            <text:p>329,94</text:p>
          </table:table-cell>
          <table:table-cell table:style-name="ce12N2" office:value-type="float" office:value="6345">
            <text:p>6345,00</text:p>
          </table:table-cell>
          <table:table-cell table:style-name="ce12N2" office:value-type="float" office:value="444.15">
            <text:p>44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36781100018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5">
            <text:p>307345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0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26.85">
            <text:p>1682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6297.19">
            <text:p>16297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502">
            <text:p>0,050</text:p>
          </table:table-cell>
          <table:table-cell table:style-name="ce12N2" office:value-type="float" office:value="107.16">
            <text:p>107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82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529.66">
            <text:p>529,66</text:p>
          </table:table-cell>
          <table:table-cell table:style-name="ce12N2" office:value-type="float" office:value="16297.19">
            <text:p>16297,19</text:p>
          </table:table-cell>
          <table:table-cell table:style-name="ce12N2" office:value-type="float" office:value="1140.81">
            <text:p>114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3983690008005500100060104114554035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6">
            <text:p>307346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0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5.31">
            <text:p>915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6.5">
            <text:p>88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">
            <text:p>0,000</text:p>
          </table:table-cell>
          <table:table-cell table:style-name="ce12N2" office:value-type="float" office:value="9.7">
            <text:p>9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5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886.5">
            <text:p>886,50</text:p>
          </table:table-cell>
          <table:table-cell table:style-name="ce12N2" office:value-type="float" office:value="62.06">
            <text:p>6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398369000800550010006010421111596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9">
            <text:p>30734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53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76.7">
            <text:p>657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76.7">
            <text:p>657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73">
            <text:p>0,025</text:p>
          </table:table-cell>
          <table:table-cell table:style-name="ce12N2" office:value-type="float" office:value="8.77">
            <text:p>8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7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76.7">
            <text:p>6576,70</text:p>
          </table:table-cell>
          <table:table-cell table:style-name="ce12N2" office:value-type="float" office:value="460.37">
            <text:p>46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53519092375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0">
            <text:p>307350</text:p>
          </table:table-cell>
          <table:table-cell table:style-name="ce0" table:number-columns-spanned="4" table:number-rows-spanned="1" office:value-type="string" calcext:value-type="string">
            <text:p>12.999 - SAGA DISTRIBUICAO E LOGISTICA LTDA</text:p>
          </table:table-cell>
          <table:covered-table-cell table:number-columns-repeated="3"/>
          <table:table-cell table:style-name="ce0" office:value-type="string" calcext:value-type="string">
            <text:p>1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50">
            <text:p>1425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50">
            <text:p>1425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795">
            <text:p>0,218</text:p>
          </table:table-cell>
          <table:table-cell table:style-name="ce12N2" office:value-type="float" office:value="88.5">
            <text:p>88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25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50">
            <text:p>14250,00</text:p>
          </table:table-cell>
          <table:table-cell table:style-name="ce12N2" office:value-type="float" office:value="591.38">
            <text:p>59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296822630001005500100000142219588958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1">
            <text:p>307351</text:p>
          </table:table-cell>
          <table:table-cell table:style-name="ce0" table:number-columns-spanned="4" table:number-rows-spanned="1" office:value-type="string" calcext:value-type="string">
            <text:p>29.857 - J.H. DE OLIVEIRA FABRICACAO DE MANGUEIRAS LTDA</text:p>
          </table:table-cell>
          <table:covered-table-cell table:number-columns-repeated="3"/>
          <table:table-cell table:style-name="ce0" office:value-type="string" calcext:value-type="string">
            <text:p>6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392">
            <text:p>1939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392">
            <text:p>1939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5.7469">
            <text:p>75,747</text:p>
          </table:table-cell>
          <table:table-cell table:style-name="ce12N2" office:value-type="float" office:value="1472">
            <text:p>14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39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92">
            <text:p>19392,00</text:p>
          </table:table-cell>
          <table:table-cell table:style-name="ce12N2" office:value-type="float" office:value="733.02">
            <text:p>73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020482520001165500100000067515047175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2">
            <text:p>307352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59.6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628.88">
            <text:p>11162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1628.88">
            <text:p>11162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1.445306">
            <text:p>31,445</text:p>
          </table:table-cell>
          <table:table-cell table:style-name="ce12N2" office:value-type="float" office:value="23632.4">
            <text:p>2363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1.62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628.88">
            <text:p>111628,88</text:p>
          </table:table-cell>
          <table:table-cell table:style-name="ce12N2" office:value-type="float" office:value="13395.47">
            <text:p>1339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5079339140001545500100085966010717435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4">
            <text:p>30735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5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53.4">
            <text:p>1315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53.4">
            <text:p>1315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46">
            <text:p>0,049</text:p>
          </table:table-cell>
          <table:table-cell table:style-name="ce12N2" office:value-type="float" office:value="17.54">
            <text:p>1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153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53.4">
            <text:p>13153,40</text:p>
          </table:table-cell>
          <table:table-cell table:style-name="ce12N2" office:value-type="float" office:value="920.74">
            <text:p>92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5361597315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5">
            <text:p>3073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54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74">
            <text:p>417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74">
            <text:p>417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26">
            <text:p>0,036</text:p>
          </table:table-cell>
          <table:table-cell table:style-name="ce12N2" office:value-type="float" office:value="24.4">
            <text:p>2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7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74">
            <text:p>4174,00</text:p>
          </table:table-cell>
          <table:table-cell table:style-name="ce12N2" office:value-type="float" office:value="292.18">
            <text:p>29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5441969649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7">
            <text:p>307357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4.665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407.48">
            <text:p>2440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407.48">
            <text:p>24407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816256">
            <text:p>14,816</text:p>
          </table:table-cell>
          <table:table-cell table:style-name="ce12N2" office:value-type="float" office:value="13022.1">
            <text:p>13022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407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407.48">
            <text:p>24407,48</text:p>
          </table:table-cell>
          <table:table-cell table:style-name="ce12N2" office:value-type="float" office:value="2928.9">
            <text:p>292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330817040022105501800008466514655041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66">
            <text:p>307366</text:p>
          </table:table-cell>
          <table:table-cell table:style-name="ce0" table:number-columns-spanned="4" table:number-rows-spanned="1" office:value-type="string" calcext:value-type="string">
            <text:p>629 - PLASTCOR DO BRASIL LTDA</text:p>
          </table:table-cell>
          <table:covered-table-cell table:number-columns-repeated="3"/>
          <table:table-cell table:style-name="ce0" office:value-type="string" calcext:value-type="string">
            <text:p>372.51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6">
            <text:p>156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6">
            <text:p>156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552">
            <text:p>0,156</text:p>
          </table:table-cell>
          <table:table-cell table:style-name="ce12N2" office:value-type="float" office:value="38.88">
            <text:p>38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6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6">
            <text:p>1566,00</text:p>
          </table:table-cell>
          <table:table-cell table:style-name="ce12N2" office:value-type="float" office:value="62.64">
            <text:p>62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47044570001385500400037251216974399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68">
            <text:p>307368</text:p>
          </table:table-cell>
          <table:table-cell table:style-name="ce0" table:number-columns-spanned="4" table:number-rows-spanned="1" office:value-type="string" calcext:value-type="string">
            <text:p>5.002 - ELETRICA DANUBIO IND E COM DE MAT ELET LTDA</text:p>
          </table:table-cell>
          <table:covered-table-cell table:number-columns-repeated="3"/>
          <table:table-cell table:style-name="ce0" office:value-type="string" calcext:value-type="string">
            <text:p>486.5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2588.88">
            <text:p>86258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862588.88">
            <text:p>86258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59.4652">
            <text:p>1659,465</text:p>
          </table:table-cell>
          <table:table-cell table:style-name="ce12N2" office:value-type="float" office:value="13521.21">
            <text:p>13521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2.58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2588.88">
            <text:p>862588,88</text:p>
          </table:table-cell>
          <table:table-cell table:style-name="ce12N2" office:value-type="float" office:value="60381.22">
            <text:p>6038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310256000190550010004865541600354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3">
            <text:p>30737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1.37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90">
            <text:p>2549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490">
            <text:p>254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42">
            <text:p>4,420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49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490">
            <text:p>25490,00</text:p>
          </table:table-cell>
          <table:table-cell table:style-name="ce12N2" office:value-type="float" office:value="1784.3">
            <text:p>178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137410929170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4">
            <text:p>307374</text:p>
          </table:table-cell>
          <table:table-cell table:style-name="ce0" table:number-columns-spanned="4" table:number-rows-spanned="1" office:value-type="string" calcext:value-type="string">
            <text:p>29.615 - TENASTEEL INDUSTRIA E COMERCIO LTDA</text:p>
          </table:table-cell>
          <table:covered-table-cell table:number-columns-repeated="3"/>
          <table:table-cell table:style-name="ce0" office:value-type="string" calcext:value-type="string">
            <text:p>9.055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57.55">
            <text:p>1955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8801.4">
            <text:p>1880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159">
            <text:p>0,292</text:p>
          </table:table-cell>
          <table:table-cell table:style-name="ce12N2" office:value-type="float" office:value="743.76">
            <text:p>743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557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.42">
            <text:p>47,4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756.15">
            <text:p>756,15</text:p>
          </table:table-cell>
          <table:table-cell table:style-name="ce12N2" office:value-type="float" office:value="18801.4">
            <text:p>18801,40</text:p>
          </table:table-cell>
          <table:table-cell table:style-name="ce12N2" office:value-type="float" office:value="1316.09">
            <text:p>131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140487720001085500400000905511395877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7">
            <text:p>307377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8.2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477.2">
            <text:p>1347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477.2">
            <text:p>1347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898">
            <text:p>0,890</text:p>
          </table:table-cell>
          <table:table-cell table:style-name="ce12N2" office:value-type="float" office:value="59.52">
            <text:p>59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47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477.2">
            <text:p>13477,20</text:p>
          </table:table-cell>
          <table:table-cell table:style-name="ce12N2" office:value-type="float" office:value="943.4">
            <text:p>94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822913200355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9">
            <text:p>307379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0.0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18.02">
            <text:p>1811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18.02">
            <text:p>18118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421416">
            <text:p>12,421</text:p>
          </table:table-cell>
          <table:table-cell table:style-name="ce12N2" office:value-type="float" office:value="4128.05">
            <text:p>412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118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18.02">
            <text:p>18118,02</text:p>
          </table:table-cell>
          <table:table-cell table:style-name="ce12N2" office:value-type="float" office:value="2174.16">
            <text:p>217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5079339140001545500100086006219909902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0">
            <text:p>307380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0.0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153.54">
            <text:p>10015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00153.54">
            <text:p>100153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33.52985">
            <text:p>433,530</text:p>
          </table:table-cell>
          <table:table-cell table:style-name="ce12N2" office:value-type="float" office:value="19912.63">
            <text:p>19912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0.15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153.54">
            <text:p>100153,54</text:p>
          </table:table-cell>
          <table:table-cell table:style-name="ce12N2" office:value-type="float" office:value="12018.43">
            <text:p>12018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5079339140001545500100086006119037605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3">
            <text:p>3073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4.12">
            <text:p>70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4.12">
            <text:p>70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26">
            <text:p>0,019</text:p>
          </table:table-cell>
          <table:table-cell table:style-name="ce12N2" office:value-type="float" office:value="3.3">
            <text:p>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4.12">
            <text:p>704,12</text:p>
          </table:table-cell>
          <table:table-cell table:style-name="ce12N2" office:value-type="float" office:value="49.29">
            <text:p>49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419457750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4">
            <text:p>3073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05.25">
            <text:p>1770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05.25">
            <text:p>1770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84">
            <text:p>0,001</text:p>
          </table:table-cell>
          <table:table-cell table:style-name="ce12N2" office:value-type="float" office:value="30.51">
            <text:p>30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705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05.25">
            <text:p>17705,25</text:p>
          </table:table-cell>
          <table:table-cell table:style-name="ce12N2" office:value-type="float" office:value="1239.37">
            <text:p>123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516079230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5">
            <text:p>3073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70.75">
            <text:p>1377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770.75">
            <text:p>13770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32">
            <text:p>0,001</text:p>
          </table:table-cell>
          <table:table-cell table:style-name="ce12N2" office:value-type="float" office:value="23.73">
            <text:p>23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77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70.75">
            <text:p>13770,75</text:p>
          </table:table-cell>
          <table:table-cell table:style-name="ce12N2" office:value-type="float" office:value="963.95">
            <text:p>96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618288396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7">
            <text:p>3073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4.32">
            <text:p>111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4.32">
            <text:p>111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48">
            <text:p>0,006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1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4.32">
            <text:p>1114,32</text:p>
          </table:table-cell>
          <table:table-cell table:style-name="ce12N2" office:value-type="float" office:value="44.57">
            <text:p>44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813573769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8">
            <text:p>3073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.58">
            <text:p>27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.58">
            <text:p>27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0.29">
            <text:p>0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.58">
            <text:p>278,58</text:p>
          </table:table-cell>
          <table:table-cell table:style-name="ce12N2" office:value-type="float" office:value="11.14">
            <text:p>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91827152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0">
            <text:p>307390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2.9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376.69">
            <text:p>6437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61795.15">
            <text:p>61795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230413">
            <text:p>14,230</text:p>
          </table:table-cell>
          <table:table-cell table:style-name="ce12N2" office:value-type="float" office:value="491.4">
            <text:p>49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.376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.88">
            <text:p>54,8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2581.54">
            <text:p>2581,54</text:p>
          </table:table-cell>
          <table:table-cell table:style-name="ce12N2" office:value-type="float" office:value="59923.43">
            <text:p>59923,43</text:p>
          </table:table-cell>
          <table:table-cell table:style-name="ce12N2" office:value-type="float" office:value="3000.7">
            <text:p>300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294914886627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3">
            <text:p>307393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0.1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369.5">
            <text:p>10636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6369.5">
            <text:p>10636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5.90415">
            <text:p>35,904</text:p>
          </table:table-cell>
          <table:table-cell table:style-name="ce12N2" office:value-type="float" office:value="22569.47">
            <text:p>22569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.36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369.5">
            <text:p>106369,50</text:p>
          </table:table-cell>
          <table:table-cell table:style-name="ce12N2" office:value-type="float" office:value="12764.34">
            <text:p>1276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5079339140001545500100086013013432948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4">
            <text:p>307394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0.1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83.7">
            <text:p>8783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83.7">
            <text:p>8783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17683">
            <text:p>2,177</text:p>
          </table:table-cell>
          <table:table-cell table:style-name="ce12N2" office:value-type="float" office:value="2006.48">
            <text:p>2006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783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83.7">
            <text:p>8783,70</text:p>
          </table:table-cell>
          <table:table-cell table:style-name="ce12N2" office:value-type="float" office:value="1054.04">
            <text:p>105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5079339140001545500100086013110858594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5">
            <text:p>307395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0.1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57.99">
            <text:p>885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57.99">
            <text:p>8857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22245">
            <text:p>3,922</text:p>
          </table:table-cell>
          <table:table-cell table:style-name="ce12N2" office:value-type="float" office:value="2022.3">
            <text:p>2022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57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57.99">
            <text:p>8857,99</text:p>
          </table:table-cell>
          <table:table-cell table:style-name="ce12N2" office:value-type="float" office:value="1062.96">
            <text:p>1062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5079339140001545500100086013214235098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8">
            <text:p>30739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2.06">
            <text:p>35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2.06">
            <text:p>352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63">
            <text:p>0,010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2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2.06">
            <text:p>352,06</text:p>
          </table:table-cell>
          <table:table-cell table:style-name="ce12N2" office:value-type="float" office:value="24.64">
            <text:p>2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4914628338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9">
            <text:p>30739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12.36">
            <text:p>21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12.36">
            <text:p>2112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78">
            <text:p>0,058</text:p>
          </table:table-cell>
          <table:table-cell table:style-name="ce12N2" office:value-type="float" office:value="9.91">
            <text:p>9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1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12.36">
            <text:p>2112,36</text:p>
          </table:table-cell>
          <table:table-cell table:style-name="ce12N2" office:value-type="float" office:value="147.87">
            <text:p>14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011808725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0">
            <text:p>30740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209.66">
            <text:p>2220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209.66">
            <text:p>2220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9016">
            <text:p>0,119</text:p>
          </table:table-cell>
          <table:table-cell table:style-name="ce12N2" office:value-type="float" office:value="56.34">
            <text:p>56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209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209.66">
            <text:p>22209,66</text:p>
          </table:table-cell>
          <table:table-cell table:style-name="ce12N2" office:value-type="float" office:value="1554.68">
            <text:p>155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119027825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1">
            <text:p>307401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68.7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27.36">
            <text:p>352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386.1">
            <text:p>338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755">
            <text:p>0,078</text:p>
          </table:table-cell>
          <table:table-cell table:style-name="ce12N2" office:value-type="float" office:value="21.88">
            <text:p>21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27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141.26">
            <text:p>141,26</text:p>
          </table:table-cell>
          <table:table-cell table:style-name="ce12N2" office:value-type="float" office:value="3386.1">
            <text:p>3386,10</text:p>
          </table:table-cell>
          <table:table-cell table:style-name="ce12N2" office:value-type="float" office:value="233.98">
            <text:p>23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33064262000250550010002687471205163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3">
            <text:p>307403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1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9.43">
            <text:p>266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82.39">
            <text:p>2482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436">
            <text:p>0,041</text:p>
          </table:table-cell>
          <table:table-cell table:style-name="ce12N2" office:value-type="float" office:value="24.17">
            <text:p>24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69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187.04">
            <text:p>187,04</text:p>
          </table:table-cell>
          <table:table-cell table:style-name="ce12N2" office:value-type="float" office:value="2482.39">
            <text:p>2482,39</text:p>
          </table:table-cell>
          <table:table-cell table:style-name="ce12N2" office:value-type="float" office:value="173.77">
            <text:p>17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1011570291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4">
            <text:p>307404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4.696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8.29">
            <text:p>446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8.29">
            <text:p>4468,2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40672">
            <text:p>0,541</text:p>
          </table:table-cell>
          <table:table-cell table:style-name="ce12N2" office:value-type="float" office:value="404.8">
            <text:p>40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8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68.29">
            <text:p>4468,29</text:p>
          </table:table-cell>
          <table:table-cell table:style-name="ce12N2" office:value-type="float" office:value="536.19">
            <text:p>53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330817040022105501800008469611239094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170">
            <text:p>170,00</text:p>
          </table:table-cell>
          <table:table-cell table:style-name="ce26N2" office:value-type="float" office:value="5629.3">
            <text:p>5629,3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90514.03">
            <text:p>90514,03</text:p>
          </table:table-cell>
          <table:table-cell table:style-name="ce26N2" office:value-type="float" office:value="6839267.15">
            <text:p>6839267,15</text:p>
          </table:table-cell>
          <table:table-cell table:style-name="ce26N2" office:value-type="float" office:value="469574.05">
            <text:p>469574,0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948427.92">
            <text:p>6948427,9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0038.04">
            <text:p>40038,04</text:p>
          </table:table-cell>
          <table:table-cell table:style-name="ce26N2" office:value-type="float" office:value="6580.24">
            <text:p>6580,2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91588.99635">
            <text:p>91588,996</text:p>
          </table:table-cell>
          <table:table-cell table:style-name="ce26N2" office:value-type="float" office:value="6856962.95">
            <text:p>6856962,95</text:p>
          </table:table-cell>
          <table:table-cell table:style-name="ce26N2" office:value-type="float" office:value="6948427.92">
            <text:p>6948427,9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87385.42">
            <text:p>287385,4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8.43">
            <text:p>48,4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OBJETIV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690" meta:object-count="0"/>
    <meta:generator>LibreOffice/4.3.0.4$Windows_x86 LibreOffice_project/62ad5818884a2fc2e5780dd45466868d41009ec0</meta:generator>
  </office:meta>
</office:document-meta>
</file>