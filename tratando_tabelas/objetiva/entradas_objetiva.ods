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1/07/2026 04:30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9">
            <text:p>310829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1.2">
            <text:p>1338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2205">
            <text:p>102,221</text:p>
          </table:table-cell>
          <table:table-cell table:style-name="ce12N2" office:value-type="float" office:value="283">
            <text:p>2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79.76">
            <text:p>11579,76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22">
            <text:p>104,22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1.2">
            <text:p>421,2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907.2">
            <text:p>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99.22">
            <text:p>3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95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3/07/2026</text:p>
          </table:table-cell>
          <table:table-cell table:style-name="ce12" office:value-type="string" calcext:value-type="string">
            <text:p>399,2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5260701115780000188550010000125851498170563</text:p>
          </table:table-cell>
          <table:table-cell table:style-name="ce0" office:value-type="string" calcext:value-type="string">
            <text:p>3526071138956500020057005000402957100089434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5">
            <text:p>31086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5">
            <text:p>0,855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9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8.77">
            <text:p>8418,7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7">
            <text:p>75,7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657.68">
            <text:p>6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11093594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8">
            <text:p>310878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87.55">
            <text:p>8728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92">
            <text:p>92,920</text:p>
          </table:table-cell>
          <table:table-cell table:style-name="ce12N2" office:value-type="float" office:value="20800">
            <text:p>20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28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49.64">
            <text:p>71349,64</text:p>
          </table:table-cell>
          <table:table-cell table:style-name="ce12N2" office:value-type="float" office:value="71.35">
            <text:p>7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2.15">
            <text:p>642,15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747.55">
            <text:p>2747,55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5917.8">
            <text:p>591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86175151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4">
            <text:p>310904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34318">
            <text:p>20,334</text:p>
          </table:table-cell>
          <table:table-cell table:style-name="ce12N2" office:value-type="float" office:value="37.1">
            <text:p>3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2.32">
            <text:p>5712,32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1">
            <text:p>51,4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473.79">
            <text:p>47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49916658484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5">
            <text:p>310905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84">
            <text:p>0,166</text:p>
          </table:table-cell>
          <table:table-cell table:style-name="ce12N2" office:value-type="float" office:value="28.65">
            <text:p>2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6">
            <text:p>3406,00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66">
            <text:p>30,6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282.5">
            <text:p>28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5121233107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0">
            <text:p>310950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02">
            <text:p>0,062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.95">
            <text:p>386,95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416555000173550000000735941004068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2">
            <text:p>311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">
            <text:p>0,056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98">
            <text:p>2668,9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2">
            <text:p>24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5001147376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3">
            <text:p>3110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4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48">
            <text:p>109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5.46">
            <text:p>895,46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6">
            <text:p>8,0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4.48">
            <text:p>34,48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74.27">
            <text:p>7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4051052811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5">
            <text:p>31101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38.91">
            <text:p>5713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8208">
            <text:p>0,708</text:p>
          </table:table-cell>
          <table:table-cell table:style-name="ce12N2" office:value-type="float" office:value="545.73">
            <text:p>5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13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705.85">
            <text:p>46705,85</text:p>
          </table:table-cell>
          <table:table-cell table:style-name="ce12N2" office:value-type="float" office:value="46.72">
            <text:p>4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0.34">
            <text:p>42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798.56">
            <text:p>1798,56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3873.84">
            <text:p>38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51117935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6">
            <text:p>31101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3.48">
            <text:p>523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625">
            <text:p>0,007</text:p>
          </table:table-cell>
          <table:table-cell table:style-name="ce12N2" office:value-type="float" office:value="53.4">
            <text:p>5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7.89">
            <text:p>4277,89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4.73">
            <text:p>164,73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354.82">
            <text:p>3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61200942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3">
            <text:p>311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054">
            <text:p>1,971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88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66.45">
            <text:p>12566,45</text:p>
          </table:table-cell>
          <table:table-cell table:style-name="ce12N2" office:value-type="float" office:value="12.57">
            <text:p>1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.1">
            <text:p>113,1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1042.27">
            <text:p>104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101260426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4">
            <text:p>311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94">
            <text:p>0,169</text:p>
          </table:table-cell>
          <table:table-cell table:style-name="ce12N2" office:value-type="float" office:value="1815">
            <text:p>18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91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51.15">
            <text:p>17651,15</text:p>
          </table:table-cell>
          <table:table-cell table:style-name="ce12N2" office:value-type="float" office:value="17.65">
            <text:p>1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86">
            <text:p>158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1464">
            <text:p>14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9182792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5">
            <text:p>311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81480480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6">
            <text:p>3110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6736">
            <text:p>0,337</text:p>
          </table:table-cell>
          <table:table-cell table:style-name="ce12N2" office:value-type="float" office:value="87.33">
            <text:p>8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6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6.74">
            <text:p>3516,74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5">
            <text:p>31,6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291.68">
            <text:p>2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7168430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7">
            <text:p>3110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424574">
            <text:p>58,425</text:p>
          </table:table-cell>
          <table:table-cell table:style-name="ce12N2" office:value-type="float" office:value="10453.36">
            <text:p>1045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032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702.3">
            <text:p>185702,30</text:p>
          </table:table-cell>
          <table:table-cell table:style-name="ce12N2" office:value-type="float" office:value="185.7">
            <text:p>1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1.32">
            <text:p>167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15402.31">
            <text:p>154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61777472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1">
            <text:p>3110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8.87">
            <text:p>304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68">
            <text:p>0,085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2.18">
            <text:p>2492,18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3">
            <text:p>22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5.97">
            <text:p>95,97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206.7">
            <text:p>2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651905436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1">
            <text:p>311071</text:p>
          </table:table-cell>
          <table:table-cell table:style-name="ce0" table:number-columns-spanned="4" table:number-rows-spanned="1" office:value-type="string" calcext:value-type="string">
            <text:p>15.652 - ARMACELL BRASIL LTDA</text:p>
          </table:table-cell>
          <table:covered-table-cell table:number-columns-repeated="3"/>
          <table:table-cell table:style-name="ce0" office:value-type="string" calcext:value-type="string">
            <text:p>90.98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7.21">
            <text:p>289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6.478556">
            <text:p>96,479</text:p>
          </table:table-cell>
          <table:table-cell table:style-name="ce12N2" office:value-type="float" office:value="2940.6">
            <text:p>294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957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69.89">
            <text:p>23669,89</text:p>
          </table:table-cell>
          <table:table-cell table:style-name="ce12N2" office:value-type="float" office:value="23.67">
            <text:p>2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911.49">
            <text:p>911,49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1963.2">
            <text:p>196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44258620005405500500009098216681333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3">
            <text:p>311093</text:p>
          </table:table-cell>
          <table:table-cell table:style-name="ce0" table:number-columns-spanned="4" table:number-rows-spanned="1" office:value-type="string" calcext:value-type="string">
            <text:p>706 - IKEDA EMPRESARIAL LTDA</text:p>
          </table:table-cell>
          <table:covered-table-cell table:number-columns-repeated="3"/>
          <table:table-cell table:style-name="ce0" office:value-type="string" calcext:value-type="string">
            <text:p>11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68.21">
            <text:p>191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20274">
            <text:p>3,620</text:p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68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27.46">
            <text:p>16127,46</text:p>
          </table:table-cell>
          <table:table-cell table:style-name="ce12N2" office:value-type="float" office:value="16.12">
            <text:p>1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.14">
            <text:p>145,1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69.9">
            <text:p>1169,9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1259.88">
            <text:p>125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5064661000172550010001131361639967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6">
            <text:p>311096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30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0.17">
            <text:p>4324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2776">
            <text:p>2,363</text:p>
          </table:table-cell>
          <table:table-cell table:style-name="ce12N2" office:value-type="float" office:value="252.34">
            <text:p>25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8.97">
            <text:p>37628,97</text:p>
          </table:table-cell>
          <table:table-cell table:style-name="ce12N2" office:value-type="float" office:value="37.64">
            <text:p>3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8">
            <text:p>338,6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557.19">
            <text:p>2557,19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1628.51">
            <text:p>162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231436000107550010000305751238762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6">
            <text:p>311106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2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58.54">
            <text:p>11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154">
            <text:p>0,382</text:p>
          </table:table-cell>
          <table:table-cell table:style-name="ce12N2" office:value-type="float" office:value="79.95">
            <text:p>7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0.65">
            <text:p>10000,65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01">
            <text:p>90,0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7.79">
            <text:p>397,79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781.25">
            <text:p>78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2661693059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7">
            <text:p>311107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4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77.46">
            <text:p>4897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74">
            <text:p>1,237</text:p>
          </table:table-cell>
          <table:table-cell table:style-name="ce12N2" office:value-type="float" office:value="1403.67">
            <text:p>1403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977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02.47">
            <text:p>41302,47</text:p>
          </table:table-cell>
          <table:table-cell table:style-name="ce12N2" office:value-type="float" office:value="41.3">
            <text:p>4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1.72">
            <text:p>371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3425.65">
            <text:p>342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44251482238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9">
            <text:p>31110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639.48">
            <text:p>4636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">
            <text:p>221,00</text:p>
          </table:table-cell>
          <table:table-cell table:style-name="ce12N2" office:value-type="float" office:value="459510.87">
            <text:p>45951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6.58952">
            <text:p>196,590</text:p>
          </table:table-cell>
          <table:table-cell table:style-name="ce12N2" office:value-type="float" office:value="5460.61">
            <text:p>546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3.6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12.41">
            <text:p>388812,41</text:p>
          </table:table-cell>
          <table:table-cell table:style-name="ce12N2" office:value-type="float" office:value="388.9">
            <text:p>38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35">
            <text:p>3499,3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4128.61">
            <text:p>4128,61</text:p>
          </table:table-cell>
          <table:table-cell table:style-name="ce12N2" office:value-type="float" office:value="453623.21">
            <text:p>453623,21</text:p>
          </table:table-cell>
          <table:table-cell table:style-name="ce12N2" office:value-type="float" office:value="31017.96">
            <text:p>310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911693133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0">
            <text:p>311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895">
            <text:p>0,09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4.95">
            <text:p>2184,95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7">
            <text:p>19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177">
            <text:p>17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5182809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1">
            <text:p>31111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036944">
            <text:p>40,037</text:p>
          </table:table-cell>
          <table:table-cell table:style-name="ce12N2" office:value-type="float" office:value="293.6">
            <text:p>29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9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32.5">
            <text:p>26832,50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48">
            <text:p>241,4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2225.66">
            <text:p>22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61491841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2">
            <text:p>31111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">
            <text:p>0,150</text:p>
          </table:table-cell>
          <table:table-cell table:style-name="ce12N2" office:value-type="float" office:value="119.1">
            <text:p>11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4.7">
            <text:p>18824,70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2">
            <text:p>169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1546.65">
            <text:p>154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41811619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3">
            <text:p>31111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0.436865">
            <text:p>160,437</text:p>
          </table:table-cell>
          <table:table-cell table:style-name="ce12N2" office:value-type="float" office:value="2016.36">
            <text:p>201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9.85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13.05">
            <text:p>135713,05</text:p>
          </table:table-cell>
          <table:table-cell table:style-name="ce12N2" office:value-type="float" office:value="135.72">
            <text:p>1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.4">
            <text:p>1221,4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428.8">
            <text:p>150428,80</text:p>
          </table:table-cell>
          <table:table-cell table:style-name="ce12N2" office:value-type="float" office:value="10386.26">
            <text:p>103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31148012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5">
            <text:p>3111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8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14">
            <text:p>20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96">
            <text:p>0,00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9.22">
            <text:p>1649,2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4">
            <text:p>14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27.02">
            <text:p>127,02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136.79">
            <text:p>1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8801381961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7">
            <text:p>31111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41823">
            <text:p>26,418</text:p>
          </table:table-cell>
          <table:table-cell table:style-name="ce12N2" office:value-type="float" office:value="106.73">
            <text:p>10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82.28">
            <text:p>9682,28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14">
            <text:p>87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0.6">
            <text:p>11170,60</text:p>
          </table:table-cell>
          <table:table-cell table:style-name="ce12N2" office:value-type="float" office:value="585.15">
            <text:p>58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7141380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8">
            <text:p>311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44">
            <text:p>1,074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9.2">
            <text:p>10539,20</text:p>
          </table:table-cell>
          <table:table-cell table:style-name="ce12N2" office:value-type="float" office:value="10.54">
            <text:p>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85">
            <text:p>94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874.1">
            <text:p>87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121317733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0">
            <text:p>3111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8868">
            <text:p>42,887</text:p>
          </table:table-cell>
          <table:table-cell table:style-name="ce12N2" office:value-type="float" office:value="8901.2">
            <text:p>890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8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970">
            <text:p>101970,00</text:p>
          </table:table-cell>
          <table:table-cell table:style-name="ce12N2" office:value-type="float" office:value="101.97">
            <text:p>10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7.73">
            <text:p>917,7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8457.68">
            <text:p>84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74619121252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1">
            <text:p>31112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9.69">
            <text:p>484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17">
            <text:p>0,128</text:p>
          </table:table-cell>
          <table:table-cell table:style-name="ce12N2" office:value-type="float" office:value="11.36">
            <text:p>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9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3.2">
            <text:p>3843,20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95.99">
            <text:p>295,99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318.76">
            <text:p>31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83189517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3">
            <text:p>3111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8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83.59936">
            <text:p>783,599</text:p>
          </table:table-cell>
          <table:table-cell table:style-name="ce12N2" office:value-type="float" office:value="5532.81">
            <text:p>553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34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071.55">
            <text:p>77071,55</text:p>
          </table:table-cell>
          <table:table-cell table:style-name="ce12N2" office:value-type="float" office:value="77.06">
            <text:p>7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3.64">
            <text:p>693,6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6394.42">
            <text:p>639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8761831636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8">
            <text:p>3111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516">
            <text:p>0,675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87.8">
            <text:p>6087,80</text:p>
          </table:table-cell>
          <table:table-cell table:style-name="ce12N2" office:value-type="float" office:value="6.09">
            <text:p>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79">
            <text:p>54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504.78">
            <text:p>5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201657491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9">
            <text:p>3111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59">
            <text:p>0,007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.9">
            <text:p>493,9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92">
            <text:p>553,92</text:p>
          </table:table-cell>
          <table:table-cell table:style-name="ce12N2" office:value-type="float" office:value="38.77">
            <text:p>3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531569115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0">
            <text:p>3111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621635320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1">
            <text:p>3111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781097495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2">
            <text:p>31113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">
            <text:p>0,025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5.04">
            <text:p>5555,04</text:p>
          </table:table-cell>
          <table:table-cell table:style-name="ce12N2" office:value-type="float" office:value="5.56">
            <text:p>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460.74">
            <text:p>4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101268067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6">
            <text:p>31113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0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116">
            <text:p>0,281</text:p>
          </table:table-cell>
          <table:table-cell table:style-name="ce12N2" office:value-type="float" office:value="21.3">
            <text:p>2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59.46">
            <text:p>4759,46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4">
            <text:p>42,8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358.24">
            <text:p>35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09168318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7">
            <text:p>311137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6.26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90.8">
            <text:p>366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13182">
            <text:p>6,813</text:p>
          </table:table-cell>
          <table:table-cell table:style-name="ce12N2" office:value-type="float" office:value="3409.36">
            <text:p>340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91.4">
            <text:p>29991,4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92">
            <text:p>269,92</text:p>
          </table:table-cell>
          <table:table-cell table:style-name="ce12N2" office:value-type="float" office:value="46.67">
            <text:p>46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54.92">
            <text:p>1154,92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2487.52">
            <text:p>248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533881000160550000001162611802796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3">
            <text:p>3111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69.61">
            <text:p>686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88">
            <text:p>0,206</text:p>
          </table:table-cell>
          <table:table-cell table:style-name="ce12N2" office:value-type="float" office:value="24.19">
            <text:p>2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6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04.56">
            <text:p>5504,56</text:p>
          </table:table-cell>
          <table:table-cell table:style-name="ce12N2" office:value-type="float" office:value="5.5">
            <text:p>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54">
            <text:p>49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3.03">
            <text:p>363,03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440.94">
            <text:p>4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7103623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9">
            <text:p>311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72">
            <text:p>0,507</text:p>
          </table:table-cell>
          <table:table-cell table:style-name="ce12N2" office:value-type="float" office:value="281.25">
            <text:p>28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0.89">
            <text:p>2990,89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2">
            <text:p>26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248.06">
            <text:p>24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51252168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0">
            <text:p>311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925">
            <text:p>0,689</text:p>
          </table:table-cell>
          <table:table-cell table:style-name="ce12N2" office:value-type="float" office:value="448.29">
            <text:p>448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60.79">
            <text:p>11760,79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85">
            <text:p>105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975.45">
            <text:p>9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41269331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1">
            <text:p>311171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7.35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2">
            <text:p>185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42">
            <text:p>185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">
            <text:p>1,600</text:p>
          </table:table-cell>
          <table:table-cell table:style-name="ce12N2" office:value-type="float" office:value="3600">
            <text:p>3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48.98">
            <text:p>15648,98</text:p>
          </table:table-cell>
          <table:table-cell table:style-name="ce12N2" office:value-type="float" office:value="15.65">
            <text:p>1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84">
            <text:p>140,84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42">
            <text:p>18542,00</text:p>
          </table:table-cell>
          <table:table-cell table:style-name="ce12N2" office:value-type="float" office:value="1297.94">
            <text:p>129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73581350273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2">
            <text:p>31117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0.46">
            <text:p>7590,46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629.56">
            <text:p>6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61187492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4">
            <text:p>311174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8.7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624">
            <text:p>8,962</text:p>
          </table:table-cell>
          <table:table-cell table:style-name="ce12N2" office:value-type="float" office:value="2197.32">
            <text:p>219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27.44">
            <text:p>21227,44</text:p>
          </table:table-cell>
          <table:table-cell table:style-name="ce12N2" office:value-type="float" office:value="21.21">
            <text:p>2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04">
            <text:p>191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1760.62">
            <text:p>176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8787482000137550010001087591928436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6">
            <text:p>311176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7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36">
            <text:p>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E-5">
            <text:p>0,000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7">
            <text:p>56,70</text:p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83745700018755001000367496171196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7">
            <text:p>31117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8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3.84">
            <text:p>26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">
            <text:p>0,027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7.27">
            <text:p>2187,2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3.19">
            <text:p>163,19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100.43">
            <text:p>10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8721410215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9">
            <text:p>311179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83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56">
            <text:p>0,245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0.36">
            <text:p>450,36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5">
            <text:p>4,0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37.35">
            <text:p>3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064262000250550010002833161850109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0">
            <text:p>3111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7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.04">
            <text:p>12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88">
            <text:p>0,003</text:p>
          </table:table-cell>
          <table:table-cell table:style-name="ce12N2" office:value-type="float" office:value="2.34">
            <text:p>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.54">
            <text:p>1042,54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9">
            <text:p>9,39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7771932284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2">
            <text:p>311182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3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7.11">
            <text:p>48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">
            <text:p>0,040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7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4.57">
            <text:p>3864,57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8.11">
            <text:p>238,11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320.53">
            <text:p>3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3741100037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6">
            <text:p>3111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.01">
            <text:p>1569,01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2">
            <text:p>14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130.14">
            <text:p>1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41775468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7">
            <text:p>3111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436">
            <text:p>0,065</text:p>
          </table:table-cell>
          <table:table-cell table:style-name="ce12N2" office:value-type="float" office:value="45.03">
            <text:p>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2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9.68">
            <text:p>14029,68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26">
            <text:p>126,2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1163.63">
            <text:p>116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51784919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8">
            <text:p>3111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3">
            <text:p>0,165</text:p>
          </table:table-cell>
          <table:table-cell table:style-name="ce12N2" office:value-type="float" office:value="78.25">
            <text:p>78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8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25.29">
            <text:p>28425,29</text:p>
          </table:table-cell>
          <table:table-cell table:style-name="ce12N2" office:value-type="float" office:value="28.43">
            <text:p>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83">
            <text:p>255,8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2357.62">
            <text:p>235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6186110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9">
            <text:p>3111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464">
            <text:p>0,145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6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4.26">
            <text:p>25014,26</text:p>
          </table:table-cell>
          <table:table-cell table:style-name="ce12N2" office:value-type="float" office:value="25.01">
            <text:p>2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13">
            <text:p>225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2074.7">
            <text:p>20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711316526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0">
            <text:p>3111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.28">
            <text:p>21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8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.02">
            <text:p>169,02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81351500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1">
            <text:p>3111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55">
            <text:p>42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64">
            <text:p>0,000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.02">
            <text:p>338,02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9133189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2">
            <text:p>311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5.47">
            <text:p>398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8">
            <text:p>0,005</text:p>
          </table:table-cell>
          <table:table-cell table:style-name="ce12N2" office:value-type="float" office:value="4.41">
            <text:p>4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0.69">
            <text:p>3330,69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7">
            <text:p>29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276.24">
            <text:p>2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01580179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3">
            <text:p>3111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792">
            <text:p>0,029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4.11">
            <text:p>2484,11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6">
            <text:p>22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1163288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5">
            <text:p>3111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21.16">
            <text:p>515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226.98">
            <text:p>51226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29">
            <text:p>0,295</text:p>
          </table:table-cell>
          <table:table-cell table:style-name="ce12N2" office:value-type="float" office:value="192.98">
            <text:p>19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2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69.56">
            <text:p>43369,56</text:p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33">
            <text:p>390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94.18">
            <text:p>294,18</text:p>
          </table:table-cell>
          <table:table-cell table:style-name="ce12N2" office:value-type="float" office:value="49097.54">
            <text:p>49097,54</text:p>
          </table:table-cell>
          <table:table-cell table:style-name="ce12N2" office:value-type="float" office:value="3436.84">
            <text:p>34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31793631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6">
            <text:p>3111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8">
            <text:p>0,00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9.81">
            <text:p>3619,8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8">
            <text:p>32,5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300.23">
            <text:p>30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41208427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7">
            <text:p>3111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.13">
            <text:p>89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5">
            <text:p>0,00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2.94">
            <text:p>712,94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.57">
            <text:p>54,57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3.95">
            <text:p>5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61713105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8">
            <text:p>3111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66.22">
            <text:p>20466,22</text:p>
          </table:table-cell>
          <table:table-cell table:style-name="ce12N2" office:value-type="float" office:value="20.47">
            <text:p>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2">
            <text:p>184,2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1697.48">
            <text:p>169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7169706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9">
            <text:p>3111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58">
            <text:p>18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8.48">
            <text:p>1428,48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6">
            <text:p>12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02">
            <text:p>110,02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118.48">
            <text:p>1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8131508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0">
            <text:p>3112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.83">
            <text:p>6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6">
            <text:p>0,001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.05">
            <text:p>507,05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9127890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1">
            <text:p>3112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1.83">
            <text:p>1551,83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128.71">
            <text:p>128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01755536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2">
            <text:p>3112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24">
            <text:p>0,044</text:p>
          </table:table-cell>
          <table:table-cell table:style-name="ce12N2" office:value-type="float" office:value="30.02">
            <text:p>3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3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71.22">
            <text:p>7371,22</text:p>
          </table:table-cell>
          <table:table-cell table:style-name="ce12N2" office:value-type="float" office:value="7.37">
            <text:p>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34">
            <text:p>66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611.37">
            <text:p>6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11339007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3">
            <text:p>3112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21568192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4">
            <text:p>3112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5.78">
            <text:p>42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115">
            <text:p>0,010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.41">
            <text:p>337,41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99">
            <text:p>25,99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31950718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6">
            <text:p>3112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4129225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7">
            <text:p>3112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9">
            <text:p>0,001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66.45">
            <text:p>6466,45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19">
            <text:p>58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4.19">
            <text:p>7374,19</text:p>
          </table:table-cell>
          <table:table-cell table:style-name="ce12N2" office:value-type="float" office:value="299.15">
            <text:p>29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61848831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8">
            <text:p>3112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30.1">
            <text:p>1043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378.03">
            <text:p>1037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81">
            <text:p>0,031</text:p>
          </table:table-cell>
          <table:table-cell table:style-name="ce12N2" office:value-type="float" office:value="13.94">
            <text:p>1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3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60.51">
            <text:p>8960,51</text:p>
          </table:table-cell>
          <table:table-cell table:style-name="ce12N2" office:value-type="float" office:value="8.96">
            <text:p>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64">
            <text:p>80,6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8862.26">
            <text:p>8862,26</text:p>
          </table:table-cell>
          <table:table-cell table:style-name="ce12N2" office:value-type="float" office:value="504.19">
            <text:p>50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71208431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9">
            <text:p>3112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32">
            <text:p>0,090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.93">
            <text:p>298,9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13.72">
            <text:p>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816709936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0">
            <text:p>3112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2.67">
            <text:p>126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7">
            <text:p>0,036</text:p>
          </table:table-cell>
          <table:table-cell table:style-name="ce12N2" office:value-type="float" office:value="13.24">
            <text:p>13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2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8.5">
            <text:p>10058,50</text:p>
          </table:table-cell>
          <table:table-cell table:style-name="ce12N2" office:value-type="float" office:value="10.06">
            <text:p>1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53">
            <text:p>90,5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74.67">
            <text:p>774,67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834.26">
            <text:p>8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91541216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1">
            <text:p>3112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8688">
            <text:p>0,159</text:p>
          </table:table-cell>
          <table:table-cell table:style-name="ce12N2" office:value-type="float" office:value="75.12">
            <text:p>7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3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4.39">
            <text:p>28724,39</text:p>
          </table:table-cell>
          <table:table-cell table:style-name="ce12N2" office:value-type="float" office:value="28.72">
            <text:p>2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52">
            <text:p>258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2382.42">
            <text:p>23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014131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2">
            <text:p>3112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7.86">
            <text:p>380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71">
            <text:p>0,011</text:p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7.6">
            <text:p>3017,60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2.4">
            <text:p>232,4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250.28">
            <text:p>2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11112570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3">
            <text:p>3112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40.85">
            <text:p>1514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5307">
            <text:p>1,925</text:p>
          </table:table-cell>
          <table:table-cell table:style-name="ce12N2" office:value-type="float" office:value="36.3">
            <text:p>3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4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20.55">
            <text:p>12820,55</text:p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39">
            <text:p>115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646.46">
            <text:p>6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21136350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4">
            <text:p>3112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5.26">
            <text:p>49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3">
            <text:p>0,026</text:p>
          </table:table-cell>
          <table:table-cell table:style-name="ce12N2" office:value-type="float" office:value="26.02">
            <text:p>2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5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1.76">
            <text:p>4161,76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76">
            <text:p>67,76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311.55">
            <text:p>3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3153348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5">
            <text:p>3112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72">
            <text:p>0,091</text:p>
          </table:table-cell>
          <table:table-cell table:style-name="ce12N2" office:value-type="float" office:value="66.82">
            <text:p>6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97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91.34">
            <text:p>20891,34</text:p>
          </table:table-cell>
          <table:table-cell table:style-name="ce12N2" office:value-type="float" office:value="20.89">
            <text:p>2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02">
            <text:p>18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959.2">
            <text:p>95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51108321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6">
            <text:p>311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8.47">
            <text:p>2888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2632">
            <text:p>1,073</text:p>
          </table:table-cell>
          <table:table-cell table:style-name="ce12N2" office:value-type="float" office:value="176.95">
            <text:p>176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88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373.56">
            <text:p>24373,56</text:p>
          </table:table-cell>
          <table:table-cell table:style-name="ce12N2" office:value-type="float" office:value="24.37">
            <text:p>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36">
            <text:p>219,3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51.1">
            <text:p>151,1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1879.43">
            <text:p>187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611124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7">
            <text:p>3112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42">
            <text:p>0,008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06.04">
            <text:p>5206,04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85">
            <text:p>46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431.79">
            <text:p>43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71711649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9">
            <text:p>311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9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2.04">
            <text:p>1682,04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4">
            <text:p>15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139.51">
            <text:p>1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01838246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0">
            <text:p>311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24">
            <text:p>0,00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1.65">
            <text:p>2591,65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2">
            <text:p>23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214.95">
            <text:p>2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11804764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1">
            <text:p>311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">
            <text:p>0,002</text:p>
          </table:table-cell>
          <table:table-cell table:style-name="ce12N2" office:value-type="float" office:value="48.8">
            <text:p>4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3.81">
            <text:p>5363,81</text:p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7">
            <text:p>48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246.27">
            <text:p>24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21425662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2">
            <text:p>311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28">
            <text:p>0,046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26.03">
            <text:p>2726,03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53">
            <text:p>24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226.1">
            <text:p>2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4171437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3">
            <text:p>311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8">
            <text:p>0,03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5.04">
            <text:p>2235,04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2">
            <text:p>20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185.38">
            <text:p>18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51436906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4">
            <text:p>311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28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17">
            <text:p>694,17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61226118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5">
            <text:p>311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2.1">
            <text:p>36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4">
            <text:p>0,011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9.44">
            <text:p>2989,44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">
            <text:p>26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247.94">
            <text:p>24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71990504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6">
            <text:p>311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4">
            <text:p>0,006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6.83">
            <text:p>1116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92.63">
            <text:p>9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81971825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7">
            <text:p>311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32">
            <text:p>0,036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39.13">
            <text:p>6339,13</text:p>
          </table:table-cell>
          <table:table-cell table:style-name="ce12N2" office:value-type="float" office:value="6.34">
            <text:p>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05">
            <text:p>57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918460909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8">
            <text:p>311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404">
            <text:p>0,026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4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.06">
            <text:p>1473,06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6">
            <text:p>13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122.18">
            <text:p>12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30176942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0">
            <text:p>31123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">
            <text:p>0,010</text:p>
          </table:table-cell>
          <table:table-cell table:style-name="ce12N2" office:value-type="float" office:value="244">
            <text:p>2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5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757.35">
            <text:p>59757,35</text:p>
          </table:table-cell>
          <table:table-cell table:style-name="ce12N2" office:value-type="float" office:value="59.76">
            <text:p>5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.82">
            <text:p>537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2743.68">
            <text:p>27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2143448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6">
            <text:p>311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234.71">
            <text:p>66623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">
            <text:p>65,00</text:p>
          </table:table-cell>
          <table:table-cell table:style-name="ce12N2" office:value-type="float" office:value="664454.88">
            <text:p>6644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30666">
            <text:p>32,231</text:p>
          </table:table-cell>
          <table:table-cell table:style-name="ce12N2" office:value-type="float" office:value="1091.22">
            <text:p>109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6.23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737.83">
            <text:p>565737,83</text:p>
          </table:table-cell>
          <table:table-cell table:style-name="ce12N2" office:value-type="float" office:value="565.74">
            <text:p>56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1.65">
            <text:p>5091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779.83">
            <text:p>1779,83</text:p>
          </table:table-cell>
          <table:table-cell table:style-name="ce12N2" office:value-type="float" office:value="660568.58">
            <text:p>660568,58</text:p>
          </table:table-cell>
          <table:table-cell table:style-name="ce12N2" office:value-type="float" office:value="41052.33">
            <text:p>4105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31484104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7">
            <text:p>311237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95.86">
            <text:p>1025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942">
            <text:p>31,942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83.86">
            <text:p>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.77">
            <text:p>754,7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29.41">
            <text:p>3229,41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6955.65">
            <text:p>695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2157511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9">
            <text:p>31123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9.78">
            <text:p>610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3">
            <text:p>0,108</text:p>
          </table:table-cell>
          <table:table-cell table:style-name="ce12N2" office:value-type="float" office:value="8.74">
            <text:p>8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98.4">
            <text:p>4698,40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29">
            <text:p>42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2.78">
            <text:p>542,78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389.69">
            <text:p>38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51519807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0">
            <text:p>3112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9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6">
            <text:p>0,011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0.84">
            <text:p>2230,8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8">
            <text:p>20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185.03">
            <text:p>18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9741082884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1">
            <text:p>31124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62">
            <text:p>0,042</text:p>
          </table:table-cell>
          <table:table-cell table:style-name="ce12N2" office:value-type="float" office:value="246.25">
            <text:p>24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7.39">
            <text:p>8227,3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3">
            <text:p>74,0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682.39">
            <text:p>68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51005398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2">
            <text:p>31124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8">
            <text:p>0,031</text:p>
          </table:table-cell>
          <table:table-cell table:style-name="ce12N2" office:value-type="float" office:value="157.25">
            <text:p>15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8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6.64">
            <text:p>5896,64</text:p>
          </table:table-cell>
          <table:table-cell table:style-name="ce12N2" office:value-type="float" office:value="5.88">
            <text:p>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5">
            <text:p>53,0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489.07">
            <text:p>4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61007678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3">
            <text:p>311243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25.0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16.08">
            <text:p>3151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553">
            <text:p>0,242</text:p>
          </table:table-cell>
          <table:table-cell table:style-name="ce12N2" office:value-type="float" office:value="193.95">
            <text:p>19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1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1.51">
            <text:p>25761,51</text:p>
          </table:table-cell>
          <table:table-cell table:style-name="ce12N2" office:value-type="float" office:value="25.76">
            <text:p>2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5">
            <text:p>231,85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92.03">
            <text:p>992,03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2136.69">
            <text:p>21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468337400030055003000625066166129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1">
            <text:p>311251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2.72">
            <text:p>942,72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8">
            <text:p>8,4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78.19">
            <text:p>7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.77">
            <text:p>2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85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5/07/2026</text:p>
          </table:table-cell>
          <table:table-cell table:style-name="ce12" office:value-type="string" calcext:value-type="string">
            <text:p>24,77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41260700296181000145550010000185261001532293</text:p>
          </table:table-cell>
          <table:table-cell table:style-name="ce0" office:value-type="string" calcext:value-type="string">
            <text:p>3526070522209200076357002000483853100737858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3">
            <text:p>311253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0.76">
            <text:p>4230,76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350.9">
            <text:p>35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531812414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4">
            <text:p>3112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7.63">
            <text:p>142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4">
            <text:p>0,00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7.84">
            <text:p>1097,84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88">
            <text:p>9,88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26.83">
            <text:p>126,83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38127057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5">
            <text:p>311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02.59">
            <text:p>159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215732">
            <text:p>61,216</text:p>
          </table:table-cell>
          <table:table-cell table:style-name="ce12N2" office:value-type="float" office:value="48.99">
            <text:p>4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0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1.53">
            <text:p>12831,53</text:p>
          </table:table-cell>
          <table:table-cell table:style-name="ce12N2" office:value-type="float" office:value="12.84">
            <text:p>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48">
            <text:p>115,48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72.85">
            <text:p>972,85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790.31">
            <text:p>7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81098659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8">
            <text:p>311258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2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00">
            <text:p>11600,000</text:p>
          </table:table-cell>
          <table:table-cell table:style-name="ce12N2" office:value-type="float" office:value="5001.04">
            <text:p>500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8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004.98">
            <text:p>140004,98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0.04">
            <text:p>1260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11612.13">
            <text:p>1161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20616627262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9">
            <text:p>31125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629.7">
            <text:p>15562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425175">
            <text:p>17,425</text:p>
          </table:table-cell>
          <table:table-cell table:style-name="ce12N2" office:value-type="float" office:value="4543.62">
            <text:p>454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62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98.97">
            <text:p>132998,97</text:p>
          </table:table-cell>
          <table:table-cell table:style-name="ce12N2" office:value-type="float" office:value="133">
            <text:p>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98">
            <text:p>1196,9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86.85">
            <text:p>386,85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8694.68">
            <text:p>869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3941077111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1">
            <text:p>31126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423.11">
            <text:p>8542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5.054388">
            <text:p>815,054</text:p>
          </table:table-cell>
          <table:table-cell table:style-name="ce12N2" office:value-type="float" office:value="5188.43">
            <text:p>5188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42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067.54">
            <text:p>72067,54</text:p>
          </table:table-cell>
          <table:table-cell table:style-name="ce12N2" office:value-type="float" office:value="72.07">
            <text:p>7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61">
            <text:p>648,6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5975.95">
            <text:p>597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5221326514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5">
            <text:p>311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51371936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6">
            <text:p>311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0.66">
            <text:p>152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2084">
            <text:p>0,182</text:p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39.62">
            <text:p>13139,62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26">
            <text:p>11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3.5">
            <text:p>93,5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648.25">
            <text:p>6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5125703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7">
            <text:p>311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.98">
            <text:p>446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2">
            <text:p>4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37.07">
            <text:p>3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41336564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8">
            <text:p>311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91222490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0">
            <text:p>31127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9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69.42">
            <text:p>4486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5114">
            <text:p>5,735</text:p>
          </table:table-cell>
          <table:table-cell table:style-name="ce12N2" office:value-type="float" office:value="32123.76">
            <text:p>3212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86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4.12">
            <text:p>37624,12</text:p>
          </table:table-cell>
          <table:table-cell table:style-name="ce12N2" office:value-type="float" office:value="37.62">
            <text:p>3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2">
            <text:p>338,62</text:p>
          </table:table-cell>
          <table:table-cell table:style-name="ce12N2" office:value-type="float" office:value="98.04">
            <text:p>98,0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89.77">
            <text:p>289,77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3120.58">
            <text:p>31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9421646860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3">
            <text:p>31127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97.1">
            <text:p>5309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9675">
            <text:p>17,968</text:p>
          </table:table-cell>
          <table:table-cell table:style-name="ce12N2" office:value-type="float" office:value="2904">
            <text:p>29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09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2.05">
            <text:p>43402,05</text:p>
          </table:table-cell>
          <table:table-cell table:style-name="ce12N2" office:value-type="float" office:value="43.4">
            <text:p>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62">
            <text:p>390,6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71.34">
            <text:p>1671,34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3599.8">
            <text:p>3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31575113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4">
            <text:p>31127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49.13">
            <text:p>3444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1854">
            <text:p>11,819</text:p>
          </table:table-cell>
          <table:table-cell table:style-name="ce12N2" office:value-type="float" office:value="2220">
            <text:p>2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449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29.24">
            <text:p>31029,2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.26">
            <text:p>279,2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84.36">
            <text:p>1084,36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2335.53">
            <text:p>233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41575113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6">
            <text:p>3112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9.83">
            <text:p>581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31">
            <text:p>0,098</text:p>
          </table:table-cell>
          <table:table-cell table:style-name="ce12N2" office:value-type="float" office:value="8.23">
            <text:p>8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5.43">
            <text:p>4475,43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7">
            <text:p>40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7.03">
            <text:p>517,03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371.2">
            <text:p>3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413080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8">
            <text:p>3112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8.49">
            <text:p>464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4">
            <text:p>0,002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0.26">
            <text:p>3790,26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2">
            <text:p>34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3">
            <text:p>169,33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302.57">
            <text:p>30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7173807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9">
            <text:p>3112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4.7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7.49">
            <text:p>1003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0542">
            <text:p>14,811</text:p>
          </table:table-cell>
          <table:table-cell table:style-name="ce12N2" office:value-type="float" office:value="1696.89">
            <text:p>1696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33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67.85">
            <text:p>84267,85</text:p>
          </table:table-cell>
          <table:table-cell table:style-name="ce12N2" office:value-type="float" office:value="84.26">
            <text:p>8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8.4">
            <text:p>758,4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56.81">
            <text:p>856,81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6623.46">
            <text:p>66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47291093606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0">
            <text:p>3112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1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5.6">
            <text:p>391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21">
            <text:p>0,041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3.6">
            <text:p>3173,60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07">
            <text:p>207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211.49">
            <text:p>21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1211190130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1">
            <text:p>31128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7">
            <text:p>8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08">
            <text:p>0,007</text:p>
          </table:table-cell>
          <table:table-cell table:style-name="ce12N2" office:value-type="float" office:value="3.27">
            <text:p>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0.04">
            <text:p>740,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30.84">
            <text:p>3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21454733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2">
            <text:p>311282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.25">
            <text:p>6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88">
            <text:p>0,011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.74">
            <text:p>549,7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45.6">
            <text:p>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3148692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13">
            <text:p>213,00</text:p>
          </table:table-cell>
          <table:table-cell table:style-name="ce26N2" office:value-type="float" office:value="2412.77">
            <text:p>2412,77</text:p>
          </table:table-cell>
          <table:table-cell table:style-name="ce26N2" office:value-type="float" office:value="7.99">
            <text:p>7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5381.42">
            <text:p>105381,42</text:p>
          </table:table-cell>
          <table:table-cell table:style-name="ce26N2" office:value-type="float" office:value="8168536.46">
            <text:p>8168536,46</text:p>
          </table:table-cell>
          <table:table-cell table:style-name="ce26N2" office:value-type="float" office:value="515169.12">
            <text:p>515169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31.42">
            <text:p>531,42</text:p>
          </table:table-cell>
          <table:table-cell table:style-name="ce26N2" office:value-type="float" office:value="8370102.13">
            <text:p>8370102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774.893537">
            <text:p>19774,894</text:p>
          </table:table-cell>
          <table:table-cell table:style-name="ce26N2" office:value-type="float" office:value="8267125.49">
            <text:p>8267125,49</text:p>
          </table:table-cell>
          <table:table-cell table:style-name="ce26N2" office:value-type="float" office:value="8370102.13">
            <text:p>8370102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012489.05">
            <text:p>7012489,05</text:p>
          </table:table-cell>
          <table:table-cell table:style-name="ce26N2" office:value-type="float" office:value="7012.68">
            <text:p>7012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3112.37">
            <text:p>63112,3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30225.97">
            <text:p>330225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.25">
            <text:p>58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20" meta:object-count="0"/>
    <meta:generator>LibreOffice/4.3.0.4$Windows_x86 LibreOffice_project/62ad5818884a2fc2e5780dd45466868d41009ec0</meta:generator>
  </office:meta>
</office:document-meta>
</file>