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5/05/2026 07:37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4">
            <text:p>30743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4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4">
            <text:p>843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9048">
            <text:p>0,489</text:p>
          </table:table-cell>
          <table:table-cell table:style-name="ce12N2" office:value-type="float" office:value="69.4">
            <text:p>6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27.68">
            <text:p>627,68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312.23">
            <text:p>31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41008003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5">
            <text:p>30743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4.54">
            <text:p>158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6">
            <text:p>0,015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067.98">
            <text:p>2067,98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965.06">
            <text:p>96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81000798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7">
            <text:p>30743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156">
            <text:p>0,712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1224.88">
            <text:p>122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7100783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3">
            <text:p>30747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62">
            <text:p>0,461</text:p>
          </table:table-cell>
          <table:table-cell table:style-name="ce12N2" office:value-type="float" office:value="116.46">
            <text:p>11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466.33">
            <text:p>4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51000774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4">
            <text:p>30747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10.54">
            <text:p>541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3968">
            <text:p>0,974</text:p>
          </table:table-cell>
          <table:table-cell table:style-name="ce12N2" office:value-type="float" office:value="2222.66">
            <text:p>222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1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56.46">
            <text:p>1456,46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3685.78">
            <text:p>36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610041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2">
            <text:p>3074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6.1">
            <text:p>119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3">
            <text:p>0,006</text:p>
          </table:table-cell>
          <table:table-cell table:style-name="ce12N2" office:value-type="float" office:value="4.17">
            <text:p>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.3">
            <text:p>878,30</text:p>
          </table:table-cell>
          <table:table-cell table:style-name="ce12N2" office:value-type="float" office:value="61.48">
            <text:p>6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31685412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3">
            <text:p>3074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8.44">
            <text:p>47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.32">
            <text:p>351,32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21970174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4">
            <text:p>307494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7.78">
            <text:p>1960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5932">
            <text:p>0,386</text:p>
          </table:table-cell>
          <table:table-cell table:style-name="ce12N2" office:value-type="float" office:value="107.63">
            <text:p>107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0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914.63">
            <text:p>914,63</text:p>
          </table:table-cell>
          <table:table-cell table:style-name="ce12N2" office:value-type="float" office:value="18693.15">
            <text:p>18693,15</text:p>
          </table:table-cell>
          <table:table-cell table:style-name="ce12N2" office:value-type="float" office:value="747.73">
            <text:p>7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31326491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5">
            <text:p>30749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35.71">
            <text:p>11173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32063">
            <text:p>2,832</text:p>
          </table:table-cell>
          <table:table-cell table:style-name="ce12N2" office:value-type="float" office:value="608.49">
            <text:p>608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73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">
            <text:p>3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6875.59">
            <text:p>6875,59</text:p>
          </table:table-cell>
          <table:table-cell table:style-name="ce12N2" office:value-type="float" office:value="104860.12">
            <text:p>104860,12</text:p>
          </table:table-cell>
          <table:table-cell table:style-name="ce12N2" office:value-type="float" office:value="4194.4">
            <text:p>4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61601434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96">
            <text:p>30749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7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3.57">
            <text:p>216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15">
            <text:p>0,040</text:p>
          </table:table-cell>
          <table:table-cell table:style-name="ce12N2" office:value-type="float" office:value="15.75">
            <text:p>15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110.12">
            <text:p>110,12</text:p>
          </table:table-cell>
          <table:table-cell table:style-name="ce12N2" office:value-type="float" office:value="2053.45">
            <text:p>2053,45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73041489216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0">
            <text:p>3075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0.48">
            <text:p>111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33">
            <text:p>0,295</text:p>
          </table:table-cell>
          <table:table-cell table:style-name="ce12N2" office:value-type="float" office:value="3.82">
            <text:p>3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7.78">
            <text:p>67,78</text:p>
          </table:table-cell>
          <table:table-cell table:style-name="ce12N2" office:value-type="float" office:value="1042.7">
            <text:p>1042,70</text:p>
          </table:table-cell>
          <table:table-cell table:style-name="ce12N2" office:value-type="float" office:value="41.71">
            <text:p>4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11715382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3">
            <text:p>3075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9.54">
            <text:p>929,54</text:p>
          </table:table-cell>
          <table:table-cell table:style-name="ce12N2" office:value-type="float" office:value="65.07">
            <text:p>6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941975247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9">
            <text:p>307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.66">
            <text:p>32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308.6">
            <text:p>308,60</text:p>
          </table:table-cell>
          <table:table-cell table:style-name="ce12N2" office:value-type="float" office:value="21.6">
            <text:p>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71296796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3">
            <text:p>307593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22.88">
            <text:p>2272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513">
            <text:p>1,895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72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.42">
            <text:p>10,42</text:p>
          </table:table-cell>
          <table:table-cell table:style-name="ce12N2" office:value-type="float" office:value="22712.46">
            <text:p>22712,46</text:p>
          </table:table-cell>
          <table:table-cell table:style-name="ce12N2" office:value-type="float" office:value="908.5">
            <text:p>90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9091209171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0">
            <text:p>30760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4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">
            <text:p>0,003</text:p>
          </table:table-cell>
          <table:table-cell table:style-name="ce12N2" office:value-type="float" office:value="49.5">
            <text:p>4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427116974982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6">
            <text:p>307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5.21">
            <text:p>213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6">
            <text:p>0,003</text:p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35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67.21">
            <text:p>67,21</text:p>
          </table:table-cell>
          <table:table-cell table:style-name="ce12N2" office:value-type="float" office:value="2068">
            <text:p>2068,00</text:p>
          </table:table-cell>
          <table:table-cell table:style-name="ce12N2" office:value-type="float" office:value="144.76">
            <text:p>14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21867579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7">
            <text:p>30760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1.72">
            <text:p>126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">
            <text:p>0,0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39.72">
            <text:p>39,72</text:p>
          </table:table-cell>
          <table:table-cell table:style-name="ce12N2" office:value-type="float" office:value="1222">
            <text:p>1222,00</text:p>
          </table:table-cell>
          <table:table-cell table:style-name="ce12N2" office:value-type="float" office:value="85.54">
            <text:p>8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311469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9">
            <text:p>30760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4.5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.85">
            <text:p>1504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30.46">
            <text:p>143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54">
            <text:p>0,046</text:p>
          </table:table-cell>
          <table:table-cell table:style-name="ce12N2" office:value-type="float" office:value="15.35">
            <text:p>15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04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74.39">
            <text:p>74,39</text:p>
          </table:table-cell>
          <table:table-cell table:style-name="ce12N2" office:value-type="float" office:value="1430.46">
            <text:p>1430,46</text:p>
          </table:table-cell>
          <table:table-cell table:style-name="ce12N2" office:value-type="float" office:value="100.14">
            <text:p>10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457611000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1">
            <text:p>30761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10.54">
            <text:p>42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78">
            <text:p>40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">
            <text:p>0,010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2.54">
            <text:p>132,54</text:p>
          </table:table-cell>
          <table:table-cell table:style-name="ce12N2" office:value-type="float" office:value="4078">
            <text:p>4078,00</text:p>
          </table:table-cell>
          <table:table-cell table:style-name="ce12N2" office:value-type="float" office:value="163.12">
            <text:p>16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84119131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2">
            <text:p>30761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6.25">
            <text:p>525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125.98">
            <text:p>512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93093">
            <text:p>42,931</text:p>
          </table:table-cell>
          <table:table-cell table:style-name="ce12N2" office:value-type="float" office:value="332.15">
            <text:p>33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30.27">
            <text:p>130,27</text:p>
          </table:table-cell>
          <table:table-cell table:style-name="ce12N2" office:value-type="float" office:value="4912.66">
            <text:p>4912,66</text:p>
          </table:table-cell>
          <table:table-cell table:style-name="ce12N2" office:value-type="float" office:value="343.9">
            <text:p>34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1913681000134550010001798341462989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5">
            <text:p>30761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4.98">
            <text:p>215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40.12">
            <text:p>2140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881">
            <text:p>0,242</text:p>
          </table:table-cell>
          <table:table-cell table:style-name="ce12N2" office:value-type="float" office:value="22.18">
            <text:p>2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2140.12">
            <text:p>2140,12</text:p>
          </table:table-cell>
          <table:table-cell table:style-name="ce12N2" office:value-type="float" office:value="149.81">
            <text:p>14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715363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16">
            <text:p>30761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">
            <text:p>168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14.3">
            <text:p>16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1">
            <text:p>0,009</text:p>
          </table:table-cell>
          <table:table-cell table:style-name="ce12N2" office:value-type="float" office:value="8.75">
            <text:p>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72.6">
            <text:p>72,60</text:p>
          </table:table-cell>
          <table:table-cell table:style-name="ce12N2" office:value-type="float" office:value="1614.3">
            <text:p>1614,30</text:p>
          </table:table-cell>
          <table:table-cell table:style-name="ce12N2" office:value-type="float" office:value="96.85">
            <text:p>9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151931713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2">
            <text:p>30763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955.92">
            <text:p>190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">
            <text:p>41,00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252118">
            <text:p>12,252</text:p>
          </table:table-cell>
          <table:table-cell table:style-name="ce12N2" office:value-type="float" office:value="5183.76">
            <text:p>518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0.95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55.66">
            <text:p>255,66</text:p>
          </table:table-cell>
          <table:table-cell table:style-name="ce12N2" office:value-type="float" office:value="190700.26">
            <text:p>190700,26</text:p>
          </table:table-cell>
          <table:table-cell table:style-name="ce12N2" office:value-type="float" office:value="12356.96">
            <text:p>123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1511727836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5">
            <text:p>30764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6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892">
            <text:p>0,234</text:p>
          </table:table-cell>
          <table:table-cell table:style-name="ce12N2" office:value-type="float" office:value="27.25">
            <text:p>2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3.34">
            <text:p>2063,34</text:p>
          </table:table-cell>
          <table:table-cell table:style-name="ce12N2" office:value-type="float" office:value="144.44">
            <text:p>14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6921789566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9">
            <text:p>307649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7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32">
            <text:p>0,064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4.8">
            <text:p>1384,80</text:p>
          </table:table-cell>
          <table:table-cell table:style-name="ce12N2" office:value-type="float" office:value="55.39">
            <text:p>5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71002283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0">
            <text:p>307650</text:p>
          </table:table-cell>
          <table:table-cell table:style-name="ce0" table:number-columns-spanned="4" table:number-rows-spanned="1" office:value-type="string" calcext:value-type="string">
            <text:p>5.377 - 3M DO BRASIL LTDA</text:p>
          </table:table-cell>
          <table:covered-table-cell table:number-columns-repeated="3"/>
          <table:table-cell table:style-name="ce0" office:value-type="string" calcext:value-type="string">
            <text:p>970.366</text:p>
          </table:table-cell>
          <table:table-cell table:style-name="ce9" office:value-type="string" calcext:value-type="string">
            <text:p>14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475">
            <text:p>0,914</text:p>
          </table:table-cell>
          <table:table-cell table:style-name="ce12N2" office:value-type="float" office:value="88.1">
            <text:p>8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5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51.65">
            <text:p>9951,65</text:p>
          </table:table-cell>
          <table:table-cell table:style-name="ce12N2" office:value-type="float" office:value="696.62">
            <text:p>6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6220550140009703661002489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5">
            <text:p>3076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4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2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22">
            <text:p>13422,00</text:p>
          </table:table-cell>
          <table:table-cell table:style-name="ce12N2" office:value-type="float" office:value="939.54">
            <text:p>93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486183228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9">
            <text:p>3076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4.40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4405117703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5">
            <text:p>307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49">
            <text:p>0,032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4.78">
            <text:p>4524,78</text:p>
          </table:table-cell>
          <table:table-cell table:style-name="ce12N2" office:value-type="float" office:value="316.73">
            <text:p>31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7551996728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4">
            <text:p>307684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35">
            <text:p>0,7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5.68">
            <text:p>3965,68</text:p>
          </table:table-cell>
          <table:table-cell table:style-name="ce12N2" office:value-type="float" office:value="277.6">
            <text:p>2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21515144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5">
            <text:p>307685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6.64">
            <text:p>1586,64</text:p>
          </table:table-cell>
          <table:table-cell table:style-name="ce12N2" office:value-type="float" office:value="111.06">
            <text:p>1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515878298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4">
            <text:p>307714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3.54">
            <text:p>20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979.77">
            <text:p>1979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3942">
            <text:p>0,794</text:p>
          </table:table-cell>
          <table:table-cell table:style-name="ce12N2" office:value-type="float" office:value="34.64">
            <text:p>3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3.77">
            <text:p>33,77</text:p>
          </table:table-cell>
          <table:table-cell table:style-name="ce12N2" office:value-type="float" office:value="1979.77">
            <text:p>1979,77</text:p>
          </table:table-cell>
          <table:table-cell table:style-name="ce12N2" office:value-type="float" office:value="138.58">
            <text:p>13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41118914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6">
            <text:p>307716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7.5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49.42">
            <text:p>116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49.42">
            <text:p>11649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">
            <text:p>0,014</text:p>
          </table:table-cell>
          <table:table-cell table:style-name="ce12N2" office:value-type="float" office:value="734.4">
            <text:p>73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4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49.42">
            <text:p>11649,42</text:p>
          </table:table-cell>
          <table:table-cell table:style-name="ce12N2" office:value-type="float" office:value="1397.93">
            <text:p>139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610648380141935500100016751718579508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7">
            <text:p>30771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7.2">
            <text:p>29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07.2">
            <text:p>29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1">
            <text:p>0,345</text:p>
          </table:table-cell>
          <table:table-cell table:style-name="ce12N2" office:value-type="float" office:value="45.13">
            <text:p>4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7.2">
            <text:p>2907,20</text:p>
          </table:table-cell>
          <table:table-cell table:style-name="ce12N2" office:value-type="float" office:value="203.51">
            <text:p>20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8311851604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8">
            <text:p>30771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8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4.1">
            <text:p>514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44.1">
            <text:p>514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029">
            <text:p>0,230</text:p>
          </table:table-cell>
          <table:table-cell table:style-name="ce12N2" office:value-type="float" office:value="70.6">
            <text:p>7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4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4.1">
            <text:p>5144,10</text:p>
          </table:table-cell>
          <table:table-cell table:style-name="ce12N2" office:value-type="float" office:value="360.09">
            <text:p>36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8301597923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19">
            <text:p>30771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53.45">
            <text:p>9085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53.45">
            <text:p>90853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69559">
            <text:p>38,696</text:p>
          </table:table-cell>
          <table:table-cell table:style-name="ce12N2" office:value-type="float" office:value="8031.31">
            <text:p>8031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853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53.45">
            <text:p>90853,45</text:p>
          </table:table-cell>
          <table:table-cell table:style-name="ce12N2" office:value-type="float" office:value="6359.74">
            <text:p>635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88713233948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0">
            <text:p>30772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9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44.38">
            <text:p>9124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244.38">
            <text:p>91244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728438">
            <text:p>27,728</text:p>
          </table:table-cell>
          <table:table-cell table:style-name="ce12N2" office:value-type="float" office:value="2430.99">
            <text:p>2430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244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244.38">
            <text:p>91244,38</text:p>
          </table:table-cell>
          <table:table-cell table:style-name="ce12N2" office:value-type="float" office:value="6387.11">
            <text:p>638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9796128563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2">
            <text:p>307722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.11">
            <text:p>15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.11">
            <text:p>152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11">
            <text:p>152,11</text:p>
          </table:table-cell>
          <table:table-cell table:style-name="ce12N2" office:value-type="float" office:value="10.65">
            <text:p>1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31118914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3">
            <text:p>307743</text:p>
          </table:table-cell>
          <table:table-cell table:style-name="ce0" table:number-columns-spanned="4" table:number-rows-spanned="1" office:value-type="string" calcext:value-type="string">
            <text:p>27.071 - ACO CEARENSE INDUSTRIAL LTDA</text:p>
          </table:table-cell>
          <table:covered-table-cell table:number-columns-repeated="3"/>
          <table:table-cell table:style-name="ce0" office:value-type="string" calcext:value-type="string">
            <text:p>1.189.2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059.52">
            <text:p>1790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6183.51">
            <text:p>176183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7.162">
            <text:p>567,162</text:p>
          </table:table-cell>
          <table:table-cell table:style-name="ce12N2" office:value-type="float" office:value="30502.6">
            <text:p>305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9.05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876.01">
            <text:p>2876,01</text:p>
          </table:table-cell>
          <table:table-cell table:style-name="ce12N2" office:value-type="float" office:value="176183.51">
            <text:p>176183,51</text:p>
          </table:table-cell>
          <table:table-cell table:style-name="ce12N2" office:value-type="float" office:value="21142.01">
            <text:p>2114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500990842000138550010011892061193318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5">
            <text:p>30774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2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6.58">
            <text:p>59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7.8">
            <text:p>57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E-5">
            <text:p>0,000</text:p>
          </table:table-cell>
          <table:table-cell table:style-name="ce12N2" office:value-type="float" office:value="0.62">
            <text:p>0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8.78">
            <text:p>18,78</text:p>
          </table:table-cell>
          <table:table-cell table:style-name="ce12N2" office:value-type="float" office:value="577.8">
            <text:p>577,80</text:p>
          </table:table-cell>
          <table:table-cell table:style-name="ce12N2" office:value-type="float" office:value="40.45">
            <text:p>4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2081064528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4">
            <text:p>307764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28.9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531.53">
            <text:p>5053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5283">
            <text:p>1,253</text:p>
          </table:table-cell>
          <table:table-cell table:style-name="ce12N2" office:value-type="float" office:value="321.52">
            <text:p>3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53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74.41">
            <text:p>3074,41</text:p>
          </table:table-cell>
          <table:table-cell table:style-name="ce12N2" office:value-type="float" office:value="47457.12">
            <text:p>47457,12</text:p>
          </table:table-cell>
          <table:table-cell table:style-name="ce12N2" office:value-type="float" office:value="1898.3">
            <text:p>18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231436000107550010000289081073452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9">
            <text:p>307769</text:p>
          </table:table-cell>
          <table:table-cell table:style-name="ce0" table:number-columns-spanned="4" table:number-rows-spanned="1" office:value-type="string" calcext:value-type="string">
            <text:p>15.036 - MAXI RUBBER INDUSTRIAS QUIMICAS LTDA</text:p>
          </table:table-cell>
          <table:covered-table-cell table:number-columns-repeated="3"/>
          <table:table-cell table:style-name="ce0" office:value-type="string" calcext:value-type="string">
            <text:p>234.2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91.62">
            <text:p>38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344">
            <text:p>0,332</text:p>
          </table:table-cell>
          <table:table-cell table:style-name="ce12N2" office:value-type="float" office:value="655.98">
            <text:p>6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92.82">
            <text:p>492,82</text:p>
          </table:table-cell>
          <table:table-cell table:style-name="ce12N2" office:value-type="float" office:value="38098.8">
            <text:p>38098,80</text:p>
          </table:table-cell>
          <table:table-cell table:style-name="ce12N2" office:value-type="float" office:value="2666.92">
            <text:p>266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283822000470550050002342431280518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3">
            <text:p>3077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6.4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9632">
            <text:p>0,150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64711637957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4">
            <text:p>30777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">
            <text:p>0,006</text:p>
          </table:table-cell>
          <table:table-cell table:style-name="ce12N2" office:value-type="float" office:value="1329.5">
            <text:p>13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0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01">
            <text:p>17401,00</text:p>
          </table:table-cell>
          <table:table-cell table:style-name="ce12N2" office:value-type="float" office:value="1218.07">
            <text:p>121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81761707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7">
            <text:p>3077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8.64">
            <text:p>477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4">
            <text:p>0,023</text:p>
          </table:table-cell>
          <table:table-cell table:style-name="ce12N2" office:value-type="float" office:value="26.5">
            <text:p>2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08.96">
            <text:p>3508,96</text:p>
          </table:table-cell>
          <table:table-cell table:style-name="ce12N2" office:value-type="float" office:value="245.63">
            <text:p>24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30146284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8">
            <text:p>3077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61.2">
            <text:p>2261,20</text:p>
          </table:table-cell>
          <table:table-cell table:style-name="ce12N2" office:value-type="float" office:value="90.45">
            <text:p>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919313600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9">
            <text:p>3077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3.92">
            <text:p>766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8">
            <text:p>0,075</text:p>
          </table:table-cell>
          <table:table-cell table:style-name="ce12N2" office:value-type="float" office:value="11.12">
            <text:p>1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7.75">
            <text:p>467,75</text:p>
          </table:table-cell>
          <table:table-cell table:style-name="ce12N2" office:value-type="float" office:value="7196.17">
            <text:p>7196,17</text:p>
          </table:table-cell>
          <table:table-cell table:style-name="ce12N2" office:value-type="float" office:value="503.73">
            <text:p>50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81943773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1">
            <text:p>3077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1.39">
            <text:p>220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7">
            <text:p>0,006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34.36">
            <text:p>134,36</text:p>
          </table:table-cell>
          <table:table-cell table:style-name="ce12N2" office:value-type="float" office:value="2067.03">
            <text:p>2067,03</text:p>
          </table:table-cell>
          <table:table-cell table:style-name="ce12N2" office:value-type="float" office:value="144.69">
            <text:p>14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71361895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2">
            <text:p>3077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9.37">
            <text:p>3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4">
            <text:p>0,011</text:p>
          </table:table-cell>
          <table:table-cell table:style-name="ce12N2" office:value-type="float" office:value="4.36">
            <text:p>4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44.09">
            <text:p>244,09</text:p>
          </table:table-cell>
          <table:table-cell table:style-name="ce12N2" office:value-type="float" office:value="3755.28">
            <text:p>3755,28</text:p>
          </table:table-cell>
          <table:table-cell table:style-name="ce12N2" office:value-type="float" office:value="262.87">
            <text:p>26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61974864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3">
            <text:p>307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98.75">
            <text:p>799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8">
            <text:p>0,022</text:p>
          </table:table-cell>
          <table:table-cell table:style-name="ce12N2" office:value-type="float" office:value="8.72">
            <text:p>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9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7510.56">
            <text:p>7510,56</text:p>
          </table:table-cell>
          <table:table-cell table:style-name="ce12N2" office:value-type="float" office:value="525.74">
            <text:p>52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51379176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4">
            <text:p>307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08">
            <text:p>0,00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24">
            <text:p>452,24</text:p>
          </table:table-cell>
          <table:table-cell table:style-name="ce12N2" office:value-type="float" office:value="18.09">
            <text:p>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415792392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5">
            <text:p>3077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8">
            <text:p>0,008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0.76">
            <text:p>2720,76</text:p>
          </table:table-cell>
          <table:table-cell table:style-name="ce12N2" office:value-type="float" office:value="190.45">
            <text:p>1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31174760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6">
            <text:p>3077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8">
            <text:p>0,012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1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0.68">
            <text:p>6610,68</text:p>
          </table:table-cell>
          <table:table-cell table:style-name="ce12N2" office:value-type="float" office:value="462.75">
            <text:p>4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114947646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8">
            <text:p>3077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776">
            <text:p>0,014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0.84">
            <text:p>570,84</text:p>
          </table:table-cell>
          <table:table-cell table:style-name="ce12N2" office:value-type="float" office:value="39.96">
            <text:p>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01154769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89">
            <text:p>3077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3.12">
            <text:p>5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2">
            <text:p>0,002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8.81">
            <text:p>398,81</text:p>
          </table:table-cell>
          <table:table-cell table:style-name="ce12N2" office:value-type="float" office:value="27.92">
            <text:p>2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91883203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0">
            <text:p>3077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1.93">
            <text:p>323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336">
            <text:p>0,069</text:p>
          </table:table-cell>
          <table:table-cell table:style-name="ce12N2" office:value-type="float" office:value="7.38">
            <text:p>7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3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97.25">
            <text:p>197,25</text:p>
          </table:table-cell>
          <table:table-cell table:style-name="ce12N2" office:value-type="float" office:value="3034.68">
            <text:p>3034,68</text:p>
          </table:table-cell>
          <table:table-cell table:style-name="ce12N2" office:value-type="float" office:value="212.43">
            <text:p>2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814303930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1">
            <text:p>307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752">
            <text:p>0,028</text:p>
          </table:table-cell>
          <table:table-cell table:style-name="ce12N2" office:value-type="float" office:value="76.12">
            <text:p>76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08.4">
            <text:p>44908,40</text:p>
          </table:table-cell>
          <table:table-cell table:style-name="ce12N2" office:value-type="float" office:value="2701.06">
            <text:p>27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71619774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2">
            <text:p>307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3.85">
            <text:p>7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3.57">
            <text:p>43,57</text:p>
          </table:table-cell>
          <table:table-cell table:style-name="ce12N2" office:value-type="float" office:value="670.28">
            <text:p>670,28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161356616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4">
            <text:p>30779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91.2">
            <text:p>864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6491.2">
            <text:p>864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40792">
            <text:p>26,408</text:p>
          </table:table-cell>
          <table:table-cell table:style-name="ce12N2" office:value-type="float" office:value="2830.04">
            <text:p>283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4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491.2">
            <text:p>86491,20</text:p>
          </table:table-cell>
          <table:table-cell table:style-name="ce12N2" office:value-type="float" office:value="6054.4">
            <text:p>605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501868422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5">
            <text:p>30779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66.36">
            <text:p>2446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4466.36">
            <text:p>2446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506812">
            <text:p>23,507</text:p>
          </table:table-cell>
          <table:table-cell table:style-name="ce12N2" office:value-type="float" office:value="210.25">
            <text:p>210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6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443.32">
            <text:p>22443,32</text:p>
          </table:table-cell>
          <table:table-cell table:style-name="ce12N2" office:value-type="float" office:value="1314.58">
            <text:p>131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9159594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6">
            <text:p>30779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8533">
            <text:p>1,885</text:p>
          </table:table-cell>
          <table:table-cell table:style-name="ce12N2" office:value-type="float" office:value="171.67">
            <text:p>17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5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0.4">
            <text:p>9550,40</text:p>
          </table:table-cell>
          <table:table-cell table:style-name="ce12N2" office:value-type="float" office:value="668.54">
            <text:p>66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81969266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7">
            <text:p>3077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1778">
            <text:p>0,572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7">
            <text:p>2806,70</text:p>
          </table:table-cell>
          <table:table-cell table:style-name="ce12N2" office:value-type="float" office:value="196.47">
            <text:p>19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71136401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8">
            <text:p>30779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20.04">
            <text:p>282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820.04">
            <text:p>2820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938">
            <text:p>0,082</text:p>
          </table:table-cell>
          <table:table-cell table:style-name="ce12N2" office:value-type="float" office:value="25.64">
            <text:p>2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20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26">
            <text:p>2210,26</text:p>
          </table:table-cell>
          <table:table-cell table:style-name="ce12N2" office:value-type="float" office:value="154.72">
            <text:p>15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61559949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99">
            <text:p>30779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174">
            <text:p>0,030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">
            <text:p>543,00</text:p>
          </table:table-cell>
          <table:table-cell table:style-name="ce12N2" office:value-type="float" office:value="38.01">
            <text:p>3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51211193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0">
            <text:p>30780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0931">
            <text:p>0,291</text:p>
          </table:table-cell>
          <table:table-cell table:style-name="ce12N2" office:value-type="float" office:value="60.36">
            <text:p>60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1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1.55">
            <text:p>5571,55</text:p>
          </table:table-cell>
          <table:table-cell table:style-name="ce12N2" office:value-type="float" office:value="390">
            <text:p>3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441511184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1">
            <text:p>30780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9.2">
            <text:p>669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919.2">
            <text:p>6691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66816">
            <text:p>30,668</text:p>
          </table:table-cell>
          <table:table-cell table:style-name="ce12N2" office:value-type="float" office:value="2472">
            <text:p>2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.91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919.2">
            <text:p>66919,20</text:p>
          </table:table-cell>
          <table:table-cell table:style-name="ce12N2" office:value-type="float" office:value="4684.34">
            <text:p>46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0910186408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2">
            <text:p>30780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30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7162">
            <text:p>4,072</text:p>
          </table:table-cell>
          <table:table-cell table:style-name="ce12N2" office:value-type="float" office:value="885.51">
            <text:p>885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51.17">
            <text:p>20451,17</text:p>
          </table:table-cell>
          <table:table-cell table:style-name="ce12N2" office:value-type="float" office:value="1431.59">
            <text:p>143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30806141742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3">
            <text:p>307803</text:p>
          </table:table-cell>
          <table:table-cell table:style-name="ce0" table:number-columns-spanned="4" table:number-rows-spanned="1" office:value-type="string" calcext:value-type="string">
            <text:p>37.894 - GYPSUM MINERACAO INDUSTRIA E COMERCIO LTDA</text:p>
          </table:table-cell>
          <table:covered-table-cell table:number-columns-repeated="3"/>
          <table:table-cell table:style-name="ce0" office:value-type="string" calcext:value-type="string">
            <text:p>103.9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761.86">
            <text:p>67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272.64">
            <text:p>57272,64</text:p>
          </table:table-cell>
          <table:table-cell table:style-name="ce12N2" office:value-type="float" office:value="10489.22">
            <text:p>10489,22</text:p>
          </table:table-cell>
          <table:table-cell table:style-name="ce12N3" office:value-type="float" office:value="47.52">
            <text:p>47,520</text:p>
          </table:table-cell>
          <table:table-cell table:style-name="ce12N2" office:value-type="float" office:value="31501.44">
            <text:p>3150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761.86">
            <text:p>67761,86</text:p>
          </table:table-cell>
          <table:table-cell table:style-name="ce12N2" office:value-type="float" office:value="4743.33">
            <text:p>474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24443608001040550010001039681525728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4">
            <text:p>307804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01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68.44">
            <text:p>5656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6568.44">
            <text:p>5656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522">
            <text:p>8,752</text:p>
          </table:table-cell>
          <table:table-cell table:style-name="ce12N2" office:value-type="float" office:value="2861.82">
            <text:p>286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56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68.44">
            <text:p>56568,44</text:p>
          </table:table-cell>
          <table:table-cell table:style-name="ce12N2" office:value-type="float" office:value="3959.79">
            <text:p>39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01114248695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0">
            <text:p>307810</text:p>
          </table:table-cell>
          <table:table-cell table:style-name="ce0" table:number-columns-spanned="4" table:number-rows-spanned="1" office:value-type="string" calcext:value-type="string">
            <text:p>37.716 - ELLFAS DO BRASIL LTDA</text:p>
          </table:table-cell>
          <table:covered-table-cell table:number-columns-repeated="3"/>
          <table:table-cell table:style-name="ce0" office:value-type="string" calcext:value-type="string">
            <text:p>6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89.76">
            <text:p>1778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967">
            <text:p>1,897</text:p>
          </table:table-cell>
          <table:table-cell table:style-name="ce12N2" office:value-type="float" office:value="600">
            <text:p>6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8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.5">
            <text:p>4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085.76">
            <text:p>1085,76</text:p>
          </table:table-cell>
          <table:table-cell table:style-name="ce12N2" office:value-type="float" office:value="16704">
            <text:p>16704,00</text:p>
          </table:table-cell>
          <table:table-cell table:style-name="ce12N2" office:value-type="float" office:value="1169.28">
            <text:p>116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6212048000302550010000069471152455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4">
            <text:p>30781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9.97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37.63">
            <text:p>1801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329116">
            <text:p>18,329</text:p>
          </table:table-cell>
          <table:table-cell table:style-name="ce12N2" office:value-type="float" office:value="23989.6">
            <text:p>2398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.13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6.39">
            <text:p>26,39</text:p>
          </table:table-cell>
          <table:table-cell table:style-name="ce12N2" office:value-type="float" office:value="180111.24">
            <text:p>180111,24</text:p>
          </table:table-cell>
          <table:table-cell table:style-name="ce12N2" office:value-type="float" office:value="12607.79">
            <text:p>1260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699731566510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0">
            <text:p>30782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1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96">
            <text:p>0,073</text:p>
          </table:table-cell>
          <table:table-cell table:style-name="ce12N2" office:value-type="float" office:value="28.51">
            <text:p>2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.6">
            <text:p>657,60</text:p>
          </table:table-cell>
          <table:table-cell table:style-name="ce12N2" office:value-type="float" office:value="46.03">
            <text:p>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10811000392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1">
            <text:p>307821</text:p>
          </table:table-cell>
          <table:table-cell table:style-name="ce0" table:number-columns-spanned="4" table:number-rows-spanned="1" office:value-type="string" calcext:value-type="string">
            <text:p>37.894 - GYPSUM MINERACAO INDUSTRIA E COMERCIO LTDA</text:p>
          </table:table-cell>
          <table:covered-table-cell table:number-columns-repeated="3"/>
          <table:table-cell table:style-name="ce0" office:value-type="string" calcext:value-type="string">
            <text:p>104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06.69">
            <text:p>6370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217.49">
            <text:p>53217,49</text:p>
          </table:table-cell>
          <table:table-cell table:style-name="ce12N2" office:value-type="float" office:value="10489.2">
            <text:p>10489,20</text:p>
          </table:table-cell>
          <table:table-cell table:style-name="ce12N3" office:value-type="float" office:value="50.22">
            <text:p>50,220</text:p>
          </table:table-cell>
          <table:table-cell table:style-name="ce12N2" office:value-type="float" office:value="32944.32">
            <text:p>32944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70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06.69">
            <text:p>63706,69</text:p>
          </table:table-cell>
          <table:table-cell table:style-name="ce12N2" office:value-type="float" office:value="4459.47">
            <text:p>4459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244436080010405500100010400616192963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2">
            <text:p>307822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6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24.63">
            <text:p>368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427">
            <text:p>0,843</text:p>
          </table:table-cell>
          <table:table-cell table:style-name="ce12N2" office:value-type="float" office:value="445">
            <text:p>4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82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59.13">
            <text:p>1159,13</text:p>
          </table:table-cell>
          <table:table-cell table:style-name="ce12N2" office:value-type="float" office:value="35665.5">
            <text:p>35665,50</text:p>
          </table:table-cell>
          <table:table-cell table:style-name="ce12N2" office:value-type="float" office:value="2496.59">
            <text:p>249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6371669273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3">
            <text:p>307823</text:p>
          </table:table-cell>
          <table:table-cell table:style-name="ce0" table:number-columns-spanned="4" table:number-rows-spanned="1" office:value-type="string" calcext:value-type="string">
            <text:p>732 - METALURGICA INCA LTDA</text:p>
          </table:table-cell>
          <table:covered-table-cell table:number-columns-repeated="3"/>
          <table:table-cell table:style-name="ce0" office:value-type="string" calcext:value-type="string">
            <text:p>141.5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29.3">
            <text:p>4012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7756">
            <text:p>4,478</text:p>
          </table:table-cell>
          <table:table-cell table:style-name="ce12N2" office:value-type="float" office:value="6044.42">
            <text:p>604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2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94">
            <text:p>44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63.47">
            <text:p>163,47</text:p>
          </table:table-cell>
          <table:table-cell table:style-name="ce12N2" office:value-type="float" office:value="39965.83">
            <text:p>39965,83</text:p>
          </table:table-cell>
          <table:table-cell table:style-name="ce12N2" office:value-type="float" office:value="2797.62">
            <text:p>279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204129000106550010001415621939014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6">
            <text:p>307826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94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3.62752">
            <text:p>173,628</text:p>
          </table:table-cell>
          <table:table-cell table:style-name="ce12N2" office:value-type="float" office:value="10950.72">
            <text:p>1095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.87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">
            <text:p>1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870.88">
            <text:p>164870,88</text:p>
          </table:table-cell>
          <table:table-cell table:style-name="ce12N2" office:value-type="float" office:value="11540.96">
            <text:p>1154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037668000154550010011944741595075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9">
            <text:p>307829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865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61.21">
            <text:p>4016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61.21">
            <text:p>40161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486336">
            <text:p>9,486</text:p>
          </table:table-cell>
          <table:table-cell table:style-name="ce12N2" office:value-type="float" office:value="6986.6">
            <text:p>698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161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61.21">
            <text:p>40161,21</text:p>
          </table:table-cell>
          <table:table-cell table:style-name="ce12N2" office:value-type="float" office:value="4819.35">
            <text:p>48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8651437169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0">
            <text:p>307830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26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214.18">
            <text:p>214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91.18">
            <text:p>659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56">
            <text:p>6,34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1275.4">
            <text:p>127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2641583382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1">
            <text:p>307831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07">
            <text:p>27307,00</text:p>
          </table:table-cell>
          <table:table-cell table:style-name="ce12N2" office:value-type="float" office:value="917.18">
            <text:p>917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224.18">
            <text:p>2822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5024">
            <text:p>28,502</text:p>
          </table:table-cell>
          <table:table-cell table:style-name="ce12N2" office:value-type="float" office:value="36000">
            <text:p>3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30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07">
            <text:p>27307,00</text:p>
          </table:table-cell>
          <table:table-cell table:style-name="ce12N2" office:value-type="float" office:value="5461.4">
            <text:p>54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21875350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2">
            <text:p>307832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8">
            <text:p>1312,80</text:p>
          </table:table-cell>
          <table:table-cell table:style-name="ce12N2" office:value-type="float" office:value="44.1">
            <text:p>44,1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6.41">
            <text:p>1306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4">
            <text:p>1,564</text:p>
          </table:table-cell>
          <table:table-cell table:style-name="ce12N2" office:value-type="float" office:value="2000">
            <text:p>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2.31">
            <text:p>1262,31</text:p>
          </table:table-cell>
          <table:table-cell table:style-name="ce12N2" office:value-type="float" office:value="252.46">
            <text:p>25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14.77">
            <text:p>1514,77</text:p>
          </table:table-cell>
          <table:table-cell table:style-name="ce12N2" office:value-type="float" office:value="50.49">
            <text:p>50,4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31390752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33">
            <text:p>307833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9.446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214.18">
            <text:p>214,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91.18">
            <text:p>6591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56">
            <text:p>6,346</text:p>
          </table:table-cell>
          <table:table-cell table:style-name="ce12N2" office:value-type="float" office:value="8000">
            <text:p>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77">
            <text:p>6377,00</text:p>
          </table:table-cell>
          <table:table-cell table:style-name="ce12N2" office:value-type="float" office:value="1275.4">
            <text:p>127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9446149980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71">
            <text:p>171,00</text:p>
          </table:table-cell>
          <table:table-cell table:style-name="ce26N2" office:value-type="float" office:value="1389.64">
            <text:p>1389,64</text:p>
          </table:table-cell>
          <table:table-cell table:style-name="ce26N2" office:value-type="float" office:value="20978.42">
            <text:p>20978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4711.71">
            <text:p>54711,71</text:p>
          </table:table-cell>
          <table:table-cell table:style-name="ce26N2" office:value-type="float" office:value="4213167.59">
            <text:p>4213167,59</text:p>
          </table:table-cell>
          <table:table-cell table:style-name="ce26N2" office:value-type="float" office:value="288085.78">
            <text:p>288085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83004.78">
            <text:p>4283004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960.09">
            <text:p>1960,09</text:p>
          </table:table-cell>
          <table:table-cell table:style-name="ce26N2" office:value-type="float" office:value="131.03">
            <text:p>131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6625.753581">
            <text:p>86625,754</text:p>
          </table:table-cell>
          <table:table-cell table:style-name="ce26N2" office:value-type="float" office:value="4208573.26">
            <text:p>4208573,26</text:p>
          </table:table-cell>
          <table:table-cell table:style-name="ce26N2" office:value-type="float" office:value="4283004.78">
            <text:p>4283004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29135.73">
            <text:p>329135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29">
            <text:p>40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52" meta:object-count="0"/>
    <meta:generator>LibreOffice/4.3.0.4$Windows_x86 LibreOffice_project/62ad5818884a2fc2e5780dd45466868d41009ec0</meta:generator>
  </office:meta>
</office:document-meta>
</file>