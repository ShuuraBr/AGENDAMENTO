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6/06/2026 07:31:4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5">
            <text:p>309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4.16">
            <text:p>123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6">
            <text:p>0,338</text:p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62">
            <text:p>9750,62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6">
            <text:p>87,7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750.96">
            <text:p>750,96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808.72">
            <text:p>8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71829829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6">
            <text:p>309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952">
            <text:p>0,031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.97">
            <text:p>1580,97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131.13">
            <text:p>1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11546280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7">
            <text:p>309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3.39">
            <text:p>1058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162">
            <text:p>0,134</text:p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3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.97">
            <text:p>8386,97</text:p>
          </table:table-cell>
          <table:table-cell table:style-name="ce12N2" office:value-type="float" office:value="8.39">
            <text:p>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48">
            <text:p>75,4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645.93">
            <text:p>645,93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695.62">
            <text:p>69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31315605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9">
            <text:p>309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19.22">
            <text:p>4819,22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221.27">
            <text:p>22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01789877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0">
            <text:p>309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8">
            <text:p>0,052</text:p>
          </table:table-cell>
          <table:table-cell table:style-name="ce12N2" office:value-type="float" office:value="71.68">
            <text:p>7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65.2">
            <text:p>10965,20</text:p>
          </table:table-cell>
          <table:table-cell table:style-name="ce12N2" office:value-type="float" office:value="10.97">
            <text:p>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69">
            <text:p>98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3.22">
            <text:p>9353,22</text:p>
          </table:table-cell>
          <table:table-cell table:style-name="ce12N2" office:value-type="float" office:value="654.73">
            <text:p>65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6113121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1">
            <text:p>309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">
            <text:p>0,003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2.78">
            <text:p>1202,78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3">
            <text:p>10,8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5.96">
            <text:p>1025,9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5145287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2">
            <text:p>309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">
            <text:p>0,001</text:p>
          </table:table-cell>
          <table:table-cell table:style-name="ce12N2" office:value-type="float" office:value="27.45">
            <text:p>27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6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0.81">
            <text:p>12430,81</text:p>
          </table:table-cell>
          <table:table-cell table:style-name="ce12N2" office:value-type="float" office:value="12.43">
            <text:p>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8">
            <text:p>111,8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570.74">
            <text:p>5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21203983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3">
            <text:p>3094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.68">
            <text:p>51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268">
            <text:p>0,065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.15">
            <text:p>4080,15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2">
            <text:p>36,7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314.24">
            <text:p>314,24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338.41">
            <text:p>3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4156704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4">
            <text:p>309494</text:p>
          </table:table-cell>
          <table:table-cell table:style-name="ce0" table:number-columns-spanned="4" table:number-rows-spanned="1" office:value-type="string" calcext:value-type="string">
            <text:p>34.313 - LYNUS INDUSTRIA, COMERCIO, IMPORTACAO E EXPORTACAO LTDA</text:p>
          </table:table-cell>
          <table:covered-table-cell table:number-columns-repeated="3"/>
          <table:table-cell table:style-name="ce0" office:value-type="string" calcext:value-type="string">
            <text:p>238.1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60.54">
            <text:p>12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958">
            <text:p>1,170</text:p>
          </table:table-cell>
          <table:table-cell table:style-name="ce12N2" office:value-type="float" office:value="135.3">
            <text:p>13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5.72">
            <text:p>10835,7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2">
            <text:p>97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2.84">
            <text:p>22,84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497.52">
            <text:p>49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162964000185550020002381371466246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3">
            <text:p>30953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.81">
            <text:p>204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487">
            <text:p>0,345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6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">
            <text:p>1702,0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2">
            <text:p>15,3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.88">
            <text:p>59,88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111.45">
            <text:p>11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571157222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46">
            <text:p>309546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6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46">
            <text:p>20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5.64">
            <text:p>1685,64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30.78">
            <text:p>30,78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120.75">
            <text:p>1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650413311183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2">
            <text:p>3095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9.37">
            <text:p>4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8">
            <text:p>0,006</text:p>
          </table:table-cell>
          <table:table-cell table:style-name="ce12N2" office:value-type="float" office:value="29.52">
            <text:p>2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6.53">
            <text:p>4086,53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8">
            <text:p>36,7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7.37">
            <text:p>157,37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338.94">
            <text:p>33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1142355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5">
            <text:p>3095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.92">
            <text:p>713,9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59.21">
            <text:p>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516129107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2">
            <text:p>309622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53405">
            <text:p>57,534</text:p>
          </table:table-cell>
          <table:table-cell table:style-name="ce12N2" office:value-type="float" office:value="1858">
            <text:p>185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6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965.19">
            <text:p>96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1116667845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3">
            <text:p>309623</text:p>
          </table:table-cell>
          <table:table-cell table:style-name="ce0" table:number-columns-spanned="4" table:number-rows-spanned="1" office:value-type="string" calcext:value-type="string">
            <text:p>7.484 - AFORT INDUSTRIA DE PLASTICOS LTDA-ME</text:p>
          </table:table-cell>
          <table:covered-table-cell table:number-columns-repeated="3"/>
          <table:table-cell table:style-name="ce0" office:value-type="string" calcext:value-type="string">
            <text:p>278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87.05">
            <text:p>214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10.7">
            <text:p>2081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798">
            <text:p>17,780</text:p>
          </table:table-cell>
          <table:table-cell table:style-name="ce12N2" office:value-type="float" office:value="635.45">
            <text:p>63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19.43">
            <text:p>16619,43</text:p>
          </table:table-cell>
          <table:table-cell table:style-name="ce12N2" office:value-type="float" office:value="16.62">
            <text:p>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57">
            <text:p>149,5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76.35">
            <text:p>676,35</text:p>
          </table:table-cell>
          <table:table-cell table:style-name="ce12N2" office:value-type="float" office:value="20810.7">
            <text:p>20810,70</text:p>
          </table:table-cell>
          <table:table-cell table:style-name="ce12N2" office:value-type="float" office:value="2497.28">
            <text:p>24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617289826000115550010002789631567035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5">
            <text:p>30962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3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1.64">
            <text:p>1561,64</text:p>
          </table:table-cell>
          <table:table-cell table:style-name="ce12N2" office:value-type="float" office:value="74.89">
            <text:p>74,8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7.8">
            <text:p>14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9.63">
            <text:p>1239,63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8.73">
            <text:p>138,73</text:p>
          </table:table-cell>
          <table:table-cell table:style-name="ce12N2" office:value-type="float" office:value="1422.91">
            <text:p>1422,9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31417831852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3">
            <text:p>309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51194191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5">
            <text:p>30963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6.4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6">
            <text:p>1,296</text:p>
          </table:table-cell>
          <table:table-cell table:style-name="ce12N2" office:value-type="float" office:value="473.8">
            <text:p>4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42.1">
            <text:p>7542,10</text:p>
          </table:table-cell>
          <table:table-cell table:style-name="ce12N2" office:value-type="float" office:value="7.55">
            <text:p>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88">
            <text:p>67,8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625.55">
            <text:p>62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64451850239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7">
            <text:p>309637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1862">
            <text:p>1,482</text:p>
          </table:table-cell>
          <table:table-cell table:style-name="ce12N2" office:value-type="float" office:value="387.37">
            <text:p>38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8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1.34">
            <text:p>12221,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99">
            <text:p>109,9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1013.65">
            <text:p>101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396135191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0">
            <text:p>309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6.3">
            <text:p>27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3">
            <text:p>0,006</text:p>
          </table:table-cell>
          <table:table-cell table:style-name="ce12N2" office:value-type="float" office:value="12.91">
            <text:p>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8.03">
            <text:p>2208,0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87">
            <text:p>19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70.06">
            <text:p>170,06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183.14">
            <text:p>18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7179834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1">
            <text:p>3096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2.43">
            <text:p>17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.05">
            <text:p>1357,05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1">
            <text:p>12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4.51">
            <text:p>104,51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112.55">
            <text:p>11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81637324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2">
            <text:p>3096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9.46">
            <text:p>206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5413">
            <text:p>0,565</text:p>
          </table:table-cell>
          <table:table-cell table:style-name="ce12N2" office:value-type="float" office:value="55.34">
            <text:p>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32.28">
            <text:p>16332,28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9">
            <text:p>146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257.85">
            <text:p>1257,85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1354.61">
            <text:p>135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71392529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3">
            <text:p>309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2.59">
            <text:p>55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6">
            <text:p>0,013</text:p>
          </table:table-cell>
          <table:table-cell table:style-name="ce12N2" office:value-type="float" office:value="25.82">
            <text:p>2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16.09">
            <text:p>4416,09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4">
            <text:p>39,7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40.11">
            <text:p>340,11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366.27">
            <text:p>36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11262576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4">
            <text:p>3096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61306152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6">
            <text:p>3096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56.24">
            <text:p>184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34">
            <text:p>0,506</text:p>
          </table:table-cell>
          <table:table-cell table:style-name="ce12N2" office:value-type="float" office:value="49.56">
            <text:p>4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91">
            <text:p>14625,91</text:p>
          </table:table-cell>
          <table:table-cell table:style-name="ce12N2" office:value-type="float" office:value="14.63">
            <text:p>1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3">
            <text:p>131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26.44">
            <text:p>1126,44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1213.09">
            <text:p>12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91570710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7">
            <text:p>3096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.01">
            <text:p>736,01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0172739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8">
            <text:p>3096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8.99">
            <text:p>1688,99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.7">
            <text:p>1440,70</text:p>
          </table:table-cell>
          <table:table-cell table:style-name="ce12N2" office:value-type="float" office:value="100.85">
            <text:p>1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9160833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9">
            <text:p>3096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8.85">
            <text:p>399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07">
            <text:p>0,110</text:p>
          </table:table-cell>
          <table:table-cell table:style-name="ce12N2" office:value-type="float" office:value="10.74">
            <text:p>1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8.94">
            <text:p>3168,9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2">
            <text:p>28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44.06">
            <text:p>244,06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262.84">
            <text:p>2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81399452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1">
            <text:p>3096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8872">
            <text:p>0,979</text:p>
          </table:table-cell>
          <table:table-cell table:style-name="ce12N2" office:value-type="float" office:value="324.04">
            <text:p>32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48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3.48">
            <text:p>94933,48</text:p>
          </table:table-cell>
          <table:table-cell table:style-name="ce12N2" office:value-type="float" office:value="94.93">
            <text:p>9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4.4">
            <text:p>85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7873.94">
            <text:p>78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361235109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3">
            <text:p>3096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979.98">
            <text:p>18197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9901">
            <text:p>1,060</text:p>
          </table:table-cell>
          <table:table-cell table:style-name="ce12N2" office:value-type="float" office:value="250.33">
            <text:p>25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97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423.22">
            <text:p>153423,22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0.81">
            <text:p>138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94.68">
            <text:p>194,68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12724.97">
            <text:p>1272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821816538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0">
            <text:p>309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47.27">
            <text:p>7534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5828">
            <text:p>0,336</text:p>
          </table:table-cell>
          <table:table-cell table:style-name="ce12N2" office:value-type="float" office:value="136.56">
            <text:p>136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34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72.48">
            <text:p>61372,48</text:p>
          </table:table-cell>
          <table:table-cell table:style-name="ce12N2" office:value-type="float" office:value="61.38">
            <text:p>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687.08">
            <text:p>2687,08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5031.18">
            <text:p>50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315519558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2">
            <text:p>309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869.85">
            <text:p>217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40671">
            <text:p>4,441</text:p>
          </table:table-cell>
          <table:table-cell table:style-name="ce12N2" office:value-type="float" office:value="518.91">
            <text:p>518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7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899.43">
            <text:p>178899,43</text:p>
          </table:table-cell>
          <table:table-cell table:style-name="ce12N2" office:value-type="float" office:value="178.88">
            <text:p>17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0.1">
            <text:p>1610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131.13">
            <text:p>6131,13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14606.92">
            <text:p>1460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5461417438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5">
            <text:p>309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2.62">
            <text:p>912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75.69">
            <text:p>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101952739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6">
            <text:p>30968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.92">
            <text:p>158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6.35">
            <text:p>1296,35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7">
            <text:p>11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9.92">
            <text:p>49,92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107.52">
            <text:p>10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51462314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8">
            <text:p>30968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3.56">
            <text:p>470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3">
            <text:p>0,003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4.73">
            <text:p>3844,73</text:p>
          </table:table-cell>
          <table:table-cell table:style-name="ce12N2" office:value-type="float" office:value="3.85">
            <text:p>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61">
            <text:p>34,6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48.06">
            <text:p>148,06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318.89">
            <text:p>31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81109093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1">
            <text:p>3096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.95">
            <text:p>327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8.6">
            <text:p>2678,60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11">
            <text:p>24,1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3.15">
            <text:p>103,15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222.17">
            <text:p>22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816394499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2">
            <text:p>309692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2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7.27">
            <text:p>52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7.43">
            <text:p>5237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36">
            <text:p>0,011</text:p>
          </table:table-cell>
          <table:table-cell table:style-name="ce12N2" office:value-type="float" office:value="100.76">
            <text:p>10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6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6.02">
            <text:p>4546,02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2">
            <text:p>40,92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3257.78">
            <text:p>3257,78</text:p>
          </table:table-cell>
          <table:table-cell table:style-name="ce12N2" office:value-type="float" office:value="228.05">
            <text:p>2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2020221425431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8">
            <text:p>3096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.74">
            <text:p>107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6.04">
            <text:p>876,04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88">
            <text:p>7,8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72.66">
            <text:p>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010800228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0">
            <text:p>30970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5.81">
            <text:p>22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3.91">
            <text:p>1843,9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1.01">
            <text:p>71,01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152.94">
            <text:p>1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11917369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2">
            <text:p>30970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9.00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9.64">
            <text:p>15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3.1">
            <text:p>2863,1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237.47">
            <text:p>2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9003122621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4">
            <text:p>30970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4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61">
            <text:p>4,761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3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90.51">
            <text:p>2390,51</text:p>
          </table:table-cell>
          <table:table-cell table:style-name="ce12N2" office:value-type="float" office:value="2.39">
            <text:p>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198.27">
            <text:p>19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48011895254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5">
            <text:p>3097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8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53.54">
            <text:p>393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436211">
            <text:p>25,436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3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383.18">
            <text:p>31383,18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.45">
            <text:p>282,45</text:p>
          </table:table-cell>
          <table:table-cell table:style-name="ce12N2" office:value-type="float" office:value="54.86">
            <text:p>54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220.14">
            <text:p>3220,14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1551.37">
            <text:p>1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8211719229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6">
            <text:p>30972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9.9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8.63">
            <text:p>383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60786">
            <text:p>0,76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1.53">
            <text:p>3331,53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8">
            <text:p>29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152.97">
            <text:p>15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99561100008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8">
            <text:p>30972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7.87">
            <text:p>541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03">
            <text:p>0,020</text:p>
          </table:table-cell>
          <table:table-cell table:style-name="ce12N2" office:value-type="float" office:value="9.29">
            <text:p>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4.05">
            <text:p>4394,05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6">
            <text:p>39,5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11.52">
            <text:p>211,52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364.44">
            <text:p>36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91584523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6">
            <text:p>309736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40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1832">
            <text:p>0,822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67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3.57">
            <text:p>9613,57</text:p>
          </table:table-cell>
          <table:table-cell table:style-name="ce12N2" office:value-type="float" office:value="9.62">
            <text:p>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3">
            <text:p>86,5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00.28">
            <text:p>8200,28</text:p>
          </table:table-cell>
          <table:table-cell table:style-name="ce12N2" office:value-type="float" office:value="574.02">
            <text:p>57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3635798000143550010006406521569467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7">
            <text:p>3097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8368">
            <text:p>0,168</text:p>
          </table:table-cell>
          <table:table-cell table:style-name="ce12N2" office:value-type="float" office:value="43.66">
            <text:p>4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7.53">
            <text:p>1657,53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2">
            <text:p>1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137.48">
            <text:p>13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11571727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8">
            <text:p>3097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99">
            <text:p>0,262</text:p>
          </table:table-cell>
          <table:table-cell table:style-name="ce12N2" office:value-type="float" office:value="113.13">
            <text:p>11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9.45">
            <text:p>4719,45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8">
            <text:p>42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391.44">
            <text:p>3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21861940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9">
            <text:p>30973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41657">
            <text:p>0,542</text:p>
          </table:table-cell>
          <table:table-cell table:style-name="ce12N2" office:value-type="float" office:value="134.79">
            <text:p>13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9.77">
            <text:p>4369,77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33">
            <text:p>39,3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362.43">
            <text:p>36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31486507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0">
            <text:p>3097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785">
            <text:p>0,138</text:p>
          </table:table-cell>
          <table:table-cell table:style-name="ce12N2" office:value-type="float" office:value="89.66">
            <text:p>89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1.96">
            <text:p>2161,96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6">
            <text:p>19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179.31">
            <text:p>17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41438738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1">
            <text:p>3097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45">
            <text:p>15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.94">
            <text:p>1242,94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95.73">
            <text:p>95,73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103.09">
            <text:p>10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81529925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2">
            <text:p>3097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70.3">
            <text:p>113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18">
            <text:p>0,602</text:p>
          </table:table-cell>
          <table:table-cell table:style-name="ce12N2" office:value-type="float" office:value="27.34">
            <text:p>2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7.43">
            <text:p>9807,43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26">
            <text:p>8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450.29">
            <text:p>45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91518820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3">
            <text:p>3097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6.92">
            <text:p>181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062.21">
            <text:p>18062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7">
            <text:p>0,500</text:p>
          </table:table-cell>
          <table:table-cell table:style-name="ce12N2" office:value-type="float" office:value="75.06">
            <text:p>7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46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2.36">
            <text:p>15692,36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24">
            <text:p>141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4.71">
            <text:p>84,71</text:p>
          </table:table-cell>
          <table:table-cell table:style-name="ce12N2" office:value-type="float" office:value="17367.14">
            <text:p>17367,14</text:p>
          </table:table-cell>
          <table:table-cell table:style-name="ce12N2" office:value-type="float" office:value="770.35">
            <text:p>77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01143860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4">
            <text:p>3097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75">
            <text:p>0,038</text:p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47.76">
            <text:p>5847,7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63">
            <text:p>52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485.01">
            <text:p>48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31558810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5">
            <text:p>3097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0.25">
            <text:p>20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3.06">
            <text:p>1593,06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34">
            <text:p>14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2.69">
            <text:p>122,69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132.13">
            <text:p>13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1198763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6">
            <text:p>3097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6">
            <text:p>0,00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9.89">
            <text:p>709,89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5.53">
            <text:p>605,53</text:p>
          </table:table-cell>
          <table:table-cell table:style-name="ce12N2" office:value-type="float" office:value="42.39">
            <text:p>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21050230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7">
            <text:p>3097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">
            <text:p>0,002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.78">
            <text:p>669,78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55.55">
            <text:p>5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6178698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9">
            <text:p>3097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262">
            <text:p>0,047</text:p>
          </table:table-cell>
          <table:table-cell table:style-name="ce12N2" office:value-type="float" office:value="20.93">
            <text:p>2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00.76">
            <text:p>5300,76</text:p>
          </table:table-cell>
          <table:table-cell table:style-name="ce12N2" office:value-type="float" office:value="5.3">
            <text:p>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71">
            <text:p>47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15">
            <text:p>5758,15</text:p>
          </table:table-cell>
          <table:table-cell table:style-name="ce12N2" office:value-type="float" office:value="403.07">
            <text:p>40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5169833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0">
            <text:p>3097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6.1">
            <text:p>57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64">
            <text:p>0,052</text:p>
          </table:table-cell>
          <table:table-cell table:style-name="ce12N2" office:value-type="float" office:value="7.48">
            <text:p>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65.15">
            <text:p>4765,15</text:p>
          </table:table-cell>
          <table:table-cell table:style-name="ce12N2" office:value-type="float" office:value="4.77">
            <text:p>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9">
            <text:p>42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395.22">
            <text:p>39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41478725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1">
            <text:p>3097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1">
            <text:p>0,047</text:p>
          </table:table-cell>
          <table:table-cell table:style-name="ce12N2" office:value-type="float" office:value="237.71">
            <text:p>2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08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84.43">
            <text:p>65384,43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46">
            <text:p>588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3039.24">
            <text:p>303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71775280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8">
            <text:p>3097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49.03">
            <text:p>1504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49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45.98">
            <text:p>11945,98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51">
            <text:p>107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336.93">
            <text:p>1336,93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548.48">
            <text:p>5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51498916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9">
            <text:p>3097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.6">
            <text:p>17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3">
            <text:p>0,023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49">
            <text:p>12,4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6.2">
            <text:p>116,2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0130643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0">
            <text:p>3097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19.61">
            <text:p>60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6">
            <text:p>0,00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1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8.4">
            <text:p>4778,40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01">
            <text:p>43,0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34.77">
            <text:p>534,77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81507392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1">
            <text:p>30976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2.02">
            <text:p>996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98">
            <text:p>0,005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05.73">
            <text:p>8405,73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65">
            <text:p>75,6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13.57">
            <text:p>313,57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385.94">
            <text:p>38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9144147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6">
            <text:p>309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575">
            <text:p>0,062</text:p>
          </table:table-cell>
          <table:table-cell table:style-name="ce12N2" office:value-type="float" office:value="28.45">
            <text:p>2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97.15">
            <text:p>4597,15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37">
            <text:p>4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381.29">
            <text:p>38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41701124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8">
            <text:p>309768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0.510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696">
            <text:p>0,130</text:p>
          </table:table-cell>
          <table:table-cell table:style-name="ce12N2" office:value-type="float" office:value="268.8">
            <text:p>2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43.14">
            <text:p>8243,14</text:p>
          </table:table-cell>
          <table:table-cell table:style-name="ce12N2" office:value-type="float" office:value="8.24">
            <text:p>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19">
            <text:p>74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683.69">
            <text:p>68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90051019137096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9">
            <text:p>309769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23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5.02">
            <text:p>89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">
            <text:p>0,004</text:p>
          </table:table-cell>
          <table:table-cell table:style-name="ce12N2" office:value-type="float" office:value="4.53">
            <text:p>4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1.19">
            <text:p>741,19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7">
            <text:p>6,6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4.24">
            <text:p>44,24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34.03">
            <text:p>3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2391316675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82">
            <text:p>30978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0.2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48">
            <text:p>150,480</text:p>
          </table:table-cell>
          <table:table-cell table:style-name="ce12N2" office:value-type="float" office:value="8316">
            <text:p>83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31.52">
            <text:p>40431,52</text:p>
          </table:table-cell>
          <table:table-cell table:style-name="ce12N2" office:value-type="float" office:value="40.44">
            <text:p>4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88">
            <text:p>363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6075.36">
            <text:p>60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70233199241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1">
            <text:p>3097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0.81">
            <text:p>190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91">
            <text:p>0,027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2.46">
            <text:p>1502,46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2">
            <text:p>13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.61">
            <text:p>120,61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124.61">
            <text:p>1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91572976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3">
            <text:p>309793</text:p>
          </table:table-cell>
          <table:table-cell table:style-name="ce0" table:number-columns-spanned="4" table:number-rows-spanned="1" office:value-type="string" calcext:value-type="string">
            <text:p>5.133 - CIA IND H CARLOS SCHNEIDER</text:p>
          </table:table-cell>
          <table:covered-table-cell table:number-columns-repeated="3"/>
          <table:table-cell table:style-name="ce0" office:value-type="string" calcext:value-type="string">
            <text:p>2.284.0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34.68">
            <text:p>198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7646.86">
            <text:p>17646,86</text:p>
          </table:table-cell>
          <table:table-cell table:style-name="ce12N2" office:value-type="float" office:value="979.4">
            <text:p>979,40</text:p>
          </table:table-cell>
          <table:table-cell table:style-name="ce12N3" office:value-type="float" office:value="0.007303">
            <text:p>0,007</text:p>
          </table:table-cell>
          <table:table-cell table:style-name="ce12N2" office:value-type="float" office:value="445.54">
            <text:p>44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3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20.1">
            <text:p>15720,10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46">
            <text:p>141,46</text:p>
          </table:table-cell>
          <table:table-cell table:style-name="ce12N2" office:value-type="float" office:value="43.35">
            <text:p>4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8.42">
            <text:p>1208,42</text:p>
          </table:table-cell>
          <table:table-cell table:style-name="ce12N2" office:value-type="float" office:value="18626.26">
            <text:p>18626,26</text:p>
          </table:table-cell>
          <table:table-cell table:style-name="ce12N2" office:value-type="float" office:value="1303.82">
            <text:p>130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70995500126555001002284012102086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4">
            <text:p>3097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3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3.24">
            <text:p>593,24</text:p>
          </table:table-cell>
          <table:table-cell table:style-name="ce12N2" office:value-type="float" office:value="0.59">
            <text:p>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49.2">
            <text:p>4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3361826717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4">
            <text:p>309804</text:p>
          </table:table-cell>
          <table:table-cell table:style-name="ce0" table:number-columns-spanned="4" table:number-rows-spanned="1" office:value-type="string" calcext:value-type="string">
            <text:p>9.277 - ALUMASA IND. DE PLASTICO E ALUMINIO LTDA</text:p>
          </table:table-cell>
          <table:covered-table-cell table:number-columns-repeated="3"/>
          <table:table-cell table:style-name="ce0" office:value-type="string" calcext:value-type="string">
            <text:p>396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58.34">
            <text:p>2785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15275">
            <text:p>14,153</text:p>
          </table:table-cell>
          <table:table-cell table:style-name="ce12N2" office:value-type="float" office:value="703.5">
            <text:p>70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85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71.66">
            <text:p>22771,66</text:p>
          </table:table-cell>
          <table:table-cell table:style-name="ce12N2" office:value-type="float" office:value="22.77">
            <text:p>2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.95">
            <text:p>204,9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876.9">
            <text:p>876,9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1888.7">
            <text:p>18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0718984000180550010003961911064893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6">
            <text:p>309806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2.6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8015">
            <text:p>0,558</text:p>
          </table:table-cell>
          <table:table-cell table:style-name="ce12N2" office:value-type="float" office:value="441.99">
            <text:p>441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8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317.32">
            <text:p>35317,32</text:p>
          </table:table-cell>
          <table:table-cell table:style-name="ce12N2" office:value-type="float" office:value="35.33">
            <text:p>3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.85">
            <text:p>317,85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2902.32">
            <text:p>29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26671743995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7">
            <text:p>309807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97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9.09">
            <text:p>28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92">
            <text:p>0,217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6">
            <text:p>2376,00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1.82">
            <text:p>141,82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109.09">
            <text:p>10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9791077672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8">
            <text:p>309808</text:p>
          </table:table-cell>
          <table:table-cell table:style-name="ce0" table:number-columns-spanned="4" table:number-rows-spanned="1" office:value-type="string" calcext:value-type="string">
            <text:p>13.604 - FISCHER BRASIL INDUSTRIA E COMERCIO LTDA</text:p>
          </table:table-cell>
          <table:covered-table-cell table:number-columns-repeated="3"/>
          <table:table-cell table:style-name="ce0" office:value-type="string" calcext:value-type="string">
            <text:p>119.62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2.58">
            <text:p>2753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126">
            <text:p>0,681</text:p>
          </table:table-cell>
          <table:table-cell table:style-name="ce12N2" office:value-type="float" office:value="302.12">
            <text:p>302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3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61.42">
            <text:p>22061,42</text:p>
          </table:table-cell>
          <table:table-cell table:style-name="ce12N2" office:value-type="float" office:value="22.06">
            <text:p>2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8.57">
            <text:p>198,57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43.3">
            <text:p>1443,3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1779.2">
            <text:p>177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3347196000578550050001196281238862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0">
            <text:p>3098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6.480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3.54">
            <text:p>123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27">
            <text:p>0,001</text:p>
          </table:table-cell>
          <table:table-cell table:style-name="ce12N2" office:value-type="float" office:value="751">
            <text:p>7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5.72">
            <text:p>955,72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9">
            <text:p>8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01.15">
            <text:p>101,15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79.27">
            <text:p>7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622055014000976480100212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1">
            <text:p>309811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2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3.22">
            <text:p>5148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7.91766">
            <text:p>577,918</text:p>
          </table:table-cell>
          <table:table-cell table:style-name="ce12N2" office:value-type="float" office:value="2525.65">
            <text:p>252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8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87.6">
            <text:p>43687,60</text:p>
          </table:table-cell>
          <table:table-cell table:style-name="ce12N2" office:value-type="float" office:value="43.68">
            <text:p>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.17">
            <text:p>393,1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905.32">
            <text:p>905,32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2437.31">
            <text:p>24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2400161808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99">
            <text:p>99,00</text:p>
          </table:table-cell>
          <table:table-cell table:style-name="ce26N2" office:value-type="float" office:value="348.85">
            <text:p>348,85</text:p>
          </table:table-cell>
          <table:table-cell table:style-name="ce26N2" office:value-type="float" office:value="979.4">
            <text:p>979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765.19">
            <text:p>32765,19</text:p>
          </table:table-cell>
          <table:table-cell table:style-name="ce26N2" office:value-type="float" office:value="1990635.69">
            <text:p>1990635,69</text:p>
          </table:table-cell>
          <table:table-cell table:style-name="ce26N2" office:value-type="float" office:value="130804.62">
            <text:p>130804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92840.82">
            <text:p>2092840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8.51">
            <text:p>348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402.557806">
            <text:p>1402,558</text:p>
          </table:table-cell>
          <table:table-cell table:style-name="ce26N2" office:value-type="float" office:value="2059445.08">
            <text:p>2059445,08</text:p>
          </table:table-cell>
          <table:table-cell table:style-name="ce26N2" office:value-type="float" office:value="2092840.82">
            <text:p>2092840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79115.9">
            <text:p>1679115,90</text:p>
          </table:table-cell>
          <table:table-cell table:style-name="ce26N2" office:value-type="float" office:value="1679.15">
            <text:p>1679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112.03">
            <text:p>15112,0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4211.43">
            <text:p>44211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89">
            <text:p>40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96" meta:object-count="0"/>
    <meta:generator>LibreOffice/4.3.0.4$Windows_x86 LibreOffice_project/62ad5818884a2fc2e5780dd45466868d41009ec0</meta:generator>
  </office:meta>
</office:document-meta>
</file>