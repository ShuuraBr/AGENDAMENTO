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6/2026 07:40:3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3">
            <text:p>30953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.81">
            <text:p>204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7">
            <text:p>0,345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6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">
            <text:p>1702,0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2">
            <text:p>15,3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.88">
            <text:p>59,88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111.45">
            <text:p>11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571157222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2">
            <text:p>309622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53405">
            <text:p>57,534</text:p>
          </table:table-cell>
          <table:table-cell table:style-name="ce12N2" office:value-type="float" office:value="1858">
            <text:p>185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6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965.19">
            <text:p>9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1116667845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5">
            <text:p>30962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1.64">
            <text:p>1561,64</text:p>
          </table:table-cell>
          <table:table-cell table:style-name="ce12N2" office:value-type="float" office:value="74.89">
            <text:p>74,8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7.8">
            <text:p>14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9.63">
            <text:p>1239,63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8.73">
            <text:p>138,73</text:p>
          </table:table-cell>
          <table:table-cell table:style-name="ce12N2" office:value-type="float" office:value="1422.91">
            <text:p>1422,9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31417831852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5">
            <text:p>30963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6.4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6">
            <text:p>1,296</text:p>
          </table:table-cell>
          <table:table-cell table:style-name="ce12N2" office:value-type="float" office:value="473.8">
            <text:p>4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42.1">
            <text:p>7542,10</text:p>
          </table:table-cell>
          <table:table-cell table:style-name="ce12N2" office:value-type="float" office:value="7.55">
            <text:p>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88">
            <text:p>67,8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625.55">
            <text:p>62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64451850239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7">
            <text:p>309637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1862">
            <text:p>1,482</text:p>
          </table:table-cell>
          <table:table-cell table:style-name="ce12N2" office:value-type="float" office:value="387.37">
            <text:p>38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8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1.34">
            <text:p>12221,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99">
            <text:p>109,9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1013.65">
            <text:p>101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396135191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1">
            <text:p>3096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8872">
            <text:p>0,979</text:p>
          </table:table-cell>
          <table:table-cell table:style-name="ce12N2" office:value-type="float" office:value="324.04">
            <text:p>32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48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3.48">
            <text:p>94933,48</text:p>
          </table:table-cell>
          <table:table-cell table:style-name="ce12N2" office:value-type="float" office:value="94.93">
            <text:p>9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4.4">
            <text:p>85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7873.94">
            <text:p>78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361235109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3">
            <text:p>3096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979.98">
            <text:p>18197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9901">
            <text:p>1,060</text:p>
          </table:table-cell>
          <table:table-cell table:style-name="ce12N2" office:value-type="float" office:value="250.33">
            <text:p>25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97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423.22">
            <text:p>153423,22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0.81">
            <text:p>138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4.68">
            <text:p>194,68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12724.97">
            <text:p>1272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821816538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0">
            <text:p>309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47.27">
            <text:p>7534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5828">
            <text:p>0,336</text:p>
          </table:table-cell>
          <table:table-cell table:style-name="ce12N2" office:value-type="float" office:value="136.56">
            <text:p>136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34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72.48">
            <text:p>61372,48</text:p>
          </table:table-cell>
          <table:table-cell table:style-name="ce12N2" office:value-type="float" office:value="61.38">
            <text:p>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687.08">
            <text:p>2687,08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5031.18">
            <text:p>50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315519558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2">
            <text:p>309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869.85">
            <text:p>217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40671">
            <text:p>4,441</text:p>
          </table:table-cell>
          <table:table-cell table:style-name="ce12N2" office:value-type="float" office:value="518.91">
            <text:p>518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7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899.43">
            <text:p>178899,43</text:p>
          </table:table-cell>
          <table:table-cell table:style-name="ce12N2" office:value-type="float" office:value="178.88">
            <text:p>17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0.1">
            <text:p>1610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131.13">
            <text:p>6131,13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14606.92">
            <text:p>1460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5461417438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5">
            <text:p>309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2.62">
            <text:p>912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75.69">
            <text:p>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101952739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6">
            <text:p>30968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.92">
            <text:p>158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6.35">
            <text:p>1296,35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7">
            <text:p>11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9.92">
            <text:p>49,92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107.52">
            <text:p>10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51462314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8">
            <text:p>30968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3.56">
            <text:p>470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3">
            <text:p>0,003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4.73">
            <text:p>3844,73</text:p>
          </table:table-cell>
          <table:table-cell table:style-name="ce12N2" office:value-type="float" office:value="3.85">
            <text:p>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48.06">
            <text:p>148,06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318.89">
            <text:p>31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81109093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1">
            <text:p>3096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.95">
            <text:p>327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8.6">
            <text:p>2678,60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11">
            <text:p>24,1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222.17">
            <text:p>22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816394499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2">
            <text:p>30969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2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7.27">
            <text:p>52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7.43">
            <text:p>5237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36">
            <text:p>0,011</text:p>
          </table:table-cell>
          <table:table-cell table:style-name="ce12N2" office:value-type="float" office:value="100.76">
            <text:p>10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6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6.02">
            <text:p>4546,02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2">
            <text:p>40,92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3257.78">
            <text:p>3257,78</text:p>
          </table:table-cell>
          <table:table-cell table:style-name="ce12N2" office:value-type="float" office:value="228.05">
            <text:p>2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2020221425431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8">
            <text:p>3096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.74">
            <text:p>107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6.04">
            <text:p>876,04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88">
            <text:p>7,8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72.66">
            <text:p>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010800228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0">
            <text:p>30970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5.81">
            <text:p>22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3.91">
            <text:p>1843,9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1.01">
            <text:p>71,01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152.94">
            <text:p>1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11917369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2">
            <text:p>30970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9.00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9.64">
            <text:p>15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3.1">
            <text:p>2863,1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237.47">
            <text:p>2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9003122621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4">
            <text:p>30970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4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1">
            <text:p>4,761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3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90.51">
            <text:p>2390,51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198.27">
            <text:p>19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48011895254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5">
            <text:p>3097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8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53.54">
            <text:p>393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436211">
            <text:p>25,436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3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83.18">
            <text:p>31383,18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.45">
            <text:p>282,45</text:p>
          </table:table-cell>
          <table:table-cell table:style-name="ce12N2" office:value-type="float" office:value="54.86">
            <text:p>54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220.14">
            <text:p>3220,14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1551.37">
            <text:p>1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8211719229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6">
            <text:p>30972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9.9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8.63">
            <text:p>383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60786">
            <text:p>0,76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1.53">
            <text:p>3331,53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8">
            <text:p>29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152.97">
            <text:p>15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99561100008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8">
            <text:p>30972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7.87">
            <text:p>541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03">
            <text:p>0,020</text:p>
          </table:table-cell>
          <table:table-cell table:style-name="ce12N2" office:value-type="float" office:value="9.29">
            <text:p>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4.05">
            <text:p>4394,05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6">
            <text:p>39,5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11.52">
            <text:p>211,52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364.44">
            <text:p>36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91584523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6">
            <text:p>309736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40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1832">
            <text:p>0,822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3.57">
            <text:p>9613,57</text:p>
          </table:table-cell>
          <table:table-cell table:style-name="ce12N2" office:value-type="float" office:value="9.62">
            <text:p>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3">
            <text:p>86,5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00.28">
            <text:p>8200,28</text:p>
          </table:table-cell>
          <table:table-cell table:style-name="ce12N2" office:value-type="float" office:value="574.02">
            <text:p>57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3635798000143550010006406521569467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7">
            <text:p>3097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8368">
            <text:p>0,168</text:p>
          </table:table-cell>
          <table:table-cell table:style-name="ce12N2" office:value-type="float" office:value="43.66">
            <text:p>4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.53">
            <text:p>1657,53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2">
            <text:p>1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11571727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8">
            <text:p>3097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99">
            <text:p>0,262</text:p>
          </table:table-cell>
          <table:table-cell table:style-name="ce12N2" office:value-type="float" office:value="113.13">
            <text:p>11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9.45">
            <text:p>4719,45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8">
            <text:p>42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391.44">
            <text:p>3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21861940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9">
            <text:p>30973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41657">
            <text:p>0,542</text:p>
          </table:table-cell>
          <table:table-cell table:style-name="ce12N2" office:value-type="float" office:value="134.79">
            <text:p>13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9.77">
            <text:p>4369,77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33">
            <text:p>39,3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362.43">
            <text:p>36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31486507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0">
            <text:p>3097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785">
            <text:p>0,138</text:p>
          </table:table-cell>
          <table:table-cell table:style-name="ce12N2" office:value-type="float" office:value="89.66">
            <text:p>89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1.96">
            <text:p>2161,96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6">
            <text:p>19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179.31">
            <text:p>17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41438738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1">
            <text:p>3097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45">
            <text:p>15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.94">
            <text:p>1242,94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95.73">
            <text:p>95,73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103.09">
            <text:p>10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81529925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2">
            <text:p>3097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0.3">
            <text:p>113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18">
            <text:p>0,602</text:p>
          </table:table-cell>
          <table:table-cell table:style-name="ce12N2" office:value-type="float" office:value="27.34">
            <text:p>2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7.43">
            <text:p>9807,43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26">
            <text:p>8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450.29">
            <text:p>45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91518820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3">
            <text:p>3097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6.92">
            <text:p>18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062.21">
            <text:p>1806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7">
            <text:p>0,500</text:p>
          </table:table-cell>
          <table:table-cell table:style-name="ce12N2" office:value-type="float" office:value="75.06">
            <text:p>7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46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2.36">
            <text:p>15692,36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24">
            <text:p>141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4.71">
            <text:p>84,71</text:p>
          </table:table-cell>
          <table:table-cell table:style-name="ce12N2" office:value-type="float" office:value="17367.14">
            <text:p>17367,14</text:p>
          </table:table-cell>
          <table:table-cell table:style-name="ce12N2" office:value-type="float" office:value="770.35">
            <text:p>77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01143860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4">
            <text:p>3097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75">
            <text:p>0,038</text:p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47.76">
            <text:p>5847,7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63">
            <text:p>52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485.01">
            <text:p>48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31558810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5">
            <text:p>3097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0.25">
            <text:p>20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3.06">
            <text:p>1593,06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34">
            <text:p>14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132.13">
            <text:p>13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1198763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6">
            <text:p>3097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6">
            <text:p>0,00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9.89">
            <text:p>709,89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53">
            <text:p>605,53</text:p>
          </table:table-cell>
          <table:table-cell table:style-name="ce12N2" office:value-type="float" office:value="42.39">
            <text:p>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2105023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7">
            <text:p>3097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">
            <text:p>0,00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.78">
            <text:p>669,78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55.55">
            <text:p>5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6178698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9">
            <text:p>3097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262">
            <text:p>0,047</text:p>
          </table:table-cell>
          <table:table-cell table:style-name="ce12N2" office:value-type="float" office:value="20.93">
            <text:p>2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00.76">
            <text:p>5300,7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71">
            <text:p>47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15">
            <text:p>5758,15</text:p>
          </table:table-cell>
          <table:table-cell table:style-name="ce12N2" office:value-type="float" office:value="403.07">
            <text:p>4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5169833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0">
            <text:p>3097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6.1">
            <text:p>57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64">
            <text:p>0,052</text:p>
          </table:table-cell>
          <table:table-cell table:style-name="ce12N2" office:value-type="float" office:value="7.48">
            <text:p>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65.15">
            <text:p>4765,15</text:p>
          </table:table-cell>
          <table:table-cell table:style-name="ce12N2" office:value-type="float" office:value="4.77">
            <text:p>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9">
            <text:p>42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395.22">
            <text:p>39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41478725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1">
            <text:p>3097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1">
            <text:p>0,047</text:p>
          </table:table-cell>
          <table:table-cell table:style-name="ce12N2" office:value-type="float" office:value="237.71">
            <text:p>2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08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84.43">
            <text:p>65384,43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46">
            <text:p>588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3039.24">
            <text:p>303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71775280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8">
            <text:p>3097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9.03">
            <text:p>1504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49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45.98">
            <text:p>11945,98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51">
            <text:p>107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336.93">
            <text:p>1336,93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548.48">
            <text:p>5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51498916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9">
            <text:p>3097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.6">
            <text:p>17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3">
            <text:p>0,023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49">
            <text:p>12,4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6.2">
            <text:p>116,2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0130643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0">
            <text:p>3097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19.61">
            <text:p>60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6">
            <text:p>0,00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1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8.4">
            <text:p>4778,40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01">
            <text:p>43,0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34.77">
            <text:p>534,77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81507392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1">
            <text:p>30976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2.02">
            <text:p>996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98">
            <text:p>0,005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05.73">
            <text:p>8405,73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65">
            <text:p>75,6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13.57">
            <text:p>313,57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385.94">
            <text:p>38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9144147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6">
            <text:p>309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575">
            <text:p>0,062</text:p>
          </table:table-cell>
          <table:table-cell table:style-name="ce12N2" office:value-type="float" office:value="28.45">
            <text:p>2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97.15">
            <text:p>4597,15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37">
            <text:p>4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381.29">
            <text:p>38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41701124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8">
            <text:p>30976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0.5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696">
            <text:p>0,13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43.14">
            <text:p>8243,14</text:p>
          </table:table-cell>
          <table:table-cell table:style-name="ce12N2" office:value-type="float" office:value="8.24">
            <text:p>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19">
            <text:p>74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683.69">
            <text:p>68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90051019137096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9">
            <text:p>309769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23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5.02">
            <text:p>89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">
            <text:p>0,004</text:p>
          </table:table-cell>
          <table:table-cell table:style-name="ce12N2" office:value-type="float" office:value="4.53">
            <text:p>4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1.19">
            <text:p>741,19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7">
            <text:p>6,6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4.24">
            <text:p>44,24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34.03">
            <text:p>3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2391316675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82">
            <text:p>30978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0.2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48">
            <text:p>150,480</text:p>
          </table:table-cell>
          <table:table-cell table:style-name="ce12N2" office:value-type="float" office:value="8316">
            <text:p>83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31.52">
            <text:p>40431,52</text:p>
          </table:table-cell>
          <table:table-cell table:style-name="ce12N2" office:value-type="float" office:value="40.44">
            <text:p>4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88">
            <text:p>363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28">
            <text:p>50628,00</text:p>
          </table:table-cell>
          <table:table-cell table:style-name="ce12N2" office:value-type="float" office:value="6075.36">
            <text:p>60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70233199241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1">
            <text:p>3097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0.81">
            <text:p>190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91">
            <text:p>0,027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2.46">
            <text:p>1502,46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2">
            <text:p>13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.61">
            <text:p>120,61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124.61">
            <text:p>1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91572976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3">
            <text:p>309793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84.0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34.68">
            <text:p>198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7646.86">
            <text:p>17646,86</text:p>
          </table:table-cell>
          <table:table-cell table:style-name="ce12N2" office:value-type="float" office:value="979.4">
            <text:p>979,40</text:p>
          </table:table-cell>
          <table:table-cell table:style-name="ce12N3" office:value-type="float" office:value="0.007303">
            <text:p>0,007</text:p>
          </table:table-cell>
          <table:table-cell table:style-name="ce12N2" office:value-type="float" office:value="445.54">
            <text:p>44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3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20.1">
            <text:p>15720,10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46">
            <text:p>141,46</text:p>
          </table:table-cell>
          <table:table-cell table:style-name="ce12N2" office:value-type="float" office:value="43.35">
            <text:p>4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8.42">
            <text:p>1208,42</text:p>
          </table:table-cell>
          <table:table-cell table:style-name="ce12N2" office:value-type="float" office:value="18626.26">
            <text:p>18626,26</text:p>
          </table:table-cell>
          <table:table-cell table:style-name="ce12N2" office:value-type="float" office:value="1303.82">
            <text:p>130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70995500126555001002284012102086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4">
            <text:p>3097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3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3.24">
            <text:p>593,24</text:p>
          </table:table-cell>
          <table:table-cell table:style-name="ce12N2" office:value-type="float" office:value="0.59">
            <text:p>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49.2">
            <text:p>4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3361826717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4">
            <text:p>309804</text:p>
          </table:table-cell>
          <table:table-cell table:style-name="ce0" table:number-columns-spanned="4" table:number-rows-spanned="1" office:value-type="string" calcext:value-type="string">
            <text:p>9.277 - ALUMASA IND. DE PLASTICO E ALUMINIO LTDA</text:p>
          </table:table-cell>
          <table:covered-table-cell table:number-columns-repeated="3"/>
          <table:table-cell table:style-name="ce0" office:value-type="string" calcext:value-type="string">
            <text:p>396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58.34">
            <text:p>2785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15275">
            <text:p>14,153</text:p>
          </table:table-cell>
          <table:table-cell table:style-name="ce12N2" office:value-type="float" office:value="703.5">
            <text:p>70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85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71.66">
            <text:p>22771,66</text:p>
          </table:table-cell>
          <table:table-cell table:style-name="ce12N2" office:value-type="float" office:value="22.77">
            <text:p>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95">
            <text:p>204,9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876.9">
            <text:p>876,9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1888.7">
            <text:p>18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0718984000180550010003961911064893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6">
            <text:p>309806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2.6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8015">
            <text:p>0,558</text:p>
          </table:table-cell>
          <table:table-cell table:style-name="ce12N2" office:value-type="float" office:value="441.99">
            <text:p>441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317.32">
            <text:p>35317,32</text:p>
          </table:table-cell>
          <table:table-cell table:style-name="ce12N2" office:value-type="float" office:value="35.33">
            <text:p>3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.85">
            <text:p>317,85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2902.32">
            <text:p>29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26671743995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7">
            <text:p>309807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97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9.09">
            <text:p>28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92">
            <text:p>0,217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6">
            <text:p>2376,00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1.82">
            <text:p>141,82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109.09">
            <text:p>10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9791077672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8">
            <text:p>309808</text:p>
          </table:table-cell>
          <table:table-cell table:style-name="ce0" table:number-columns-spanned="4" table:number-rows-spanned="1" office:value-type="string" calcext:value-type="string">
            <text:p>13.604 - FISCHER BRASIL INDUSTRIA E COMERCIO LTDA</text:p>
          </table:table-cell>
          <table:covered-table-cell table:number-columns-repeated="3"/>
          <table:table-cell table:style-name="ce0" office:value-type="string" calcext:value-type="string">
            <text:p>119.62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2.58">
            <text:p>2753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126">
            <text:p>0,681</text:p>
          </table:table-cell>
          <table:table-cell table:style-name="ce12N2" office:value-type="float" office:value="302.12">
            <text:p>302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3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61.42">
            <text:p>22061,42</text:p>
          </table:table-cell>
          <table:table-cell table:style-name="ce12N2" office:value-type="float" office:value="22.06">
            <text:p>2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8.57">
            <text:p>198,57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43.3">
            <text:p>1443,3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1779.2">
            <text:p>177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3347196000578550050001196281238862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0">
            <text:p>3098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6.480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3.54">
            <text:p>123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27">
            <text:p>0,001</text:p>
          </table:table-cell>
          <table:table-cell table:style-name="ce12N2" office:value-type="float" office:value="751">
            <text:p>7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5.72">
            <text:p>955,7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9">
            <text:p>8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01.15">
            <text:p>101,15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79.27">
            <text:p>7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622055014000976480100212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1">
            <text:p>309811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2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3.22">
            <text:p>5148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7.91766">
            <text:p>577,918</text:p>
          </table:table-cell>
          <table:table-cell table:style-name="ce12N2" office:value-type="float" office:value="2525.65">
            <text:p>252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8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87.6">
            <text:p>43687,60</text:p>
          </table:table-cell>
          <table:table-cell table:style-name="ce12N2" office:value-type="float" office:value="43.68">
            <text:p>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.17">
            <text:p>393,1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905.32">
            <text:p>905,32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2437.31">
            <text:p>24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2400161808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0">
            <text:p>309850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1.257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35.12">
            <text:p>4183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67.22">
            <text:p>3976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">
            <text:p>0,630</text:p>
          </table:table-cell>
          <table:table-cell table:style-name="ce12N2" office:value-type="float" office:value="227.4">
            <text:p>2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3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45.2">
            <text:p>34645,20</text:p>
          </table:table-cell>
          <table:table-cell table:style-name="ce12N2" office:value-type="float" office:value="34.65">
            <text:p>3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81">
            <text:p>311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067.9">
            <text:p>2067,90</text:p>
          </table:table-cell>
          <table:table-cell table:style-name="ce12N2" office:value-type="float" office:value="39767.22">
            <text:p>39767,22</text:p>
          </table:table-cell>
          <table:table-cell table:style-name="ce12N2" office:value-type="float" office:value="1590.69">
            <text:p>159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125717725828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2">
            <text:p>30985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531.46">
            <text:p>15453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4431.5">
            <text:p>15443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20226">
            <text:p>4,820</text:p>
          </table:table-cell>
          <table:table-cell table:style-name="ce12N2" office:value-type="float" office:value="3026.03">
            <text:p>3026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.53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906.9">
            <text:p>132906,90</text:p>
          </table:table-cell>
          <table:table-cell table:style-name="ce12N2" office:value-type="float" office:value="132.92">
            <text:p>13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15">
            <text:p>1196,1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99.96">
            <text:p>99,96</text:p>
          </table:table-cell>
          <table:table-cell table:style-name="ce12N2" office:value-type="float" office:value="154431.5">
            <text:p>154431,50</text:p>
          </table:table-cell>
          <table:table-cell table:style-name="ce12N2" office:value-type="float" office:value="7977.63">
            <text:p>79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51292190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0">
            <text:p>309860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8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11.4">
            <text:p>1431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11.4">
            <text:p>143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92556">
            <text:p>27,926</text:p>
          </table:table-cell>
          <table:table-cell table:style-name="ce12N2" office:value-type="float" office:value="485.98">
            <text:p>48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31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78.46">
            <text:p>12078,46</text:p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1">
            <text:p>108,7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311.4">
            <text:p>14311,40</text:p>
          </table:table-cell>
          <table:table-cell table:style-name="ce12N2" office:value-type="float" office:value="1001.8">
            <text:p>100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7008145000149550010001080581918880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2">
            <text:p>30986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8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9.59">
            <text:p>600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76.89">
            <text:p>487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031208">
            <text:p>13,031</text:p>
          </table:table-cell>
          <table:table-cell table:style-name="ce12N2" office:value-type="float" office:value="147.1">
            <text:p>14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9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98">
            <text:p>4115,98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76.89">
            <text:p>4876,89</text:p>
          </table:table-cell>
          <table:table-cell table:style-name="ce12N2" office:value-type="float" office:value="341.38">
            <text:p>34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70.45">
            <text:p>7370,45</text:p>
          </table:table-cell>
          <table:table-cell table:style-name="ce12N2" office:value-type="float" office:value="1132.7">
            <text:p>1132,7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7008145000149550010001080591694722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5">
            <text:p>309865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128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594.3">
            <text:p>13459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132420.67">
            <text:p>132420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6.137965">
            <text:p>206,138</text:p>
          </table:table-cell>
          <table:table-cell table:style-name="ce12N2" office:value-type="float" office:value="1911.94">
            <text:p>191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4.59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57.97">
            <text:p>115357,97</text:p>
          </table:table-cell>
          <table:table-cell table:style-name="ce12N2" office:value-type="float" office:value="115.36">
            <text:p>11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8.22">
            <text:p>1038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173.63">
            <text:p>2173,63</text:p>
          </table:table-cell>
          <table:table-cell table:style-name="ce12N2" office:value-type="float" office:value="132420.67">
            <text:p>132420,67</text:p>
          </table:table-cell>
          <table:table-cell table:style-name="ce12N2" office:value-type="float" office:value="5304.45">
            <text:p>530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7128120333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2">
            <text:p>309882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42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6.98">
            <text:p>1116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0788.94">
            <text:p>1078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1166">
            <text:p>0,181</text:p>
          </table:table-cell>
          <table:table-cell table:style-name="ce12N2" office:value-type="float" office:value="516.41">
            <text:p>516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6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05.59">
            <text:p>9105,59</text:p>
          </table:table-cell>
          <table:table-cell table:style-name="ce12N2" office:value-type="float" office:value="9.1">
            <text:p>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95">
            <text:p>81,95</text:p>
          </table:table-cell>
          <table:table-cell table:style-name="ce12N2" office:value-type="float" office:value="48.17">
            <text:p>48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78.04">
            <text:p>378,04</text:p>
          </table:table-cell>
          <table:table-cell table:style-name="ce12N2" office:value-type="float" office:value="10788.94">
            <text:p>10788,94</text:p>
          </table:table-cell>
          <table:table-cell table:style-name="ce12N2" office:value-type="float" office:value="755.23">
            <text:p>75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40487720001085500400000942014981462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3">
            <text:p>309883</text:p>
          </table:table-cell>
          <table:table-cell table:style-name="ce0" table:number-columns-spanned="4" table:number-rows-spanned="1" office:value-type="string" calcext:value-type="string">
            <text:p>1.201 - INDUSTRIA DE MOTORES ANAUGER S/A</text:p>
          </table:table-cell>
          <table:covered-table-cell table:number-columns-repeated="3"/>
          <table:table-cell table:style-name="ce0" office:value-type="string" calcext:value-type="string">
            <text:p>304.4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46">
            <text:p>283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346">
            <text:p>283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867">
            <text:p>0,909</text:p>
          </table:table-cell>
          <table:table-cell table:style-name="ce12N2" office:value-type="float" office:value="294.61">
            <text:p>294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3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27.07">
            <text:p>24427,07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84">
            <text:p>219,8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15.74">
            <text:p>20415,74</text:p>
          </table:table-cell>
          <table:table-cell table:style-name="ce12N2" office:value-type="float" office:value="1429.1">
            <text:p>142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346350001245500400030442419502906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4">
            <text:p>309884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36">
            <text:p>0,039</text:p>
          </table:table-cell>
          <table:table-cell table:style-name="ce12N2" office:value-type="float" office:value="7.67">
            <text:p>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44">
            <text:p>1027,44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5">
            <text:p>9,2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79361073482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1">
            <text:p>3098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7">
            <text:p>39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7">
            <text:p>39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4">
            <text:p>0,152</text:p>
          </table:table-cell>
          <table:table-cell table:style-name="ce12N2" office:value-type="float" office:value="58.2">
            <text:p>5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9">
            <text:p>3339,0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05">
            <text:p>30,0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7">
            <text:p>3957,00</text:p>
          </table:table-cell>
          <table:table-cell table:style-name="ce12N2" office:value-type="float" office:value="276.99">
            <text:p>27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691573965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2">
            <text:p>3098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9610038380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5">
            <text:p>3098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7.7">
            <text:p>3094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0947.7">
            <text:p>3094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1926">
            <text:p>6,119</text:p>
          </table:table-cell>
          <table:table-cell table:style-name="ce12N2" office:value-type="float" office:value="818.95">
            <text:p>8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4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68.9">
            <text:p>26168,90</text:p>
          </table:table-cell>
          <table:table-cell table:style-name="ce12N2" office:value-type="float" office:value="26.17">
            <text:p>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5.51">
            <text:p>235,5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7.7">
            <text:p>30947,70</text:p>
          </table:table-cell>
          <table:table-cell table:style-name="ce12N2" office:value-type="float" office:value="2166.34">
            <text:p>21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92101176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6">
            <text:p>3098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2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179.24">
            <text:p>5517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55179.24">
            <text:p>55179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8.562848">
            <text:p>128,563</text:p>
          </table:table-cell>
          <table:table-cell table:style-name="ce12N2" office:value-type="float" office:value="863.66">
            <text:p>86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17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74.9">
            <text:p>46574,90</text:p>
          </table:table-cell>
          <table:table-cell table:style-name="ce12N2" office:value-type="float" office:value="46.6">
            <text:p>4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.16">
            <text:p>419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179.24">
            <text:p>55179,24</text:p>
          </table:table-cell>
          <table:table-cell table:style-name="ce12N2" office:value-type="float" office:value="3862.56">
            <text:p>386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2931948367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2">
            <text:p>30992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84">
            <text:p>0,043</text:p>
          </table:table-cell>
          <table:table-cell table:style-name="ce12N2" office:value-type="float" office:value="24.5">
            <text:p>2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1.22">
            <text:p>6531,22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541.7">
            <text:p>54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71800828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5">
            <text:p>309925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9.3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09.56">
            <text:p>138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901.12">
            <text:p>1290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0016">
            <text:p>6,500</text:p>
          </table:table-cell>
          <table:table-cell table:style-name="ce12N2" office:value-type="float" office:value="476.35">
            <text:p>47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53.18">
            <text:p>10953,18</text:p>
          </table:table-cell>
          <table:table-cell table:style-name="ce12N2" office:value-type="float" office:value="10.95">
            <text:p>1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58">
            <text:p>98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908.44">
            <text:p>908,44</text:p>
          </table:table-cell>
          <table:table-cell table:style-name="ce12N2" office:value-type="float" office:value="12901.12">
            <text:p>12901,12</text:p>
          </table:table-cell>
          <table:table-cell table:style-name="ce12N2" office:value-type="float" office:value="831.51">
            <text:p>83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60620300001235500200069937016778314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7">
            <text:p>30992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230.13">
            <text:p>6623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6230.13">
            <text:p>66230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7115">
            <text:p>36,977</text:p>
          </table:table-cell>
          <table:table-cell table:style-name="ce12N2" office:value-type="float" office:value="3908.27">
            <text:p>3908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230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09.41">
            <text:p>55909,41</text:p>
          </table:table-cell>
          <table:table-cell table:style-name="ce12N2" office:value-type="float" office:value="55.9">
            <text:p>5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.19">
            <text:p>503,1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30.13">
            <text:p>66230,13</text:p>
          </table:table-cell>
          <table:table-cell table:style-name="ce12N2" office:value-type="float" office:value="4636.11">
            <text:p>46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4691690939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8">
            <text:p>3099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2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35.6">
            <text:p>5993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935.6">
            <text:p>59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129696">
            <text:p>36,130</text:p>
          </table:table-cell>
          <table:table-cell table:style-name="ce12N2" office:value-type="float" office:value="3787.08">
            <text:p>378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93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575.4">
            <text:p>50575,40</text:p>
          </table:table-cell>
          <table:table-cell table:style-name="ce12N2" office:value-type="float" office:value="50.57">
            <text:p>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5.18">
            <text:p>455,1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935.6">
            <text:p>59935,60</text:p>
          </table:table-cell>
          <table:table-cell table:style-name="ce12N2" office:value-type="float" office:value="4195.49">
            <text:p>419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24681657688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9">
            <text:p>30992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6173540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25">
            <text:p>125,00</text:p>
          </table:table-cell>
          <table:table-cell table:style-name="ce26N2" office:value-type="float" office:value="348.85">
            <text:p>348,85</text:p>
          </table:table-cell>
          <table:table-cell table:style-name="ce26N2" office:value-type="float" office:value="979.4">
            <text:p>979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6070.87">
            <text:p>46070,87</text:p>
          </table:table-cell>
          <table:table-cell table:style-name="ce26N2" office:value-type="float" office:value="3274950.96">
            <text:p>3274950,96</text:p>
          </table:table-cell>
          <table:table-cell table:style-name="ce26N2" office:value-type="float" office:value="203902.34">
            <text:p>203902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12372.54">
            <text:p>3412372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370.45">
            <text:p>7370,45</text:p>
          </table:table-cell>
          <table:table-cell table:style-name="ce26N2" office:value-type="float" office:value="1132.7">
            <text:p>1132,70</text:p>
          </table:table-cell>
          <table:table-cell table:style-name="ce26N2" office:value-type="float" office:value="348.51">
            <text:p>3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869.01444">
            <text:p>1869,014</text:p>
          </table:table-cell>
          <table:table-cell table:style-name="ce26N2" office:value-type="float" office:value="3364538.42">
            <text:p>3364538,42</text:p>
          </table:table-cell>
          <table:table-cell table:style-name="ce26N2" office:value-type="float" office:value="3412372.54">
            <text:p>3412372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97211.11">
            <text:p>2797211,11</text:p>
          </table:table-cell>
          <table:table-cell table:style-name="ce26N2" office:value-type="float" office:value="2797.24">
            <text:p>2797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5174.9">
            <text:p>25174,9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3814.65">
            <text:p>83814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77">
            <text:p>50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12" meta:object-count="0"/>
    <meta:generator>LibreOffice/4.3.0.4$Windows_x86 LibreOffice_project/62ad5818884a2fc2e5780dd45466868d41009ec0</meta:generator>
  </office:meta>
</office:document-meta>
</file>