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4/07/2026 04:30:32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8">
            <text:p>309198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1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85.19">
            <text:p>9818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665668">
            <text:p>49,666</text:p>
          </table:table-cell>
          <table:table-cell table:style-name="ce12N2" office:value-type="float" office:value="5370">
            <text:p>53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18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719.97">
            <text:p>82719,97</text:p>
          </table:table-cell>
          <table:table-cell table:style-name="ce12N2" office:value-type="float" office:value="82.72">
            <text:p>8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48">
            <text:p>744,4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16.29">
            <text:p>416,29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6843.83">
            <text:p>684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212211275673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8">
            <text:p>309248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17.81">
            <text:p>827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1.06342">
            <text:p>151,063</text:p>
          </table:table-cell>
          <table:table-cell table:style-name="ce12N2" office:value-type="float" office:value="6308.05">
            <text:p>630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1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514.9">
            <text:p>69514,90</text:p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5.62">
            <text:p>625,6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51.76">
            <text:p>351,76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5765.62">
            <text:p>576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21260419000152550010001468611255383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0">
            <text:p>30949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8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84571119030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5">
            <text:p>30984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6.6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624.15">
            <text:p>20462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85523">
            <text:p>13,855</text:p>
          </table:table-cell>
          <table:table-cell table:style-name="ce12N2" office:value-type="float" office:value="22000">
            <text:p>2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4.624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7261.68">
            <text:p>167261,68</text:p>
          </table:table-cell>
          <table:table-cell table:style-name="ce12N2" office:value-type="float" office:value="167.26">
            <text:p>167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5.36">
            <text:p>1505,36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6440.95">
            <text:p>6440,95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13872.82">
            <text:p>1387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6674070001305500000001669410164520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0">
            <text:p>3099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74">
            <text:p>0,041</text:p>
          </table:table-cell>
          <table:table-cell table:style-name="ce12N2" office:value-type="float" office:value="155.34">
            <text:p>15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29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45.87">
            <text:p>15745,87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71">
            <text:p>141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31.08">
            <text:p>13431,08</text:p>
          </table:table-cell>
          <table:table-cell table:style-name="ce12N2" office:value-type="float" office:value="940.18">
            <text:p>94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81254471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1">
            <text:p>30990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635">
            <text:p>0,140</text:p>
          </table:table-cell>
          <table:table-cell table:style-name="ce12N2" office:value-type="float" office:value="23.95">
            <text:p>2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8.11">
            <text:p>4718,11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6">
            <text:p>42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391.32">
            <text:p>39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014344613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2">
            <text:p>30990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116852652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3">
            <text:p>3099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89">
            <text:p>0,029</text:p>
          </table:table-cell>
          <table:table-cell table:style-name="ce12N2" office:value-type="float" office:value="4.96">
            <text:p>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5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6.16">
            <text:p>976,1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79">
            <text:p>8,7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80.96">
            <text:p>8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21037109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4">
            <text:p>3099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96">
            <text:p>0,144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1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20.61">
            <text:p>12420,61</text:p>
          </table:table-cell>
          <table:table-cell table:style-name="ce12N2" office:value-type="float" office:value="12.42">
            <text:p>1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79">
            <text:p>111,7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1030.18">
            <text:p>103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31535591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5">
            <text:p>3099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8.09">
            <text:p>978,09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41847623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6">
            <text:p>309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1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08">
            <text:p>0,001</text:p>
          </table:table-cell>
          <table:table-cell table:style-name="ce12N2" office:value-type="float" office:value="13.61">
            <text:p>1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68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12.86">
            <text:p>8412,86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72">
            <text:p>75,7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697.77">
            <text:p>69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197138933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7">
            <text:p>30991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45948">
            <text:p>0,946</text:p>
          </table:table-cell>
          <table:table-cell table:style-name="ce12N2" office:value-type="float" office:value="145.73">
            <text:p>145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01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290.64">
            <text:p>25290,64</text:p>
          </table:table-cell>
          <table:table-cell table:style-name="ce12N2" office:value-type="float" office:value="25.29">
            <text:p>2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.61">
            <text:p>227,6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1233.11">
            <text:p>123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81856220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8">
            <text:p>30991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202.5">
            <text:p>3802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378235.77">
            <text:p>37823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60591">
            <text:p>1,561</text:p>
          </table:table-cell>
          <table:table-cell table:style-name="ce12N2" office:value-type="float" office:value="1037.64">
            <text:p>1037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0.20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5020.25">
            <text:p>325020,25</text:p>
          </table:table-cell>
          <table:table-cell table:style-name="ce12N2" office:value-type="float" office:value="324.99">
            <text:p>32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5.21">
            <text:p>2925,2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966.73">
            <text:p>1966,73</text:p>
          </table:table-cell>
          <table:table-cell table:style-name="ce12N2" office:value-type="float" office:value="372611.39">
            <text:p>372611,39</text:p>
          </table:table-cell>
          <table:table-cell table:style-name="ce12N2" office:value-type="float" office:value="20086.7">
            <text:p>2008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914868813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9">
            <text:p>3099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52">
            <text:p>0,068</text:p>
          </table:table-cell>
          <table:table-cell table:style-name="ce12N2" office:value-type="float" office:value="180.26">
            <text:p>18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958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554.57">
            <text:p>36554,57</text:p>
          </table:table-cell>
          <table:table-cell table:style-name="ce12N2" office:value-type="float" office:value="36.56">
            <text:p>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99">
            <text:p>328,9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1678.35">
            <text:p>167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11600070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0">
            <text:p>3099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54">
            <text:p>0,047</text:p>
          </table:table-cell>
          <table:table-cell table:style-name="ce12N2" office:value-type="float" office:value="6.99">
            <text:p>6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9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7.66">
            <text:p>7657,66</text:p>
          </table:table-cell>
          <table:table-cell table:style-name="ce12N2" office:value-type="float" office:value="7.66">
            <text:p>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92">
            <text:p>68,9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31.91">
            <text:p>6531,91</text:p>
          </table:table-cell>
          <table:table-cell table:style-name="ce12N2" office:value-type="float" office:value="457.23">
            <text:p>45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21373947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8">
            <text:p>30995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53.38">
            <text:p>1245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837278">
            <text:p>3,837</text:p>
          </table:table-cell>
          <table:table-cell table:style-name="ce12N2" office:value-type="float" office:value="11760">
            <text:p>117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5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42.47">
            <text:p>10442,47</text:p>
          </table:table-cell>
          <table:table-cell table:style-name="ce12N2" office:value-type="float" office:value="10.44">
            <text:p>1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98">
            <text:p>93,98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80.42">
            <text:p>80,42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866.11">
            <text:p>86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61703715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1">
            <text:p>3099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72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4.38">
            <text:p>1664,38</text:p>
          </table:table-cell>
          <table:table-cell table:style-name="ce12N2" office:value-type="float" office:value="1.66">
            <text:p>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98">
            <text:p>14,9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138.05">
            <text:p>13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11118983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2">
            <text:p>3099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2">
            <text:p>0,033</text:p>
          </table:table-cell>
          <table:table-cell table:style-name="ce12N2" office:value-type="float" office:value="18.15">
            <text:p>18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1.03">
            <text:p>6691,03</text:p>
          </table:table-cell>
          <table:table-cell table:style-name="ce12N2" office:value-type="float" office:value="6.69">
            <text:p>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22">
            <text:p>60,2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554.96">
            <text:p>55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3991705019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3">
            <text:p>3099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">
            <text:p>0,008</text:p>
          </table:table-cell>
          <table:table-cell table:style-name="ce12N2" office:value-type="float" office:value="160">
            <text:p>1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0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937.33">
            <text:p>20937,33</text:p>
          </table:table-cell>
          <table:table-cell table:style-name="ce12N2" office:value-type="float" office:value="20.94">
            <text:p>2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.44">
            <text:p>188,4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1736.56">
            <text:p>17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41835592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4">
            <text:p>3099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7464">
            <text:p>0,107</text:p>
          </table:table-cell>
          <table:table-cell table:style-name="ce12N2" office:value-type="float" office:value="32.36">
            <text:p>32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7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02.72">
            <text:p>8602,72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43">
            <text:p>77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394.98">
            <text:p>39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310335929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5">
            <text:p>3099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0048">
            <text:p>0,150</text:p>
          </table:table-cell>
          <table:table-cell table:style-name="ce12N2" office:value-type="float" office:value="122.31">
            <text:p>122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72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07.25">
            <text:p>38807,25</text:p>
          </table:table-cell>
          <table:table-cell table:style-name="ce12N2" office:value-type="float" office:value="38.81">
            <text:p>3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.27">
            <text:p>349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1959.79">
            <text:p>195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213808436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6">
            <text:p>3099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712">
            <text:p>0,021</text:p>
          </table:table-cell>
          <table:table-cell table:style-name="ce12N2" office:value-type="float" office:value="25.16">
            <text:p>25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40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916.72">
            <text:p>11916,72</text:p>
          </table:table-cell>
          <table:table-cell table:style-name="ce12N2" office:value-type="float" office:value="11.9">
            <text:p>1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.26">
            <text:p>107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608.76">
            <text:p>60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01789689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7">
            <text:p>3099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432">
            <text:p>0,144</text:p>
          </table:table-cell>
          <table:table-cell table:style-name="ce12N2" office:value-type="float" office:value="45.26">
            <text:p>4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72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89.46">
            <text:p>14089,46</text:p>
          </table:table-cell>
          <table:table-cell table:style-name="ce12N2" office:value-type="float" office:value="14.09">
            <text:p>1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.81">
            <text:p>126,8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646.9">
            <text:p>64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11898328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8">
            <text:p>3099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95.6">
            <text:p>219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1.6">
            <text:p>20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2">
            <text:p>0,004</text:p>
          </table:table-cell>
          <table:table-cell table:style-name="ce12N2" office:value-type="float" office:value="8.61">
            <text:p>8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9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39.94">
            <text:p>1739,94</text:p>
          </table:table-cell>
          <table:table-cell table:style-name="ce12N2" office:value-type="float" office:value="1.74">
            <text:p>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66">
            <text:p>15,6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34">
            <text:p>134,00</text:p>
          </table:table-cell>
          <table:table-cell table:style-name="ce12N2" office:value-type="float" office:value="2061.6">
            <text:p>2061,60</text:p>
          </table:table-cell>
          <table:table-cell table:style-name="ce12N2" office:value-type="float" office:value="144.31">
            <text:p>14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01493307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9">
            <text:p>3099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28">
            <text:p>0,008</text:p>
          </table:table-cell>
          <table:table-cell table:style-name="ce12N2" office:value-type="float" office:value="15.82">
            <text:p>1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7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27.13">
            <text:p>8727,13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.55">
            <text:p>78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400.68">
            <text:p>40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21724402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3">
            <text:p>3100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1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76">
            <text:p>0,015</text:p>
          </table:table-cell>
          <table:table-cell table:style-name="ce12N2" office:value-type="float" office:value="0.25">
            <text:p>0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3.23">
            <text:p>863,23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77">
            <text:p>7,7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1961355438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7">
            <text:p>31006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2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495.32">
            <text:p>194495,32</text:p>
          </table:table-cell>
          <table:table-cell table:style-name="ce12N2" office:value-type="float" office:value="11142.22">
            <text:p>11142,22</text:p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183913.02">
            <text:p>183913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778354">
            <text:p>15,778</text:p>
          </table:table-cell>
          <table:table-cell table:style-name="ce12N2" office:value-type="float" office:value="10538.26">
            <text:p>10538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4.495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517.9">
            <text:p>150517,90</text:p>
          </table:table-cell>
          <table:table-cell table:style-name="ce12N2" office:value-type="float" office:value="150.54">
            <text:p>15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4.63">
            <text:p>1354,63</text:p>
          </table:table-cell>
          <table:table-cell table:style-name="ce12N2" office:value-type="float" office:value="81.51">
            <text:p>81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7526.22">
            <text:p>17526,22</text:p>
          </table:table-cell>
          <table:table-cell table:style-name="ce12N2" office:value-type="float" office:value="172770.8">
            <text:p>172770,80</text:p>
          </table:table-cell>
          <table:table-cell table:style-name="ce12N2" office:value-type="float" office:value="6910.83">
            <text:p>691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3210.94">
            <text:p>23210,94</text:p>
          </table:table-cell>
          <table:table-cell table:style-name="ce12N2" office:value-type="float" office:value="4198.3">
            <text:p>4198,3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2791774130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3">
            <text:p>310103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34.0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94.16">
            <text:p>529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94.16">
            <text:p>5294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1">
            <text:p>0,171</text:p>
          </table:table-cell>
          <table:table-cell table:style-name="ce12N2" office:value-type="float" office:value="314.64">
            <text:p>314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9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12.27">
            <text:p>4612,27</text:p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51">
            <text:p>41,5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94.16">
            <text:p>5294,16</text:p>
          </table:table-cell>
          <table:table-cell table:style-name="ce12N2" office:value-type="float" office:value="211.77">
            <text:p>21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064838016560550010005340961175157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1">
            <text:p>31011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9.84">
            <text:p>403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6.6">
            <text:p>6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39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4.35">
            <text:p>3474,35</text:p>
          </table:table-cell>
          <table:table-cell table:style-name="ce12N2" office:value-type="float" office:value="3.47">
            <text:p>3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27">
            <text:p>31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1.84">
            <text:p>51,84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159.52">
            <text:p>15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21711473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2">
            <text:p>31011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97">
            <text:p>80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3.32">
            <text:p>13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4.88">
            <text:p>694,88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25">
            <text:p>6,2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318884365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1">
            <text:p>31012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88.68">
            <text:p>41088,68</text:p>
          </table:table-cell>
          <table:table-cell table:style-name="ce12N2" office:value-type="float" office:value="2412.77">
            <text:p>2412,77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9851.2">
            <text:p>3985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8586">
            <text:p>6,286</text:p>
          </table:table-cell>
          <table:table-cell table:style-name="ce12N2" office:value-type="float" office:value="2047.2">
            <text:p>204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08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616.37">
            <text:p>32616,37</text:p>
          </table:table-cell>
          <table:table-cell table:style-name="ce12N2" office:value-type="float" office:value="32.62">
            <text:p>3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.55">
            <text:p>293,55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650.25">
            <text:p>3650,25</text:p>
          </table:table-cell>
          <table:table-cell table:style-name="ce12N2" office:value-type="float" office:value="37438.43">
            <text:p>37438,43</text:p>
          </table:table-cell>
          <table:table-cell table:style-name="ce12N2" office:value-type="float" office:value="1497.53">
            <text:p>149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5091541420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7">
            <text:p>310127</text:p>
          </table:table-cell>
          <table:table-cell table:style-name="ce0" table:number-columns-spanned="4" table:number-rows-spanned="1" office:value-type="string" calcext:value-type="string">
            <text:p>670 - INDUSTRIA DE FORJADOS SAO ROMAO LTDA</text:p>
          </table:table-cell>
          <table:covered-table-cell table:number-columns-repeated="3"/>
          <table:table-cell table:style-name="ce0" office:value-type="string" calcext:value-type="string">
            <text:p>58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81.97">
            <text:p>1068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0359.9">
            <text:p>1035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3968">
            <text:p>0,284</text:p>
          </table:table-cell>
          <table:table-cell table:style-name="ce12N2" office:value-type="float" office:value="575.61">
            <text:p>575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81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70.77">
            <text:p>9370,77</text:p>
          </table:table-cell>
          <table:table-cell table:style-name="ce12N2" office:value-type="float" office:value="9.37">
            <text:p>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.34">
            <text:p>84,3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22.07">
            <text:p>322,07</text:p>
          </table:table-cell>
          <table:table-cell table:style-name="ce12N2" office:value-type="float" office:value="8728.37">
            <text:p>8728,37</text:p>
          </table:table-cell>
          <table:table-cell table:style-name="ce12N2" office:value-type="float" office:value="610.99">
            <text:p>61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167258480001185500100005859510000000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7">
            <text:p>310177</text:p>
          </table:table-cell>
          <table:table-cell table:style-name="ce0" table:number-columns-spanned="4" table:number-rows-spanned="1" office:value-type="string" calcext:value-type="string">
            <text:p>10.937 - ROBERT BOSCH LIMITADA</text:p>
          </table:table-cell>
          <table:covered-table-cell table:number-columns-repeated="3"/>
          <table:table-cell table:style-name="ce0" office:value-type="string" calcext:value-type="string">
            <text:p>1.279.37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100.33">
            <text:p>6110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58758.63">
            <text:p>58758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14225">
            <text:p>1,414</text:p>
          </table:table-cell>
          <table:table-cell table:style-name="ce12N2" office:value-type="float" office:value="515.37">
            <text:p>515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10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844.18">
            <text:p>50844,18</text:p>
          </table:table-cell>
          <table:table-cell table:style-name="ce12N2" office:value-type="float" office:value="50.85">
            <text:p>5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.6">
            <text:p>457,60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341.7">
            <text:p>2341,70</text:p>
          </table:table-cell>
          <table:table-cell table:style-name="ce12N2" office:value-type="float" office:value="53018.85">
            <text:p>53018,85</text:p>
          </table:table-cell>
          <table:table-cell table:style-name="ce12N2" office:value-type="float" office:value="2731.98">
            <text:p>273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459901810032855500200127937574252926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5">
            <text:p>310195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6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18.09">
            <text:p>861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344.57">
            <text:p>8344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21537">
            <text:p>0,722</text:p>
          </table:table-cell>
          <table:table-cell table:style-name="ce12N2" office:value-type="float" office:value="134.57">
            <text:p>134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1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44.57">
            <text:p>8344,57</text:p>
          </table:table-cell>
          <table:table-cell table:style-name="ce12N2" office:value-type="float" office:value="8.35">
            <text:p>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11">
            <text:p>75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73.52">
            <text:p>273,52</text:p>
          </table:table-cell>
          <table:table-cell table:style-name="ce12N2" office:value-type="float" office:value="8344.57">
            <text:p>8344,57</text:p>
          </table:table-cell>
          <table:table-cell table:style-name="ce12N2" office:value-type="float" office:value="464.98">
            <text:p>46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50940030001555500100018655314573239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4">
            <text:p>310204</text:p>
          </table:table-cell>
          <table:table-cell table:style-name="ce0" table:number-columns-spanned="4" table:number-rows-spanned="1" office:value-type="string" calcext:value-type="string">
            <text:p>21.685 - INDEPENDENCE COMERCIO E IMPORTACAO LTDA</text:p>
          </table:table-cell>
          <table:covered-table-cell table:number-columns-repeated="3"/>
          <table:table-cell table:style-name="ce0" office:value-type="string" calcext:value-type="string">
            <text:p>22.151</text:p>
          </table:table-cell>
          <table:table-cell table:style-name="ce9" office:value-type="string" calcext:value-type="string">
            <text:p>24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272">
            <text:p>0,133</text:p>
          </table:table-cell>
          <table:table-cell table:style-name="ce12N2" office:value-type="float" office:value="89.76">
            <text:p>8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12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3.6">
            <text:p>1753,60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78">
            <text:p>15,78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80.51">
            <text:p>8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18136504000107550240000221511179630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7">
            <text:p>31020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6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">
            <text:p>0,060</text:p>
          </table:table-cell>
          <table:table-cell table:style-name="ce12N2" office:value-type="float" office:value="301.5">
            <text:p>30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7.09">
            <text:p>5467,09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21">
            <text:p>49,2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266.23">
            <text:p>26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6631017700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8">
            <text:p>31020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6142">
            <text:p>0,561</text:p>
          </table:table-cell>
          <table:table-cell table:style-name="ce12N2" office:value-type="float" office:value="619.21">
            <text:p>619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15.41">
            <text:p>6615,41</text:p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54">
            <text:p>59,5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548.69">
            <text:p>54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7551163844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5">
            <text:p>310215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8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07.51466">
            <text:p>807,515</text:p>
          </table:table-cell>
          <table:table-cell table:style-name="ce12N2" office:value-type="float" office:value="3713.9">
            <text:p>37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83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221.48">
            <text:p>74221,48</text:p>
          </table:table-cell>
          <table:table-cell table:style-name="ce12N2" office:value-type="float" office:value="74.2">
            <text:p>7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7.98">
            <text:p>667,98</text:p>
          </table:table-cell>
          <table:table-cell table:style-name="ce12N2" office:value-type="float" office:value="37.5">
            <text:p>37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5798.2">
            <text:p>579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827610000142550010000686801816218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6">
            <text:p>310216</text:p>
          </table:table-cell>
          <table:table-cell table:style-name="ce0" table:number-columns-spanned="4" table:number-rows-spanned="1" office:value-type="string" calcext:value-type="string">
            <text:p>25.125 - ASTOPEL EMBALAGENS LTDA</text:p>
          </table:table-cell>
          <table:covered-table-cell table:number-columns-repeated="3"/>
          <table:table-cell table:style-name="ce0" office:value-type="string" calcext:value-type="string">
            <text:p>12.2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">
            <text:p>9,000</text:p>
          </table:table-cell>
          <table:table-cell table:style-name="ce12N2" office:value-type="float" office:value="10000">
            <text:p>10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00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971.19">
            <text:p>51971,19</text:p>
          </table:table-cell>
          <table:table-cell table:style-name="ce12N2" office:value-type="float" office:value="51.97">
            <text:p>5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7.74">
            <text:p>467,7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4060">
            <text:p>40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297179000103550010000122831213010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7">
            <text:p>310217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011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6734">
            <text:p>7,673</text:p>
          </table:table-cell>
          <table:table-cell table:style-name="ce12N2" office:value-type="float" office:value="5390.55">
            <text:p>5390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444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510.36">
            <text:p>37510,36</text:p>
          </table:table-cell>
          <table:table-cell table:style-name="ce12N2" office:value-type="float" office:value="37.5">
            <text:p>3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.6">
            <text:p>337,6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3111.14">
            <text:p>31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675270000450550400000620111757384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8">
            <text:p>310218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035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69">
            <text:p>0,397</text:p>
          </table:table-cell>
          <table:table-cell table:style-name="ce12N2" office:value-type="float" office:value="347.67">
            <text:p>347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3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81.09">
            <text:p>2481,09</text:p>
          </table:table-cell>
          <table:table-cell table:style-name="ce12N2" office:value-type="float" office:value="2.48">
            <text:p>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33">
            <text:p>22,3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205.78">
            <text:p>20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675270000450550400000620351433429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9">
            <text:p>310219</text:p>
          </table:table-cell>
          <table:table-cell table:style-name="ce0" table:number-columns-spanned="4" table:number-rows-spanned="1" office:value-type="string" calcext:value-type="string">
            <text:p>17.073 - INFINITY C.IMP.E EXP.DE EQUIP. DE SEGURANCA LTDA</text:p>
          </table:table-cell>
          <table:covered-table-cell table:number-columns-repeated="3"/>
          <table:table-cell table:style-name="ce0" office:value-type="string" calcext:value-type="string">
            <text:p>5.1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932.16">
            <text:p>5493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54932.16">
            <text:p>5493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668688">
            <text:p>4,669</text:p>
          </table:table-cell>
          <table:table-cell table:style-name="ce12N2" office:value-type="float" office:value="1663.98">
            <text:p>1663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93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810.06">
            <text:p>50810,06</text:p>
          </table:table-cell>
          <table:table-cell table:style-name="ce12N2" office:value-type="float" office:value="50.83">
            <text:p>5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.29">
            <text:p>457,29</text:p>
          </table:table-cell>
          <table:table-cell table:style-name="ce12N2" office:value-type="float" office:value="60.85">
            <text:p>60,8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932.16">
            <text:p>54932,16</text:p>
          </table:table-cell>
          <table:table-cell table:style-name="ce12N2" office:value-type="float" office:value="2197.28">
            <text:p>219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324621480001345500100000511219517446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0">
            <text:p>310260</text:p>
          </table:table-cell>
          <table:table-cell table:style-name="ce0" table:number-columns-spanned="4" table:number-rows-spanned="1" office:value-type="string" calcext:value-type="string">
            <text:p>7.087 - VELLORE S/A</text:p>
          </table:table-cell>
          <table:covered-table-cell table:number-columns-repeated="3"/>
          <table:table-cell table:style-name="ce0" office:value-type="string" calcext:value-type="string">
            <text:p>413.8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66.95">
            <text:p>2936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27021.78">
            <text:p>27021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884">
            <text:p>1,288</text:p>
          </table:table-cell>
          <table:table-cell table:style-name="ce12N2" office:value-type="float" office:value="781.33">
            <text:p>781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36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375.81">
            <text:p>23375,81</text:p>
          </table:table-cell>
          <table:table-cell table:style-name="ce12N2" office:value-type="float" office:value="23.39">
            <text:p>23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0.37">
            <text:p>210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345.17">
            <text:p>2345,17</text:p>
          </table:table-cell>
          <table:table-cell table:style-name="ce12N2" office:value-type="float" office:value="27021.78">
            <text:p>27021,78</text:p>
          </table:table-cell>
          <table:table-cell table:style-name="ce12N2" office:value-type="float" office:value="1263.32">
            <text:p>126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1723086000143550010004138971241076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3">
            <text:p>310263</text:p>
          </table:table-cell>
          <table:table-cell table:style-name="ce0" table:number-columns-spanned="4" table:number-rows-spanned="1" office:value-type="string" calcext:value-type="string">
            <text:p>8.753 - ANCORA GROUP LTDA</text:p>
          </table:table-cell>
          <table:covered-table-cell table:number-columns-repeated="3"/>
          <table:table-cell table:style-name="ce0" office:value-type="string" calcext:value-type="string">
            <text:p>59.47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672.11">
            <text:p>6567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898">
            <text:p>4,999</text:p>
          </table:table-cell>
          <table:table-cell table:style-name="ce12N2" office:value-type="float" office:value="2976.9">
            <text:p>297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672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785.43">
            <text:p>56785,43</text:p>
          </table:table-cell>
          <table:table-cell table:style-name="ce12N2" office:value-type="float" office:value="56.78">
            <text:p>5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.07">
            <text:p>511,07</text:p>
          </table:table-cell>
          <table:table-cell table:style-name="ce12N2" office:value-type="float" office:value="98.58">
            <text:p>98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91.41">
            <text:p>491,41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2607.22">
            <text:p>260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67647412000350550100000594771103372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3">
            <text:p>31027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86.96">
            <text:p>7618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">
            <text:p>85,00</text:p>
          </table:table-cell>
          <table:table-cell table:style-name="ce12N2" office:value-type="float" office:value="73514.84">
            <text:p>7351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8.715135">
            <text:p>158,715</text:p>
          </table:table-cell>
          <table:table-cell table:style-name="ce12N2" office:value-type="float" office:value="1436.81">
            <text:p>143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.18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261.92">
            <text:p>62261,92</text:p>
          </table:table-cell>
          <table:table-cell table:style-name="ce12N2" office:value-type="float" office:value="62.26">
            <text:p>6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0.38">
            <text:p>560,38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672.12">
            <text:p>2672,12</text:p>
          </table:table-cell>
          <table:table-cell table:style-name="ce12N2" office:value-type="float" office:value="73514.84">
            <text:p>73514,84</text:p>
          </table:table-cell>
          <table:table-cell table:style-name="ce12N2" office:value-type="float" office:value="4906.59">
            <text:p>490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371568624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4">
            <text:p>31027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81.59">
            <text:p>1218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1636.38">
            <text:p>11636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7106">
            <text:p>0,207</text:p>
          </table:table-cell>
          <table:table-cell table:style-name="ce12N2" office:value-type="float" office:value="157.33">
            <text:p>15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18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49.2">
            <text:p>10049,20</text:p>
          </table:table-cell>
          <table:table-cell table:style-name="ce12N2" office:value-type="float" office:value="10.04">
            <text:p>1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44">
            <text:p>90,44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45.21">
            <text:p>545,21</text:p>
          </table:table-cell>
          <table:table-cell table:style-name="ce12N2" office:value-type="float" office:value="11636.38">
            <text:p>11636,38</text:p>
          </table:table-cell>
          <table:table-cell table:style-name="ce12N2" office:value-type="float" office:value="562.91">
            <text:p>56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451586264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9">
            <text:p>310279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2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27.05">
            <text:p>802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7537.14">
            <text:p>753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34875">
            <text:p>0,735</text:p>
          </table:table-cell>
          <table:table-cell table:style-name="ce12N2" office:value-type="float" office:value="79.24">
            <text:p>79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2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61.15">
            <text:p>6361,15</text:p>
          </table:table-cell>
          <table:table-cell table:style-name="ce12N2" office:value-type="float" office:value="6.37">
            <text:p>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24">
            <text:p>57,2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89.91">
            <text:p>489,91</text:p>
          </table:table-cell>
          <table:table-cell table:style-name="ce12N2" office:value-type="float" office:value="7537.14">
            <text:p>7537,14</text:p>
          </table:table-cell>
          <table:table-cell table:style-name="ce12N2" office:value-type="float" office:value="527.61">
            <text:p>52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502380001145500100137226612175928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80">
            <text:p>310280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2.5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3.13">
            <text:p>88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9.23">
            <text:p>829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284">
            <text:p>0,057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3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9.85">
            <text:p>699,85</text:p>
          </table:table-cell>
          <table:table-cell table:style-name="ce12N2" office:value-type="float" office:value="0.7">
            <text:p>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">
            <text:p>6,3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3.9">
            <text:p>53,90</text:p>
          </table:table-cell>
          <table:table-cell table:style-name="ce12N2" office:value-type="float" office:value="829.23">
            <text:p>829,23</text:p>
          </table:table-cell>
          <table:table-cell table:style-name="ce12N2" office:value-type="float" office:value="58.05">
            <text:p>5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50238000114550010013725351219649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6">
            <text:p>31029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12.16">
            <text:p>3361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03928">
            <text:p>2,004</text:p>
          </table:table-cell>
          <table:table-cell table:style-name="ce12N2" office:value-type="float" office:value="155.68">
            <text:p>15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1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367.66">
            <text:p>28367,66</text:p>
          </table:table-cell>
          <table:table-cell table:style-name="ce12N2" office:value-type="float" office:value="28.37">
            <text:p>2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.32">
            <text:p>255,32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5.39">
            <text:p>25,39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2327.64">
            <text:p>232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211057345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9">
            <text:p>310299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7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3.82">
            <text:p>364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623.16">
            <text:p>3623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4544">
            <text:p>0,315</text:p>
          </table:table-cell>
          <table:table-cell table:style-name="ce12N2" office:value-type="float" office:value="37.08">
            <text:p>3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3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66.51">
            <text:p>3066,51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6">
            <text:p>27,60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3623.16">
            <text:p>3623,16</text:p>
          </table:table-cell>
          <table:table-cell table:style-name="ce12N2" office:value-type="float" office:value="244.09">
            <text:p>24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74015386824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00">
            <text:p>31030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8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656">
            <text:p>0,197</text:p>
          </table:table-cell>
          <table:table-cell table:style-name="ce12N2" office:value-type="float" office:value="9.72">
            <text:p>9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2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14.93">
            <text:p>2214,93</text:p>
          </table:table-cell>
          <table:table-cell table:style-name="ce12N2" office:value-type="float" office:value="2.21">
            <text:p>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93">
            <text:p>19,93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183.71">
            <text:p>18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8691076041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6">
            <text:p>310316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4.1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082.24">
            <text:p>4708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46860.88">
            <text:p>4686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.976484">
            <text:p>36,976</text:p>
          </table:table-cell>
          <table:table-cell table:style-name="ce12N2" office:value-type="float" office:value="1508.32">
            <text:p>1508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08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04.47">
            <text:p>40804,47</text:p>
          </table:table-cell>
          <table:table-cell table:style-name="ce12N2" office:value-type="float" office:value="40.79">
            <text:p>4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7.23">
            <text:p>367,2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21.36">
            <text:p>221,36</text:p>
          </table:table-cell>
          <table:table-cell table:style-name="ce12N2" office:value-type="float" office:value="33398.05">
            <text:p>33398,05</text:p>
          </table:table-cell>
          <table:table-cell table:style-name="ce12N2" office:value-type="float" office:value="2128.87">
            <text:p>212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0376680001545500100120418113768707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7">
            <text:p>310317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4.1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34.86">
            <text:p>3823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7031.35">
            <text:p>37031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527776">
            <text:p>5,528</text:p>
          </table:table-cell>
          <table:table-cell table:style-name="ce12N2" office:value-type="float" office:value="1100.93">
            <text:p>110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234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53.53">
            <text:p>31253,53</text:p>
          </table:table-cell>
          <table:table-cell table:style-name="ce12N2" office:value-type="float" office:value="31.25">
            <text:p>3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.28">
            <text:p>281,28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203.51">
            <text:p>1203,51</text:p>
          </table:table-cell>
          <table:table-cell table:style-name="ce12N2" office:value-type="float" office:value="37031.35">
            <text:p>37031,35</text:p>
          </table:table-cell>
          <table:table-cell table:style-name="ce12N2" office:value-type="float" office:value="2592.2">
            <text:p>259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037668000154550010012041821780522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8">
            <text:p>310318</text:p>
          </table:table-cell>
          <table:table-cell table:style-name="ce0" table:number-columns-spanned="4" table:number-rows-spanned="1" office:value-type="string" calcext:value-type="string">
            <text:p>14.578 - CARBOGRAFITE EQUIPAMENTOS INDUSTRIAIS LTDA</text:p>
          </table:table-cell>
          <table:covered-table-cell table:number-columns-repeated="3"/>
          <table:table-cell table:style-name="ce0" office:value-type="string" calcext:value-type="string">
            <text:p>810.65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35.3">
            <text:p>933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221.36">
            <text:p>9221,36</text:p>
          </table:table-cell>
          <table:table-cell table:style-name="ce12N2" office:value-type="float" office:value="7.99">
            <text:p>7,99</text:p>
          </table:table-cell>
          <table:table-cell table:style-name="ce12N3" office:value-type="float" office:value="0.656168">
            <text:p>0,656</text:p>
          </table:table-cell>
          <table:table-cell table:style-name="ce12N2" office:value-type="float" office:value="108">
            <text:p>10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335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88.39">
            <text:p>7988,39</text:p>
          </table:table-cell>
          <table:table-cell table:style-name="ce12N2" office:value-type="float" office:value="7.99">
            <text:p>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.9">
            <text:p>71,90</text:p>
          </table:table-cell>
          <table:table-cell table:style-name="ce12N2" office:value-type="float" office:value="43.83">
            <text:p>43,8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05.95">
            <text:p>105,95</text:p>
          </table:table-cell>
          <table:table-cell table:style-name="ce12N2" office:value-type="float" office:value="9229.35">
            <text:p>9229,35</text:p>
          </table:table-cell>
          <table:table-cell table:style-name="ce12N2" office:value-type="float" office:value="417.91">
            <text:p>417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36427615000146550000008106591329160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9">
            <text:p>310319</text:p>
          </table:table-cell>
          <table:table-cell table:style-name="ce0" table:number-columns-spanned="4" table:number-rows-spanned="1" office:value-type="string" calcext:value-type="string">
            <text:p>13.126 - ALMA TEXTIL LTDA</text:p>
          </table:table-cell>
          <table:covered-table-cell table:number-columns-repeated="3"/>
          <table:table-cell table:style-name="ce0" office:value-type="string" calcext:value-type="string">
            <text:p>16.7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20">
            <text:p>433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320">
            <text:p>433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11.484">
            <text:p>3611,484</text:p>
          </table:table-cell>
          <table:table-cell table:style-name="ce12N2" office:value-type="float" office:value="1951">
            <text:p>195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3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17.11">
            <text:p>38817,11</text:p>
          </table:table-cell>
          <table:table-cell table:style-name="ce12N2" office:value-type="float" office:value="38.82">
            <text:p>3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.36">
            <text:p>349,36</text:p>
          </table:table-cell>
          <table:table-cell table:style-name="ce12N2" office:value-type="float" office:value="32">
            <text:p>3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320">
            <text:p>43320,00</text:p>
          </table:table-cell>
          <table:table-cell table:style-name="ce12N2" office:value-type="float" office:value="3032.4">
            <text:p>303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796564000194550010000167131260167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45">
            <text:p>310345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99.69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85.54">
            <text:p>2458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2441.3">
            <text:p>22441,30</text:p>
          </table:table-cell>
          <table:table-cell table:style-name="ce12N2" office:value-type="float" office:value="929.39">
            <text:p>929,39</text:p>
          </table:table-cell>
          <table:table-cell table:style-name="ce12N3" office:value-type="float" office:value="0.44847">
            <text:p>0,448</text:p>
          </table:table-cell>
          <table:table-cell table:style-name="ce12N2" office:value-type="float" office:value="211.23">
            <text:p>21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585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974.63">
            <text:p>19974,63</text:p>
          </table:table-cell>
          <table:table-cell table:style-name="ce12N2" office:value-type="float" office:value="19.97">
            <text:p>1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9.78">
            <text:p>179,7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214.85">
            <text:p>1214,85</text:p>
          </table:table-cell>
          <table:table-cell table:style-name="ce12N2" office:value-type="float" office:value="23370.69">
            <text:p>23370,69</text:p>
          </table:table-cell>
          <table:table-cell table:style-name="ce12N2" office:value-type="float" office:value="1360.07">
            <text:p>136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79969216336814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7">
            <text:p>310387</text:p>
          </table:table-cell>
          <table:table-cell table:style-name="ce0" table:number-columns-spanned="4" table:number-rows-spanned="1" office:value-type="string" calcext:value-type="string">
            <text:p>1.695 - METALURGICA RONCONI DE MATAO LTDA - ME</text:p>
          </table:table-cell>
          <table:covered-table-cell table:number-columns-repeated="3"/>
          <table:table-cell table:style-name="ce0" office:value-type="string" calcext:value-type="string">
            <text:p>38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6">
            <text:p>0,038</text:p>
          </table:table-cell>
          <table:table-cell table:style-name="ce12N2" office:value-type="float" office:value="258.4">
            <text:p>25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5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369.75">
            <text:p>36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48875230001525500100003812010038124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4">
            <text:p>3104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3241.31">
            <text:p>206324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">
            <text:p>208,00</text:p>
          </table:table-cell>
          <table:table-cell table:style-name="ce12N2" office:value-type="float" office:value="2050218.05">
            <text:p>2050218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92.103079">
            <text:p>692,103</text:p>
          </table:table-cell>
          <table:table-cell table:style-name="ce12N2" office:value-type="float" office:value="9038.4">
            <text:p>903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3.241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0206.72">
            <text:p>1740206,72</text:p>
          </table:table-cell>
          <table:table-cell table:style-name="ce12N2" office:value-type="float" office:value="1740.22">
            <text:p>17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61.89">
            <text:p>15661,8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3023.26">
            <text:p>13023,26</text:p>
          </table:table-cell>
          <table:table-cell table:style-name="ce12N2" office:value-type="float" office:value="1999450.7">
            <text:p>1999450,70</text:p>
          </table:table-cell>
          <table:table-cell table:style-name="ce12N2" office:value-type="float" office:value="132634.89">
            <text:p>13263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51890466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1">
            <text:p>310421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1.19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68.09">
            <text:p>3096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12N2" office:value-type="float" office:value="30117.29">
            <text:p>30117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88948">
            <text:p>4,589</text:p>
          </table:table-cell>
          <table:table-cell table:style-name="ce12N2" office:value-type="float" office:value="422.54">
            <text:p>42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96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758.05">
            <text:p>25758,05</text:p>
          </table:table-cell>
          <table:table-cell table:style-name="ce12N2" office:value-type="float" office:value="25.77">
            <text:p>2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.87">
            <text:p>231,8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850.8">
            <text:p>850,80</text:p>
          </table:table-cell>
          <table:table-cell table:style-name="ce12N2" office:value-type="float" office:value="30117.29">
            <text:p>30117,29</text:p>
          </table:table-cell>
          <table:table-cell table:style-name="ce12N2" office:value-type="float" office:value="1733.74">
            <text:p>173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119213671161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46">
            <text:p>310446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4.48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.71">
            <text:p>21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2.71">
            <text:p>212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09">
            <text:p>0,001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.53">
            <text:p>179,53</text:p>
          </table:table-cell>
          <table:table-cell table:style-name="ce12N2" office:value-type="float" office:value="0.18">
            <text:p>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62">
            <text:p>1,6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2.71">
            <text:p>212,71</text:p>
          </table:table-cell>
          <table:table-cell table:style-name="ce12N2" office:value-type="float" office:value="14.89">
            <text:p>1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44891848323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48">
            <text:p>31044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4.48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79">
            <text:p>337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79">
            <text:p>337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4">
            <text:p>0,003</text:p>
          </table:table-cell>
          <table:table-cell table:style-name="ce12N2" office:value-type="float" office:value="5.4">
            <text:p>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7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1.79">
            <text:p>2851,79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67">
            <text:p>25,6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9">
            <text:p>3379,00</text:p>
          </table:table-cell>
          <table:table-cell table:style-name="ce12N2" office:value-type="float" office:value="236.53">
            <text:p>23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44881848989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4">
            <text:p>31047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293.88">
            <text:p>3329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6196">
            <text:p>0,796</text:p>
          </table:table-cell>
          <table:table-cell table:style-name="ce12N2" office:value-type="float" office:value="1409">
            <text:p>140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29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77.95">
            <text:p>26477,95</text:p>
          </table:table-cell>
          <table:table-cell table:style-name="ce12N2" office:value-type="float" office:value="26.48">
            <text:p>2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32">
            <text:p>238,32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2901.42">
            <text:p>2901,42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1215.69">
            <text:p>121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9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431589480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6">
            <text:p>310476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9.4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99.8">
            <text:p>2529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5299.8">
            <text:p>2529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46198">
            <text:p>7,462</text:p>
          </table:table-cell>
          <table:table-cell table:style-name="ce12N2" office:value-type="float" office:value="1304">
            <text:p>130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9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687.23">
            <text:p>19687,23</text:p>
          </table:table-cell>
          <table:table-cell table:style-name="ce12N2" office:value-type="float" office:value="19.69">
            <text:p>19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.19">
            <text:p>177,19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299.8">
            <text:p>25299,80</text:p>
          </table:table-cell>
          <table:table-cell table:style-name="ce12N2" office:value-type="float" office:value="1711.8">
            <text:p>171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6557984000499550010000194321236381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0">
            <text:p>31050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04">
            <text:p>0,00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2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84.16">
            <text:p>2384,16</text:p>
          </table:table-cell>
          <table:table-cell table:style-name="ce12N2" office:value-type="float" office:value="2.38">
            <text:p>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46">
            <text:p>21,4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197.74">
            <text:p>19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214027491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1">
            <text:p>31050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516">
            <text:p>0,060</text:p>
          </table:table-cell>
          <table:table-cell table:style-name="ce12N2" office:value-type="float" office:value="27.9">
            <text:p>2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3.11">
            <text:p>3503,11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53">
            <text:p>31,5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290.55">
            <text:p>29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31422428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2">
            <text:p>31050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012">
            <text:p>0,059</text:p>
          </table:table-cell>
          <table:table-cell table:style-name="ce12N2" office:value-type="float" office:value="27.1">
            <text:p>27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6.92">
            <text:p>466,92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38.73">
            <text:p>3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41864812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4">
            <text:p>310534</text:p>
          </table:table-cell>
          <table:table-cell table:style-name="ce0" table:number-columns-spanned="4" table:number-rows-spanned="1" office:value-type="string" calcext:value-type="string">
            <text:p>39.171 - BALDEMETAL IND METALURGICA LTDA</text:p>
          </table:table-cell>
          <table:covered-table-cell table:number-columns-repeated="3"/>
          <table:table-cell table:style-name="ce0" office:value-type="string" calcext:value-type="string">
            <text:p>1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06304">
            <text:p>5,063</text:p>
          </table:table-cell>
          <table:table-cell table:style-name="ce12N2" office:value-type="float" office:value="1080">
            <text:p>10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1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889.89">
            <text:p>889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665712600001255500100000010910000015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9">
            <text:p>310539</text:p>
          </table:table-cell>
          <table:table-cell table:style-name="ce0" table:number-columns-spanned="4" table:number-rows-spanned="1" office:value-type="string" calcext:value-type="string">
            <text:p>3.931 - INTELLI IND. TERM. ELETR. LTDA</text:p>
          </table:table-cell>
          <table:covered-table-cell table:number-columns-repeated="3"/>
          <table:table-cell table:style-name="ce0" office:value-type="string" calcext:value-type="string">
            <text:p>695.5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843.2">
            <text:p>3784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6652.01">
            <text:p>36652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333">
            <text:p>0,035</text:p>
          </table:table-cell>
          <table:table-cell table:style-name="ce12N2" office:value-type="float" office:value="342.51">
            <text:p>34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84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933.37">
            <text:p>30933,37</text:p>
          </table:table-cell>
          <table:table-cell table:style-name="ce12N2" office:value-type="float" office:value="30.96">
            <text:p>3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43">
            <text:p>278,4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191.19">
            <text:p>1191,19</text:p>
          </table:table-cell>
          <table:table-cell table:style-name="ce12N2" office:value-type="float" office:value="36652.01">
            <text:p>36652,01</text:p>
          </table:table-cell>
          <table:table-cell table:style-name="ce12N2" office:value-type="float" office:value="2565.64">
            <text:p>256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6754545000194550000006955941202607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6">
            <text:p>310546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91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7">
            <text:p>48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27">
            <text:p>482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6">
            <text:p>0,021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4">
            <text:p>4074,00</text:p>
          </table:table-cell>
          <table:table-cell table:style-name="ce12N2" office:value-type="float" office:value="4.07">
            <text:p>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67">
            <text:p>36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7">
            <text:p>4827,00</text:p>
          </table:table-cell>
          <table:table-cell table:style-name="ce12N2" office:value-type="float" office:value="337.89">
            <text:p>33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13855500200001991814083019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1">
            <text:p>310551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0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52131">
            <text:p>21,521</text:p>
          </table:table-cell>
          <table:table-cell table:style-name="ce12N2" office:value-type="float" office:value="6563.53">
            <text:p>656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297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440.19">
            <text:p>73440,19</text:p>
          </table:table-cell>
          <table:table-cell table:style-name="ce12N2" office:value-type="float" office:value="73.45">
            <text:p>7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0.97">
            <text:p>660,9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3371.91">
            <text:p>337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01590328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2">
            <text:p>310552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1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474514">
            <text:p>21,475</text:p>
          </table:table-cell>
          <table:table-cell table:style-name="ce12N2" office:value-type="float" office:value="14482.15">
            <text:p>14482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.2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92.96">
            <text:p>83892,9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5.04">
            <text:p>755,0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3851.83">
            <text:p>385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11596816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4">
            <text:p>310554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3.5186">
            <text:p>33,519</text:p>
          </table:table-cell>
          <table:table-cell table:style-name="ce12N2" office:value-type="float" office:value="424">
            <text:p>42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069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06.02">
            <text:p>14406,02</text:p>
          </table:table-cell>
          <table:table-cell table:style-name="ce12N2" office:value-type="float" office:value="14.41">
            <text:p>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.65">
            <text:p>129,6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1194.86">
            <text:p>119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0411835813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2">
            <text:p>310562</text:p>
          </table:table-cell>
          <table:table-cell table:style-name="ce0" table:number-columns-spanned="4" table:number-rows-spanned="1" office:value-type="string" calcext:value-type="string">
            <text:p>6.898 - BETALUB INDUSTRIA DE PROD. DIVER. DE PET. LTDA EPP</text:p>
          </table:table-cell>
          <table:covered-table-cell table:number-columns-repeated="3"/>
          <table:table-cell table:style-name="ce0" office:value-type="string" calcext:value-type="string">
            <text:p>1.49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06.8">
            <text:p>1450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519.4">
            <text:p>1151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47736">
            <text:p>0,848</text:p>
          </table:table-cell>
          <table:table-cell table:style-name="ce12N2" office:value-type="float" office:value="456.91">
            <text:p>456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50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4.12">
            <text:p>10834,12</text:p>
          </table:table-cell>
          <table:table-cell table:style-name="ce12N2" office:value-type="float" office:value="10.84">
            <text:p>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.5">
            <text:p>97,5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26.4">
            <text:p>3926,40</text:p>
          </table:table-cell>
          <table:table-cell table:style-name="ce12N2" office:value-type="float" office:value="274.85">
            <text:p>27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4936.96">
            <text:p>14936,96</text:p>
          </table:table-cell>
          <table:table-cell table:style-name="ce12N2" office:value-type="float" office:value="2987.4">
            <text:p>2987,4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6260884000108550020000014901430271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7">
            <text:p>31056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6.9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42575">
            <text:p>1,043</text:p>
          </table:table-cell>
          <table:table-cell table:style-name="ce12N2" office:value-type="float" office:value="943.4">
            <text:p>943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4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21.81">
            <text:p>10421,81</text:p>
          </table:table-cell>
          <table:table-cell table:style-name="ce12N2" office:value-type="float" office:value="10.42">
            <text:p>1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8">
            <text:p>93,8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864.39">
            <text:p>86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642774001209550010002269381719822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9">
            <text:p>31056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1.78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1.6">
            <text:p>902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831.4">
            <text:p>88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8484">
            <text:p>2,885</text:p>
          </table:table-cell>
          <table:table-cell table:style-name="ce12N2" office:value-type="float" office:value="263.04">
            <text:p>26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2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24.54">
            <text:p>7524,54</text:p>
          </table:table-cell>
          <table:table-cell table:style-name="ce12N2" office:value-type="float" office:value="7.53">
            <text:p>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.71">
            <text:p>67,7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0.2">
            <text:p>190,20</text:p>
          </table:table-cell>
          <table:table-cell table:style-name="ce12N2" office:value-type="float" office:value="8831.4">
            <text:p>8831,40</text:p>
          </table:table-cell>
          <table:table-cell table:style-name="ce12N2" office:value-type="float" office:value="539.9">
            <text:p>53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17821252863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74">
            <text:p>310574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71.9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4.16">
            <text:p>223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23.73">
            <text:p>2123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2.37">
            <text:p>1792,37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13">
            <text:p>16,1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10.43">
            <text:p>110,43</text:p>
          </table:table-cell>
          <table:table-cell table:style-name="ce12N2" office:value-type="float" office:value="2123.73">
            <text:p>2123,73</text:p>
          </table:table-cell>
          <table:table-cell table:style-name="ce12N2" office:value-type="float" office:value="148.66">
            <text:p>14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69947000003655500100007195211000034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78">
            <text:p>310578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8.7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.18105">
            <text:p>150,181</text:p>
          </table:table-cell>
          <table:table-cell table:style-name="ce12N2" office:value-type="float" office:value="722">
            <text:p>7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253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412.3">
            <text:p>40412,30</text:p>
          </table:table-cell>
          <table:table-cell table:style-name="ce12N2" office:value-type="float" office:value="40.41">
            <text:p>4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.71">
            <text:p>363,71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3377.75">
            <text:p>337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33385067000140550010000487461170386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80">
            <text:p>310580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7.8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8">
            <text:p>90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449.59">
            <text:p>8449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0248">
            <text:p>0,340</text:p>
          </table:table-cell>
          <table:table-cell table:style-name="ce12N2" office:value-type="float" office:value="84.25">
            <text:p>84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1.24">
            <text:p>7131,24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.18">
            <text:p>64,18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578.41">
            <text:p>578,41</text:p>
          </table:table-cell>
          <table:table-cell table:style-name="ce12N2" office:value-type="float" office:value="8449.59">
            <text:p>8449,59</text:p>
          </table:table-cell>
          <table:table-cell table:style-name="ce12N2" office:value-type="float" office:value="591.47">
            <text:p>59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785215704489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68">
            <text:p>310668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5.90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84.77">
            <text:p>2458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426">
            <text:p>244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7628">
            <text:p>4,976</text:p>
          </table:table-cell>
          <table:table-cell table:style-name="ce12N2" office:value-type="float" office:value="30594.6">
            <text:p>3059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584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575.48">
            <text:p>20575,48</text:p>
          </table:table-cell>
          <table:table-cell table:style-name="ce12N2" office:value-type="float" office:value="20.58">
            <text:p>2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.18">
            <text:p>185,18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58.77">
            <text:p>158,77</text:p>
          </table:table-cell>
          <table:table-cell table:style-name="ce12N2" office:value-type="float" office:value="25047">
            <text:p>25047,00</text:p>
          </table:table-cell>
          <table:table-cell table:style-name="ce12N2" office:value-type="float" office:value="1753.29">
            <text:p>17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758.2">
            <text:p>575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39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07/07/2026</text:p>
          </table:table-cell>
          <table:table-cell table:style-name="ce12" office:value-type="string" calcext:value-type="string">
            <text:p>5.758,20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35260774423880000145550030012259001524427035</text:p>
          </table:table-cell>
          <table:table-cell table:style-name="ce0" office:value-type="string" calcext:value-type="string">
            <text:p>3526075432020300019457001000004439121191324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4">
            <text:p>310674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2.20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9.11">
            <text:p>225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85.68">
            <text:p>2185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79348">
            <text:p>0,579</text:p>
          </table:table-cell>
          <table:table-cell table:style-name="ce12N2" office:value-type="float" office:value="78.41">
            <text:p>78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9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63.68">
            <text:p>1863,68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78">
            <text:p>16,78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73.43">
            <text:p>73,43</text:p>
          </table:table-cell>
          <table:table-cell table:style-name="ce12N2" office:value-type="float" office:value="2185.68">
            <text:p>2185,68</text:p>
          </table:table-cell>
          <table:table-cell table:style-name="ce12N2" office:value-type="float" office:value="132.05">
            <text:p>13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22001310110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6">
            <text:p>310676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1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.3608">
            <text:p>50,361</text:p>
          </table:table-cell>
          <table:table-cell table:style-name="ce12N2" office:value-type="float" office:value="680">
            <text:p>6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82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794.98">
            <text:p>21794,98</text:p>
          </table:table-cell>
          <table:table-cell table:style-name="ce12N2" office:value-type="float" office:value="21.79">
            <text:p>2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.15">
            <text:p>196,1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1807.69">
            <text:p>180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1611783819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7">
            <text:p>3106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5.7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31.6">
            <text:p>144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431.6">
            <text:p>144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7122">
            <text:p>0,097</text:p>
          </table:table-cell>
          <table:table-cell table:style-name="ce12N2" office:value-type="float" office:value="60.45">
            <text:p>6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79.75">
            <text:p>12179,75</text:p>
          </table:table-cell>
          <table:table-cell table:style-name="ce12N2" office:value-type="float" office:value="12.18">
            <text:p>1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62">
            <text:p>109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31.6">
            <text:p>14431,60</text:p>
          </table:table-cell>
          <table:table-cell table:style-name="ce12N2" office:value-type="float" office:value="1010.21">
            <text:p>101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573314512160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3">
            <text:p>31069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6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9.07">
            <text:p>94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9.2">
            <text:p>91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">
            <text:p>0,002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49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5.78">
            <text:p>775,78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98">
            <text:p>6,9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29.87">
            <text:p>29,87</text:p>
          </table:table-cell>
          <table:table-cell table:style-name="ce12N2" office:value-type="float" office:value="919.2">
            <text:p>919,20</text:p>
          </table:table-cell>
          <table:table-cell table:style-name="ce12N2" office:value-type="float" office:value="64.34">
            <text:p>6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67314898143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5">
            <text:p>3106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6.49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">
            <text:p>0,056</text:p>
          </table:table-cell>
          <table:table-cell table:style-name="ce12N2" office:value-type="float" office:value="22.8">
            <text:p>2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0.4">
            <text:p>3320,40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8">
            <text:p>29,8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275.41">
            <text:p>275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64921933536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6">
            <text:p>3106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6.49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6">
            <text:p>0,002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78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1.75">
            <text:p>2851,75</text:p>
          </table:table-cell>
          <table:table-cell table:style-name="ce12N2" office:value-type="float" office:value="2.85">
            <text:p>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67">
            <text:p>25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236.53">
            <text:p>23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64911020667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9">
            <text:p>310699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7.5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47.49">
            <text:p>3574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35735.1">
            <text:p>3573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5345">
            <text:p>5,353</text:p>
          </table:table-cell>
          <table:table-cell table:style-name="ce12N2" office:value-type="float" office:value="11133.6">
            <text:p>1113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747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928.13">
            <text:p>29928,13</text:p>
          </table:table-cell>
          <table:table-cell table:style-name="ce12N2" office:value-type="float" office:value="29.92">
            <text:p>29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9.38">
            <text:p>269,38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2.39">
            <text:p>12,39</text:p>
          </table:table-cell>
          <table:table-cell table:style-name="ce12N2" office:value-type="float" office:value="35735.1">
            <text:p>35735,10</text:p>
          </table:table-cell>
          <table:table-cell table:style-name="ce12N2" office:value-type="float" office:value="2501.45">
            <text:p>250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324.99">
            <text:p>632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831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8/07/2026</text:p>
          </table:table-cell>
          <table:table-cell table:style-name="ce12" office:value-type="string" calcext:value-type="string">
            <text:p>6.324,99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35260754542238000178550010000975371000973422</text:p>
          </table:table-cell>
          <table:table-cell table:style-name="ce0" office:value-type="string" calcext:value-type="string">
            <text:p>3526071138956500020057005000402831100089284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0">
            <text:p>310700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4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829.21">
            <text:p>38829,21</text:p>
          </table:table-cell>
          <table:table-cell table:style-name="ce12N2" office:value-type="float" office:value="2271.96">
            <text:p>2271,96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7289.14">
            <text:p>37289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092937">
            <text:p>18,093</text:p>
          </table:table-cell>
          <table:table-cell table:style-name="ce12N2" office:value-type="float" office:value="305.38">
            <text:p>30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829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488.86">
            <text:p>30488,86</text:p>
          </table:table-cell>
          <table:table-cell table:style-name="ce12N2" office:value-type="float" office:value="30.49">
            <text:p>3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4.4">
            <text:p>274,40</text:p>
          </table:table-cell>
          <table:table-cell table:style-name="ce12N2" office:value-type="float" office:value="78.42">
            <text:p>78,4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3350.5">
            <text:p>3350,50</text:p>
          </table:table-cell>
          <table:table-cell table:style-name="ce12N2" office:value-type="float" office:value="35017.18">
            <text:p>35017,18</text:p>
          </table:table-cell>
          <table:table-cell table:style-name="ce12N2" office:value-type="float" office:value="1420.63">
            <text:p>1420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551.61">
            <text:p>2551,61</text:p>
          </table:table-cell>
          <table:table-cell table:style-name="ce12N2" office:value-type="float" office:value="461.53">
            <text:p>461,53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47111242704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1">
            <text:p>310701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4.4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980">
            <text:p>38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980">
            <text:p>38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3.52">
            <text:p>23,520</text:p>
          </table:table-cell>
          <table:table-cell table:style-name="ce12N2" office:value-type="float" office:value="6443">
            <text:p>64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129.42">
            <text:p>31129,42</text:p>
          </table:table-cell>
          <table:table-cell table:style-name="ce12N2" office:value-type="float" office:value="31.13">
            <text:p>3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.16">
            <text:p>280,16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980">
            <text:p>38980,00</text:p>
          </table:table-cell>
          <table:table-cell table:style-name="ce12N2" office:value-type="float" office:value="4677.6">
            <text:p>467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441716383222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2">
            <text:p>310702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68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509.14">
            <text:p>7950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9444.56">
            <text:p>7944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2000.179148">
            <text:p>42000,179</text:p>
          </table:table-cell>
          <table:table-cell table:style-name="ce12N2" office:value-type="float" office:value="311.3">
            <text:p>311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509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049.28">
            <text:p>67049,28</text:p>
          </table:table-cell>
          <table:table-cell table:style-name="ce12N2" office:value-type="float" office:value="67.03">
            <text:p>6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3.42">
            <text:p>603,4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64.58">
            <text:p>64,58</text:p>
          </table:table-cell>
          <table:table-cell table:style-name="ce12N2" office:value-type="float" office:value="79444.56">
            <text:p>79444,56</text:p>
          </table:table-cell>
          <table:table-cell table:style-name="ce12N2" office:value-type="float" office:value="5561.11">
            <text:p>556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6810042528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3">
            <text:p>310703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67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68.8">
            <text:p>306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68.8">
            <text:p>306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96">
            <text:p>0,065</text:p>
          </table:table-cell>
          <table:table-cell table:style-name="ce12N2" office:value-type="float" office:value="259">
            <text:p>25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6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89.99">
            <text:p>2589,99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3">
            <text:p>23,3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68.8">
            <text:p>3068,80</text:p>
          </table:table-cell>
          <table:table-cell table:style-name="ce12N2" office:value-type="float" office:value="214.82">
            <text:p>21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6710075398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4">
            <text:p>310704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71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52.17">
            <text:p>345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343.5">
            <text:p>334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8125">
            <text:p>0,398</text:p>
          </table:table-cell>
          <table:table-cell table:style-name="ce12N2" office:value-type="float" office:value="17.85">
            <text:p>17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52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12.89">
            <text:p>2912,89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19">
            <text:p>26,1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08.67">
            <text:p>108,67</text:p>
          </table:table-cell>
          <table:table-cell table:style-name="ce12N2" office:value-type="float" office:value="3343.5">
            <text:p>3343,50</text:p>
          </table:table-cell>
          <table:table-cell table:style-name="ce12N2" office:value-type="float" office:value="133.74">
            <text:p>13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711000334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6">
            <text:p>310706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66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49.28">
            <text:p>2024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0249.28">
            <text:p>20249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0.31268">
            <text:p>120,313</text:p>
          </table:table-cell>
          <table:table-cell table:style-name="ce12N2" office:value-type="float" office:value="1306">
            <text:p>130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24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89.93">
            <text:p>17089,93</text:p>
          </table:table-cell>
          <table:table-cell table:style-name="ce12N2" office:value-type="float" office:value="17.07">
            <text:p>1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3.79">
            <text:p>153,7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249.28">
            <text:p>20249,28</text:p>
          </table:table-cell>
          <table:table-cell table:style-name="ce12N2" office:value-type="float" office:value="1417.45">
            <text:p>141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661000534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7">
            <text:p>310707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69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273.68">
            <text:p>14927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47906.36">
            <text:p>14790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62424">
            <text:p>1,162</text:p>
          </table:table-cell>
          <table:table-cell table:style-name="ce12N2" office:value-type="float" office:value="2341.96">
            <text:p>2341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9.273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829.3">
            <text:p>124829,30</text:p>
          </table:table-cell>
          <table:table-cell table:style-name="ce12N2" office:value-type="float" office:value="124.81">
            <text:p>12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3.44">
            <text:p>1123,4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367.32">
            <text:p>1367,32</text:p>
          </table:table-cell>
          <table:table-cell table:style-name="ce12N2" office:value-type="float" office:value="147906.36">
            <text:p>147906,36</text:p>
          </table:table-cell>
          <table:table-cell table:style-name="ce12N2" office:value-type="float" office:value="10353.44">
            <text:p>1035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691004599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8">
            <text:p>310708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70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6.63">
            <text:p>1546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5.12">
            <text:p>1185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376">
            <text:p>0,029</text:p>
          </table:table-cell>
          <table:table-cell table:style-name="ce12N2" office:value-type="float" office:value="10.8">
            <text:p>1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6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0.22">
            <text:p>1000,22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5.12">
            <text:p>1185,12</text:p>
          </table:table-cell>
          <table:table-cell table:style-name="ce12N2" office:value-type="float" office:value="82.96">
            <text:p>8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222.34">
            <text:p>2222,34</text:p>
          </table:table-cell>
          <table:table-cell table:style-name="ce12N2" office:value-type="float" office:value="361.51">
            <text:p>361,51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7010063669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9">
            <text:p>310709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4.4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27">
            <text:p>796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9627">
            <text:p>7962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3.08">
            <text:p>283,080</text:p>
          </table:table-cell>
          <table:table-cell table:style-name="ce12N2" office:value-type="float" office:value="14970">
            <text:p>149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62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590.12">
            <text:p>63590,12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2.32">
            <text:p>572,32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627">
            <text:p>79627,00</text:p>
          </table:table-cell>
          <table:table-cell table:style-name="ce12N2" office:value-type="float" office:value="9555.24">
            <text:p>955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44791381521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0">
            <text:p>310710</text:p>
          </table:table-cell>
          <table:table-cell table:style-name="ce0" table:number-columns-spanned="4" table:number-rows-spanned="1" office:value-type="string" calcext:value-type="string">
            <text:p>5.377 - 3M DO BRASIL LTDA</text:p>
          </table:table-cell>
          <table:covered-table-cell table:number-columns-repeated="3"/>
          <table:table-cell table:style-name="ce0" office:value-type="string" calcext:value-type="string">
            <text:p>978.946</text:p>
          </table:table-cell>
          <table:table-cell table:style-name="ce9" office:value-type="string" calcext:value-type="string">
            <text:p>14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54.59">
            <text:p>2485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4716.39">
            <text:p>2471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421827">
            <text:p>3,422</text:p>
          </table:table-cell>
          <table:table-cell table:style-name="ce12N2" office:value-type="float" office:value="759.8">
            <text:p>759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54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860.05">
            <text:p>20860,05</text:p>
          </table:table-cell>
          <table:table-cell table:style-name="ce12N2" office:value-type="float" office:value="20.84">
            <text:p>2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.72">
            <text:p>187,7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38.2">
            <text:p>138,20</text:p>
          </table:table-cell>
          <table:table-cell table:style-name="ce12N2" office:value-type="float" office:value="24716.39">
            <text:p>24716,39</text:p>
          </table:table-cell>
          <table:table-cell table:style-name="ce12N2" office:value-type="float" office:value="1730.15">
            <text:p>173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6220550140009789461008086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1">
            <text:p>31071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83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1.62">
            <text:p>220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28.8">
            <text:p>202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28">
            <text:p>0,008</text:p>
          </table:table-cell>
          <table:table-cell table:style-name="ce12N2" office:value-type="float" office:value="5.64">
            <text:p>5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2.25">
            <text:p>1712,25</text:p>
          </table:table-cell>
          <table:table-cell table:style-name="ce12N2" office:value-type="float" office:value="1.71">
            <text:p>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41">
            <text:p>15,41</text:p>
          </table:table-cell>
          <table:table-cell table:style-name="ce12N2" office:value-type="float" office:value="27.45">
            <text:p>27,4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72.82">
            <text:p>172,82</text:p>
          </table:table-cell>
          <table:table-cell table:style-name="ce12N2" office:value-type="float" office:value="2028.8">
            <text:p>2028,80</text:p>
          </table:table-cell>
          <table:table-cell table:style-name="ce12N2" office:value-type="float" office:value="142.02">
            <text:p>14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8351887899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2">
            <text:p>31071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8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4.83">
            <text:p>2584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55.2">
            <text:p>235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8">
            <text:p>0,006</text:p>
          </table:table-cell>
          <table:table-cell table:style-name="ce12N2" office:value-type="float" office:value="1.16">
            <text:p>1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84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87.73">
            <text:p>1987,73</text:p>
          </table:table-cell>
          <table:table-cell table:style-name="ce12N2" office:value-type="float" office:value="1.99">
            <text:p>1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89">
            <text:p>17,8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229.63">
            <text:p>229,63</text:p>
          </table:table-cell>
          <table:table-cell table:style-name="ce12N2" office:value-type="float" office:value="2355.2">
            <text:p>2355,20</text:p>
          </table:table-cell>
          <table:table-cell table:style-name="ce12N2" office:value-type="float" office:value="164.86">
            <text:p>16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8361998071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4">
            <text:p>31071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8.4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3.24">
            <text:p>189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93.81">
            <text:p>1793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35">
            <text:p>0,036</text:p>
          </table:table-cell>
          <table:table-cell table:style-name="ce12N2" office:value-type="float" office:value="13.85">
            <text:p>13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9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21.63">
            <text:p>1521,63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">
            <text:p>13,7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99.43">
            <text:p>99,43</text:p>
          </table:table-cell>
          <table:table-cell table:style-name="ce12N2" office:value-type="float" office:value="1793.81">
            <text:p>1793,81</text:p>
          </table:table-cell>
          <table:table-cell table:style-name="ce12N2" office:value-type="float" office:value="117.08">
            <text:p>11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84831570555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5">
            <text:p>310715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20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367.34">
            <text:p>7436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4367.34">
            <text:p>7436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05249">
            <text:p>2,605</text:p>
          </table:table-cell>
          <table:table-cell table:style-name="ce12N2" office:value-type="float" office:value="381.67">
            <text:p>38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4.367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343.29">
            <text:p>61343,29</text:p>
          </table:table-cell>
          <table:table-cell table:style-name="ce12N2" office:value-type="float" office:value="61.35">
            <text:p>6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2.09">
            <text:p>552,09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367.34">
            <text:p>74367,34</text:p>
          </table:table-cell>
          <table:table-cell table:style-name="ce12N2" office:value-type="float" office:value="6771.43">
            <text:p>677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01422400001205500100072046619472864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63">
            <text:p>310763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5.0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249">
            <text:p>1924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249">
            <text:p>1924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174">
            <text:p>6,174</text:p>
          </table:table-cell>
          <table:table-cell table:style-name="ce12N2" office:value-type="float" office:value="3230">
            <text:p>32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24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72.25">
            <text:p>15372,25</text:p>
          </table:table-cell>
          <table:table-cell table:style-name="ce12N2" office:value-type="float" office:value="15.37">
            <text:p>1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.35">
            <text:p>138,35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249">
            <text:p>19249,00</text:p>
          </table:table-cell>
          <table:table-cell table:style-name="ce12N2" office:value-type="float" office:value="2309.88">
            <text:p>2309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50401490540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3">
            <text:p>310783</text:p>
          </table:table-cell>
          <table:table-cell table:style-name="ce0" table:number-columns-spanned="4" table:number-rows-spanned="1" office:value-type="string" calcext:value-type="string">
            <text:p>29.771 - SIEMENS INFRAESTRUTURA E INDUSTRIA LTDA.</text:p>
          </table:table-cell>
          <table:covered-table-cell table:number-columns-repeated="3"/>
          <table:table-cell table:style-name="ce0" office:value-type="string" calcext:value-type="string">
            <text:p>371.947</text:p>
          </table:table-cell>
          <table:table-cell table:style-name="ce9" office:value-type="string" calcext:value-type="string">
            <text:p>1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4.37">
            <text:p>761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364.5">
            <text:p>736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13">
            <text:p>0,041</text:p>
          </table:table-cell>
          <table:table-cell table:style-name="ce12N2" office:value-type="float" office:value="33.74">
            <text:p>33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14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15.95">
            <text:p>6415,95</text:p>
          </table:table-cell>
          <table:table-cell table:style-name="ce12N2" office:value-type="float" office:value="6.4">
            <text:p>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73">
            <text:p>57,7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249.87">
            <text:p>249,87</text:p>
          </table:table-cell>
          <table:table-cell table:style-name="ce12N2" office:value-type="float" office:value="7364.5">
            <text:p>7364,50</text:p>
          </table:table-cell>
          <table:table-cell table:style-name="ce12N2" office:value-type="float" office:value="294.58">
            <text:p>29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47760070008985501100037194719277936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4">
            <text:p>310784</text:p>
          </table:table-cell>
          <table:table-cell table:style-name="ce0" table:number-columns-spanned="4" table:number-rows-spanned="1" office:value-type="string" calcext:value-type="string">
            <text:p>13.629 - COLUMBIA COMERCIAL DE FERRAMENTAS ELETRI LTDA</text:p>
          </table:table-cell>
          <table:covered-table-cell table:number-columns-repeated="3"/>
          <table:table-cell table:style-name="ce0" office:value-type="string" calcext:value-type="string">
            <text:p>66.1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73.16">
            <text:p>867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673.16">
            <text:p>8673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2212">
            <text:p>0,202</text:p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73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56.05">
            <text:p>7556,05</text:p>
          </table:table-cell>
          <table:table-cell table:style-name="ce12N2" office:value-type="float" office:value="7.56">
            <text:p>7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01">
            <text:p>68,0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73.16">
            <text:p>8673,16</text:p>
          </table:table-cell>
          <table:table-cell table:style-name="ce12N2" office:value-type="float" office:value="346.93">
            <text:p>34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81880290001505500100006618213050648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5">
            <text:p>31078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5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754.86">
            <text:p>6975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12N2" office:value-type="float" office:value="65865.55">
            <text:p>65865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8254">
            <text:p>2,583</text:p>
          </table:table-cell>
          <table:table-cell table:style-name="ce12N2" office:value-type="float" office:value="486.86">
            <text:p>486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.754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588.87">
            <text:p>55588,87</text:p>
          </table:table-cell>
          <table:table-cell table:style-name="ce12N2" office:value-type="float" office:value="55.6">
            <text:p>5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0.29">
            <text:p>500,2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3889.31">
            <text:p>3889,31</text:p>
          </table:table-cell>
          <table:table-cell table:style-name="ce12N2" office:value-type="float" office:value="65865.55">
            <text:p>65865,55</text:p>
          </table:table-cell>
          <table:table-cell table:style-name="ce12N2" office:value-type="float" office:value="4610.59">
            <text:p>461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5451390643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7">
            <text:p>310787</text:p>
          </table:table-cell>
          <table:table-cell table:style-name="ce0" table:number-columns-spanned="4" table:number-rows-spanned="1" office:value-type="string" calcext:value-type="string">
            <text:p>1.670 - ARQUA IND. BRASILEIRA DE MANGUEIRAS E TERMOPLASTICOS LTDA</text:p>
          </table:table-cell>
          <table:covered-table-cell table:number-columns-repeated="3"/>
          <table:table-cell table:style-name="ce0" office:value-type="string" calcext:value-type="string">
            <text:p>17.8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38.61">
            <text:p>31438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30449.02">
            <text:p>3044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479713">
            <text:p>3,480</text:p>
          </table:table-cell>
          <table:table-cell table:style-name="ce12N2" office:value-type="float" office:value="1175.62">
            <text:p>1175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438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698.21">
            <text:p>25698,21</text:p>
          </table:table-cell>
          <table:table-cell table:style-name="ce12N2" office:value-type="float" office:value="25.7">
            <text:p>2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.28">
            <text:p>231,2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989.59">
            <text:p>989,59</text:p>
          </table:table-cell>
          <table:table-cell table:style-name="ce12N2" office:value-type="float" office:value="30449.02">
            <text:p>30449,02</text:p>
          </table:table-cell>
          <table:table-cell table:style-name="ce12N2" office:value-type="float" office:value="2131.43">
            <text:p>213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081333150001195500100001781619634719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9">
            <text:p>31078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70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3.01">
            <text:p>205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55.25">
            <text:p>195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7">
            <text:p>0,002</text:p>
          </table:table-cell>
          <table:table-cell table:style-name="ce12N2" office:value-type="float" office:value="1.8">
            <text:p>1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53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0.18">
            <text:p>1650,18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85">
            <text:p>14,8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97.76">
            <text:p>97,76</text:p>
          </table:table-cell>
          <table:table-cell table:style-name="ce12N2" office:value-type="float" office:value="1955.25">
            <text:p>1955,25</text:p>
          </table:table-cell>
          <table:table-cell table:style-name="ce12N2" office:value-type="float" office:value="136.87">
            <text:p>13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70613123621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0">
            <text:p>31079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66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22.57">
            <text:p>642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52">
            <text:p>585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">
            <text:p>0,008</text:p>
          </table:table-cell>
          <table:table-cell table:style-name="ce12N2" office:value-type="float" office:value="0.2">
            <text:p>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22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38.94">
            <text:p>4938,94</text:p>
          </table:table-cell>
          <table:table-cell table:style-name="ce12N2" office:value-type="float" office:value="4.94">
            <text:p>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45">
            <text:p>44,4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70.57">
            <text:p>570,57</text:p>
          </table:table-cell>
          <table:table-cell table:style-name="ce12N2" office:value-type="float" office:value="5852">
            <text:p>5852,00</text:p>
          </table:table-cell>
          <table:table-cell table:style-name="ce12N2" office:value-type="float" office:value="409.64">
            <text:p>409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66919637549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1">
            <text:p>31079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8.3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54.07">
            <text:p>2615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330.82">
            <text:p>2533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925">
            <text:p>30925,000</text:p>
          </table:table-cell>
          <table:table-cell table:style-name="ce12N2" office:value-type="float" office:value="3092.5">
            <text:p>309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154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78.58">
            <text:p>21378,58</text:p>
          </table:table-cell>
          <table:table-cell table:style-name="ce12N2" office:value-type="float" office:value="21.38">
            <text:p>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2.41">
            <text:p>192,4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823.25">
            <text:p>823,25</text:p>
          </table:table-cell>
          <table:table-cell table:style-name="ce12N2" office:value-type="float" office:value="25330.82">
            <text:p>25330,82</text:p>
          </table:table-cell>
          <table:table-cell table:style-name="ce12N2" office:value-type="float" office:value="1773.16">
            <text:p>177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83321584283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4">
            <text:p>310794</text:p>
          </table:table-cell>
          <table:table-cell table:style-name="ce0" table:number-columns-spanned="4" table:number-rows-spanned="1" office:value-type="string" calcext:value-type="string">
            <text:p>13.027 - THELMAR-INDUSTRIA DE ABRACADEIRAS LTDA</text:p>
          </table:table-cell>
          <table:covered-table-cell table:number-columns-repeated="3"/>
          <table:table-cell table:style-name="ce0" office:value-type="string" calcext:value-type="string">
            <text:p>13.111</text:p>
          </table:table-cell>
          <table:table-cell table:style-name="ce9" office:value-type="string" calcext:value-type="string">
            <text:p>100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04.38">
            <text:p>750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191.51">
            <text:p>7191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72">
            <text:p>0,317</text:p>
          </table:table-cell>
          <table:table-cell table:style-name="ce12N2" office:value-type="float" office:value="295.65">
            <text:p>295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04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44">
            <text:p>6444,00</text:p>
          </table:table-cell>
          <table:table-cell table:style-name="ce12N2" office:value-type="float" office:value="6.45">
            <text:p>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99">
            <text:p>57,99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7191.51">
            <text:p>7191,51</text:p>
          </table:table-cell>
          <table:table-cell table:style-name="ce12N2" office:value-type="float" office:value="503.4">
            <text:p>50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03984342000181551000000131111131179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6">
            <text:p>310796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4.91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87.4">
            <text:p>2668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687.4">
            <text:p>2668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029">
            <text:p>0,703</text:p>
          </table:table-cell>
          <table:table-cell table:style-name="ce12N2" office:value-type="float" office:value="450">
            <text:p>4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68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523.49">
            <text:p>22523,49</text:p>
          </table:table-cell>
          <table:table-cell table:style-name="ce12N2" office:value-type="float" office:value="22.53">
            <text:p>2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2.71">
            <text:p>202,7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687.4">
            <text:p>26687,40</text:p>
          </table:table-cell>
          <table:table-cell table:style-name="ce12N2" office:value-type="float" office:value="1868.12">
            <text:p>186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491112121298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7">
            <text:p>310797</text:p>
          </table:table-cell>
          <table:table-cell table:style-name="ce0" table:number-columns-spanned="4" table:number-rows-spanned="1" office:value-type="string" calcext:value-type="string">
            <text:p>14.578 - CARBOGRAFITE EQUIPAMENTOS INDUSTRIAIS LTDA</text:p>
          </table:table-cell>
          <table:covered-table-cell table:number-columns-repeated="3"/>
          <table:table-cell table:style-name="ce0" office:value-type="string" calcext:value-type="string">
            <text:p>811.87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7.99">
            <text:p>29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10">
            <text:p>2910,00</text:p>
          </table:table-cell>
          <table:table-cell table:style-name="ce12N2" office:value-type="float" office:value="7.99">
            <text:p>7,99</text:p>
          </table:table-cell>
          <table:table-cell table:style-name="ce12N3" office:value-type="float" office:value="0.6">
            <text:p>0,600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4.72">
            <text:p>2454,72</text:p>
          </table:table-cell>
          <table:table-cell table:style-name="ce12N2" office:value-type="float" office:value="2.45">
            <text:p>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09">
            <text:p>22,09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7.99">
            <text:p>2917,99</text:p>
          </table:table-cell>
          <table:table-cell table:style-name="ce12N2" office:value-type="float" office:value="204.26">
            <text:p>20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36427615000146550000008118791882593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1">
            <text:p>31080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6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17.2">
            <text:p>1041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17.2">
            <text:p>1041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4184">
            <text:p>0,842</text:p>
          </table:table-cell>
          <table:table-cell table:style-name="ce12N2" office:value-type="float" office:value="218.32">
            <text:p>218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41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91.86">
            <text:p>8791,86</text:p>
          </table:table-cell>
          <table:table-cell table:style-name="ce12N2" office:value-type="float" office:value="8.79">
            <text:p>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.13">
            <text:p>79,1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417.2">
            <text:p>10417,20</text:p>
          </table:table-cell>
          <table:table-cell table:style-name="ce12N2" office:value-type="float" office:value="729.2">
            <text:p>72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646613408405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2">
            <text:p>31080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6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3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04.3">
            <text:p>260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04.3">
            <text:p>260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46">
            <text:p>0,210</text:p>
          </table:table-cell>
          <table:table-cell table:style-name="ce12N2" office:value-type="float" office:value="54.58">
            <text:p>54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0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97.97">
            <text:p>2197,97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8">
            <text:p>19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4.3">
            <text:p>2604,30</text:p>
          </table:table-cell>
          <table:table-cell table:style-name="ce12N2" office:value-type="float" office:value="182.3">
            <text:p>18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646719100373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4">
            <text:p>310804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6.090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265.67">
            <text:p>113265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11577.84">
            <text:p>11157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06451">
            <text:p>9,065</text:p>
          </table:table-cell>
          <table:table-cell table:style-name="ce12N2" office:value-type="float" office:value="16694">
            <text:p>1669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3.265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9636.33">
            <text:p>89636,33</text:p>
          </table:table-cell>
          <table:table-cell table:style-name="ce12N2" office:value-type="float" office:value="89.64">
            <text:p>89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6.72">
            <text:p>806,7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687.83">
            <text:p>1687,83</text:p>
          </table:table-cell>
          <table:table-cell table:style-name="ce12N2" office:value-type="float" office:value="111577.84">
            <text:p>111577,84</text:p>
          </table:table-cell>
          <table:table-cell table:style-name="ce12N2" office:value-type="float" office:value="12805.03">
            <text:p>12805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33081704002210550180000860901186432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5">
            <text:p>31080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7.8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62.4">
            <text:p>396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62.4">
            <text:p>396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04">
            <text:p>0,053</text:p>
          </table:table-cell>
          <table:table-cell table:style-name="ce12N2" office:value-type="float" office:value="13.35">
            <text:p>13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6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52.05">
            <text:p>3452,05</text:p>
          </table:table-cell>
          <table:table-cell table:style-name="ce12N2" office:value-type="float" office:value="3.45">
            <text:p>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07">
            <text:p>31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62.4">
            <text:p>3962,40</text:p>
          </table:table-cell>
          <table:table-cell table:style-name="ce12N2" office:value-type="float" office:value="158.5">
            <text:p>15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78591754941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7">
            <text:p>31080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4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3.33">
            <text:p>473,33</text:p>
          </table:table-cell>
          <table:table-cell table:style-name="ce12N2" office:value-type="float" office:value="28.02">
            <text:p>28,02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9.3">
            <text:p>45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2">
            <text:p>0,022</text:p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3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5.74">
            <text:p>375,74</text:p>
          </table:table-cell>
          <table:table-cell table:style-name="ce12N2" office:value-type="float" office:value="0.38">
            <text:p>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39">
            <text:p>3,39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2.05">
            <text:p>42,05</text:p>
          </table:table-cell>
          <table:table-cell table:style-name="ce12N2" office:value-type="float" office:value="431.28">
            <text:p>431,28</text:p>
          </table:table-cell>
          <table:table-cell table:style-name="ce12N2" office:value-type="float" office:value="17.25">
            <text:p>1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493614624314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0">
            <text:p>310820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8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60.86">
            <text:p>636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161.95">
            <text:p>5161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306776">
            <text:p>16,307</text:p>
          </table:table-cell>
          <table:table-cell table:style-name="ce12N2" office:value-type="float" office:value="159.24">
            <text:p>159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60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56.56">
            <text:p>4356,56</text:p>
          </table:table-cell>
          <table:table-cell table:style-name="ce12N2" office:value-type="float" office:value="4.36">
            <text:p>4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21">
            <text:p>39,2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61.95">
            <text:p>5161,95</text:p>
          </table:table-cell>
          <table:table-cell table:style-name="ce12N2" office:value-type="float" office:value="361.34">
            <text:p>36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801.26">
            <text:p>7801,26</text:p>
          </table:table-cell>
          <table:table-cell table:style-name="ce12N2" office:value-type="float" office:value="1198.91">
            <text:p>1198,91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370081450001495500100010862118284790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1">
            <text:p>310821</text:p>
          </table:table-cell>
          <table:table-cell table:style-name="ce0" table:number-columns-spanned="4" table:number-rows-spanned="1" office:value-type="string" calcext:value-type="string">
            <text:p>38.402 - TECESA COMERCIO EXTERIOR LTDA</text:p>
          </table:table-cell>
          <table:covered-table-cell table:number-columns-repeated="3"/>
          <table:table-cell table:style-name="ce0" office:value-type="string" calcext:value-type="string">
            <text:p>6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98.68">
            <text:p>1989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824">
            <text:p>138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8786">
            <text:p>7,879</text:p>
          </table:table-cell>
          <table:table-cell table:style-name="ce12N2" office:value-type="float" office:value="872">
            <text:p>8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89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88.45">
            <text:p>12288,45</text:p>
          </table:table-cell>
          <table:table-cell table:style-name="ce12N2" office:value-type="float" office:value="12.28">
            <text:p>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.59">
            <text:p>110,5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347.84">
            <text:p>1347,84</text:p>
          </table:table-cell>
          <table:table-cell table:style-name="ce12N2" office:value-type="float" office:value="13824">
            <text:p>13824,00</text:p>
          </table:table-cell>
          <table:table-cell table:style-name="ce12N2" office:value-type="float" office:value="552.96">
            <text:p>55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6399">
            <text:p>26399,00</text:p>
          </table:table-cell>
          <table:table-cell table:style-name="ce12N2" office:value-type="float" office:value="4726.84">
            <text:p>4726,84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5358276000138550010000006121928729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2">
            <text:p>310822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92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273.86">
            <text:p>16827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2977.1">
            <text:p>16297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92825">
            <text:p>32,928</text:p>
          </table:table-cell>
          <table:table-cell table:style-name="ce12N2" office:value-type="float" office:value="3047.75">
            <text:p>3047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8.273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7548.61">
            <text:p>137548,61</text:p>
          </table:table-cell>
          <table:table-cell table:style-name="ce12N2" office:value-type="float" office:value="137.55">
            <text:p>13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7.94">
            <text:p>1237,94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296.76">
            <text:p>5296,76</text:p>
          </table:table-cell>
          <table:table-cell table:style-name="ce12N2" office:value-type="float" office:value="162977.1">
            <text:p>162977,10</text:p>
          </table:table-cell>
          <table:table-cell table:style-name="ce12N2" office:value-type="float" office:value="11408.4">
            <text:p>1140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0808396000521550010008923861942486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3">
            <text:p>310823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92.3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004.89">
            <text:p>5900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57181.49">
            <text:p>57181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612303">
            <text:p>19,612</text:p>
          </table:table-cell>
          <table:table-cell table:style-name="ce12N2" office:value-type="float" office:value="3489.36">
            <text:p>348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.004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892">
            <text:p>48892,00</text:p>
          </table:table-cell>
          <table:table-cell table:style-name="ce12N2" office:value-type="float" office:value="48.88">
            <text:p>4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0.05">
            <text:p>440,05</text:p>
          </table:table-cell>
          <table:table-cell table:style-name="ce12N2" office:value-type="float" office:value="55.14">
            <text:p>55,1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823.4">
            <text:p>1823,40</text:p>
          </table:table-cell>
          <table:table-cell table:style-name="ce12N2" office:value-type="float" office:value="51916.07">
            <text:p>51916,07</text:p>
          </table:table-cell>
          <table:table-cell table:style-name="ce12N2" office:value-type="float" office:value="3306.01">
            <text:p>330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08083960005215500100089238716826801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5">
            <text:p>310825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936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039.51">
            <text:p>16003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160039.51">
            <text:p>160039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10574">
            <text:p>10,106</text:p>
          </table:table-cell>
          <table:table-cell table:style-name="ce12N2" office:value-type="float" office:value="22132.13">
            <text:p>22132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0.039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069.38">
            <text:p>135069,38</text:p>
          </table:table-cell>
          <table:table-cell table:style-name="ce12N2" office:value-type="float" office:value="135.09">
            <text:p>13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5.61">
            <text:p>1215,6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039.51">
            <text:p>160039,51</text:p>
          </table:table-cell>
          <table:table-cell table:style-name="ce12N2" office:value-type="float" office:value="11202.77">
            <text:p>1120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093619341881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1">
            <text:p>310831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945.98">
            <text:p>4094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40945.98">
            <text:p>4094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959">
            <text:p>5,196</text:p>
          </table:table-cell>
          <table:table-cell table:style-name="ce12N2" office:value-type="float" office:value="584">
            <text:p>58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94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689.84">
            <text:p>36689,84</text:p>
          </table:table-cell>
          <table:table-cell table:style-name="ce12N2" office:value-type="float" office:value="36.69">
            <text:p>3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0.21">
            <text:p>330,2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945.98">
            <text:p>40945,98</text:p>
          </table:table-cell>
          <table:table-cell table:style-name="ce12N2" office:value-type="float" office:value="2866.23">
            <text:p>286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1910186367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2">
            <text:p>310832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.3">
            <text:p>95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53.3">
            <text:p>953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56">
            <text:p>0,196</text:p>
          </table:table-cell>
          <table:table-cell table:style-name="ce12N2" office:value-type="float" office:value="31.5">
            <text:p>3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4.2">
            <text:p>854,20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9">
            <text:p>7,6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3.3">
            <text:p>953,30</text:p>
          </table:table-cell>
          <table:table-cell table:style-name="ce12N2" office:value-type="float" office:value="66.73">
            <text:p>6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2214304103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6">
            <text:p>310836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6.82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831.6">
            <text:p>1128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9280">
            <text:p>1092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508">
            <text:p>49,508</text:p>
          </table:table-cell>
          <table:table-cell table:style-name="ce12N2" office:value-type="float" office:value="25000">
            <text:p>25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2.8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229.59">
            <text:p>92229,59</text:p>
          </table:table-cell>
          <table:table-cell table:style-name="ce12N2" office:value-type="float" office:value="92.23">
            <text:p>9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0.07">
            <text:p>830,07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3551.6">
            <text:p>3551,60</text:p>
          </table:table-cell>
          <table:table-cell table:style-name="ce12N2" office:value-type="float" office:value="109280">
            <text:p>109280,00</text:p>
          </table:table-cell>
          <table:table-cell table:style-name="ce12N2" office:value-type="float" office:value="7649.6">
            <text:p>764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682418378530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9">
            <text:p>310839</text:p>
          </table:table-cell>
          <table:table-cell table:style-name="ce0" table:number-columns-spanned="4" table:number-rows-spanned="1" office:value-type="string" calcext:value-type="string">
            <text:p>602 - DECORLUX MATERIAL ELETRICO LTDA</text:p>
          </table:table-cell>
          <table:covered-table-cell table:number-columns-repeated="3"/>
          <table:table-cell table:style-name="ce0" office:value-type="string" calcext:value-type="string">
            <text:p>204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604.41">
            <text:p>2860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26454.54">
            <text:p>26454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7.699055">
            <text:p>377,699</text:p>
          </table:table-cell>
          <table:table-cell table:style-name="ce12N2" office:value-type="float" office:value="78.47">
            <text:p>78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604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047.16">
            <text:p>23047,16</text:p>
          </table:table-cell>
          <table:table-cell table:style-name="ce12N2" office:value-type="float" office:value="23.06">
            <text:p>2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.43">
            <text:p>207,4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2149.87">
            <text:p>2149,87</text:p>
          </table:table-cell>
          <table:table-cell table:style-name="ce12N2" office:value-type="float" office:value="26454.54">
            <text:p>26454,54</text:p>
          </table:table-cell>
          <table:table-cell table:style-name="ce12N2" office:value-type="float" office:value="1058.19">
            <text:p>105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2382942000107550010002048841235478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0">
            <text:p>310840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53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2.36">
            <text:p>355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35.55">
            <text:p>3335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4">
            <text:p>0,059</text:p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5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9.34">
            <text:p>2859,34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3">
            <text:p>25,73</text:p>
          </table:table-cell>
          <table:table-cell table:style-name="ce12N2" office:value-type="float" office:value="44.08">
            <text:p>44,0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216.81">
            <text:p>216,81</text:p>
          </table:table-cell>
          <table:table-cell table:style-name="ce12N2" office:value-type="float" office:value="3335.55">
            <text:p>3335,55</text:p>
          </table:table-cell>
          <table:table-cell table:style-name="ce12N2" office:value-type="float" office:value="133.42">
            <text:p>13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5381820249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1">
            <text:p>31084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7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635">
            <text:p>0,038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3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33.65">
            <text:p>7033,65</text:p>
          </table:table-cell>
          <table:table-cell table:style-name="ce12N2" office:value-type="float" office:value="7.03">
            <text:p>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3">
            <text:p>63,3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583.38">
            <text:p>58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79713977900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3">
            <text:p>310853</text:p>
          </table:table-cell>
          <table:table-cell table:style-name="ce0" table:number-columns-spanned="4" table:number-rows-spanned="1" office:value-type="string" calcext:value-type="string">
            <text:p>10.606 - ZMA- PERFIL DE ALUMINIO EIRELI-ME</text:p>
          </table:table-cell>
          <table:covered-table-cell table:number-columns-repeated="3"/>
          <table:table-cell table:style-name="ce0" office:value-type="string" calcext:value-type="string">
            <text:p>18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175">
            <text:p>2,317</text:p>
          </table:table-cell>
          <table:table-cell table:style-name="ce12N2" office:value-type="float" office:value="710.5">
            <text:p>71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44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255.92">
            <text:p>17255,92</text:p>
          </table:table-cell>
          <table:table-cell table:style-name="ce12N2" office:value-type="float" office:value="17.23">
            <text:p>1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5.27">
            <text:p>155,27</text:p>
          </table:table-cell>
          <table:table-cell table:style-name="ce12N2" office:value-type="float" office:value="49.33">
            <text:p>49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1431.22">
            <text:p>143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02961810001455500100001852710015324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4">
            <text:p>310854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5.7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0.66">
            <text:p>184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28.32">
            <text:p>1728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712">
            <text:p>0,153</text:p>
          </table:table-cell>
          <table:table-cell table:style-name="ce12N2" office:value-type="float" office:value="26.6">
            <text:p>2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40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8.66">
            <text:p>1458,66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13">
            <text:p>13,1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12.34">
            <text:p>112,34</text:p>
          </table:table-cell>
          <table:table-cell table:style-name="ce12N2" office:value-type="float" office:value="1728.32">
            <text:p>1728,32</text:p>
          </table:table-cell>
          <table:table-cell table:style-name="ce12N2" office:value-type="float" office:value="120.98">
            <text:p>12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50238000114550010013757071218753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5">
            <text:p>310855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6.871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4">
            <text:p>834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44">
            <text:p>83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6">
            <text:p>0,017</text:p>
          </table:table-cell>
          <table:table-cell table:style-name="ce12N2" office:value-type="float" office:value="1000">
            <text:p>1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4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42.13">
            <text:p>7042,13</text:p>
          </table:table-cell>
          <table:table-cell table:style-name="ce12N2" office:value-type="float" office:value="7.04">
            <text:p>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38">
            <text:p>63,38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44">
            <text:p>8344,00</text:p>
          </table:table-cell>
          <table:table-cell table:style-name="ce12N2" office:value-type="float" office:value="584.08">
            <text:p>58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687113621171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7">
            <text:p>310857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125">
            <text:p>13,125</text:p>
          </table:table-cell>
          <table:table-cell table:style-name="ce12N2" office:value-type="float" office:value="140">
            <text:p>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696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71.75">
            <text:p>9871,75</text:p>
          </table:table-cell>
          <table:table-cell table:style-name="ce12N2" office:value-type="float" office:value="9.87">
            <text:p>9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.85">
            <text:p>88,8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818.77">
            <text:p>81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60510689351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9">
            <text:p>310859</text:p>
          </table:table-cell>
          <table:table-cell table:style-name="ce0" table:number-columns-spanned="4" table:number-rows-spanned="1" office:value-type="string" calcext:value-type="string">
            <text:p>13.600 - ANJO QUIMICA DO BRASIL LTDA</text:p>
          </table:table-cell>
          <table:covered-table-cell table:number-columns-repeated="3"/>
          <table:table-cell table:style-name="ce0" office:value-type="string" calcext:value-type="string">
            <text:p>481.10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567">
            <text:p>5,457</text:p>
          </table:table-cell>
          <table:table-cell table:style-name="ce12N2" office:value-type="float" office:value="3753">
            <text:p>375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69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787">
            <text:p>42787,00</text:p>
          </table:table-cell>
          <table:table-cell table:style-name="ce12N2" office:value-type="float" office:value="42.79">
            <text:p>42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5.08">
            <text:p>385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3548.79">
            <text:p>354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921346000158550020004811071915915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38">
            <text:p>138,00</text:p>
          </table:table-cell>
          <table:table-cell table:style-name="ce26N2" office:value-type="float" office:value="15854.97">
            <text:p>15854,97</text:p>
          </table:table-cell>
          <table:table-cell table:style-name="ce26N2" office:value-type="float" office:value="945.37">
            <text:p>945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0859.01">
            <text:p>90859,01</text:p>
          </table:table-cell>
          <table:table-cell table:style-name="ce26N2" office:value-type="float" office:value="6040357.69">
            <text:p>6040357,69</text:p>
          </table:table-cell>
          <table:table-cell table:style-name="ce26N2" office:value-type="float" office:value="393563.99">
            <text:p>393563,9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2083.19">
            <text:p>12083,19</text:p>
          </table:table-cell>
          <table:table-cell table:style-name="ce26N2" office:value-type="float" office:value="6250673.91">
            <text:p>6250673,9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7122.11">
            <text:p>77122,11</text:p>
          </table:table-cell>
          <table:table-cell table:style-name="ce26N2" office:value-type="float" office:value="13934.49">
            <text:p>13934,49</text:p>
          </table:table-cell>
          <table:table-cell table:style-name="ce26N2" office:value-type="float" office:value="719.83">
            <text:p>719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79891.726596">
            <text:p>79891,727</text:p>
          </table:table-cell>
          <table:table-cell table:style-name="ce26N2" office:value-type="float" office:value="6160790.01">
            <text:p>6160790,01</text:p>
          </table:table-cell>
          <table:table-cell table:style-name="ce26N2" office:value-type="float" office:value="6250673.91">
            <text:p>6250673,9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191018.62">
            <text:p>5191018,62</text:p>
          </table:table-cell>
          <table:table-cell table:style-name="ce26N2" office:value-type="float" office:value="5190.95">
            <text:p>5190,9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6719.22">
            <text:p>46719,22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92936.79">
            <text:p>292936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2.18">
            <text:p>72,1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270" meta:object-count="0"/>
    <meta:generator>LibreOffice/4.3.0.4$Windows_x86 LibreOffice_project/62ad5818884a2fc2e5780dd45466868d41009ec0</meta:generator>
  </office:meta>
</office:document-meta>
</file>