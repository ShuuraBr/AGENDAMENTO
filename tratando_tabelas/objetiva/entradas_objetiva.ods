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5/06/2026 07:37:42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9">
            <text:p>307899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2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8">
            <text:p>0,005</text:p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4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135.87">
            <text:p>13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611441500006785500100127222813931105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6">
            <text:p>307956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4.4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525.36">
            <text:p>5452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44813.12">
            <text:p>4481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525808">
            <text:p>7,526</text:p>
          </table:table-cell>
          <table:table-cell table:style-name="ce12N2" office:value-type="float" office:value="751.49">
            <text:p>751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525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894.88">
            <text:p>2894,88</text:p>
          </table:table-cell>
          <table:table-cell table:style-name="ce12N2" office:value-type="float" office:value="42977.89">
            <text:p>42977,89</text:p>
          </table:table-cell>
          <table:table-cell table:style-name="ce12N2" office:value-type="float" office:value="1782.08">
            <text:p>178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037.94">
            <text:p>38037,94</text:p>
          </table:table-cell>
          <table:table-cell table:style-name="ce12N2" office:value-type="float" office:value="6817.36">
            <text:p>6817,36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50940030001555500100018443411512003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1">
            <text:p>308081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89.57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07.35">
            <text:p>800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55.64">
            <text:p>7955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67406">
            <text:p>2,367</text:p>
          </table:table-cell>
          <table:table-cell table:style-name="ce12N2" office:value-type="float" office:value="8064">
            <text:p>80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0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14.36">
            <text:p>6714,36</text:p>
          </table:table-cell>
          <table:table-cell table:style-name="ce12N2" office:value-type="float" office:value="6.71">
            <text:p>6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43">
            <text:p>60,4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1.71">
            <text:p>51,71</text:p>
          </table:table-cell>
          <table:table-cell table:style-name="ce12N2" office:value-type="float" office:value="7955.64">
            <text:p>7955,64</text:p>
          </table:table-cell>
          <table:table-cell table:style-name="ce12N2" office:value-type="float" office:value="556.89">
            <text:p>556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8957011178059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3">
            <text:p>30810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0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94.92">
            <text:p>819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42">
            <text:p>814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5876">
            <text:p>1,659</text:p>
          </table:table-cell>
          <table:table-cell table:style-name="ce12N2" office:value-type="float" office:value="10198.2">
            <text:p>10198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9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58.49">
            <text:p>6858,49</text:p>
          </table:table-cell>
          <table:table-cell table:style-name="ce12N2" office:value-type="float" office:value="6.86">
            <text:p>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73">
            <text:p>61,73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2.92">
            <text:p>52,92</text:p>
          </table:table-cell>
          <table:table-cell table:style-name="ce12N2" office:value-type="float" office:value="8349">
            <text:p>8349,00</text:p>
          </table:table-cell>
          <table:table-cell table:style-name="ce12N2" office:value-type="float" office:value="584.43">
            <text:p>58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0281178273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9">
            <text:p>30810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02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480.32">
            <text:p>4348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199.52">
            <text:p>43199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221614">
            <text:p>7,222</text:p>
          </table:table-cell>
          <table:table-cell table:style-name="ce12N2" office:value-type="float" office:value="22559.95">
            <text:p>22559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480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459.31">
            <text:p>36459,31</text:p>
          </table:table-cell>
          <table:table-cell table:style-name="ce12N2" office:value-type="float" office:value="36.46">
            <text:p>3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13">
            <text:p>328,13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80.8">
            <text:p>280,80</text:p>
          </table:table-cell>
          <table:table-cell table:style-name="ce12N2" office:value-type="float" office:value="43199.52">
            <text:p>43199,52</text:p>
          </table:table-cell>
          <table:table-cell table:style-name="ce12N2" office:value-type="float" office:value="3023.97">
            <text:p>302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0201736175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11">
            <text:p>308111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05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12.09">
            <text:p>1841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93.18">
            <text:p>18293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88646">
            <text:p>2,889</text:p>
          </table:table-cell>
          <table:table-cell table:style-name="ce12N2" office:value-type="float" office:value="9023.94">
            <text:p>9023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412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38.99">
            <text:p>15438,99</text:p>
          </table:table-cell>
          <table:table-cell table:style-name="ce12N2" office:value-type="float" office:value="15.44">
            <text:p>15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.95">
            <text:p>138,95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18.91">
            <text:p>118,91</text:p>
          </table:table-cell>
          <table:table-cell table:style-name="ce12N2" office:value-type="float" office:value="18293.18">
            <text:p>18293,18</text:p>
          </table:table-cell>
          <table:table-cell table:style-name="ce12N2" office:value-type="float" office:value="1280.52">
            <text:p>128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0511838250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8">
            <text:p>30819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54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44.72">
            <text:p>2124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1107.52">
            <text:p>21107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057069">
            <text:p>5,057</text:p>
          </table:table-cell>
          <table:table-cell table:style-name="ce12N2" office:value-type="float" office:value="22015.99">
            <text:p>22015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24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814.22">
            <text:p>17814,22</text:p>
          </table:table-cell>
          <table:table-cell table:style-name="ce12N2" office:value-type="float" office:value="17.81">
            <text:p>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.33">
            <text:p>160,3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37.2">
            <text:p>137,20</text:p>
          </table:table-cell>
          <table:table-cell table:style-name="ce12N2" office:value-type="float" office:value="21107.52">
            <text:p>21107,52</text:p>
          </table:table-cell>
          <table:table-cell table:style-name="ce12N2" office:value-type="float" office:value="1477.53">
            <text:p>147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5461549419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06">
            <text:p>308206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29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18.58">
            <text:p>1051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450.65">
            <text:p>10450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11109">
            <text:p>1,611</text:p>
          </table:table-cell>
          <table:table-cell table:style-name="ce12N2" office:value-type="float" office:value="7024.08">
            <text:p>702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51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820.08">
            <text:p>8820,08</text:p>
          </table:table-cell>
          <table:table-cell table:style-name="ce12N2" office:value-type="float" office:value="8.82">
            <text:p>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.38">
            <text:p>79,38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67.93">
            <text:p>67,93</text:p>
          </table:table-cell>
          <table:table-cell table:style-name="ce12N2" office:value-type="float" office:value="10450.65">
            <text:p>10450,65</text:p>
          </table:table-cell>
          <table:table-cell table:style-name="ce12N2" office:value-type="float" office:value="731.55">
            <text:p>73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29012352403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59">
            <text:p>30825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95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49.78">
            <text:p>2024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119.01">
            <text:p>20119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70087">
            <text:p>3,370</text:p>
          </table:table-cell>
          <table:table-cell table:style-name="ce12N2" office:value-type="float" office:value="10528">
            <text:p>1052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249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979.94">
            <text:p>16979,94</text:p>
          </table:table-cell>
          <table:table-cell table:style-name="ce12N2" office:value-type="float" office:value="16.98">
            <text:p>16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2.82">
            <text:p>152,82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30.77">
            <text:p>130,77</text:p>
          </table:table-cell>
          <table:table-cell table:style-name="ce12N2" office:value-type="float" office:value="20119.01">
            <text:p>20119,01</text:p>
          </table:table-cell>
          <table:table-cell table:style-name="ce12N2" office:value-type="float" office:value="1408.33">
            <text:p>140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9521376486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3">
            <text:p>30826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42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027.59">
            <text:p>3402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807.84">
            <text:p>3380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231">
            <text:p>3,323</text:p>
          </table:table-cell>
          <table:table-cell table:style-name="ce12N2" office:value-type="float" office:value="35337.72">
            <text:p>3533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027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32.97">
            <text:p>28532,97</text:p>
          </table:table-cell>
          <table:table-cell table:style-name="ce12N2" office:value-type="float" office:value="28.53">
            <text:p>2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.8">
            <text:p>256,80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19.75">
            <text:p>219,75</text:p>
          </table:table-cell>
          <table:table-cell table:style-name="ce12N2" office:value-type="float" office:value="33807.84">
            <text:p>33807,84</text:p>
          </table:table-cell>
          <table:table-cell table:style-name="ce12N2" office:value-type="float" office:value="2366.55">
            <text:p>236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42517675730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4">
            <text:p>308264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42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85.02">
            <text:p>1328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99.23">
            <text:p>13199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1958">
            <text:p>0,752</text:p>
          </table:table-cell>
          <table:table-cell table:style-name="ce12N2" office:value-type="float" office:value="5953.15">
            <text:p>5953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285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39.82">
            <text:p>11139,82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.26">
            <text:p>100,2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85.79">
            <text:p>85,79</text:p>
          </table:table-cell>
          <table:table-cell table:style-name="ce12N2" office:value-type="float" office:value="13199.23">
            <text:p>13199,23</text:p>
          </table:table-cell>
          <table:table-cell table:style-name="ce12N2" office:value-type="float" office:value="923.95">
            <text:p>92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42411882852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40">
            <text:p>308340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65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51.3">
            <text:p>2415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995.33">
            <text:p>23995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860216">
            <text:p>4,860</text:p>
          </table:table-cell>
          <table:table-cell table:style-name="ce12N2" office:value-type="float" office:value="18788.4">
            <text:p>1878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51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251.46">
            <text:p>20251,46</text:p>
          </table:table-cell>
          <table:table-cell table:style-name="ce12N2" office:value-type="float" office:value="20.25">
            <text:p>2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.27">
            <text:p>182,27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55.97">
            <text:p>155,97</text:p>
          </table:table-cell>
          <table:table-cell table:style-name="ce12N2" office:value-type="float" office:value="23995.33">
            <text:p>23995,33</text:p>
          </table:table-cell>
          <table:table-cell table:style-name="ce12N2" office:value-type="float" office:value="1679.67">
            <text:p>1679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65213855366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41">
            <text:p>308341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70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18.39">
            <text:p>511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5.34">
            <text:p>5085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91826">
            <text:p>0,592</text:p>
          </table:table-cell>
          <table:table-cell table:style-name="ce12N2" office:value-type="float" office:value="4084.48">
            <text:p>4084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18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91.91">
            <text:p>4291,91</text:p>
          </table:table-cell>
          <table:table-cell table:style-name="ce12N2" office:value-type="float" office:value="4.29">
            <text:p>4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63">
            <text:p>38,63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33.05">
            <text:p>33,05</text:p>
          </table:table-cell>
          <table:table-cell table:style-name="ce12N2" office:value-type="float" office:value="5085.34">
            <text:p>5085,34</text:p>
          </table:table-cell>
          <table:table-cell table:style-name="ce12N2" office:value-type="float" office:value="355.97">
            <text:p>355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70716833562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2">
            <text:p>308352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4">
            <text:p>3,740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6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39.73">
            <text:p>15839,73</text:p>
          </table:table-cell>
          <table:table-cell table:style-name="ce12N2" office:value-type="float" office:value="15.84">
            <text:p>1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56">
            <text:p>142,5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1313.76">
            <text:p>131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89196473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5">
            <text:p>30835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28">
            <text:p>0,663</text:p>
          </table:table-cell>
          <table:table-cell table:style-name="ce12N2" office:value-type="float" office:value="851.2">
            <text:p>85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49.98">
            <text:p>4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.82">
            <text:p>449,8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61063272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8">
            <text:p>30842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784">
            <text:p>0,148</text:p>
          </table:table-cell>
          <table:table-cell table:style-name="ce12N2" office:value-type="float" office:value="23.1">
            <text:p>2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2.46">
            <text:p>512,46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42.5">
            <text:p>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761917120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9">
            <text:p>308429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5672">
            <text:p>4,957</text:p>
          </table:table-cell>
          <table:table-cell table:style-name="ce12N2" office:value-type="float" office:value="95.55">
            <text:p>9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58.75">
            <text:p>4658,75</text:p>
          </table:table-cell>
          <table:table-cell table:style-name="ce12N2" office:value-type="float" office:value="4.66">
            <text:p>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93">
            <text:p>41,93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1740.73">
            <text:p>174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931950412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0">
            <text:p>308430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79.55">
            <text:p>8637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862">
            <text:p>1,239</text:p>
          </table:table-cell>
          <table:table-cell table:style-name="ce12N2" office:value-type="float" office:value="2195.25">
            <text:p>219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.37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01.96">
            <text:p>72901,96</text:p>
          </table:table-cell>
          <table:table-cell table:style-name="ce12N2" office:value-type="float" office:value="72.91">
            <text:p>7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6.11">
            <text:p>656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74.85">
            <text:p>2174,85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3871.9">
            <text:p>387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161511323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8">
            <text:p>30843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71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15.62">
            <text:p>681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33">
            <text:p>0,753</text:p>
          </table:table-cell>
          <table:table-cell table:style-name="ce12N2" office:value-type="float" office:value="5189.18">
            <text:p>5189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15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15.06">
            <text:p>5715,06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.44">
            <text:p>51,44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44.02">
            <text:p>44,02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474.01">
            <text:p>47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7171662897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0">
            <text:p>308440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71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39.07">
            <text:p>1143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65.2">
            <text:p>1136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2008">
            <text:p>3,382</text:p>
          </table:table-cell>
          <table:table-cell table:style-name="ce12N2" office:value-type="float" office:value="11520">
            <text:p>115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439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591.95">
            <text:p>9591,95</text:p>
          </table:table-cell>
          <table:table-cell table:style-name="ce12N2" office:value-type="float" office:value="9.59">
            <text:p>9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33">
            <text:p>86,3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73.87">
            <text:p>73,87</text:p>
          </table:table-cell>
          <table:table-cell table:style-name="ce12N2" office:value-type="float" office:value="11365.2">
            <text:p>11365,20</text:p>
          </table:table-cell>
          <table:table-cell table:style-name="ce12N2" office:value-type="float" office:value="795.56">
            <text:p>79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7181828823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7">
            <text:p>308447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81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15.62">
            <text:p>681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33">
            <text:p>0,753</text:p>
          </table:table-cell>
          <table:table-cell table:style-name="ce12N2" office:value-type="float" office:value="5189.18">
            <text:p>5189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15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15.06">
            <text:p>5715,06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.44">
            <text:p>51,44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44.02">
            <text:p>44,02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474.01">
            <text:p>47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81217713902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9">
            <text:p>30844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81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19.54">
            <text:p>571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82.6">
            <text:p>568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91004">
            <text:p>1,691</text:p>
          </table:table-cell>
          <table:table-cell table:style-name="ce12N2" office:value-type="float" office:value="5760">
            <text:p>57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19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95.97">
            <text:p>4795,97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16">
            <text:p>43,16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36.94">
            <text:p>36,94</text:p>
          </table:table-cell>
          <table:table-cell table:style-name="ce12N2" office:value-type="float" office:value="5682.6">
            <text:p>5682,60</text:p>
          </table:table-cell>
          <table:table-cell table:style-name="ce12N2" office:value-type="float" office:value="397.78">
            <text:p>39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8131522978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53">
            <text:p>30845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83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36.38">
            <text:p>1763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522.49">
            <text:p>17522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672861">
            <text:p>2,673</text:p>
          </table:table-cell>
          <table:table-cell table:style-name="ce12N2" office:value-type="float" office:value="16943.9">
            <text:p>1694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36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88.55">
            <text:p>14788,55</text:p>
          </table:table-cell>
          <table:table-cell table:style-name="ce12N2" office:value-type="float" office:value="14.79">
            <text:p>1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.09">
            <text:p>133,09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13.89">
            <text:p>113,89</text:p>
          </table:table-cell>
          <table:table-cell table:style-name="ce12N2" office:value-type="float" office:value="17522.49">
            <text:p>17522,49</text:p>
          </table:table-cell>
          <table:table-cell table:style-name="ce12N2" office:value-type="float" office:value="1226.57">
            <text:p>122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8321826114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54">
            <text:p>308454</text:p>
          </table:table-cell>
          <table:table-cell table:style-name="ce0" table:number-columns-spanned="4" table:number-rows-spanned="1" office:value-type="string" calcext:value-type="string">
            <text:p>11.272 - POLYSPACE INDUSTRIA DE ACESSORIOS PARA CASA E BANHO LTDA</text:p>
          </table:table-cell>
          <table:covered-table-cell table:number-columns-repeated="3"/>
          <table:table-cell table:style-name="ce0" office:value-type="string" calcext:value-type="string">
            <text:p>21.0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021.05">
            <text:p>1502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5021.05">
            <text:p>15021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5717">
            <text:p>0,357</text:p>
          </table:table-cell>
          <table:table-cell table:style-name="ce12N2" office:value-type="float" office:value="374.4">
            <text:p>37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021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70.22">
            <text:p>12670,22</text:p>
          </table:table-cell>
          <table:table-cell table:style-name="ce12N2" office:value-type="float" office:value="12.66">
            <text:p>1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.04">
            <text:p>114,04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21.05">
            <text:p>15021,05</text:p>
          </table:table-cell>
          <table:table-cell table:style-name="ce12N2" office:value-type="float" office:value="1802.54">
            <text:p>1802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32605231597020001185500100002103919735015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2">
            <text:p>308462</text:p>
          </table:table-cell>
          <table:table-cell table:style-name="ce0" table:number-columns-spanned="4" table:number-rows-spanned="1" office:value-type="string" calcext:value-type="string">
            <text:p>12.902 - CORDOARIA BRASIL INDUSTRIA E COMERCIO DE CORDAS EIRELI</text:p>
          </table:table-cell>
          <table:covered-table-cell table:number-columns-repeated="3"/>
          <table:table-cell table:style-name="ce0" office:value-type="string" calcext:value-type="string">
            <text:p>49.6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78.91">
            <text:p>7378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378.91">
            <text:p>7378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5632">
            <text:p>0,296</text:p>
          </table:table-cell>
          <table:table-cell table:style-name="ce12N2" office:value-type="float" office:value="5299.35">
            <text:p>5299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78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11.91">
            <text:p>6611,91</text:p>
          </table:table-cell>
          <table:table-cell table:style-name="ce12N2" office:value-type="float" office:value="6.61">
            <text:p>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51">
            <text:p>59,51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378.91">
            <text:p>7378,91</text:p>
          </table:table-cell>
          <table:table-cell table:style-name="ce12N2" office:value-type="float" office:value="516.52">
            <text:p>516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4546240001535500100004967717582346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3">
            <text:p>308463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3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926.25">
            <text:p>3492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4897.33">
            <text:p>3489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00045">
            <text:p>2,800</text:p>
          </table:table-cell>
          <table:table-cell table:style-name="ce12N2" office:value-type="float" office:value="300.85">
            <text:p>300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926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125.59">
            <text:p>30125,59</text:p>
          </table:table-cell>
          <table:table-cell table:style-name="ce12N2" office:value-type="float" office:value="30.14">
            <text:p>30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1.14">
            <text:p>271,14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8.92">
            <text:p>28,92</text:p>
          </table:table-cell>
          <table:table-cell table:style-name="ce12N2" office:value-type="float" office:value="34897.33">
            <text:p>34897,33</text:p>
          </table:table-cell>
          <table:table-cell table:style-name="ce12N2" office:value-type="float" office:value="1701.07">
            <text:p>170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333117328070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5">
            <text:p>308465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2.554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1.68">
            <text:p>26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1.68">
            <text:p>261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792">
            <text:p>0,069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1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0.84">
            <text:p>220,84</text:p>
          </table:table-cell>
          <table:table-cell table:style-name="ce12N2" office:value-type="float" office:value="0.22">
            <text:p>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99">
            <text:p>1,99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1.68">
            <text:p>261,68</text:p>
          </table:table-cell>
          <table:table-cell table:style-name="ce12N2" office:value-type="float" office:value="18.32">
            <text:p>1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255415074459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9">
            <text:p>30848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9.07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2.43">
            <text:p>449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3.42">
            <text:p>4463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18314">
            <text:p>0,518</text:p>
          </table:table-cell>
          <table:table-cell table:style-name="ce12N2" office:value-type="float" office:value="2256.02">
            <text:p>2256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9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7.02">
            <text:p>3767,02</text:p>
          </table:table-cell>
          <table:table-cell table:style-name="ce12N2" office:value-type="float" office:value="3.77">
            <text:p>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">
            <text:p>33,90</text:p>
          </table:table-cell>
          <table:table-cell table:style-name="ce12N2" office:value-type="float" office:value="99.55">
            <text:p>99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9.01">
            <text:p>29,01</text:p>
          </table:table-cell>
          <table:table-cell table:style-name="ce12N2" office:value-type="float" office:value="4463.42">
            <text:p>4463,42</text:p>
          </table:table-cell>
          <table:table-cell table:style-name="ce12N2" office:value-type="float" office:value="312.44">
            <text:p>31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907615825243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6">
            <text:p>308496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5.61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76.06">
            <text:p>11076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727.42">
            <text:p>10727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1048">
            <text:p>2,410</text:p>
          </table:table-cell>
          <table:table-cell table:style-name="ce12N2" office:value-type="float" office:value="860.9">
            <text:p>860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076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976.5">
            <text:p>9976,50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.78">
            <text:p>89,7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348.64">
            <text:p>348,64</text:p>
          </table:table-cell>
          <table:table-cell table:style-name="ce12N2" office:value-type="float" office:value="10727.42">
            <text:p>10727,42</text:p>
          </table:table-cell>
          <table:table-cell table:style-name="ce12N2" office:value-type="float" office:value="750.92">
            <text:p>75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6062030000123550020006956121644391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7">
            <text:p>308497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5.60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61.08">
            <text:p>436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223.82">
            <text:p>4223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61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28.15">
            <text:p>3928,15</text:p>
          </table:table-cell>
          <table:table-cell table:style-name="ce12N2" office:value-type="float" office:value="3.93">
            <text:p>3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.34">
            <text:p>35,3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37.26">
            <text:p>137,26</text:p>
          </table:table-cell>
          <table:table-cell table:style-name="ce12N2" office:value-type="float" office:value="4223.82">
            <text:p>4223,82</text:p>
          </table:table-cell>
          <table:table-cell table:style-name="ce12N2" office:value-type="float" office:value="295.67">
            <text:p>295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60620300001235500200069560917482720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8">
            <text:p>308498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5.61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635.78">
            <text:p>11063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06651.02">
            <text:p>106651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9.13361">
            <text:p>29,134</text:p>
          </table:table-cell>
          <table:table-cell table:style-name="ce12N2" office:value-type="float" office:value="8729.32">
            <text:p>8729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0.635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048.12">
            <text:p>90048,12</text:p>
          </table:table-cell>
          <table:table-cell table:style-name="ce12N2" office:value-type="float" office:value="90.05">
            <text:p>90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0.43">
            <text:p>810,4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3984.76">
            <text:p>3984,76</text:p>
          </table:table-cell>
          <table:table-cell table:style-name="ce12N2" office:value-type="float" office:value="106651.02">
            <text:p>106651,02</text:p>
          </table:table-cell>
          <table:table-cell table:style-name="ce12N2" office:value-type="float" office:value="7424.44">
            <text:p>7424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60620300001235500200069561310841401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9">
            <text:p>308499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5.61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7.03">
            <text:p>227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205.36">
            <text:p>2205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488">
            <text:p>0,795</text:p>
          </table:table-cell>
          <table:table-cell table:style-name="ce12N2" office:value-type="float" office:value="230.4">
            <text:p>23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7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50.98">
            <text:p>2050,98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46">
            <text:p>18,4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71.67">
            <text:p>71,67</text:p>
          </table:table-cell>
          <table:table-cell table:style-name="ce12N2" office:value-type="float" office:value="2205.36">
            <text:p>2205,36</text:p>
          </table:table-cell>
          <table:table-cell table:style-name="ce12N2" office:value-type="float" office:value="154.38">
            <text:p>15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60620300001235500200069561115317911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00">
            <text:p>308500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5.61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5.21">
            <text:p>835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8.92">
            <text:p>808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16">
            <text:p>0,056</text:p>
          </table:table-cell>
          <table:table-cell table:style-name="ce12N2" office:value-type="float" office:value="37.8">
            <text:p>3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5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2.3">
            <text:p>752,30</text:p>
          </table:table-cell>
          <table:table-cell table:style-name="ce12N2" office:value-type="float" office:value="0.75">
            <text:p>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77">
            <text:p>6,77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6.29">
            <text:p>26,29</text:p>
          </table:table-cell>
          <table:table-cell table:style-name="ce12N2" office:value-type="float" office:value="808.92">
            <text:p>808,92</text:p>
          </table:table-cell>
          <table:table-cell table:style-name="ce12N2" office:value-type="float" office:value="56.62">
            <text:p>5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60620300001235500200069561011445408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5">
            <text:p>30851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7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02.53">
            <text:p>3510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4470.3">
            <text:p>34470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693168">
            <text:p>3,693</text:p>
          </table:table-cell>
          <table:table-cell table:style-name="ce12N2" office:value-type="float" office:value="190.61">
            <text:p>19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10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347.35">
            <text:p>29347,35</text:p>
          </table:table-cell>
          <table:table-cell table:style-name="ce12N2" office:value-type="float" office:value="29.34">
            <text:p>29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4.12">
            <text:p>264,12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632.23">
            <text:p>632,23</text:p>
          </table:table-cell>
          <table:table-cell table:style-name="ce12N2" office:value-type="float" office:value="34470.3">
            <text:p>34470,30</text:p>
          </table:table-cell>
          <table:table-cell table:style-name="ce12N2" office:value-type="float" office:value="2131.63">
            <text:p>213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79614736633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6">
            <text:p>30851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3.8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942.84">
            <text:p>6394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3942.84">
            <text:p>63942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644">
            <text:p>5,644</text:p>
          </table:table-cell>
          <table:table-cell table:style-name="ce12N2" office:value-type="float" office:value="349.4">
            <text:p>34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.94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966.16">
            <text:p>53966,16</text:p>
          </table:table-cell>
          <table:table-cell table:style-name="ce12N2" office:value-type="float" office:value="53.97">
            <text:p>5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5.7">
            <text:p>485,70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942.84">
            <text:p>63942,84</text:p>
          </table:table-cell>
          <table:table-cell table:style-name="ce12N2" office:value-type="float" office:value="4476">
            <text:p>447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383210632135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8">
            <text:p>30854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1.5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992.53">
            <text:p>25599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172308">
            <text:p>4,172</text:p>
          </table:table-cell>
          <table:table-cell table:style-name="ce12N2" office:value-type="float" office:value="2315.2">
            <text:p>23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5.99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5317.73">
            <text:p>215317,73</text:p>
          </table:table-cell>
          <table:table-cell table:style-name="ce12N2" office:value-type="float" office:value="215.35">
            <text:p>21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7.83">
            <text:p>1937,8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298.56">
            <text:p>1298,56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17429.28">
            <text:p>1742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156518349463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0">
            <text:p>308550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8.54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35.04">
            <text:p>2443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4435.04">
            <text:p>24435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55811">
            <text:p>2,558</text:p>
          </table:table-cell>
          <table:table-cell table:style-name="ce12N2" office:value-type="float" office:value="717.38">
            <text:p>717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43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622.56">
            <text:p>20622,56</text:p>
          </table:table-cell>
          <table:table-cell table:style-name="ce12N2" office:value-type="float" office:value="20.66">
            <text:p>20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.6">
            <text:p>185,6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435.04">
            <text:p>24435,04</text:p>
          </table:table-cell>
          <table:table-cell table:style-name="ce12N2" office:value-type="float" office:value="1710.45">
            <text:p>171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854319649971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7">
            <text:p>30855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5.04">
            <text:p>446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94">
            <text:p>0,011</text:p>
          </table:table-cell>
          <table:table-cell table:style-name="ce12N2" office:value-type="float" office:value="77.4">
            <text:p>7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6.51">
            <text:p>4006,5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6">
            <text:p>36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42.82">
            <text:p>142,82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172.89">
            <text:p>17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5812684156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8">
            <text:p>308558</text:p>
          </table:table-cell>
          <table:table-cell table:style-name="ce0" table:number-columns-spanned="4" table:number-rows-spanned="1" office:value-type="string" calcext:value-type="string">
            <text:p>11.272 - POLYSPACE INDUSTRIA DE ACESSORIOS PARA CASA E BANHO LTDA</text:p>
          </table:table-cell>
          <table:covered-table-cell table:number-columns-repeated="3"/>
          <table:table-cell table:style-name="ce0" office:value-type="string" calcext:value-type="string">
            <text:p>21.0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9.33">
            <text:p>819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9.33">
            <text:p>819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482">
            <text:p>0,019</text:p>
          </table:table-cell>
          <table:table-cell table:style-name="ce12N2" office:value-type="float" office:value="9.3">
            <text:p>9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9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9.33">
            <text:p>819,33</text:p>
          </table:table-cell>
          <table:table-cell table:style-name="ce12N2" office:value-type="float" office:value="98.32">
            <text:p>9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32605231597020001185500100002104016198271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61">
            <text:p>30856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8.4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291.43">
            <text:p>2629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24106.07">
            <text:p>24106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58025">
            <text:p>1,258</text:p>
          </table:table-cell>
          <table:table-cell table:style-name="ce12N2" office:value-type="float" office:value="933.36">
            <text:p>93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291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01.23">
            <text:p>21001,23</text:p>
          </table:table-cell>
          <table:table-cell table:style-name="ce12N2" office:value-type="float" office:value="21.02">
            <text:p>2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01">
            <text:p>189,01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2185.36">
            <text:p>2185,36</text:p>
          </table:table-cell>
          <table:table-cell table:style-name="ce12N2" office:value-type="float" office:value="24106.07">
            <text:p>24106,07</text:p>
          </table:table-cell>
          <table:table-cell table:style-name="ce12N2" office:value-type="float" office:value="964.24">
            <text:p>96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2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847415894009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62">
            <text:p>30856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8.4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42.75">
            <text:p>4842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12.53">
            <text:p>4412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46">
            <text:p>0,005</text:p>
          </table:table-cell>
          <table:table-cell table:style-name="ce12N2" office:value-type="float" office:value="390">
            <text:p>39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42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36.03">
            <text:p>4236,03</text:p>
          </table:table-cell>
          <table:table-cell table:style-name="ce12N2" office:value-type="float" office:value="4.24">
            <text:p>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12">
            <text:p>38,1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430.22">
            <text:p>430,22</text:p>
          </table:table-cell>
          <table:table-cell table:style-name="ce12N2" office:value-type="float" office:value="4412.53">
            <text:p>4412,53</text:p>
          </table:table-cell>
          <table:table-cell table:style-name="ce12N2" office:value-type="float" office:value="176.5">
            <text:p>17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847515894470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65">
            <text:p>308565</text:p>
          </table:table-cell>
          <table:table-cell table:style-name="ce0" table:number-columns-spanned="4" table:number-rows-spanned="1" office:value-type="string" calcext:value-type="string">
            <text:p>7.661 - SEGURIMAX COM. AT. EQUIP. SEG. IMP. EXP</text:p>
          </table:table-cell>
          <table:covered-table-cell table:number-columns-repeated="3"/>
          <table:table-cell table:style-name="ce0" office:value-type="string" calcext:value-type="string">
            <text:p>183.7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532.33">
            <text:p>4553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42983.85">
            <text:p>42983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3217">
            <text:p>0,532</text:p>
          </table:table-cell>
          <table:table-cell table:style-name="ce12N2" office:value-type="float" office:value="676.81">
            <text:p>676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.532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447.54">
            <text:p>37447,54</text:p>
          </table:table-cell>
          <table:table-cell table:style-name="ce12N2" office:value-type="float" office:value="37.45">
            <text:p>37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.04">
            <text:p>337,04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2548.48">
            <text:p>2548,48</text:p>
          </table:table-cell>
          <table:table-cell table:style-name="ce12N2" office:value-type="float" office:value="42983.85">
            <text:p>42983,85</text:p>
          </table:table-cell>
          <table:table-cell table:style-name="ce12N2" office:value-type="float" office:value="1719.34">
            <text:p>1719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279.33">
            <text:p>1279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2.374</text:p>
          </table:table-cell>
          <table:table-cell table:style-name="ce0" office:value-type="string" calcext:value-type="string">
            <text:p>34.164 - TRANSPORTES MARLIM LTDA</text:p>
          </table:table-cell>
          <table:table-cell table:style-name="ce0" office:value-type="string" calcext:value-type="string">
            <text:p>01/06/2026</text:p>
          </table:table-cell>
          <table:table-cell table:style-name="ce12" office:value-type="string" calcext:value-type="string">
            <text:p>1.279,33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42260517011376000102550010001837351141562958</text:p>
          </table:table-cell>
          <table:table-cell table:style-name="ce0" office:value-type="string" calcext:value-type="string">
            <text:p>4226065815837200012057001000042374100042420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0">
            <text:p>308580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4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81">
            <text:p>458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81">
            <text:p>458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7104">
            <text:p>0,371</text:p>
          </table:table-cell>
          <table:table-cell table:style-name="ce12N2" office:value-type="float" office:value="44.76">
            <text:p>44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8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97.76">
            <text:p>4397,76</text:p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58">
            <text:p>39,5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81">
            <text:p>4581,00</text:p>
          </table:table-cell>
          <table:table-cell table:style-name="ce12N2" office:value-type="float" office:value="183.24">
            <text:p>18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434816107621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2">
            <text:p>308582</text:p>
          </table:table-cell>
          <table:table-cell table:style-name="ce0" table:number-columns-spanned="4" table:number-rows-spanned="1" office:value-type="string" calcext:value-type="string">
            <text:p>629 - PLASTCOR DO BRASIL LTDA</text:p>
          </table:table-cell>
          <table:covered-table-cell table:number-columns-repeated="3"/>
          <table:table-cell table:style-name="ce0" office:value-type="string" calcext:value-type="string">
            <text:p>374.19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188.48">
            <text:p>5318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51328.44">
            <text:p>51328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223574">
            <text:p>9,224</text:p>
          </table:table-cell>
          <table:table-cell table:style-name="ce12N2" office:value-type="float" office:value="1769.07">
            <text:p>1769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.188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414.18">
            <text:p>43414,18</text:p>
          </table:table-cell>
          <table:table-cell table:style-name="ce12N2" office:value-type="float" office:value="43.42">
            <text:p>4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.74">
            <text:p>390,74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860.04">
            <text:p>1860,04</text:p>
          </table:table-cell>
          <table:table-cell table:style-name="ce12N2" office:value-type="float" office:value="51328.44">
            <text:p>51328,44</text:p>
          </table:table-cell>
          <table:table-cell table:style-name="ce12N2" office:value-type="float" office:value="3489.09">
            <text:p>348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4704457000138550040003741921627051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2">
            <text:p>308622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686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.05">
            <text:p>263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622.96">
            <text:p>262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9.09">
            <text:p>9,09</text:p>
          </table:table-cell>
          <table:table-cell table:style-name="ce12N2" office:value-type="float" office:value="2632.05">
            <text:p>2632,05</text:p>
          </table:table-cell>
          <table:table-cell table:style-name="ce12N2" office:value-type="float" office:value="184.24">
            <text:p>18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6861852688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67">
            <text:p>308667</text:p>
          </table:table-cell>
          <table:table-cell table:style-name="ce0" table:number-columns-spanned="4" table:number-rows-spanned="1" office:value-type="string" calcext:value-type="string">
            <text:p>37.716 - ELLFAS DO BRASIL LTDA</text:p>
          </table:table-cell>
          <table:covered-table-cell table:number-columns-repeated="3"/>
          <table:table-cell table:style-name="ce0" office:value-type="string" calcext:value-type="string">
            <text:p>7.1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42.32">
            <text:p>1334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28">
            <text:p>125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05">
            <text:p>0,004</text:p>
          </table:table-cell>
          <table:table-cell table:style-name="ce12N2" office:value-type="float" office:value="450">
            <text:p>4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34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73.32">
            <text:p>10573,32</text:p>
          </table:table-cell>
          <table:table-cell table:style-name="ce12N2" office:value-type="float" office:value="10.57">
            <text:p>1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.16">
            <text:p>95,16</text:p>
          </table:table-cell>
          <table:table-cell table:style-name="ce12N2" office:value-type="float" office:value="42.5">
            <text:p>42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814.32">
            <text:p>814,32</text:p>
          </table:table-cell>
          <table:table-cell table:style-name="ce12N2" office:value-type="float" office:value="12528">
            <text:p>12528,00</text:p>
          </table:table-cell>
          <table:table-cell table:style-name="ce12N2" office:value-type="float" office:value="876.96">
            <text:p>87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62120480003025500100000712817804288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68">
            <text:p>30866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9.2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18.31">
            <text:p>20018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246.13">
            <text:p>18246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2554">
            <text:p>1,426</text:p>
          </table:table-cell>
          <table:table-cell table:style-name="ce12N2" office:value-type="float" office:value="253.86">
            <text:p>253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018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99.27">
            <text:p>15399,27</text:p>
          </table:table-cell>
          <table:table-cell table:style-name="ce12N2" office:value-type="float" office:value="15.4">
            <text:p>1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.6">
            <text:p>138,6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772.18">
            <text:p>1772,18</text:p>
          </table:table-cell>
          <table:table-cell table:style-name="ce12N2" office:value-type="float" office:value="18246.13">
            <text:p>18246,13</text:p>
          </table:table-cell>
          <table:table-cell table:style-name="ce12N2" office:value-type="float" office:value="1277.23">
            <text:p>1277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192921570463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69">
            <text:p>308669</text:p>
          </table:table-cell>
          <table:table-cell table:style-name="ce0" table:number-columns-spanned="4" table:number-rows-spanned="1" office:value-type="string" calcext:value-type="string">
            <text:p>995 - LUMIBRAS INDUSTRIA METALURGICA LTDA</text:p>
          </table:table-cell>
          <table:covered-table-cell table:number-columns-repeated="3"/>
          <table:table-cell table:style-name="ce0" office:value-type="string" calcext:value-type="string">
            <text:p>87.5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67.65">
            <text:p>4667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309.44">
            <text:p>4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2956">
            <text:p>0,430</text:p>
          </table:table-cell>
          <table:table-cell table:style-name="ce12N2" office:value-type="float" office:value="114.75">
            <text:p>114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67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37.06">
            <text:p>3637,06</text:p>
          </table:table-cell>
          <table:table-cell table:style-name="ce12N2" office:value-type="float" office:value="3.64">
            <text:p>3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73">
            <text:p>32,73</text:p>
          </table:table-cell>
          <table:table-cell table:style-name="ce12N2" office:value-type="float" office:value="34.4">
            <text:p>34,4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358.21">
            <text:p>358,21</text:p>
          </table:table-cell>
          <table:table-cell table:style-name="ce12N2" office:value-type="float" office:value="4309.44">
            <text:p>4309,44</text:p>
          </table:table-cell>
          <table:table-cell table:style-name="ce12N2" office:value-type="float" office:value="301.67">
            <text:p>30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477110001845500100008756410586678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81">
            <text:p>30868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9.3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02.1">
            <text:p>260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489.8">
            <text:p>248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252">
            <text:p>0,032</text:p>
          </table:table-cell>
          <table:table-cell table:style-name="ce12N2" office:value-type="float" office:value="42.62">
            <text:p>42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0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48.36">
            <text:p>2148,36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33">
            <text:p>19,3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12.3">
            <text:p>112,30</text:p>
          </table:table-cell>
          <table:table-cell table:style-name="ce12N2" office:value-type="float" office:value="2489.8">
            <text:p>2489,80</text:p>
          </table:table-cell>
          <table:table-cell table:style-name="ce12N2" office:value-type="float" office:value="122.45">
            <text:p>12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1930015861932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1">
            <text:p>308711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8.66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03303">
            <text:p>3,003</text:p>
          </table:table-cell>
          <table:table-cell table:style-name="ce12N2" office:value-type="float" office:value="379.94">
            <text:p>37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75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080.57">
            <text:p>36080,57</text:p>
          </table:table-cell>
          <table:table-cell table:style-name="ce12N2" office:value-type="float" office:value="36.08">
            <text:p>36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.73">
            <text:p>324,73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2992.55">
            <text:p>299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866513224229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6">
            <text:p>308726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0.5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440.76">
            <text:p>7644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034.63">
            <text:p>74034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1452">
            <text:p>9,145</text:p>
          </table:table-cell>
          <table:table-cell table:style-name="ce12N2" office:value-type="float" office:value="697.5">
            <text:p>69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.440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483.38">
            <text:p>62483,38</text:p>
          </table:table-cell>
          <table:table-cell table:style-name="ce12N2" office:value-type="float" office:value="62.48">
            <text:p>6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2.35">
            <text:p>562,35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2406.13">
            <text:p>2406,13</text:p>
          </table:table-cell>
          <table:table-cell table:style-name="ce12N2" office:value-type="float" office:value="74034.63">
            <text:p>74034,63</text:p>
          </table:table-cell>
          <table:table-cell table:style-name="ce12N2" office:value-type="float" office:value="5182.42">
            <text:p>518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055512561206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7">
            <text:p>308727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0.5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90.5">
            <text:p>239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15.25">
            <text:p>231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46">
            <text:p>0,265</text:p>
          </table:table-cell>
          <table:table-cell table:style-name="ce12N2" office:value-type="float" office:value="54.6">
            <text:p>5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9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54.01">
            <text:p>1954,01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59">
            <text:p>17,59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75.25">
            <text:p>75,25</text:p>
          </table:table-cell>
          <table:table-cell table:style-name="ce12N2" office:value-type="float" office:value="2315.25">
            <text:p>2315,25</text:p>
          </table:table-cell>
          <table:table-cell table:style-name="ce12N2" office:value-type="float" office:value="162.07">
            <text:p>162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055410987363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9">
            <text:p>308729</text:p>
          </table:table-cell>
          <table:table-cell table:style-name="ce0" table:number-columns-spanned="4" table:number-rows-spanned="1" office:value-type="string" calcext:value-type="string">
            <text:p>7.682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183.6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19.91">
            <text:p>131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471.4">
            <text:p>1247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2625">
            <text:p>0,113</text:p>
          </table:table-cell>
          <table:table-cell table:style-name="ce12N2" office:value-type="float" office:value="82.4">
            <text:p>8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119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648.51">
            <text:p>648,51</text:p>
          </table:table-cell>
          <table:table-cell table:style-name="ce12N2" office:value-type="float" office:value="12471.4">
            <text:p>12471,40</text:p>
          </table:table-cell>
          <table:table-cell table:style-name="ce12N2" office:value-type="float" office:value="498.86">
            <text:p>49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458659200010005500100018369615377680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4">
            <text:p>308734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3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6.5">
            <text:p>433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00">
            <text:p>42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2">
            <text:p>0,000</text:p>
          </table:table-cell>
          <table:table-cell table:style-name="ce12N2" office:value-type="float" office:value="185.4">
            <text:p>18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3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44.69">
            <text:p>3544,69</text:p>
          </table:table-cell>
          <table:table-cell table:style-name="ce12N2" office:value-type="float" office:value="3.54">
            <text:p>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9">
            <text:p>31,90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136.5">
            <text:p>136,50</text:p>
          </table:table-cell>
          <table:table-cell table:style-name="ce12N2" office:value-type="float" office:value="4200">
            <text:p>4200,00</text:p>
          </table:table-cell>
          <table:table-cell table:style-name="ce12N2" office:value-type="float" office:value="294">
            <text:p>29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3631262305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54">
            <text:p>30875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9.7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71.2">
            <text:p>267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33.89">
            <text:p>2433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77">
            <text:p>0,026</text:p>
          </table:table-cell>
          <table:table-cell table:style-name="ce12N2" office:value-type="float" office:value="6.9">
            <text:p>6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7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10.44">
            <text:p>2110,44</text:p>
          </table:table-cell>
          <table:table-cell table:style-name="ce12N2" office:value-type="float" office:value="2.11">
            <text:p>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237.31">
            <text:p>237,31</text:p>
          </table:table-cell>
          <table:table-cell table:style-name="ce12N2" office:value-type="float" office:value="2433.89">
            <text:p>2433,89</text:p>
          </table:table-cell>
          <table:table-cell table:style-name="ce12N2" office:value-type="float" office:value="108.33">
            <text:p>10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1972315811872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56">
            <text:p>30875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5.2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6364">
            <text:p>1,764</text:p>
          </table:table-cell>
          <table:table-cell table:style-name="ce12N2" office:value-type="float" office:value="4474.4">
            <text:p>447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5.98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408.63">
            <text:p>165408,63</text:p>
          </table:table-cell>
          <table:table-cell table:style-name="ce12N2" office:value-type="float" office:value="165.41">
            <text:p>165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68">
            <text:p>1488,68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13719.13">
            <text:p>13719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29952401551016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87">
            <text:p>308787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2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87.86">
            <text:p>5687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547.3">
            <text:p>5547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8896">
            <text:p>0,889</text:p>
          </table:table-cell>
          <table:table-cell table:style-name="ce12N2" office:value-type="float" office:value="245.6">
            <text:p>24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87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34.6">
            <text:p>4734,60</text:p>
          </table:table-cell>
          <table:table-cell table:style-name="ce12N2" office:value-type="float" office:value="4.73">
            <text:p>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61">
            <text:p>42,61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140.56">
            <text:p>140,56</text:p>
          </table:table-cell>
          <table:table-cell table:style-name="ce12N2" office:value-type="float" office:value="5547.3">
            <text:p>5547,30</text:p>
          </table:table-cell>
          <table:table-cell table:style-name="ce12N2" office:value-type="float" office:value="330.11">
            <text:p>33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26516073053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3">
            <text:p>308793</text:p>
          </table:table-cell>
          <table:table-cell table:style-name="ce0" table:number-columns-spanned="4" table:number-rows-spanned="1" office:value-type="string" calcext:value-type="string">
            <text:p>37.716 - ELLFAS DO BRASIL LTDA</text:p>
          </table:table-cell>
          <table:covered-table-cell table:number-columns-repeated="3"/>
          <table:table-cell table:style-name="ce0" office:value-type="string" calcext:value-type="string">
            <text:p>7.1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77.36">
            <text:p>1037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44">
            <text:p>97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5">
            <text:p>0,003</text:p>
          </table:table-cell>
          <table:table-cell table:style-name="ce12N2" office:value-type="float" office:value="350">
            <text:p>3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7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23.69">
            <text:p>8223,69</text:p>
          </table:table-cell>
          <table:table-cell table:style-name="ce12N2" office:value-type="float" office:value="8.22">
            <text:p>8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01">
            <text:p>74,01</text:p>
          </table:table-cell>
          <table:table-cell table:style-name="ce12N2" office:value-type="float" office:value="44.5">
            <text:p>44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633.36">
            <text:p>633,36</text:p>
          </table:table-cell>
          <table:table-cell table:style-name="ce12N2" office:value-type="float" office:value="9744">
            <text:p>9744,00</text:p>
          </table:table-cell>
          <table:table-cell table:style-name="ce12N2" office:value-type="float" office:value="682.08">
            <text:p>68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62120480003025500100000716818408113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4">
            <text:p>30879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71.0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288.4">
            <text:p>18128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81288.4">
            <text:p>18128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33772">
            <text:p>15,338</text:p>
          </table:table-cell>
          <table:table-cell table:style-name="ce12N2" office:value-type="float" office:value="4014.56">
            <text:p>4014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1.28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002.86">
            <text:p>153002,86</text:p>
          </table:table-cell>
          <table:table-cell table:style-name="ce12N2" office:value-type="float" office:value="153.05">
            <text:p>153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7.02">
            <text:p>1377,0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288.4">
            <text:p>181288,40</text:p>
          </table:table-cell>
          <table:table-cell table:style-name="ce12N2" office:value-type="float" office:value="12690.21">
            <text:p>1269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7101419589447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7">
            <text:p>308797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4.5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25.57">
            <text:p>3525,57</text:p>
          </table:table-cell>
          <table:table-cell table:style-name="ce12N2" office:value-type="float" office:value="228.84">
            <text:p>228,84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1.2">
            <text:p>344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232">
            <text:p>0,362</text:p>
          </table:table-cell>
          <table:table-cell table:style-name="ce12N2" office:value-type="float" office:value="89.6">
            <text:p>8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25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98.62">
            <text:p>2798,62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19">
            <text:p>25,19</text:p>
          </table:table-cell>
          <table:table-cell table:style-name="ce12N2" office:value-type="float" office:value="79.02">
            <text:p>79,0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313.21">
            <text:p>313,21</text:p>
          </table:table-cell>
          <table:table-cell table:style-name="ce12N2" office:value-type="float" office:value="3212.36">
            <text:p>3212,36</text:p>
          </table:table-cell>
          <table:table-cell table:style-name="ce12N2" office:value-type="float" office:value="128.49">
            <text:p>128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45721583825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8">
            <text:p>308798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6.1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714.5">
            <text:p>46714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714.5">
            <text:p>4671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8625">
            <text:p>12,863</text:p>
          </table:table-cell>
          <table:table-cell table:style-name="ce12N2" office:value-type="float" office:value="8015">
            <text:p>80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714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306.2">
            <text:p>37306,20</text:p>
          </table:table-cell>
          <table:table-cell table:style-name="ce12N2" office:value-type="float" office:value="37.31">
            <text:p>3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76">
            <text:p>335,76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714.5">
            <text:p>46714,50</text:p>
          </table:table-cell>
          <table:table-cell table:style-name="ce12N2" office:value-type="float" office:value="5605.74">
            <text:p>560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661141767568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4">
            <text:p>308854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7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17.6">
            <text:p>1581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817.6">
            <text:p>1581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1.553">
            <text:p>41,553</text:p>
          </table:table-cell>
          <table:table-cell table:style-name="ce12N2" office:value-type="float" office:value="1056">
            <text:p>105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81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817.6">
            <text:p>15817,60</text:p>
          </table:table-cell>
          <table:table-cell table:style-name="ce12N2" office:value-type="float" office:value="604.23">
            <text:p>60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7921865934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7">
            <text:p>308857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7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691.4">
            <text:p>1169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691.4">
            <text:p>1169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1.69788">
            <text:p>61,698</text:p>
          </table:table-cell>
          <table:table-cell table:style-name="ce12N2" office:value-type="float" office:value="838">
            <text:p>8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69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691.4">
            <text:p>11691,40</text:p>
          </table:table-cell>
          <table:table-cell table:style-name="ce12N2" office:value-type="float" office:value="446.61">
            <text:p>44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79116913182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9">
            <text:p>308859</text:p>
          </table:table-cell>
          <table:table-cell table:style-name="ce0" table:number-columns-spanned="4" table:number-rows-spanned="1" office:value-type="string" calcext:value-type="string">
            <text:p>36.654 - AZIMUT ALUMINIOS LTDA</text:p>
          </table:table-cell>
          <table:covered-table-cell table:number-columns-repeated="3"/>
          <table:table-cell table:style-name="ce0" office:value-type="string" calcext:value-type="string">
            <text:p>1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838.38">
            <text:p>3183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1838.38">
            <text:p>31838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83556">
            <text:p>16,836</text:p>
          </table:table-cell>
          <table:table-cell table:style-name="ce12N2" office:value-type="float" office:value="894.4">
            <text:p>89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838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447.59">
            <text:p>28447,59</text:p>
          </table:table-cell>
          <table:table-cell table:style-name="ce12N2" office:value-type="float" office:value="28.44">
            <text:p>2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.03">
            <text:p>256,0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838.38">
            <text:p>31838,38</text:p>
          </table:table-cell>
          <table:table-cell table:style-name="ce12N2" office:value-type="float" office:value="2228.7">
            <text:p>222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87849210001585500100000011818179521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0">
            <text:p>308860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5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51.5">
            <text:p>1635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836.8">
            <text:p>1583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38128">
            <text:p>0,638</text:p>
          </table:table-cell>
          <table:table-cell table:style-name="ce12N2" office:value-type="float" office:value="697.13">
            <text:p>697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35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365.86">
            <text:p>13365,86</text:p>
          </table:table-cell>
          <table:table-cell table:style-name="ce12N2" office:value-type="float" office:value="13.37">
            <text:p>1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.29">
            <text:p>120,29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514.7">
            <text:p>514,70</text:p>
          </table:table-cell>
          <table:table-cell table:style-name="ce12N2" office:value-type="float" office:value="15836.8">
            <text:p>15836,80</text:p>
          </table:table-cell>
          <table:table-cell table:style-name="ce12N2" office:value-type="float" office:value="1108.58">
            <text:p>110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54318022765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3">
            <text:p>308863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4.431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314">
            <text:p>8831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7215.66">
            <text:p>87215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0.084198">
            <text:p>50,084</text:p>
          </table:table-cell>
          <table:table-cell table:style-name="ce12N2" office:value-type="float" office:value="28862.81">
            <text:p>28862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.31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607.83">
            <text:p>73607,83</text:p>
          </table:table-cell>
          <table:table-cell table:style-name="ce12N2" office:value-type="float" office:value="73.6">
            <text:p>7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2.47">
            <text:p>662,47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098.34">
            <text:p>1098,34</text:p>
          </table:table-cell>
          <table:table-cell table:style-name="ce12N2" office:value-type="float" office:value="87215.66">
            <text:p>87215,66</text:p>
          </table:table-cell>
          <table:table-cell table:style-name="ce12N2" office:value-type="float" office:value="6105.09">
            <text:p>610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5617190095035502100197443118841199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4">
            <text:p>308864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7.4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60.7">
            <text:p>146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88.5">
            <text:p>138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">
            <text:p>0,010</text:p>
          </table:table-cell>
          <table:table-cell table:style-name="ce12N2" office:value-type="float" office:value="0.02">
            <text:p>0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60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71.85">
            <text:p>1171,85</text:p>
          </table:table-cell>
          <table:table-cell table:style-name="ce12N2" office:value-type="float" office:value="1.17">
            <text:p>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55">
            <text:p>10,5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72.2">
            <text:p>72,20</text:p>
          </table:table-cell>
          <table:table-cell table:style-name="ce12N2" office:value-type="float" office:value="1388.5">
            <text:p>1388,50</text:p>
          </table:table-cell>
          <table:table-cell table:style-name="ce12N2" office:value-type="float" office:value="97.2">
            <text:p>9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69947000003655500100006742911000025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5">
            <text:p>308865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4.36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590.32">
            <text:p>6959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9590.32">
            <text:p>69590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5252">
            <text:p>12,525</text:p>
          </table:table-cell>
          <table:table-cell table:style-name="ce12N2" office:value-type="float" office:value="2875.3">
            <text:p>2875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.590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732.5">
            <text:p>58732,50</text:p>
          </table:table-cell>
          <table:table-cell table:style-name="ce12N2" office:value-type="float" office:value="58.74">
            <text:p>5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8.59">
            <text:p>528,5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590.32">
            <text:p>69590,32</text:p>
          </table:table-cell>
          <table:table-cell table:style-name="ce12N2" office:value-type="float" office:value="4871.32">
            <text:p>487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8019020025015500000082436016623983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1">
            <text:p>308871</text:p>
          </table:table-cell>
          <table:table-cell table:style-name="ce0" table:number-columns-spanned="4" table:number-rows-spanned="1" office:value-type="string" calcext:value-type="string">
            <text:p>37.660 - BF LIMP COMERCIO DE PRODUTOS DE HIGIENE E LIMPEZA LTDA</text:p>
          </table:table-cell>
          <table:covered-table-cell table:number-columns-repeated="3"/>
          <table:table-cell table:style-name="ce0" office:value-type="string" calcext:value-type="string">
            <text:p>2.2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21.2">
            <text:p>602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021.2">
            <text:p>602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3535">
            <text:p>0,074</text:p>
          </table:table-cell>
          <table:table-cell table:style-name="ce12N2" office:value-type="float" office:value="272">
            <text:p>2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2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21.31">
            <text:p>5421,31</text:p>
          </table:table-cell>
          <table:table-cell table:style-name="ce12N2" office:value-type="float" office:value="5.42">
            <text:p>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79">
            <text:p>48,79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21.2">
            <text:p>6021,20</text:p>
          </table:table-cell>
          <table:table-cell table:style-name="ce12N2" office:value-type="float" office:value="421.49">
            <text:p>42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7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24101070001655500100000228817357780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2">
            <text:p>308872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3.9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2.65">
            <text:p>482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93">
            <text:p>459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99">
            <text:p>0,210</text:p>
          </table:table-cell>
          <table:table-cell table:style-name="ce12N2" office:value-type="float" office:value="110">
            <text:p>1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2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15.59">
            <text:p>4115,59</text:p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04">
            <text:p>37,04</text:p>
          </table:table-cell>
          <table:table-cell table:style-name="ce12N2" office:value-type="float" office:value="41.33">
            <text:p>4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229.65">
            <text:p>229,65</text:p>
          </table:table-cell>
          <table:table-cell table:style-name="ce12N2" office:value-type="float" office:value="4593">
            <text:p>4593,00</text:p>
          </table:table-cell>
          <table:table-cell table:style-name="ce12N2" office:value-type="float" office:value="321.51">
            <text:p>32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451237100001475500100001391811920016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5">
            <text:p>30887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0.2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99.32">
            <text:p>349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371.07">
            <text:p>3371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0358">
            <text:p>0,230</text:p>
          </table:table-cell>
          <table:table-cell table:style-name="ce12N2" office:value-type="float" office:value="44.71">
            <text:p>44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99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45.1">
            <text:p>2845,10</text:p>
          </table:table-cell>
          <table:table-cell table:style-name="ce12N2" office:value-type="float" office:value="2.84">
            <text:p>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6">
            <text:p>25,6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28.25">
            <text:p>128,25</text:p>
          </table:table-cell>
          <table:table-cell table:style-name="ce12N2" office:value-type="float" office:value="3371.07">
            <text:p>3371,07</text:p>
          </table:table-cell>
          <table:table-cell table:style-name="ce12N2" office:value-type="float" office:value="235.98">
            <text:p>23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020915704022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0">
            <text:p>308880</text:p>
          </table:table-cell>
          <table:table-cell table:style-name="ce0" table:number-columns-spanned="4" table:number-rows-spanned="1" office:value-type="string" calcext:value-type="string">
            <text:p>543 - ESTEVES S/A.</text:p>
          </table:table-cell>
          <table:covered-table-cell table:number-columns-repeated="3"/>
          <table:table-cell table:style-name="ce0" office:value-type="string" calcext:value-type="string">
            <text:p>363.9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30.36">
            <text:p>713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905.92">
            <text:p>690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9">
            <text:p>0,006</text:p>
          </table:table-cell>
          <table:table-cell table:style-name="ce12N2" office:value-type="float" office:value="9.67">
            <text:p>9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30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28.43">
            <text:p>5828,43</text:p>
          </table:table-cell>
          <table:table-cell table:style-name="ce12N2" office:value-type="float" office:value="5.83">
            <text:p>5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46">
            <text:p>52,46</text:p>
          </table:table-cell>
          <table:table-cell table:style-name="ce12N2" office:value-type="float" office:value="41.56">
            <text:p>41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224.44">
            <text:p>224,44</text:p>
          </table:table-cell>
          <table:table-cell table:style-name="ce12N2" office:value-type="float" office:value="6905.92">
            <text:p>6905,92</text:p>
          </table:table-cell>
          <table:table-cell table:style-name="ce12N2" office:value-type="float" office:value="483.41">
            <text:p>48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837457000187550010003639211347884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1">
            <text:p>3088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0.77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04.8">
            <text:p>1760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604.8">
            <text:p>1760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96">
            <text:p>0,037</text:p>
          </table:table-cell>
          <table:table-cell table:style-name="ce12N2" office:value-type="float" office:value="30.44">
            <text:p>30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0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58">
            <text:p>14858,00</text:p>
          </table:table-cell>
          <table:table-cell table:style-name="ce12N2" office:value-type="float" office:value="14.86">
            <text:p>1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.72">
            <text:p>133,7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604.8">
            <text:p>17604,80</text:p>
          </table:table-cell>
          <table:table-cell table:style-name="ce12N2" office:value-type="float" office:value="1232.34">
            <text:p>1232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07761899421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3">
            <text:p>3088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0.77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16">
            <text:p>1761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616">
            <text:p>1761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96">
            <text:p>0,037</text:p>
          </table:table-cell>
          <table:table-cell table:style-name="ce12N2" office:value-type="float" office:value="30.44">
            <text:p>30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1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67.4">
            <text:p>14867,40</text:p>
          </table:table-cell>
          <table:table-cell table:style-name="ce12N2" office:value-type="float" office:value="14.87">
            <text:p>14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.81">
            <text:p>133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616">
            <text:p>17616,00</text:p>
          </table:table-cell>
          <table:table-cell table:style-name="ce12N2" office:value-type="float" office:value="1233.12">
            <text:p>123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077514208986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4">
            <text:p>308884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5.2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88.84">
            <text:p>718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188.84">
            <text:p>7188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56528">
            <text:p>0,457</text:p>
          </table:table-cell>
          <table:table-cell table:style-name="ce12N2" office:value-type="float" office:value="30.61">
            <text:p>3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8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67.2">
            <text:p>6067,20</text:p>
          </table:table-cell>
          <table:table-cell table:style-name="ce12N2" office:value-type="float" office:value="6.07">
            <text:p>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61">
            <text:p>54,61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88.84">
            <text:p>7188,84</text:p>
          </table:table-cell>
          <table:table-cell table:style-name="ce12N2" office:value-type="float" office:value="503.22">
            <text:p>50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523216045027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5">
            <text:p>308885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7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">
            <text:p>118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83">
            <text:p>118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5">
            <text:p>0,172</text:p>
          </table:table-cell>
          <table:table-cell table:style-name="ce12N2" office:value-type="float" office:value="13.7">
            <text:p>1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98.43">
            <text:p>998,43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99">
            <text:p>8,9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3">
            <text:p>1183,00</text:p>
          </table:table-cell>
          <table:table-cell table:style-name="ce12N2" office:value-type="float" office:value="82.81">
            <text:p>8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7251574296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9">
            <text:p>308889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19.9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378">
            <text:p>3,384</text:p>
          </table:table-cell>
          <table:table-cell table:style-name="ce12N2" office:value-type="float" office:value="2932">
            <text:p>293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391.96">
            <text:p>17391,96</text:p>
          </table:table-cell>
          <table:table-cell table:style-name="ce12N2" office:value-type="float" office:value="17.39">
            <text:p>1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.53">
            <text:p>156,53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1442.5">
            <text:p>14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1992318972141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90">
            <text:p>308890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53.2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339.71">
            <text:p>90339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90126.08">
            <text:p>90126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.973526">
            <text:p>19,974</text:p>
          </table:table-cell>
          <table:table-cell table:style-name="ce12N2" office:value-type="float" office:value="21843">
            <text:p>218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.339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064.16">
            <text:p>76064,16</text:p>
          </table:table-cell>
          <table:table-cell table:style-name="ce12N2" office:value-type="float" office:value="76.05">
            <text:p>7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4.56">
            <text:p>684,5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213.63">
            <text:p>213,63</text:p>
          </table:table-cell>
          <table:table-cell table:style-name="ce12N2" office:value-type="float" office:value="90126.08">
            <text:p>90126,08</text:p>
          </table:table-cell>
          <table:table-cell table:style-name="ce12N2" office:value-type="float" office:value="6308.83">
            <text:p>6308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6818670001305500100095327313910910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91">
            <text:p>30889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4.5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83.42">
            <text:p>468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36">
            <text:p>453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28">
            <text:p>0,152</text:p>
          </table:table-cell>
          <table:table-cell table:style-name="ce12N2" office:value-type="float" office:value="19.44">
            <text:p>19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83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28.28">
            <text:p>3828,28</text:p>
          </table:table-cell>
          <table:table-cell table:style-name="ce12N2" office:value-type="float" office:value="3.83">
            <text:p>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45">
            <text:p>34,45</text:p>
          </table:table-cell>
          <table:table-cell table:style-name="ce12N2" office:value-type="float" office:value="55.56">
            <text:p>55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47.42">
            <text:p>147,42</text:p>
          </table:table-cell>
          <table:table-cell table:style-name="ce12N2" office:value-type="float" office:value="4536">
            <text:p>4536,00</text:p>
          </table:table-cell>
          <table:table-cell table:style-name="ce12N2" office:value-type="float" office:value="317.52">
            <text:p>31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45591099196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5">
            <text:p>30895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4.64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30.16">
            <text:p>1033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05">
            <text:p>1000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43">
            <text:p>0,324</text:p>
          </table:table-cell>
          <table:table-cell table:style-name="ce12N2" office:value-type="float" office:value="41.4">
            <text:p>4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30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43.97">
            <text:p>8443,97</text:p>
          </table:table-cell>
          <table:table-cell table:style-name="ce12N2" office:value-type="float" office:value="8.44">
            <text:p>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">
            <text:p>76,00</text:p>
          </table:table-cell>
          <table:table-cell table:style-name="ce12N2" office:value-type="float" office:value="55.56">
            <text:p>55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325.16">
            <text:p>325,16</text:p>
          </table:table-cell>
          <table:table-cell table:style-name="ce12N2" office:value-type="float" office:value="10005">
            <text:p>10005,00</text:p>
          </table:table-cell>
          <table:table-cell table:style-name="ce12N2" office:value-type="float" office:value="700.35">
            <text:p>70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464210398455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6">
            <text:p>30895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4.64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5.15">
            <text:p>461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257.6">
            <text:p>425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26">
            <text:p>0,091</text:p>
          </table:table-cell>
          <table:table-cell table:style-name="ce12N2" office:value-type="float" office:value="9.2">
            <text:p>9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15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93.32">
            <text:p>3593,32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33">
            <text:p>32,33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357.55">
            <text:p>357,55</text:p>
          </table:table-cell>
          <table:table-cell table:style-name="ce12N2" office:value-type="float" office:value="4257.6">
            <text:p>4257,60</text:p>
          </table:table-cell>
          <table:table-cell table:style-name="ce12N2" office:value-type="float" office:value="298.03">
            <text:p>298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46411195200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7">
            <text:p>30895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4.55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39.62">
            <text:p>363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403.4">
            <text:p>340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894">
            <text:p>0,059</text:p>
          </table:table-cell>
          <table:table-cell table:style-name="ce12N2" office:value-type="float" office:value="10.77">
            <text:p>1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3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72.37">
            <text:p>2872,37</text:p>
          </table:table-cell>
          <table:table-cell table:style-name="ce12N2" office:value-type="float" office:value="2.87">
            <text:p>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84">
            <text:p>25,84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236.22">
            <text:p>236,22</text:p>
          </table:table-cell>
          <table:table-cell table:style-name="ce12N2" office:value-type="float" office:value="3403.4">
            <text:p>3403,40</text:p>
          </table:table-cell>
          <table:table-cell table:style-name="ce12N2" office:value-type="float" office:value="238.24">
            <text:p>23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455613039227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9">
            <text:p>30895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0.5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46.4">
            <text:p>2074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093.36">
            <text:p>2009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016.0124">
            <text:p>8016,012</text:p>
          </table:table-cell>
          <table:table-cell table:style-name="ce12N2" office:value-type="float" office:value="841.6">
            <text:p>84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74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958.29">
            <text:p>16958,29</text:p>
          </table:table-cell>
          <table:table-cell table:style-name="ce12N2" office:value-type="float" office:value="16.96">
            <text:p>1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2.63">
            <text:p>152,6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653.04">
            <text:p>653,04</text:p>
          </table:table-cell>
          <table:table-cell table:style-name="ce12N2" office:value-type="float" office:value="20093.36">
            <text:p>20093,36</text:p>
          </table:table-cell>
          <table:table-cell table:style-name="ce12N2" office:value-type="float" office:value="1406.54">
            <text:p>140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05201581615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60">
            <text:p>308960</text:p>
          </table:table-cell>
          <table:table-cell table:style-name="ce0" table:number-columns-spanned="4" table:number-rows-spanned="1" office:value-type="string" calcext:value-type="string">
            <text:p>732 - METALURGICA INCA LTDA</text:p>
          </table:table-cell>
          <table:covered-table-cell table:number-columns-repeated="3"/>
          <table:table-cell table:style-name="ce0" office:value-type="string" calcext:value-type="string">
            <text:p>141.9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38.68">
            <text:p>703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26.16">
            <text:p>702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56">
            <text:p>0,032</text:p>
          </table:table-cell>
          <table:table-cell table:style-name="ce12N2" office:value-type="float" office:value="264.08">
            <text:p>26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3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95.82">
            <text:p>6295,82</text:p>
          </table:table-cell>
          <table:table-cell table:style-name="ce12N2" office:value-type="float" office:value="6.3">
            <text:p>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66">
            <text:p>56,66</text:p>
          </table:table-cell>
          <table:table-cell table:style-name="ce12N2" office:value-type="float" office:value="44.97">
            <text:p>44,9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12.52">
            <text:p>12,52</text:p>
          </table:table-cell>
          <table:table-cell table:style-name="ce12N2" office:value-type="float" office:value="7026.16">
            <text:p>7026,16</text:p>
          </table:table-cell>
          <table:table-cell table:style-name="ce12N2" office:value-type="float" office:value="491.84">
            <text:p>49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204129000106550010001419651121064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61">
            <text:p>308961</text:p>
          </table:table-cell>
          <table:table-cell table:style-name="ce0" table:number-columns-spanned="4" table:number-rows-spanned="1" office:value-type="string" calcext:value-type="string">
            <text:p>1.634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239.60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71.95">
            <text:p>787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82.84">
            <text:p>7482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575">
            <text:p>0,068</text:p>
          </table:table-cell>
          <table:table-cell table:style-name="ce12N2" office:value-type="float" office:value="49.44">
            <text:p>49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71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19.05">
            <text:p>6519,05</text:p>
          </table:table-cell>
          <table:table-cell table:style-name="ce12N2" office:value-type="float" office:value="6.52">
            <text:p>6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67">
            <text:p>58,6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389.11">
            <text:p>389,11</text:p>
          </table:table-cell>
          <table:table-cell table:style-name="ce12N2" office:value-type="float" office:value="7482.84">
            <text:p>7482,84</text:p>
          </table:table-cell>
          <table:table-cell table:style-name="ce12N2" office:value-type="float" office:value="299.31">
            <text:p>29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458659200006155500300023960212822650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63">
            <text:p>308963</text:p>
          </table:table-cell>
          <table:table-cell table:style-name="ce0" table:number-columns-spanned="4" table:number-rows-spanned="1" office:value-type="string" calcext:value-type="string">
            <text:p>14.587 - GFC INDUSTRIA E COMERCIO TUBOS E CONEXOES LTDA</text:p>
          </table:table-cell>
          <table:covered-table-cell table:number-columns-repeated="3"/>
          <table:table-cell table:style-name="ce0" office:value-type="string" calcext:value-type="string">
            <text:p>115.09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564.66">
            <text:p>8156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78997.24">
            <text:p>78997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747536">
            <text:p>17,748</text:p>
          </table:table-cell>
          <table:table-cell table:style-name="ce12N2" office:value-type="float" office:value="7346.29">
            <text:p>7346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.564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671.68">
            <text:p>66671,68</text:p>
          </table:table-cell>
          <table:table-cell table:style-name="ce12N2" office:value-type="float" office:value="66.67">
            <text:p>66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0.04">
            <text:p>600,04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2567.42">
            <text:p>2567,42</text:p>
          </table:table-cell>
          <table:table-cell table:style-name="ce12N2" office:value-type="float" office:value="78997.24">
            <text:p>78997,24</text:p>
          </table:table-cell>
          <table:table-cell table:style-name="ce12N2" office:value-type="float" office:value="5529.81">
            <text:p>552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05338810001605500000011509718365017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68">
            <text:p>308968</text:p>
          </table:table-cell>
          <table:table-cell table:style-name="ce0" table:number-columns-spanned="4" table:number-rows-spanned="1" office:value-type="string" calcext:value-type="string">
            <text:p>5.002 - ELETRICA DANUBIO IND E COM DE MAT ELET LTDA</text:p>
          </table:table-cell>
          <table:covered-table-cell table:number-columns-repeated="3"/>
          <table:table-cell table:style-name="ce0" office:value-type="string" calcext:value-type="string">
            <text:p>488.8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78.68">
            <text:p>2107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078.68">
            <text:p>2107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300">
            <text:p>8300,000</text:p>
          </table:table-cell>
          <table:table-cell table:style-name="ce12N2" office:value-type="float" office:value="1460.8">
            <text:p>146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07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789.88">
            <text:p>17789,88</text:p>
          </table:table-cell>
          <table:table-cell table:style-name="ce12N2" office:value-type="float" office:value="17.79">
            <text:p>17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.11">
            <text:p>160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078.68">
            <text:p>21078,68</text:p>
          </table:table-cell>
          <table:table-cell table:style-name="ce12N2" office:value-type="float" office:value="1475.51">
            <text:p>1475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3102560001905500100048883511893283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2">
            <text:p>30897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0.72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152">
            <text:p>4415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152">
            <text:p>4415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94">
            <text:p>0,139</text:p>
          </table:table-cell>
          <table:table-cell table:style-name="ce12N2" office:value-type="float" office:value="76.4">
            <text:p>7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15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263">
            <text:p>37263,00</text:p>
          </table:table-cell>
          <table:table-cell table:style-name="ce12N2" office:value-type="float" office:value="37.26">
            <text:p>37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37">
            <text:p>335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152">
            <text:p>44152,00</text:p>
          </table:table-cell>
          <table:table-cell table:style-name="ce12N2" office:value-type="float" office:value="3090.64">
            <text:p>3090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072810914188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3">
            <text:p>308973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5.3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14.72">
            <text:p>9214,72</text:p>
          </table:table-cell>
          <table:table-cell table:style-name="ce12N2" office:value-type="float" office:value="441.9">
            <text:p>441,90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838">
            <text:p>88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3445">
            <text:p>0,803</text:p>
          </table:table-cell>
          <table:table-cell table:style-name="ce12N2" office:value-type="float" office:value="312">
            <text:p>31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1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14.69">
            <text:p>7314,69</text:p>
          </table:table-cell>
          <table:table-cell table:style-name="ce12N2" office:value-type="float" office:value="7.32">
            <text:p>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83">
            <text:p>65,83</text:p>
          </table:table-cell>
          <table:table-cell table:style-name="ce12N2" office:value-type="float" office:value="79.03">
            <text:p>79,0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18.62">
            <text:p>818,62</text:p>
          </table:table-cell>
          <table:table-cell table:style-name="ce12N2" office:value-type="float" office:value="8396.1">
            <text:p>8396,10</text:p>
          </table:table-cell>
          <table:table-cell table:style-name="ce12N2" office:value-type="float" office:value="335.85">
            <text:p>33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530510808738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6">
            <text:p>308976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6.056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899.97">
            <text:p>40899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40772.96">
            <text:p>4077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41555">
            <text:p>2,942</text:p>
          </table:table-cell>
          <table:table-cell table:style-name="ce12N2" office:value-type="float" office:value="310.78">
            <text:p>310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899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521.4">
            <text:p>35521,40</text:p>
          </table:table-cell>
          <table:table-cell table:style-name="ce12N2" office:value-type="float" office:value="35.52">
            <text:p>3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9.69">
            <text:p>319,6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127.01">
            <text:p>127,01</text:p>
          </table:table-cell>
          <table:table-cell table:style-name="ce12N2" office:value-type="float" office:value="40772.96">
            <text:p>40772,96</text:p>
          </table:table-cell>
          <table:table-cell table:style-name="ce12N2" office:value-type="float" office:value="1630.92">
            <text:p>163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2741051000185550550003060561455871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7">
            <text:p>308977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5.4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39.37">
            <text:p>5439,37</text:p>
          </table:table-cell>
          <table:table-cell table:style-name="ce12N2" office:value-type="float" office:value="260.85">
            <text:p>260,85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217">
            <text:p>521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69598">
            <text:p>4,696</text:p>
          </table:table-cell>
          <table:table-cell table:style-name="ce12N2" office:value-type="float" office:value="223">
            <text:p>22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39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17.79">
            <text:p>4317,79</text:p>
          </table:table-cell>
          <table:table-cell table:style-name="ce12N2" office:value-type="float" office:value="4.32">
            <text:p>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86">
            <text:p>38,86</text:p>
          </table:table-cell>
          <table:table-cell table:style-name="ce12N2" office:value-type="float" office:value="96.58">
            <text:p>96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483.22">
            <text:p>483,22</text:p>
          </table:table-cell>
          <table:table-cell table:style-name="ce12N2" office:value-type="float" office:value="4956.15">
            <text:p>4956,15</text:p>
          </table:table-cell>
          <table:table-cell table:style-name="ce12N2" office:value-type="float" office:value="198.25">
            <text:p>19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544113545416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9">
            <text:p>308979</text:p>
          </table:table-cell>
          <table:table-cell table:style-name="ce0" table:number-columns-spanned="4" table:number-rows-spanned="1" office:value-type="string" calcext:value-type="string">
            <text:p>977 - POLIERG INDUSTRIA E COMERCIO LTDA</text:p>
          </table:table-cell>
          <table:covered-table-cell table:number-columns-repeated="3"/>
          <table:table-cell table:style-name="ce0" office:value-type="string" calcext:value-type="string">
            <text:p>120.75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30">
            <text:p>1643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430">
            <text:p>1643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85">
            <text:p>0,408</text:p>
          </table:table-cell>
          <table:table-cell table:style-name="ce12N2" office:value-type="float" office:value="409.5">
            <text:p>409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43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66.1">
            <text:p>14066,10</text:p>
          </table:table-cell>
          <table:table-cell table:style-name="ce12N2" office:value-type="float" office:value="14.07">
            <text:p>1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.6">
            <text:p>126,6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88.1">
            <text:p>13288,10</text:p>
          </table:table-cell>
          <table:table-cell table:style-name="ce12N2" office:value-type="float" office:value="930.17">
            <text:p>93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0107170001525500300012075810793966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14">
            <text:p>30901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9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800.5">
            <text:p>6980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">
            <text:p>64,00</text:p>
          </table:table-cell>
          <table:table-cell table:style-name="ce12N2" office:value-type="float" office:value="67530.76">
            <text:p>67530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05312">
            <text:p>2,405</text:p>
          </table:table-cell>
          <table:table-cell table:style-name="ce12N2" office:value-type="float" office:value="831.62">
            <text:p>831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.80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221.73">
            <text:p>57221,73</text:p>
          </table:table-cell>
          <table:table-cell table:style-name="ce12N2" office:value-type="float" office:value="57.21">
            <text:p>57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5">
            <text:p>515,0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2269.74">
            <text:p>2269,74</text:p>
          </table:table-cell>
          <table:table-cell table:style-name="ce12N2" office:value-type="float" office:value="67530.76">
            <text:p>67530,76</text:p>
          </table:table-cell>
          <table:table-cell table:style-name="ce12N2" office:value-type="float" office:value="4476.54">
            <text:p>447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1971615685576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21">
            <text:p>309021</text:p>
          </table:table-cell>
          <table:table-cell table:style-name="ce0" table:number-columns-spanned="4" table:number-rows-spanned="1" office:value-type="string" calcext:value-type="string">
            <text:p>10.606 - ZMA- PERFIL DE ALUMINIO EIRELI-ME</text:p>
          </table:table-cell>
          <table:covered-table-cell table:number-columns-repeated="3"/>
          <table:table-cell table:style-name="ce0" office:value-type="string" calcext:value-type="string">
            <text:p>18.2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305.5">
            <text:p>7730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77305.5">
            <text:p>77305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8773">
            <text:p>5,877</text:p>
          </table:table-cell>
          <table:table-cell table:style-name="ce12N2" office:value-type="float" office:value="2358.05">
            <text:p>235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7.305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243.91">
            <text:p>65243,91</text:p>
          </table:table-cell>
          <table:table-cell table:style-name="ce12N2" office:value-type="float" office:value="65.19">
            <text:p>6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7.14">
            <text:p>587,14</text:p>
          </table:table-cell>
          <table:table-cell table:style-name="ce12N2" office:value-type="float" office:value="45.67">
            <text:p>45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305.5">
            <text:p>77305,50</text:p>
          </table:table-cell>
          <table:table-cell table:style-name="ce12N2" office:value-type="float" office:value="5411.39">
            <text:p>541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683.25">
            <text:p>168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79.743</text:p>
          </table:table-cell>
          <table:table-cell table:style-name="ce0" office:value-type="string" calcext:value-type="string">
            <text:p>29.371 - ACCERT TRANSPORTES E LOGISTICAS LTDA</text:p>
          </table:table-cell>
          <table:table-cell table:style-name="ce0" office:value-type="string" calcext:value-type="string">
            <text:p>10/06/2026</text:p>
          </table:table-cell>
          <table:table-cell table:style-name="ce12" office:value-type="string" calcext:value-type="string">
            <text:p>1.683,25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41260600296181000145550010000182671001488262</text:p>
          </table:table-cell>
          <table:table-cell table:style-name="ce0" office:value-type="string" calcext:value-type="string">
            <text:p>3526060522209200076357002000479743100696438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28">
            <text:p>30902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5.4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55.56">
            <text:p>6055,56</text:p>
          </table:table-cell>
          <table:table-cell table:style-name="ce12N2" office:value-type="float" office:value="290.4">
            <text:p>290,40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808">
            <text:p>580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15015">
            <text:p>0,815</text:p>
          </table:table-cell>
          <table:table-cell table:style-name="ce12N2" office:value-type="float" office:value="176">
            <text:p>17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55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06.93">
            <text:p>4806,93</text:p>
          </table:table-cell>
          <table:table-cell table:style-name="ce12N2" office:value-type="float" office:value="4.81">
            <text:p>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26">
            <text:p>43,26</text:p>
          </table:table-cell>
          <table:table-cell table:style-name="ce12N2" office:value-type="float" office:value="79.03">
            <text:p>79,0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537.96">
            <text:p>537,96</text:p>
          </table:table-cell>
          <table:table-cell table:style-name="ce12N2" office:value-type="float" office:value="5517.6">
            <text:p>5517,60</text:p>
          </table:table-cell>
          <table:table-cell table:style-name="ce12N2" office:value-type="float" office:value="220.7">
            <text:p>22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54341127745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29">
            <text:p>309029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4.01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929.17">
            <text:p>3592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4724.94">
            <text:p>34724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1.24628">
            <text:p>201,246</text:p>
          </table:table-cell>
          <table:table-cell table:style-name="ce12N2" office:value-type="float" office:value="427.48">
            <text:p>427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929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306.98">
            <text:p>29306,98</text:p>
          </table:table-cell>
          <table:table-cell table:style-name="ce12N2" office:value-type="float" office:value="29.31">
            <text:p>2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3.76">
            <text:p>263,76</text:p>
          </table:table-cell>
          <table:table-cell table:style-name="ce12N2" office:value-type="float" office:value="44.5">
            <text:p>44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1204.23">
            <text:p>1204,23</text:p>
          </table:table-cell>
          <table:table-cell table:style-name="ce12N2" office:value-type="float" office:value="34724.94">
            <text:p>34724,94</text:p>
          </table:table-cell>
          <table:table-cell table:style-name="ce12N2" office:value-type="float" office:value="2430.75">
            <text:p>243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764286200024855002000014013173876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1">
            <text:p>309031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3.5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04.56">
            <text:p>1680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804.56">
            <text:p>1680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.75">
            <text:p>18,750</text:p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0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182.62">
            <text:p>14182,62</text:p>
          </table:table-cell>
          <table:table-cell table:style-name="ce12N2" office:value-type="float" office:value="14.18">
            <text:p>1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.64">
            <text:p>127,64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04.56">
            <text:p>16804,56</text:p>
          </table:table-cell>
          <table:table-cell table:style-name="ce12N2" office:value-type="float" office:value="1176.32">
            <text:p>117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1507510091355500100056358610450589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3">
            <text:p>30903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74.52">
            <text:p>927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74.52">
            <text:p>9274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49748">
            <text:p>1,750</text:p>
          </table:table-cell>
          <table:table-cell table:style-name="ce12N2" office:value-type="float" office:value="508.99">
            <text:p>508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7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827.46">
            <text:p>7827,46</text:p>
          </table:table-cell>
          <table:table-cell table:style-name="ce12N2" office:value-type="float" office:value="7.83">
            <text:p>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.45">
            <text:p>70,4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74.52">
            <text:p>9274,52</text:p>
          </table:table-cell>
          <table:table-cell table:style-name="ce12N2" office:value-type="float" office:value="649.22">
            <text:p>64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110420958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4">
            <text:p>30903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106.32">
            <text:p>3010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106.32">
            <text:p>30106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549">
            <text:p>0,013</text:p>
          </table:table-cell>
          <table:table-cell table:style-name="ce12N2" office:value-type="float" office:value="352.5">
            <text:p>35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.106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228.63">
            <text:p>26228,63</text:p>
          </table:table-cell>
          <table:table-cell table:style-name="ce12N2" office:value-type="float" office:value="26.23">
            <text:p>2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6.06">
            <text:p>236,0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106.32">
            <text:p>30106,32</text:p>
          </table:table-cell>
          <table:table-cell table:style-name="ce12N2" office:value-type="float" office:value="1204.25">
            <text:p>1204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21093348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5">
            <text:p>30903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64.8">
            <text:p>806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64.8">
            <text:p>806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2152">
            <text:p>1,522</text:p>
          </table:table-cell>
          <table:table-cell table:style-name="ce12N2" office:value-type="float" office:value="442.6">
            <text:p>44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6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06.49">
            <text:p>6806,49</text:p>
          </table:table-cell>
          <table:table-cell table:style-name="ce12N2" office:value-type="float" office:value="6.81">
            <text:p>6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26">
            <text:p>61,2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64.8">
            <text:p>8064,80</text:p>
          </table:table-cell>
          <table:table-cell table:style-name="ce12N2" office:value-type="float" office:value="564.54">
            <text:p>56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314507262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9">
            <text:p>309039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199.5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635.57">
            <text:p>21635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1635.57">
            <text:p>21635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.79936">
            <text:p>32,799</text:p>
          </table:table-cell>
          <table:table-cell table:style-name="ce12N2" office:value-type="float" office:value="307.8">
            <text:p>30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635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829.29">
            <text:p>18829,29</text:p>
          </table:table-cell>
          <table:table-cell table:style-name="ce12N2" office:value-type="float" office:value="18.83">
            <text:p>18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.47">
            <text:p>169,47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71.95">
            <text:p>12671,95</text:p>
          </table:table-cell>
          <table:table-cell table:style-name="ce12N2" office:value-type="float" office:value="887.04">
            <text:p>88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0376680001545500100119959017090732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0">
            <text:p>309040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7.7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.34">
            <text:p>14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3.4">
            <text:p>13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">
            <text:p>0,003</text:p>
          </table:table-cell>
          <table:table-cell table:style-name="ce12N2" office:value-type="float" office:value="0.1">
            <text:p>0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0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.06">
            <text:p>124,06</text:p>
          </table:table-cell>
          <table:table-cell table:style-name="ce12N2" office:value-type="float" office:value="0.12">
            <text:p>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6.94">
            <text:p>6,94</text:p>
          </table:table-cell>
          <table:table-cell table:style-name="ce12N2" office:value-type="float" office:value="133.4">
            <text:p>133,40</text:p>
          </table:table-cell>
          <table:table-cell table:style-name="ce12N2" office:value-type="float" office:value="9.34">
            <text:p>9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69947000003655500100006772611000094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2">
            <text:p>3090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1.38">
            <text:p>75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5.52">
            <text:p>705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52">
            <text:p>0,007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5.43">
            <text:p>595,43</text:p>
          </table:table-cell>
          <table:table-cell table:style-name="ce12N2" office:value-type="float" office:value="0.6">
            <text:p>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36">
            <text:p>5,3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45.86">
            <text:p>45,86</text:p>
          </table:table-cell>
          <table:table-cell table:style-name="ce12N2" office:value-type="float" office:value="705.52">
            <text:p>705,52</text:p>
          </table:table-cell>
          <table:table-cell table:style-name="ce12N2" office:value-type="float" office:value="49.39">
            <text:p>4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7210103917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4">
            <text:p>3090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4.5">
            <text:p>3934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34.5">
            <text:p>393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52">
            <text:p>0,000</text:p>
          </table:table-cell>
          <table:table-cell table:style-name="ce12N2" office:value-type="float" office:value="6.78">
            <text:p>6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4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20.62">
            <text:p>3320,62</text:p>
          </table:table-cell>
          <table:table-cell table:style-name="ce12N2" office:value-type="float" office:value="3.32">
            <text:p>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9">
            <text:p>29,8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4.5">
            <text:p>3934,50</text:p>
          </table:table-cell>
          <table:table-cell table:style-name="ce12N2" office:value-type="float" office:value="275.42">
            <text:p>27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6811466963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5">
            <text:p>3090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.69">
            <text:p>37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2.76">
            <text:p>352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26">
            <text:p>0,004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5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.73">
            <text:p>297,73</text:p>
          </table:table-cell>
          <table:table-cell table:style-name="ce12N2" office:value-type="float" office:value="0.3">
            <text:p>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68">
            <text:p>2,6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22.93">
            <text:p>22,93</text:p>
          </table:table-cell>
          <table:table-cell table:style-name="ce12N2" office:value-type="float" office:value="352.76">
            <text:p>352,76</text:p>
          </table:table-cell>
          <table:table-cell table:style-name="ce12N2" office:value-type="float" office:value="24.69">
            <text:p>24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7117847581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7">
            <text:p>3090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0.64">
            <text:p>1910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10.64">
            <text:p>1910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752">
            <text:p>0,008</text:p>
          </table:table-cell>
          <table:table-cell table:style-name="ce12N2" office:value-type="float" office:value="10.75">
            <text:p>10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10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44.78">
            <text:p>1644,78</text:p>
          </table:table-cell>
          <table:table-cell table:style-name="ce12N2" office:value-type="float" office:value="1.64">
            <text:p>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8">
            <text:p>14,8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2.98">
            <text:p>1402,98</text:p>
          </table:table-cell>
          <table:table-cell table:style-name="ce12N2" office:value-type="float" office:value="98.21">
            <text:p>98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7017621697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8">
            <text:p>3090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33.24">
            <text:p>1113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33.24">
            <text:p>1113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12">
            <text:p>0,066</text:p>
          </table:table-cell>
          <table:table-cell table:style-name="ce12N2" office:value-type="float" office:value="71.82">
            <text:p>71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13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96.17">
            <text:p>9396,17</text:p>
          </table:table-cell>
          <table:table-cell table:style-name="ce12N2" office:value-type="float" office:value="9.4">
            <text:p>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.57">
            <text:p>84,5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33.24">
            <text:p>11133,24</text:p>
          </table:table-cell>
          <table:table-cell table:style-name="ce12N2" office:value-type="float" office:value="779.33">
            <text:p>779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6918104450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9">
            <text:p>3090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16.24">
            <text:p>641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024.64">
            <text:p>602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7226">
            <text:p>0,087</text:p>
          </table:table-cell>
          <table:table-cell table:style-name="ce12N2" office:value-type="float" office:value="18.4">
            <text:p>1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41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48.67">
            <text:p>5248,67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24">
            <text:p>47,2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391.6">
            <text:p>391,60</text:p>
          </table:table-cell>
          <table:table-cell table:style-name="ce12N2" office:value-type="float" office:value="6024.64">
            <text:p>6024,64</text:p>
          </table:table-cell>
          <table:table-cell table:style-name="ce12N2" office:value-type="float" office:value="240.98">
            <text:p>24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731376116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0">
            <text:p>309050</text:p>
          </table:table-cell>
          <table:table-cell table:style-name="ce0" table:number-columns-spanned="4" table:number-rows-spanned="1" office:value-type="string" calcext:value-type="string">
            <text:p>9.315 - BRASIPLA INDUSTRIA E COMERCIO LTDA</text:p>
          </table:table-cell>
          <table:covered-table-cell table:number-columns-repeated="3"/>
          <table:table-cell table:style-name="ce0" office:value-type="string" calcext:value-type="string">
            <text:p>27.6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3.04">
            <text:p>2633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3.04">
            <text:p>2633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2">
            <text:p>0,720</text:p>
          </table:table-cell>
          <table:table-cell table:style-name="ce12N2" office:value-type="float" office:value="72">
            <text:p>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3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22.23">
            <text:p>2222,23</text:p>
          </table:table-cell>
          <table:table-cell table:style-name="ce12N2" office:value-type="float" office:value="2.22">
            <text:p>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33">
            <text:p>3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33.04">
            <text:p>2633,04</text:p>
          </table:table-cell>
          <table:table-cell table:style-name="ce12N2" office:value-type="float" office:value="184.31">
            <text:p>18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1225953000110550010000276781492008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1">
            <text:p>309051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19.262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91.74">
            <text:p>489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4792.89">
            <text:p>4792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736">
            <text:p>0,018</text:p>
          </table:table-cell>
          <table:table-cell table:style-name="ce12N2" office:value-type="float" office:value="163.39">
            <text:p>163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91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42.5">
            <text:p>4142,50</text:p>
          </table:table-cell>
          <table:table-cell table:style-name="ce12N2" office:value-type="float" office:value="4.15">
            <text:p>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28">
            <text:p>37,2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98.85">
            <text:p>98,85</text:p>
          </table:table-cell>
          <table:table-cell table:style-name="ce12N2" office:value-type="float" office:value="4792.89">
            <text:p>4792,89</text:p>
          </table:table-cell>
          <table:table-cell table:style-name="ce12N2" office:value-type="float" office:value="228.18">
            <text:p>228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32962730032985502300241926216359497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2">
            <text:p>309052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5.385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430.59">
            <text:p>6743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430.59">
            <text:p>67430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159232">
            <text:p>8,159</text:p>
          </table:table-cell>
          <table:table-cell table:style-name="ce12N2" office:value-type="float" office:value="6108.8">
            <text:p>610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.430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850.07">
            <text:p>53850,07</text:p>
          </table:table-cell>
          <table:table-cell table:style-name="ce12N2" office:value-type="float" office:value="53.85">
            <text:p>5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4.65">
            <text:p>484,6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430.59">
            <text:p>67430,59</text:p>
          </table:table-cell>
          <table:table-cell table:style-name="ce12N2" office:value-type="float" office:value="8091.67">
            <text:p>809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330817040022105501800008538510543418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6">
            <text:p>30905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4.95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52.53">
            <text:p>825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7692.1">
            <text:p>769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885">
            <text:p>0,109</text:p>
          </table:table-cell>
          <table:table-cell table:style-name="ce12N2" office:value-type="float" office:value="11.24">
            <text:p>11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5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09.38">
            <text:p>6509,38</text:p>
          </table:table-cell>
          <table:table-cell table:style-name="ce12N2" office:value-type="float" office:value="6.51">
            <text:p>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58">
            <text:p>58,58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560.43">
            <text:p>560,43</text:p>
          </table:table-cell>
          <table:table-cell table:style-name="ce12N2" office:value-type="float" office:value="7692.1">
            <text:p>7692,10</text:p>
          </table:table-cell>
          <table:table-cell table:style-name="ce12N2" office:value-type="float" office:value="519.25">
            <text:p>51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495514577380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0">
            <text:p>309060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88.407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57.26">
            <text:p>14457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270.78">
            <text:p>1427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864">
            <text:p>0,089</text:p>
          </table:table-cell>
          <table:table-cell table:style-name="ce12N2" office:value-type="float" office:value="232.43">
            <text:p>23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57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44.22">
            <text:p>12044,22</text:p>
          </table:table-cell>
          <table:table-cell table:style-name="ce12N2" office:value-type="float" office:value="12.03">
            <text:p>1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.39">
            <text:p>108,3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186.48">
            <text:p>186,48</text:p>
          </table:table-cell>
          <table:table-cell table:style-name="ce12N2" office:value-type="float" office:value="14270.78">
            <text:p>14270,78</text:p>
          </table:table-cell>
          <table:table-cell table:style-name="ce12N2" office:value-type="float" office:value="998.96">
            <text:p>99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985371000108550250007884071008710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1">
            <text:p>309061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88.409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2.43">
            <text:p>125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13">
            <text:p>121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05">
            <text:p>0,039</text:p>
          </table:table-cell>
          <table:table-cell table:style-name="ce12N2" office:value-type="float" office:value="6.3">
            <text:p>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5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6.78">
            <text:p>1056,78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5">
            <text:p>9,5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39.43">
            <text:p>39,43</text:p>
          </table:table-cell>
          <table:table-cell table:style-name="ce12N2" office:value-type="float" office:value="1213">
            <text:p>1213,00</text:p>
          </table:table-cell>
          <table:table-cell table:style-name="ce12N2" office:value-type="float" office:value="48.52">
            <text:p>48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9853710001085502500078840910055569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2">
            <text:p>309062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88.405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337.6">
            <text:p>1733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7194.08">
            <text:p>1719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6.53754">
            <text:p>36,538</text:p>
          </table:table-cell>
          <table:table-cell table:style-name="ce12N2" office:value-type="float" office:value="117.42">
            <text:p>11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33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11.42">
            <text:p>14511,42</text:p>
          </table:table-cell>
          <table:table-cell table:style-name="ce12N2" office:value-type="float" office:value="14.48">
            <text:p>14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.59">
            <text:p>130,5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143.52">
            <text:p>143,52</text:p>
          </table:table-cell>
          <table:table-cell table:style-name="ce12N2" office:value-type="float" office:value="17194.08">
            <text:p>17194,08</text:p>
          </table:table-cell>
          <table:table-cell table:style-name="ce12N2" office:value-type="float" office:value="1203.59">
            <text:p>120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985371000108550250007884051004933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3">
            <text:p>309063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88.406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639.76">
            <text:p>656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4564.82">
            <text:p>64564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06.228464">
            <text:p>506,228</text:p>
          </table:table-cell>
          <table:table-cell table:style-name="ce12N2" office:value-type="float" office:value="1897.19">
            <text:p>1897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.63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491.13">
            <text:p>54491,13</text:p>
          </table:table-cell>
          <table:table-cell table:style-name="ce12N2" office:value-type="float" office:value="54.46">
            <text:p>54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0.41">
            <text:p>490,4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1074.94">
            <text:p>1074,94</text:p>
          </table:table-cell>
          <table:table-cell table:style-name="ce12N2" office:value-type="float" office:value="64564.82">
            <text:p>64564,82</text:p>
          </table:table-cell>
          <table:table-cell table:style-name="ce12N2" office:value-type="float" office:value="4519.54">
            <text:p>451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985371000108550250007884061003635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4">
            <text:p>309064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88.408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08.8">
            <text:p>360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65.28">
            <text:p>276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544">
            <text:p>0,069</text:p>
          </table:table-cell>
          <table:table-cell table:style-name="ce12N2" office:value-type="float" office:value="25.2">
            <text:p>2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0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33.84">
            <text:p>2333,84</text:p>
          </table:table-cell>
          <table:table-cell table:style-name="ce12N2" office:value-type="float" office:value="2.33">
            <text:p>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65.28">
            <text:p>2765,28</text:p>
          </table:table-cell>
          <table:table-cell table:style-name="ce12N2" office:value-type="float" office:value="193.57">
            <text:p>193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185.45">
            <text:p>5185,45</text:p>
          </table:table-cell>
          <table:table-cell table:style-name="ce12N2" office:value-type="float" office:value="843.52">
            <text:p>843,52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9853710001085502500078840810006583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6">
            <text:p>309066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9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40">
            <text:p>70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40">
            <text:p>70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">
            <text:p>0,003</text:p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41.58">
            <text:p>5941,58</text:p>
          </table:table-cell>
          <table:table-cell table:style-name="ce12N2" office:value-type="float" office:value="5.94">
            <text:p>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47">
            <text:p>53,47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40">
            <text:p>7040,00</text:p>
          </table:table-cell>
          <table:table-cell table:style-name="ce12N2" office:value-type="float" office:value="492.8">
            <text:p>49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908013214694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7">
            <text:p>309067</text:p>
          </table:table-cell>
          <table:table-cell table:style-name="ce0" table:number-columns-spanned="4" table:number-rows-spanned="1" office:value-type="string" calcext:value-type="string">
            <text:p>37.716 - ELLFAS DO BRASIL LTDA</text:p>
          </table:table-cell>
          <table:covered-table-cell table:number-columns-repeated="3"/>
          <table:table-cell table:style-name="ce0" office:value-type="string" calcext:value-type="string">
            <text:p>7.2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77.36">
            <text:p>1037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44">
            <text:p>97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5">
            <text:p>0,003</text:p>
          </table:table-cell>
          <table:table-cell table:style-name="ce12N2" office:value-type="float" office:value="350">
            <text:p>3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7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23.69">
            <text:p>8223,69</text:p>
          </table:table-cell>
          <table:table-cell table:style-name="ce12N2" office:value-type="float" office:value="8.22">
            <text:p>8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01">
            <text:p>74,01</text:p>
          </table:table-cell>
          <table:table-cell table:style-name="ce12N2" office:value-type="float" office:value="41.5">
            <text:p>41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633.36">
            <text:p>633,36</text:p>
          </table:table-cell>
          <table:table-cell table:style-name="ce12N2" office:value-type="float" office:value="9744">
            <text:p>9744,00</text:p>
          </table:table-cell>
          <table:table-cell table:style-name="ce12N2" office:value-type="float" office:value="682.08">
            <text:p>68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6212048000302550010000072441137152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9">
            <text:p>30906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5.465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40.37">
            <text:p>2464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504.6">
            <text:p>24504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847">
            <text:p>0,685</text:p>
          </table:table-cell>
          <table:table-cell table:style-name="ce12N2" office:value-type="float" office:value="1440">
            <text:p>14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640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681.27">
            <text:p>20681,27</text:p>
          </table:table-cell>
          <table:table-cell table:style-name="ce12N2" office:value-type="float" office:value="20.69">
            <text:p>20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6.13">
            <text:p>186,13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135.77">
            <text:p>135,77</text:p>
          </table:table-cell>
          <table:table-cell table:style-name="ce12N2" office:value-type="float" office:value="24504.6">
            <text:p>24504,60</text:p>
          </table:table-cell>
          <table:table-cell table:style-name="ce12N2" office:value-type="float" office:value="1715.32">
            <text:p>1715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5617190095035502100197546515790124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74">
            <text:p>309074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172.46">
            <text:p>77172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7172.46">
            <text:p>77172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4.14019">
            <text:p>54,140</text:p>
          </table:table-cell>
          <table:table-cell table:style-name="ce12N2" office:value-type="float" office:value="5086.69">
            <text:p>5086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7.172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130.72">
            <text:p>65130,72</text:p>
          </table:table-cell>
          <table:table-cell table:style-name="ce12N2" office:value-type="float" office:value="65.13">
            <text:p>6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6.17">
            <text:p>586,1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172.46">
            <text:p>77172,46</text:p>
          </table:table-cell>
          <table:table-cell table:style-name="ce12N2" office:value-type="float" office:value="5402.08">
            <text:p>540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81412403570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75">
            <text:p>30907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8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182.36">
            <text:p>10718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7182.36">
            <text:p>10718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4.66115">
            <text:p>74,661</text:p>
          </table:table-cell>
          <table:table-cell table:style-name="ce12N2" office:value-type="float" office:value="7003.01">
            <text:p>7003,0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7.18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456.27">
            <text:p>90456,27</text:p>
          </table:table-cell>
          <table:table-cell table:style-name="ce12N2" office:value-type="float" office:value="90.45">
            <text:p>9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4.1">
            <text:p>814,10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182.36">
            <text:p>107182,36</text:p>
          </table:table-cell>
          <table:table-cell table:style-name="ce12N2" office:value-type="float" office:value="7502.77">
            <text:p>750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82019232358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79">
            <text:p>309079</text:p>
          </table:table-cell>
          <table:table-cell table:style-name="ce0" table:number-columns-spanned="4" table:number-rows-spanned="1" office:value-type="string" calcext:value-type="string">
            <text:p>13.118 - FORTLEV INDUST.E COMERC. DE PLASTICOS LTDA</text:p>
          </table:table-cell>
          <table:covered-table-cell table:number-columns-repeated="3"/>
          <table:table-cell table:style-name="ce0" office:value-type="string" calcext:value-type="string">
            <text:p>255.8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880.43">
            <text:p>12388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06295.8">
            <text:p>10629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47.678171">
            <text:p>847,678</text:p>
          </table:table-cell>
          <table:table-cell table:style-name="ce12N2" office:value-type="float" office:value="4953.24">
            <text:p>4953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3.880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887.82">
            <text:p>84887,82</text:p>
          </table:table-cell>
          <table:table-cell table:style-name="ce12N2" office:value-type="float" office:value="84.89">
            <text:p>8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3.99">
            <text:p>763,9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123.79">
            <text:p>123,79</text:p>
          </table:table-cell>
          <table:table-cell table:style-name="ce12N2" office:value-type="float" office:value="106295.8">
            <text:p>106295,80</text:p>
          </table:table-cell>
          <table:table-cell table:style-name="ce12N2" office:value-type="float" office:value="12755.51">
            <text:p>12755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0287.71">
            <text:p>150287,71</text:p>
          </table:table-cell>
          <table:table-cell table:style-name="ce12N2" office:value-type="float" office:value="17460.84">
            <text:p>17460,84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1092191100100455001000255826190064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0">
            <text:p>309080</text:p>
          </table:table-cell>
          <table:table-cell table:style-name="ce0" table:number-columns-spanned="4" table:number-rows-spanned="1" office:value-type="string" calcext:value-type="string">
            <text:p>27.064 - LINNI INDUSTRIA DE ARTEFATOS DE ALUMINIO LTDA</text:p>
          </table:table-cell>
          <table:covered-table-cell table:number-columns-repeated="3"/>
          <table:table-cell table:style-name="ce0" office:value-type="string" calcext:value-type="string">
            <text:p>3.7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.51">
            <text:p>8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.51">
            <text:p>81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35">
            <text:p>0,000</text:p>
          </table:table-cell>
          <table:table-cell table:style-name="ce12N2" office:value-type="float" office:value="0.2">
            <text:p>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.51">
            <text:p>81,51</text:p>
          </table:table-cell>
          <table:table-cell table:style-name="ce12N2" office:value-type="float" office:value="16.3">
            <text:p>1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399825550001115500100000371814672730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1">
            <text:p>309081</text:p>
          </table:table-cell>
          <table:table-cell table:style-name="ce0" table:number-columns-spanned="4" table:number-rows-spanned="1" office:value-type="string" calcext:value-type="string">
            <text:p>13.118 - FORTLEV INDUST.E COMERC. DE PLASTICOS LTDA</text:p>
          </table:table-cell>
          <table:covered-table-cell table:number-columns-repeated="3"/>
          <table:table-cell table:style-name="ce0" office:value-type="string" calcext:value-type="string">
            <text:p>255.7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132.49">
            <text:p>4113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276.58">
            <text:p>35276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5.09399">
            <text:p>125,094</text:p>
          </table:table-cell>
          <table:table-cell table:style-name="ce12N2" office:value-type="float" office:value="1245.6">
            <text:p>124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132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171.87">
            <text:p>28171,87</text:p>
          </table:table-cell>
          <table:table-cell table:style-name="ce12N2" office:value-type="float" office:value="28.17">
            <text:p>28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3.55">
            <text:p>253,5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276.58">
            <text:p>35276,58</text:p>
          </table:table-cell>
          <table:table-cell table:style-name="ce12N2" office:value-type="float" office:value="4233.19">
            <text:p>423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0445.51">
            <text:p>50445,51</text:p>
          </table:table-cell>
          <table:table-cell table:style-name="ce12N2" office:value-type="float" office:value="5855.91">
            <text:p>5855,91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109219110010045500100025574910244198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2">
            <text:p>309082</text:p>
          </table:table-cell>
          <table:table-cell table:style-name="ce0" table:number-columns-spanned="4" table:number-rows-spanned="1" office:value-type="string" calcext:value-type="string">
            <text:p>27.064 - LINNI INDUSTRIA DE ARTEFATOS DE ALUMINIO LTDA</text:p>
          </table:table-cell>
          <table:covered-table-cell table:number-columns-repeated="3"/>
          <table:table-cell table:style-name="ce0" office:value-type="string" calcext:value-type="string">
            <text:p>3.7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1.23">
            <text:p>77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1.23">
            <text:p>771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69078">
            <text:p>1,5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71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1.23">
            <text:p>771,23</text:p>
          </table:table-cell>
          <table:table-cell table:style-name="ce12N2" office:value-type="float" office:value="154.24">
            <text:p>15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39982555000111550010000037201030652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3">
            <text:p>3090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3.3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16556">
            <text:p>0,417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6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26.6">
            <text:p>8326,60</text:p>
          </table:table-cell>
          <table:table-cell table:style-name="ce12N2" office:value-type="float" office:value="8.33">
            <text:p>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94">
            <text:p>74,9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690.61">
            <text:p>69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333416664242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4">
            <text:p>309084</text:p>
          </table:table-cell>
          <table:table-cell table:style-name="ce0" table:number-columns-spanned="4" table:number-rows-spanned="1" office:value-type="string" calcext:value-type="string">
            <text:p>27.064 - LINNI INDUSTRIA DE ARTEFATOS DE ALUMINIO LTDA</text:p>
          </table:table-cell>
          <table:covered-table-cell table:number-columns-repeated="3"/>
          <table:table-cell table:style-name="ce0" office:value-type="string" calcext:value-type="string">
            <text:p>3.7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.51">
            <text:p>8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.51">
            <text:p>81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35">
            <text:p>0,000</text:p>
          </table:table-cell>
          <table:table-cell table:style-name="ce12N2" office:value-type="float" office:value="0.2">
            <text:p>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.51">
            <text:p>81,51</text:p>
          </table:table-cell>
          <table:table-cell table:style-name="ce12N2" office:value-type="float" office:value="16.3">
            <text:p>1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399825550001115500100000371912503132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7">
            <text:p>309087</text:p>
          </table:table-cell>
          <table:table-cell table:style-name="ce0" table:number-columns-spanned="4" table:number-rows-spanned="1" office:value-type="string" calcext:value-type="string">
            <text:p>38.144 - INDUSTRIA DE PLASTICOS E ACOS FARROUPILHA LTDA</text:p>
          </table:table-cell>
          <table:covered-table-cell table:number-columns-repeated="3"/>
          <table:table-cell table:style-name="ce0" office:value-type="string" calcext:value-type="string">
            <text:p>36.7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24.83">
            <text:p>17524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">
            <text:p>34,00</text:p>
          </table:table-cell>
          <table:table-cell table:style-name="ce12N2" office:value-type="float" office:value="16576.95">
            <text:p>16576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293">
            <text:p>0,063</text:p>
          </table:table-cell>
          <table:table-cell table:style-name="ce12N2" office:value-type="float" office:value="576.02">
            <text:p>576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524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80.51">
            <text:p>14880,51</text:p>
          </table:table-cell>
          <table:table-cell table:style-name="ce12N2" office:value-type="float" office:value="14.9">
            <text:p>14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.94">
            <text:p>133,9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947.88">
            <text:p>947,88</text:p>
          </table:table-cell>
          <table:table-cell table:style-name="ce12N2" office:value-type="float" office:value="16576.95">
            <text:p>16576,95</text:p>
          </table:table-cell>
          <table:table-cell table:style-name="ce12N2" office:value-type="float" office:value="1056.79">
            <text:p>105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018897840001135500100003673210009099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9">
            <text:p>309089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2.9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61.36">
            <text:p>2256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21503.64">
            <text:p>21503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169781">
            <text:p>3,170</text:p>
          </table:table-cell>
          <table:table-cell table:style-name="ce12N2" office:value-type="float" office:value="1245.05">
            <text:p>1245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561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466.61">
            <text:p>18466,61</text:p>
          </table:table-cell>
          <table:table-cell table:style-name="ce12N2" office:value-type="float" office:value="18.48">
            <text:p>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6.18">
            <text:p>166,18</text:p>
          </table:table-cell>
          <table:table-cell table:style-name="ce12N2" office:value-type="float" office:value="54.69">
            <text:p>54,6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1057.72">
            <text:p>1057,72</text:p>
          </table:table-cell>
          <table:table-cell table:style-name="ce12N2" office:value-type="float" office:value="20360.71">
            <text:p>20360,71</text:p>
          </table:table-cell>
          <table:table-cell table:style-name="ce12N2" office:value-type="float" office:value="1154.76">
            <text:p>115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293813194044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92">
            <text:p>309092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2.9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039.34">
            <text:p>126039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22072">
            <text:p>1220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697844">
            <text:p>13,698</text:p>
          </table:table-cell>
          <table:table-cell table:style-name="ce12N2" office:value-type="float" office:value="1865.95">
            <text:p>1865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.039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025.72">
            <text:p>103025,72</text:p>
          </table:table-cell>
          <table:table-cell table:style-name="ce12N2" office:value-type="float" office:value="103.03">
            <text:p>10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7.23">
            <text:p>927,23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3967.34">
            <text:p>3967,34</text:p>
          </table:table-cell>
          <table:table-cell table:style-name="ce12N2" office:value-type="float" office:value="122072">
            <text:p>122072,00</text:p>
          </table:table-cell>
          <table:table-cell table:style-name="ce12N2" office:value-type="float" office:value="8545.04">
            <text:p>854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293611007793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93">
            <text:p>309093</text:p>
          </table:table-cell>
          <table:table-cell table:style-name="ce0" table:number-columns-spanned="4" table:number-rows-spanned="1" office:value-type="string" calcext:value-type="string">
            <text:p>13.198 - SDSTK INDUSTRIA E COMERCIO LTDA</text:p>
          </table:table-cell>
          <table:covered-table-cell table:number-columns-repeated="3"/>
          <table:table-cell table:style-name="ce0" office:value-type="string" calcext:value-type="string">
            <text:p>13.1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21.38">
            <text:p>542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252.8">
            <text:p>5252,80</text:p>
          </table:table-cell>
          <table:table-cell table:style-name="ce12N2" office:value-type="float" office:value="168.58">
            <text:p>168,58</text:p>
          </table:table-cell>
          <table:table-cell table:style-name="ce12N3" office:value-type="float" office:value="0.14673">
            <text:p>0,147</text:p>
          </table:table-cell>
          <table:table-cell table:style-name="ce12N2" office:value-type="float" office:value="16.52">
            <text:p>16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2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14.56">
            <text:p>5014,56</text:p>
          </table:table-cell>
          <table:table-cell table:style-name="ce12N2" office:value-type="float" office:value="5.01">
            <text:p>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14">
            <text:p>45,1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21.38">
            <text:p>5421,38</text:p>
          </table:table-cell>
          <table:table-cell table:style-name="ce12N2" office:value-type="float" office:value="216.85">
            <text:p>21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86786380001035500100001314819236660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97">
            <text:p>30909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6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99.25">
            <text:p>349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499.25">
            <text:p>3499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378">
            <text:p>0,064</text:p>
          </table:table-cell>
          <table:table-cell table:style-name="ce12N2" office:value-type="float" office:value="32.14">
            <text:p>3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99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47">
            <text:p>3047,00</text:p>
          </table:table-cell>
          <table:table-cell table:style-name="ce12N2" office:value-type="float" office:value="3.05">
            <text:p>3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42">
            <text:p>27,42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99.25">
            <text:p>3499,25</text:p>
          </table:table-cell>
          <table:table-cell table:style-name="ce12N2" office:value-type="float" office:value="141.67">
            <text:p>14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61810004671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98">
            <text:p>30909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6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.4">
            <text:p>45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2.4">
            <text:p>45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64">
            <text:p>0,075</text:p>
          </table:table-cell>
          <table:table-cell table:style-name="ce12N2" office:value-type="float" office:value="8.76">
            <text:p>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1.6">
            <text:p>381,60</text:p>
          </table:table-cell>
          <table:table-cell table:style-name="ce12N2" office:value-type="float" office:value="0.38">
            <text:p>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43">
            <text:p>3,43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2.4">
            <text:p>452,40</text:p>
          </table:table-cell>
          <table:table-cell table:style-name="ce12N2" office:value-type="float" office:value="31.67">
            <text:p>3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62117169786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99">
            <text:p>30909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6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314.95">
            <text:p>49314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49314.95">
            <text:p>49314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639347">
            <text:p>4,639</text:p>
          </table:table-cell>
          <table:table-cell table:style-name="ce12N2" office:value-type="float" office:value="867.09">
            <text:p>867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.314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608.92">
            <text:p>41608,92</text:p>
          </table:table-cell>
          <table:table-cell table:style-name="ce12N2" office:value-type="float" office:value="41.58">
            <text:p>4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4.47">
            <text:p>374,4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314.95">
            <text:p>49314,95</text:p>
          </table:table-cell>
          <table:table-cell table:style-name="ce12N2" office:value-type="float" office:value="3452.06">
            <text:p>345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61419703373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0">
            <text:p>30910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6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47.95">
            <text:p>1684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16847.95">
            <text:p>16847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524413">
            <text:p>2,524</text:p>
          </table:table-cell>
          <table:table-cell table:style-name="ce12N2" office:value-type="float" office:value="510.13">
            <text:p>510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47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225.94">
            <text:p>14225,94</text:p>
          </table:table-cell>
          <table:table-cell table:style-name="ce12N2" office:value-type="float" office:value="14.23">
            <text:p>1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8.06">
            <text:p>128,06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47.95">
            <text:p>16847,95</text:p>
          </table:table-cell>
          <table:table-cell table:style-name="ce12N2" office:value-type="float" office:value="1164.97">
            <text:p>1164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61516737520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1">
            <text:p>30910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6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67.86">
            <text:p>9067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067.86">
            <text:p>9067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9308">
            <text:p>0,693</text:p>
          </table:table-cell>
          <table:table-cell table:style-name="ce12N2" office:value-type="float" office:value="85.66">
            <text:p>85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67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53.58">
            <text:p>7653,58</text:p>
          </table:table-cell>
          <table:table-cell table:style-name="ce12N2" office:value-type="float" office:value="7.66">
            <text:p>7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88">
            <text:p>68,8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67.86">
            <text:p>9067,86</text:p>
          </table:table-cell>
          <table:table-cell table:style-name="ce12N2" office:value-type="float" office:value="634.76">
            <text:p>63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62213776528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2">
            <text:p>309102</text:p>
          </table:table-cell>
          <table:table-cell table:style-name="ce0" table:number-columns-spanned="4" table:number-rows-spanned="1" office:value-type="string" calcext:value-type="string">
            <text:p>780 - INDUSTRIA E COMERCIO RIOMAR CORDAS LTDA</text:p>
          </table:table-cell>
          <table:covered-table-cell table:number-columns-repeated="3"/>
          <table:table-cell table:style-name="ce0" office:value-type="string" calcext:value-type="string">
            <text:p>171.3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6856">
            <text:p>0,807</text:p>
          </table:table-cell>
          <table:table-cell table:style-name="ce12N2" office:value-type="float" office:value="1731.53">
            <text:p>1731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1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59.72">
            <text:p>6659,72</text:p>
          </table:table-cell>
          <table:table-cell table:style-name="ce12N2" office:value-type="float" office:value="6.66">
            <text:p>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94">
            <text:p>59,9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554.2">
            <text:p>55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4298926000103550010001713531525277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3">
            <text:p>309103</text:p>
          </table:table-cell>
          <table:table-cell table:style-name="ce0" table:number-columns-spanned="4" table:number-rows-spanned="1" office:value-type="string" calcext:value-type="string">
            <text:p>13.002 - TECNYL IND E COM DE TELAS LTDA</text:p>
          </table:table-cell>
          <table:covered-table-cell table:number-columns-repeated="3"/>
          <table:table-cell table:style-name="ce0" office:value-type="string" calcext:value-type="string">
            <text:p>23.3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44.5">
            <text:p>16144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144.5">
            <text:p>1614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4111">
            <text:p>8,411</text:p>
          </table:table-cell>
          <table:table-cell table:style-name="ce12N2" office:value-type="float" office:value="1284">
            <text:p>128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144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466.37">
            <text:p>14466,37</text:p>
          </table:table-cell>
          <table:table-cell table:style-name="ce12N2" office:value-type="float" office:value="14.47">
            <text:p>14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.2">
            <text:p>130,2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144.5">
            <text:p>16144,50</text:p>
          </table:table-cell>
          <table:table-cell table:style-name="ce12N2" office:value-type="float" office:value="1130.12">
            <text:p>113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53111730001445500100002331510279121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5">
            <text:p>309105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96</text:p>
          </table:table-cell>
          <table:table-cell table:style-name="ce9" office:value-type="string" calcext:value-type="string">
            <text:p>13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566.12">
            <text:p>5856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8566.12">
            <text:p>58566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27392">
            <text:p>4,927</text:p>
          </table:table-cell>
          <table:table-cell table:style-name="ce12N2" office:value-type="float" office:value="7499.94">
            <text:p>749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566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428.35">
            <text:p>49428,35</text:p>
          </table:table-cell>
          <table:table-cell table:style-name="ce12N2" office:value-type="float" office:value="49.43">
            <text:p>4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4.84">
            <text:p>444,8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566.12">
            <text:p>58566,12</text:p>
          </table:table-cell>
          <table:table-cell table:style-name="ce12N2" office:value-type="float" office:value="4099.62">
            <text:p>409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821546000102550130000000961557606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7">
            <text:p>30910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7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68.2">
            <text:p>466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68.2">
            <text:p>466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5699">
            <text:p>1,657</text:p>
          </table:table-cell>
          <table:table-cell table:style-name="ce12N2" office:value-type="float" office:value="343.91">
            <text:p>343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68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39.75">
            <text:p>3939,75</text:p>
          </table:table-cell>
          <table:table-cell table:style-name="ce12N2" office:value-type="float" office:value="3.94">
            <text:p>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.46">
            <text:p>35,46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68.2">
            <text:p>4668,20</text:p>
          </table:table-cell>
          <table:table-cell table:style-name="ce12N2" office:value-type="float" office:value="326.77">
            <text:p>32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73116943025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10">
            <text:p>30911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7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312.18">
            <text:p>8731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7312.18">
            <text:p>87312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5.53167">
            <text:p>185,532</text:p>
          </table:table-cell>
          <table:table-cell table:style-name="ce12N2" office:value-type="float" office:value="5773.53">
            <text:p>577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7.312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686.66">
            <text:p>73686,66</text:p>
          </table:table-cell>
          <table:table-cell table:style-name="ce12N2" office:value-type="float" office:value="73.68">
            <text:p>7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3.17">
            <text:p>663,1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312.18">
            <text:p>87312,18</text:p>
          </table:table-cell>
          <table:table-cell table:style-name="ce12N2" office:value-type="float" office:value="6111.85">
            <text:p>611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75015332734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13">
            <text:p>309113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54.2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7.32">
            <text:p>247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460.8">
            <text:p>246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504">
            <text:p>0,350</text:p>
          </table:table-cell>
          <table:table-cell table:style-name="ce12N2" office:value-type="float" office:value="269">
            <text:p>26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7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76.86">
            <text:p>2076,86</text:p>
          </table:table-cell>
          <table:table-cell table:style-name="ce12N2" office:value-type="float" office:value="2.07">
            <text:p>2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69">
            <text:p>18,6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16.52">
            <text:p>16,52</text:p>
          </table:table-cell>
          <table:table-cell table:style-name="ce12N2" office:value-type="float" office:value="2460.8">
            <text:p>2460,80</text:p>
          </table:table-cell>
          <table:table-cell table:style-name="ce12N2" office:value-type="float" office:value="172.25">
            <text:p>17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681867000130550010009542871817698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16">
            <text:p>309116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7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93">
            <text:p>709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93">
            <text:p>709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765">
            <text:p>0,338</text:p>
          </table:table-cell>
          <table:table-cell table:style-name="ce12N2" office:value-type="float" office:value="81">
            <text:p>8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9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93">
            <text:p>7093,00</text:p>
          </table:table-cell>
          <table:table-cell table:style-name="ce12N2" office:value-type="float" office:value="270.95">
            <text:p>27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79616595904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23">
            <text:p>309123</text:p>
          </table:table-cell>
          <table:table-cell table:style-name="ce0" table:number-columns-spanned="4" table:number-rows-spanned="1" office:value-type="string" calcext:value-type="string">
            <text:p>35.459 - TRENTO INDUSTRIA DE ARTEFATOS DE ALUMINIO LTDA</text:p>
          </table:table-cell>
          <table:covered-table-cell table:number-columns-repeated="3"/>
          <table:table-cell table:style-name="ce0" office:value-type="string" calcext:value-type="string">
            <text:p>3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85.2">
            <text:p>4338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43385.2">
            <text:p>4338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25.00075">
            <text:p>925,001</text:p>
          </table:table-cell>
          <table:table-cell table:style-name="ce12N2" office:value-type="float" office:value="161.25">
            <text:p>161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385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385.2">
            <text:p>43385,20</text:p>
          </table:table-cell>
          <table:table-cell table:style-name="ce12N2" office:value-type="float" office:value="802.65">
            <text:p>80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539433900001085500100000037111655457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1">
            <text:p>309131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7.6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179.06">
            <text:p>13017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30179.06">
            <text:p>130179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8.9502">
            <text:p>208,950</text:p>
          </table:table-cell>
          <table:table-cell table:style-name="ce12N2" office:value-type="float" office:value="2286.3">
            <text:p>228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0.179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867.87">
            <text:p>109867,87</text:p>
          </table:table-cell>
          <table:table-cell table:style-name="ce12N2" office:value-type="float" office:value="109.87">
            <text:p>109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8.81">
            <text:p>988,8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179.06">
            <text:p>130179,06</text:p>
          </table:table-cell>
          <table:table-cell table:style-name="ce12N2" office:value-type="float" office:value="9112.53">
            <text:p>911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5440420001195500100047769916930532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2">
            <text:p>309132</text:p>
          </table:table-cell>
          <table:table-cell table:style-name="ce0" table:number-columns-spanned="4" table:number-rows-spanned="1" office:value-type="string" calcext:value-type="string">
            <text:p>543 - ESTEVES S/A.</text:p>
          </table:table-cell>
          <table:covered-table-cell table:number-columns-repeated="3"/>
          <table:table-cell table:style-name="ce0" office:value-type="string" calcext:value-type="string">
            <text:p>364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43.9">
            <text:p>284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54.38">
            <text:p>2754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6">
            <text:p>0,002</text:p>
          </table:table-cell>
          <table:table-cell table:style-name="ce12N2" office:value-type="float" office:value="20.34">
            <text:p>20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43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24.62">
            <text:p>2324,62</text:p>
          </table:table-cell>
          <table:table-cell table:style-name="ce12N2" office:value-type="float" office:value="2.32">
            <text:p>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92">
            <text:p>20,92</text:p>
          </table:table-cell>
          <table:table-cell table:style-name="ce12N2" office:value-type="float" office:value="41.56">
            <text:p>41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89.52">
            <text:p>89,52</text:p>
          </table:table-cell>
          <table:table-cell table:style-name="ce12N2" office:value-type="float" office:value="2754.38">
            <text:p>2754,38</text:p>
          </table:table-cell>
          <table:table-cell table:style-name="ce12N2" office:value-type="float" office:value="192.81">
            <text:p>19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837457000187550010003643311507955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4">
            <text:p>30913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1.3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3.77">
            <text:p>103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01.23">
            <text:p>1001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496">
            <text:p>0,068</text:p>
          </table:table-cell>
          <table:table-cell table:style-name="ce12N2" office:value-type="float" office:value="8.98">
            <text:p>8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33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5.01">
            <text:p>845,01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61">
            <text:p>7,61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32.54">
            <text:p>32,54</text:p>
          </table:table-cell>
          <table:table-cell table:style-name="ce12N2" office:value-type="float" office:value="1001.23">
            <text:p>1001,23</text:p>
          </table:table-cell>
          <table:table-cell table:style-name="ce12N2" office:value-type="float" office:value="70.08">
            <text:p>7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13161570383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5">
            <text:p>30913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9503.43">
            <text:p>12950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129480.1">
            <text:p>12948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677488">
            <text:p>11,677</text:p>
          </table:table-cell>
          <table:table-cell table:style-name="ce12N2" office:value-type="float" office:value="3587.9">
            <text:p>3587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9.503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862.14">
            <text:p>109862,14</text:p>
          </table:table-cell>
          <table:table-cell table:style-name="ce12N2" office:value-type="float" office:value="109.84">
            <text:p>10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8.76">
            <text:p>988,7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23.33">
            <text:p>23,33</text:p>
          </table:table-cell>
          <table:table-cell table:style-name="ce12N2" office:value-type="float" office:value="129480.1">
            <text:p>129480,10</text:p>
          </table:table-cell>
          <table:table-cell table:style-name="ce12N2" office:value-type="float" office:value="8419.91">
            <text:p>84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21810491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6">
            <text:p>30913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59.6">
            <text:p>2415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159.6">
            <text:p>2415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5108">
            <text:p>1,051</text:p>
          </table:table-cell>
          <table:table-cell table:style-name="ce12N2" office:value-type="float" office:value="228">
            <text:p>22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5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47.85">
            <text:p>21047,85</text:p>
          </table:table-cell>
          <table:table-cell table:style-name="ce12N2" office:value-type="float" office:value="21.05">
            <text:p>2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43">
            <text:p>189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59.6">
            <text:p>24159,60</text:p>
          </table:table-cell>
          <table:table-cell table:style-name="ce12N2" office:value-type="float" office:value="966.38">
            <text:p>96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318820766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7">
            <text:p>309137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4.6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8.81">
            <text:p>49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3.11">
            <text:p>483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904">
            <text:p>0,003</text:p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8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.73">
            <text:p>407,73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67">
            <text:p>3,67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15.7">
            <text:p>15,70</text:p>
          </table:table-cell>
          <table:table-cell table:style-name="ce12N2" office:value-type="float" office:value="483.11">
            <text:p>483,11</text:p>
          </table:table-cell>
          <table:table-cell table:style-name="ce12N2" office:value-type="float" office:value="33.82">
            <text:p>3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46291941728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9">
            <text:p>309139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4.6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2.53">
            <text:p>71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7.31">
            <text:p>677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048">
            <text:p>0,018</text:p>
          </table:table-cell>
          <table:table-cell table:style-name="ce12N2" office:value-type="float" office:value="6.91">
            <text:p>6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1.64">
            <text:p>571,64</text:p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35.22">
            <text:p>35,22</text:p>
          </table:table-cell>
          <table:table-cell table:style-name="ce12N2" office:value-type="float" office:value="677.31">
            <text:p>677,31</text:p>
          </table:table-cell>
          <table:table-cell table:style-name="ce12N2" office:value-type="float" office:value="47.41">
            <text:p>4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46281901301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0">
            <text:p>30914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80">
            <text:p>44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980">
            <text:p>44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">
            <text:p>0,126</text:p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961.99">
            <text:p>37961,99</text:p>
          </table:table-cell>
          <table:table-cell table:style-name="ce12N2" office:value-type="float" office:value="37.96">
            <text:p>3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1.66">
            <text:p>341,6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80">
            <text:p>44980,00</text:p>
          </table:table-cell>
          <table:table-cell table:style-name="ce12N2" office:value-type="float" office:value="3148.6">
            <text:p>314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113458315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1">
            <text:p>309141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7.6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59.51">
            <text:p>3225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26394.05">
            <text:p>26394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0.472864">
            <text:p>60,473</text:p>
          </table:table-cell>
          <table:table-cell table:style-name="ce12N2" office:value-type="float" office:value="656.06">
            <text:p>656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259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275.9">
            <text:p>22275,90</text:p>
          </table:table-cell>
          <table:table-cell table:style-name="ce12N2" office:value-type="float" office:value="22.28">
            <text:p>2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0.5">
            <text:p>200,5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394.05">
            <text:p>26394,05</text:p>
          </table:table-cell>
          <table:table-cell table:style-name="ce12N2" office:value-type="float" office:value="1847.59">
            <text:p>184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166.21">
            <text:p>38166,21</text:p>
          </table:table-cell>
          <table:table-cell table:style-name="ce12N2" office:value-type="float" office:value="5865.46">
            <text:p>5865,46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370081450001495500100010760515939015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2">
            <text:p>309142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7.6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55.7">
            <text:p>715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155.7">
            <text:p>715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96278">
            <text:p>13,963</text:p>
          </table:table-cell>
          <table:table-cell table:style-name="ce12N2" office:value-type="float" office:value="242.99">
            <text:p>242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5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39.24">
            <text:p>6039,24</text:p>
          </table:table-cell>
          <table:table-cell table:style-name="ce12N2" office:value-type="float" office:value="6.04">
            <text:p>6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35">
            <text:p>54,3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55.7">
            <text:p>7155,70</text:p>
          </table:table-cell>
          <table:table-cell table:style-name="ce12N2" office:value-type="float" office:value="500.9">
            <text:p>50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370081450001495500100010760617291310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3">
            <text:p>309143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5.06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817.3">
            <text:p>7981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817.3">
            <text:p>79817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972">
            <text:p>11,972</text:p>
          </table:table-cell>
          <table:table-cell table:style-name="ce12N2" office:value-type="float" office:value="4480.35">
            <text:p>4480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.817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363.8">
            <text:p>67363,80</text:p>
          </table:table-cell>
          <table:table-cell table:style-name="ce12N2" office:value-type="float" office:value="67.37">
            <text:p>6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6.28">
            <text:p>606,2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817.3">
            <text:p>79817,30</text:p>
          </table:table-cell>
          <table:table-cell table:style-name="ce12N2" office:value-type="float" office:value="5587.21">
            <text:p>5587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801902002501550000008250631859681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7">
            <text:p>3091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20">
            <text:p>154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20">
            <text:p>154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7">
            <text:p>0,087</text:p>
          </table:table-cell>
          <table:table-cell table:style-name="ce12N2" office:value-type="float" office:value="94.5">
            <text:p>9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4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14.09">
            <text:p>13014,09</text:p>
          </table:table-cell>
          <table:table-cell table:style-name="ce12N2" office:value-type="float" office:value="13.01">
            <text:p>1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7.13">
            <text:p>117,1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20">
            <text:p>15420,00</text:p>
          </table:table-cell>
          <table:table-cell table:style-name="ce12N2" office:value-type="float" office:value="1079.4">
            <text:p>107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319222284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8">
            <text:p>3091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72.5">
            <text:p>1967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672.5">
            <text:p>1967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6">
            <text:p>0,001</text:p>
          </table:table-cell>
          <table:table-cell table:style-name="ce12N2" office:value-type="float" office:value="33.9">
            <text:p>3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672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03.1">
            <text:p>16603,10</text:p>
          </table:table-cell>
          <table:table-cell table:style-name="ce12N2" office:value-type="float" office:value="16.6">
            <text:p>1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.43">
            <text:p>149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72.5">
            <text:p>19672,50</text:p>
          </table:table-cell>
          <table:table-cell table:style-name="ce12N2" office:value-type="float" office:value="1377.08">
            <text:p>137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41896471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9">
            <text:p>3091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88">
            <text:p>0,021</text:p>
          </table:table-cell>
          <table:table-cell table:style-name="ce12N2" office:value-type="float" office:value="22.68">
            <text:p>22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3.38">
            <text:p>3123,38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1">
            <text:p>28,1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259.06">
            <text:p>25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514424412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65">
            <text:p>165,00</text:p>
          </table:table-cell>
          <table:table-cell table:style-name="ce26N2" office:value-type="float" office:value="1221.99">
            <text:p>1221,99</text:p>
          </table:table-cell>
          <table:table-cell table:style-name="ce26N2" office:value-type="float" office:value="168.58">
            <text:p>168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0448.97">
            <text:p>50448,97</text:p>
          </table:table-cell>
          <table:table-cell table:style-name="ce26N2" office:value-type="float" office:value="4226950.92">
            <text:p>4226950,92</text:p>
          </table:table-cell>
          <table:table-cell table:style-name="ce26N2" office:value-type="float" office:value="292843.62">
            <text:p>292843,6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962.58">
            <text:p>2962,58</text:p>
          </table:table-cell>
          <table:table-cell table:style-name="ce26N2" office:value-type="float" office:value="4388434.23">
            <text:p>4388434,2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82122.82">
            <text:p>282122,82</text:p>
          </table:table-cell>
          <table:table-cell table:style-name="ce26N2" office:value-type="float" office:value="36843.09">
            <text:p>36843,09</text:p>
          </table:table-cell>
          <table:table-cell table:style-name="ce26N2" office:value-type="float" office:value="2108.32">
            <text:p>2108,3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0104.296565">
            <text:p>20104,297</text:p>
          </table:table-cell>
          <table:table-cell table:style-name="ce26N2" office:value-type="float" office:value="4302195.58">
            <text:p>4302195,58</text:p>
          </table:table-cell>
          <table:table-cell table:style-name="ce26N2" office:value-type="float" office:value="4388434.23">
            <text:p>4388434,2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501400.6">
            <text:p>3501400,60</text:p>
          </table:table-cell>
          <table:table-cell table:style-name="ce26N2" office:value-type="float" office:value="3501.36">
            <text:p>3501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1512.49">
            <text:p>31512,49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90702.49">
            <text:p>390702,4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7.07">
            <text:p>47,0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052" meta:object-count="0"/>
    <meta:generator>LibreOffice/4.3.0.4$Windows_x86 LibreOffice_project/62ad5818884a2fc2e5780dd45466868d41009ec0</meta:generator>
  </office:meta>
</office:document-meta>
</file>