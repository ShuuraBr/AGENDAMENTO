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1/06/2026 04:30:33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6">
            <text:p>30784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063">
            <text:p>0,044</text:p>
          </table:table-cell>
          <table:table-cell table:style-name="ce12N2" office:value-type="float" office:value="10.31">
            <text:p>1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137.69">
            <text:p>13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351324832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8">
            <text:p>3078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4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6">
            <text:p>0,006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199.9">
            <text:p>1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451488912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5">
            <text:p>30795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4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7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593.23">
            <text:p>59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4228157457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6">
            <text:p>3079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25.36">
            <text:p>545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4813.12">
            <text:p>448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25808">
            <text:p>7,526</text:p>
          </table:table-cell>
          <table:table-cell table:style-name="ce12N2" office:value-type="float" office:value="751.49">
            <text:p>75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5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94.88">
            <text:p>2894,88</text:p>
          </table:table-cell>
          <table:table-cell table:style-name="ce12N2" office:value-type="float" office:value="42977.89">
            <text:p>42977,89</text:p>
          </table:table-cell>
          <table:table-cell table:style-name="ce12N2" office:value-type="float" office:value="1782.08">
            <text:p>17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037.94">
            <text:p>38037,94</text:p>
          </table:table-cell>
          <table:table-cell table:style-name="ce12N2" office:value-type="float" office:value="6817.36">
            <text:p>6817,3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4115120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0">
            <text:p>308090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7.25">
            <text:p>244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496">
            <text:p>0,89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77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34.68">
            <text:p>20134,68</text:p>
          </table:table-cell>
          <table:table-cell table:style-name="ce12N2" office:value-type="float" office:value="20.13">
            <text:p>2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1">
            <text:p>181,21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20.28">
            <text:p>620,28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1669.99">
            <text:p>166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31932554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2">
            <text:p>30811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07.18">
            <text:p>13510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3629">
            <text:p>7,136</text:p>
          </table:table-cell>
          <table:table-cell table:style-name="ce12N2" office:value-type="float" office:value="1347.5">
            <text:p>134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5.10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596.02">
            <text:p>108596,02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36">
            <text:p>977,36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6.1">
            <text:p>10456,1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4986.05">
            <text:p>49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9381426612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4">
            <text:p>30819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7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97.69">
            <text:p>5149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9928">
            <text:p>49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65345">
            <text:p>15,653</text:p>
          </table:table-cell>
          <table:table-cell table:style-name="ce12N2" office:value-type="float" office:value="1609.55">
            <text:p>1609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49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137.98">
            <text:p>42137,98</text:p>
          </table:table-cell>
          <table:table-cell table:style-name="ce12N2" office:value-type="float" office:value="42.14">
            <text:p>4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24">
            <text:p>379,2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569.69">
            <text:p>1569,69</text:p>
          </table:table-cell>
          <table:table-cell table:style-name="ce12N2" office:value-type="float" office:value="49928">
            <text:p>49928,00</text:p>
          </table:table-cell>
          <table:table-cell table:style-name="ce12N2" office:value-type="float" office:value="3494.96">
            <text:p>3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73931211190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2">
            <text:p>308212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1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">
            <text:p>0,00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2.72">
            <text:p>2892,72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03">
            <text:p>2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239.93">
            <text:p>23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3101772105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6">
            <text:p>30824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4124.66">
            <text:p>98412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58853.58">
            <text:p>958853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8.627062">
            <text:p>48,627</text:p>
          </table:table-cell>
          <table:table-cell table:style-name="ce12N2" office:value-type="float" office:value="5420.2">
            <text:p>542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4.12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7945.56">
            <text:p>817945,56</text:p>
          </table:table-cell>
          <table:table-cell table:style-name="ce12N2" office:value-type="float" office:value="817.93">
            <text:p>81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61.49">
            <text:p>7361,4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5271.08">
            <text:p>25271,08</text:p>
          </table:table-cell>
          <table:table-cell table:style-name="ce12N2" office:value-type="float" office:value="958853.58">
            <text:p>958853,58</text:p>
          </table:table-cell>
          <table:table-cell table:style-name="ce12N2" office:value-type="float" office:value="57536.13">
            <text:p>57536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21614848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9">
            <text:p>3082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9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78">
            <text:p>20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70087">
            <text:p>3,370</text:p>
          </table:table-cell>
          <table:table-cell table:style-name="ce12N2" office:value-type="float" office:value="10528">
            <text:p>105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9.94">
            <text:p>16979,94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82">
            <text:p>152,82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30.77">
            <text:p>130,77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1408.33">
            <text:p>14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952137648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4">
            <text:p>30826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41188285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9">
            <text:p>30826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13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92.59">
            <text:p>3599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3970.35">
            <text:p>3397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17.093475">
            <text:p>717,093</text:p>
          </table:table-cell>
          <table:table-cell table:style-name="ce12N2" office:value-type="float" office:value="1122.74">
            <text:p>1122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99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70.13">
            <text:p>28670,13</text:p>
          </table:table-cell>
          <table:table-cell table:style-name="ce12N2" office:value-type="float" office:value="28.68">
            <text:p>2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.02">
            <text:p>258,02</text:p>
          </table:table-cell>
          <table:table-cell table:style-name="ce12N2" office:value-type="float" office:value="55.21">
            <text:p>55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022.24">
            <text:p>2022,24</text:p>
          </table:table-cell>
          <table:table-cell table:style-name="ce12N2" office:value-type="float" office:value="33970.35">
            <text:p>33970,35</text:p>
          </table:table-cell>
          <table:table-cell table:style-name="ce12N2" office:value-type="float" office:value="2377.92">
            <text:p>23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1311210696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70">
            <text:p>3082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5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6122">
            <text:p>0,406</text:p>
          </table:table-cell>
          <table:table-cell table:style-name="ce12N2" office:value-type="float" office:value="88.8">
            <text:p>8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.43">
            <text:p>1057,43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87.7">
            <text:p>8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50441956711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6">
            <text:p>30833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24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4.43">
            <text:p>36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8">
            <text:p>33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6">
            <text:p>0,005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6.78">
            <text:p>2916,78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5">
            <text:p>26,25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26.43">
            <text:p>326,43</text:p>
          </table:table-cell>
          <table:table-cell table:style-name="ce12N2" office:value-type="float" office:value="3348">
            <text:p>3348,00</text:p>
          </table:table-cell>
          <table:table-cell table:style-name="ce12N2" office:value-type="float" office:value="133.92">
            <text:p>13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2481510979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7">
            <text:p>30833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25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6.58">
            <text:p>714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921.62">
            <text:p>692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068">
            <text:p>0,022</text:p>
          </table:table-cell>
          <table:table-cell table:style-name="ce12N2" office:value-type="float" office:value="22.07">
            <text:p>22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30.11">
            <text:p>6030,11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7">
            <text:p>54,27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4.96">
            <text:p>224,96</text:p>
          </table:table-cell>
          <table:table-cell table:style-name="ce12N2" office:value-type="float" office:value="6921.62">
            <text:p>6921,62</text:p>
          </table:table-cell>
          <table:table-cell table:style-name="ce12N2" office:value-type="float" office:value="276.86">
            <text:p>27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2541673082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0">
            <text:p>30834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6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1.3">
            <text:p>24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60216">
            <text:p>4,860</text:p>
          </table:table-cell>
          <table:table-cell table:style-name="ce12N2" office:value-type="float" office:value="18788.4">
            <text:p>1878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1.46">
            <text:p>20251,46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7">
            <text:p>182,27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5.97">
            <text:p>155,97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1679.67">
            <text:p>167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652138553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1">
            <text:p>30834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8.39">
            <text:p>511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1826">
            <text:p>0,592</text:p>
          </table:table-cell>
          <table:table-cell table:style-name="ce12N2" office:value-type="float" office:value="4084.48">
            <text:p>408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91.91">
            <text:p>4291,91</text:p>
          </table:table-cell>
          <table:table-cell table:style-name="ce12N2" office:value-type="float" office:value="4.29">
            <text:p>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63">
            <text:p>38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3.05">
            <text:p>33,05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355.97">
            <text:p>35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71683356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1">
            <text:p>30835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86.57">
            <text:p>2528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490.63">
            <text:p>24490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5078">
            <text:p>3,751</text:p>
          </table:table-cell>
          <table:table-cell table:style-name="ce12N2" office:value-type="float" office:value="449.38">
            <text:p>449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86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69.48">
            <text:p>20669,48</text:p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.03">
            <text:p>186,03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95.94">
            <text:p>795,94</text:p>
          </table:table-cell>
          <table:table-cell table:style-name="ce12N2" office:value-type="float" office:value="24490.63">
            <text:p>24490,63</text:p>
          </table:table-cell>
          <table:table-cell table:style-name="ce12N2" office:value-type="float" office:value="1714.34">
            <text:p>171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3541758481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3">
            <text:p>308353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5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73.19">
            <text:p>1507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4767.5">
            <text:p>1476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219">
            <text:p>0,050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7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63.39">
            <text:p>12463,39</text:p>
          </table:table-cell>
          <table:table-cell table:style-name="ce12N2" office:value-type="float" office:value="12.46">
            <text:p>1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.17">
            <text:p>112,1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05.69">
            <text:p>305,69</text:p>
          </table:table-cell>
          <table:table-cell table:style-name="ce12N2" office:value-type="float" office:value="14767.5">
            <text:p>14767,50</text:p>
          </table:table-cell>
          <table:table-cell table:style-name="ce12N2" office:value-type="float" office:value="1033.73">
            <text:p>103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3511172918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5">
            <text:p>308435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8.38">
            <text:p>23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05.06">
            <text:p>2205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1">
            <text:p>1861,00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4">
            <text:p>16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43.32">
            <text:p>143,32</text:p>
          </table:table-cell>
          <table:table-cell table:style-name="ce12N2" office:value-type="float" office:value="2205.06">
            <text:p>2205,06</text:p>
          </table:table-cell>
          <table:table-cell table:style-name="ce12N2" office:value-type="float" office:value="154.36">
            <text:p>15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11300611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8">
            <text:p>3084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7166289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0">
            <text:p>30844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9.07">
            <text:p>1143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2008">
            <text:p>3,382</text:p>
          </table:table-cell>
          <table:table-cell table:style-name="ce12N2" office:value-type="float" office:value="11520">
            <text:p>115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3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91.95">
            <text:p>9591,95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33">
            <text:p>86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3.87">
            <text:p>73,87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795.56">
            <text:p>79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8182882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2">
            <text:p>30844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1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42.36">
            <text:p>774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54.54">
            <text:p>70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224">
            <text:p>0,602</text:p>
          </table:table-cell>
          <table:table-cell table:style-name="ce12N2" office:value-type="float" office:value="156.8">
            <text:p>15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4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5.92">
            <text:p>6145,92</text:p>
          </table:table-cell>
          <table:table-cell table:style-name="ce12N2" office:value-type="float" office:value="6.15">
            <text:p>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31">
            <text:p>55,31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87.82">
            <text:p>687,82</text:p>
          </table:table-cell>
          <table:table-cell table:style-name="ce12N2" office:value-type="float" office:value="7054.54">
            <text:p>7054,54</text:p>
          </table:table-cell>
          <table:table-cell table:style-name="ce12N2" office:value-type="float" office:value="282.18">
            <text:p>28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1861589445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3">
            <text:p>308443</text:p>
          </table:table-cell>
          <table:table-cell table:style-name="ce0" table:number-columns-spanned="4" table:number-rows-spanned="1" office:value-type="string" calcext:value-type="string">
            <text:p>670 - INDUSTRIA DE FORJADOS SAO ROMAO LTDA</text:p>
          </table:table-cell>
          <table:covered-table-cell table:number-columns-repeated="3"/>
          <table:table-cell table:style-name="ce0" office:value-type="string" calcext:value-type="string">
            <text:p>58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28.63">
            <text:p>1522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4865.96">
            <text:p>148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0122">
            <text:p>0,460</text:p>
          </table:table-cell>
          <table:table-cell table:style-name="ce12N2" office:value-type="float" office:value="707.1">
            <text:p>70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22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82.56">
            <text:p>13482,56</text:p>
          </table:table-cell>
          <table:table-cell table:style-name="ce12N2" office:value-type="float" office:value="13.5">
            <text:p>1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.34">
            <text:p>121,34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62.67">
            <text:p>362,67</text:p>
          </table:table-cell>
          <table:table-cell table:style-name="ce12N2" office:value-type="float" office:value="12011.41">
            <text:p>12011,41</text:p>
          </table:table-cell>
          <table:table-cell table:style-name="ce12N2" office:value-type="float" office:value="840.81">
            <text:p>8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16725848000118550010000581471000000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5">
            <text:p>30844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9.09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8.3">
            <text:p>713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38.3">
            <text:p>713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4">
            <text:p>0,075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3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18.89">
            <text:p>6218,89</text:p>
          </table:table-cell>
          <table:table-cell table:style-name="ce12N2" office:value-type="float" office:value="6.22">
            <text:p>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97">
            <text:p>55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38.3">
            <text:p>7138,30</text:p>
          </table:table-cell>
          <table:table-cell table:style-name="ce12N2" office:value-type="float" office:value="285.53">
            <text:p>28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90981437751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6">
            <text:p>30844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6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793.33">
            <text:p>4879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793.33">
            <text:p>4879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00">
            <text:p>3500,000</text:p>
          </table:table-cell>
          <table:table-cell table:style-name="ce12N2" office:value-type="float" office:value="437.5">
            <text:p>43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79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80.36">
            <text:p>41180,36</text:p>
          </table:table-cell>
          <table:table-cell table:style-name="ce12N2" office:value-type="float" office:value="41.18">
            <text:p>4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.62">
            <text:p>370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793.33">
            <text:p>48793,33</text:p>
          </table:table-cell>
          <table:table-cell table:style-name="ce12N2" office:value-type="float" office:value="3415.53">
            <text:p>341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65081319729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7">
            <text:p>30844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21771390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9">
            <text:p>30844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9.54">
            <text:p>57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1004">
            <text:p>1,691</text:p>
          </table:table-cell>
          <table:table-cell table:style-name="ce12N2" office:value-type="float" office:value="5760">
            <text:p>5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95.97">
            <text:p>4795,97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16">
            <text:p>43,16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6.94">
            <text:p>36,94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397.78">
            <text:p>39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3152297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4">
            <text:p>308454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717">
            <text:p>0,357</text:p>
          </table:table-cell>
          <table:table-cell table:style-name="ce12N2" office:value-type="float" office:value="374.4">
            <text:p>3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2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70.22">
            <text:p>12670,22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04">
            <text:p>114,0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1802.54">
            <text:p>180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3919735015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2">
            <text:p>308462</text:p>
          </table:table-cell>
          <table:table-cell table:style-name="ce0" table:number-columns-spanned="4" table:number-rows-spanned="1" office:value-type="string" calcext:value-type="string">
            <text:p>12.902 - CORDOARIA BRASIL INDUSTRIA E COMERCIO DE CORDAS EIRELI</text:p>
          </table:table-cell>
          <table:covered-table-cell table:number-columns-repeated="3"/>
          <table:table-cell table:style-name="ce0" office:value-type="string" calcext:value-type="string">
            <text:p>49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632">
            <text:p>0,296</text:p>
          </table:table-cell>
          <table:table-cell table:style-name="ce12N2" office:value-type="float" office:value="5299.35">
            <text:p>5299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7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1.91">
            <text:p>6611,91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1">
            <text:p>59,5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516.52">
            <text:p>5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454624000153550010000496771758234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3">
            <text:p>30846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26.25">
            <text:p>3492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00045">
            <text:p>2,800</text:p>
          </table:table-cell>
          <table:table-cell table:style-name="ce12N2" office:value-type="float" office:value="300.85">
            <text:p>30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92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25.59">
            <text:p>30125,59</text:p>
          </table:table-cell>
          <table:table-cell table:style-name="ce12N2" office:value-type="float" office:value="30.14">
            <text:p>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14">
            <text:p>271,14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8.92">
            <text:p>28,92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1701.07">
            <text:p>170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3311732807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5">
            <text:p>308465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4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792">
            <text:p>0,069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.84">
            <text:p>220,84</text:p>
          </table:table-cell>
          <table:table-cell table:style-name="ce12N2" office:value-type="float" office:value="0.22">
            <text:p>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4150744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6">
            <text:p>308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0.45">
            <text:p>23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69.44">
            <text:p>216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02">
            <text:p>0,017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0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0.95">
            <text:p>1830,95</text:p>
          </table:table-cell>
          <table:table-cell table:style-name="ce12N2" office:value-type="float" office:value="1.83">
            <text:p>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48">
            <text:p>16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41.01">
            <text:p>141,01</text:p>
          </table:table-cell>
          <table:table-cell table:style-name="ce12N2" office:value-type="float" office:value="2169.44">
            <text:p>2169,44</text:p>
          </table:table-cell>
          <table:table-cell table:style-name="ce12N2" office:value-type="float" office:value="151.86">
            <text:p>15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291657184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7">
            <text:p>308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5.4">
            <text:p>363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5.4">
            <text:p>363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5.16">
            <text:p>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5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8.18">
            <text:p>3068,18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1">
            <text:p>27,6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5.4">
            <text:p>3635,40</text:p>
          </table:table-cell>
          <table:table-cell table:style-name="ce12N2" office:value-type="float" office:value="254.48">
            <text:p>25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011614840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8">
            <text:p>308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12.89">
            <text:p>1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8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70.46">
            <text:p>7670,46</text:p>
          </table:table-cell>
          <table:table-cell table:style-name="ce12N2" office:value-type="float" office:value="7.67">
            <text:p>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03">
            <text:p>69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636.2">
            <text:p>63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11035501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9">
            <text:p>308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83">
            <text:p>127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83">
            <text:p>127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">
            <text:p>0,004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88.53">
            <text:p>10788,53</text:p>
          </table:table-cell>
          <table:table-cell table:style-name="ce12N2" office:value-type="float" office:value="10.79">
            <text:p>1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1">
            <text:p>97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83">
            <text:p>12783,00</text:p>
          </table:table-cell>
          <table:table-cell table:style-name="ce12N2" office:value-type="float" office:value="894.81">
            <text:p>89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21288685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0">
            <text:p>308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272.61">
            <text:p>17327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71588.08">
            <text:p>1715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024832">
            <text:p>6,025</text:p>
          </table:table-cell>
          <table:table-cell table:style-name="ce12N2" office:value-type="float" office:value="485.54">
            <text:p>48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3.27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53.86">
            <text:p>145853,86</text:p>
          </table:table-cell>
          <table:table-cell table:style-name="ce12N2" office:value-type="float" office:value="145.86">
            <text:p>14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68">
            <text:p>131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684.53">
            <text:p>1684,53</text:p>
          </table:table-cell>
          <table:table-cell table:style-name="ce12N2" office:value-type="float" office:value="167518.9">
            <text:p>167518,90</text:p>
          </table:table-cell>
          <table:table-cell table:style-name="ce12N2" office:value-type="float" office:value="10867.54">
            <text:p>1086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317946248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6">
            <text:p>308496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76.06">
            <text:p>1107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1048">
            <text:p>2,410</text:p>
          </table:table-cell>
          <table:table-cell table:style-name="ce12N2" office:value-type="float" office:value="860.9">
            <text:p>86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76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76.5">
            <text:p>9976,50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.78">
            <text:p>89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48.64">
            <text:p>348,64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750.92">
            <text:p>7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2164439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7">
            <text:p>308497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1.08">
            <text:p>436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28.15">
            <text:p>3928,15</text:p>
          </table:table-cell>
          <table:table-cell table:style-name="ce12N2" office:value-type="float" office:value="3.93">
            <text:p>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34">
            <text:p>35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7.26">
            <text:p>137,26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295.67">
            <text:p>29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091748272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8">
            <text:p>308498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35.78">
            <text:p>11063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.13361">
            <text:p>29,134</text:p>
          </table:table-cell>
          <table:table-cell table:style-name="ce12N2" office:value-type="float" office:value="8729.32">
            <text:p>872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0.63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048.12">
            <text:p>90048,12</text:p>
          </table:table-cell>
          <table:table-cell table:style-name="ce12N2" office:value-type="float" office:value="90.05">
            <text:p>9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0.43">
            <text:p>810,4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984.76">
            <text:p>3984,76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7424.44">
            <text:p>74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31084140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9">
            <text:p>308499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7.03">
            <text:p>227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88">
            <text:p>0,795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0.98">
            <text:p>2050,98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46">
            <text:p>18,4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1.67">
            <text:p>71,67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154.38">
            <text:p>15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11531791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0">
            <text:p>308500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5.21">
            <text:p>8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16">
            <text:p>0,056</text:p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.3">
            <text:p>752,30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7">
            <text:p>6,7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56.62">
            <text:p>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0114454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5">
            <text:p>3085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02.53">
            <text:p>3510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93168">
            <text:p>3,693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0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47.35">
            <text:p>29347,35</text:p>
          </table:table-cell>
          <table:table-cell table:style-name="ce12N2" office:value-type="float" office:value="29.34">
            <text:p>2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12">
            <text:p>264,1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32.23">
            <text:p>632,23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2131.63">
            <text:p>213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614736633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6">
            <text:p>3085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44">
            <text:p>5,644</text:p>
          </table:table-cell>
          <table:table-cell table:style-name="ce12N2" office:value-type="float" office:value="349.4">
            <text:p>34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94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966.16">
            <text:p>53966,16</text:p>
          </table:table-cell>
          <table:table-cell table:style-name="ce12N2" office:value-type="float" office:value="53.97">
            <text:p>5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.7">
            <text:p>485,7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4476">
            <text:p>44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8321063213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0">
            <text:p>30855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54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5811">
            <text:p>2,558</text:p>
          </table:table-cell>
          <table:table-cell table:style-name="ce12N2" office:value-type="float" office:value="717.38">
            <text:p>71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3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22.56">
            <text:p>20622,5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6">
            <text:p>185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1710.45">
            <text:p>17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5431964997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5">
            <text:p>308555</text:p>
          </table:table-cell>
          <table:table-cell table:style-name="ce0" table:number-columns-spanned="4" table:number-rows-spanned="1" office:value-type="string" calcext:value-type="string">
            <text:p>760 - WESTAFLEX TUBOS FLEXIVEIS LTDA</text:p>
          </table:table-cell>
          <table:covered-table-cell table:number-columns-repeated="3"/>
          <table:table-cell table:style-name="ce0" office:value-type="string" calcext:value-type="string">
            <text:p>183.6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798.89">
            <text:p>3879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8462.67">
            <text:p>38462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038">
            <text:p>5,730</text:p>
          </table:table-cell>
          <table:table-cell table:style-name="ce12N2" office:value-type="float" office:value="161.52">
            <text:p>16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798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125.32">
            <text:p>32125,32</text:p>
          </table:table-cell>
          <table:table-cell table:style-name="ce12N2" office:value-type="float" office:value="32.12">
            <text:p>3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.12">
            <text:p>289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36.22">
            <text:p>336,22</text:p>
          </table:table-cell>
          <table:table-cell table:style-name="ce12N2" office:value-type="float" office:value="38462.67">
            <text:p>38462,67</text:p>
          </table:table-cell>
          <table:table-cell table:style-name="ce12N2" office:value-type="float" office:value="2692.38">
            <text:p>269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750245210009355500100018369210750950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8">
            <text:p>308558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9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98.32">
            <text:p>9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401619827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1">
            <text:p>30856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91.43">
            <text:p>2629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8025">
            <text:p>1,258</text:p>
          </table:table-cell>
          <table:table-cell table:style-name="ce12N2" office:value-type="float" office:value="933.36">
            <text:p>93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291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01.23">
            <text:p>21001,23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01">
            <text:p>189,01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185.36">
            <text:p>2185,36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964.24">
            <text:p>96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2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41589400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2">
            <text:p>30856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2.75">
            <text:p>484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390">
            <text:p>3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6.03">
            <text:p>4236,03</text:p>
          </table:table-cell>
          <table:table-cell table:style-name="ce12N2" office:value-type="float" office:value="4.24">
            <text:p>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12">
            <text:p>38,1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30.22">
            <text:p>430,22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176.5">
            <text:p>1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51589447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3">
            <text:p>308563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190.73">
            <text:p>8119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81190.73">
            <text:p>8119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06076">
            <text:p>5,306</text:p>
          </table:table-cell>
          <table:table-cell table:style-name="ce12N2" office:value-type="float" office:value="9695.92">
            <text:p>9695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190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22.97">
            <text:p>68522,97</text:p>
          </table:table-cell>
          <table:table-cell table:style-name="ce12N2" office:value-type="float" office:value="68.52">
            <text:p>6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6.71">
            <text:p>616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190.73">
            <text:p>81190,73</text:p>
          </table:table-cell>
          <table:table-cell table:style-name="ce12N2" office:value-type="float" office:value="5683.36">
            <text:p>568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77180348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5">
            <text:p>308565</text:p>
          </table:table-cell>
          <table:table-cell table:style-name="ce0" table:number-columns-spanned="4" table:number-rows-spanned="1" office:value-type="string" calcext:value-type="string">
            <text:p>7.661 - SEGURIMAX COM. AT. EQUIP. SEG. IMP. EXP</text:p>
          </table:table-cell>
          <table:covered-table-cell table:number-columns-repeated="3"/>
          <table:table-cell table:style-name="ce0" office:value-type="string" calcext:value-type="string">
            <text:p>183.7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32.33">
            <text:p>455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2983.85">
            <text:p>42983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217">
            <text:p>0,532</text:p>
          </table:table-cell>
          <table:table-cell table:style-name="ce12N2" office:value-type="float" office:value="676.81">
            <text:p>67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3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47.54">
            <text:p>37447,54</text:p>
          </table:table-cell>
          <table:table-cell table:style-name="ce12N2" office:value-type="float" office:value="37.45">
            <text:p>3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04">
            <text:p>337,0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548.48">
            <text:p>2548,48</text:p>
          </table:table-cell>
          <table:table-cell table:style-name="ce12N2" office:value-type="float" office:value="42983.85">
            <text:p>42983,85</text:p>
          </table:table-cell>
          <table:table-cell table:style-name="ce12N2" office:value-type="float" office:value="1719.34">
            <text:p>171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79.33">
            <text:p>12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2.374</text:p>
          </table:table-cell>
          <table:table-cell table:style-name="ce0" office:value-type="string" calcext:value-type="string">
            <text:p>34.164 - TRANSPORTES MARLIM LTDA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.279,33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42260517011376000102550010001837351141562958</text:p>
          </table:table-cell>
          <table:table-cell table:style-name="ce0" office:value-type="string" calcext:value-type="string">
            <text:p>4226065815837200012057001000042374100042420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6">
            <text:p>308566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4.851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97.61">
            <text:p>6089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7887.46">
            <text:p>5788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322">
            <text:p>0,903</text:p>
          </table:table-cell>
          <table:table-cell table:style-name="ce12N2" office:value-type="float" office:value="429.86">
            <text:p>429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.897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431.55">
            <text:p>50431,55</text:p>
          </table:table-cell>
          <table:table-cell table:style-name="ce12N2" office:value-type="float" office:value="50.43">
            <text:p>5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3.88">
            <text:p>453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010.15">
            <text:p>3010,15</text:p>
          </table:table-cell>
          <table:table-cell table:style-name="ce12N2" office:value-type="float" office:value="57887.46">
            <text:p>57887,46</text:p>
          </table:table-cell>
          <table:table-cell table:style-name="ce12N2" office:value-type="float" office:value="2315.5">
            <text:p>23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48511411565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0">
            <text:p>3085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4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104">
            <text:p>0,371</text:p>
          </table:table-cell>
          <table:table-cell table:style-name="ce12N2" office:value-type="float" office:value="44.76">
            <text:p>44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8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7.76">
            <text:p>4397,76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8">
            <text:p>39,5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183.24">
            <text:p>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43481610762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2">
            <text:p>308582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4.1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88.48">
            <text:p>5318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23574">
            <text:p>9,224</text:p>
          </table:table-cell>
          <table:table-cell table:style-name="ce12N2" office:value-type="float" office:value="1769.07">
            <text:p>176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18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14.18">
            <text:p>43414,18</text:p>
          </table:table-cell>
          <table:table-cell table:style-name="ce12N2" office:value-type="float" office:value="43.42">
            <text:p>4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74">
            <text:p>390,7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860.04">
            <text:p>1860,04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3489.09">
            <text:p>34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41921627051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6">
            <text:p>3085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13">
            <text:p>118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72">
            <text:p>0,001</text:p>
          </table:table-cell>
          <table:table-cell table:style-name="ce12N2" office:value-type="float" office:value="2.33">
            <text:p>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0.76">
            <text:p>940,76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2.45">
            <text:p>72,45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78.03">
            <text:p>7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21873219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8">
            <text:p>3085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0.93">
            <text:p>54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11.64">
            <text:p>1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1.36">
            <text:p>4351,36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6">
            <text:p>39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360.91">
            <text:p>36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0195091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9">
            <text:p>3085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8">
            <text:p>0,035</text:p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5.35">
            <text:p>4945,35</text:p>
          </table:table-cell>
          <table:table-cell table:style-name="ce12N2" office:value-type="float" office:value="4.95">
            <text:p>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51">
            <text:p>44,5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410.17">
            <text:p>41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31547187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2">
            <text:p>3085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4.78">
            <text:p>272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58.48">
            <text:p>255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02">
            <text:p>0,017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9.3">
            <text:p>2159,3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3">
            <text:p>1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66.3">
            <text:p>166,30</text:p>
          </table:table-cell>
          <table:table-cell table:style-name="ce12N2" office:value-type="float" office:value="2558.48">
            <text:p>2558,48</text:p>
          </table:table-cell>
          <table:table-cell table:style-name="ce12N2" office:value-type="float" office:value="179.09">
            <text:p>17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71546314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3">
            <text:p>3085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9">
            <text:p>0,067</text:p>
          </table:table-cell>
          <table:table-cell table:style-name="ce12N2" office:value-type="float" office:value="72.77">
            <text:p>72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79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19.81">
            <text:p>9519,81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68">
            <text:p>85,6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789.58">
            <text:p>78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516421766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5">
            <text:p>3085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3">
            <text:p>67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15">
            <text:p>63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2">
            <text:p>0,001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36">
            <text:p>534,36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15">
            <text:p>633,15</text:p>
          </table:table-cell>
          <table:table-cell table:style-name="ce12N2" office:value-type="float" office:value="44.32">
            <text:p>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81015902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7">
            <text:p>308597</text:p>
          </table:table-cell>
          <table:table-cell table:style-name="ce0" table:number-columns-spanned="4" table:number-rows-spanned="1" office:value-type="string" calcext:value-type="string">
            <text:p>12.193 - AC VENT INDUSTRIA ELETROMECANICA LTDA</text:p>
          </table:table-cell>
          <table:covered-table-cell table:number-columns-repeated="3"/>
          <table:table-cell table:style-name="ce0" office:value-type="string" calcext:value-type="string">
            <text:p>14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75.44">
            <text:p>2257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1864.84">
            <text:p>2186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56">
            <text:p>0,486</text:p>
          </table:table-cell>
          <table:table-cell table:style-name="ce12N2" office:value-type="float" office:value="172">
            <text:p>1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57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92.09">
            <text:p>19592,09</text:p>
          </table:table-cell>
          <table:table-cell table:style-name="ce12N2" office:value-type="float" office:value="19.58">
            <text:p>1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.33">
            <text:p>176,3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0.6">
            <text:p>710,60</text:p>
          </table:table-cell>
          <table:table-cell table:style-name="ce12N2" office:value-type="float" office:value="21864.84">
            <text:p>21864,84</text:p>
          </table:table-cell>
          <table:table-cell table:style-name="ce12N2" office:value-type="float" office:value="1530.54">
            <text:p>15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411308000179550010000148341208821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08">
            <text:p>3086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6">
            <text:p>0,014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6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4.57">
            <text:p>5874,57</text:p>
          </table:table-cell>
          <table:table-cell table:style-name="ce12N2" office:value-type="float" office:value="5.87">
            <text:p>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87">
            <text:p>52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487.24">
            <text:p>48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81481705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2">
            <text:p>308622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22.96">
            <text:p>262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184.24">
            <text:p>1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61852688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0">
            <text:p>3086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2.12">
            <text:p>73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7.44">
            <text:p>687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8">
            <text:p>0,001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.18">
            <text:p>580,18</text:p>
          </table:table-cell>
          <table:table-cell table:style-name="ce12N2" office:value-type="float" office:value="0.58">
            <text:p>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44.68">
            <text:p>44,68</text:p>
          </table:table-cell>
          <table:table-cell table:style-name="ce12N2" office:value-type="float" office:value="687.44">
            <text:p>687,44</text:p>
          </table:table-cell>
          <table:table-cell table:style-name="ce12N2" office:value-type="float" office:value="48.12">
            <text:p>4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61035126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1">
            <text:p>3086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0.93">
            <text:p>54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11.64">
            <text:p>1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1.36">
            <text:p>4351,36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6">
            <text:p>39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360.91">
            <text:p>36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91263814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3">
            <text:p>308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2.74">
            <text:p>43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4.64">
            <text:p>41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088">
            <text:p>0,005</text:p>
          </table:table-cell>
          <table:table-cell table:style-name="ce12N2" office:value-type="float" office:value="9.31">
            <text:p>9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2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1.1">
            <text:p>3481,10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3">
            <text:p>31,3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268.1">
            <text:p>268,10</text:p>
          </table:table-cell>
          <table:table-cell table:style-name="ce12N2" office:value-type="float" office:value="4124.64">
            <text:p>4124,64</text:p>
          </table:table-cell>
          <table:table-cell table:style-name="ce12N2" office:value-type="float" office:value="288.72">
            <text:p>28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710237443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1">
            <text:p>30864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9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84.02">
            <text:p>1158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339.4">
            <text:p>1133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23">
            <text:p>0,060</text:p>
          </table:table-cell>
          <table:table-cell table:style-name="ce12N2" office:value-type="float" office:value="33.44">
            <text:p>33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8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70.17">
            <text:p>9570,17</text:p>
          </table:table-cell>
          <table:table-cell table:style-name="ce12N2" office:value-type="float" office:value="9.57">
            <text:p>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13">
            <text:p>86,1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244.62">
            <text:p>244,62</text:p>
          </table:table-cell>
          <table:table-cell table:style-name="ce12N2" office:value-type="float" office:value="11339.4">
            <text:p>11339,40</text:p>
          </table:table-cell>
          <table:table-cell table:style-name="ce12N2" office:value-type="float" office:value="793.76">
            <text:p>79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3931417917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7">
            <text:p>308647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8.6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.47">
            <text:p>20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56.45">
            <text:p>185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055">
            <text:p>0,019</text:p>
          </table:table-cell>
          <table:table-cell table:style-name="ce12N2" office:value-type="float" office:value="13.39">
            <text:p>1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3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7.34">
            <text:p>1617,34</text:p>
          </table:table-cell>
          <table:table-cell table:style-name="ce12N2" office:value-type="float" office:value="1.61">
            <text:p>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43">
            <text:p>4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81.02">
            <text:p>181,02</text:p>
          </table:table-cell>
          <table:table-cell table:style-name="ce12N2" office:value-type="float" office:value="1856.45">
            <text:p>1856,45</text:p>
          </table:table-cell>
          <table:table-cell table:style-name="ce12N2" office:value-type="float" office:value="74.26">
            <text:p>7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023429000143550010003886811983609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7">
            <text:p>3086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2.32">
            <text:p>13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5">
            <text:p>0,004</text:p>
          </table:table-cell>
          <table:table-cell table:style-name="ce12N2" office:value-type="float" office:value="450">
            <text:p>4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4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3.32">
            <text:p>10573,32</text:p>
          </table:table-cell>
          <table:table-cell table:style-name="ce12N2" office:value-type="float" office:value="10.57">
            <text:p>1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16">
            <text:p>95,16</text:p>
          </table:table-cell>
          <table:table-cell table:style-name="ce12N2" office:value-type="float" office:value="42.5">
            <text:p>4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14.32">
            <text:p>814,32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876.96">
            <text:p>87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2817804288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8">
            <text:p>30866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2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18.31">
            <text:p>2001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2554">
            <text:p>1,426</text:p>
          </table:table-cell>
          <table:table-cell table:style-name="ce12N2" office:value-type="float" office:value="253.86">
            <text:p>253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18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99.27">
            <text:p>15399,27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6">
            <text:p>138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772.18">
            <text:p>1772,18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1277.23">
            <text:p>127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2921570463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9">
            <text:p>308669</text:p>
          </table:table-cell>
          <table:table-cell table:style-name="ce0" table:number-columns-spanned="4" table:number-rows-spanned="1" office:value-type="string" calcext:value-type="string">
            <text:p>995 - LUMIBRAS INDUSTRIA METALURGICA LTDA</text:p>
          </table:table-cell>
          <table:covered-table-cell table:number-columns-repeated="3"/>
          <table:table-cell table:style-name="ce0" office:value-type="string" calcext:value-type="string">
            <text:p>87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7.65">
            <text:p>466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09.44">
            <text:p>4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956">
            <text:p>0,430</text:p>
          </table:table-cell>
          <table:table-cell table:style-name="ce12N2" office:value-type="float" office:value="114.75">
            <text:p>114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7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7.06">
            <text:p>3637,06</text:p>
          </table:table-cell>
          <table:table-cell table:style-name="ce12N2" office:value-type="float" office:value="3.64">
            <text:p>3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73">
            <text:p>32,73</text:p>
          </table:table-cell>
          <table:table-cell table:style-name="ce12N2" office:value-type="float" office:value="34.4">
            <text:p>34,4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8.21">
            <text:p>358,21</text:p>
          </table:table-cell>
          <table:table-cell table:style-name="ce12N2" office:value-type="float" office:value="4309.44">
            <text:p>4309,44</text:p>
          </table:table-cell>
          <table:table-cell table:style-name="ce12N2" office:value-type="float" office:value="301.67">
            <text:p>30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47711000184550010000875641058667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0">
            <text:p>308680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41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41.54">
            <text:p>2164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641.54">
            <text:p>2164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261">
            <text:p>0,473</text:p>
          </table:table-cell>
          <table:table-cell table:style-name="ce12N2" office:value-type="float" office:value="50.9">
            <text:p>5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4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264.92">
            <text:p>18264,92</text:p>
          </table:table-cell>
          <table:table-cell table:style-name="ce12N2" office:value-type="float" office:value="18.26">
            <text:p>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38">
            <text:p>164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41.54">
            <text:p>21641,54</text:p>
          </table:table-cell>
          <table:table-cell table:style-name="ce12N2" office:value-type="float" office:value="1514.91">
            <text:p>151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413177977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1">
            <text:p>3086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3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2.1">
            <text:p>260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252">
            <text:p>0,032</text:p>
          </table:table-cell>
          <table:table-cell table:style-name="ce12N2" office:value-type="float" office:value="42.62">
            <text:p>4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48.36">
            <text:p>2148,36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33">
            <text:p>1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2.3">
            <text:p>112,3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122.45">
            <text:p>12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300158619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2">
            <text:p>308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7.22">
            <text:p>2967,22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">
            <text:p>26,7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246.1">
            <text:p>24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8918241979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4">
            <text:p>308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51.35">
            <text:p>2515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073.63">
            <text:p>25073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9">
            <text:p>0,142</text:p>
          </table:table-cell>
          <table:table-cell table:style-name="ce12N2" office:value-type="float" office:value="157.66">
            <text:p>157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51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61.51">
            <text:p>21161,51</text:p>
          </table:table-cell>
          <table:table-cell table:style-name="ce12N2" office:value-type="float" office:value="21.16">
            <text:p>2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7.72">
            <text:p>77,72</text:p>
          </table:table-cell>
          <table:table-cell table:style-name="ce12N2" office:value-type="float" office:value="25073.63">
            <text:p>25073,63</text:p>
          </table:table-cell>
          <table:table-cell table:style-name="ce12N2" office:value-type="float" office:value="1755.15">
            <text:p>175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8819861788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5">
            <text:p>308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44">
            <text:p>0,000</text:p>
          </table:table-cell>
          <table:table-cell table:style-name="ce12N2" office:value-type="float" office:value="1.94">
            <text:p>1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1.84">
            <text:p>1201,84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2">
            <text:p>10,8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99.68">
            <text:p>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481522157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7">
            <text:p>308687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5.53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3.96">
            <text:p>108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6">
            <text:p>108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0.6">
            <text:p>1040,60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3.96">
            <text:p>1083,96</text:p>
          </table:table-cell>
          <table:table-cell table:style-name="ce12N2" office:value-type="float" office:value="43.36">
            <text:p>4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55341638850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0">
            <text:p>308710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9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2.82">
            <text:p>838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382.82">
            <text:p>838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0878">
            <text:p>0,131</text:p>
          </table:table-cell>
          <table:table-cell table:style-name="ce12N2" office:value-type="float" office:value="21.71">
            <text:p>21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4.89">
            <text:p>7074,89</text:p>
          </table:table-cell>
          <table:table-cell table:style-name="ce12N2" office:value-type="float" office:value="7.07">
            <text:p>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2.82">
            <text:p>8382,82</text:p>
          </table:table-cell>
          <table:table-cell table:style-name="ce12N2" office:value-type="float" office:value="586.8">
            <text:p>58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39216517484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6">
            <text:p>30872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440.76">
            <text:p>76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1452">
            <text:p>9,145</text:p>
          </table:table-cell>
          <table:table-cell table:style-name="ce12N2" office:value-type="float" office:value="697.5">
            <text:p>69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483.38">
            <text:p>62483,38</text:p>
          </table:table-cell>
          <table:table-cell table:style-name="ce12N2" office:value-type="float" office:value="62.48">
            <text:p>6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35">
            <text:p>562,35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406.13">
            <text:p>2406,13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5182.42">
            <text:p>51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51256120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7">
            <text:p>30872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0.5">
            <text:p>23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6">
            <text:p>0,265</text:p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4.01">
            <text:p>1954,01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75.25">
            <text:p>75,25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162.07">
            <text:p>16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41098736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2">
            <text:p>308732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56">
            <text:p>278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94">
            <text:p>26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72.56">
            <text:p>27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3.67">
            <text:p>2273,67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6">
            <text:p>20,46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87.56">
            <text:p>87,56</text:p>
          </table:table-cell>
          <table:table-cell table:style-name="ce12N2" office:value-type="float" office:value="2694">
            <text:p>2694,00</text:p>
          </table:table-cell>
          <table:table-cell table:style-name="ce12N2" office:value-type="float" office:value="188.58">
            <text:p>18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461969664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4">
            <text:p>30873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6.5">
            <text:p>433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2">
            <text:p>0,000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4.69">
            <text:p>3544,69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36.5">
            <text:p>136,5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631262305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6">
            <text:p>30874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4.2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5208">
            <text:p>0,815</text:p>
          </table:table-cell>
          <table:table-cell table:style-name="ce12N2" office:value-type="float" office:value="95.96">
            <text:p>9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46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85.25">
            <text:p>3685,25</text:p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17">
            <text:p>33,1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285.16">
            <text:p>28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42871212476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4">
            <text:p>3087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7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1.2">
            <text:p>26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7">
            <text:p>0,026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0.44">
            <text:p>2110,44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108.33">
            <text:p>1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7231581187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7">
            <text:p>30878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7.86">
            <text:p>568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896">
            <text:p>0,889</text:p>
          </table:table-cell>
          <table:table-cell table:style-name="ce12N2" office:value-type="float" office:value="245.6">
            <text:p>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8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34.6">
            <text:p>4734,60</text:p>
          </table:table-cell>
          <table:table-cell table:style-name="ce12N2" office:value-type="float" office:value="4.73">
            <text:p>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61">
            <text:p>42,61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330.11">
            <text:p>33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2651607305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3">
            <text:p>308793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6818408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4">
            <text:p>30879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1.0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33772">
            <text:p>15,338</text:p>
          </table:table-cell>
          <table:table-cell table:style-name="ce12N2" office:value-type="float" office:value="4014.56">
            <text:p>40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28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002.86">
            <text:p>153002,86</text:p>
          </table:table-cell>
          <table:table-cell table:style-name="ce12N2" office:value-type="float" office:value="153.05">
            <text:p>15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.02">
            <text:p>137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12690.21">
            <text:p>1269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101419589447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5">
            <text:p>308795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271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75.98">
            <text:p>2327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275.98">
            <text:p>2327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49">
            <text:p>0,355</text:p>
          </table:table-cell>
          <table:table-cell table:style-name="ce12N2" office:value-type="float" office:value="600">
            <text:p>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27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88.19">
            <text:p>18588,19</text:p>
          </table:table-cell>
          <table:table-cell table:style-name="ce12N2" office:value-type="float" office:value="18.59">
            <text:p>1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.29">
            <text:p>167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275.98">
            <text:p>23275,98</text:p>
          </table:table-cell>
          <table:table-cell table:style-name="ce12N2" office:value-type="float" office:value="2793.12">
            <text:p>279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2711443616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7">
            <text:p>3087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4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7">
            <text:p>3525,57</text:p>
          </table:table-cell>
          <table:table-cell table:style-name="ce12N2" office:value-type="float" office:value="228.84">
            <text:p>228,8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1.2">
            <text:p>344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32">
            <text:p>0,362</text:p>
          </table:table-cell>
          <table:table-cell table:style-name="ce12N2" office:value-type="float" office:value="89.6">
            <text:p>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62">
            <text:p>2798,6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9">
            <text:p>25,19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313.21">
            <text:p>313,21</text:p>
          </table:table-cell>
          <table:table-cell table:style-name="ce12N2" office:value-type="float" office:value="3212.36">
            <text:p>3212,36</text:p>
          </table:table-cell>
          <table:table-cell table:style-name="ce12N2" office:value-type="float" office:value="128.49">
            <text:p>12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4572158382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8">
            <text:p>30879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625">
            <text:p>12,863</text:p>
          </table:table-cell>
          <table:table-cell table:style-name="ce12N2" office:value-type="float" office:value="8015">
            <text:p>80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71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306.2">
            <text:p>37306,20</text:p>
          </table:table-cell>
          <table:table-cell table:style-name="ce12N2" office:value-type="float" office:value="37.31">
            <text:p>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76">
            <text:p>335,76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5605.74">
            <text:p>560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1141767568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9">
            <text:p>30879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2">
            <text:p>6,120</text:p>
          </table:table-cell>
          <table:table-cell table:style-name="ce12N2" office:value-type="float" office:value="1740">
            <text:p>17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93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32.69">
            <text:p>8732,69</text:p>
          </table:table-cell>
          <table:table-cell table:style-name="ce12N2" office:value-type="float" office:value="8.73">
            <text:p>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9">
            <text:p>78,5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1312.2">
            <text:p>13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17174509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00">
            <text:p>30880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2">
            <text:p>10,200</text:p>
          </table:table-cell>
          <table:table-cell table:style-name="ce12N2" office:value-type="float" office:value="2900">
            <text:p>29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2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54.48">
            <text:p>14554,48</text:p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99">
            <text:p>130,9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2187">
            <text:p>21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1818792443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7">
            <text:p>308837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1.0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.17">
            <text:p>61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4.84">
            <text:p>59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2">
            <text:p>1,920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9.33">
            <text:p>19,33</text:p>
          </table:table-cell>
          <table:table-cell table:style-name="ce12N2" office:value-type="float" office:value="594.84">
            <text:p>594,84</text:p>
          </table:table-cell>
          <table:table-cell table:style-name="ce12N2" office:value-type="float" office:value="41.64">
            <text:p>4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980200012255001000051002116624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0">
            <text:p>308840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11.24">
            <text:p>14411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144111.24">
            <text:p>14411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9492">
            <text:p>3,595</text:p>
          </table:table-cell>
          <table:table-cell table:style-name="ce12N2" office:value-type="float" office:value="859.36">
            <text:p>85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11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763.44">
            <text:p>128763,44</text:p>
          </table:table-cell>
          <table:table-cell table:style-name="ce12N2" office:value-type="float" office:value="128.46">
            <text:p>12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8.54">
            <text:p>1158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11.24">
            <text:p>144111,24</text:p>
          </table:table-cell>
          <table:table-cell table:style-name="ce12N2" office:value-type="float" office:value="10087.73">
            <text:p>1008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42.57">
            <text:p>304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9.372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05/06/2026</text:p>
          </table:table-cell>
          <table:table-cell table:style-name="ce12" office:value-type="string" calcext:value-type="string">
            <text:p>3.042,57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35260613576045000150550010000053151001894520</text:p>
          </table:table-cell>
          <table:table-cell table:style-name="ce0" office:value-type="string" calcext:value-type="string">
            <text:p>3526060522209200076357002000479372100691235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5">
            <text:p>30884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6.5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522048">
            <text:p>6,522</text:p>
          </table:table-cell>
          <table:table-cell table:style-name="ce12N2" office:value-type="float" office:value="1004.79">
            <text:p>100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35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28.35">
            <text:p>29928,35</text:p>
          </table:table-cell>
          <table:table-cell table:style-name="ce12N2" office:value-type="float" office:value="29.93">
            <text:p>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35">
            <text:p>269,3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1374.13">
            <text:p>137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6590140629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4">
            <text:p>308854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553">
            <text:p>41,553</text:p>
          </table:table-cell>
          <table:table-cell table:style-name="ce12N2" office:value-type="float" office:value="1056">
            <text:p>10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1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604.23">
            <text:p>60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21865934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7">
            <text:p>308857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69788">
            <text:p>61,698</text:p>
          </table:table-cell>
          <table:table-cell table:style-name="ce12N2" office:value-type="float" office:value="838">
            <text:p>8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446.61">
            <text:p>4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11691318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9">
            <text:p>308859</text:p>
          </table:table-cell>
          <table:table-cell table:style-name="ce0" table:number-columns-spanned="4" table:number-rows-spanned="1" office:value-type="string" calcext:value-type="string">
            <text:p>36.654 - AZIMUT ALUMINIOS LTDA</text:p>
          </table:table-cell>
          <table:covered-table-cell table:number-columns-repeated="3"/>
          <table:table-cell table:style-name="ce0" office:value-type="string" calcext:value-type="string">
            <text:p>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3556">
            <text:p>16,836</text:p>
          </table:table-cell>
          <table:table-cell table:style-name="ce12N2" office:value-type="float" office:value="894.4">
            <text:p>89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83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47.59">
            <text:p>28447,59</text:p>
          </table:table-cell>
          <table:table-cell table:style-name="ce12N2" office:value-type="float" office:value="28.44">
            <text:p>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03">
            <text:p>25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2228.7">
            <text:p>222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4921000158550010000001181817952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0">
            <text:p>308860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5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51.5">
            <text:p>1635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8128">
            <text:p>0,638</text:p>
          </table:table-cell>
          <table:table-cell table:style-name="ce12N2" office:value-type="float" office:value="697.13">
            <text:p>697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5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65.86">
            <text:p>13365,86</text:p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29">
            <text:p>120,29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514.7">
            <text:p>514,7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1108.58">
            <text:p>11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5431802276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3">
            <text:p>308863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4.431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14">
            <text:p>883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7215.66">
            <text:p>8721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084198">
            <text:p>50,084</text:p>
          </table:table-cell>
          <table:table-cell table:style-name="ce12N2" office:value-type="float" office:value="28862.81">
            <text:p>28862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3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07.83">
            <text:p>73607,83</text:p>
          </table:table-cell>
          <table:table-cell table:style-name="ce12N2" office:value-type="float" office:value="73.6">
            <text:p>7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2.47">
            <text:p>662,4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098.34">
            <text:p>1098,34</text:p>
          </table:table-cell>
          <table:table-cell table:style-name="ce12N2" office:value-type="float" office:value="87215.66">
            <text:p>87215,66</text:p>
          </table:table-cell>
          <table:table-cell table:style-name="ce12N2" office:value-type="float" office:value="6105.09">
            <text:p>610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44311884119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4">
            <text:p>30886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7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0.7">
            <text:p>14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0.02">
            <text:p>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1.85">
            <text:p>1171,8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2.2">
            <text:p>72,2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97.2">
            <text:p>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74291100002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5">
            <text:p>30886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36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5252">
            <text:p>12,525</text:p>
          </table:table-cell>
          <table:table-cell table:style-name="ce12N2" office:value-type="float" office:value="2875.3">
            <text:p>287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59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32.5">
            <text:p>58732,50</text:p>
          </table:table-cell>
          <table:table-cell table:style-name="ce12N2" office:value-type="float" office:value="58.74">
            <text:p>5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59">
            <text:p>528,5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4871.32">
            <text:p>48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3601662398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1">
            <text:p>308871</text:p>
          </table:table-cell>
          <table:table-cell table:style-name="ce0" table:number-columns-spanned="4" table:number-rows-spanned="1" office:value-type="string" calcext:value-type="string">
            <text:p>37.660 - BF LIMP COMERCIO DE PRODUTOS DE HIGIENE E LIMPEZA LTDA</text:p>
          </table:table-cell>
          <table:covered-table-cell table:number-columns-repeated="3"/>
          <table:table-cell table:style-name="ce0" office:value-type="string" calcext:value-type="string">
            <text:p>2.2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35">
            <text:p>0,074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2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21.31">
            <text:p>5421,31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79">
            <text:p>48,7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421.49">
            <text:p>42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7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24101070001655500100000228817357780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2">
            <text:p>30887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9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65">
            <text:p>482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9">
            <text:p>0,210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59">
            <text:p>4115,59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4">
            <text:p>37,04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9.65">
            <text:p>229,65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321.51">
            <text:p>3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39181192001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5">
            <text:p>30887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2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32">
            <text:p>349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358">
            <text:p>0,230</text:p>
          </table:table-cell>
          <table:table-cell table:style-name="ce12N2" office:value-type="float" office:value="44.71">
            <text:p>44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5.1">
            <text:p>2845,10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">
            <text:p>25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28.25">
            <text:p>128,25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235.98">
            <text:p>23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20915704022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6">
            <text:p>308876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322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28">
            <text:p>132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6.3">
            <text:p>130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5">
            <text:p>0,003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38.05">
            <text:p>1138,05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24">
            <text:p>10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1306.3">
            <text:p>1306,30</text:p>
          </table:table-cell>
          <table:table-cell table:style-name="ce12N2" office:value-type="float" office:value="52.25">
            <text:p>5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3221114390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8">
            <text:p>308878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327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3">
            <text:p>12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56">
            <text:p>11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5">
            <text:p>0,003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4.61">
            <text:p>1034,61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1">
            <text:p>9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1187.56">
            <text:p>1187,56</text:p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327156948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9">
            <text:p>308879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324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3">
            <text:p>12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56">
            <text:p>11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5">
            <text:p>0,003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4.61">
            <text:p>1034,61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1">
            <text:p>9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1187.56">
            <text:p>1187,56</text:p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3241599122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0">
            <text:p>308880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3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0.36">
            <text:p>713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05.92">
            <text:p>690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9">
            <text:p>0,00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30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28.43">
            <text:p>5828,43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46">
            <text:p>52,46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4.44">
            <text:p>224,44</text:p>
          </table:table-cell>
          <table:table-cell table:style-name="ce12N2" office:value-type="float" office:value="6905.92">
            <text:p>6905,92</text:p>
          </table:table-cell>
          <table:table-cell table:style-name="ce12N2" office:value-type="float" office:value="483.41">
            <text:p>48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39211347884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1">
            <text:p>308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30.44">
            <text:p>3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0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8">
            <text:p>14858,00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72">
            <text:p>133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1232.34">
            <text:p>123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76189942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3">
            <text:p>3088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30.44">
            <text:p>3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67.4">
            <text:p>14867,40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81">
            <text:p>133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1233.12">
            <text:p>12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751420898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4">
            <text:p>30888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5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528">
            <text:p>0,457</text:p>
          </table:table-cell>
          <table:table-cell table:style-name="ce12N2" office:value-type="float" office:value="30.61">
            <text:p>3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8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7.2">
            <text:p>6067,20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1">
            <text:p>54,6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503.22">
            <text:p>50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52321604502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5">
            <text:p>308885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5">
            <text:p>0,172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43">
            <text:p>998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82.81">
            <text:p>8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725157429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0">
            <text:p>308890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3.2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339.71">
            <text:p>9033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0126.08">
            <text:p>9012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973526">
            <text:p>19,974</text:p>
          </table:table-cell>
          <table:table-cell table:style-name="ce12N2" office:value-type="float" office:value="21843">
            <text:p>218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33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064.16">
            <text:p>76064,16</text:p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4.56">
            <text:p>684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13.63">
            <text:p>213,63</text:p>
          </table:table-cell>
          <table:table-cell table:style-name="ce12N2" office:value-type="float" office:value="90126.08">
            <text:p>90126,08</text:p>
          </table:table-cell>
          <table:table-cell table:style-name="ce12N2" office:value-type="float" office:value="6308.83">
            <text:p>630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32731391091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1">
            <text:p>3088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3.42">
            <text:p>468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28">
            <text:p>0,152</text:p>
          </table:table-cell>
          <table:table-cell table:style-name="ce12N2" office:value-type="float" office:value="19.44">
            <text:p>1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8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28.28">
            <text:p>3828,28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45">
            <text:p>34,45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47.42">
            <text:p>147,42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317.52">
            <text:p>3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91099196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20">
            <text:p>30892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70.4">
            <text:p>24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170.4">
            <text:p>24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1.968">
            <text:p>211,968</text:p>
          </table:table-cell>
          <table:table-cell table:style-name="ce12N2" office:value-type="float" office:value="5468.4">
            <text:p>546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302.48">
            <text:p>19302,48</text:p>
          </table:table-cell>
          <table:table-cell table:style-name="ce12N2" office:value-type="float" office:value="19.3">
            <text:p>1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3.73">
            <text:p>173,7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70.4">
            <text:p>24170,40</text:p>
          </table:table-cell>
          <table:table-cell table:style-name="ce12N2" office:value-type="float" office:value="2900.45">
            <text:p>290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7616251046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5">
            <text:p>3089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0.16">
            <text:p>1033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05">
            <text:p>1000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43">
            <text:p>0,324</text:p>
          </table:table-cell>
          <table:table-cell table:style-name="ce12N2" office:value-type="float" office:value="41.4">
            <text:p>4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3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43.97">
            <text:p>8443,97</text:p>
          </table:table-cell>
          <table:table-cell table:style-name="ce12N2" office:value-type="float" office:value="8.44">
            <text:p>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25.16">
            <text:p>325,16</text:p>
          </table:table-cell>
          <table:table-cell table:style-name="ce12N2" office:value-type="float" office:value="10005">
            <text:p>10005,00</text:p>
          </table:table-cell>
          <table:table-cell table:style-name="ce12N2" office:value-type="float" office:value="700.35">
            <text:p>70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4210398455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6">
            <text:p>3089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5.15">
            <text:p>461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257.6">
            <text:p>42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6">
            <text:p>0,09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5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3.32">
            <text:p>3593,32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3">
            <text:p>32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57.55">
            <text:p>357,55</text:p>
          </table:table-cell>
          <table:table-cell table:style-name="ce12N2" office:value-type="float" office:value="4257.6">
            <text:p>4257,60</text:p>
          </table:table-cell>
          <table:table-cell table:style-name="ce12N2" office:value-type="float" office:value="298.03">
            <text:p>29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411195200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7">
            <text:p>3089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9.62">
            <text:p>363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403.4">
            <text:p>340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894">
            <text:p>0,059</text:p>
          </table:table-cell>
          <table:table-cell table:style-name="ce12N2" office:value-type="float" office:value="10.77">
            <text:p>1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72.37">
            <text:p>2872,37</text:p>
          </table:table-cell>
          <table:table-cell table:style-name="ce12N2" office:value-type="float" office:value="2.87">
            <text:p>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84">
            <text:p>25,8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36.22">
            <text:p>236,22</text:p>
          </table:table-cell>
          <table:table-cell table:style-name="ce12N2" office:value-type="float" office:value="3403.4">
            <text:p>3403,40</text:p>
          </table:table-cell>
          <table:table-cell table:style-name="ce12N2" office:value-type="float" office:value="238.24">
            <text:p>23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61303922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9">
            <text:p>30895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46.4">
            <text:p>2074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16.0124">
            <text:p>8016,012</text:p>
          </table:table-cell>
          <table:table-cell table:style-name="ce12N2" office:value-type="float" office:value="841.6">
            <text:p>84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4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8.29">
            <text:p>16958,29</text:p>
          </table:table-cell>
          <table:table-cell table:style-name="ce12N2" office:value-type="float" office:value="16.96">
            <text:p>1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63">
            <text:p>152,6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653.04">
            <text:p>653,04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1406.54">
            <text:p>140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520158161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0">
            <text:p>308960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.68">
            <text:p>703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56">
            <text:p>0,032</text:p>
          </table:table-cell>
          <table:table-cell table:style-name="ce12N2" office:value-type="float" office:value="264.08">
            <text:p>26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3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95.82">
            <text:p>6295,82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66">
            <text:p>56,66</text:p>
          </table:table-cell>
          <table:table-cell table:style-name="ce12N2" office:value-type="float" office:value="44.97">
            <text:p>44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.52">
            <text:p>12,52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491.84">
            <text:p>4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204129000106550010001419651121064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1">
            <text:p>308961</text:p>
          </table:table-cell>
          <table:table-cell table:style-name="ce0" table:number-columns-spanned="4" table:number-rows-spanned="1" office:value-type="string" calcext:value-type="string">
            <text:p>1.634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239.6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71.95">
            <text:p>787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82.84">
            <text:p>748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75">
            <text:p>0,068</text:p>
          </table:table-cell>
          <table:table-cell table:style-name="ce12N2" office:value-type="float" office:value="49.44">
            <text:p>4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71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9.05">
            <text:p>6519,05</text:p>
          </table:table-cell>
          <table:table-cell table:style-name="ce12N2" office:value-type="float" office:value="6.52">
            <text:p>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7">
            <text:p>58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89.11">
            <text:p>389,11</text:p>
          </table:table-cell>
          <table:table-cell table:style-name="ce12N2" office:value-type="float" office:value="7482.84">
            <text:p>7482,84</text:p>
          </table:table-cell>
          <table:table-cell table:style-name="ce12N2" office:value-type="float" office:value="299.31">
            <text:p>29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865920000615550030002396021282265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2">
            <text:p>30896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244.7">
            <text:p>10824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8244.7">
            <text:p>10824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70.53132">
            <text:p>670,531</text:p>
          </table:table-cell>
          <table:table-cell table:style-name="ce12N2" office:value-type="float" office:value="5184.85">
            <text:p>518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.24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368">
            <text:p>91368,00</text:p>
          </table:table-cell>
          <table:table-cell table:style-name="ce12N2" office:value-type="float" office:value="91.37">
            <text:p>9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2.31">
            <text:p>822,3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244.7">
            <text:p>108244,70</text:p>
          </table:table-cell>
          <table:table-cell table:style-name="ce12N2" office:value-type="float" office:value="7577.13">
            <text:p>757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19651754688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3">
            <text:p>308963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5.09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64.66">
            <text:p>8156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747536">
            <text:p>17,748</text:p>
          </table:table-cell>
          <table:table-cell table:style-name="ce12N2" office:value-type="float" office:value="7346.29">
            <text:p>7346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6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671.68">
            <text:p>66671,68</text:p>
          </table:table-cell>
          <table:table-cell table:style-name="ce12N2" office:value-type="float" office:value="66.67">
            <text:p>6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0.04">
            <text:p>600,04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567.42">
            <text:p>2567,42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5529.81">
            <text:p>552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33881000160550000001150971836501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8">
            <text:p>308968</text:p>
          </table:table-cell>
          <table:table-cell table:style-name="ce0" table:number-columns-spanned="4" table:number-rows-spanned="1" office:value-type="string" calcext:value-type="string">
            <text:p>5.002 - ELETRICA DANUBIO IND E COM DE MAT ELET LTDA</text:p>
          </table:table-cell>
          <table:covered-table-cell table:number-columns-repeated="3"/>
          <table:table-cell table:style-name="ce0" office:value-type="string" calcext:value-type="string">
            <text:p>488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300">
            <text:p>8300,000</text:p>
          </table:table-cell>
          <table:table-cell table:style-name="ce12N2" office:value-type="float" office:value="1460.8">
            <text:p>146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7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89.88">
            <text:p>17789,88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11">
            <text:p>160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1475.51">
            <text:p>147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3102560001905500100048883511893283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2">
            <text:p>3089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4">
            <text:p>0,139</text:p>
          </table:table-cell>
          <table:table-cell table:style-name="ce12N2" office:value-type="float" office:value="76.4">
            <text:p>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15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263">
            <text:p>37263,00</text:p>
          </table:table-cell>
          <table:table-cell table:style-name="ce12N2" office:value-type="float" office:value="37.26">
            <text:p>3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37">
            <text:p>335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3090.64">
            <text:p>309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281091418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3">
            <text:p>30897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3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4.72">
            <text:p>9214,72</text:p>
          </table:table-cell>
          <table:table-cell table:style-name="ce12N2" office:value-type="float" office:value="441.9">
            <text:p>441,9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38">
            <text:p>88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3445">
            <text:p>0,803</text:p>
          </table:table-cell>
          <table:table-cell table:style-name="ce12N2" office:value-type="float" office:value="312">
            <text:p>3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14.69">
            <text:p>7314,69</text:p>
          </table:table-cell>
          <table:table-cell table:style-name="ce12N2" office:value-type="float" office:value="7.32">
            <text:p>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3">
            <text:p>65,83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18.62">
            <text:p>818,62</text:p>
          </table:table-cell>
          <table:table-cell table:style-name="ce12N2" office:value-type="float" office:value="8396.1">
            <text:p>8396,10</text:p>
          </table:table-cell>
          <table:table-cell table:style-name="ce12N2" office:value-type="float" office:value="335.85">
            <text:p>33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30510808738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6">
            <text:p>308976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6.05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899.97">
            <text:p>4089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41555">
            <text:p>2,942</text:p>
          </table:table-cell>
          <table:table-cell table:style-name="ce12N2" office:value-type="float" office:value="310.78">
            <text:p>31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89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21.4">
            <text:p>35521,40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9">
            <text:p>319,6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7.01">
            <text:p>127,01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1630.92">
            <text:p>163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2741051000185550550003060561455871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7">
            <text:p>30897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9.37">
            <text:p>5439,37</text:p>
          </table:table-cell>
          <table:table-cell table:style-name="ce12N2" office:value-type="float" office:value="260.85">
            <text:p>260,85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17">
            <text:p>52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9598">
            <text:p>4,696</text:p>
          </table:table-cell>
          <table:table-cell table:style-name="ce12N2" office:value-type="float" office:value="223">
            <text:p>2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7.79">
            <text:p>4317,79</text:p>
          </table:table-cell>
          <table:table-cell table:style-name="ce12N2" office:value-type="float" office:value="4.32">
            <text:p>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96.58">
            <text:p>96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483.22">
            <text:p>483,22</text:p>
          </table:table-cell>
          <table:table-cell table:style-name="ce12N2" office:value-type="float" office:value="4956.15">
            <text:p>4956,15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4411354541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9">
            <text:p>308979</text:p>
          </table:table-cell>
          <table:table-cell table:style-name="ce0" table:number-columns-spanned="4" table:number-rows-spanned="1" office:value-type="string" calcext:value-type="string">
            <text:p>977 - POLIERG INDUSTRIA E COMERCIO LTDA</text:p>
          </table:table-cell>
          <table:covered-table-cell table:number-columns-repeated="3"/>
          <table:table-cell table:style-name="ce0" office:value-type="string" calcext:value-type="string">
            <text:p>120.7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5">
            <text:p>0,408</text:p>
          </table:table-cell>
          <table:table-cell table:style-name="ce12N2" office:value-type="float" office:value="409.5">
            <text:p>40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66.1">
            <text:p>14066,10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6">
            <text:p>126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88.1">
            <text:p>13288,10</text:p>
          </table:table-cell>
          <table:table-cell table:style-name="ce12N2" office:value-type="float" office:value="930.17">
            <text:p>93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010717000152550030001207581079396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58">
            <text:p>158,00</text:p>
          </table:table-cell>
          <table:table-cell table:style-name="ce26N2" office:value-type="float" office:value="931.59">
            <text:p>931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7377.15">
            <text:p>87377,15</text:p>
          </table:table-cell>
          <table:table-cell table:style-name="ce26N2" office:value-type="float" office:value="4651116.07">
            <text:p>4651116,07</text:p>
          </table:table-cell>
          <table:table-cell table:style-name="ce26N2" office:value-type="float" office:value="304038.78">
            <text:p>304038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21.9">
            <text:p>4321,90</text:p>
          </table:table-cell>
          <table:table-cell table:style-name="ce26N2" office:value-type="float" office:value="4815811.35">
            <text:p>4815811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037.94">
            <text:p>38037,94</text:p>
          </table:table-cell>
          <table:table-cell table:style-name="ce26N2" office:value-type="float" office:value="6817.36">
            <text:p>6817,36</text:p>
          </table:table-cell>
          <table:table-cell table:style-name="ce26N2" office:value-type="float" office:value="2108.32">
            <text:p>210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1948.687199">
            <text:p>21948,687</text:p>
          </table:table-cell>
          <table:table-cell table:style-name="ce26N2" office:value-type="float" office:value="4722548.43">
            <text:p>4722548,43</text:p>
          </table:table-cell>
          <table:table-cell table:style-name="ce26N2" office:value-type="float" office:value="4815811.35">
            <text:p>4815811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09794.58">
            <text:p>3909794,58</text:p>
          </table:table-cell>
          <table:table-cell table:style-name="ce26N2" office:value-type="float" office:value="3909.58">
            <text:p>3909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5187.7">
            <text:p>35187,7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63625.32">
            <text:p>363625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.33">
            <text:p>47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90" meta:object-count="0"/>
    <meta:generator>LibreOffice/4.3.0.4$Windows_x86 LibreOffice_project/62ad5818884a2fc2e5780dd45466868d41009ec0</meta:generator>
  </office:meta>
</office:document-meta>
</file>