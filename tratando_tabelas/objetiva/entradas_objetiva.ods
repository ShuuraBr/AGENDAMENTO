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7">
            <text:p>30793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5.2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1.98">
            <text:p>1492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508">
            <text:p>1,751</text:p>
          </table:table-cell>
          <table:table-cell table:style-name="ce12N2" office:value-type="float" office:value="933.2">
            <text:p>93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21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1.68">
            <text:p>61,68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1040.22">
            <text:p>10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42774001209550010002152021410874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5">
            <text:p>30795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4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7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593.23">
            <text:p>59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4228157457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0">
            <text:p>308090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7.25">
            <text:p>244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496">
            <text:p>0,89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7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34.68">
            <text:p>20134,68</text:p>
          </table:table-cell>
          <table:table-cell table:style-name="ce12N2" office:value-type="float" office:value="20.13">
            <text:p>2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1">
            <text:p>181,21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20.28">
            <text:p>620,28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1669.99">
            <text:p>166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31932554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1">
            <text:p>308091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3.56">
            <text:p>8173,56</text:p>
          </table:table-cell>
          <table:table-cell table:style-name="ce12N2" office:value-type="float" office:value="674.24">
            <text:p>674,24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590.52">
            <text:p>859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137">
            <text:p>2,514</text:p>
          </table:table-cell>
          <table:table-cell table:style-name="ce12N2" office:value-type="float" office:value="144">
            <text:p>1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29.88">
            <text:p>6629,88</text:p>
          </table:table-cell>
          <table:table-cell table:style-name="ce12N2" office:value-type="float" office:value="6.63">
            <text:p>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67">
            <text:p>59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7916.28">
            <text:p>7916,28</text:p>
          </table:table-cell>
          <table:table-cell table:style-name="ce12N2" office:value-type="float" office:value="554.14">
            <text:p>55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5081122000180550010000163111000140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9">
            <text:p>308099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582.38">
            <text:p>7658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90.201388">
            <text:p>1490,201</text:p>
          </table:table-cell>
          <table:table-cell table:style-name="ce12N2" office:value-type="float" office:value="1189.38">
            <text:p>118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58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843.3">
            <text:p>65843,30</text:p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2.6">
            <text:p>592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58">
            <text:p>374,58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3653.23">
            <text:p>365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71013769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0">
            <text:p>308100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2">
            <text:p>0,10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.72">
            <text:p>1566,72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65.28">
            <text:p>6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81505111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2">
            <text:p>30811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07.18">
            <text:p>13510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3629">
            <text:p>7,136</text:p>
          </table:table-cell>
          <table:table-cell table:style-name="ce12N2" office:value-type="float" office:value="1347.5">
            <text:p>134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5.10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596.02">
            <text:p>108596,02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36">
            <text:p>977,3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6.1">
            <text:p>10456,1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4986.05">
            <text:p>49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9381426612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0">
            <text:p>308140</text:p>
          </table:table-cell>
          <table:table-cell table:style-name="ce0" table:number-columns-spanned="4" table:number-rows-spanned="1" office:value-type="string" calcext:value-type="string">
            <text:p>37.726 - CARMEM LUCIA DE SOUZA LUVAS</text:p>
          </table:table-cell>
          <table:covered-table-cell table:number-columns-repeated="3"/>
          <table:table-cell table:style-name="ce0" office:value-type="string" calcext:value-type="string">
            <text:p>3.2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37">
            <text:p>3,237</text:p>
          </table:table-cell>
          <table:table-cell table:style-name="ce12N2" office:value-type="float" office:value="1582">
            <text:p>15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7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907.11">
            <text:p>90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34153406000126550000000032451140065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1">
            <text:p>308141</text:p>
          </table:table-cell>
          <table:table-cell table:style-name="ce0" table:number-columns-spanned="4" table:number-rows-spanned="1" office:value-type="string" calcext:value-type="string">
            <text:p>37.726 - CARMEM LUCIA DE SOUZA LUVAS</text:p>
          </table:table-cell>
          <table:covered-table-cell table:number-columns-repeated="3"/>
          <table:table-cell table:style-name="ce0" office:value-type="string" calcext:value-type="string">
            <text:p>3.2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5">
            <text:p>0,051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124.09">
            <text:p>12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34153406000126550000000032461810587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4">
            <text:p>30819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7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97.69">
            <text:p>5149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65345">
            <text:p>15,653</text:p>
          </table:table-cell>
          <table:table-cell table:style-name="ce12N2" office:value-type="float" office:value="1609.55">
            <text:p>1609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9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137.98">
            <text:p>42137,98</text:p>
          </table:table-cell>
          <table:table-cell table:style-name="ce12N2" office:value-type="float" office:value="42.14">
            <text:p>4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24">
            <text:p>379,2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569.69">
            <text:p>1569,69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3494.96">
            <text:p>3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73931211190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2">
            <text:p>30821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2.72">
            <text:p>2892,72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239.93">
            <text:p>23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101772105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2">
            <text:p>30824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0.7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9.37">
            <text:p>4899,37</text:p>
          </table:table-cell>
          <table:table-cell table:style-name="ce12N2" office:value-type="float" office:value="318.01">
            <text:p>318,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782.12">
            <text:p>478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96174">
            <text:p>3,796</text:p>
          </table:table-cell>
          <table:table-cell table:style-name="ce12N2" office:value-type="float" office:value="108.4">
            <text:p>10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9.21">
            <text:p>79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35.26">
            <text:p>435,26</text:p>
          </table:table-cell>
          <table:table-cell table:style-name="ce12N2" office:value-type="float" office:value="4464.11">
            <text:p>4464,11</text:p>
          </table:table-cell>
          <table:table-cell table:style-name="ce12N2" office:value-type="float" office:value="178.56">
            <text:p>17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207271323305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3">
            <text:p>30824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0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0.31">
            <text:p>2190,31</text:p>
          </table:table-cell>
          <table:table-cell table:style-name="ce12N2" office:value-type="float" office:value="127.39">
            <text:p>127,3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23.12">
            <text:p>212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6164">
            <text:p>0,236</text:p>
          </table:table-cell>
          <table:table-cell table:style-name="ce12N2" office:value-type="float" office:value="95.2">
            <text:p>9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0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13">
            <text:p>61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4.58">
            <text:p>194,58</text:p>
          </table:table-cell>
          <table:table-cell table:style-name="ce12N2" office:value-type="float" office:value="1995.73">
            <text:p>1995,73</text:p>
          </table:table-cell>
          <table:table-cell table:style-name="ce12N2" office:value-type="float" office:value="79.83">
            <text:p>7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2077810301160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6">
            <text:p>30824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4124.66">
            <text:p>9841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8.627062">
            <text:p>48,627</text:p>
          </table:table-cell>
          <table:table-cell table:style-name="ce12N2" office:value-type="float" office:value="5420.2">
            <text:p>542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4.12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7945.56">
            <text:p>817945,56</text:p>
          </table:table-cell>
          <table:table-cell table:style-name="ce12N2" office:value-type="float" office:value="817.93">
            <text:p>81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61.49">
            <text:p>7361,4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5271.08">
            <text:p>25271,08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57536.13">
            <text:p>57536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21614848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9">
            <text:p>30826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3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92.59">
            <text:p>3599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3970.35">
            <text:p>3397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17.093475">
            <text:p>717,093</text:p>
          </table:table-cell>
          <table:table-cell table:style-name="ce12N2" office:value-type="float" office:value="1122.74">
            <text:p>112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9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70.13">
            <text:p>28670,13</text:p>
          </table:table-cell>
          <table:table-cell table:style-name="ce12N2" office:value-type="float" office:value="28.68">
            <text:p>2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02">
            <text:p>258,02</text:p>
          </table:table-cell>
          <table:table-cell table:style-name="ce12N2" office:value-type="float" office:value="55.21">
            <text:p>55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022.24">
            <text:p>2022,24</text:p>
          </table:table-cell>
          <table:table-cell table:style-name="ce12N2" office:value-type="float" office:value="33970.35">
            <text:p>33970,35</text:p>
          </table:table-cell>
          <table:table-cell table:style-name="ce12N2" office:value-type="float" office:value="2377.92">
            <text:p>23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311210696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70">
            <text:p>3082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5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6122">
            <text:p>0,406</text:p>
          </table:table-cell>
          <table:table-cell table:style-name="ce12N2" office:value-type="float" office:value="88.8">
            <text:p>8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.43">
            <text:p>1057,43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87.7">
            <text:p>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50441956711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0">
            <text:p>30833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12.72">
            <text:p>509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47953.39">
            <text:p>47953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7852">
            <text:p>0,168</text:p>
          </table:table-cell>
          <table:table-cell table:style-name="ce12N2" office:value-type="float" office:value="162.28">
            <text:p>16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91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68.34">
            <text:p>41368,34</text:p>
          </table:table-cell>
          <table:table-cell table:style-name="ce12N2" office:value-type="float" office:value="41.35">
            <text:p>4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2.33">
            <text:p>372,33</text:p>
          </table:table-cell>
          <table:table-cell table:style-name="ce12N2" office:value-type="float" office:value="55.19">
            <text:p>55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959.33">
            <text:p>2959,33</text:p>
          </table:table-cell>
          <table:table-cell table:style-name="ce12N2" office:value-type="float" office:value="47953.39">
            <text:p>47953,39</text:p>
          </table:table-cell>
          <table:table-cell table:style-name="ce12N2" office:value-type="float" office:value="2368.41">
            <text:p>23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2819529038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4">
            <text:p>30833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337.42">
            <text:p>10733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01003.1">
            <text:p>1010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13.56407">
            <text:p>1613,564</text:p>
          </table:table-cell>
          <table:table-cell table:style-name="ce12N2" office:value-type="float" office:value="3330.76">
            <text:p>33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33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244.08">
            <text:p>85244,08</text:p>
          </table:table-cell>
          <table:table-cell table:style-name="ce12N2" office:value-type="float" office:value="85.24">
            <text:p>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7.21">
            <text:p>767,21</text:p>
          </table:table-cell>
          <table:table-cell table:style-name="ce12N2" office:value-type="float" office:value="55.18">
            <text:p>55,1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334.32">
            <text:p>6334,32</text:p>
          </table:table-cell>
          <table:table-cell table:style-name="ce12N2" office:value-type="float" office:value="101003.1">
            <text:p>101003,10</text:p>
          </table:table-cell>
          <table:table-cell table:style-name="ce12N2" office:value-type="float" office:value="7070.22">
            <text:p>707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32192469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6">
            <text:p>30833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4.43">
            <text:p>36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6">
            <text:p>0,005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6.78">
            <text:p>2916,78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5">
            <text:p>26,25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26.43">
            <text:p>326,43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133.92">
            <text:p>1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481510979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7">
            <text:p>30833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5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6.58">
            <text:p>714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068">
            <text:p>0,022</text:p>
          </table:table-cell>
          <table:table-cell table:style-name="ce12N2" office:value-type="float" office:value="22.07">
            <text:p>2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0.11">
            <text:p>6030,11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7">
            <text:p>54,27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4.96">
            <text:p>224,96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276.86">
            <text:p>27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541673082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9">
            <text:p>308349</text:p>
          </table:table-cell>
          <table:table-cell table:style-name="ce0" table:number-columns-spanned="4" table:number-rows-spanned="1" office:value-type="string" calcext:value-type="string">
            <text:p>589 - MONTANA HIDROTECNICA LTDA</text:p>
          </table:table-cell>
          <table:covered-table-cell table:number-columns-repeated="3"/>
          <table:table-cell table:style-name="ce0" office:value-type="string" calcext:value-type="string">
            <text:p>53.835</text:p>
          </table:table-cell>
          <table:table-cell table:style-name="ce9" office:value-type="string" calcext:value-type="string">
            <text:p>10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95.33">
            <text:p>5709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973.16">
            <text:p>5697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144">
            <text:p>1,425</text:p>
          </table:table-cell>
          <table:table-cell table:style-name="ce12N2" office:value-type="float" office:value="208.5">
            <text:p>20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09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05.51">
            <text:p>50905,51</text:p>
          </table:table-cell>
          <table:table-cell table:style-name="ce12N2" office:value-type="float" office:value="50.91">
            <text:p>5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15">
            <text:p>458,1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17">
            <text:p>122,17</text:p>
          </table:table-cell>
          <table:table-cell table:style-name="ce12N2" office:value-type="float" office:value="56973.16">
            <text:p>56973,16</text:p>
          </table:table-cell>
          <table:table-cell table:style-name="ce12N2" office:value-type="float" office:value="3988.12">
            <text:p>398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01595430000166551000000538351344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1">
            <text:p>30835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86.57">
            <text:p>2528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5078">
            <text:p>3,751</text:p>
          </table:table-cell>
          <table:table-cell table:style-name="ce12N2" office:value-type="float" office:value="449.38">
            <text:p>44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86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69.48">
            <text:p>20669,48</text:p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03">
            <text:p>186,0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95.94">
            <text:p>795,94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1714.34">
            <text:p>171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3541758481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3">
            <text:p>30835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5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73.19">
            <text:p>1507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4767.5">
            <text:p>1476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219">
            <text:p>0,050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7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63.39">
            <text:p>12463,39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7">
            <text:p>112,1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69">
            <text:p>305,69</text:p>
          </table:table-cell>
          <table:table-cell table:style-name="ce12N2" office:value-type="float" office:value="14767.5">
            <text:p>14767,50</text:p>
          </table:table-cell>
          <table:table-cell table:style-name="ce12N2" office:value-type="float" office:value="1033.73">
            <text:p>103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51117291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69">
            <text:p>3083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7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45.6">
            <text:p>276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45.6">
            <text:p>2764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2">
            <text:p>0,052</text:p>
          </table:table-cell>
          <table:table-cell table:style-name="ce12N2" office:value-type="float" office:value="55.8">
            <text:p>5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64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32.2">
            <text:p>23332,20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9.99">
            <text:p>209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45.6">
            <text:p>27645,60</text:p>
          </table:table-cell>
          <table:table-cell table:style-name="ce12N2" office:value-type="float" office:value="1935.19">
            <text:p>193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73681936035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3">
            <text:p>308373</text:p>
          </table:table-cell>
          <table:table-cell table:style-name="ce0" table:number-columns-spanned="4" table:number-rows-spanned="1" office:value-type="string" calcext:value-type="string">
            <text:p>13.629 - COLUMBIA COMERCIAL DE FERRAMENTAS ELETRI LTDA</text:p>
          </table:table-cell>
          <table:covered-table-cell table:number-columns-repeated="3"/>
          <table:table-cell table:style-name="ce0" office:value-type="string" calcext:value-type="string">
            <text:p>65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30.43">
            <text:p>693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930.43">
            <text:p>693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654">
            <text:p>0,287</text:p>
          </table:table-cell>
          <table:table-cell table:style-name="ce12N2" office:value-type="float" office:value="51.92">
            <text:p>5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30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7.8">
            <text:p>6037,80</text:p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34">
            <text:p>54,3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30.43">
            <text:p>6930,43</text:p>
          </table:table-cell>
          <table:table-cell table:style-name="ce12N2" office:value-type="float" office:value="277.22">
            <text:p>27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818802900015055001000065418148141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1">
            <text:p>3084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7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10.78">
            <text:p>13691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135147.42">
            <text:p>13514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619514">
            <text:p>10,620</text:p>
          </table:table-cell>
          <table:table-cell table:style-name="ce12N2" office:value-type="float" office:value="461">
            <text:p>46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6.91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95.27">
            <text:p>115395,27</text:p>
          </table:table-cell>
          <table:table-cell table:style-name="ce12N2" office:value-type="float" office:value="115.36">
            <text:p>11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8.54">
            <text:p>1038,5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763.36">
            <text:p>1763,36</text:p>
          </table:table-cell>
          <table:table-cell table:style-name="ce12N2" office:value-type="float" office:value="134090.51">
            <text:p>134090,51</text:p>
          </table:table-cell>
          <table:table-cell table:style-name="ce12N2" office:value-type="float" office:value="7990.13">
            <text:p>79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73691112878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4">
            <text:p>30843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6.09">
            <text:p>18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16.81">
            <text:p>1716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32">
            <text:p>0,064</text:p>
          </table:table-cell>
          <table:table-cell table:style-name="ce12N2" office:value-type="float" office:value="69.78">
            <text:p>69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8.95">
            <text:p>1448,9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4">
            <text:p>13,0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9.28">
            <text:p>89,28</text:p>
          </table:table-cell>
          <table:table-cell table:style-name="ce12N2" office:value-type="float" office:value="1716.81">
            <text:p>1716,81</text:p>
          </table:table-cell>
          <table:table-cell table:style-name="ce12N2" office:value-type="float" office:value="120.18">
            <text:p>12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311411727393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5">
            <text:p>308435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8.38">
            <text:p>23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06">
            <text:p>2205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1">
            <text:p>1861,00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4">
            <text:p>16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43.32">
            <text:p>143,32</text:p>
          </table:table-cell>
          <table:table-cell table:style-name="ce12N2" office:value-type="float" office:value="2205.06">
            <text:p>2205,06</text:p>
          </table:table-cell>
          <table:table-cell table:style-name="ce12N2" office:value-type="float" office:value="154.36">
            <text:p>15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11300611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2">
            <text:p>30844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1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42.36">
            <text:p>774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4.54">
            <text:p>70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24">
            <text:p>0,602</text:p>
          </table:table-cell>
          <table:table-cell table:style-name="ce12N2" office:value-type="float" office:value="156.8">
            <text:p>15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4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5.92">
            <text:p>6145,92</text:p>
          </table:table-cell>
          <table:table-cell table:style-name="ce12N2" office:value-type="float" office:value="6.15">
            <text:p>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31">
            <text:p>55,3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87.82">
            <text:p>687,82</text:p>
          </table:table-cell>
          <table:table-cell table:style-name="ce12N2" office:value-type="float" office:value="7054.54">
            <text:p>7054,54</text:p>
          </table:table-cell>
          <table:table-cell table:style-name="ce12N2" office:value-type="float" office:value="282.18">
            <text:p>28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1861589445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3">
            <text:p>308443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8.63">
            <text:p>1522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4865.96">
            <text:p>148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122">
            <text:p>0,460</text:p>
          </table:table-cell>
          <table:table-cell table:style-name="ce12N2" office:value-type="float" office:value="707.1">
            <text:p>70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22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82.56">
            <text:p>13482,56</text:p>
          </table:table-cell>
          <table:table-cell table:style-name="ce12N2" office:value-type="float" office:value="13.5">
            <text:p>1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.34">
            <text:p>121,34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2.67">
            <text:p>362,67</text:p>
          </table:table-cell>
          <table:table-cell table:style-name="ce12N2" office:value-type="float" office:value="12011.41">
            <text:p>12011,41</text:p>
          </table:table-cell>
          <table:table-cell table:style-name="ce12N2" office:value-type="float" office:value="840.81">
            <text:p>8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6725848000118550010000581471000000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5">
            <text:p>30844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9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8.3">
            <text:p>713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38.3">
            <text:p>713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4">
            <text:p>0,075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3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18.89">
            <text:p>6218,89</text:p>
          </table:table-cell>
          <table:table-cell table:style-name="ce12N2" office:value-type="float" office:value="6.22">
            <text:p>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97">
            <text:p>55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38.3">
            <text:p>7138,30</text:p>
          </table:table-cell>
          <table:table-cell table:style-name="ce12N2" office:value-type="float" office:value="285.53">
            <text:p>28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90981437751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6">
            <text:p>30844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6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3.33">
            <text:p>4879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793.33">
            <text:p>4879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00">
            <text:p>3500,000</text:p>
          </table:table-cell>
          <table:table-cell table:style-name="ce12N2" office:value-type="float" office:value="437.5">
            <text:p>43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79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80.36">
            <text:p>41180,36</text:p>
          </table:table-cell>
          <table:table-cell table:style-name="ce12N2" office:value-type="float" office:value="41.18">
            <text:p>4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.62">
            <text:p>370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793.33">
            <text:p>48793,33</text:p>
          </table:table-cell>
          <table:table-cell table:style-name="ce12N2" office:value-type="float" office:value="3415.53">
            <text:p>34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65081319729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9">
            <text:p>30844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9.54">
            <text:p>57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1004">
            <text:p>1,691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95.97">
            <text:p>4795,97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16">
            <text:p>43,1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.94">
            <text:p>36,94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397.78">
            <text:p>39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3152297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2">
            <text:p>308452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37.16">
            <text:p>210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048.16">
            <text:p>14048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37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40.18">
            <text:p>17640,18</text:p>
          </table:table-cell>
          <table:table-cell table:style-name="ce12N2" office:value-type="float" office:value="17.64">
            <text:p>1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76">
            <text:p>158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5.86">
            <text:p>135,86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1463.09">
            <text:p>146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11512133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4">
            <text:p>308454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717">
            <text:p>0,357</text:p>
          </table:table-cell>
          <table:table-cell table:style-name="ce12N2" office:value-type="float" office:value="374.4">
            <text:p>3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2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70.22">
            <text:p>12670,22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04">
            <text:p>114,0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1802.54">
            <text:p>180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3919735015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1">
            <text:p>308461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82.72">
            <text:p>155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582.72">
            <text:p>1558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758">
            <text:p>0,948</text:p>
          </table:table-cell>
          <table:table-cell table:style-name="ce12N2" office:value-type="float" office:value="495.6">
            <text:p>49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58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70.1">
            <text:p>13470,10</text:p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.23">
            <text:p>121,2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82.72">
            <text:p>15582,72</text:p>
          </table:table-cell>
          <table:table-cell table:style-name="ce12N2" office:value-type="float" office:value="739.63">
            <text:p>7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5351675881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2">
            <text:p>308462</text:p>
          </table:table-cell>
          <table:table-cell table:style-name="ce0" table:number-columns-spanned="4" table:number-rows-spanned="1" office:value-type="string" calcext:value-type="string">
            <text:p>12.902 - CORDOARIA BRASIL INDUSTRIA E COMERCIO DE CORDAS EIRELI</text:p>
          </table:table-cell>
          <table:covered-table-cell table:number-columns-repeated="3"/>
          <table:table-cell table:style-name="ce0" office:value-type="string" calcext:value-type="string">
            <text:p>49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632">
            <text:p>0,296</text:p>
          </table:table-cell>
          <table:table-cell table:style-name="ce12N2" office:value-type="float" office:value="5299.35">
            <text:p>5299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7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1.91">
            <text:p>6611,91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1">
            <text:p>59,5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516.52">
            <text:p>5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454624000153550010000496771758234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3">
            <text:p>30846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26.25">
            <text:p>3492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0045">
            <text:p>2,800</text:p>
          </table:table-cell>
          <table:table-cell table:style-name="ce12N2" office:value-type="float" office:value="300.85">
            <text:p>30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92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25.59">
            <text:p>30125,59</text:p>
          </table:table-cell>
          <table:table-cell table:style-name="ce12N2" office:value-type="float" office:value="30.14">
            <text:p>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14">
            <text:p>271,14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8.92">
            <text:p>28,92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1701.07">
            <text:p>170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3311732807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5">
            <text:p>30846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792">
            <text:p>0,069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.84">
            <text:p>220,84</text:p>
          </table:table-cell>
          <table:table-cell table:style-name="ce12N2" office:value-type="float" office:value="0.22">
            <text:p>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4150744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6">
            <text:p>308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0.45">
            <text:p>23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9.44">
            <text:p>21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02">
            <text:p>0,017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0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0.95">
            <text:p>1830,95</text:p>
          </table:table-cell>
          <table:table-cell table:style-name="ce12N2" office:value-type="float" office:value="1.83">
            <text:p>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41.01">
            <text:p>141,01</text:p>
          </table:table-cell>
          <table:table-cell table:style-name="ce12N2" office:value-type="float" office:value="2169.44">
            <text:p>2169,44</text:p>
          </table:table-cell>
          <table:table-cell table:style-name="ce12N2" office:value-type="float" office:value="151.86">
            <text:p>15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291657184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7">
            <text:p>308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5.4">
            <text:p>363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5.4">
            <text:p>363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5.16">
            <text:p>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5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8.18">
            <text:p>3068,18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1">
            <text:p>27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5.4">
            <text:p>3635,40</text:p>
          </table:table-cell>
          <table:table-cell table:style-name="ce12N2" office:value-type="float" office:value="254.48">
            <text:p>25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01161484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8">
            <text:p>308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12.89">
            <text:p>1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8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70.46">
            <text:p>7670,46</text:p>
          </table:table-cell>
          <table:table-cell table:style-name="ce12N2" office:value-type="float" office:value="7.67">
            <text:p>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03">
            <text:p>69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636.2">
            <text:p>63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11035501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9">
            <text:p>308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83">
            <text:p>12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83">
            <text:p>12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">
            <text:p>0,004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88.53">
            <text:p>10788,53</text:p>
          </table:table-cell>
          <table:table-cell table:style-name="ce12N2" office:value-type="float" office:value="10.79">
            <text:p>1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1">
            <text:p>97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83">
            <text:p>12783,00</text:p>
          </table:table-cell>
          <table:table-cell table:style-name="ce12N2" office:value-type="float" office:value="894.81">
            <text:p>89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21288685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0">
            <text:p>308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272.61">
            <text:p>17327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71588.08">
            <text:p>1715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024832">
            <text:p>6,025</text:p>
          </table:table-cell>
          <table:table-cell table:style-name="ce12N2" office:value-type="float" office:value="485.54">
            <text:p>48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3.27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53.86">
            <text:p>145853,86</text:p>
          </table:table-cell>
          <table:table-cell table:style-name="ce12N2" office:value-type="float" office:value="145.86">
            <text:p>14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68">
            <text:p>131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84.53">
            <text:p>1684,53</text:p>
          </table:table-cell>
          <table:table-cell table:style-name="ce12N2" office:value-type="float" office:value="167518.9">
            <text:p>167518,90</text:p>
          </table:table-cell>
          <table:table-cell table:style-name="ce12N2" office:value-type="float" office:value="10867.54">
            <text:p>1086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317946248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7">
            <text:p>308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6">
            <text:p>8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6">
            <text:p>88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8">
            <text:p>0,008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0.77">
            <text:p>750,77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6">
            <text:p>6,7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6">
            <text:p>889,56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5011433186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8">
            <text:p>308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2.7">
            <text:p>114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96">
            <text:p>10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082">
            <text:p>0,033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4.76">
            <text:p>934,76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9.74">
            <text:p>69,74</text:p>
          </table:table-cell>
          <table:table-cell table:style-name="ce12N2" office:value-type="float" office:value="1072.96">
            <text:p>1072,96</text:p>
          </table:table-cell>
          <table:table-cell table:style-name="ce12N2" office:value-type="float" office:value="42.92">
            <text:p>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5114902867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8">
            <text:p>30848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62.18">
            <text:p>2246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17.12">
            <text:p>2231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568">
            <text:p>2,592</text:p>
          </table:table-cell>
          <table:table-cell table:style-name="ce12N2" office:value-type="float" office:value="11279.52">
            <text:p>1127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6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35.09">
            <text:p>18835,09</text:p>
          </table:table-cell>
          <table:table-cell table:style-name="ce12N2" office:value-type="float" office:value="18.84">
            <text:p>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52">
            <text:p>169,52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45.06">
            <text:p>145,06</text:p>
          </table:table-cell>
          <table:table-cell table:style-name="ce12N2" office:value-type="float" office:value="22317.12">
            <text:p>22317,12</text:p>
          </table:table-cell>
          <table:table-cell table:style-name="ce12N2" office:value-type="float" office:value="1562.2">
            <text:p>156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51864242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5">
            <text:p>3084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6.64">
            <text:p>1598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86.64">
            <text:p>1598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48">
            <text:p>0,060</text:p>
          </table:table-cell>
          <table:table-cell table:style-name="ce12N2" office:value-type="float" office:value="44.54">
            <text:p>44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8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27.55">
            <text:p>13927,55</text:p>
          </table:table-cell>
          <table:table-cell table:style-name="ce12N2" office:value-type="float" office:value="13.93">
            <text:p>1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.35">
            <text:p>125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86.64">
            <text:p>15986,64</text:p>
          </table:table-cell>
          <table:table-cell table:style-name="ce12N2" office:value-type="float" office:value="639.47">
            <text:p>639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6311033545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6">
            <text:p>308496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76.06">
            <text:p>1107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1048">
            <text:p>2,410</text:p>
          </table:table-cell>
          <table:table-cell table:style-name="ce12N2" office:value-type="float" office:value="860.9">
            <text:p>86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76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5">
            <text:p>9976,50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8">
            <text:p>89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48.64">
            <text:p>348,64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750.92">
            <text:p>7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2164439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7">
            <text:p>308497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1.08">
            <text:p>436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28.15">
            <text:p>3928,15</text:p>
          </table:table-cell>
          <table:table-cell table:style-name="ce12N2" office:value-type="float" office:value="3.93">
            <text:p>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34">
            <text:p>35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7.26">
            <text:p>137,26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295.67">
            <text:p>29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091748272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8">
            <text:p>308498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35.78">
            <text:p>11063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13361">
            <text:p>29,134</text:p>
          </table:table-cell>
          <table:table-cell table:style-name="ce12N2" office:value-type="float" office:value="8729.32">
            <text:p>872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0.63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048.12">
            <text:p>90048,12</text:p>
          </table:table-cell>
          <table:table-cell table:style-name="ce12N2" office:value-type="float" office:value="90.05">
            <text:p>9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0.43">
            <text:p>810,4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984.76">
            <text:p>3984,76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7424.44">
            <text:p>74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3108414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9">
            <text:p>308499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7.03">
            <text:p>227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88">
            <text:p>0,795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0.98">
            <text:p>2050,98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6">
            <text:p>18,4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1.67">
            <text:p>71,67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154.38">
            <text:p>15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11531791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0">
            <text:p>308500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21">
            <text:p>8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16">
            <text:p>0,056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.3">
            <text:p>752,30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7">
            <text:p>6,7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56.62">
            <text:p>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0114454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4">
            <text:p>30850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1.180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8">
            <text:p>2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8">
            <text:p>22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96">
            <text:p>0,000</text:p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4.53">
            <text:p>194,53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8">
            <text:p>223,28</text:p>
          </table:table-cell>
          <table:table-cell table:style-name="ce12N2" office:value-type="float" office:value="8.93">
            <text:p>8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811801008014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5">
            <text:p>308505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1.17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84.13">
            <text:p>1228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284.13">
            <text:p>1228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084964">
            <text:p>40,085</text:p>
          </table:table-cell>
          <table:table-cell table:style-name="ce12N2" office:value-type="float" office:value="362.4">
            <text:p>36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8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7.54">
            <text:p>10367,54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3">
            <text:p>93,3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84.13">
            <text:p>12284,13</text:p>
          </table:table-cell>
          <table:table-cell table:style-name="ce12N2" office:value-type="float" office:value="859.9">
            <text:p>85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8117810011982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6">
            <text:p>308506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1.17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36.32">
            <text:p>893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936.32">
            <text:p>893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0.14864">
            <text:p>60,149</text:p>
          </table:table-cell>
          <table:table-cell table:style-name="ce12N2" office:value-type="float" office:value="1314.5">
            <text:p>13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3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42.07">
            <text:p>7542,07</text:p>
          </table:table-cell>
          <table:table-cell table:style-name="ce12N2" office:value-type="float" office:value="7.52">
            <text:p>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86">
            <text:p>67,8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6.32">
            <text:p>8936,32</text:p>
          </table:table-cell>
          <table:table-cell table:style-name="ce12N2" office:value-type="float" office:value="625.54">
            <text:p>62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811771004186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7">
            <text:p>30850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1.17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53">
            <text:p>629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298.53">
            <text:p>6298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24">
            <text:p>0,029</text:p>
          </table:table-cell>
          <table:table-cell table:style-name="ce12N2" office:value-type="float" office:value="207.35">
            <text:p>207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15.86">
            <text:p>5315,8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8">
            <text:p>47,8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8.53">
            <text:p>6298,53</text:p>
          </table:table-cell>
          <table:table-cell table:style-name="ce12N2" office:value-type="float" office:value="440.9">
            <text:p>44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811761007754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8">
            <text:p>308508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1.17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0.4">
            <text:p>122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70.4">
            <text:p>122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6">
            <text:p>0,211</text:p>
          </table:table-cell>
          <table:table-cell table:style-name="ce12N2" office:value-type="float" office:value="480">
            <text:p>4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55.93">
            <text:p>10355,93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19">
            <text:p>93,1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70.4">
            <text:p>12270,40</text:p>
          </table:table-cell>
          <table:table-cell table:style-name="ce12N2" office:value-type="float" office:value="858.93">
            <text:p>858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81179100139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5">
            <text:p>3085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02.53">
            <text:p>3510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93168">
            <text:p>3,693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0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47.35">
            <text:p>29347,35</text:p>
          </table:table-cell>
          <table:table-cell table:style-name="ce12N2" office:value-type="float" office:value="29.34">
            <text:p>2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12">
            <text:p>264,1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32.23">
            <text:p>632,23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2131.63">
            <text:p>213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614736633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6">
            <text:p>3085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44">
            <text:p>5,644</text:p>
          </table:table-cell>
          <table:table-cell table:style-name="ce12N2" office:value-type="float" office:value="349.4">
            <text:p>34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94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966.16">
            <text:p>53966,16</text:p>
          </table:table-cell>
          <table:table-cell table:style-name="ce12N2" office:value-type="float" office:value="53.97">
            <text:p>5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7">
            <text:p>485,7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4476">
            <text:p>44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8321063213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0">
            <text:p>30855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54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5811">
            <text:p>2,558</text:p>
          </table:table-cell>
          <table:table-cell table:style-name="ce12N2" office:value-type="float" office:value="717.38">
            <text:p>71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3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22.56">
            <text:p>20622,5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6">
            <text:p>185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1710.45">
            <text:p>1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5431964997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5">
            <text:p>308555</text:p>
          </table:table-cell>
          <table:table-cell table:style-name="ce0" table:number-columns-spanned="4" table:number-rows-spanned="1" office:value-type="string" calcext:value-type="string">
            <text:p>760 - WESTAFLEX TUBOS FLEXIVEIS LTDA</text:p>
          </table:table-cell>
          <table:covered-table-cell table:number-columns-repeated="3"/>
          <table:table-cell table:style-name="ce0" office:value-type="string" calcext:value-type="string">
            <text:p>183.6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798.89">
            <text:p>3879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8462.67">
            <text:p>38462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038">
            <text:p>5,730</text:p>
          </table:table-cell>
          <table:table-cell table:style-name="ce12N2" office:value-type="float" office:value="161.52">
            <text:p>16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79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125.32">
            <text:p>32125,32</text:p>
          </table:table-cell>
          <table:table-cell table:style-name="ce12N2" office:value-type="float" office:value="32.12">
            <text:p>3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.12">
            <text:p>289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36.22">
            <text:p>336,22</text:p>
          </table:table-cell>
          <table:table-cell table:style-name="ce12N2" office:value-type="float" office:value="38462.67">
            <text:p>38462,67</text:p>
          </table:table-cell>
          <table:table-cell table:style-name="ce12N2" office:value-type="float" office:value="2692.38">
            <text:p>269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750245210009355500100018369210750950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8">
            <text:p>308558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98.32">
            <text:p>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401619827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0">
            <text:p>30856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2.5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43.14">
            <text:p>22443,14</text:p>
          </table:table-cell>
          <table:table-cell table:style-name="ce12N2" office:value-type="float" office:value="1305.27">
            <text:p>1305,27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754.6">
            <text:p>2175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1402">
            <text:p>3,014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43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5.45">
            <text:p>17815,45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4">
            <text:p>160,34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993.81">
            <text:p>1993,81</text:p>
          </table:table-cell>
          <table:table-cell table:style-name="ce12N2" office:value-type="float" office:value="20449.33">
            <text:p>20449,33</text:p>
          </table:table-cell>
          <table:table-cell table:style-name="ce12N2" office:value-type="float" office:value="817.98">
            <text:p>81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225261303311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1">
            <text:p>30856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91.43">
            <text:p>2629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8025">
            <text:p>1,258</text:p>
          </table:table-cell>
          <table:table-cell table:style-name="ce12N2" office:value-type="float" office:value="933.36">
            <text:p>93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291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01.23">
            <text:p>21001,23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01">
            <text:p>189,0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185.36">
            <text:p>2185,36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964.24">
            <text:p>96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41589400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2">
            <text:p>30856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2.75">
            <text:p>484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6.03">
            <text:p>4236,03</text:p>
          </table:table-cell>
          <table:table-cell table:style-name="ce12N2" office:value-type="float" office:value="4.24">
            <text:p>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12">
            <text:p>38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30.22">
            <text:p>430,22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51589447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3">
            <text:p>308563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190.73">
            <text:p>8119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81190.73">
            <text:p>8119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06076">
            <text:p>5,306</text:p>
          </table:table-cell>
          <table:table-cell table:style-name="ce12N2" office:value-type="float" office:value="9695.92">
            <text:p>9695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190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22.97">
            <text:p>68522,97</text:p>
          </table:table-cell>
          <table:table-cell table:style-name="ce12N2" office:value-type="float" office:value="68.52">
            <text:p>6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.71">
            <text:p>616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190.73">
            <text:p>81190,73</text:p>
          </table:table-cell>
          <table:table-cell table:style-name="ce12N2" office:value-type="float" office:value="5683.36">
            <text:p>568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77180348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5">
            <text:p>308565</text:p>
          </table:table-cell>
          <table:table-cell table:style-name="ce0" table:number-columns-spanned="4" table:number-rows-spanned="1" office:value-type="string" calcext:value-type="string">
            <text:p>7.661 - SEGURIMAX COM. AT. EQUIP. SEG. IMP. EXP</text:p>
          </table:table-cell>
          <table:covered-table-cell table:number-columns-repeated="3"/>
          <table:table-cell table:style-name="ce0" office:value-type="string" calcext:value-type="string">
            <text:p>183.7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32.33">
            <text:p>455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217">
            <text:p>0,532</text:p>
          </table:table-cell>
          <table:table-cell table:style-name="ce12N2" office:value-type="float" office:value="676.81">
            <text:p>67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3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47.54">
            <text:p>37447,54</text:p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04">
            <text:p>337,0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548.48">
            <text:p>2548,48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1719.34">
            <text:p>171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79.33">
            <text:p>12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2.374</text:p>
          </table:table-cell>
          <table:table-cell table:style-name="ce0" office:value-type="string" calcext:value-type="string">
            <text:p>34.164 - TRANSPORTES MARLIM LTDA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.279,33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42260517011376000102550010001837351141562958</text:p>
          </table:table-cell>
          <table:table-cell table:style-name="ce0" office:value-type="string" calcext:value-type="string">
            <text:p>4226065815837200012057001000042374100042420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6">
            <text:p>308566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4.851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97.61">
            <text:p>6089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7887.46">
            <text:p>5788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322">
            <text:p>0,903</text:p>
          </table:table-cell>
          <table:table-cell table:style-name="ce12N2" office:value-type="float" office:value="429.86">
            <text:p>429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.897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431.55">
            <text:p>50431,55</text:p>
          </table:table-cell>
          <table:table-cell table:style-name="ce12N2" office:value-type="float" office:value="50.43">
            <text:p>5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3.88">
            <text:p>453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010.15">
            <text:p>3010,15</text:p>
          </table:table-cell>
          <table:table-cell table:style-name="ce12N2" office:value-type="float" office:value="57887.46">
            <text:p>57887,46</text:p>
          </table:table-cell>
          <table:table-cell table:style-name="ce12N2" office:value-type="float" office:value="2315.5">
            <text:p>23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48511411565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9">
            <text:p>30857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6">
            <text:p>272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77.4">
            <text:p>257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3832">
            <text:p>0,654</text:p>
          </table:table-cell>
          <table:table-cell table:style-name="ce12N2" office:value-type="float" office:value="24.32">
            <text:p>24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.07">
            <text:p>2463,07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6">
            <text:p>22,1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3.2">
            <text:p>143,20</text:p>
          </table:table-cell>
          <table:table-cell table:style-name="ce12N2" office:value-type="float" office:value="2577.4">
            <text:p>2577,40</text:p>
          </table:table-cell>
          <table:table-cell table:style-name="ce12N2" office:value-type="float" office:value="114.33">
            <text:p>11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11581535442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0">
            <text:p>3085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4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104">
            <text:p>0,371</text:p>
          </table:table-cell>
          <table:table-cell table:style-name="ce12N2" office:value-type="float" office:value="44.76">
            <text:p>44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8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7.76">
            <text:p>4397,76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8">
            <text:p>39,5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183.24">
            <text:p>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43481610762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2">
            <text:p>308582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4.1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88.48">
            <text:p>5318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23574">
            <text:p>9,224</text:p>
          </table:table-cell>
          <table:table-cell table:style-name="ce12N2" office:value-type="float" office:value="1769.07">
            <text:p>176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8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14.18">
            <text:p>43414,18</text:p>
          </table:table-cell>
          <table:table-cell table:style-name="ce12N2" office:value-type="float" office:value="43.42">
            <text:p>4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74">
            <text:p>390,7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860.04">
            <text:p>1860,04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3489.09">
            <text:p>34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41921627051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6">
            <text:p>3085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13">
            <text:p>118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72">
            <text:p>0,001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0.76">
            <text:p>940,76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2.45">
            <text:p>72,45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78.03">
            <text:p>7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21873219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8">
            <text:p>3085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0.93">
            <text:p>54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1.36">
            <text:p>4351,36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6">
            <text:p>39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360.91">
            <text:p>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0195091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9">
            <text:p>3085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8">
            <text:p>0,035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5.35">
            <text:p>4945,35</text:p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51">
            <text:p>44,5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410.17">
            <text:p>41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31547187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2">
            <text:p>3085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4.78">
            <text:p>27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48">
            <text:p>255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02">
            <text:p>0,017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9.3">
            <text:p>2159,3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3">
            <text:p>1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66.3">
            <text:p>166,30</text:p>
          </table:table-cell>
          <table:table-cell table:style-name="ce12N2" office:value-type="float" office:value="2558.48">
            <text:p>2558,48</text:p>
          </table:table-cell>
          <table:table-cell table:style-name="ce12N2" office:value-type="float" office:value="179.09">
            <text:p>17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7154631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3">
            <text:p>3085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9">
            <text:p>0,067</text:p>
          </table:table-cell>
          <table:table-cell table:style-name="ce12N2" office:value-type="float" office:value="72.77">
            <text:p>7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7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19.81">
            <text:p>9519,81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68">
            <text:p>85,6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789.58">
            <text:p>78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516421766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5">
            <text:p>3085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3">
            <text:p>6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15">
            <text:p>63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2">
            <text:p>0,001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36">
            <text:p>534,36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15">
            <text:p>633,15</text:p>
          </table:table-cell>
          <table:table-cell table:style-name="ce12N2" office:value-type="float" office:value="44.32">
            <text:p>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81015902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7">
            <text:p>308597</text:p>
          </table:table-cell>
          <table:table-cell table:style-name="ce0" table:number-columns-spanned="4" table:number-rows-spanned="1" office:value-type="string" calcext:value-type="string">
            <text:p>12.193 - AC VENT INDUSTRIA ELETROMECANICA LTDA</text:p>
          </table:table-cell>
          <table:covered-table-cell table:number-columns-repeated="3"/>
          <table:table-cell table:style-name="ce0" office:value-type="string" calcext:value-type="string">
            <text:p>14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75.44">
            <text:p>2257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1864.84">
            <text:p>2186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56">
            <text:p>0,486</text:p>
          </table:table-cell>
          <table:table-cell table:style-name="ce12N2" office:value-type="float" office:value="172">
            <text:p>1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57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92.09">
            <text:p>19592,09</text:p>
          </table:table-cell>
          <table:table-cell table:style-name="ce12N2" office:value-type="float" office:value="19.58">
            <text:p>1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.33">
            <text:p>176,3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0.6">
            <text:p>710,60</text:p>
          </table:table-cell>
          <table:table-cell table:style-name="ce12N2" office:value-type="float" office:value="21864.84">
            <text:p>21864,84</text:p>
          </table:table-cell>
          <table:table-cell table:style-name="ce12N2" office:value-type="float" office:value="1530.54">
            <text:p>15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411308000179550010000148341208821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08">
            <text:p>3086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4.57">
            <text:p>5874,57</text:p>
          </table:table-cell>
          <table:table-cell table:style-name="ce12N2" office:value-type="float" office:value="5.87">
            <text:p>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87">
            <text:p>52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487.24">
            <text:p>48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81481705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09">
            <text:p>308609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9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2.38">
            <text:p>39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18">
            <text:p>27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5">
            <text:p>1,350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265.01">
            <text:p>265,01</text:p>
          </table:table-cell>
          <table:table-cell table:style-name="ce12N2" office:value-type="float" office:value="2718">
            <text:p>2718,00</text:p>
          </table:table-cell>
          <table:table-cell table:style-name="ce12N2" office:value-type="float" office:value="108.72">
            <text:p>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190.43">
            <text:p>5190,43</text:p>
          </table:table-cell>
          <table:table-cell table:style-name="ce12N2" office:value-type="float" office:value="929.37">
            <text:p>929,3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49241918456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0">
            <text:p>3086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2.12">
            <text:p>73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7.44">
            <text:p>687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8">
            <text:p>0,001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.18">
            <text:p>580,18</text:p>
          </table:table-cell>
          <table:table-cell table:style-name="ce12N2" office:value-type="float" office:value="0.58">
            <text:p>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44.68">
            <text:p>44,68</text:p>
          </table:table-cell>
          <table:table-cell table:style-name="ce12N2" office:value-type="float" office:value="687.44">
            <text:p>687,44</text:p>
          </table:table-cell>
          <table:table-cell table:style-name="ce12N2" office:value-type="float" office:value="48.12">
            <text:p>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61035126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1">
            <text:p>3086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0.93">
            <text:p>54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1.36">
            <text:p>4351,36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6">
            <text:p>39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360.91">
            <text:p>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91263814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3">
            <text:p>308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2.74">
            <text:p>43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4.64">
            <text:p>41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88">
            <text:p>0,005</text:p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2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.1">
            <text:p>3481,10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3">
            <text:p>31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268.1">
            <text:p>268,10</text:p>
          </table:table-cell>
          <table:table-cell table:style-name="ce12N2" office:value-type="float" office:value="4124.64">
            <text:p>4124,64</text:p>
          </table:table-cell>
          <table:table-cell table:style-name="ce12N2" office:value-type="float" office:value="288.72">
            <text:p>28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71023744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1">
            <text:p>3086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9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84.02">
            <text:p>1158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339.4">
            <text:p>1133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23">
            <text:p>0,060</text:p>
          </table:table-cell>
          <table:table-cell table:style-name="ce12N2" office:value-type="float" office:value="33.44">
            <text:p>33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8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70.17">
            <text:p>9570,17</text:p>
          </table:table-cell>
          <table:table-cell table:style-name="ce12N2" office:value-type="float" office:value="9.57">
            <text:p>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13">
            <text:p>86,1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244.62">
            <text:p>244,62</text:p>
          </table:table-cell>
          <table:table-cell table:style-name="ce12N2" office:value-type="float" office:value="11339.4">
            <text:p>11339,40</text:p>
          </table:table-cell>
          <table:table-cell table:style-name="ce12N2" office:value-type="float" office:value="793.76">
            <text:p>79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3931417917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7">
            <text:p>308647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8.6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.47">
            <text:p>20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56.45">
            <text:p>185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055">
            <text:p>0,019</text:p>
          </table:table-cell>
          <table:table-cell table:style-name="ce12N2" office:value-type="float" office:value="13.39">
            <text:p>1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3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7.34">
            <text:p>1617,34</text:p>
          </table:table-cell>
          <table:table-cell table:style-name="ce12N2" office:value-type="float" office:value="1.61">
            <text:p>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43">
            <text:p>4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81.02">
            <text:p>181,02</text:p>
          </table:table-cell>
          <table:table-cell table:style-name="ce12N2" office:value-type="float" office:value="1856.45">
            <text:p>1856,45</text:p>
          </table:table-cell>
          <table:table-cell table:style-name="ce12N2" office:value-type="float" office:value="74.26">
            <text:p>7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023429000143550010003886811983609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7">
            <text:p>3086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2.32">
            <text:p>13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5">
            <text:p>0,004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3.32">
            <text:p>10573,32</text:p>
          </table:table-cell>
          <table:table-cell table:style-name="ce12N2" office:value-type="float" office:value="10.57">
            <text:p>1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16">
            <text:p>95,16</text:p>
          </table:table-cell>
          <table:table-cell table:style-name="ce12N2" office:value-type="float" office:value="42.5">
            <text:p>4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14.32">
            <text:p>814,32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876.96">
            <text:p>87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2817804288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8">
            <text:p>30866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18.31">
            <text:p>2001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54">
            <text:p>1,426</text:p>
          </table:table-cell>
          <table:table-cell table:style-name="ce12N2" office:value-type="float" office:value="253.86">
            <text:p>253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1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99.27">
            <text:p>15399,27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6">
            <text:p>138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772.18">
            <text:p>1772,18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1277.23">
            <text:p>127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2921570463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9">
            <text:p>308669</text:p>
          </table:table-cell>
          <table:table-cell table:style-name="ce0" table:number-columns-spanned="4" table:number-rows-spanned="1" office:value-type="string" calcext:value-type="string">
            <text:p>995 - LUMIBRAS INDUSTRIA METALURGICA LTDA</text:p>
          </table:table-cell>
          <table:covered-table-cell table:number-columns-repeated="3"/>
          <table:table-cell table:style-name="ce0" office:value-type="string" calcext:value-type="string">
            <text:p>87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7.65">
            <text:p>466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56">
            <text:p>0,430</text:p>
          </table:table-cell>
          <table:table-cell table:style-name="ce12N2" office:value-type="float" office:value="114.75">
            <text:p>1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7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7.06">
            <text:p>3637,06</text:p>
          </table:table-cell>
          <table:table-cell table:style-name="ce12N2" office:value-type="float" office:value="3.64">
            <text:p>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73">
            <text:p>32,73</text:p>
          </table:table-cell>
          <table:table-cell table:style-name="ce12N2" office:value-type="float" office:value="34.4">
            <text:p>3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8.21">
            <text:p>358,21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301.67">
            <text:p>30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47711000184550010000875641058667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0">
            <text:p>308680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41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41.54">
            <text:p>2164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641.54">
            <text:p>2164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261">
            <text:p>0,473</text:p>
          </table:table-cell>
          <table:table-cell table:style-name="ce12N2" office:value-type="float" office:value="50.9">
            <text:p>5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4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264.92">
            <text:p>18264,92</text:p>
          </table:table-cell>
          <table:table-cell table:style-name="ce12N2" office:value-type="float" office:value="18.26">
            <text:p>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41.54">
            <text:p>21641,54</text:p>
          </table:table-cell>
          <table:table-cell table:style-name="ce12N2" office:value-type="float" office:value="1514.91">
            <text:p>151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413177977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1">
            <text:p>3086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3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2.1">
            <text:p>260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252">
            <text:p>0,032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8.36">
            <text:p>2148,36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2.3">
            <text:p>112,3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122.45">
            <text:p>12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300158619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2">
            <text:p>308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7.22">
            <text:p>2967,22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">
            <text:p>26,7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246.1">
            <text:p>24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8918241979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4">
            <text:p>308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35">
            <text:p>2515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073.63">
            <text:p>25073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9">
            <text:p>0,142</text:p>
          </table:table-cell>
          <table:table-cell table:style-name="ce12N2" office:value-type="float" office:value="157.66">
            <text:p>157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61.51">
            <text:p>21161,51</text:p>
          </table:table-cell>
          <table:table-cell table:style-name="ce12N2" office:value-type="float" office:value="21.16">
            <text:p>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7.72">
            <text:p>77,72</text:p>
          </table:table-cell>
          <table:table-cell table:style-name="ce12N2" office:value-type="float" office:value="25073.63">
            <text:p>25073,63</text:p>
          </table:table-cell>
          <table:table-cell table:style-name="ce12N2" office:value-type="float" office:value="1755.15">
            <text:p>175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8819861788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5">
            <text:p>308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44">
            <text:p>0,000</text:p>
          </table:table-cell>
          <table:table-cell table:style-name="ce12N2" office:value-type="float" office:value="1.94">
            <text:p>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1.84">
            <text:p>1201,84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2">
            <text:p>10,8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99.68">
            <text:p>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481522157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7">
            <text:p>308687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5.53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3.96">
            <text:p>108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6">
            <text:p>108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0.6">
            <text:p>1040,60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3.96">
            <text:p>1083,96</text:p>
          </table:table-cell>
          <table:table-cell table:style-name="ce12N2" office:value-type="float" office:value="43.36">
            <text:p>4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55341638850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0">
            <text:p>308710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9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2.82">
            <text:p>838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382.82">
            <text:p>838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0878">
            <text:p>0,131</text:p>
          </table:table-cell>
          <table:table-cell table:style-name="ce12N2" office:value-type="float" office:value="21.71">
            <text:p>21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4.89">
            <text:p>7074,89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2.82">
            <text:p>8382,82</text:p>
          </table:table-cell>
          <table:table-cell table:style-name="ce12N2" office:value-type="float" office:value="586.8">
            <text:p>58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3921651748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2">
            <text:p>30871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2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20.59">
            <text:p>5920,59</text:p>
          </table:table-cell>
          <table:table-cell table:style-name="ce12N2" office:value-type="float" office:value="280.01">
            <text:p>280,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99.94">
            <text:p>559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9114">
            <text:p>0,889</text:p>
          </table:table-cell>
          <table:table-cell table:style-name="ce12N2" office:value-type="float" office:value="327.4">
            <text:p>3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20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34.73">
            <text:p>4634,73</text:p>
          </table:table-cell>
          <table:table-cell table:style-name="ce12N2" office:value-type="float" office:value="4.64">
            <text:p>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72">
            <text:p>41,72</text:p>
          </table:table-cell>
          <table:table-cell table:style-name="ce12N2" office:value-type="float" office:value="79.2">
            <text:p>79,2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510.99">
            <text:p>510,99</text:p>
          </table:table-cell>
          <table:table-cell table:style-name="ce12N2" office:value-type="float" office:value="5319.93">
            <text:p>5319,93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5.77">
            <text:p>495,77</text:p>
          </table:table-cell>
          <table:table-cell table:style-name="ce12N2" office:value-type="float" office:value="89.67">
            <text:p>89,6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21714322484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1">
            <text:p>308721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4.86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4.55">
            <text:p>2109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20395.37">
            <text:p>20395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3001">
            <text:p>0,273</text:p>
          </table:table-cell>
          <table:table-cell table:style-name="ce12N2" office:value-type="float" office:value="315.91">
            <text:p>315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94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68.45">
            <text:p>17768,45</text:p>
          </table:table-cell>
          <table:table-cell table:style-name="ce12N2" office:value-type="float" office:value="17.77">
            <text:p>1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.92">
            <text:p>159,9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99.18">
            <text:p>699,18</text:p>
          </table:table-cell>
          <table:table-cell table:style-name="ce12N2" office:value-type="float" office:value="20395.37">
            <text:p>20395,37</text:p>
          </table:table-cell>
          <table:table-cell table:style-name="ce12N2" office:value-type="float" office:value="815.81">
            <text:p>81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486413169163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6">
            <text:p>30872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440.76">
            <text:p>76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1452">
            <text:p>9,145</text:p>
          </table:table-cell>
          <table:table-cell table:style-name="ce12N2" office:value-type="float" office:value="697.5">
            <text:p>69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483.38">
            <text:p>62483,38</text:p>
          </table:table-cell>
          <table:table-cell table:style-name="ce12N2" office:value-type="float" office:value="62.48">
            <text:p>6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35">
            <text:p>562,3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406.13">
            <text:p>2406,13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5182.42">
            <text:p>51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5125612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7">
            <text:p>30872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0.5">
            <text:p>23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4.01">
            <text:p>1954,01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75.25">
            <text:p>75,25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162.07">
            <text:p>16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41098736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1">
            <text:p>30873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7.7">
            <text:p>1207,70</text:p>
          </table:table-cell>
          <table:table-cell table:style-name="ce12N2" office:value-type="float" office:value="78.39">
            <text:p>78,3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78.8">
            <text:p>117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84">
            <text:p>0,277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8.67">
            <text:p>958,67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63">
            <text:p>8,63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07.29">
            <text:p>107,29</text:p>
          </table:table-cell>
          <table:table-cell table:style-name="ce12N2" office:value-type="float" office:value="1100.41">
            <text:p>1100,41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9831368231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2">
            <text:p>308732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56">
            <text:p>278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94">
            <text:p>26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72.56">
            <text:p>27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3.67">
            <text:p>2273,67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6">
            <text:p>20,46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87.56">
            <text:p>87,56</text:p>
          </table:table-cell>
          <table:table-cell table:style-name="ce12N2" office:value-type="float" office:value="2694">
            <text:p>2694,00</text:p>
          </table:table-cell>
          <table:table-cell table:style-name="ce12N2" office:value-type="float" office:value="188.58">
            <text:p>18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461969664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6">
            <text:p>30874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4.2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208">
            <text:p>0,815</text:p>
          </table:table-cell>
          <table:table-cell table:style-name="ce12N2" office:value-type="float" office:value="95.96">
            <text:p>9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46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85.25">
            <text:p>3685,25</text:p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17">
            <text:p>33,1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285.16">
            <text:p>28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42871212476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7">
            <text:p>308747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833.9">
            <text:p>14883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48833.9">
            <text:p>14883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5461">
            <text:p>28,546</text:p>
          </table:table-cell>
          <table:table-cell table:style-name="ce12N2" office:value-type="float" office:value="3180.73">
            <text:p>318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8.83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612.09">
            <text:p>125612,09</text:p>
          </table:table-cell>
          <table:table-cell table:style-name="ce12N2" office:value-type="float" office:value="125.61">
            <text:p>1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0.51">
            <text:p>1130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33.9">
            <text:p>148833,90</text:p>
          </table:table-cell>
          <table:table-cell table:style-name="ce12N2" office:value-type="float" office:value="10418.37">
            <text:p>1041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3102560001905500100048852714056213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8">
            <text:p>30874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5.9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5">
            <text:p>364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45">
            <text:p>36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4">
            <text:p>2,040</text:p>
          </table:table-cell>
          <table:table-cell table:style-name="ce12N2" office:value-type="float" office:value="580">
            <text:p>5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0.89">
            <text:p>2910,89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">
            <text:p>26,20</text:p>
          </table:table-cell>
          <table:table-cell table:style-name="ce12N2" office:value-type="float" office:value="11">
            <text:p>1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45">
            <text:p>3645,00</text:p>
          </table:table-cell>
          <table:table-cell table:style-name="ce12N2" office:value-type="float" office:value="437.4">
            <text:p>4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59701149592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4">
            <text:p>3087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.2">
            <text:p>26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7">
            <text:p>0,026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0.44">
            <text:p>2110,4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108.33">
            <text:p>1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231581187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8">
            <text:p>30877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5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66.62">
            <text:p>3566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66.62">
            <text:p>3566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660751">
            <text:p>8,661</text:p>
          </table:table-cell>
          <table:table-cell table:style-name="ce12N2" office:value-type="float" office:value="7996.32">
            <text:p>799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6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83.37">
            <text:p>28483,37</text:p>
          </table:table-cell>
          <table:table-cell table:style-name="ce12N2" office:value-type="float" office:value="28.48">
            <text:p>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35">
            <text:p>256,35</text:p>
          </table:table-cell>
          <table:table-cell table:style-name="ce12N2" office:value-type="float" office:value="11">
            <text:p>1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66.62">
            <text:p>35666,62</text:p>
          </table:table-cell>
          <table:table-cell table:style-name="ce12N2" office:value-type="float" office:value="4279.99">
            <text:p>427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580615374924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9">
            <text:p>30877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5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43.22">
            <text:p>5444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443.22">
            <text:p>54443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220181">
            <text:p>13,220</text:p>
          </table:table-cell>
          <table:table-cell table:style-name="ce12N2" office:value-type="float" office:value="12201.79">
            <text:p>1220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44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78.35">
            <text:p>43478,35</text:p>
          </table:table-cell>
          <table:table-cell table:style-name="ce12N2" office:value-type="float" office:value="43.48">
            <text:p>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1.31">
            <text:p>391,31</text:p>
          </table:table-cell>
          <table:table-cell table:style-name="ce12N2" office:value-type="float" office:value="11">
            <text:p>1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43.22">
            <text:p>54443,22</text:p>
          </table:table-cell>
          <table:table-cell table:style-name="ce12N2" office:value-type="float" office:value="6533.19">
            <text:p>653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580717786472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5">
            <text:p>308785</text:p>
          </table:table-cell>
          <table:table-cell table:style-name="ce0" table:number-columns-spanned="4" table:number-rows-spanned="1" office:value-type="string" calcext:value-type="string">
            <text:p>29.771 - SIEMENS INFRAESTRUTURA E INDUSTRIA LTDA.</text:p>
          </table:table-cell>
          <table:covered-table-cell table:number-columns-repeated="3"/>
          <table:table-cell table:style-name="ce0" office:value-type="string" calcext:value-type="string">
            <text:p>361.326</text:p>
          </table:table-cell>
          <table:table-cell table:style-name="ce9" office:value-type="string" calcext:value-type="string">
            <text:p>1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138.82">
            <text:p>1251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117654.2">
            <text:p>1176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4">
            <text:p>0,015</text:p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5.1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500.37">
            <text:p>102500,37</text:p>
          </table:table-cell>
          <table:table-cell table:style-name="ce12N2" office:value-type="float" office:value="102.49">
            <text:p>1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.48">
            <text:p>922,4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7484.62">
            <text:p>7484,62</text:p>
          </table:table-cell>
          <table:table-cell table:style-name="ce12N2" office:value-type="float" office:value="117654.2">
            <text:p>117654,20</text:p>
          </table:table-cell>
          <table:table-cell table:style-name="ce12N2" office:value-type="float" office:value="4706.17">
            <text:p>470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477600700089855011000361326196626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9">
            <text:p>308789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20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42.32">
            <text:p>125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42.32">
            <text:p>1254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144">
            <text:p>1,814</text:p>
          </table:table-cell>
          <table:table-cell table:style-name="ce12N2" office:value-type="float" office:value="663.32">
            <text:p>66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85.41">
            <text:p>10585,41</text:p>
          </table:table-cell>
          <table:table-cell table:style-name="ce12N2" office:value-type="float" office:value="10.59">
            <text:p>1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27">
            <text:p>95,2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42.32">
            <text:p>12542,32</text:p>
          </table:table-cell>
          <table:table-cell table:style-name="ce12N2" office:value-type="float" office:value="877.96">
            <text:p>87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20313580318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0">
            <text:p>308790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2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043.18">
            <text:p>17404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74043.18">
            <text:p>17404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2367">
            <text:p>32,237</text:p>
          </table:table-cell>
          <table:table-cell table:style-name="ce12N2" office:value-type="float" office:value="7977.55">
            <text:p>7977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.04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888.08">
            <text:p>146888,08</text:p>
          </table:table-cell>
          <table:table-cell table:style-name="ce12N2" office:value-type="float" office:value="146.92">
            <text:p>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1.98">
            <text:p>1321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043.18">
            <text:p>174043,18</text:p>
          </table:table-cell>
          <table:table-cell table:style-name="ce12N2" office:value-type="float" office:value="12183.02">
            <text:p>1218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2051358360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1">
            <text:p>308791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20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688.54">
            <text:p>1176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7457.92">
            <text:p>1174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8857">
            <text:p>35,886</text:p>
          </table:table-cell>
          <table:table-cell table:style-name="ce12N2" office:value-type="float" office:value="8730.84">
            <text:p>873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7.68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228.16">
            <text:p>99228,16</text:p>
          </table:table-cell>
          <table:table-cell table:style-name="ce12N2" office:value-type="float" office:value="99.26">
            <text:p>9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.06">
            <text:p>893,0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230.62">
            <text:p>230,62</text:p>
          </table:table-cell>
          <table:table-cell table:style-name="ce12N2" office:value-type="float" office:value="117457.92">
            <text:p>117457,92</text:p>
          </table:table-cell>
          <table:table-cell table:style-name="ce12N2" office:value-type="float" office:value="8115.61">
            <text:p>811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2041899473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3">
            <text:p>308793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6818408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5">
            <text:p>308795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271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75.98">
            <text:p>2327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275.98">
            <text:p>2327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49">
            <text:p>0,355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27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88.19">
            <text:p>18588,19</text:p>
          </table:table-cell>
          <table:table-cell table:style-name="ce12N2" office:value-type="float" office:value="18.59">
            <text:p>1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.29">
            <text:p>167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275.98">
            <text:p>23275,98</text:p>
          </table:table-cell>
          <table:table-cell table:style-name="ce12N2" office:value-type="float" office:value="2793.12">
            <text:p>279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2711443616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7">
            <text:p>3087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4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7">
            <text:p>3525,57</text:p>
          </table:table-cell>
          <table:table-cell table:style-name="ce12N2" office:value-type="float" office:value="228.84">
            <text:p>228,8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1.2">
            <text:p>344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32">
            <text:p>0,362</text:p>
          </table:table-cell>
          <table:table-cell table:style-name="ce12N2" office:value-type="float" office:value="89.6">
            <text:p>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62">
            <text:p>2798,6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9">
            <text:p>25,19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313.21">
            <text:p>313,21</text:p>
          </table:table-cell>
          <table:table-cell table:style-name="ce12N2" office:value-type="float" office:value="3212.36">
            <text:p>3212,36</text:p>
          </table:table-cell>
          <table:table-cell table:style-name="ce12N2" office:value-type="float" office:value="128.49">
            <text:p>12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4572158382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8">
            <text:p>30879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625">
            <text:p>12,863</text:p>
          </table:table-cell>
          <table:table-cell table:style-name="ce12N2" office:value-type="float" office:value="8015">
            <text:p>80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71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306.2">
            <text:p>37306,20</text:p>
          </table:table-cell>
          <table:table-cell table:style-name="ce12N2" office:value-type="float" office:value="37.31">
            <text:p>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76">
            <text:p>335,76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5605.74">
            <text:p>560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1141767568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9">
            <text:p>30879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2">
            <text:p>6,120</text:p>
          </table:table-cell>
          <table:table-cell table:style-name="ce12N2" office:value-type="float" office:value="1740">
            <text:p>17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32.69">
            <text:p>8732,69</text:p>
          </table:table-cell>
          <table:table-cell table:style-name="ce12N2" office:value-type="float" office:value="8.73">
            <text:p>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9">
            <text:p>78,5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1312.2">
            <text:p>13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7174509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00">
            <text:p>30880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2">
            <text:p>10,200</text:p>
          </table:table-cell>
          <table:table-cell table:style-name="ce12N2" office:value-type="float" office:value="2900">
            <text:p>29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4.48">
            <text:p>14554,48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99">
            <text:p>130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2187">
            <text:p>21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818792443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01">
            <text:p>308801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4.42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76.58">
            <text:p>9007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9162.94">
            <text:p>8916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6.56862">
            <text:p>86,569</text:p>
          </table:table-cell>
          <table:table-cell table:style-name="ce12N2" office:value-type="float" office:value="28892.42">
            <text:p>28892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07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51.3">
            <text:p>75251,30</text:p>
          </table:table-cell>
          <table:table-cell table:style-name="ce12N2" office:value-type="float" office:value="75.24">
            <text:p>7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7.27">
            <text:p>677,2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913.64">
            <text:p>913,64</text:p>
          </table:table-cell>
          <table:table-cell table:style-name="ce12N2" office:value-type="float" office:value="89162.94">
            <text:p>89162,94</text:p>
          </table:table-cell>
          <table:table-cell table:style-name="ce12N2" office:value-type="float" office:value="6241.4">
            <text:p>62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44201632566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7">
            <text:p>308837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1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.17">
            <text:p>61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.84">
            <text:p>59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594.84">
            <text:p>594,84</text:p>
          </table:table-cell>
          <table:table-cell table:style-name="ce12N2" office:value-type="float" office:value="41.64">
            <text:p>4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980200012255001000051002116624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0">
            <text:p>308840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11.24">
            <text:p>14411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144111.24">
            <text:p>14411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9492">
            <text:p>3,595</text:p>
          </table:table-cell>
          <table:table-cell table:style-name="ce12N2" office:value-type="float" office:value="859.36">
            <text:p>85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11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763.44">
            <text:p>128763,44</text:p>
          </table:table-cell>
          <table:table-cell table:style-name="ce12N2" office:value-type="float" office:value="128.46">
            <text:p>12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8.54">
            <text:p>1158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11.24">
            <text:p>144111,24</text:p>
          </table:table-cell>
          <table:table-cell table:style-name="ce12N2" office:value-type="float" office:value="10087.73">
            <text:p>1008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42.57">
            <text:p>304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9.37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05/06/2026</text:p>
          </table:table-cell>
          <table:table-cell table:style-name="ce12" office:value-type="string" calcext:value-type="string">
            <text:p>3.042,57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35260613576045000150550010000053151001894520</text:p>
          </table:table-cell>
          <table:table-cell table:style-name="ce0" office:value-type="string" calcext:value-type="string">
            <text:p>3526060522209200076357002000479372100691235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4">
            <text:p>30884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3.61">
            <text:p>3833,61</text:p>
          </table:table-cell>
          <table:table-cell table:style-name="ce12N2" office:value-type="float" office:value="222.96">
            <text:p>222,96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16">
            <text:p>3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24">
            <text:p>0,472</text:p>
          </table:table-cell>
          <table:table-cell table:style-name="ce12N2" office:value-type="float" office:value="116">
            <text:p>1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3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3.14">
            <text:p>3043,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39">
            <text:p>27,39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40.57">
            <text:p>340,57</text:p>
          </table:table-cell>
          <table:table-cell table:style-name="ce12N2" office:value-type="float" office:value="3493.04">
            <text:p>3493,04</text:p>
          </table:table-cell>
          <table:table-cell table:style-name="ce12N2" office:value-type="float" office:value="139.72">
            <text:p>13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8481074354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5">
            <text:p>30884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6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22048">
            <text:p>6,522</text:p>
          </table:table-cell>
          <table:table-cell table:style-name="ce12N2" office:value-type="float" office:value="1004.79">
            <text:p>100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35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28.35">
            <text:p>29928,35</text:p>
          </table:table-cell>
          <table:table-cell table:style-name="ce12N2" office:value-type="float" office:value="29.93">
            <text:p>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35">
            <text:p>269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1374.13">
            <text:p>137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6590140629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9">
            <text:p>308849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6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653811189825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0">
            <text:p>30885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6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50.7">
            <text:p>1175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326.18">
            <text:p>1132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612">
            <text:p>0,016</text:p>
          </table:table-cell>
          <table:table-cell table:style-name="ce12N2" office:value-type="float" office:value="34.35">
            <text:p>3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75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326.18">
            <text:p>11326,18</text:p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95">
            <text:p>101,95</text:p>
          </table:table-cell>
          <table:table-cell table:style-name="ce12N2" office:value-type="float" office:value="22.64">
            <text:p>22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24.52">
            <text:p>424,52</text:p>
          </table:table-cell>
          <table:table-cell table:style-name="ce12N2" office:value-type="float" office:value="11326.18">
            <text:p>11326,18</text:p>
          </table:table-cell>
          <table:table-cell table:style-name="ce12N2" office:value-type="float" office:value="792.83">
            <text:p>79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65391118982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2">
            <text:p>308852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6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8">
            <text:p>31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.89">
            <text:p>304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2.3">
            <text:p>2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.89">
            <text:p>304,89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4">
            <text:p>2,7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304.89">
            <text:p>304,89</text:p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65401118982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4">
            <text:p>308854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553">
            <text:p>41,553</text:p>
          </table:table-cell>
          <table:table-cell table:style-name="ce12N2" office:value-type="float" office:value="1056">
            <text:p>1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1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604.23">
            <text:p>60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21865934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7">
            <text:p>308857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69788">
            <text:p>61,698</text:p>
          </table:table-cell>
          <table:table-cell table:style-name="ce12N2" office:value-type="float" office:value="838">
            <text:p>8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446.61">
            <text:p>4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11691318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9">
            <text:p>308859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3556">
            <text:p>16,836</text:p>
          </table:table-cell>
          <table:table-cell table:style-name="ce12N2" office:value-type="float" office:value="894.4">
            <text:p>89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3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47.59">
            <text:p>28447,59</text:p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03">
            <text:p>25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2228.7">
            <text:p>222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4921000158550010000001181817952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3">
            <text:p>308863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4.4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14">
            <text:p>883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084198">
            <text:p>50,084</text:p>
          </table:table-cell>
          <table:table-cell table:style-name="ce12N2" office:value-type="float" office:value="28862.81">
            <text:p>2886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3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07.83">
            <text:p>73607,83</text:p>
          </table:table-cell>
          <table:table-cell table:style-name="ce12N2" office:value-type="float" office:value="73.6">
            <text:p>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.47">
            <text:p>662,4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098.34">
            <text:p>1098,34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6105.09">
            <text:p>610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44311884119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4">
            <text:p>30886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0.7">
            <text:p>14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02">
            <text:p>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1.85">
            <text:p>1171,8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2.2">
            <text:p>72,2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97.2">
            <text:p>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4291100002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6">
            <text:p>30886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1.4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9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31.5">
            <text:p>48031,50</text:p>
          </table:table-cell>
          <table:table-cell table:style-name="ce12N2" office:value-type="float" office:value="48.03">
            <text:p>4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28">
            <text:p>432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3983.98">
            <text:p>398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14551444800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1">
            <text:p>308871</text:p>
          </table:table-cell>
          <table:table-cell table:style-name="ce0" table:number-columns-spanned="4" table:number-rows-spanned="1" office:value-type="string" calcext:value-type="string">
            <text:p>37.660 - BF LIMP COMERCIO DE PRODUTOS DE HIGIENE E LIMPEZA LTDA</text:p>
          </table:table-cell>
          <table:covered-table-cell table:number-columns-repeated="3"/>
          <table:table-cell table:style-name="ce0" office:value-type="string" calcext:value-type="string">
            <text:p>2.2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35">
            <text:p>0,074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2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1.31">
            <text:p>5421,31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79">
            <text:p>48,7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421.49">
            <text:p>4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24101070001655500100000228817357780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5">
            <text:p>30887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2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32">
            <text:p>349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358">
            <text:p>0,230</text:p>
          </table:table-cell>
          <table:table-cell table:style-name="ce12N2" office:value-type="float" office:value="44.71">
            <text:p>44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5.1">
            <text:p>2845,10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">
            <text:p>25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28.25">
            <text:p>128,25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235.98">
            <text:p>23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20915704022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6">
            <text:p>308876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22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28">
            <text:p>13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6.3">
            <text:p>130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5">
            <text:p>0,003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38.05">
            <text:p>1138,05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24">
            <text:p>10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1306.3">
            <text:p>1306,30</text:p>
          </table:table-cell>
          <table:table-cell table:style-name="ce12N2" office:value-type="float" office:value="52.25">
            <text:p>5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221114390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8">
            <text:p>30887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27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3">
            <text:p>12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5">
            <text:p>0,003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4.61">
            <text:p>1034,61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27156948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9">
            <text:p>308879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24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3">
            <text:p>12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5">
            <text:p>0,003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4.61">
            <text:p>1034,61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1187.56">
            <text:p>1187,56</text:p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24159912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0">
            <text:p>308880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3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0.36">
            <text:p>713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9">
            <text:p>0,00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3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28.43">
            <text:p>5828,43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6">
            <text:p>52,46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483.41">
            <text:p>48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39211347884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1">
            <text:p>308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0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8">
            <text:p>14858,00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72">
            <text:p>133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1232.34">
            <text:p>123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6189942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3">
            <text:p>3088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67.4">
            <text:p>14867,40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81">
            <text:p>133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1233.12">
            <text:p>12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51420898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4">
            <text:p>30888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5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528">
            <text:p>0,457</text:p>
          </table:table-cell>
          <table:table-cell table:style-name="ce12N2" office:value-type="float" office:value="30.61">
            <text:p>3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8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7.2">
            <text:p>6067,20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1">
            <text:p>54,6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503.22">
            <text:p>50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52321604502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7">
            <text:p>3088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1.5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37.6">
            <text:p>521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137.6">
            <text:p>521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7.73984">
            <text:p>47,740</text:p>
          </table:table-cell>
          <table:table-cell table:style-name="ce12N2" office:value-type="float" office:value="3219.2">
            <text:p>321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1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03.2">
            <text:p>44003,20</text:p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.03">
            <text:p>396,0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37.6">
            <text:p>52137,60</text:p>
          </table:table-cell>
          <table:table-cell table:style-name="ce12N2" office:value-type="float" office:value="3649.63">
            <text:p>364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158314295219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8">
            <text:p>3088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1.7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1.4957">
            <text:p>71,496</text:p>
          </table:table-cell>
          <table:table-cell table:style-name="ce12N2" office:value-type="float" office:value="6711.38">
            <text:p>6711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86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76.9">
            <text:p>70776,90</text:p>
          </table:table-cell>
          <table:table-cell table:style-name="ce12N2" office:value-type="float" office:value="70.77">
            <text:p>7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6.99">
            <text:p>636,9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5870.4">
            <text:p>58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172113853371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0">
            <text:p>308890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3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339.71">
            <text:p>9033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973526">
            <text:p>19,974</text:p>
          </table:table-cell>
          <table:table-cell table:style-name="ce12N2" office:value-type="float" office:value="21843">
            <text:p>218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33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064.16">
            <text:p>76064,16</text:p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4.56">
            <text:p>684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13.63">
            <text:p>213,63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6308.83">
            <text:p>630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32731391091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1">
            <text:p>3088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3.42">
            <text:p>468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28">
            <text:p>0,152</text:p>
          </table:table-cell>
          <table:table-cell table:style-name="ce12N2" office:value-type="float" office:value="19.44">
            <text:p>1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28.28">
            <text:p>3828,28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45">
            <text:p>34,45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47.42">
            <text:p>147,42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91099196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2">
            <text:p>308892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827.49">
            <text:p>4382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43827.49">
            <text:p>43827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7707">
            <text:p>0,877</text:p>
          </table:table-cell>
          <table:table-cell table:style-name="ce12N2" office:value-type="float" office:value="190.31">
            <text:p>19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82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827.49">
            <text:p>43827,49</text:p>
          </table:table-cell>
          <table:table-cell table:style-name="ce12N2" office:value-type="float" office:value="631.1">
            <text:p>63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62794901000150550010000000221034876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9">
            <text:p>308899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193.83">
            <text:p>9919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99193.83">
            <text:p>99193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0004">
            <text:p>1,000</text:p>
          </table:table-cell>
          <table:table-cell table:style-name="ce12N2" office:value-type="float" office:value="532.79">
            <text:p>53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.193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193.83">
            <text:p>99193,83</text:p>
          </table:table-cell>
          <table:table-cell table:style-name="ce12N2" office:value-type="float" office:value="1428.41">
            <text:p>14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62794901000150550010000000201829512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00">
            <text:p>308900</text:p>
          </table:table-cell>
          <table:table-cell table:style-name="ce0" table:number-columns-spanned="4" table:number-rows-spanned="1" office:value-type="string" calcext:value-type="string">
            <text:p>35.459 - TRENTO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44.7">
            <text:p>4264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44.7">
            <text:p>4264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">
            <text:p>0,013</text:p>
          </table:table-cell>
          <table:table-cell table:style-name="ce12N2" office:value-type="float" office:value="60.25">
            <text:p>6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4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44.7">
            <text:p>42644,70</text:p>
          </table:table-cell>
          <table:table-cell table:style-name="ce12N2" office:value-type="float" office:value="788.92">
            <text:p>78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39433900001085500100000037011919395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20">
            <text:p>30892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70.4">
            <text:p>24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170.4">
            <text:p>24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1.968">
            <text:p>211,968</text:p>
          </table:table-cell>
          <table:table-cell table:style-name="ce12N2" office:value-type="float" office:value="5468.4">
            <text:p>546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302.48">
            <text:p>19302,48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73">
            <text:p>173,7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70.4">
            <text:p>24170,40</text:p>
          </table:table-cell>
          <table:table-cell table:style-name="ce12N2" office:value-type="float" office:value="2900.45">
            <text:p>290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761625104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5">
            <text:p>195,00</text:p>
          </table:table-cell>
          <table:table-cell table:style-name="ce26N2" office:value-type="float" office:value="3235.11">
            <text:p>3235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387.43">
            <text:p>107387,43</text:p>
          </table:table-cell>
          <table:table-cell table:style-name="ce26N2" office:value-type="float" office:value="6121227.7">
            <text:p>6121227,70</text:p>
          </table:table-cell>
          <table:table-cell table:style-name="ce26N2" office:value-type="float" office:value="391465.44">
            <text:p>391465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21.9">
            <text:p>4321,90</text:p>
          </table:table-cell>
          <table:table-cell table:style-name="ce26N2" office:value-type="float" office:value="6304867.31">
            <text:p>6304867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3724.14">
            <text:p>43724,14</text:p>
          </table:table-cell>
          <table:table-cell table:style-name="ce26N2" office:value-type="float" office:value="7836.4">
            <text:p>7836,40</text:p>
          </table:table-cell>
          <table:table-cell table:style-name="ce26N2" office:value-type="float" office:value="2108.32">
            <text:p>210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603.286585">
            <text:p>8603,287</text:p>
          </table:table-cell>
          <table:table-cell table:style-name="ce26N2" office:value-type="float" office:value="6192878.59">
            <text:p>6192878,59</text:p>
          </table:table-cell>
          <table:table-cell table:style-name="ce26N2" office:value-type="float" office:value="6304867.31">
            <text:p>6304867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43027.32">
            <text:p>4943027,32</text:p>
          </table:table-cell>
          <table:table-cell table:style-name="ce26N2" office:value-type="float" office:value="4942.73">
            <text:p>4942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4486.75">
            <text:p>44486,7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71873.44">
            <text:p>471873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41">
            <text:p>45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32" meta:object-count="0"/>
    <meta:generator>LibreOffice/4.3.0.4$Windows_x86 LibreOffice_project/62ad5818884a2fc2e5780dd45466868d41009ec0</meta:generator>
  </office:meta>
</office:document-meta>
</file>