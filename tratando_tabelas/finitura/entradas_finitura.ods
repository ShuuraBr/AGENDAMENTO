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2">
            <text:p>311162</text:p>
          </table:table-cell>
          <table:table-cell table:style-name="ce0" table:number-columns-spanned="4" table:number-rows-spanned="1" office:value-type="string" calcext:value-type="string">
            <text:p>9.715 - OLD ARTISAN LTDA ME</text:p>
          </table:table-cell>
          <table:covered-table-cell table:number-columns-repeated="3"/>
          <table:table-cell table:style-name="ce0" office:value-type="string" calcext:value-type="string">
            <text:p>39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3.12">
            <text:p>82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4">
            <text:p>0,03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2.04">
            <text:p>672,0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3.12">
            <text:p>73,12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52.5">
            <text:p>5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050351000132550010000393971033700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2">
            <text:p>3112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3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88">
            <text:p>0,016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8.12">
            <text:p>3618,12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6">
            <text:p>32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300.09">
            <text:p>30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3171206052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4">
            <text:p>311334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259.25">
            <text:p>7259,25</text:p>
          </table:table-cell>
          <table:table-cell table:style-name="ce12N2" office:value-type="float" office:value="270">
            <text:p>27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26">
            <text:p>6964,26</text:p>
          </table:table-cell>
          <table:table-cell table:style-name="ce12N2" office:value-type="float" office:value="6.97">
            <text:p>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7">
            <text:p>62,67</text:p>
          </table:table-cell>
          <table:table-cell table:style-name="ce12N2" office:value-type="float" office:value="73.39">
            <text:p>73,3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301.17">
            <text:p>30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0700221000253550010000114031528516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0">
            <text:p>311410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7.17">
            <text:p>837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56">
            <text:p>0,231</text:p>
          </table:table-cell>
          <table:table-cell table:style-name="ce12N2" office:value-type="float" office:value="66.24">
            <text:p>6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7">
            <text:p>68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44.21">
            <text:p>744,21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534.3">
            <text:p>53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30685800015355001000071454111311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5">
            <text:p>3114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5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7.7">
            <text:p>39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4.32">
            <text:p>374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E-5">
            <text:p>0,000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0.11">
            <text:p>3160,11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43.38">
            <text:p>243,38</text:p>
          </table:table-cell>
          <table:table-cell table:style-name="ce12N2" office:value-type="float" office:value="3744.32">
            <text:p>3744,32</text:p>
          </table:table-cell>
          <table:table-cell table:style-name="ce12N2" office:value-type="float" office:value="262.1">
            <text:p>2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55341288824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5">
            <text:p>35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95.28">
            <text:p>1695,28</text:p>
          </table:table-cell>
          <table:table-cell table:style-name="ce26N2" office:value-type="float" office:value="33780.66">
            <text:p>33780,66</text:p>
          </table:table-cell>
          <table:table-cell table:style-name="ce26N2" office:value-type="float" office:value="1863.67">
            <text:p>1863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475.94">
            <text:p>3547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21457">
            <text:p>0,321</text:p>
          </table:table-cell>
          <table:table-cell table:style-name="ce26N2" office:value-type="float" office:value="33425.66">
            <text:p>33425,66</text:p>
          </table:table-cell>
          <table:table-cell table:style-name="ce26N2" office:value-type="float" office:value="35475.94">
            <text:p>3547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599.43">
            <text:p>30599,43</text:p>
          </table:table-cell>
          <table:table-cell table:style-name="ce26N2" office:value-type="float" office:value="30.59">
            <text:p>30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75.37">
            <text:p>275,3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6.36">
            <text:p>1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36">
            <text:p>50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