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8/06/2026 07:37:55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6">
            <text:p>3078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481.76">
            <text:p>4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171054566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8">
            <text:p>3078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8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8971709299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5">
            <text:p>3079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9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397.47">
            <text:p>39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951838469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8">
            <text:p>308008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41728954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9">
            <text:p>308009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4">
            <text:p>41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51754454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0">
            <text:p>30801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5">
            <text:p>0,001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6">
            <text:p>41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39.86">
            <text:p>3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61844998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1">
            <text:p>30801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31.47">
            <text:p>3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461760740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2">
            <text:p>30801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88.89">
            <text:p>8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31439851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3">
            <text:p>30801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84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16.03">
            <text:p>1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41237469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6">
            <text:p>30801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14">
            <text:p>0,0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9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119.61">
            <text:p>1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51565619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3">
            <text:p>30803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4.06">
            <text:p>1060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584.56">
            <text:p>9584,5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497">
            <text:p>0,045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04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9.66">
            <text:p>69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934.5">
            <text:p>934,50</text:p>
          </table:table-cell>
          <table:table-cell table:style-name="ce12N2" office:value-type="float" office:value="9669.56">
            <text:p>9669,56</text:p>
          </table:table-cell>
          <table:table-cell table:style-name="ce12N2" office:value-type="float" office:value="386.79">
            <text:p>38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04217356066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5">
            <text:p>308135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190.91">
            <text:p>19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234005000135550010000073891000007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1">
            <text:p>3081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8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5">
            <text:p>0,01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3.81">
            <text:p>2553,81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8">
            <text:p>2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211.81">
            <text:p>2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8281391530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9">
            <text:p>308249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1">
            <text:p>393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.58">
            <text:p>3313,58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3">
            <text:p>29,8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49.29">
            <text:p>349,29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143.3">
            <text:p>14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891398955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6">
            <text:p>3082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94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49">
            <text:p>2189,49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1">
            <text:p>19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181.6">
            <text:p>1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211814026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3">
            <text:p>30848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5">
            <text:p>0,01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6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02">
            <text:p>4089,02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">
            <text:p>36,8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319.43">
            <text:p>31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21911859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4">
            <text:p>30848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5">
            <text:p>0,006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7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53">
            <text:p>2668,53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1">
            <text:p>24,0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208.47">
            <text:p>2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3136608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5">
            <text:p>30848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.68">
            <text:p>682,68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41.97">
            <text:p>41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53.33">
            <text:p>5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41550813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6">
            <text:p>30848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38">
            <text:p>1365,38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106.66">
            <text:p>10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510988103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0">
            <text:p>30849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4">
            <text:p>0,00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35.56">
            <text:p>3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61333138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0">
            <text:p>3085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7.76">
            <text:p>1077,7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619933997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2">
            <text:p>3085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451740153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4">
            <text:p>3085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2.01">
            <text:p>2662,01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96">
            <text:p>23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220.79">
            <text:p>22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21154203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6">
            <text:p>30852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1.4">
            <text:p>1341,40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1.57">
            <text:p>1291,57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100.9">
            <text:p>1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8028676000103550010000568011004452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2">
            <text:p>308552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5.65">
            <text:p>394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68.5">
            <text:p>356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00.72">
            <text:p>3300,72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7">
            <text:p>29,7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77.15">
            <text:p>377,15</text:p>
          </table:table-cell>
          <table:table-cell table:style-name="ce12N2" office:value-type="float" office:value="3568.5">
            <text:p>3568,50</text:p>
          </table:table-cell>
          <table:table-cell table:style-name="ce12N2" office:value-type="float" office:value="142.74">
            <text:p>14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81013991142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0">
            <text:p>3085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47">
            <text:p>20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13">
            <text:p>0,002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0.44">
            <text:p>160,44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2.36">
            <text:p>12,36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13.31">
            <text:p>1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61130392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7">
            <text:p>3086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7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7.45">
            <text:p>404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87.88">
            <text:p>368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54">
            <text:p>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47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2.48">
            <text:p>3112,48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01">
            <text:p>28,01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59.57">
            <text:p>359,57</text:p>
          </table:table-cell>
          <table:table-cell table:style-name="ce12N2" office:value-type="float" office:value="3687.88">
            <text:p>3687,88</text:p>
          </table:table-cell>
          <table:table-cell table:style-name="ce12N2" office:value-type="float" office:value="258.15">
            <text:p>25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616460000152550020000717121927734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0">
            <text:p>308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112314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51">
            <text:p>308651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1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252.03">
            <text:p>25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3.72">
            <text:p>14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49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6/2026</text:p>
          </table:table-cell>
          <table:table-cell table:style-name="ce12" office:value-type="string" calcext:value-type="string">
            <text:p>143,72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5260527234005000135550010000074131000007423</text:p>
          </table:table-cell>
          <table:table-cell table:style-name="ce0" office:value-type="string" calcext:value-type="string">
            <text:p>3526061138956500020057005000400494100086786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5">
            <text:p>30871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.83">
            <text:p>376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30.18">
            <text:p>3430,18</text:p>
          </table:table-cell>
          <table:table-cell table:style-name="ce12N2" office:value-type="float" office:value="269">
            <text:p>26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1.59">
            <text:p>3421,5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3699.18">
            <text:p>3699,18</text:p>
          </table:table-cell>
          <table:table-cell table:style-name="ce12N2" office:value-type="float" office:value="147.96">
            <text:p>14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700221000253550010000111171876867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3">
            <text:p>3087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7.89">
            <text:p>152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7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0.8">
            <text:p>1210,80</text:p>
          </table:table-cell>
          <table:table-cell table:style-name="ce12N2" office:value-type="float" office:value="1.21">
            <text:p>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">
            <text:p>10,9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3.25">
            <text:p>93,25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100.42">
            <text:p>10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5351469660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6">
            <text:p>308776</text:p>
          </table:table-cell>
          <table:table-cell table:style-name="ce0" table:number-columns-spanned="4" table:number-rows-spanned="1" office:value-type="string" calcext:value-type="string">
            <text:p>13.012 - FELUX ILUMINACAO LTDA</text:p>
          </table:table-cell>
          <table:covered-table-cell table:number-columns-repeated="3"/>
          <table:table-cell table:style-name="ce0" office:value-type="string" calcext:value-type="string">
            <text:p>14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118.77">
            <text:p>1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662561000120550010000141591562093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6">
            <text:p>3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54">
            <text:p>45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469.48">
            <text:p>2469,48</text:p>
          </table:table-cell>
          <table:table-cell table:style-name="ce26N2" office:value-type="float" office:value="97506.19">
            <text:p>97506,19</text:p>
          </table:table-cell>
          <table:table-cell table:style-name="ce26N2" office:value-type="float" office:value="5361.69">
            <text:p>5361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43.72">
            <text:p>143,72</text:p>
          </table:table-cell>
          <table:table-cell table:style-name="ce26N2" office:value-type="float" office:value="99969.36">
            <text:p>99969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24489">
            <text:p>0,245</text:p>
          </table:table-cell>
          <table:table-cell table:style-name="ce26N2" office:value-type="float" office:value="97045.88">
            <text:p>97045,88</text:p>
          </table:table-cell>
          <table:table-cell table:style-name="ce26N2" office:value-type="float" office:value="99969.36">
            <text:p>99969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406.4">
            <text:p>41406,40</text:p>
          </table:table-cell>
          <table:table-cell table:style-name="ce26N2" office:value-type="float" office:value="41.4">
            <text:p>41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72.65">
            <text:p>372,6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57.83">
            <text:p>157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71">
            <text:p>40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38" meta:object-count="0"/>
    <meta:generator>LibreOffice/4.3.0.4$Windows_x86 LibreOffice_project/62ad5818884a2fc2e5780dd45466868d41009ec0</meta:generator>
  </office:meta>
</office:document-meta>
</file>