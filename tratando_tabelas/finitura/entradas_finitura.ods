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0/07/2026 07:41:1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97">
            <text:p>31089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10.41">
            <text:p>510,4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59">
            <text:p>4,5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481275537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5">
            <text:p>3109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184">
            <text:p>0,009</text:p>
          </table:table-cell>
          <table:table-cell table:style-name="ce12N2" office:value-type="float" office:value="6.32">
            <text:p>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42.75">
            <text:p>2242,75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18">
            <text:p>20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4.32">
            <text:p>2574,32</text:p>
          </table:table-cell>
          <table:table-cell table:style-name="ce12N2" office:value-type="float" office:value="102.97">
            <text:p>10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117657567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55">
            <text:p>31095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7.9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05.79">
            <text:p>660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924.3">
            <text:p>5924,3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0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35.31">
            <text:p>5235,31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12">
            <text:p>47,12</text:p>
          </table:table-cell>
          <table:table-cell table:style-name="ce12N2" office:value-type="float" office:value="55.64">
            <text:p>55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596.49">
            <text:p>596,49</text:p>
          </table:table-cell>
          <table:table-cell table:style-name="ce12N2" office:value-type="float" office:value="6009.3">
            <text:p>6009,30</text:p>
          </table:table-cell>
          <table:table-cell table:style-name="ce12N2" office:value-type="float" office:value="240.37">
            <text:p>24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0691158000370550010002979971675652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7">
            <text:p>31100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7.4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96">
            <text:p>0,027</text:p>
          </table:table-cell>
          <table:table-cell table:style-name="ce12N2" office:value-type="float" office:value="19.4">
            <text:p>1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3.47">
            <text:p>563,47</text:p>
          </table:table-cell>
          <table:table-cell table:style-name="ce12N2" office:value-type="float" office:value="0.56">
            <text:p>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7.63">
            <text:p>667,63</text:p>
          </table:table-cell>
          <table:table-cell table:style-name="ce12N2" office:value-type="float" office:value="46.73">
            <text:p>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748815913715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6">
            <text:p>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51.23">
            <text:p>1151,23</text:p>
          </table:table-cell>
          <table:table-cell table:style-name="ce26N2" office:value-type="float" office:value="16560.3">
            <text:p>16560,30</text:p>
          </table:table-cell>
          <table:table-cell table:style-name="ce26N2" office:value-type="float" office:value="841.41">
            <text:p>841,4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711.53">
            <text:p>17711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038853">
            <text:p>0,039</text:p>
          </table:table-cell>
          <table:table-cell table:style-name="ce26N2" office:value-type="float" office:value="16475.3">
            <text:p>16475,30</text:p>
          </table:table-cell>
          <table:table-cell table:style-name="ce26N2" office:value-type="float" office:value="17711.53">
            <text:p>17711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4341.46">
            <text:p>14341,46</text:p>
          </table:table-cell>
          <table:table-cell table:style-name="ce26N2" office:value-type="float" office:value="14.34">
            <text:p>14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9.06">
            <text:p>129,0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2.58">
            <text:p>52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69">
            <text:p>46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8" meta:object-count="0"/>
    <meta:generator>LibreOffice/4.3.0.4$Windows_x86 LibreOffice_project/62ad5818884a2fc2e5780dd45466868d41009ec0</meta:generator>
  </office:meta>
</office:document-meta>
</file>