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7/05/2026 07:16:1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3">
            <text:p>307523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5.7">
            <text:p>92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4">
            <text:p>0,006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82.24">
            <text:p>82,24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59.04">
            <text:p>5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379195610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5">
            <text:p>307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41813493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7">
            <text:p>30758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66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6.41">
            <text:p>126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12.51">
            <text:p>112,51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46.16">
            <text:p>4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599342000123550020001046641345815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0">
            <text:p>3075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">
            <text:p>3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169.29">
            <text:p>16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81679433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8">
            <text:p>3076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5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59">
            <text:p>376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29.89">
            <text:p>229,89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247.57">
            <text:p>24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5471995545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7">
            <text:p>307667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36.14">
            <text:p>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39477000186550010000005571000000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4">
            <text:p>307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6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82.65">
            <text:p>8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6201670547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7">
            <text:p>30774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3.89">
            <text:p>361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305.39">
            <text:p>330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13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08.5">
            <text:p>308,50</text:p>
          </table:table-cell>
          <table:table-cell table:style-name="ce12N2" office:value-type="float" office:value="3305.39">
            <text:p>3305,39</text:p>
          </table:table-cell>
          <table:table-cell table:style-name="ce12N2" office:value-type="float" office:value="231.38">
            <text:p>23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2.96">
            <text:p>7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65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5/2026</text:p>
          </table:table-cell>
          <table:table-cell table:style-name="ce12" office:value-type="string" calcext:value-type="string">
            <text:p>72,9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2077181000133550030002251591994100929</text:p>
          </table:table-cell>
          <table:table-cell table:style-name="ce0" office:value-type="string" calcext:value-type="string">
            <text:p>352605113895650002005700500039965510008592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1">
            <text:p>3077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814">
            <text:p>0,668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6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606.47">
            <text:p>60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141802519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2">
            <text:p>3077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1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202.22">
            <text:p>2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199119765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6">
            <text:p>307806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0.46">
            <text:p>860,46</text:p>
          </table:table-cell>
          <table:table-cell table:style-name="ce12N2" office:value-type="float" office:value="119">
            <text:p>11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70022100025355001000011036147379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3">
            <text:p>307893</text:p>
          </table:table-cell>
          <table:table-cell table:style-name="ce0" table:number-columns-spanned="4" table:number-rows-spanned="1" office:value-type="string" calcext:value-type="string">
            <text:p>2.840 - PBG S/A</text:p>
          </table:table-cell>
          <table:covered-table-cell table:number-columns-repeated="3"/>
          <table:table-cell table:style-name="ce0" office:value-type="string" calcext:value-type="string">
            <text:p>2.923.8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.9">
            <text:p>5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9">
            <text:p>0,001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39.57">
            <text:p>3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3475913000272550010029238891557611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8">
            <text:p>1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9">
            <text:p>11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43.12">
            <text:p>743,12</text:p>
          </table:table-cell>
          <table:table-cell table:style-name="ce26N2" office:value-type="float" office:value="44253.57">
            <text:p>44253,57</text:p>
          </table:table-cell>
          <table:table-cell table:style-name="ce26N2" office:value-type="float" office:value="2975.48">
            <text:p>29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96">
            <text:p>72,96</text:p>
          </table:table-cell>
          <table:table-cell table:style-name="ce26N2" office:value-type="float" office:value="44990.38">
            <text:p>44990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817934">
            <text:p>3,818</text:p>
          </table:table-cell>
          <table:table-cell table:style-name="ce26N2" office:value-type="float" office:value="44128.26">
            <text:p>44128,26</text:p>
          </table:table-cell>
          <table:table-cell table:style-name="ce26N2" office:value-type="float" office:value="44990.38">
            <text:p>44990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4.15">
            <text:p>144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.73">
            <text:p>27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0" meta:object-count="0"/>
    <meta:generator>LibreOffice/4.3.0.4$Windows_x86 LibreOffice_project/62ad5818884a2fc2e5780dd45466868d41009ec0</meta:generator>
  </office:meta>
</office:document-meta>
</file>