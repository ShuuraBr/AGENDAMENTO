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8/06/2026 07:17:5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0">
            <text:p>3091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87.37">
            <text:p>641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18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165.75">
            <text:p>51165,75</text:p>
          </table:table-cell>
          <table:table-cell table:style-name="ce12N2" office:value-type="float" office:value="51.17">
            <text:p>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49">
            <text:p>460,49</text:p>
          </table:table-cell>
          <table:table-cell table:style-name="ce12N2" office:value-type="float" office:value="84.9">
            <text:p>84,9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57.16">
            <text:p>5457,16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2349.21">
            <text:p>234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21910680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1">
            <text:p>309191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32">
            <text:p>35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936">
            <text:p>0,064</text:p>
          </table:table-cell>
          <table:table-cell table:style-name="ce12N2" office:value-type="float" office:value="33.12">
            <text:p>3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22">
            <text:p>29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16.56">
            <text:p>316,56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227.27">
            <text:p>22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7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09306858000153550010000711781865267712</text:p>
          </table:table-cell>
          <table:table-cell table:style-name="ce0" office:value-type="string" calcext:value-type="string">
            <text:p>3526061138956500020057005000401178100087527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6">
            <text:p>309276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9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.5">
            <text:p>1367,50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1">
            <text:p>12,3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39.23">
            <text:p>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39477000186550010000005851000000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5">
            <text:p>30938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97.51">
            <text:p>6597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97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7.13">
            <text:p>5237,13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3">
            <text:p>47,1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86.11">
            <text:p>586,11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240.46">
            <text:p>24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901806461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513.68">
            <text:p>6513,68</text:p>
          </table:table-cell>
          <table:table-cell table:style-name="ce26N2" office:value-type="float" office:value="91031.67">
            <text:p>91031,67</text:p>
          </table:table-cell>
          <table:table-cell table:style-name="ce26N2" office:value-type="float" office:value="4178.24">
            <text:p>4178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97545.35">
            <text:p>97545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603434">
            <text:p>0,603</text:p>
          </table:table-cell>
          <table:table-cell table:style-name="ce26N2" office:value-type="float" office:value="91031.67">
            <text:p>91031,67</text:p>
          </table:table-cell>
          <table:table-cell table:style-name="ce26N2" office:value-type="float" office:value="97545.35">
            <text:p>97545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628.32">
            <text:p>79628,32</text:p>
          </table:table-cell>
          <table:table-cell table:style-name="ce26N2" office:value-type="float" office:value="79.65">
            <text:p>79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16.64">
            <text:p>716,6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2.98">
            <text:p>102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.94">
            <text:p>69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2" meta:object-count="0"/>
    <meta:generator>LibreOffice/4.3.0.4$Windows_x86 LibreOffice_project/62ad5818884a2fc2e5780dd45466868d41009ec0</meta:generator>
  </office:meta>
</office:document-meta>
</file>