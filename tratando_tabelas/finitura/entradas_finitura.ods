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4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2">
            <text:p>311162</text:p>
          </table:table-cell>
          <table:table-cell table:style-name="ce0" table:number-columns-spanned="4" table:number-rows-spanned="1" office:value-type="string" calcext:value-type="string">
            <text:p>9.715 - OLD ARTISAN LTDA ME</text:p>
          </table:table-cell>
          <table:covered-table-cell table:number-columns-repeated="3"/>
          <table:table-cell table:style-name="ce0" office:value-type="string" calcext:value-type="string">
            <text:p>39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3.12">
            <text:p>82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4">
            <text:p>0,03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2.04">
            <text:p>672,0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3.12">
            <text:p>73,12</text:p>
          </table:table-cell>
          <table:table-cell table:style-name="ce12N2" office:value-type="float" office:value="750">
            <text:p>750,00</text:p>
          </table:table-cell>
          <table:table-cell table:style-name="ce12N2" office:value-type="float" office:value="52.5">
            <text:p>5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050351000132550010000393971033700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2">
            <text:p>3112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3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688">
            <text:p>0,016</text:p>
          </table:table-cell>
          <table:table-cell table:style-name="ce12N2" office:value-type="float" office:value="1.62">
            <text:p>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8.12">
            <text:p>3618,12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6">
            <text:p>32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7">
            <text:p>4287,00</text:p>
          </table:table-cell>
          <table:table-cell table:style-name="ce12N2" office:value-type="float" office:value="300.09">
            <text:p>30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3171206052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4">
            <text:p>311334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259.25">
            <text:p>7259,25</text:p>
          </table:table-cell>
          <table:table-cell table:style-name="ce12N2" office:value-type="float" office:value="270">
            <text:p>27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26">
            <text:p>6964,26</text:p>
          </table:table-cell>
          <table:table-cell table:style-name="ce12N2" office:value-type="float" office:value="6.97">
            <text:p>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7">
            <text:p>62,67</text:p>
          </table:table-cell>
          <table:table-cell table:style-name="ce12N2" office:value-type="float" office:value="73.39">
            <text:p>73,3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9.25">
            <text:p>7529,25</text:p>
          </table:table-cell>
          <table:table-cell table:style-name="ce12N2" office:value-type="float" office:value="301.17">
            <text:p>30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0700221000253550010000114031528516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0">
            <text:p>311410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7.17">
            <text:p>837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56">
            <text:p>0,231</text:p>
          </table:table-cell>
          <table:table-cell table:style-name="ce12N2" office:value-type="float" office:value="66.24">
            <text:p>6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7">
            <text:p>68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744.21">
            <text:p>744,21</text:p>
          </table:table-cell>
          <table:table-cell table:style-name="ce12N2" office:value-type="float" office:value="7632.96">
            <text:p>7632,96</text:p>
          </table:table-cell>
          <table:table-cell table:style-name="ce12N2" office:value-type="float" office:value="534.3">
            <text:p>53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306858000153550010000714541113117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15">
            <text:p>3114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5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7.7">
            <text:p>39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4.32">
            <text:p>374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E-5">
            <text:p>0,000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0.11">
            <text:p>3160,11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4">
            <text:p>28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7/2026</text:p>
          </table:table-cell>
          <table:table-cell table:style-name="ce12N2" office:value-type="float" office:value="243.38">
            <text:p>243,38</text:p>
          </table:table-cell>
          <table:table-cell table:style-name="ce12N2" office:value-type="float" office:value="3744.32">
            <text:p>3744,32</text:p>
          </table:table-cell>
          <table:table-cell table:style-name="ce12N2" office:value-type="float" office:value="262.1">
            <text:p>2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55341288824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483">
            <text:p>311483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.253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2/07/2026</text:p>
          </table:table-cell>
          <table:table-cell table:style-name="ce0" office:value-type="string" calcext:value-type="string">
            <text:p>23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6.25">
            <text:p>476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66.25">
            <text:p>476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6">
            <text:p>0,156</text:p>
          </table:table-cell>
          <table:table-cell table:style-name="ce12N2" office:value-type="float" office:value="238.14">
            <text:p>238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2.61">
            <text:p>4022,61</text:p>
          </table:table-cell>
          <table:table-cell table:style-name="ce12N2" office:value-type="float" office:value="4.02">
            <text:p>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1">
            <text:p>36,21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6.25">
            <text:p>4766,25</text:p>
          </table:table-cell>
          <table:table-cell table:style-name="ce12N2" office:value-type="float" office:value="333.64">
            <text:p>33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1253195052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9">
            <text:p>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70">
            <text:p>27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98.79">
            <text:p>1098,79</text:p>
          </table:table-cell>
          <table:table-cell table:style-name="ce26N2" office:value-type="float" office:value="32537.61">
            <text:p>32537,61</text:p>
          </table:table-cell>
          <table:table-cell table:style-name="ce26N2" office:value-type="float" office:value="1956.94">
            <text:p>1956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3636.4">
            <text:p>33636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477457">
            <text:p>0,477</text:p>
          </table:table-cell>
          <table:table-cell table:style-name="ce26N2" office:value-type="float" office:value="32267.61">
            <text:p>32267,61</text:p>
          </table:table-cell>
          <table:table-cell table:style-name="ce26N2" office:value-type="float" office:value="33636.4">
            <text:p>33636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9386.73">
            <text:p>29386,73</text:p>
          </table:table-cell>
          <table:table-cell table:style-name="ce26N2" office:value-type="float" office:value="29.37">
            <text:p>29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4.46">
            <text:p>264,4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40.5">
            <text:p>340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12">
            <text:p>50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/4.3.0.4$Windows_x86 LibreOffice_project/62ad5818884a2fc2e5780dd45466868d41009ec0</meta:generator>
  </office:meta>
</office:document-meta>
</file>