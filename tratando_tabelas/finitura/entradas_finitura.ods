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6/06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5">
            <text:p>30871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0.83">
            <text:p>376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430.18">
            <text:p>3430,18</text:p>
          </table:table-cell>
          <table:table-cell table:style-name="ce12N2" office:value-type="float" office:value="269">
            <text:p>26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1.59">
            <text:p>3421,59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3699.18">
            <text:p>3699,18</text:p>
          </table:table-cell>
          <table:table-cell table:style-name="ce12N2" office:value-type="float" office:value="147.96">
            <text:p>14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700221000253550010000111171876867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">
            <text:p>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69">
            <text:p>26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1.65">
            <text:p>61,65</text:p>
          </table:table-cell>
          <table:table-cell table:style-name="ce26N2" office:value-type="float" office:value="10366.35">
            <text:p>10366,35</text:p>
          </table:table-cell>
          <table:table-cell table:style-name="ce26N2" office:value-type="float" office:value="414.65">
            <text:p>414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428">
            <text:p>1042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">
            <text:p/>
          </table:table-cell>
          <table:table-cell table:style-name="ce26N2" office:value-type="float" office:value="10097.35">
            <text:p>10097,35</text:p>
          </table:table-cell>
          <table:table-cell table:style-name="ce26N2" office:value-type="float" office:value="10428">
            <text:p>1042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230.03">
            <text:p>9230,03</text:p>
          </table:table-cell>
          <table:table-cell table:style-name="ce26N2" office:value-type="float" office:value="9.23">
            <text:p>9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3.08">
            <text:p>83,0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2.3">
            <text:p>12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2.69">
            <text:p>32,6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4" meta:object-count="0"/>
    <meta:generator>LibreOffice/4.3.0.4$Windows_x86 LibreOffice_project/62ad5818884a2fc2e5780dd45466868d41009ec0</meta:generator>
  </office:meta>
</office:document-meta>
</file>