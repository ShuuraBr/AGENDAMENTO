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4/05/2026 07:28:1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5966">
            <text:p>3059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31527694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4">
            <text:p>306454</text:p>
          </table:table-cell>
          <table:table-cell table:style-name="ce0" table:number-columns-spanned="4" table:number-rows-spanned="1" office:value-type="string" calcext:value-type="string">
            <text:p>13.419 - METALDOMADO METALURGICA LTDA</text:p>
          </table:table-cell>
          <table:covered-table-cell table:number-columns-repeated="3"/>
          <table:table-cell table:style-name="ce0" office:value-type="string" calcext:value-type="string">
            <text:p>27.4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117.52">
            <text:p>1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0516639000124550010000274181095610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7">
            <text:p>306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98">
            <text:p>0,002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0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08.72">
            <text:p>3108,72</text:p>
          </table:table-cell>
          <table:table-cell table:style-name="ce12N2" office:value-type="float" office:value="217.61">
            <text:p>21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918006557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3">
            <text:p>3064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0.8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6.8">
            <text:p>287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75.58">
            <text:p>175,58</text:p>
          </table:table-cell>
          <table:table-cell table:style-name="ce12N2" office:value-type="float" office:value="2701.22">
            <text:p>2701,22</text:p>
          </table:table-cell>
          <table:table-cell table:style-name="ce12N2" office:value-type="float" office:value="189.09">
            <text:p>18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08771523531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5">
            <text:p>306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7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766">
            <text:p>0,012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1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16.85">
            <text:p>3116,85</text:p>
          </table:table-cell>
          <table:table-cell table:style-name="ce12N2" office:value-type="float" office:value="218.18">
            <text:p>21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7931688529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6">
            <text:p>3067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4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59.27">
            <text:p>5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4231892898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3">
            <text:p>306823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5.71">
            <text:p>577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10.71">
            <text:p>5510,71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7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75.71">
            <text:p>5775,71</text:p>
          </table:table-cell>
          <table:table-cell table:style-name="ce12N2" office:value-type="float" office:value="404.3">
            <text:p>40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27254297000178550010000105291836436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5">
            <text:p>30684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5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65.49">
            <text:p>6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612483879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1">
            <text:p>30687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78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138.46">
            <text:p>13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51883526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2">
            <text:p>3068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38">
            <text:p>0,003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39.83">
            <text:p>3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71591022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3">
            <text:p>30687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6">
            <text:p>0,007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5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206.83">
            <text:p>20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81605277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4">
            <text:p>306874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638">
            <text:p>0,012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159">
            <text:p>15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011440833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5">
            <text:p>30687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294">
            <text:p>0,022</text:p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36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380.54">
            <text:p>38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001101985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6">
            <text:p>30687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068">
            <text:p>0,030</text:p>
          </table:table-cell>
          <table:table-cell table:style-name="ce12N2" office:value-type="float" office:value="34">
            <text:p>3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431">
            <text:p>43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91337116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80">
            <text:p>306880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56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.5">
            <text:p>3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.99">
            <text:p>3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35.99">
            <text:p>35,99</text:p>
          </table:table-cell>
          <table:table-cell table:style-name="ce12N2" office:value-type="float" office:value="2.52">
            <text:p>2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077181000133550030002245691053712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69">
            <text:p>306969</text:p>
          </table:table-cell>
          <table:table-cell table:style-name="ce0" table:number-columns-spanned="4" table:number-rows-spanned="1" office:value-type="string" calcext:value-type="string">
            <text:p>26.619 - DICAN COMERCIO EXTERIOR LTDA</text:p>
          </table:table-cell>
          <table:covered-table-cell table:number-columns-repeated="3"/>
          <table:table-cell table:style-name="ce0" office:value-type="string" calcext:value-type="string">
            <text:p>120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5.8">
            <text:p>362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315.52">
            <text:p>331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2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310.28">
            <text:p>310,28</text:p>
          </table:table-cell>
          <table:table-cell table:style-name="ce12N2" office:value-type="float" office:value="3315.52">
            <text:p>3315,52</text:p>
          </table:table-cell>
          <table:table-cell table:style-name="ce12N2" office:value-type="float" office:value="132.63">
            <text:p>13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761373000107550010001200771315409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5">
            <text:p>30697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68">
            <text:p>0,002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69">
            <text:p>6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4147471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6">
            <text:p>30697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210412399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7">
            <text:p>306977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11298829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0">
            <text:p>30704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01026177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0">
            <text:p>307120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4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8.23">
            <text:p>118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8.23">
            <text:p>1088,23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9">
            <text:p>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8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8.23">
            <text:p>1188,23</text:p>
          </table:table-cell>
          <table:table-cell table:style-name="ce12N2" office:value-type="float" office:value="83.18">
            <text:p>8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8028676000103550010000564311004435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2">
            <text:p>3071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315176612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05">
            <text:p>307205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2.7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.67">
            <text:p>48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.36">
            <text:p>48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85">
            <text:p>0,012</text:p>
          </table:table-cell>
          <table:table-cell table:style-name="ce12N2" office:value-type="float" office:value="34.5">
            <text:p>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0.31">
            <text:p>0,31</text:p>
          </table:table-cell>
          <table:table-cell table:style-name="ce12N2" office:value-type="float" office:value="48.36">
            <text:p>48,36</text:p>
          </table:table-cell>
          <table:table-cell table:style-name="ce12N2" office:value-type="float" office:value="3.39">
            <text:p>3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978371810053785500100016273114542744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9">
            <text:p>3072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51181500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3">
            <text:p>3072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81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44">
            <text:p>0,008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145.45">
            <text:p>14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81813231196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5">
            <text:p>307275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2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.7">
            <text:p>49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7.7">
            <text:p>49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7.7">
            <text:p>497,70</text:p>
          </table:table-cell>
          <table:table-cell table:style-name="ce12N2" office:value-type="float" office:value="19.91">
            <text:p>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299713719185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28">
            <text:p>2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65">
            <text:p>36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13.7">
            <text:p>513,70</text:p>
          </table:table-cell>
          <table:table-cell table:style-name="ce26N2" office:value-type="float" office:value="53720.21">
            <text:p>53720,21</text:p>
          </table:table-cell>
          <table:table-cell table:style-name="ce26N2" office:value-type="float" office:value="3507.64">
            <text:p>3507,6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9611.8">
            <text:p>59611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188115">
            <text:p>0,188</text:p>
          </table:table-cell>
          <table:table-cell table:style-name="ce26N2" office:value-type="float" office:value="58733.1">
            <text:p>58733,10</text:p>
          </table:table-cell>
          <table:table-cell table:style-name="ce26N2" office:value-type="float" office:value="59611.8">
            <text:p>59611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96.8">
            <text:p>196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1.41">
            <text:p>31,4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86" meta:object-count="0"/>
    <meta:generator>LibreOffice/4.3.0.4$Windows_x86 LibreOffice_project/62ad5818884a2fc2e5780dd45466868d41009ec0</meta:generator>
  </office:meta>
</office:document-meta>
</file>