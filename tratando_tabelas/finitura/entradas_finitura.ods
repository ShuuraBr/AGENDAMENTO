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8/05/2026 07:42:1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0">
            <text:p>30759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">
            <text:p>3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169.29">
            <text:p>16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81679433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7">
            <text:p>307667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36.14">
            <text:p>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39477000186550010000005571000000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6">
            <text:p>307806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0.46">
            <text:p>860,46</text:p>
          </table:table-cell>
          <table:table-cell table:style-name="ce12N2" office:value-type="float" office:value="119">
            <text:p>11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700221000253550010000110361473795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3">
            <text:p>307893</text:p>
          </table:table-cell>
          <table:table-cell table:style-name="ce0" table:number-columns-spanned="4" table:number-rows-spanned="1" office:value-type="string" calcext:value-type="string">
            <text:p>2.840 - PBG S/A</text:p>
          </table:table-cell>
          <table:covered-table-cell table:number-columns-repeated="3"/>
          <table:table-cell table:style-name="ce0" office:value-type="string" calcext:value-type="string">
            <text:p>2.923.8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.9">
            <text:p>5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9">
            <text:p>0,001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39.57">
            <text:p>3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3475913000272550010029238891557611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5">
            <text:p>3079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9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397.47">
            <text:p>39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951838469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8">
            <text:p>308008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41728954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9">
            <text:p>308009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4">
            <text:p>41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51754454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0">
            <text:p>30801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5">
            <text:p>0,001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6">
            <text:p>41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39.86">
            <text:p>3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61844998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1">
            <text:p>30801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31.47">
            <text:p>3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461760740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2">
            <text:p>30801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88.89">
            <text:p>8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31439851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3">
            <text:p>30801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84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16.03">
            <text:p>1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41237469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6">
            <text:p>30801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14">
            <text:p>0,0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119.61">
            <text:p>1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51565619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3">
            <text:p>30803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.06">
            <text:p>1060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84.56">
            <text:p>9584,5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497">
            <text:p>0,045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04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9.66">
            <text:p>69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934.5">
            <text:p>934,50</text:p>
          </table:table-cell>
          <table:table-cell table:style-name="ce12N2" office:value-type="float" office:value="9669.56">
            <text:p>9669,56</text:p>
          </table:table-cell>
          <table:table-cell table:style-name="ce12N2" office:value-type="float" office:value="386.79">
            <text:p>38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04217356066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8">
            <text:p>30805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2.8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6">
            <text:p>0,816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239.04">
            <text:p>23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136190000131550010000628911620246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1">
            <text:p>2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04">
            <text:p>20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44.48">
            <text:p>944,48</text:p>
          </table:table-cell>
          <table:table-cell table:style-name="ce26N2" office:value-type="float" office:value="56583.87">
            <text:p>56583,87</text:p>
          </table:table-cell>
          <table:table-cell table:style-name="ce26N2" office:value-type="float" office:value="3124.77">
            <text:p>3124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7522.04">
            <text:p>57522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.020485">
            <text:p>4,020</text:p>
          </table:table-cell>
          <table:table-cell table:style-name="ce26N2" office:value-type="float" office:value="56373.56">
            <text:p>56373,56</text:p>
          </table:table-cell>
          <table:table-cell table:style-name="ce26N2" office:value-type="float" office:value="57522.04">
            <text:p>57522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808.44">
            <text:p>5808,44</text:p>
          </table:table-cell>
          <table:table-cell table:style-name="ce26N2" office:value-type="float" office:value="5.81">
            <text:p>5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2.28">
            <text:p>52,2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1.52">
            <text:p>171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6.58">
            <text:p>36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48" meta:object-count="0"/>
    <meta:generator>LibreOffice/4.3.0.4$Windows_x86 LibreOffice_project/62ad5818884a2fc2e5780dd45466868d41009ec0</meta:generator>
  </office:meta>
</office:document-meta>
</file>