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190">
            <text:p>3091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87.37">
            <text:p>641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18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165.75">
            <text:p>51165,75</text:p>
          </table:table-cell>
          <table:table-cell table:style-name="ce12N2" office:value-type="float" office:value="51.17">
            <text:p>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49">
            <text:p>460,49</text:p>
          </table:table-cell>
          <table:table-cell table:style-name="ce12N2" office:value-type="float" office:value="84.9">
            <text:p>84,9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57.16">
            <text:p>5457,16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2349.21">
            <text:p>234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21910680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6">
            <text:p>309276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9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.5">
            <text:p>1367,50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1">
            <text:p>12,3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39.23">
            <text:p>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39477000186550010000005851000000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5">
            <text:p>30938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97.51">
            <text:p>6597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97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7.13">
            <text:p>5237,13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3">
            <text:p>47,1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86.11">
            <text:p>586,11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240.46">
            <text:p>24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901806461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8">
            <text:p>309458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1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97">
            <text:p>96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6">
            <text:p>87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875.6">
            <text:p>875,60</text:p>
          </table:table-cell>
          <table:table-cell table:style-name="ce12N2" office:value-type="float" office:value="61.29">
            <text:p>6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44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7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10713221000160550020000101561000137024</text:p>
          </table:table-cell>
          <table:table-cell table:style-name="ce0" office:value-type="string" calcext:value-type="string">
            <text:p>352606113895650002005700500040144910008782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282.49">
            <text:p>6282,49</text:p>
          </table:table-cell>
          <table:table-cell table:style-name="ce26N2" office:value-type="float" office:value="81993.34">
            <text:p>81993,34</text:p>
          </table:table-cell>
          <table:table-cell table:style-name="ce26N2" office:value-type="float" office:value="3745.57">
            <text:p>3745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88275.83">
            <text:p>88275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539498">
            <text:p>0,539</text:p>
          </table:table-cell>
          <table:table-cell table:style-name="ce26N2" office:value-type="float" office:value="81993.34">
            <text:p>81993,34</text:p>
          </table:table-cell>
          <table:table-cell table:style-name="ce26N2" office:value-type="float" office:value="88275.83">
            <text:p>88275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0573.12">
            <text:p>70573,12</text:p>
          </table:table-cell>
          <table:table-cell table:style-name="ce26N2" office:value-type="float" office:value="70.59">
            <text:p>70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35.14">
            <text:p>635,1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1.56">
            <text:p>61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3.05">
            <text:p>73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