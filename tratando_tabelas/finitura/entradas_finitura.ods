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8/05/2026 07:30:5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454">
            <text:p>306454</text:p>
          </table:table-cell>
          <table:table-cell table:style-name="ce0" table:number-columns-spanned="4" table:number-rows-spanned="1" office:value-type="string" calcext:value-type="string">
            <text:p>13.419 - METALDOMADO METALURGICA LTDA</text:p>
          </table:table-cell>
          <table:covered-table-cell table:number-columns-repeated="3"/>
          <table:table-cell table:style-name="ce0" office:value-type="string" calcext:value-type="string">
            <text:p>27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67.76">
            <text:p>3167,76</text:p>
          </table:table-cell>
          <table:table-cell table:style-name="ce12N2" office:value-type="float" office:value="117.52">
            <text:p>11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51663900012455001000027418109561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5">
            <text:p>306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2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384.2">
            <text:p>53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054">
            <text:p>0,023</text:p>
          </table:table-cell>
          <table:table-cell table:style-name="ce12N2" office:value-type="float" office:value="28.62">
            <text:p>28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2380172213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3">
            <text:p>306823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0.71">
            <text:p>5510,71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7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75.71">
            <text:p>5775,71</text:p>
          </table:table-cell>
          <table:table-cell table:style-name="ce12N2" office:value-type="float" office:value="404.3">
            <text:p>40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27254297000178550010000105291836436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5">
            <text:p>30684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.55">
            <text:p>935,55</text:p>
          </table:table-cell>
          <table:table-cell table:style-name="ce12N2" office:value-type="float" office:value="65.49">
            <text:p>65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612483879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1">
            <text:p>30687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8.02">
            <text:p>1978,02</text:p>
          </table:table-cell>
          <table:table-cell table:style-name="ce12N2" office:value-type="float" office:value="138.46">
            <text:p>1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5188352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2">
            <text:p>3068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38">
            <text:p>0,003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2">
            <text:p>569,02</text:p>
          </table:table-cell>
          <table:table-cell table:style-name="ce12N2" office:value-type="float" office:value="39.83">
            <text:p>3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7159102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3">
            <text:p>30687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6">
            <text:p>0,007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5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4.76">
            <text:p>2954,76</text:p>
          </table:table-cell>
          <table:table-cell table:style-name="ce12N2" office:value-type="float" office:value="206.83">
            <text:p>20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81605277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4">
            <text:p>306874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638">
            <text:p>0,012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1.36">
            <text:p>2271,36</text:p>
          </table:table-cell>
          <table:table-cell table:style-name="ce12N2" office:value-type="float" office:value="159">
            <text:p>15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11440833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5">
            <text:p>3068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294">
            <text:p>0,022</text:p>
          </table:table-cell>
          <table:table-cell table:style-name="ce12N2" office:value-type="float" office:value="26">
            <text:p>2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36.26">
            <text:p>5436,26</text:p>
          </table:table-cell>
          <table:table-cell table:style-name="ce12N2" office:value-type="float" office:value="380.54">
            <text:p>3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0011019855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76">
            <text:p>3068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8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068">
            <text:p>0,030</text:p>
          </table:table-cell>
          <table:table-cell table:style-name="ce12N2" office:value-type="float" office:value="34">
            <text:p>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57.12">
            <text:p>6157,12</text:p>
          </table:table-cell>
          <table:table-cell table:style-name="ce12N2" office:value-type="float" office:value="431">
            <text:p>43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8991337116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80">
            <text:p>3068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5">
            <text:p>3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3.51">
            <text:p>3,51</text:p>
          </table:table-cell>
          <table:table-cell table:style-name="ce12N2" office:value-type="float" office:value="35.99">
            <text:p>35,99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0771810001335500300022456910537126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9">
            <text:p>306969</text:p>
          </table:table-cell>
          <table:table-cell table:style-name="ce0" table:number-columns-spanned="4" table:number-rows-spanned="1" office:value-type="string" calcext:value-type="string">
            <text:p>26.619 - DICAN COMERCIO EXTERIOR LTDA</text:p>
          </table:table-cell>
          <table:covered-table-cell table:number-columns-repeated="3"/>
          <table:table-cell table:style-name="ce0" office:value-type="string" calcext:value-type="string">
            <text:p>120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5.8">
            <text:p>36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10.28">
            <text:p>310,28</text:p>
          </table:table-cell>
          <table:table-cell table:style-name="ce12N2" office:value-type="float" office:value="3315.52">
            <text:p>3315,52</text:p>
          </table:table-cell>
          <table:table-cell table:style-name="ce12N2" office:value-type="float" office:value="132.63">
            <text:p>13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761373000107550010001200771315409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5">
            <text:p>306975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68">
            <text:p>0,002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.72">
            <text:p>985,72</text:p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4147471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6">
            <text:p>306976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210412399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7">
            <text:p>306977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11298829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0">
            <text:p>30704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99">
            <text:p>41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8.58">
            <text:p>1478,58</text:p>
          </table:table-cell>
          <table:table-cell table:style-name="ce12N2" office:value-type="float" office:value="103.5">
            <text:p>10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491010261775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2">
            <text:p>307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31517661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05">
            <text:p>307205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2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.67">
            <text:p>4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85">
            <text:p>0,012</text:p>
          </table:table-cell>
          <table:table-cell table:style-name="ce12N2" office:value-type="float" office:value="34.5">
            <text:p>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3.39">
            <text:p>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97837181005378550010001627311454274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9">
            <text:p>3072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5118150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3">
            <text:p>3072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8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7.92">
            <text:p>2077,92</text:p>
          </table:table-cell>
          <table:table-cell table:style-name="ce12N2" office:value-type="float" office:value="145.45">
            <text:p>14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8181323119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5">
            <text:p>30727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7.7">
            <text:p>497,70</text:p>
          </table:table-cell>
          <table:table-cell table:style-name="ce12N2" office:value-type="float" office:value="19.91">
            <text:p>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9971371918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4">
            <text:p>3072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0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2.37">
            <text:p>4402,37</text:p>
          </table:table-cell>
          <table:table-cell table:style-name="ce12N2" office:value-type="float" office:value="308.17">
            <text:p>3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5221064002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2">
            <text:p>307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8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4.11">
            <text:p>1494,11</text:p>
          </table:table-cell>
          <table:table-cell table:style-name="ce12N2" office:value-type="float" office:value="104.59">
            <text:p>10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834151142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8">
            <text:p>30734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0.01">
            <text:p>1360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954">
            <text:p>0,014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0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83.01">
            <text:p>83,01</text:p>
          </table:table-cell>
          <table:table-cell table:style-name="ce12N2" office:value-type="float" office:value="1277">
            <text:p>1277,00</text:p>
          </table:table-cell>
          <table:table-cell table:style-name="ce12N2" office:value-type="float" office:value="89.39">
            <text:p>8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3161190056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5">
            <text:p>2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">
            <text:p>2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03.42">
            <text:p>403,42</text:p>
          </table:table-cell>
          <table:table-cell table:style-name="ce26N2" office:value-type="float" office:value="49659.55">
            <text:p>49659,55</text:p>
          </table:table-cell>
          <table:table-cell table:style-name="ce26N2" office:value-type="float" office:value="3231.57">
            <text:p>3231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440.86">
            <text:p>55440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160068">
            <text:p>0,160</text:p>
          </table:table-cell>
          <table:table-cell table:style-name="ce26N2" office:value-type="float" office:value="54772.44">
            <text:p>54772,44</text:p>
          </table:table-cell>
          <table:table-cell table:style-name="ce26N2" office:value-type="float" office:value="55440.86">
            <text:p>55440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3.12">
            <text:p>193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81">
            <text:p>31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0" meta:object-count="0"/>
    <meta:generator>LibreOffice/4.3.0.4$Windows_x86 LibreOffice_project/62ad5818884a2fc2e5780dd45466868d41009ec0</meta:generator>
  </office:meta>
</office:document-meta>
</file>