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5/06/2026 07:40:1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242">
            <text:p>309242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7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1.85">
            <text:p>173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92">
            <text:p>0,5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3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9.94">
            <text:p>1409,94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8">
            <text:p>12,6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3.85">
            <text:p>153,85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110.46">
            <text:p>11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2670837000180550010000237991543419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6">
            <text:p>30934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98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46.48">
            <text:p>2446,48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2">
            <text:p>22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202.91">
            <text:p>20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221019457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8">
            <text:p>309398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61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08">
            <text:p>0,005</text:p>
          </table:table-cell>
          <table:table-cell table:style-name="ce12N2" office:value-type="float" office:value="53.13">
            <text:p>5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7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9.18">
            <text:p>3509,18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8">
            <text:p>31,58</text:p>
          </table:table-cell>
          <table:table-cell table:style-name="ce12N2" office:value-type="float" office:value="55.98">
            <text:p>55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291.05">
            <text:p>2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6117105271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8">
            <text:p>309598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3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43.5">
            <text:p>4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9.34">
            <text:p>5949,34</text:p>
          </table:table-cell>
          <table:table-cell table:style-name="ce12N2" office:value-type="float" office:value="5.95">
            <text:p>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4">
            <text:p>53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257.28">
            <text:p>25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136190000131550010000639201764544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0">
            <text:p>3096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19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4.04">
            <text:p>1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4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00.06">
            <text:p>7800,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2">
            <text:p>70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646.94">
            <text:p>64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1961751051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9">
            <text:p>3096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4.62">
            <text:p>714,6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59.27">
            <text:p>5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51288420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3">
            <text:p>3096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6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6">
            <text:p>0,006</text:p>
          </table:table-cell>
          <table:table-cell table:style-name="ce12N2" office:value-type="float" office:value="1.44">
            <text:p>1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7.11">
            <text:p>2197,11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7">
            <text:p>19,7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182.23">
            <text:p>18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6861406105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4">
            <text:p>3096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7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35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13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8.07">
            <text:p>1868,07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154.94">
            <text:p>15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7761419936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3">
            <text:p>309723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10.37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3.37">
            <text:p>126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51.14">
            <text:p>1151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3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1.54">
            <text:p>971,54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5">
            <text:p>8,7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2.23">
            <text:p>112,23</text:p>
          </table:table-cell>
          <table:table-cell table:style-name="ce12N2" office:value-type="float" office:value="1151.14">
            <text:p>1151,14</text:p>
          </table:table-cell>
          <table:table-cell table:style-name="ce12N2" office:value-type="float" office:value="80.58">
            <text:p>8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7132210001605500200001037710001409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4">
            <text:p>3097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4.74">
            <text:p>276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38.8">
            <text:p>263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898">
            <text:p>0,036</text:p>
          </table:table-cell>
          <table:table-cell table:style-name="ce12N2" office:value-type="float" office:value="4.91">
            <text:p>4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64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7.08">
            <text:p>2227,08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04">
            <text:p>20,0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25.94">
            <text:p>125,94</text:p>
          </table:table-cell>
          <table:table-cell table:style-name="ce12N2" office:value-type="float" office:value="2638.8">
            <text:p>2638,80</text:p>
          </table:table-cell>
          <table:table-cell table:style-name="ce12N2" office:value-type="float" office:value="184.72">
            <text:p>18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741213710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1">
            <text:p>1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2.02">
            <text:p>392,02</text:p>
          </table:table-cell>
          <table:table-cell table:style-name="ce26N2" office:value-type="float" office:value="37281.83">
            <text:p>37281,83</text:p>
          </table:table-cell>
          <table:table-cell table:style-name="ce26N2" office:value-type="float" office:value="2416.76">
            <text:p>2416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7673.85">
            <text:p>37673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352627">
            <text:p>1,353</text:p>
          </table:table-cell>
          <table:table-cell table:style-name="ce26N2" office:value-type="float" office:value="37281.83">
            <text:p>37281,83</text:p>
          </table:table-cell>
          <table:table-cell table:style-name="ce26N2" office:value-type="float" office:value="37673.85">
            <text:p>37673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2063.96">
            <text:p>32063,96</text:p>
          </table:table-cell>
          <table:table-cell table:style-name="ce26N2" office:value-type="float" office:value="32.08">
            <text:p>32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88.55">
            <text:p>288,5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20.85">
            <text:p>120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1.41">
            <text:p>31,4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8" meta:object-count="0"/>
    <meta:generator>LibreOffice/4.3.0.4$Windows_x86 LibreOffice_project/62ad5818884a2fc2e5780dd45466868d41009ec0</meta:generator>
  </office:meta>
</office:document-meta>
</file>