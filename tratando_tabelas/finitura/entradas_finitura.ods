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5/05/2026 07:59:5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9">
            <text:p>306969</text:p>
          </table:table-cell>
          <table:table-cell table:style-name="ce0" table:number-columns-spanned="4" table:number-rows-spanned="1" office:value-type="string" calcext:value-type="string">
            <text:p>26.619 - DICAN COMERCIO EXTERIOR LTDA</text:p>
          </table:table-cell>
          <table:covered-table-cell table:number-columns-repeated="3"/>
          <table:table-cell table:style-name="ce0" office:value-type="string" calcext:value-type="string">
            <text:p>1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5.8">
            <text:p>36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10.28">
            <text:p>310,28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132.63">
            <text:p>13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761373000107550010001200771315409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0">
            <text:p>30704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0102617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0">
            <text:p>30712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8.23">
            <text:p>118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8.23">
            <text:p>1088,23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9">
            <text:p>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8.23">
            <text:p>1188,23</text:p>
          </table:table-cell>
          <table:table-cell table:style-name="ce12N2" office:value-type="float" office:value="83.18">
            <text:p>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8028676000103550010000564311004435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5">
            <text:p>307205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.67">
            <text:p>4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5">
            <text:p>0,012</text:p>
          </table:table-cell>
          <table:table-cell table:style-name="ce12N2" office:value-type="float" office:value="34.5">
            <text:p>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7311454274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5">
            <text:p>30727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19.91">
            <text:p>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9971371918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5">
            <text:p>3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6.71">
            <text:p>596,71</text:p>
          </table:table-cell>
          <table:table-cell table:style-name="ce26N2" office:value-type="float" office:value="60893.69">
            <text:p>60893,69</text:p>
          </table:table-cell>
          <table:table-cell table:style-name="ce26N2" office:value-type="float" office:value="4009.79">
            <text:p>4009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868.29">
            <text:p>66868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204542">
            <text:p>0,205</text:p>
          </table:table-cell>
          <table:table-cell table:style-name="ce26N2" office:value-type="float" office:value="65906.58">
            <text:p>65906,58</text:p>
          </table:table-cell>
          <table:table-cell table:style-name="ce26N2" office:value-type="float" office:value="66868.29">
            <text:p>66868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7.64">
            <text:p>207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04">
            <text:p>31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2" meta:object-count="0"/>
    <meta:generator>LibreOffice/4.3.0.4$Windows_x86 LibreOffice_project/62ad5818884a2fc2e5780dd45466868d41009ec0</meta:generator>
  </office:meta>
</office:document-meta>
</file>