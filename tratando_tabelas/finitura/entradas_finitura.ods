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pt"/>
    </style:style>
    <style:style style:name="co2" style:family="table-column">
      <style:table-column-properties fo:break_before="auto" style:column-width="120pt"/>
    </style:style>
    <style:style style:name="co3" style:family="table-column">
      <style:table-column-properties fo:break_before="auto" style:column-width="85pt"/>
    </style:style>
    <style:style style:name="co4" style:family="table-column">
      <style:table-column-properties fo:break_before="auto" style:column-width="150pt"/>
    </style:style>
    <style:style style:name="co5" style:family="table-column">
      <style:table-column-properties fo:break_before="auto" style:column-width="160pt"/>
    </style:style>
    <style:style style:name="co6" style:family="table-column">
      <style:table-column-properties fo:break_before="auto" style:column-width="95pt"/>
    </style:style>
    <style:style style:name="co7" style:family="table-column">
      <style:table-column-properties fo:break_before="auto" style:column-width="200pt"/>
    </style:style>
    <style:style style:name="co8" style:family="table-column">
      <style:table-column-properties fo:break_before="auto" style:column-width="28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1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row table:style-name="ro1">
          <table:table-cell table:style-name="ce2" table:number-columns-spanned="61" table:number-rows-spanned="1" office:value-type="string" calcext:value-type="string">
            <text:p>Santri ADM 1.1.5.7 R1</text:p>
          </table:table-cell>
          <table:covered-table-cell table:number-columns-repeated="60"/>
          <table:table-cell table:style-name="ce3" table:number-columns-spanned="4" table:number-rows-spanned="1" office:value-type="string" calcext:value-type="string">
            <text:p>Emitido em: 19/05/2026 05:30:31</text:p>
          </table:table-cell>
          <table:covered-table-cell table:number-columns-repeated="3"/>
        </table:table-row>
        <table:table-row table:style-name="ro2">
          <table:table-cell table:style-name="ce1" table:number-columns-spanned="65" table:number-rows-spanned="1" office:value-type="string" calcext:value-type="string">
            <text:p>Relação de entradas - Sintético</text:p>
          </table:table-cell>
          <table:covered-table-cell table:number-columns-repeated="64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6454">
            <text:p>306454</text:p>
          </table:table-cell>
          <table:table-cell table:style-name="ce0" table:number-columns-spanned="4" table:number-rows-spanned="1" office:value-type="string" calcext:value-type="string">
            <text:p>13.419 - METALDOMADO METALURGICA LTDA</text:p>
          </table:table-cell>
          <table:covered-table-cell table:number-columns-repeated="3"/>
          <table:table-cell table:style-name="ce0" office:value-type="string" calcext:value-type="string">
            <text:p>27.4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67.76">
            <text:p>3167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167.76">
            <text:p>3167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67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">
            <text:p>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67.76">
            <text:p>3167,76</text:p>
          </table:table-cell>
          <table:table-cell table:style-name="ce12N2" office:value-type="float" office:value="117.52">
            <text:p>117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05166390001245500100002741810956103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24">
            <text:p>306724</text:p>
          </table:table-cell>
          <table:table-cell table:style-name="ce0" table:number-columns-spanned="4" table:number-rows-spanned="1" office:value-type="string" calcext:value-type="string">
            <text:p>30.850 - DEXCO S.A</text:p>
          </table:table-cell>
          <table:covered-table-cell table:number-columns-repeated="3"/>
          <table:table-cell table:style-name="ce0" office:value-type="string" calcext:value-type="string">
            <text:p>161.1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76.79">
            <text:p>976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970.48">
            <text:p>970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76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6.31">
            <text:p>6,31</text:p>
          </table:table-cell>
          <table:table-cell table:style-name="ce12N2" office:value-type="float" office:value="976.79">
            <text:p>976,79</text:p>
          </table:table-cell>
          <table:table-cell table:style-name="ce12N2" office:value-type="float" office:value="68.38">
            <text:p>68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978371810053785500100016116415141440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23">
            <text:p>306823</text:p>
          </table:table-cell>
          <table:table-cell table:style-name="ce0" table:number-columns-spanned="4" table:number-rows-spanned="1" office:value-type="string" calcext:value-type="string">
            <text:p>25.941 - AQUECE METAIS FABRICACAO E MANUTENCAO LTDA</text:p>
          </table:table-cell>
          <table:covered-table-cell table:number-columns-repeated="3"/>
          <table:table-cell table:style-name="ce0" office:value-type="string" calcext:value-type="string">
            <text:p>10.52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75.71">
            <text:p>5775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510.71">
            <text:p>5510,71</text:p>
          </table:table-cell>
          <table:table-cell table:style-name="ce12N2" office:value-type="float" office:value="265">
            <text:p>265,0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3.5">
            <text:p>3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775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75.71">
            <text:p>5775,71</text:p>
          </table:table-cell>
          <table:table-cell table:style-name="ce12N2" office:value-type="float" office:value="404.3">
            <text:p>404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272542970001785500100001052918364362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45">
            <text:p>306845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4.8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35.55">
            <text:p>935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35.55">
            <text:p>935,5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35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35.55">
            <text:p>935,55</text:p>
          </table:table-cell>
          <table:table-cell table:style-name="ce12N2" office:value-type="float" office:value="65.49">
            <text:p>65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489612483879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69">
            <text:p>306869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4.89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25.01">
            <text:p>1725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25.01">
            <text:p>1725,0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288">
            <text:p>0,008</text:p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25,0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25.01">
            <text:p>1725,01</text:p>
          </table:table-cell>
          <table:table-cell table:style-name="ce12N2" office:value-type="float" office:value="120.75">
            <text:p>120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4894180484567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71">
            <text:p>306871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4.8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78.02">
            <text:p>1978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78.02">
            <text:p>1978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78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78.02">
            <text:p>1978,02</text:p>
          </table:table-cell>
          <table:table-cell table:style-name="ce12N2" office:value-type="float" office:value="138.46">
            <text:p>138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489518835269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72">
            <text:p>306872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4.89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9.02">
            <text:p>569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69.02">
            <text:p>569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038">
            <text:p>0,003</text:p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69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9.02">
            <text:p>569,02</text:p>
          </table:table-cell>
          <table:table-cell table:style-name="ce12N2" office:value-type="float" office:value="39.83">
            <text:p>39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489715910229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73">
            <text:p>306873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4.8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54.76">
            <text:p>295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954.76">
            <text:p>2954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26">
            <text:p>0,007</text:p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54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54.76">
            <text:p>2954,76</text:p>
          </table:table-cell>
          <table:table-cell table:style-name="ce12N2" office:value-type="float" office:value="206.83">
            <text:p>206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489816052776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74">
            <text:p>306874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4.9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71.36">
            <text:p>2271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271.36">
            <text:p>2271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638">
            <text:p>0,012</text:p>
          </table:table-cell>
          <table:table-cell table:style-name="ce12N2" office:value-type="float" office:value="17">
            <text:p>17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71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1.99">
            <text:p>41,9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71.36">
            <text:p>2271,36</text:p>
          </table:table-cell>
          <table:table-cell table:style-name="ce12N2" office:value-type="float" office:value="159">
            <text:p>159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490114408330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75">
            <text:p>306875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4.90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36.26">
            <text:p>5436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5436.26">
            <text:p>5436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2294">
            <text:p>0,022</text:p>
          </table:table-cell>
          <table:table-cell table:style-name="ce12N2" office:value-type="float" office:value="26">
            <text:p>2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436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36.26">
            <text:p>5436,26</text:p>
          </table:table-cell>
          <table:table-cell table:style-name="ce12N2" office:value-type="float" office:value="380.54">
            <text:p>380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490011019855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76">
            <text:p>306876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4.8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157.12">
            <text:p>6157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6157.12">
            <text:p>6157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0068">
            <text:p>0,030</text:p>
          </table:table-cell>
          <table:table-cell table:style-name="ce12N2" office:value-type="float" office:value="34">
            <text:p>3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157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157.12">
            <text:p>6157,12</text:p>
          </table:table-cell>
          <table:table-cell table:style-name="ce12N2" office:value-type="float" office:value="431">
            <text:p>431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4899133711642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80">
            <text:p>306880</text:p>
          </table:table-cell>
          <table:table-cell table:style-name="ce0" table:number-columns-spanned="4" table:number-rows-spanned="1" office:value-type="string" calcext:value-type="string">
            <text:p>2.923 - NEW LINE ILUMINACAO LTDA</text:p>
          </table:table-cell>
          <table:covered-table-cell table:number-columns-repeated="3"/>
          <table:table-cell table:style-name="ce0" office:value-type="string" calcext:value-type="string">
            <text:p>224.569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.5">
            <text:p>39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.99">
            <text:p>35,9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9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5/2026</text:p>
          </table:table-cell>
          <table:table-cell table:style-name="ce12N2" office:value-type="float" office:value="3.51">
            <text:p>3,51</text:p>
          </table:table-cell>
          <table:table-cell table:style-name="ce12N2" office:value-type="float" office:value="35.99">
            <text:p>35,99</text:p>
          </table:table-cell>
          <table:table-cell table:style-name="ce12N2" office:value-type="float" office:value="2.52">
            <text:p>2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120771810001335500300022456910537126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975">
            <text:p>306975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4.9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85.72">
            <text:p>985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85.72">
            <text:p>985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368">
            <text:p>0,002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85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1.98">
            <text:p>41,9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85.72">
            <text:p>985,72</text:p>
          </table:table-cell>
          <table:table-cell table:style-name="ce12N2" office:value-type="float" office:value="69">
            <text:p>69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491414747126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976">
            <text:p>306976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4.91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78.58">
            <text:p>1478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78.58">
            <text:p>1478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104">
            <text:p>0,007</text:p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78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1.99">
            <text:p>41,9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78.58">
            <text:p>1478,58</text:p>
          </table:table-cell>
          <table:table-cell table:style-name="ce12N2" office:value-type="float" office:value="103.5">
            <text:p>103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491210412399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977">
            <text:p>306977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4.9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78.58">
            <text:p>1478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78.58">
            <text:p>1478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104">
            <text:p>0,007</text:p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78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1.99">
            <text:p>41,9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78.58">
            <text:p>1478,58</text:p>
          </table:table-cell>
          <table:table-cell table:style-name="ce12N2" office:value-type="float" office:value="103.5">
            <text:p>103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491112988291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40">
            <text:p>307040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4.91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78.58">
            <text:p>1478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78.58">
            <text:p>1478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104">
            <text:p>0,007</text:p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78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1.99">
            <text:p>41,9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78.58">
            <text:p>1478,58</text:p>
          </table:table-cell>
          <table:table-cell table:style-name="ce12N2" office:value-type="float" office:value="103.5">
            <text:p>103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491010261775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72">
            <text:p>30717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58">
            <text:p>0,001</text:p>
          </table:table-cell>
          <table:table-cell table:style-name="ce12N2" office:value-type="float" office:value="2.43">
            <text:p>2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4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16.19">
            <text:p>16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1315176612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19">
            <text:p>30721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1.96">
            <text:p>461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61.96">
            <text:p>461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057">
            <text:p>0,002</text:p>
          </table:table-cell>
          <table:table-cell table:style-name="ce12N2" office:value-type="float" office:value="2.43">
            <text:p>2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61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61.96">
            <text:p>461,96</text:p>
          </table:table-cell>
          <table:table-cell table:style-name="ce12N2" office:value-type="float" office:value="18.48">
            <text:p>18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9511815001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43">
            <text:p>30724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8.81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77.92">
            <text:p>2077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77.92">
            <text:p>2077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844">
            <text:p>0,008</text:p>
          </table:table-cell>
          <table:table-cell table:style-name="ce12N2" office:value-type="float" office:value="0.81">
            <text:p>0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77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77.92">
            <text:p>2077,92</text:p>
          </table:table-cell>
          <table:table-cell table:style-name="ce12N2" office:value-type="float" office:value="145.45">
            <text:p>145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881813231196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94">
            <text:p>30729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8.52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02.37">
            <text:p>4402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02.37">
            <text:p>4402,3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8.3">
            <text:p>8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02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02.37">
            <text:p>4402,37</text:p>
          </table:table-cell>
          <table:table-cell table:style-name="ce12N2" office:value-type="float" office:value="308.17">
            <text:p>308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852210640022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10">
            <text:p>307310</text:p>
          </table:table-cell>
          <table:table-cell table:style-name="ce0" table:number-columns-spanned="4" table:number-rows-spanned="1" office:value-type="string" calcext:value-type="string">
            <text:p>27.705 - DOKA - INDUSTRIA E COMERCIO LTDA</text:p>
          </table:table-cell>
          <table:covered-table-cell table:number-columns-repeated="3"/>
          <table:table-cell table:style-name="ce0" office:value-type="string" calcext:value-type="string">
            <text:p>62.2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">
            <text:p>3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">
            <text:p>3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38">
            <text:p>3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">
            <text:p>30,00</text:p>
          </table:table-cell>
          <table:table-cell table:style-name="ce12N2" office:value-type="float" office:value="1.2">
            <text:p>1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11361900001315500100006225811253286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32">
            <text:p>30733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9.83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94.11">
            <text:p>1494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94.11">
            <text:p>1494,1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473">
            <text:p>0,002</text:p>
          </table:table-cell>
          <table:table-cell table:style-name="ce12N2" office:value-type="float" office:value="0.77">
            <text:p>0,7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94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94.11">
            <text:p>1494,11</text:p>
          </table:table-cell>
          <table:table-cell table:style-name="ce12N2" office:value-type="float" office:value="104.59">
            <text:p>104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983415114297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48">
            <text:p>30734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0.31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60.01">
            <text:p>1360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77">
            <text:p>127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954">
            <text:p>0,014</text:p>
          </table:table-cell>
          <table:table-cell table:style-name="ce12N2" office:value-type="float" office:value="1.78">
            <text:p>1,7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60,0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83.01">
            <text:p>83,01</text:p>
          </table:table-cell>
          <table:table-cell table:style-name="ce12N2" office:value-type="float" office:value="1277">
            <text:p>1277,00</text:p>
          </table:table-cell>
          <table:table-cell table:style-name="ce12N2" office:value-type="float" office:value="89.39">
            <text:p>89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0316119005680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32">
            <text:p>30743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2.47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6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12.04">
            <text:p>2812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812.04">
            <text:p>2812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844">
            <text:p>0,008</text:p>
          </table:table-cell>
          <table:table-cell table:style-name="ce12N2" office:value-type="float" office:value="1.78">
            <text:p>1,7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12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12.04">
            <text:p>2812,04</text:p>
          </table:table-cell>
          <table:table-cell table:style-name="ce12N2" office:value-type="float" office:value="196.84">
            <text:p>196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247912983080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2" table:number-rows-spanned="1" office:value-type="string" calcext:value-type="string">
            <text:p>Total geral</text:p>
          </table:table-cell>
          <table:covered-table-cell table:number-columns-repeated="21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</table:table-row>
        <table:table-row table:style-name="ro1">
          <table:table-cell table:style-name="ce26N2" office:value-type="float" office:value="24">
            <text:p>24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265">
            <text:p>265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92.83">
            <text:p>92,83</text:p>
          </table:table-cell>
          <table:table-cell table:style-name="ce26N2" office:value-type="float" office:value="50365.02">
            <text:p>50365,02</text:p>
          </table:table-cell>
          <table:table-cell table:style-name="ce26N2" office:value-type="float" office:value="3394.43">
            <text:p>3394,4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50451.54">
            <text:p>50451,5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0.141296">
            <text:p>0,141</text:p>
          </table:table-cell>
          <table:table-cell table:style-name="ce26N2" office:value-type="float" office:value="50093.71">
            <text:p>50093,71</text:p>
          </table:table-cell>
          <table:table-cell table:style-name="ce26N2" office:value-type="float" office:value="50451.54">
            <text:p>50451,5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176.79">
            <text:p>176,7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4.1">
            <text:p>34,1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5" table:number-rows-spanned="1" office:value-type="string" calcext:value-type="string">
            <text:p>Filtros selecionad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/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Status..............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Ag. chegada da mercadori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Empres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1 - OBJETIVA ATACADISTA DA CONSTRUCA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2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3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bservacao: FINITUR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rdenação dos itens: Ordem alfabética</text:p>
          </table:table-cell>
          <table:covered-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638" meta:object-count="0"/>
    <meta:generator>LibreOffice/4.3.0.4$Windows_x86 LibreOffice_project/62ad5818884a2fc2e5780dd45466868d41009ec0</meta:generator>
  </office:meta>
</office:document-meta>
</file>