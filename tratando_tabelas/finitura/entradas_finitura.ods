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6/2026 04:30:3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6">
            <text:p>309276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9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.5">
            <text:p>1367,50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1">
            <text:p>12,3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39.23">
            <text:p>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39477000186550010000005851000000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5">
            <text:p>30938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97.51">
            <text:p>6597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97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7.13">
            <text:p>5237,13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3">
            <text:p>47,1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86.11">
            <text:p>586,11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240.46">
            <text:p>24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901806461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8">
            <text:p>309458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1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97">
            <text:p>96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6">
            <text:p>87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875.6">
            <text:p>875,60</text:p>
          </table:table-cell>
          <table:table-cell table:style-name="ce12N2" office:value-type="float" office:value="61.29">
            <text:p>6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44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7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10713221000160550020000101561000137024</text:p>
          </table:table-cell>
          <table:table-cell table:style-name="ce0" office:value-type="string" calcext:value-type="string">
            <text:p>352606113895650002005700500040144910008782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25.33">
            <text:p>825,33</text:p>
          </table:table-cell>
          <table:table-cell table:style-name="ce26N2" office:value-type="float" office:value="29695.13">
            <text:p>29695,13</text:p>
          </table:table-cell>
          <table:table-cell table:style-name="ce26N2" office:value-type="float" office:value="1653.64">
            <text:p>1653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30520.46">
            <text:p>30520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259498">
            <text:p>1,259</text:p>
          </table:table-cell>
          <table:table-cell table:style-name="ce26N2" office:value-type="float" office:value="29695.13">
            <text:p>29695,13</text:p>
          </table:table-cell>
          <table:table-cell table:style-name="ce26N2" office:value-type="float" office:value="30520.46">
            <text:p>30520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5356.71">
            <text:p>25356,71</text:p>
          </table:table-cell>
          <table:table-cell table:style-name="ce26N2" office:value-type="float" office:value="25.37">
            <text:p>25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28.19">
            <text:p>228,1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2.56">
            <text:p>102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63">
            <text:p>38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