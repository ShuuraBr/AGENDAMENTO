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6">
            <text:p>3086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0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0.2">
            <text:p>382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20.2">
            <text:p>382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">
            <text:p>0,216</text:p>
          </table:table-cell>
          <table:table-cell table:style-name="ce12N2" office:value-type="float" office:value="304">
            <text:p>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0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24.16">
            <text:p>3224,16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02">
            <text:p>29,0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0.2">
            <text:p>3820,20</text:p>
          </table:table-cell>
          <table:table-cell table:style-name="ce12N2" office:value-type="float" office:value="267.41">
            <text:p>26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94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9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42260675821546000102550100000022101727447455</text:p>
          </table:table-cell>
          <table:table-cell table:style-name="ce0" office:value-type="string" calcext:value-type="string">
            <text:p>3526061138956500020057005000400942100087251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0">
            <text:p>3091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87.37">
            <text:p>6418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18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165.75">
            <text:p>51165,75</text:p>
          </table:table-cell>
          <table:table-cell table:style-name="ce12N2" office:value-type="float" office:value="51.17">
            <text:p>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49">
            <text:p>460,49</text:p>
          </table:table-cell>
          <table:table-cell table:style-name="ce12N2" office:value-type="float" office:value="84.9">
            <text:p>84,9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57.16">
            <text:p>5457,16</text:p>
          </table:table-cell>
          <table:table-cell table:style-name="ce12N2" office:value-type="float" office:value="58730.21">
            <text:p>58730,21</text:p>
          </table:table-cell>
          <table:table-cell table:style-name="ce12N2" office:value-type="float" office:value="2349.21">
            <text:p>234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21910680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1">
            <text:p>309191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1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3.32">
            <text:p>35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46.76">
            <text:p>3246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936">
            <text:p>0,064</text:p>
          </table:table-cell>
          <table:table-cell table:style-name="ce12N2" office:value-type="float" office:value="33.12">
            <text:p>3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46.76">
            <text:p>3246,76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22">
            <text:p>29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16.56">
            <text:p>316,56</text:p>
          </table:table-cell>
          <table:table-cell table:style-name="ce12N2" office:value-type="float" office:value="3246.76">
            <text:p>3246,76</text:p>
          </table:table-cell>
          <table:table-cell table:style-name="ce12N2" office:value-type="float" office:value="227.27">
            <text:p>22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17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5260609306858000153550010000711781865267712</text:p>
          </table:table-cell>
          <table:table-cell table:style-name="ce0" office:value-type="string" calcext:value-type="string">
            <text:p>3526061138956500020057005000401178100087527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6">
            <text:p>3092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7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4">
            <text:p>0,001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6.6">
            <text:p>2466,60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">
            <text:p>22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2.6">
            <text:p>2922,60</text:p>
          </table:table-cell>
          <table:table-cell table:style-name="ce12N2" office:value-type="float" office:value="204.58">
            <text:p>20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7421040310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2">
            <text:p>309242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1.85">
            <text:p>173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2">
            <text:p>0,5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3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.94">
            <text:p>1409,9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3.85">
            <text:p>153,85</text:p>
          </table:table-cell>
          <table:table-cell table:style-name="ce12N2" office:value-type="float" office:value="1578">
            <text:p>1578,00</text:p>
          </table:table-cell>
          <table:table-cell table:style-name="ce12N2" office:value-type="float" office:value="110.46">
            <text:p>11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2670837000180550010000237991543419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6">
            <text:p>309276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9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.5">
            <text:p>1367,50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1">
            <text:p>12,3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9.12">
            <text:p>1299,12</text:p>
          </table:table-cell>
          <table:table-cell table:style-name="ce12N2" office:value-type="float" office:value="39.23">
            <text:p>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39477000186550010000005851000000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7">
            <text:p>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27.57">
            <text:p>5927,57</text:p>
          </table:table-cell>
          <table:table-cell table:style-name="ce26N2" office:value-type="float" office:value="78264.06">
            <text:p>78264,06</text:p>
          </table:table-cell>
          <table:table-cell table:style-name="ce26N2" office:value-type="float" office:value="3464.85">
            <text:p>346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9.44">
            <text:p>179,44</text:p>
          </table:table-cell>
          <table:table-cell table:style-name="ce26N2" office:value-type="float" office:value="84191.63">
            <text:p>84191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80988">
            <text:p>0,810</text:p>
          </table:table-cell>
          <table:table-cell table:style-name="ce26N2" office:value-type="float" office:value="78264.06">
            <text:p>78264,06</text:p>
          </table:table-cell>
          <table:table-cell table:style-name="ce26N2" office:value-type="float" office:value="84191.63">
            <text:p>84191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689.15">
            <text:p>68689,15</text:p>
          </table:table-cell>
          <table:table-cell table:style-name="ce26N2" office:value-type="float" office:value="68.7">
            <text:p>68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8.2">
            <text:p>618,2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52.1">
            <text:p>352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4.18">
            <text:p>74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/4.3.0.4$Windows_x86 LibreOffice_project/62ad5818884a2fc2e5780dd45466868d41009ec0</meta:generator>
  </office:meta>
</office:document-meta>
</file>