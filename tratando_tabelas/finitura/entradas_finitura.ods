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5/07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88">
            <text:p>310788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6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0.94">
            <text:p>430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41.4">
            <text:p>3841,4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0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0.69">
            <text:p>3420,6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79">
            <text:p>30,79</text:p>
          </table:table-cell>
          <table:table-cell table:style-name="ce12N2" office:value-type="float" office:value="41.72">
            <text:p>41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74.54">
            <text:p>374,54</text:p>
          </table:table-cell>
          <table:table-cell table:style-name="ce12N2" office:value-type="float" office:value="3926.4">
            <text:p>3926,40</text:p>
          </table:table-cell>
          <table:table-cell table:style-name="ce12N2" office:value-type="float" office:value="157.05">
            <text:p>15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6351416010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7">
            <text:p>31089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0.41">
            <text:p>510,4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9">
            <text:p>4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81275537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5">
            <text:p>31093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42.75">
            <text:p>2242,75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8">
            <text:p>20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102.97">
            <text:p>10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1176575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5">
            <text:p>31095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05.79">
            <text:p>660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924.3">
            <text:p>5924,3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0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5.31">
            <text:p>5235,31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2">
            <text:p>47,12</text:p>
          </table:table-cell>
          <table:table-cell table:style-name="ce12N2" office:value-type="float" office:value="55.64">
            <text:p>55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96.49">
            <text:p>596,49</text:p>
          </table:table-cell>
          <table:table-cell table:style-name="ce12N2" office:value-type="float" office:value="6009.3">
            <text:p>6009,30</text:p>
          </table:table-cell>
          <table:table-cell table:style-name="ce12N2" office:value-type="float" office:value="240.37">
            <text:p>2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971675652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8">
            <text:p>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0">
            <text:p>17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25.77">
            <text:p>1525,77</text:p>
          </table:table-cell>
          <table:table-cell table:style-name="ce26N2" office:value-type="float" office:value="21735.83">
            <text:p>21735,83</text:p>
          </table:table-cell>
          <table:table-cell table:style-name="ce26N2" office:value-type="float" office:value="1064.87">
            <text:p>1064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261.6">
            <text:p>23261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35943">
            <text:p>0,036</text:p>
          </table:table-cell>
          <table:table-cell table:style-name="ce26N2" office:value-type="float" office:value="21565.83">
            <text:p>21565,83</text:p>
          </table:table-cell>
          <table:table-cell table:style-name="ce26N2" office:value-type="float" office:value="23261.6">
            <text:p>23261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8224.71">
            <text:p>18224,71</text:p>
          </table:table-cell>
          <table:table-cell table:style-name="ce26N2" office:value-type="float" office:value="18.23">
            <text:p>18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4.01">
            <text:p>164,0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8.43">
            <text:p>48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3.92">
            <text:p>43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0" meta:object-count="0"/>
    <meta:generator>LibreOffice/4.3.0.4$Windows_x86 LibreOffice_project/62ad5818884a2fc2e5780dd45466868d41009ec0</meta:generator>
  </office:meta>
</office:document-meta>
</file>