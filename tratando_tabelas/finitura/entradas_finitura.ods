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1/06/2026 07:30:45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6724">
            <text:p>306724</text:p>
          </table:table-cell>
          <table:table-cell table:style-name="ce0" table:number-columns-spanned="4" table:number-rows-spanned="1" office:value-type="string" calcext:value-type="string">
            <text:p>30.850 - DEXCO S.A</text:p>
          </table:table-cell>
          <table:covered-table-cell table:number-columns-repeated="3"/>
          <table:table-cell table:style-name="ce0" office:value-type="string" calcext:value-type="string">
            <text:p>16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4/2026</text:p>
          </table:table-cell>
          <table:table-cell table:style-name="ce0" office:value-type="string" calcext:value-type="string">
            <text:p>05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70.48">
            <text:p>970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5/2026</text:p>
          </table:table-cell>
          <table:table-cell table:style-name="ce12N2" office:value-type="float" office:value="6.31">
            <text:p>6,31</text:p>
          </table:table-cell>
          <table:table-cell table:style-name="ce12N2" office:value-type="float" office:value="976.79">
            <text:p>976,79</text:p>
          </table:table-cell>
          <table:table-cell table:style-name="ce12N2" office:value-type="float" office:value="68.38">
            <text:p>68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978371810053785500100016116415141440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06">
            <text:p>307806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1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60.46">
            <text:p>860,46</text:p>
          </table:table-cell>
          <table:table-cell table:style-name="ce12N2" office:value-type="float" office:value="119">
            <text:p>11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9.46">
            <text:p>979,4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0700221000253550010000110361473795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1">
            <text:p>30781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3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381">
            <text:p>0,001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3891278045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13">
            <text:p>30781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601395974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6">
            <text:p>3078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7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82.24">
            <text:p>6882,24</text:p>
          </table:table-cell>
          <table:table-cell table:style-name="ce12N2" office:value-type="float" office:value="481.76">
            <text:p>48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7171054566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58">
            <text:p>3078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8.8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22">
            <text:p>0,004</text:p>
          </table:table-cell>
          <table:table-cell table:style-name="ce12N2" office:value-type="float" office:value="0.89">
            <text:p>0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6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6.91">
            <text:p>1406,91</text:p>
          </table:table-cell>
          <table:table-cell table:style-name="ce12N2" office:value-type="float" office:value="98.48">
            <text:p>9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88971709299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61">
            <text:p>3078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9.0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5/2026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8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6.16">
            <text:p>5086,16</text:p>
          </table:table-cell>
          <table:table-cell table:style-name="ce12N2" office:value-type="float" office:value="356.03">
            <text:p>3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90451818279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893">
            <text:p>307893</text:p>
          </table:table-cell>
          <table:table-cell table:style-name="ce0" table:number-columns-spanned="4" table:number-rows-spanned="1" office:value-type="string" calcext:value-type="string">
            <text:p>2.840 - PBG S/A</text:p>
          </table:table-cell>
          <table:covered-table-cell table:number-columns-repeated="3"/>
          <table:table-cell table:style-name="ce0" office:value-type="string" calcext:value-type="string">
            <text:p>2.923.8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8.9">
            <text:p>56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99">
            <text:p>0,001</text:p>
          </table:table-cell>
          <table:table-cell table:style-name="ce12N2" office:value-type="float" office:value="68.1">
            <text:p>6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5/2026</text:p>
          </table:table-cell>
          <table:table-cell table:style-name="ce12N2" office:value-type="float" office:value="3.67">
            <text:p>3,67</text:p>
          </table:table-cell>
          <table:table-cell table:style-name="ce12N2" office:value-type="float" office:value="565.23">
            <text:p>565,23</text:p>
          </table:table-cell>
          <table:table-cell table:style-name="ce12N2" office:value-type="float" office:value="39.57">
            <text:p>3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3475913000272550010029238891557611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7985">
            <text:p>3079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47.59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4.08">
            <text:p>4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78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78.12">
            <text:p>5678,12</text:p>
          </table:table-cell>
          <table:table-cell table:style-name="ce12N2" office:value-type="float" office:value="397.47">
            <text:p>39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4759518384696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8">
            <text:p>308008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417289544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09">
            <text:p>308009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7">
            <text:p>0,001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9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4">
            <text:p>41,9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9.62">
            <text:p>379,62</text:p>
          </table:table-cell>
          <table:table-cell table:style-name="ce12N2" office:value-type="float" office:value="26.57">
            <text:p>26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51754454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0">
            <text:p>308010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005">
            <text:p>0,001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6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6">
            <text:p>41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9.43">
            <text:p>569,43</text:p>
          </table:table-cell>
          <table:table-cell table:style-name="ce12N2" office:value-type="float" office:value="39.86">
            <text:p>39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2618449981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1">
            <text:p>30801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9.55">
            <text:p>449,55</text:p>
          </table:table-cell>
          <table:table-cell table:style-name="ce12N2" office:value-type="float" office:value="31.47">
            <text:p>3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461760740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2">
            <text:p>30801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5">
            <text:p>0,003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6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1.98">
            <text:p>41,9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9.8">
            <text:p>1269,80</text:p>
          </table:table-cell>
          <table:table-cell table:style-name="ce12N2" office:value-type="float" office:value="88.89">
            <text:p>8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314398511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3">
            <text:p>308013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84">
            <text:p>0,001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9">
            <text:p>229,00</text:p>
          </table:table-cell>
          <table:table-cell table:style-name="ce12N2" office:value-type="float" office:value="16.03">
            <text:p>1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6895448000136550010000652641237469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16">
            <text:p>30801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65.93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14">
            <text:p>0,040</text:p>
          </table:table-cell>
          <table:table-cell table:style-name="ce12N2" office:value-type="float" office:value="14.35">
            <text:p>1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0.35">
            <text:p>2990,35</text:p>
          </table:table-cell>
          <table:table-cell table:style-name="ce12N2" office:value-type="float" office:value="119.61">
            <text:p>11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758019020001265500000136593515656197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33">
            <text:p>308033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4.06">
            <text:p>10604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9584.56">
            <text:p>9584,56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4497">
            <text:p>0,045</text:p>
          </table:table-cell>
          <table:table-cell table:style-name="ce12N2" office:value-type="float" office:value="0.72">
            <text:p>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604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9.66">
            <text:p>69,6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934.5">
            <text:p>934,50</text:p>
          </table:table-cell>
          <table:table-cell table:style-name="ce12N2" office:value-type="float" office:value="9669.56">
            <text:p>9669,56</text:p>
          </table:table-cell>
          <table:table-cell table:style-name="ce12N2" office:value-type="float" office:value="386.79">
            <text:p>386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06911580003705500100029404217356066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58">
            <text:p>308058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2.8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16">
            <text:p>0,816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7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76">
            <text:p>5976,00</text:p>
          </table:table-cell>
          <table:table-cell table:style-name="ce12N2" office:value-type="float" office:value="239.04">
            <text:p>239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01136190000131550010000628911620246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086">
            <text:p>308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0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.3">
            <text:p>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7,1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08.44">
            <text:p>5808,44</text:p>
          </table:table-cell>
          <table:table-cell table:style-name="ce12N2" office:value-type="float" office:value="5.81">
            <text:p>5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7.17">
            <text:p>6667,17</text:p>
          </table:table-cell>
          <table:table-cell table:style-name="ce12N2" office:value-type="float" office:value="266.69">
            <text:p>26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07812318337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35">
            <text:p>308135</text:p>
          </table:table-cell>
          <table:table-cell table:style-name="ce0" table:number-columns-spanned="4" table:number-rows-spanned="1" office:value-type="string" calcext:value-type="string">
            <text:p>21.312 - JANAINA DE LIMA S. M. L. MICHELIN</text:p>
          </table:table-cell>
          <table:covered-table-cell table:number-columns-repeated="3"/>
          <table:table-cell table:style-name="ce0" office:value-type="string" calcext:value-type="string">
            <text:p>7.3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92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0.33">
            <text:p>60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92.85">
            <text:p>5392,85</text:p>
          </table:table-cell>
          <table:table-cell table:style-name="ce12N2" office:value-type="float" office:value="190.91">
            <text:p>19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272340050001355500100000738910000073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181">
            <text:p>3081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2.82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575">
            <text:p>0,017</text:p>
          </table:table-cell>
          <table:table-cell table:style-name="ce12N2" office:value-type="float" office:value="4.35">
            <text:p>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3.81">
            <text:p>2553,81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98">
            <text:p>22,9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25.92">
            <text:p>3025,92</text:p>
          </table:table-cell>
          <table:table-cell table:style-name="ce12N2" office:value-type="float" office:value="211.81">
            <text:p>2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282813915300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49">
            <text:p>308249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7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1.71">
            <text:p>393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13.58">
            <text:p>3313,58</text:p>
          </table:table-cell>
          <table:table-cell table:style-name="ce12N2" office:value-type="float" office:value="3.31">
            <text:p>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.83">
            <text:p>29,83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349.29">
            <text:p>349,29</text:p>
          </table:table-cell>
          <table:table-cell table:style-name="ce12N2" office:value-type="float" office:value="3582.42">
            <text:p>3582,42</text:p>
          </table:table-cell>
          <table:table-cell table:style-name="ce12N2" office:value-type="float" office:value="143.3">
            <text:p>14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17716263000102550010000107891398955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286">
            <text:p>3082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5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1.69">
            <text:p>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94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89.49">
            <text:p>2189,49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71">
            <text:p>19,7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94.25">
            <text:p>2594,25</text:p>
          </table:table-cell>
          <table:table-cell table:style-name="ce12N2" office:value-type="float" office:value="181.6">
            <text:p>1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51211814026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3">
            <text:p>23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04">
            <text:p>20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93.77">
            <text:p>1293,77</text:p>
          </table:table-cell>
          <table:table-cell table:style-name="ce26N2" office:value-type="float" office:value="67564.27">
            <text:p>67564,27</text:p>
          </table:table-cell>
          <table:table-cell table:style-name="ce26N2" office:value-type="float" office:value="3646.96">
            <text:p>3646,9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8851.73">
            <text:p>68851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044479">
            <text:p>1,044</text:p>
          </table:table-cell>
          <table:table-cell table:style-name="ce26N2" office:value-type="float" office:value="67353.96">
            <text:p>67353,96</text:p>
          </table:table-cell>
          <table:table-cell table:style-name="ce26N2" office:value-type="float" office:value="68851.73">
            <text:p>68851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865.32">
            <text:p>13865,32</text:p>
          </table:table-cell>
          <table:table-cell table:style-name="ce26N2" office:value-type="float" office:value="13.86">
            <text:p>13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24.8">
            <text:p>124,8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4.26">
            <text:p>174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42">
            <text:p>39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0" meta:object-count="0"/>
    <meta:generator>LibreOffice/4.3.0.4$Windows_x86 LibreOffice_project/62ad5818884a2fc2e5780dd45466868d41009ec0</meta:generator>
  </office:meta>
</office:document-meta>
</file>