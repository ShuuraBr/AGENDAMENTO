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5/05/2026 07:37:3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2">
            <text:p>307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315176612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2">
            <text:p>307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8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104.59">
            <text:p>10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8341511429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8">
            <text:p>30734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3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3161190056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2">
            <text:p>307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1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196.84">
            <text:p>19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791298308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23">
            <text:p>307523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5.7">
            <text:p>92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43.46">
            <text:p>843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4">
            <text:p>0,006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82.24">
            <text:p>82,24</text:p>
          </table:table-cell>
          <table:table-cell table:style-name="ce12N2" office:value-type="float" office:value="843.46">
            <text:p>843,46</text:p>
          </table:table-cell>
          <table:table-cell table:style-name="ce12N2" office:value-type="float" office:value="59.04">
            <text:p>5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379195610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5">
            <text:p>3075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418134936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7">
            <text:p>307587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4.66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6.41">
            <text:p>126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3.9">
            <text:p>11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12.51">
            <text:p>112,51</text:p>
          </table:table-cell>
          <table:table-cell table:style-name="ce12N2" office:value-type="float" office:value="1153.9">
            <text:p>1153,90</text:p>
          </table:table-cell>
          <table:table-cell table:style-name="ce12N2" office:value-type="float" office:value="46.16">
            <text:p>4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599342000123550020001046641345815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0">
            <text:p>30759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">
            <text:p>3,000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169.29">
            <text:p>16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81679433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9">
            <text:p>3075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3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">
            <text:p>263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">
            <text:p>263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62">
            <text:p>0,003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">
            <text:p>2630,60</text:p>
          </table:table-cell>
          <table:table-cell table:style-name="ce12N2" office:value-type="float" office:value="184.14">
            <text:p>18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3536140846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8">
            <text:p>3076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54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6.59">
            <text:p>376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36.7">
            <text:p>35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6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29.89">
            <text:p>229,89</text:p>
          </table:table-cell>
          <table:table-cell table:style-name="ce12N2" office:value-type="float" office:value="3536.7">
            <text:p>3536,70</text:p>
          </table:table-cell>
          <table:table-cell table:style-name="ce12N2" office:value-type="float" office:value="247.57">
            <text:p>24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5471995545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67">
            <text:p>307667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36.14">
            <text:p>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39477000186550010000005571000000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4">
            <text:p>307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6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82.65">
            <text:p>8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62016705476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7">
            <text:p>307747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1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13.89">
            <text:p>361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305.39">
            <text:p>330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07">
            <text:p>2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13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08.5">
            <text:p>308,50</text:p>
          </table:table-cell>
          <table:table-cell table:style-name="ce12N2" office:value-type="float" office:value="3305.39">
            <text:p>3305,39</text:p>
          </table:table-cell>
          <table:table-cell table:style-name="ce12N2" office:value-type="float" office:value="231.38">
            <text:p>23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2.96">
            <text:p>7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65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0/05/2026</text:p>
          </table:table-cell>
          <table:table-cell table:style-name="ce12" office:value-type="string" calcext:value-type="string">
            <text:p>72,9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5260512077181000133550030002251591994100929</text:p>
          </table:table-cell>
          <table:table-cell table:style-name="ce0" office:value-type="string" calcext:value-type="string">
            <text:p>3526051138956500020057005000399655100085923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1">
            <text:p>3077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3.8">
            <text:p>866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63.8">
            <text:p>866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814">
            <text:p>0,668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6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3.8">
            <text:p>8663,80</text:p>
          </table:table-cell>
          <table:table-cell table:style-name="ce12N2" office:value-type="float" office:value="606.47">
            <text:p>606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141802519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2">
            <text:p>3077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1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8.88">
            <text:p>28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88.88">
            <text:p>28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88.88">
            <text:p>2888,88</text:p>
          </table:table-cell>
          <table:table-cell table:style-name="ce12N2" office:value-type="float" office:value="202.22">
            <text:p>2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1991197650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6">
            <text:p>307806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60.46">
            <text:p>860,46</text:p>
          </table:table-cell>
          <table:table-cell table:style-name="ce12N2" office:value-type="float" office:value="119">
            <text:p>11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700221000253550010000110361473795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1">
            <text:p>307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81">
            <text:p>0,001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389127804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3">
            <text:p>307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601395974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9">
            <text:p>1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9">
            <text:p>11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22.46">
            <text:p>822,46</text:p>
          </table:table-cell>
          <table:table-cell table:style-name="ce26N2" office:value-type="float" office:value="38931.59">
            <text:p>38931,59</text:p>
          </table:table-cell>
          <table:table-cell table:style-name="ce26N2" office:value-type="float" office:value="2590.79">
            <text:p>2590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.96">
            <text:p>72,96</text:p>
          </table:table-cell>
          <table:table-cell table:style-name="ce26N2" office:value-type="float" office:value="39747.74">
            <text:p>39747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748524">
            <text:p>3,749</text:p>
          </table:table-cell>
          <table:table-cell table:style-name="ce26N2" office:value-type="float" office:value="38806.28">
            <text:p>38806,28</text:p>
          </table:table-cell>
          <table:table-cell table:style-name="ce26N2" office:value-type="float" office:value="39747.74">
            <text:p>39747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9.7">
            <text:p>69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7">
            <text:p>2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8" meta:object-count="0"/>
    <meta:generator>LibreOffice/4.3.0.4$Windows_x86 LibreOffice_project/62ad5818884a2fc2e5780dd45466868d41009ec0</meta:generator>
  </office:meta>
</office:document-meta>
</file>