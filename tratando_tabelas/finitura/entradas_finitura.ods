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.0000pt"/>
    </style:style>
    <style:style style:name="co2" style:family="table-column">
      <style:table-column-properties fo:break_before="auto" style:column-width="110.0000pt"/>
    </style:style>
    <style:style style:name="co3" style:family="table-column">
      <style:table-column-properties fo:break_before="auto" style:column-width="134.0000pt"/>
    </style:style>
    <style:style style:name="co4" style:family="table-column">
      <style:table-column-properties fo:break_before="auto" style:column-width="71.0000pt"/>
    </style:style>
    <style:style style:name="co5" style:family="table-column">
      <style:table-column-properties fo:break_before="auto" style:column-width="171.0000pt"/>
    </style:style>
    <style:style style:name="co6" style:family="table-column">
      <style:table-column-properties fo:break_before="auto" style:column-width="214.0000pt"/>
    </style:style>
    <style:style style:name="co7" style:family="table-column">
      <style:table-column-properties fo:break_before="auto" style:column-width="257.0000pt"/>
    </style:style>
    <style:style style:name="co8" style:family="table-column">
      <style:table-column-properties fo:break_before="auto" style:column-width="186.0000pt"/>
    </style:style>
    <style:style style:name="co9" style:family="table-column">
      <style:table-column-properties fo:break_before="auto" style:column-width="200.0000pt"/>
    </style:style>
    <style:style style:name="co10" style:family="table-column">
      <style:table-column-properties fo:break_before="auto" style:column-width="143.0000pt"/>
    </style:style>
    <style:style style:name="co11" style:family="table-column">
      <style:table-column-properties fo:break_before="auto" style:column-width="157.0000pt"/>
    </style:style>
    <style:style style:name="co12" style:family="table-column">
      <style:table-column-properties fo:break_before="auto" style:column-width="160.0000pt"/>
    </style:style>
    <style:style style:name="co13" style:family="table-column">
      <style:table-column-properties fo:break_before="auto" style:column-width="229.0000pt"/>
    </style:style>
    <style:style style:name="co14" style:family="table-column">
      <style:table-column-properties fo:break_before="auto" style:column-width="243.0000pt"/>
    </style:style>
    <style:style style:name="co15" style:family="table-column">
      <style:table-column-properties fo:break_before="auto" style:column-width="140.0000pt"/>
    </style:style>
    <style:style style:name="co16" style:family="table-column">
      <style:table-column-properties fo:break_before="auto" style:column-width="114.0000pt"/>
    </style:style>
    <style:style style:name="co17" style:family="table-column">
      <style:table-column-properties fo:break_before="auto" style:column-width="129.0000pt"/>
    </style:style>
    <style:style style:name="co18" style:family="table-column">
      <style:table-column-properties fo:break_before="auto" style:column-width="386.0000pt"/>
    </style:style>
    <style:style style:name="co19" style:family="table-column">
      <style:table-column-properties fo:break_before="auto" style:column-width="57.0000pt"/>
    </style:style>
    <style:style style:name="co20" style:family="table-column">
      <style:table-column-properties fo:break_before="auto" style:column-width="329.0000pt"/>
    </style:style>
    <style:style style:name="co21" style:family="table-column">
      <style:table-column-properties fo:break_before="auto" style:column-width="471.0000pt"/>
    </style:style>
    <style:style style:name="co22" style:family="table-column">
      <style:table-column-properties fo:break_before="auto" style:column-width="457.000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Default"/>
        <table:table-row table:style-name="ro1">
          <table:table-cell table:style-name="ce2" table:number-columns-spanned="65" table:number-rows-spanned="1" office:value-type="string" calcext:value-type="string">
            <text:p>Santri ADM 1.1.5.8 R1</text:p>
          </table:table-cell>
          <table:covered-table-cell table:number-columns-repeated="64"/>
          <table:table-cell table:style-name="ce3" table:number-columns-spanned="4" table:number-rows-spanned="1" office:value-type="string" calcext:value-type="string">
            <text:p>Emitido em: 07/07/2026 04:30:28</text:p>
          </table:table-cell>
          <table:covered-table-cell table:number-columns-repeated="3"/>
        </table:table-row>
        <table:table-row table:style-name="ro2">
          <table:table-cell table:style-name="ce1" table:number-columns-spanned="69" table:number-rows-spanned="1" office:value-type="string" calcext:value-type="string">
            <text:p>Relação de entradas - Sintético</text:p>
          </table:table-cell>
          <table:covered-table-cell table:number-columns-repeated="68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Base IBS/CBS</text:p>
          </table:table-cell>
          <table:table-cell table:style-name="ce79" office:value-type="string" calcext:value-type="string">
            <text:p>Vlr IBS estadual</text:p>
          </table:table-cell>
          <table:table-cell table:style-name="ce79" office:value-type="string" calcext:value-type="string">
            <text:p>Vlr IBS municipal</text:p>
          </table:table-cell>
          <table:table-cell table:style-name="ce79" office:value-type="string" calcext:value-type="string">
            <text:p>Vlr CB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9395">
            <text:p>309395</text:p>
          </table:table-cell>
          <table:table-cell table:style-name="ce0" table:number-columns-spanned="4" table:number-rows-spanned="1" office:value-type="string" calcext:value-type="string">
            <text:p>16.008 - MEKAL METALURGICA KADOW S.A.</text:p>
          </table:table-cell>
          <table:covered-table-cell table:number-columns-repeated="3"/>
          <table:table-cell table:style-name="ce0" office:value-type="string" calcext:value-type="string">
            <text:p>10.47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7/06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9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70.54">
            <text:p>2970,54</text:p>
          </table:table-cell>
          <table:table-cell table:style-name="ce12N2" office:value-type="float" office:value="2.97">
            <text:p>2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73">
            <text:p>26,7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9.72">
            <text:p>3519,72</text:p>
          </table:table-cell>
          <table:table-cell table:style-name="ce12N2" office:value-type="float" office:value="246.38">
            <text:p>24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570373920001805500300001047315539357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06">
            <text:p>31000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8.0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2.19">
            <text:p>2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24.46">
            <text:p>1324,4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92">
            <text:p>11,92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9.31">
            <text:p>1569,31</text:p>
          </table:table-cell>
          <table:table-cell table:style-name="ce12N2" office:value-type="float" office:value="109.85">
            <text:p>10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809316492750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19">
            <text:p>31001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7.66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2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476">
            <text:p>0,051</text:p>
          </table:table-cell>
          <table:table-cell table:style-name="ce12N2" office:value-type="float" office:value="8.85">
            <text:p>8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51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64.36">
            <text:p>6964,36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.68">
            <text:p>62,68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51.85">
            <text:p>8251,85</text:p>
          </table:table-cell>
          <table:table-cell table:style-name="ce12N2" office:value-type="float" office:value="577.63">
            <text:p>57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76611908856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072">
            <text:p>3100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8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56">
            <text:p>0,004</text:p>
          </table:table-cell>
          <table:table-cell table:style-name="ce12N2" office:value-type="float" office:value="5.27">
            <text:p>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1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01.04">
            <text:p>701,04</text:p>
          </table:table-cell>
          <table:table-cell table:style-name="ce12N2" office:value-type="float" office:value="28.04">
            <text:p>2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84641370959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117">
            <text:p>3101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79.16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9/06/2026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2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334">
            <text:p>0,030</text:p>
          </table:table-cell>
          <table:table-cell table:style-name="ce12N2" office:value-type="float" office:value="9.82">
            <text:p>9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459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203.58">
            <text:p>12203,58</text:p>
          </table:table-cell>
          <table:table-cell table:style-name="ce12N2" office:value-type="float" office:value="12.2">
            <text:p>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.83">
            <text:p>109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6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59.67">
            <text:p>14459,67</text:p>
          </table:table-cell>
          <table:table-cell table:style-name="ce12N2" office:value-type="float" office:value="1012.17">
            <text:p>1012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75339051000141550080006791601700182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57">
            <text:p>31025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8.7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9125">
            <text:p>0,199</text:p>
          </table:table-cell>
          <table:table-cell table:style-name="ce12N2" office:value-type="float" office:value="43.53">
            <text:p>43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8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.96">
            <text:p>678,96</text:p>
          </table:table-cell>
          <table:table-cell table:style-name="ce12N2" office:value-type="float" office:value="27.16">
            <text:p>2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59635500100004878313884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61">
            <text:p>310261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6.9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49.45">
            <text:p>364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247.79">
            <text:p>3247,79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77924">
            <text:p>0,078</text:p>
          </table:table-cell>
          <table:table-cell table:style-name="ce12N2" office:value-type="float" office:value="1.18">
            <text:p>1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49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03.55">
            <text:p>2903,55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.13">
            <text:p>26,13</text:p>
          </table:table-cell>
          <table:table-cell table:style-name="ce12N2" office:value-type="float" office:value="41.67">
            <text:p>41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316.66">
            <text:p>316,66</text:p>
          </table:table-cell>
          <table:table-cell table:style-name="ce12N2" office:value-type="float" office:value="3332.79">
            <text:p>3332,79</text:p>
          </table:table-cell>
          <table:table-cell table:style-name="ce12N2" office:value-type="float" office:value="133.31">
            <text:p>13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6106911580003705500100029692516903938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272">
            <text:p>310272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5.9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6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28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24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317.26">
            <text:p>1317,26</text:p>
          </table:table-cell>
          <table:table-cell table:style-name="ce12N2" office:value-type="float" office:value="1.32">
            <text:p>1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.86">
            <text:p>11,86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24.12">
            <text:p>1424,12</text:p>
          </table:table-cell>
          <table:table-cell table:style-name="ce12N2" office:value-type="float" office:value="56.96">
            <text:p>56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6868954480001365500100006598519049534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25">
            <text:p>310325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9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7/2026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26.95">
            <text:p>3026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26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555.2">
            <text:p>2555,20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7/2026</text:p>
          </table:table-cell>
          <table:table-cell table:style-name="ce12N2" office:value-type="float" office:value="264.45">
            <text:p>264,45</text:p>
          </table:table-cell>
          <table:table-cell table:style-name="ce12N2" office:value-type="float" office:value="2762.5">
            <text:p>2762,50</text:p>
          </table:table-cell>
          <table:table-cell table:style-name="ce12N2" office:value-type="float" office:value="110.5">
            <text:p>11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17716263000102550010000109091408146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363">
            <text:p>31036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1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37.68">
            <text:p>6537,68</text:p>
          </table:table-cell>
          <table:table-cell table:style-name="ce12N2" office:value-type="float" office:value="1862.72">
            <text:p>1862,72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19.6">
            <text:p>781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37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94.99">
            <text:p>5094,99</text:p>
          </table:table-cell>
          <table:table-cell table:style-name="ce12N2" office:value-type="float" office:value="5.1">
            <text:p>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.85">
            <text:p>45,85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80.8">
            <text:p>580,80</text:p>
          </table:table-cell>
          <table:table-cell table:style-name="ce12N2" office:value-type="float" office:value="5956.88">
            <text:p>5956,88</text:p>
          </table:table-cell>
          <table:table-cell table:style-name="ce12N2" office:value-type="float" office:value="238.27">
            <text:p>238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71778141200010955001000012096100033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13">
            <text:p>31041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116.7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6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2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23">
            <text:p>0,020</text:p>
          </table:table-cell>
          <table:table-cell table:style-name="ce12N2" office:value-type="float" office:value="4.37">
            <text:p>4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5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26.03">
            <text:p>1026,03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.23">
            <text:p>9,2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15.72">
            <text:p>1215,72</text:p>
          </table:table-cell>
          <table:table-cell table:style-name="ce12N2" office:value-type="float" office:value="85.1">
            <text:p>8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6978371810021905500100511670912112068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27">
            <text:p>310427</text:p>
          </table:table-cell>
          <table:table-cell table:style-name="ce0" table:number-columns-spanned="4" table:number-rows-spanned="1" office:value-type="string" calcext:value-type="string">
            <text:p>32.615 - MADELUSTRE INDUSTRIAL LTDA</text:p>
          </table:table-cell>
          <table:covered-table-cell table:number-columns-repeated="3"/>
          <table:table-cell table:style-name="ce0" office:value-type="string" calcext:value-type="string">
            <text:p>72.14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5.71">
            <text:p>5815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E-6">
            <text:p>0,000</text:p>
          </table:table-cell>
          <table:table-cell table:style-name="ce12N2" office:value-type="float" office:value="19.94">
            <text:p>19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5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72.26">
            <text:p>4472,26</text:p>
          </table:table-cell>
          <table:table-cell table:style-name="ce12N2" office:value-type="float" office:value="4.47">
            <text:p>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53.51">
            <text:p>53,5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3/07/2026</text:p>
          </table:table-cell>
          <table:table-cell table:style-name="ce12N2" office:value-type="float" office:value="516.66">
            <text:p>516,66</text:p>
          </table:table-cell>
          <table:table-cell table:style-name="ce12N2" office:value-type="float" office:value="5299.05">
            <text:p>5299,05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789616460000152550020000721451534246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10484">
            <text:p>310484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4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7/2026</text:p>
          </table:table-cell>
          <table:table-cell table:style-name="ce0" office:value-type="string" calcext:value-type="string">
            <text:p>06/07/2026</text:p>
          </table:table-cell>
          <table:table-cell table:style-name="ce0" office:value-type="string" calcext:value-type="string">
            <text:p>31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03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25.75">
            <text:p>3425,75</text:p>
          </table:table-cell>
          <table:table-cell table:style-name="ce12N2" office:value-type="float" office:value="3.43">
            <text:p>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.83">
            <text:p>30,83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7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03.68">
            <text:p>3703,68</text:p>
          </table:table-cell>
          <table:table-cell table:style-name="ce12N2" office:value-type="float" office:value="148.15">
            <text:p>148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701136190000131550010000644761036575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6" table:number-rows-spanned="1" office:value-type="string" calcext:value-type="string">
            <text:p>Total geral</text:p>
          </table:table-cell>
          <table:covered-table-cell table:number-columns-repeated="25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  <table:table-cell table:style-name="ce78" office:value-type="string" calcext:value-type="string">
            <text:p>Base IBS/CBS</text:p>
          </table:table-cell>
          <table:table-cell table:style-name="ce78" office:value-type="string" calcext:value-type="string">
            <text:p>Total IBS estadual</text:p>
          </table:table-cell>
          <table:table-cell table:style-name="ce78" office:value-type="string" calcext:value-type="string">
            <text:p>Total IBS municipal</text:p>
          </table:table-cell>
          <table:table-cell table:style-name="ce78" office:value-type="string" calcext:value-type="string">
            <text:p>Total CBS</text:p>
          </table:table-cell>
        </table:table-row>
        <table:table-row table:style-name="ro1">
          <table:table-cell table:style-name="ce26N2" office:value-type="float" office:value="13">
            <text:p>13,00</text:p>
          </table:table-cell>
          <table:table-cell table:style-name="ce26N2" office:value-type="float" office:value="1862.72">
            <text:p>1862,72</text:p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78.57">
            <text:p>1678,57</text:p>
          </table:table-cell>
          <table:table-cell table:style-name="ce26N2" office:value-type="float" office:value="52875.29">
            <text:p>52875,29</text:p>
          </table:table-cell>
          <table:table-cell table:style-name="ce26N2" office:value-type="float" office:value="3144.46">
            <text:p>3144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4553.86">
            <text:p>54553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387982">
            <text:p>0,388</text:p>
          </table:table-cell>
          <table:table-cell table:style-name="ce26N2" office:value-type="float" office:value="54653.01">
            <text:p>54653,01</text:p>
          </table:table-cell>
          <table:table-cell table:style-name="ce26N2" office:value-type="float" office:value="54553.86">
            <text:p>54553,8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4257.98">
            <text:p>44257,98</text:p>
          </table:table-cell>
          <table:table-cell table:style-name="ce26N2" office:value-type="float" office:value="44.26">
            <text:p>44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98.3">
            <text:p>398,30</text:p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04.15">
            <text:p>104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8.33">
            <text:p>38,3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9" table:number-rows-spanned="1" office:value-type="string" calcext:value-type="string">
            <text:p>Filtros selecionados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/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Status..............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Ag. chegada da mercadori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Empres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1 - OBJETIVA ATACADISTA DA CONSTRUCAO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2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          3 - OBJETIVA ATACADISTA DA CONSTRUCAO LTD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bservacao: FINITURA</text:p>
          </table:table-cell>
          <table:covered-table-cell table:number-columns-repeated="68"/>
        </table:table-row>
        <table:table-row table:style-name="ro1">
          <table:table-cell table:style-name="ce0" table:number-columns-spanned="69" table:number-rows-spanned="1" office:value-type="string" calcext:value-type="string">
            <text:p>Ordenação dos itens: Ordem alfabética</text:p>
          </table:table-cell>
          <table:covered-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family="Tahoma" style:font-family-generic="swiss" style:font-pitch="variable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family="Tahoma" style:font-family-generic="swiss" style:font-pitch="variable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 fo:font-family="Tahoma" style:font-family-generic="swiss" style:font-pitch="variable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family="Tahoma" style:font-family-generic="swiss" style:font-pitch="variable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family="Tahoma" style:font-family-generic="swiss" style:font-pitch="variable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family="Tahoma" style:font-family-generic="swiss" style:font-pitch="variable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family="Tahoma" style:font-family-generic="swiss" style:font-pitch="variable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family="Tahoma" style:font-family-generic="swiss" style:font-pitch="variable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family="Tahoma" style:font-family-generic="swiss" style:font-pitch="variable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 fo:font-family="Tahoma" style:font-family-generic="swiss" style:font-pitch="variable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family="Tahoma" style:font-family-generic="swiss" style:font-pitch="variable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family="Tahoma" style:font-family-generic="swiss" style:font-pitch="variable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family="Tahoma" style:font-family-generic="swiss" style:font-pitch="variable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family="Tahoma" style:font-family-generic="swiss" style:font-pitch="variable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family="Tahoma" style:font-family-generic="swiss" style:font-pitch="variable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family="Tahoma" style:font-family-generic="swiss" style:font-pitch="variable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family="Tahoma" style:font-family-generic="swiss" style:font-pitch="variable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family="Tahoma" style:font-family-generic="swiss" style:font-pitch="variable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family="Tahoma" style:font-family-generic="swiss" style:font-pitch="variable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family="Tahoma" style:font-family-generic="swiss" style:font-pitch="variable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family="Tahoma" style:font-family-generic="swiss" style:font-pitch="variable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family="Tahoma" style:font-family-generic="swiss" style:font-pitch="variable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family="Tahoma" style:font-family-generic="swiss" style:font-pitch="variable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family="Tahoma" style:font-family-generic="swiss" style:font-pitch="variable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family="Tahoma" style:font-family-generic="swiss" style:font-pitch="variable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family="Tahoma" style:font-family-generic="swiss" style:font-pitch="variable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family="Tahoma" style:font-family-generic="swiss" style:font-pitch="variable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family="Tahoma" style:font-family-generic="swiss" style:font-pitch="variable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family="Tahoma" style:font-family-generic="swiss" style:font-pitch="variable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family="Tahoma" style:font-family-generic="swiss" style:font-pitch="variable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family="Tahoma" style:font-family-generic="swiss" style:font-pitch="variable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family="Tahoma" style:font-family-generic="swiss" style:font-pitch="variable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family="Tahoma" style:font-family-generic="swiss" style:font-pitch="variable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family="Tahoma" style:font-family-generic="swiss" style:font-pitch="variable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family="Tahoma" style:font-family-generic="swiss" style:font-pitch="variable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family="Tahoma" style:font-family-generic="swiss" style:font-pitch="variable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family="Tahoma" style:font-family-generic="swiss" style:font-pitch="variable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family="Tahoma" style:font-family-generic="swiss" style:font-pitch="variable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family="Tahoma" style:font-family-generic="swiss" style:font-pitch="variable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family="Tahoma" style:font-family-generic="swiss" style:font-pitch="variable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family="Tahoma" style:font-family-generic="swiss" style:font-pitch="variable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family="Tahoma" style:font-family-generic="swiss" style:font-pitch="variable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family="Tahoma" style:font-family-generic="swiss" style:font-pitch="variable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family="Tahoma" style:font-family-generic="swiss" style:font-pitch="variable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family="Tahoma" style:font-family-generic="swiss" style:font-pitch="variable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family="Tahoma" style:font-family-generic="swiss" style:font-pitch="variable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family="Tahoma" style:font-family-generic="swiss" style:font-pitch="variable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family="Tahoma" style:font-family-generic="swiss" style:font-pitch="variable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family="Tahoma" style:font-family-generic="swiss" style:font-pitch="variable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family="Tahoma" style:font-family-generic="swiss" style:font-pitch="variable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family="Tahoma" style:font-family-generic="swiss" style:font-pitch="variable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family="Tahoma" style:font-family-generic="swiss" style:font-pitch="variable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family="Tahoma" style:font-family-generic="swiss" style:font-pitch="variable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family="Tahoma" style:font-family-generic="swiss" style:font-pitch="variable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family="Tahoma" style:font-family-generic="swiss" style:font-pitch="variable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family="Tahoma" style:font-family-generic="swiss" style:font-pitch="variable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family="Tahoma" style:font-family-generic="swiss" style:font-pitch="variable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family="Tahoma" style:font-family-generic="swiss" style:font-pitch="variable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family="Tahoma" style:font-family-generic="swiss" style:font-pitch="variable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family="Tahoma" style:font-family-generic="swiss" style:font-pitch="variable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family="Tahoma" style:font-family-generic="swiss" style:font-pitch="variable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family="Tahoma" style:font-family-generic="swiss" style:font-pitch="variable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family="Tahoma" style:font-family-generic="swiss" style:font-pitch="variable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family="Tahoma" style:font-family-generic="swiss" style:font-pitch="variable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family="Tahoma" style:font-family-generic="swiss" style:font-pitch="variable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family="Tahoma" style:font-family-generic="swiss" style:font-pitch="variable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family="Tahoma" style:font-family-generic="swiss" style:font-pitch="variable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family="Tahoma" style:font-family-generic="swiss" style:font-pitch="variable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family="Tahoma" style:font-family-generic="swiss" style:font-pitch="variable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family="Tahoma" style:font-family-generic="swiss" style:font-pitch="variable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family="Tahoma" style:font-family-generic="swiss" style:font-pitch="variable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family="Tahoma" style:font-family-generic="swiss" style:font-pitch="variable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family="Tahoma" style:font-family-generic="swiss" style:font-pitch="variable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family="Tahoma" style:font-family-generic="swiss" style:font-pitch="variable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family="Tahoma" style:font-family-generic="swiss" style:font-pitch="variable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family="Tahoma" style:font-family-generic="swiss" style:font-pitch="variable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family="Tahoma" style:font-family-generic="swiss" style:font-pitch="variable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family="Tahoma" style:font-family-generic="swiss" style:font-pitch="variable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family="Tahoma" style:font-family-generic="swiss" style:font-pitch="variable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family="Tahoma" style:font-family-generic="swiss" style:font-pitch="variable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family="Tahoma" style:font-family-generic="swiss" style:font-pitch="variable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family="Tahoma" style:font-family-generic="swiss" style:font-pitch="variable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family="Tahoma" style:font-family-generic="swiss" style:font-pitch="variable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family="Tahoma" style:font-family-generic="swiss" style:font-pitch="variable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family="Tahoma" style:font-family-generic="swiss" style:font-pitch="variable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family="Tahoma" style:font-family-generic="swiss" style:font-pitch="variable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family="Tahoma" style:font-family-generic="swiss" style:font-pitch="variable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family="Tahoma" style:font-family-generic="swiss" style:font-pitch="variable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family="Tahoma" style:font-family-generic="swiss" style:font-pitch="variable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family="Tahoma" style:font-family-generic="swiss" style:font-pitch="variable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family="Tahoma" style:font-family-generic="swiss" style:font-pitch="variable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family="Tahoma" style:font-family-generic="swiss" style:font-pitch="variable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family="Tahoma" style:font-family-generic="swiss" style:font-pitch="variable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family="Tahoma" style:font-family-generic="swiss" style:font-pitch="variable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family="Tahoma" style:font-family-generic="swiss" style:font-pitch="variable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family="Tahoma" style:font-family-generic="swiss" style:font-pitch="variable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family="Tahoma" style:font-family-generic="swiss" style:font-pitch="variable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family="Tahoma" style:font-family-generic="swiss" style:font-pitch="variable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family="Tahoma" style:font-family-generic="swiss" style:font-pitch="variable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family="Tahoma" style:font-family-generic="swiss" style:font-pitch="variable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family="Tahoma" style:font-family-generic="swiss" style:font-pitch="variable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family="Tahoma" style:font-family-generic="swiss" style:font-pitch="variable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family="Tahoma" style:font-family-generic="swiss" style:font-pitch="variable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family="Tahoma" style:font-family-generic="swiss" style:font-pitch="variable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family="Tahoma" style:font-family-generic="swiss" style:font-pitch="variable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family="Tahoma" style:font-family-generic="swiss" style:font-pitch="variable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family="Tahoma" style:font-family-generic="swiss" style:font-pitch="variable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family="Tahoma" style:font-family-generic="swiss" style:font-pitch="variable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family="Tahoma" style:font-family-generic="swiss" style:font-pitch="variable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family="Tahoma" style:font-family-generic="swiss" style:font-pitch="variable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  <style:style style:name="ce344" style:family="table-cell">
      <style:table-cell-properties style:text-align-source="fix" style:repeat-content="false" fo:border="0.74pt solid #000000" fo:background-color="#e6e6e6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44DA" style:family="table-cell" style:parent-style-name="ce344" style:data-style-name="N36"/>
    <style:style style:name="ce344DH" style:family="table-cell" style:parent-style-name="ce344" style:data-style-name="N51"/>
    <style:style style:name="ce344DE" style:family="table-cell" style:parent-style-name="ce344" style:data-style-name="N76"/>
    <style:style style:name="ce344C0" style:family="table-cell" style:parent-style-name="ce344" style:data-style-name="N103"/>
    <style:style style:name="ce344P0" style:family="table-cell" style:parent-style-name="ce344" style:data-style-name="N10"/>
    <style:style style:name="ce344N0" style:family="table-cell" style:parent-style-name="ce344" style:data-style-name="N113"/>
    <style:style style:name="ce344C1" style:family="table-cell" style:parent-style-name="ce344" style:data-style-name="N110"/>
    <style:style style:name="ce344P1" style:family="table-cell" style:parent-style-name="ce344" style:data-style-name="N111"/>
    <style:style style:name="ce344N1" style:family="table-cell" style:parent-style-name="ce344" style:data-style-name="N112"/>
    <style:style style:name="ce344C2" style:family="table-cell" style:parent-style-name="ce344" style:data-style-name="N104"/>
    <style:style style:name="ce344P2" style:family="table-cell" style:parent-style-name="ce344" style:data-style-name="N11"/>
    <style:style style:name="ce344N2" style:family="table-cell" style:parent-style-name="ce344" style:data-style-name="N109"/>
    <style:style style:name="ce344C3" style:family="table-cell" style:parent-style-name="ce344" style:data-style-name="N114"/>
    <style:style style:name="ce344P3" style:family="table-cell" style:parent-style-name="ce344" style:data-style-name="N107"/>
    <style:style style:name="ce344N3" style:family="table-cell" style:parent-style-name="ce344" style:data-style-name="N115"/>
    <style:style style:name="ce344C4" style:family="table-cell" style:parent-style-name="ce344" style:data-style-name="N116"/>
    <style:style style:name="ce344P4" style:family="table-cell" style:parent-style-name="ce344" style:data-style-name="N118"/>
    <style:style style:name="ce344N4" style:family="table-cell" style:parent-style-name="ce344" style:data-style-name="N117"/>
    <style:style style:name="ce344C5" style:family="table-cell" style:parent-style-name="ce344" style:data-style-name="N119"/>
    <style:style style:name="ce344P5" style:family="table-cell" style:parent-style-name="ce344" style:data-style-name="N120"/>
    <style:style style:name="ce344N5" style:family="table-cell" style:parent-style-name="ce344" style:data-style-name="N121"/>
    <style:style style:name="ce344C6" style:family="table-cell" style:parent-style-name="ce344" style:data-style-name="N122"/>
    <style:style style:name="ce344P6" style:family="table-cell" style:parent-style-name="ce344" style:data-style-name="N123"/>
    <style:style style:name="ce344N6" style:family="table-cell" style:parent-style-name="ce344" style:data-style-name="N124"/>
    <style:style style:name="ce344C7" style:family="table-cell" style:parent-style-name="ce344" style:data-style-name="N125"/>
    <style:style style:name="ce344P7" style:family="table-cell" style:parent-style-name="ce344" style:data-style-name="N126"/>
    <style:style style:name="ce344N7" style:family="table-cell" style:parent-style-name="ce344" style:data-style-name="N127"/>
    <style:style style:name="ce344C8" style:family="table-cell" style:parent-style-name="ce344" style:data-style-name="N128"/>
    <style:style style:name="ce344P8" style:family="table-cell" style:parent-style-name="ce344" style:data-style-name="N129"/>
    <style:style style:name="ce344N8" style:family="table-cell" style:parent-style-name="ce344" style:data-style-name="N130"/>
    <style:style style:name="ce345" style:family="table-cell">
      <style:table-cell-properties style:text-align-source="fix" style:repeat-content="false" fo:border="0.74pt solid #000000"/>
      <style:paragraph-properties fo:text-align="start"/>
      <style:text-properties fo:color="#000000" style:font-name="Tahoma" fo:font-family="Tahoma" style:font-family-generic="swiss" style:font-pitch="variable" fo:font-size="7pt" fo:font-weight="bold"/>
    </style:style>
    <style:style style:name="ce345DA" style:family="table-cell" style:parent-style-name="ce345" style:data-style-name="N36"/>
    <style:style style:name="ce345DH" style:family="table-cell" style:parent-style-name="ce345" style:data-style-name="N51"/>
    <style:style style:name="ce345DE" style:family="table-cell" style:parent-style-name="ce345" style:data-style-name="N76"/>
    <style:style style:name="ce345C0" style:family="table-cell" style:parent-style-name="ce345" style:data-style-name="N103"/>
    <style:style style:name="ce345P0" style:family="table-cell" style:parent-style-name="ce345" style:data-style-name="N10"/>
    <style:style style:name="ce345N0" style:family="table-cell" style:parent-style-name="ce345" style:data-style-name="N113"/>
    <style:style style:name="ce345C1" style:family="table-cell" style:parent-style-name="ce345" style:data-style-name="N110"/>
    <style:style style:name="ce345P1" style:family="table-cell" style:parent-style-name="ce345" style:data-style-name="N111"/>
    <style:style style:name="ce345N1" style:family="table-cell" style:parent-style-name="ce345" style:data-style-name="N112"/>
    <style:style style:name="ce345C2" style:family="table-cell" style:parent-style-name="ce345" style:data-style-name="N104"/>
    <style:style style:name="ce345P2" style:family="table-cell" style:parent-style-name="ce345" style:data-style-name="N11"/>
    <style:style style:name="ce345N2" style:family="table-cell" style:parent-style-name="ce345" style:data-style-name="N109"/>
    <style:style style:name="ce345C3" style:family="table-cell" style:parent-style-name="ce345" style:data-style-name="N114"/>
    <style:style style:name="ce345P3" style:family="table-cell" style:parent-style-name="ce345" style:data-style-name="N107"/>
    <style:style style:name="ce345N3" style:family="table-cell" style:parent-style-name="ce345" style:data-style-name="N115"/>
    <style:style style:name="ce345C4" style:family="table-cell" style:parent-style-name="ce345" style:data-style-name="N116"/>
    <style:style style:name="ce345P4" style:family="table-cell" style:parent-style-name="ce345" style:data-style-name="N118"/>
    <style:style style:name="ce345N4" style:family="table-cell" style:parent-style-name="ce345" style:data-style-name="N117"/>
    <style:style style:name="ce345C5" style:family="table-cell" style:parent-style-name="ce345" style:data-style-name="N119"/>
    <style:style style:name="ce345P5" style:family="table-cell" style:parent-style-name="ce345" style:data-style-name="N120"/>
    <style:style style:name="ce345N5" style:family="table-cell" style:parent-style-name="ce345" style:data-style-name="N121"/>
    <style:style style:name="ce345C6" style:family="table-cell" style:parent-style-name="ce345" style:data-style-name="N122"/>
    <style:style style:name="ce345P6" style:family="table-cell" style:parent-style-name="ce345" style:data-style-name="N123"/>
    <style:style style:name="ce345N6" style:family="table-cell" style:parent-style-name="ce345" style:data-style-name="N124"/>
    <style:style style:name="ce345C7" style:family="table-cell" style:parent-style-name="ce345" style:data-style-name="N125"/>
    <style:style style:name="ce345P7" style:family="table-cell" style:parent-style-name="ce345" style:data-style-name="N126"/>
    <style:style style:name="ce345N7" style:family="table-cell" style:parent-style-name="ce345" style:data-style-name="N127"/>
    <style:style style:name="ce345C8" style:family="table-cell" style:parent-style-name="ce345" style:data-style-name="N128"/>
    <style:style style:name="ce345P8" style:family="table-cell" style:parent-style-name="ce345" style:data-style-name="N129"/>
    <style:style style:name="ce345N8" style:family="table-cell" style:parent-style-name="ce345" style:data-style-name="N130"/>
    <style:style style:name="ce346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/>
    </style:style>
    <style:style style:name="ce346DA" style:family="table-cell" style:parent-style-name="ce346" style:data-style-name="N36"/>
    <style:style style:name="ce346DH" style:family="table-cell" style:parent-style-name="ce346" style:data-style-name="N51"/>
    <style:style style:name="ce346DE" style:family="table-cell" style:parent-style-name="ce346" style:data-style-name="N76"/>
    <style:style style:name="ce346C0" style:family="table-cell" style:parent-style-name="ce346" style:data-style-name="N103"/>
    <style:style style:name="ce346P0" style:family="table-cell" style:parent-style-name="ce346" style:data-style-name="N10"/>
    <style:style style:name="ce346N0" style:family="table-cell" style:parent-style-name="ce346" style:data-style-name="N113"/>
    <style:style style:name="ce346C1" style:family="table-cell" style:parent-style-name="ce346" style:data-style-name="N110"/>
    <style:style style:name="ce346P1" style:family="table-cell" style:parent-style-name="ce346" style:data-style-name="N111"/>
    <style:style style:name="ce346N1" style:family="table-cell" style:parent-style-name="ce346" style:data-style-name="N112"/>
    <style:style style:name="ce346C2" style:family="table-cell" style:parent-style-name="ce346" style:data-style-name="N104"/>
    <style:style style:name="ce346P2" style:family="table-cell" style:parent-style-name="ce346" style:data-style-name="N11"/>
    <style:style style:name="ce346N2" style:family="table-cell" style:parent-style-name="ce346" style:data-style-name="N109"/>
    <style:style style:name="ce346C3" style:family="table-cell" style:parent-style-name="ce346" style:data-style-name="N114"/>
    <style:style style:name="ce346P3" style:family="table-cell" style:parent-style-name="ce346" style:data-style-name="N107"/>
    <style:style style:name="ce346N3" style:family="table-cell" style:parent-style-name="ce346" style:data-style-name="N115"/>
    <style:style style:name="ce346C4" style:family="table-cell" style:parent-style-name="ce346" style:data-style-name="N116"/>
    <style:style style:name="ce346P4" style:family="table-cell" style:parent-style-name="ce346" style:data-style-name="N118"/>
    <style:style style:name="ce346N4" style:family="table-cell" style:parent-style-name="ce346" style:data-style-name="N117"/>
    <style:style style:name="ce346C5" style:family="table-cell" style:parent-style-name="ce346" style:data-style-name="N119"/>
    <style:style style:name="ce346P5" style:family="table-cell" style:parent-style-name="ce346" style:data-style-name="N120"/>
    <style:style style:name="ce346N5" style:family="table-cell" style:parent-style-name="ce346" style:data-style-name="N121"/>
    <style:style style:name="ce346C6" style:family="table-cell" style:parent-style-name="ce346" style:data-style-name="N122"/>
    <style:style style:name="ce346P6" style:family="table-cell" style:parent-style-name="ce346" style:data-style-name="N123"/>
    <style:style style:name="ce346N6" style:family="table-cell" style:parent-style-name="ce346" style:data-style-name="N124"/>
    <style:style style:name="ce346C7" style:family="table-cell" style:parent-style-name="ce346" style:data-style-name="N125"/>
    <style:style style:name="ce346P7" style:family="table-cell" style:parent-style-name="ce346" style:data-style-name="N126"/>
    <style:style style:name="ce346N7" style:family="table-cell" style:parent-style-name="ce346" style:data-style-name="N127"/>
    <style:style style:name="ce346C8" style:family="table-cell" style:parent-style-name="ce346" style:data-style-name="N128"/>
    <style:style style:name="ce346P8" style:family="table-cell" style:parent-style-name="ce346" style:data-style-name="N129"/>
    <style:style style:name="ce346N8" style:family="table-cell" style:parent-style-name="ce346" style:data-style-name="N130"/>
    <style:style style:name="ce347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/>
    </style:style>
    <style:style style:name="ce347DA" style:family="table-cell" style:parent-style-name="ce347" style:data-style-name="N36"/>
    <style:style style:name="ce347DH" style:family="table-cell" style:parent-style-name="ce347" style:data-style-name="N51"/>
    <style:style style:name="ce347DE" style:family="table-cell" style:parent-style-name="ce347" style:data-style-name="N76"/>
    <style:style style:name="ce347C0" style:family="table-cell" style:parent-style-name="ce347" style:data-style-name="N103"/>
    <style:style style:name="ce347P0" style:family="table-cell" style:parent-style-name="ce347" style:data-style-name="N10"/>
    <style:style style:name="ce347N0" style:family="table-cell" style:parent-style-name="ce347" style:data-style-name="N113"/>
    <style:style style:name="ce347C1" style:family="table-cell" style:parent-style-name="ce347" style:data-style-name="N110"/>
    <style:style style:name="ce347P1" style:family="table-cell" style:parent-style-name="ce347" style:data-style-name="N111"/>
    <style:style style:name="ce347N1" style:family="table-cell" style:parent-style-name="ce347" style:data-style-name="N112"/>
    <style:style style:name="ce347C2" style:family="table-cell" style:parent-style-name="ce347" style:data-style-name="N104"/>
    <style:style style:name="ce347P2" style:family="table-cell" style:parent-style-name="ce347" style:data-style-name="N11"/>
    <style:style style:name="ce347N2" style:family="table-cell" style:parent-style-name="ce347" style:data-style-name="N109"/>
    <style:style style:name="ce347C3" style:family="table-cell" style:parent-style-name="ce347" style:data-style-name="N114"/>
    <style:style style:name="ce347P3" style:family="table-cell" style:parent-style-name="ce347" style:data-style-name="N107"/>
    <style:style style:name="ce347N3" style:family="table-cell" style:parent-style-name="ce347" style:data-style-name="N115"/>
    <style:style style:name="ce347C4" style:family="table-cell" style:parent-style-name="ce347" style:data-style-name="N116"/>
    <style:style style:name="ce347P4" style:family="table-cell" style:parent-style-name="ce347" style:data-style-name="N118"/>
    <style:style style:name="ce347N4" style:family="table-cell" style:parent-style-name="ce347" style:data-style-name="N117"/>
    <style:style style:name="ce347C5" style:family="table-cell" style:parent-style-name="ce347" style:data-style-name="N119"/>
    <style:style style:name="ce347P5" style:family="table-cell" style:parent-style-name="ce347" style:data-style-name="N120"/>
    <style:style style:name="ce347N5" style:family="table-cell" style:parent-style-name="ce347" style:data-style-name="N121"/>
    <style:style style:name="ce347C6" style:family="table-cell" style:parent-style-name="ce347" style:data-style-name="N122"/>
    <style:style style:name="ce347P6" style:family="table-cell" style:parent-style-name="ce347" style:data-style-name="N123"/>
    <style:style style:name="ce347N6" style:family="table-cell" style:parent-style-name="ce347" style:data-style-name="N124"/>
    <style:style style:name="ce347C7" style:family="table-cell" style:parent-style-name="ce347" style:data-style-name="N125"/>
    <style:style style:name="ce347P7" style:family="table-cell" style:parent-style-name="ce347" style:data-style-name="N126"/>
    <style:style style:name="ce347N7" style:family="table-cell" style:parent-style-name="ce347" style:data-style-name="N127"/>
    <style:style style:name="ce347C8" style:family="table-cell" style:parent-style-name="ce347" style:data-style-name="N128"/>
    <style:style style:name="ce347P8" style:family="table-cell" style:parent-style-name="ce347" style:data-style-name="N129"/>
    <style:style style:name="ce347N8" style:family="table-cell" style:parent-style-name="ce347" style:data-style-name="N130"/>
    <style:style style:name="ce348" style:family="table-cell">
      <style:table-cell-properties style:text-align-source="fix" style:repeat-content="false" fo:border="0.74pt solid #000000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8DA" style:family="table-cell" style:parent-style-name="ce348" style:data-style-name="N36"/>
    <style:style style:name="ce348DH" style:family="table-cell" style:parent-style-name="ce348" style:data-style-name="N51"/>
    <style:style style:name="ce348DE" style:family="table-cell" style:parent-style-name="ce348" style:data-style-name="N76"/>
    <style:style style:name="ce348C0" style:family="table-cell" style:parent-style-name="ce348" style:data-style-name="N103"/>
    <style:style style:name="ce348P0" style:family="table-cell" style:parent-style-name="ce348" style:data-style-name="N10"/>
    <style:style style:name="ce348N0" style:family="table-cell" style:parent-style-name="ce348" style:data-style-name="N113"/>
    <style:style style:name="ce348C1" style:family="table-cell" style:parent-style-name="ce348" style:data-style-name="N110"/>
    <style:style style:name="ce348P1" style:family="table-cell" style:parent-style-name="ce348" style:data-style-name="N111"/>
    <style:style style:name="ce348N1" style:family="table-cell" style:parent-style-name="ce348" style:data-style-name="N112"/>
    <style:style style:name="ce348C2" style:family="table-cell" style:parent-style-name="ce348" style:data-style-name="N104"/>
    <style:style style:name="ce348P2" style:family="table-cell" style:parent-style-name="ce348" style:data-style-name="N11"/>
    <style:style style:name="ce348N2" style:family="table-cell" style:parent-style-name="ce348" style:data-style-name="N109"/>
    <style:style style:name="ce348C3" style:family="table-cell" style:parent-style-name="ce348" style:data-style-name="N114"/>
    <style:style style:name="ce348P3" style:family="table-cell" style:parent-style-name="ce348" style:data-style-name="N107"/>
    <style:style style:name="ce348N3" style:family="table-cell" style:parent-style-name="ce348" style:data-style-name="N115"/>
    <style:style style:name="ce348C4" style:family="table-cell" style:parent-style-name="ce348" style:data-style-name="N116"/>
    <style:style style:name="ce348P4" style:family="table-cell" style:parent-style-name="ce348" style:data-style-name="N118"/>
    <style:style style:name="ce348N4" style:family="table-cell" style:parent-style-name="ce348" style:data-style-name="N117"/>
    <style:style style:name="ce348C5" style:family="table-cell" style:parent-style-name="ce348" style:data-style-name="N119"/>
    <style:style style:name="ce348P5" style:family="table-cell" style:parent-style-name="ce348" style:data-style-name="N120"/>
    <style:style style:name="ce348N5" style:family="table-cell" style:parent-style-name="ce348" style:data-style-name="N121"/>
    <style:style style:name="ce348C6" style:family="table-cell" style:parent-style-name="ce348" style:data-style-name="N122"/>
    <style:style style:name="ce348P6" style:family="table-cell" style:parent-style-name="ce348" style:data-style-name="N123"/>
    <style:style style:name="ce348N6" style:family="table-cell" style:parent-style-name="ce348" style:data-style-name="N124"/>
    <style:style style:name="ce348C7" style:family="table-cell" style:parent-style-name="ce348" style:data-style-name="N125"/>
    <style:style style:name="ce348P7" style:family="table-cell" style:parent-style-name="ce348" style:data-style-name="N126"/>
    <style:style style:name="ce348N7" style:family="table-cell" style:parent-style-name="ce348" style:data-style-name="N127"/>
    <style:style style:name="ce348C8" style:family="table-cell" style:parent-style-name="ce348" style:data-style-name="N128"/>
    <style:style style:name="ce348P8" style:family="table-cell" style:parent-style-name="ce348" style:data-style-name="N129"/>
    <style:style style:name="ce348N8" style:family="table-cell" style:parent-style-name="ce348" style:data-style-name="N130"/>
    <style:style style:name="ce349" style:family="table-cell">
      <style:table-cell-properties style:text-align-source="fix" style:repeat-content="false" fo:border="0.74pt solid #000000" fo:background-color="#e6e6e6"/>
      <style:paragraph-properties fo:text-align="end"/>
      <style:text-properties style:font-name="Tahoma" fo:font-family="Tahoma" style:font-family-generic="swiss" style:font-pitch="variable" fo:font-size="7pt" fo:font-weight="bold"/>
    </style:style>
    <style:style style:name="ce349DA" style:family="table-cell" style:parent-style-name="ce349" style:data-style-name="N36"/>
    <style:style style:name="ce349DH" style:family="table-cell" style:parent-style-name="ce349" style:data-style-name="N51"/>
    <style:style style:name="ce349DE" style:family="table-cell" style:parent-style-name="ce349" style:data-style-name="N76"/>
    <style:style style:name="ce349C0" style:family="table-cell" style:parent-style-name="ce349" style:data-style-name="N103"/>
    <style:style style:name="ce349P0" style:family="table-cell" style:parent-style-name="ce349" style:data-style-name="N10"/>
    <style:style style:name="ce349N0" style:family="table-cell" style:parent-style-name="ce349" style:data-style-name="N113"/>
    <style:style style:name="ce349C1" style:family="table-cell" style:parent-style-name="ce349" style:data-style-name="N110"/>
    <style:style style:name="ce349P1" style:family="table-cell" style:parent-style-name="ce349" style:data-style-name="N111"/>
    <style:style style:name="ce349N1" style:family="table-cell" style:parent-style-name="ce349" style:data-style-name="N112"/>
    <style:style style:name="ce349C2" style:family="table-cell" style:parent-style-name="ce349" style:data-style-name="N104"/>
    <style:style style:name="ce349P2" style:family="table-cell" style:parent-style-name="ce349" style:data-style-name="N11"/>
    <style:style style:name="ce349N2" style:family="table-cell" style:parent-style-name="ce349" style:data-style-name="N109"/>
    <style:style style:name="ce349C3" style:family="table-cell" style:parent-style-name="ce349" style:data-style-name="N114"/>
    <style:style style:name="ce349P3" style:family="table-cell" style:parent-style-name="ce349" style:data-style-name="N107"/>
    <style:style style:name="ce349N3" style:family="table-cell" style:parent-style-name="ce349" style:data-style-name="N115"/>
    <style:style style:name="ce349C4" style:family="table-cell" style:parent-style-name="ce349" style:data-style-name="N116"/>
    <style:style style:name="ce349P4" style:family="table-cell" style:parent-style-name="ce349" style:data-style-name="N118"/>
    <style:style style:name="ce349N4" style:family="table-cell" style:parent-style-name="ce349" style:data-style-name="N117"/>
    <style:style style:name="ce349C5" style:family="table-cell" style:parent-style-name="ce349" style:data-style-name="N119"/>
    <style:style style:name="ce349P5" style:family="table-cell" style:parent-style-name="ce349" style:data-style-name="N120"/>
    <style:style style:name="ce349N5" style:family="table-cell" style:parent-style-name="ce349" style:data-style-name="N121"/>
    <style:style style:name="ce349C6" style:family="table-cell" style:parent-style-name="ce349" style:data-style-name="N122"/>
    <style:style style:name="ce349P6" style:family="table-cell" style:parent-style-name="ce349" style:data-style-name="N123"/>
    <style:style style:name="ce349N6" style:family="table-cell" style:parent-style-name="ce349" style:data-style-name="N124"/>
    <style:style style:name="ce349C7" style:family="table-cell" style:parent-style-name="ce349" style:data-style-name="N125"/>
    <style:style style:name="ce349P7" style:family="table-cell" style:parent-style-name="ce349" style:data-style-name="N126"/>
    <style:style style:name="ce349N7" style:family="table-cell" style:parent-style-name="ce349" style:data-style-name="N127"/>
    <style:style style:name="ce349C8" style:family="table-cell" style:parent-style-name="ce349" style:data-style-name="N128"/>
    <style:style style:name="ce349P8" style:family="table-cell" style:parent-style-name="ce349" style:data-style-name="N129"/>
    <style:style style:name="ce349N8" style:family="table-cell" style:parent-style-name="ce349" style:data-style-name="N130"/>
    <style:style style:name="ce350" style:family="table-cell">
      <style:table-cell-properties style:text-align-source="fix" style:repeat-content="false" fo:border="0.74pt solid #000000" fo:background-color="#e6e6ff"/>
      <style:paragraph-properties fo:text-align="start"/>
      <style:text-properties style:font-name="Tahoma" fo:font-family="Tahoma" style:font-family-generic="swiss" style:font-pitch="variable" fo:font-size="7pt" fo:font-weight="bold"/>
    </style:style>
    <style:style style:name="ce350DA" style:family="table-cell" style:parent-style-name="ce350" style:data-style-name="N36"/>
    <style:style style:name="ce350DH" style:family="table-cell" style:parent-style-name="ce350" style:data-style-name="N51"/>
    <style:style style:name="ce350DE" style:family="table-cell" style:parent-style-name="ce350" style:data-style-name="N76"/>
    <style:style style:name="ce350C0" style:family="table-cell" style:parent-style-name="ce350" style:data-style-name="N103"/>
    <style:style style:name="ce350P0" style:family="table-cell" style:parent-style-name="ce350" style:data-style-name="N10"/>
    <style:style style:name="ce350N0" style:family="table-cell" style:parent-style-name="ce350" style:data-style-name="N113"/>
    <style:style style:name="ce350C1" style:family="table-cell" style:parent-style-name="ce350" style:data-style-name="N110"/>
    <style:style style:name="ce350P1" style:family="table-cell" style:parent-style-name="ce350" style:data-style-name="N111"/>
    <style:style style:name="ce350N1" style:family="table-cell" style:parent-style-name="ce350" style:data-style-name="N112"/>
    <style:style style:name="ce350C2" style:family="table-cell" style:parent-style-name="ce350" style:data-style-name="N104"/>
    <style:style style:name="ce350P2" style:family="table-cell" style:parent-style-name="ce350" style:data-style-name="N11"/>
    <style:style style:name="ce350N2" style:family="table-cell" style:parent-style-name="ce350" style:data-style-name="N109"/>
    <style:style style:name="ce350C3" style:family="table-cell" style:parent-style-name="ce350" style:data-style-name="N114"/>
    <style:style style:name="ce350P3" style:family="table-cell" style:parent-style-name="ce350" style:data-style-name="N107"/>
    <style:style style:name="ce350N3" style:family="table-cell" style:parent-style-name="ce350" style:data-style-name="N115"/>
    <style:style style:name="ce350C4" style:family="table-cell" style:parent-style-name="ce350" style:data-style-name="N116"/>
    <style:style style:name="ce350P4" style:family="table-cell" style:parent-style-name="ce350" style:data-style-name="N118"/>
    <style:style style:name="ce350N4" style:family="table-cell" style:parent-style-name="ce350" style:data-style-name="N117"/>
    <style:style style:name="ce350C5" style:family="table-cell" style:parent-style-name="ce350" style:data-style-name="N119"/>
    <style:style style:name="ce350P5" style:family="table-cell" style:parent-style-name="ce350" style:data-style-name="N120"/>
    <style:style style:name="ce350N5" style:family="table-cell" style:parent-style-name="ce350" style:data-style-name="N121"/>
    <style:style style:name="ce350C6" style:family="table-cell" style:parent-style-name="ce350" style:data-style-name="N122"/>
    <style:style style:name="ce350P6" style:family="table-cell" style:parent-style-name="ce350" style:data-style-name="N123"/>
    <style:style style:name="ce350N6" style:family="table-cell" style:parent-style-name="ce350" style:data-style-name="N124"/>
    <style:style style:name="ce350C7" style:family="table-cell" style:parent-style-name="ce350" style:data-style-name="N125"/>
    <style:style style:name="ce350P7" style:family="table-cell" style:parent-style-name="ce350" style:data-style-name="N126"/>
    <style:style style:name="ce350N7" style:family="table-cell" style:parent-style-name="ce350" style:data-style-name="N127"/>
    <style:style style:name="ce350C8" style:family="table-cell" style:parent-style-name="ce350" style:data-style-name="N128"/>
    <style:style style:name="ce350P8" style:family="table-cell" style:parent-style-name="ce350" style:data-style-name="N129"/>
    <style:style style:name="ce350N8" style:family="table-cell" style:parent-style-name="ce350" style:data-style-name="N130"/>
    <style:style style:name="ce351" style:family="table-cell">
      <style:table-cell-properties style:text-align-source="fix" style:repeat-content="false" style:vertical-align="middle" fo:border="0.74pt solid #000000" fo:background-color="#CCCCCC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1DA" style:family="table-cell" style:parent-style-name="ce351" style:data-style-name="N36"/>
    <style:style style:name="ce351DH" style:family="table-cell" style:parent-style-name="ce351" style:data-style-name="N51"/>
    <style:style style:name="ce351DE" style:family="table-cell" style:parent-style-name="ce351" style:data-style-name="N76"/>
    <style:style style:name="ce351C0" style:family="table-cell" style:parent-style-name="ce351" style:data-style-name="N103"/>
    <style:style style:name="ce351P0" style:family="table-cell" style:parent-style-name="ce351" style:data-style-name="N10"/>
    <style:style style:name="ce351N0" style:family="table-cell" style:parent-style-name="ce351" style:data-style-name="N113"/>
    <style:style style:name="ce351C1" style:family="table-cell" style:parent-style-name="ce351" style:data-style-name="N110"/>
    <style:style style:name="ce351P1" style:family="table-cell" style:parent-style-name="ce351" style:data-style-name="N111"/>
    <style:style style:name="ce351N1" style:family="table-cell" style:parent-style-name="ce351" style:data-style-name="N112"/>
    <style:style style:name="ce351C2" style:family="table-cell" style:parent-style-name="ce351" style:data-style-name="N104"/>
    <style:style style:name="ce351P2" style:family="table-cell" style:parent-style-name="ce351" style:data-style-name="N11"/>
    <style:style style:name="ce351N2" style:family="table-cell" style:parent-style-name="ce351" style:data-style-name="N109"/>
    <style:style style:name="ce351C3" style:family="table-cell" style:parent-style-name="ce351" style:data-style-name="N114"/>
    <style:style style:name="ce351P3" style:family="table-cell" style:parent-style-name="ce351" style:data-style-name="N107"/>
    <style:style style:name="ce351N3" style:family="table-cell" style:parent-style-name="ce351" style:data-style-name="N115"/>
    <style:style style:name="ce351C4" style:family="table-cell" style:parent-style-name="ce351" style:data-style-name="N116"/>
    <style:style style:name="ce351P4" style:family="table-cell" style:parent-style-name="ce351" style:data-style-name="N118"/>
    <style:style style:name="ce351N4" style:family="table-cell" style:parent-style-name="ce351" style:data-style-name="N117"/>
    <style:style style:name="ce351C5" style:family="table-cell" style:parent-style-name="ce351" style:data-style-name="N119"/>
    <style:style style:name="ce351P5" style:family="table-cell" style:parent-style-name="ce351" style:data-style-name="N120"/>
    <style:style style:name="ce351N5" style:family="table-cell" style:parent-style-name="ce351" style:data-style-name="N121"/>
    <style:style style:name="ce351C6" style:family="table-cell" style:parent-style-name="ce351" style:data-style-name="N122"/>
    <style:style style:name="ce351P6" style:family="table-cell" style:parent-style-name="ce351" style:data-style-name="N123"/>
    <style:style style:name="ce351N6" style:family="table-cell" style:parent-style-name="ce351" style:data-style-name="N124"/>
    <style:style style:name="ce351C7" style:family="table-cell" style:parent-style-name="ce351" style:data-style-name="N125"/>
    <style:style style:name="ce351P7" style:family="table-cell" style:parent-style-name="ce351" style:data-style-name="N126"/>
    <style:style style:name="ce351N7" style:family="table-cell" style:parent-style-name="ce351" style:data-style-name="N127"/>
    <style:style style:name="ce351C8" style:family="table-cell" style:parent-style-name="ce351" style:data-style-name="N128"/>
    <style:style style:name="ce351P8" style:family="table-cell" style:parent-style-name="ce351" style:data-style-name="N129"/>
    <style:style style:name="ce351N8" style:family="table-cell" style:parent-style-name="ce351" style:data-style-name="N130"/>
    <style:style style:name="ce352" style:family="table-cell">
      <style:table-cell-properties style:text-align-source="fix" style:repeat-content="false" style:vertical-align="middle" fo:border="0.74pt solid #000000" fo:background-color="#00FFFF"/>
      <style:paragraph-properties fo:text-align="center"/>
      <style:text-properties fo:color="#000000" style:font-name="Tahoma" fo:font-family="Tahoma" style:font-family-generic="swiss" style:font-pitch="variable" fo:font-size="10pt" fo:font-weight="bold"/>
    </style:style>
    <style:style style:name="ce352DA" style:family="table-cell" style:parent-style-name="ce352" style:data-style-name="N36"/>
    <style:style style:name="ce352DH" style:family="table-cell" style:parent-style-name="ce352" style:data-style-name="N51"/>
    <style:style style:name="ce352DE" style:family="table-cell" style:parent-style-name="ce352" style:data-style-name="N76"/>
    <style:style style:name="ce352C0" style:family="table-cell" style:parent-style-name="ce352" style:data-style-name="N103"/>
    <style:style style:name="ce352P0" style:family="table-cell" style:parent-style-name="ce352" style:data-style-name="N10"/>
    <style:style style:name="ce352N0" style:family="table-cell" style:parent-style-name="ce352" style:data-style-name="N113"/>
    <style:style style:name="ce352C1" style:family="table-cell" style:parent-style-name="ce352" style:data-style-name="N110"/>
    <style:style style:name="ce352P1" style:family="table-cell" style:parent-style-name="ce352" style:data-style-name="N111"/>
    <style:style style:name="ce352N1" style:family="table-cell" style:parent-style-name="ce352" style:data-style-name="N112"/>
    <style:style style:name="ce352C2" style:family="table-cell" style:parent-style-name="ce352" style:data-style-name="N104"/>
    <style:style style:name="ce352P2" style:family="table-cell" style:parent-style-name="ce352" style:data-style-name="N11"/>
    <style:style style:name="ce352N2" style:family="table-cell" style:parent-style-name="ce352" style:data-style-name="N109"/>
    <style:style style:name="ce352C3" style:family="table-cell" style:parent-style-name="ce352" style:data-style-name="N114"/>
    <style:style style:name="ce352P3" style:family="table-cell" style:parent-style-name="ce352" style:data-style-name="N107"/>
    <style:style style:name="ce352N3" style:family="table-cell" style:parent-style-name="ce352" style:data-style-name="N115"/>
    <style:style style:name="ce352C4" style:family="table-cell" style:parent-style-name="ce352" style:data-style-name="N116"/>
    <style:style style:name="ce352P4" style:family="table-cell" style:parent-style-name="ce352" style:data-style-name="N118"/>
    <style:style style:name="ce352N4" style:family="table-cell" style:parent-style-name="ce352" style:data-style-name="N117"/>
    <style:style style:name="ce352C5" style:family="table-cell" style:parent-style-name="ce352" style:data-style-name="N119"/>
    <style:style style:name="ce352P5" style:family="table-cell" style:parent-style-name="ce352" style:data-style-name="N120"/>
    <style:style style:name="ce352N5" style:family="table-cell" style:parent-style-name="ce352" style:data-style-name="N121"/>
    <style:style style:name="ce352C6" style:family="table-cell" style:parent-style-name="ce352" style:data-style-name="N122"/>
    <style:style style:name="ce352P6" style:family="table-cell" style:parent-style-name="ce352" style:data-style-name="N123"/>
    <style:style style:name="ce352N6" style:family="table-cell" style:parent-style-name="ce352" style:data-style-name="N124"/>
    <style:style style:name="ce352C7" style:family="table-cell" style:parent-style-name="ce352" style:data-style-name="N125"/>
    <style:style style:name="ce352P7" style:family="table-cell" style:parent-style-name="ce352" style:data-style-name="N126"/>
    <style:style style:name="ce352N7" style:family="table-cell" style:parent-style-name="ce352" style:data-style-name="N127"/>
    <style:style style:name="ce352C8" style:family="table-cell" style:parent-style-name="ce352" style:data-style-name="N128"/>
    <style:style style:name="ce352P8" style:family="table-cell" style:parent-style-name="ce352" style:data-style-name="N129"/>
    <style:style style:name="ce352N8" style:family="table-cell" style:parent-style-name="ce352" style:data-style-name="N130"/>
    <style:style style:name="ce353" style:family="table-cell">
      <style:table-cell-properties style:text-align-source="fix" style:repeat-content="false" style:vertical-align="middle" fo:border="0.74pt solid #000000" fo:background-color="#FFFF00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3DA" style:family="table-cell" style:parent-style-name="ce353" style:data-style-name="N36"/>
    <style:style style:name="ce353DH" style:family="table-cell" style:parent-style-name="ce353" style:data-style-name="N51"/>
    <style:style style:name="ce353DE" style:family="table-cell" style:parent-style-name="ce353" style:data-style-name="N76"/>
    <style:style style:name="ce353C0" style:family="table-cell" style:parent-style-name="ce353" style:data-style-name="N103"/>
    <style:style style:name="ce353P0" style:family="table-cell" style:parent-style-name="ce353" style:data-style-name="N10"/>
    <style:style style:name="ce353N0" style:family="table-cell" style:parent-style-name="ce353" style:data-style-name="N113"/>
    <style:style style:name="ce353C1" style:family="table-cell" style:parent-style-name="ce353" style:data-style-name="N110"/>
    <style:style style:name="ce353P1" style:family="table-cell" style:parent-style-name="ce353" style:data-style-name="N111"/>
    <style:style style:name="ce353N1" style:family="table-cell" style:parent-style-name="ce353" style:data-style-name="N112"/>
    <style:style style:name="ce353C2" style:family="table-cell" style:parent-style-name="ce353" style:data-style-name="N104"/>
    <style:style style:name="ce353P2" style:family="table-cell" style:parent-style-name="ce353" style:data-style-name="N11"/>
    <style:style style:name="ce353N2" style:family="table-cell" style:parent-style-name="ce353" style:data-style-name="N109"/>
    <style:style style:name="ce353C3" style:family="table-cell" style:parent-style-name="ce353" style:data-style-name="N114"/>
    <style:style style:name="ce353P3" style:family="table-cell" style:parent-style-name="ce353" style:data-style-name="N107"/>
    <style:style style:name="ce353N3" style:family="table-cell" style:parent-style-name="ce353" style:data-style-name="N115"/>
    <style:style style:name="ce353C4" style:family="table-cell" style:parent-style-name="ce353" style:data-style-name="N116"/>
    <style:style style:name="ce353P4" style:family="table-cell" style:parent-style-name="ce353" style:data-style-name="N118"/>
    <style:style style:name="ce353N4" style:family="table-cell" style:parent-style-name="ce353" style:data-style-name="N117"/>
    <style:style style:name="ce353C5" style:family="table-cell" style:parent-style-name="ce353" style:data-style-name="N119"/>
    <style:style style:name="ce353P5" style:family="table-cell" style:parent-style-name="ce353" style:data-style-name="N120"/>
    <style:style style:name="ce353N5" style:family="table-cell" style:parent-style-name="ce353" style:data-style-name="N121"/>
    <style:style style:name="ce353C6" style:family="table-cell" style:parent-style-name="ce353" style:data-style-name="N122"/>
    <style:style style:name="ce353P6" style:family="table-cell" style:parent-style-name="ce353" style:data-style-name="N123"/>
    <style:style style:name="ce353N6" style:family="table-cell" style:parent-style-name="ce353" style:data-style-name="N124"/>
    <style:style style:name="ce353C7" style:family="table-cell" style:parent-style-name="ce353" style:data-style-name="N125"/>
    <style:style style:name="ce353P7" style:family="table-cell" style:parent-style-name="ce353" style:data-style-name="N126"/>
    <style:style style:name="ce353N7" style:family="table-cell" style:parent-style-name="ce353" style:data-style-name="N127"/>
    <style:style style:name="ce353C8" style:family="table-cell" style:parent-style-name="ce353" style:data-style-name="N128"/>
    <style:style style:name="ce353P8" style:family="table-cell" style:parent-style-name="ce353" style:data-style-name="N129"/>
    <style:style style:name="ce353N8" style:family="table-cell" style:parent-style-name="ce353" style:data-style-name="N130"/>
    <style:style style:name="ce354" style:family="table-cell">
      <style:table-cell-properties style:text-align-source="fix" style:repeat-content="false" style:vertical-align="middle" fo:border="0.74pt solid #000000" fo:background-color="#FFFF00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4DA" style:family="table-cell" style:parent-style-name="ce354" style:data-style-name="N36"/>
    <style:style style:name="ce354DH" style:family="table-cell" style:parent-style-name="ce354" style:data-style-name="N51"/>
    <style:style style:name="ce354DE" style:family="table-cell" style:parent-style-name="ce354" style:data-style-name="N76"/>
    <style:style style:name="ce354C0" style:family="table-cell" style:parent-style-name="ce354" style:data-style-name="N103"/>
    <style:style style:name="ce354P0" style:family="table-cell" style:parent-style-name="ce354" style:data-style-name="N10"/>
    <style:style style:name="ce354N0" style:family="table-cell" style:parent-style-name="ce354" style:data-style-name="N113"/>
    <style:style style:name="ce354C1" style:family="table-cell" style:parent-style-name="ce354" style:data-style-name="N110"/>
    <style:style style:name="ce354P1" style:family="table-cell" style:parent-style-name="ce354" style:data-style-name="N111"/>
    <style:style style:name="ce354N1" style:family="table-cell" style:parent-style-name="ce354" style:data-style-name="N112"/>
    <style:style style:name="ce354C2" style:family="table-cell" style:parent-style-name="ce354" style:data-style-name="N104"/>
    <style:style style:name="ce354P2" style:family="table-cell" style:parent-style-name="ce354" style:data-style-name="N11"/>
    <style:style style:name="ce354N2" style:family="table-cell" style:parent-style-name="ce354" style:data-style-name="N109"/>
    <style:style style:name="ce354C3" style:family="table-cell" style:parent-style-name="ce354" style:data-style-name="N114"/>
    <style:style style:name="ce354P3" style:family="table-cell" style:parent-style-name="ce354" style:data-style-name="N107"/>
    <style:style style:name="ce354N3" style:family="table-cell" style:parent-style-name="ce354" style:data-style-name="N115"/>
    <style:style style:name="ce354C4" style:family="table-cell" style:parent-style-name="ce354" style:data-style-name="N116"/>
    <style:style style:name="ce354P4" style:family="table-cell" style:parent-style-name="ce354" style:data-style-name="N118"/>
    <style:style style:name="ce354N4" style:family="table-cell" style:parent-style-name="ce354" style:data-style-name="N117"/>
    <style:style style:name="ce354C5" style:family="table-cell" style:parent-style-name="ce354" style:data-style-name="N119"/>
    <style:style style:name="ce354P5" style:family="table-cell" style:parent-style-name="ce354" style:data-style-name="N120"/>
    <style:style style:name="ce354N5" style:family="table-cell" style:parent-style-name="ce354" style:data-style-name="N121"/>
    <style:style style:name="ce354C6" style:family="table-cell" style:parent-style-name="ce354" style:data-style-name="N122"/>
    <style:style style:name="ce354P6" style:family="table-cell" style:parent-style-name="ce354" style:data-style-name="N123"/>
    <style:style style:name="ce354N6" style:family="table-cell" style:parent-style-name="ce354" style:data-style-name="N124"/>
    <style:style style:name="ce354C7" style:family="table-cell" style:parent-style-name="ce354" style:data-style-name="N125"/>
    <style:style style:name="ce354P7" style:family="table-cell" style:parent-style-name="ce354" style:data-style-name="N126"/>
    <style:style style:name="ce354N7" style:family="table-cell" style:parent-style-name="ce354" style:data-style-name="N127"/>
    <style:style style:name="ce354C8" style:family="table-cell" style:parent-style-name="ce354" style:data-style-name="N128"/>
    <style:style style:name="ce354P8" style:family="table-cell" style:parent-style-name="ce354" style:data-style-name="N129"/>
    <style:style style:name="ce354N8" style:family="table-cell" style:parent-style-name="ce354" style:data-style-name="N130"/>
    <style:style style:name="ce355" style:family="table-cell">
      <style:table-cell-properties style:text-align-source="fix" style:repeat-content="false" style:vertical-align="middle" fo:border="0.74pt solid #000000" fo:background-color="#C5E0B4"/>
      <style:paragraph-properties fo:text-align="start"/>
      <style:text-properties style:font-name="Tahoma" fo:font-family="Tahoma" style:font-family-generic="swiss" style:font-pitch="variable" fo:font-size="10pt" fo:font-weight="bold"/>
    </style:style>
    <style:style style:name="ce355DA" style:family="table-cell" style:parent-style-name="ce355" style:data-style-name="N36"/>
    <style:style style:name="ce355DH" style:family="table-cell" style:parent-style-name="ce355" style:data-style-name="N51"/>
    <style:style style:name="ce355DE" style:family="table-cell" style:parent-style-name="ce355" style:data-style-name="N76"/>
    <style:style style:name="ce355C0" style:family="table-cell" style:parent-style-name="ce355" style:data-style-name="N103"/>
    <style:style style:name="ce355P0" style:family="table-cell" style:parent-style-name="ce355" style:data-style-name="N10"/>
    <style:style style:name="ce355N0" style:family="table-cell" style:parent-style-name="ce355" style:data-style-name="N113"/>
    <style:style style:name="ce355C1" style:family="table-cell" style:parent-style-name="ce355" style:data-style-name="N110"/>
    <style:style style:name="ce355P1" style:family="table-cell" style:parent-style-name="ce355" style:data-style-name="N111"/>
    <style:style style:name="ce355N1" style:family="table-cell" style:parent-style-name="ce355" style:data-style-name="N112"/>
    <style:style style:name="ce355C2" style:family="table-cell" style:parent-style-name="ce355" style:data-style-name="N104"/>
    <style:style style:name="ce355P2" style:family="table-cell" style:parent-style-name="ce355" style:data-style-name="N11"/>
    <style:style style:name="ce355N2" style:family="table-cell" style:parent-style-name="ce355" style:data-style-name="N109"/>
    <style:style style:name="ce355C3" style:family="table-cell" style:parent-style-name="ce355" style:data-style-name="N114"/>
    <style:style style:name="ce355P3" style:family="table-cell" style:parent-style-name="ce355" style:data-style-name="N107"/>
    <style:style style:name="ce355N3" style:family="table-cell" style:parent-style-name="ce355" style:data-style-name="N115"/>
    <style:style style:name="ce355C4" style:family="table-cell" style:parent-style-name="ce355" style:data-style-name="N116"/>
    <style:style style:name="ce355P4" style:family="table-cell" style:parent-style-name="ce355" style:data-style-name="N118"/>
    <style:style style:name="ce355N4" style:family="table-cell" style:parent-style-name="ce355" style:data-style-name="N117"/>
    <style:style style:name="ce355C5" style:family="table-cell" style:parent-style-name="ce355" style:data-style-name="N119"/>
    <style:style style:name="ce355P5" style:family="table-cell" style:parent-style-name="ce355" style:data-style-name="N120"/>
    <style:style style:name="ce355N5" style:family="table-cell" style:parent-style-name="ce355" style:data-style-name="N121"/>
    <style:style style:name="ce355C6" style:family="table-cell" style:parent-style-name="ce355" style:data-style-name="N122"/>
    <style:style style:name="ce355P6" style:family="table-cell" style:parent-style-name="ce355" style:data-style-name="N123"/>
    <style:style style:name="ce355N6" style:family="table-cell" style:parent-style-name="ce355" style:data-style-name="N124"/>
    <style:style style:name="ce355C7" style:family="table-cell" style:parent-style-name="ce355" style:data-style-name="N125"/>
    <style:style style:name="ce355P7" style:family="table-cell" style:parent-style-name="ce355" style:data-style-name="N126"/>
    <style:style style:name="ce355N7" style:family="table-cell" style:parent-style-name="ce355" style:data-style-name="N127"/>
    <style:style style:name="ce355C8" style:family="table-cell" style:parent-style-name="ce355" style:data-style-name="N128"/>
    <style:style style:name="ce355P8" style:family="table-cell" style:parent-style-name="ce355" style:data-style-name="N129"/>
    <style:style style:name="ce355N8" style:family="table-cell" style:parent-style-name="ce355" style:data-style-name="N130"/>
    <style:style style:name="ce356" style:family="table-cell">
      <style:table-cell-properties style:text-align-source="fix" style:repeat-content="false" style:vertical-align="middle" fo:border="0.74pt solid #000000" fo:background-color="#C5E0B4"/>
      <style:paragraph-properties fo:text-align="end"/>
      <style:text-properties style:font-name="Tahoma" fo:font-family="Tahoma" style:font-family-generic="swiss" style:font-pitch="variable" fo:font-size="10pt" fo:font-weight="bold"/>
    </style:style>
    <style:style style:name="ce356DA" style:family="table-cell" style:parent-style-name="ce356" style:data-style-name="N36"/>
    <style:style style:name="ce356DH" style:family="table-cell" style:parent-style-name="ce356" style:data-style-name="N51"/>
    <style:style style:name="ce356DE" style:family="table-cell" style:parent-style-name="ce356" style:data-style-name="N76"/>
    <style:style style:name="ce356C0" style:family="table-cell" style:parent-style-name="ce356" style:data-style-name="N103"/>
    <style:style style:name="ce356P0" style:family="table-cell" style:parent-style-name="ce356" style:data-style-name="N10"/>
    <style:style style:name="ce356N0" style:family="table-cell" style:parent-style-name="ce356" style:data-style-name="N113"/>
    <style:style style:name="ce356C1" style:family="table-cell" style:parent-style-name="ce356" style:data-style-name="N110"/>
    <style:style style:name="ce356P1" style:family="table-cell" style:parent-style-name="ce356" style:data-style-name="N111"/>
    <style:style style:name="ce356N1" style:family="table-cell" style:parent-style-name="ce356" style:data-style-name="N112"/>
    <style:style style:name="ce356C2" style:family="table-cell" style:parent-style-name="ce356" style:data-style-name="N104"/>
    <style:style style:name="ce356P2" style:family="table-cell" style:parent-style-name="ce356" style:data-style-name="N11"/>
    <style:style style:name="ce356N2" style:family="table-cell" style:parent-style-name="ce356" style:data-style-name="N109"/>
    <style:style style:name="ce356C3" style:family="table-cell" style:parent-style-name="ce356" style:data-style-name="N114"/>
    <style:style style:name="ce356P3" style:family="table-cell" style:parent-style-name="ce356" style:data-style-name="N107"/>
    <style:style style:name="ce356N3" style:family="table-cell" style:parent-style-name="ce356" style:data-style-name="N115"/>
    <style:style style:name="ce356C4" style:family="table-cell" style:parent-style-name="ce356" style:data-style-name="N116"/>
    <style:style style:name="ce356P4" style:family="table-cell" style:parent-style-name="ce356" style:data-style-name="N118"/>
    <style:style style:name="ce356N4" style:family="table-cell" style:parent-style-name="ce356" style:data-style-name="N117"/>
    <style:style style:name="ce356C5" style:family="table-cell" style:parent-style-name="ce356" style:data-style-name="N119"/>
    <style:style style:name="ce356P5" style:family="table-cell" style:parent-style-name="ce356" style:data-style-name="N120"/>
    <style:style style:name="ce356N5" style:family="table-cell" style:parent-style-name="ce356" style:data-style-name="N121"/>
    <style:style style:name="ce356C6" style:family="table-cell" style:parent-style-name="ce356" style:data-style-name="N122"/>
    <style:style style:name="ce356P6" style:family="table-cell" style:parent-style-name="ce356" style:data-style-name="N123"/>
    <style:style style:name="ce356N6" style:family="table-cell" style:parent-style-name="ce356" style:data-style-name="N124"/>
    <style:style style:name="ce356C7" style:family="table-cell" style:parent-style-name="ce356" style:data-style-name="N125"/>
    <style:style style:name="ce356P7" style:family="table-cell" style:parent-style-name="ce356" style:data-style-name="N126"/>
    <style:style style:name="ce356N7" style:family="table-cell" style:parent-style-name="ce356" style:data-style-name="N127"/>
    <style:style style:name="ce356C8" style:family="table-cell" style:parent-style-name="ce356" style:data-style-name="N128"/>
    <style:style style:name="ce356P8" style:family="table-cell" style:parent-style-name="ce356" style:data-style-name="N129"/>
    <style:style style:name="ce356N8" style:family="table-cell" style:parent-style-name="ce356" style:data-style-name="N130"/>
    <style:style style:name="ce357" style:family="table-cell">
      <style:table-cell-properties style:text-align-source="fix" style:repeat-content="false" style:vertical-align="middle" fo:border="0.74pt solid #000000" fo:background-color="#CCCCCC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7DA" style:family="table-cell" style:parent-style-name="ce357" style:data-style-name="N36"/>
    <style:style style:name="ce357DH" style:family="table-cell" style:parent-style-name="ce357" style:data-style-name="N51"/>
    <style:style style:name="ce357DE" style:family="table-cell" style:parent-style-name="ce357" style:data-style-name="N76"/>
    <style:style style:name="ce357C0" style:family="table-cell" style:parent-style-name="ce357" style:data-style-name="N103"/>
    <style:style style:name="ce357P0" style:family="table-cell" style:parent-style-name="ce357" style:data-style-name="N10"/>
    <style:style style:name="ce357N0" style:family="table-cell" style:parent-style-name="ce357" style:data-style-name="N113"/>
    <style:style style:name="ce357C1" style:family="table-cell" style:parent-style-name="ce357" style:data-style-name="N110"/>
    <style:style style:name="ce357P1" style:family="table-cell" style:parent-style-name="ce357" style:data-style-name="N111"/>
    <style:style style:name="ce357N1" style:family="table-cell" style:parent-style-name="ce357" style:data-style-name="N112"/>
    <style:style style:name="ce357C2" style:family="table-cell" style:parent-style-name="ce357" style:data-style-name="N104"/>
    <style:style style:name="ce357P2" style:family="table-cell" style:parent-style-name="ce357" style:data-style-name="N11"/>
    <style:style style:name="ce357N2" style:family="table-cell" style:parent-style-name="ce357" style:data-style-name="N109"/>
    <style:style style:name="ce357C3" style:family="table-cell" style:parent-style-name="ce357" style:data-style-name="N114"/>
    <style:style style:name="ce357P3" style:family="table-cell" style:parent-style-name="ce357" style:data-style-name="N107"/>
    <style:style style:name="ce357N3" style:family="table-cell" style:parent-style-name="ce357" style:data-style-name="N115"/>
    <style:style style:name="ce357C4" style:family="table-cell" style:parent-style-name="ce357" style:data-style-name="N116"/>
    <style:style style:name="ce357P4" style:family="table-cell" style:parent-style-name="ce357" style:data-style-name="N118"/>
    <style:style style:name="ce357N4" style:family="table-cell" style:parent-style-name="ce357" style:data-style-name="N117"/>
    <style:style style:name="ce357C5" style:family="table-cell" style:parent-style-name="ce357" style:data-style-name="N119"/>
    <style:style style:name="ce357P5" style:family="table-cell" style:parent-style-name="ce357" style:data-style-name="N120"/>
    <style:style style:name="ce357N5" style:family="table-cell" style:parent-style-name="ce357" style:data-style-name="N121"/>
    <style:style style:name="ce357C6" style:family="table-cell" style:parent-style-name="ce357" style:data-style-name="N122"/>
    <style:style style:name="ce357P6" style:family="table-cell" style:parent-style-name="ce357" style:data-style-name="N123"/>
    <style:style style:name="ce357N6" style:family="table-cell" style:parent-style-name="ce357" style:data-style-name="N124"/>
    <style:style style:name="ce357C7" style:family="table-cell" style:parent-style-name="ce357" style:data-style-name="N125"/>
    <style:style style:name="ce357P7" style:family="table-cell" style:parent-style-name="ce357" style:data-style-name="N126"/>
    <style:style style:name="ce357N7" style:family="table-cell" style:parent-style-name="ce357" style:data-style-name="N127"/>
    <style:style style:name="ce357C8" style:family="table-cell" style:parent-style-name="ce357" style:data-style-name="N128"/>
    <style:style style:name="ce357P8" style:family="table-cell" style:parent-style-name="ce357" style:data-style-name="N129"/>
    <style:style style:name="ce357N8" style:family="table-cell" style:parent-style-name="ce357" style:data-style-name="N130"/>
    <style:style style:name="ce358" style:family="table-cell">
      <style:table-cell-properties style:text-align-source="fix" style:repeat-content="false" style:vertical-align="middle" fo:border="0.74pt solid #000000" fo:background-color="#00FFFF"/>
      <style:paragraph-properties fo:text-align="start"/>
      <style:text-properties fo:color="#000000" style:font-name="Tahoma" fo:font-family="Tahoma" style:font-family-generic="swiss" style:font-pitch="variable" fo:font-size="10pt" fo:font-weight="bold"/>
    </style:style>
    <style:style style:name="ce358DA" style:family="table-cell" style:parent-style-name="ce358" style:data-style-name="N36"/>
    <style:style style:name="ce358DH" style:family="table-cell" style:parent-style-name="ce358" style:data-style-name="N51"/>
    <style:style style:name="ce358DE" style:family="table-cell" style:parent-style-name="ce358" style:data-style-name="N76"/>
    <style:style style:name="ce358C0" style:family="table-cell" style:parent-style-name="ce358" style:data-style-name="N103"/>
    <style:style style:name="ce358P0" style:family="table-cell" style:parent-style-name="ce358" style:data-style-name="N10"/>
    <style:style style:name="ce358N0" style:family="table-cell" style:parent-style-name="ce358" style:data-style-name="N113"/>
    <style:style style:name="ce358C1" style:family="table-cell" style:parent-style-name="ce358" style:data-style-name="N110"/>
    <style:style style:name="ce358P1" style:family="table-cell" style:parent-style-name="ce358" style:data-style-name="N111"/>
    <style:style style:name="ce358N1" style:family="table-cell" style:parent-style-name="ce358" style:data-style-name="N112"/>
    <style:style style:name="ce358C2" style:family="table-cell" style:parent-style-name="ce358" style:data-style-name="N104"/>
    <style:style style:name="ce358P2" style:family="table-cell" style:parent-style-name="ce358" style:data-style-name="N11"/>
    <style:style style:name="ce358N2" style:family="table-cell" style:parent-style-name="ce358" style:data-style-name="N109"/>
    <style:style style:name="ce358C3" style:family="table-cell" style:parent-style-name="ce358" style:data-style-name="N114"/>
    <style:style style:name="ce358P3" style:family="table-cell" style:parent-style-name="ce358" style:data-style-name="N107"/>
    <style:style style:name="ce358N3" style:family="table-cell" style:parent-style-name="ce358" style:data-style-name="N115"/>
    <style:style style:name="ce358C4" style:family="table-cell" style:parent-style-name="ce358" style:data-style-name="N116"/>
    <style:style style:name="ce358P4" style:family="table-cell" style:parent-style-name="ce358" style:data-style-name="N118"/>
    <style:style style:name="ce358N4" style:family="table-cell" style:parent-style-name="ce358" style:data-style-name="N117"/>
    <style:style style:name="ce358C5" style:family="table-cell" style:parent-style-name="ce358" style:data-style-name="N119"/>
    <style:style style:name="ce358P5" style:family="table-cell" style:parent-style-name="ce358" style:data-style-name="N120"/>
    <style:style style:name="ce358N5" style:family="table-cell" style:parent-style-name="ce358" style:data-style-name="N121"/>
    <style:style style:name="ce358C6" style:family="table-cell" style:parent-style-name="ce358" style:data-style-name="N122"/>
    <style:style style:name="ce358P6" style:family="table-cell" style:parent-style-name="ce358" style:data-style-name="N123"/>
    <style:style style:name="ce358N6" style:family="table-cell" style:parent-style-name="ce358" style:data-style-name="N124"/>
    <style:style style:name="ce358C7" style:family="table-cell" style:parent-style-name="ce358" style:data-style-name="N125"/>
    <style:style style:name="ce358P7" style:family="table-cell" style:parent-style-name="ce358" style:data-style-name="N126"/>
    <style:style style:name="ce358N7" style:family="table-cell" style:parent-style-name="ce358" style:data-style-name="N127"/>
    <style:style style:name="ce358C8" style:family="table-cell" style:parent-style-name="ce358" style:data-style-name="N128"/>
    <style:style style:name="ce358P8" style:family="table-cell" style:parent-style-name="ce358" style:data-style-name="N129"/>
    <style:style style:name="ce358N8" style:family="table-cell" style:parent-style-name="ce358" style:data-style-name="N130"/>
    <style:style style:name="ce359" style:family="table-cell">
      <style:table-cell-properties style:text-align-source="fix" style:repeat-content="false" style:vertical-align="middle" fo:border="0.74pt solid #000000" fo:background-color="#00FFFF"/>
      <style:paragraph-properties fo:text-align="end"/>
      <style:text-properties fo:color="#000000" style:font-name="Tahoma" fo:font-family="Tahoma" style:font-family-generic="swiss" style:font-pitch="variable" fo:font-size="10pt" fo:font-weight="bold"/>
    </style:style>
    <style:style style:name="ce359DA" style:family="table-cell" style:parent-style-name="ce359" style:data-style-name="N36"/>
    <style:style style:name="ce359DH" style:family="table-cell" style:parent-style-name="ce359" style:data-style-name="N51"/>
    <style:style style:name="ce359DE" style:family="table-cell" style:parent-style-name="ce359" style:data-style-name="N76"/>
    <style:style style:name="ce359C0" style:family="table-cell" style:parent-style-name="ce359" style:data-style-name="N103"/>
    <style:style style:name="ce359P0" style:family="table-cell" style:parent-style-name="ce359" style:data-style-name="N10"/>
    <style:style style:name="ce359N0" style:family="table-cell" style:parent-style-name="ce359" style:data-style-name="N113"/>
    <style:style style:name="ce359C1" style:family="table-cell" style:parent-style-name="ce359" style:data-style-name="N110"/>
    <style:style style:name="ce359P1" style:family="table-cell" style:parent-style-name="ce359" style:data-style-name="N111"/>
    <style:style style:name="ce359N1" style:family="table-cell" style:parent-style-name="ce359" style:data-style-name="N112"/>
    <style:style style:name="ce359C2" style:family="table-cell" style:parent-style-name="ce359" style:data-style-name="N104"/>
    <style:style style:name="ce359P2" style:family="table-cell" style:parent-style-name="ce359" style:data-style-name="N11"/>
    <style:style style:name="ce359N2" style:family="table-cell" style:parent-style-name="ce359" style:data-style-name="N109"/>
    <style:style style:name="ce359C3" style:family="table-cell" style:parent-style-name="ce359" style:data-style-name="N114"/>
    <style:style style:name="ce359P3" style:family="table-cell" style:parent-style-name="ce359" style:data-style-name="N107"/>
    <style:style style:name="ce359N3" style:family="table-cell" style:parent-style-name="ce359" style:data-style-name="N115"/>
    <style:style style:name="ce359C4" style:family="table-cell" style:parent-style-name="ce359" style:data-style-name="N116"/>
    <style:style style:name="ce359P4" style:family="table-cell" style:parent-style-name="ce359" style:data-style-name="N118"/>
    <style:style style:name="ce359N4" style:family="table-cell" style:parent-style-name="ce359" style:data-style-name="N117"/>
    <style:style style:name="ce359C5" style:family="table-cell" style:parent-style-name="ce359" style:data-style-name="N119"/>
    <style:style style:name="ce359P5" style:family="table-cell" style:parent-style-name="ce359" style:data-style-name="N120"/>
    <style:style style:name="ce359N5" style:family="table-cell" style:parent-style-name="ce359" style:data-style-name="N121"/>
    <style:style style:name="ce359C6" style:family="table-cell" style:parent-style-name="ce359" style:data-style-name="N122"/>
    <style:style style:name="ce359P6" style:family="table-cell" style:parent-style-name="ce359" style:data-style-name="N123"/>
    <style:style style:name="ce359N6" style:family="table-cell" style:parent-style-name="ce359" style:data-style-name="N124"/>
    <style:style style:name="ce359C7" style:family="table-cell" style:parent-style-name="ce359" style:data-style-name="N125"/>
    <style:style style:name="ce359P7" style:family="table-cell" style:parent-style-name="ce359" style:data-style-name="N126"/>
    <style:style style:name="ce359N7" style:family="table-cell" style:parent-style-name="ce359" style:data-style-name="N127"/>
    <style:style style:name="ce359C8" style:family="table-cell" style:parent-style-name="ce359" style:data-style-name="N128"/>
    <style:style style:name="ce359P8" style:family="table-cell" style:parent-style-name="ce359" style:data-style-name="N129"/>
    <style:style style:name="ce359N8" style:family="table-cell" style:parent-style-name="ce359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20" meta:object-count="0"/>
    <meta:generator>LibreOffice/4.3.0.4$Windows_x86 LibreOffice_project/62ad5818884a2fc2e5780dd45466868d41009ec0</meta:generator>
  </office:meta>
</office:document-meta>
</file>