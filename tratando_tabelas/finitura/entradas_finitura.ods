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9/07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7">
            <text:p>3101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1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34">
            <text:p>0,030</text:p>
          </table:table-cell>
          <table:table-cell table:style-name="ce12N2" office:value-type="float" office:value="9.82">
            <text:p>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03.58">
            <text:p>12203,58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83">
            <text:p>109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1012.17">
            <text:p>10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1601700182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7">
            <text:p>31025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313884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1">
            <text:p>310261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9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9.45">
            <text:p>364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247.79">
            <text:p>3247,79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77924">
            <text:p>0,07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03.55">
            <text:p>2903,55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3">
            <text:p>26,13</text:p>
          </table:table-cell>
          <table:table-cell table:style-name="ce12N2" office:value-type="float" office:value="41.67">
            <text:p>4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6.66">
            <text:p>316,66</text:p>
          </table:table-cell>
          <table:table-cell table:style-name="ce12N2" office:value-type="float" office:value="3332.79">
            <text:p>3332,79</text:p>
          </table:table-cell>
          <table:table-cell table:style-name="ce12N2" office:value-type="float" office:value="133.31">
            <text:p>13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9251690393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5">
            <text:p>310325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6.95">
            <text:p>302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5.2">
            <text:p>2555,20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4.45">
            <text:p>264,45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110.5">
            <text:p>11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7716263000102550010000109091408146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3">
            <text:p>31036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37.68">
            <text:p>6537,68</text:p>
          </table:table-cell>
          <table:table-cell table:style-name="ce12N2" office:value-type="float" office:value="1862.72">
            <text:p>1862,72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19.6">
            <text:p>78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37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94.99">
            <text:p>5094,99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85">
            <text:p>45,85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80.8">
            <text:p>580,80</text:p>
          </table:table-cell>
          <table:table-cell table:style-name="ce12N2" office:value-type="float" office:value="5956.88">
            <text:p>5956,88</text:p>
          </table:table-cell>
          <table:table-cell table:style-name="ce12N2" office:value-type="float" office:value="238.27">
            <text:p>23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778141200010955001000012096100033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4">
            <text:p>310484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4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75">
            <text:p>3425,75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148.15">
            <text:p>14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136190000131550010000644761036575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1">
            <text:p>11,00</text:p>
          </table:table-cell>
          <table:table-cell table:style-name="ce26N2" office:value-type="float" office:value="1862.72">
            <text:p>1862,72</text:p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78.57">
            <text:p>1678,57</text:p>
          </table:table-cell>
          <table:table-cell table:style-name="ce26N2" office:value-type="float" office:value="43054.13">
            <text:p>43054,13</text:p>
          </table:table-cell>
          <table:table-cell table:style-name="ce26N2" office:value-type="float" office:value="2456.98">
            <text:p>2456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732.7">
            <text:p>44732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33137">
            <text:p>0,331</text:p>
          </table:table-cell>
          <table:table-cell table:style-name="ce26N2" office:value-type="float" office:value="44831.85">
            <text:p>44831,85</text:p>
          </table:table-cell>
          <table:table-cell table:style-name="ce26N2" office:value-type="float" office:value="44732.7">
            <text:p>44732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969.16">
            <text:p>35969,16</text:p>
          </table:table-cell>
          <table:table-cell table:style-name="ce26N2" office:value-type="float" office:value="35.98">
            <text:p>35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23.7">
            <text:p>323,7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3.11">
            <text:p>93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6">
            <text:p>40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8" meta:object-count="0"/>
    <meta:generator>LibreOffice/4.3.0.4$Windows_x86 LibreOffice_project/62ad5818884a2fc2e5780dd45466868d41009ec0</meta:generator>
  </office:meta>
</office:document-meta>
</file>