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4/05/2026 07:42:43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6">
            <text:p>3055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7698">
            <text:p>0,468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7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411.53">
            <text:p>41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1819958126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0">
            <text:p>3055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4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59">
            <text:p>0,031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1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218.5">
            <text:p>2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4461527273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1">
            <text:p>3055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5361507400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1">
            <text:p>3056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7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136.22">
            <text:p>13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7511066401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4">
            <text:p>3057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16">
            <text:p>0,004</text:p>
          </table:table-cell>
          <table:table-cell table:style-name="ce12N2" office:value-type="float" office:value="0.97">
            <text:p>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117.19">
            <text:p>11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551861934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1">
            <text:p>3057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08">
            <text:p>0,031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437.34">
            <text:p>43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010509759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8">
            <text:p>305778</text:p>
          </table:table-cell>
          <table:table-cell table:style-name="ce0" table:number-columns-spanned="4" table:number-rows-spanned="1" office:value-type="string" calcext:value-type="string">
            <text:p>11.857 - GOLDEN ART INDUSTRIA E COMERCIO LTDA - EPP</text:p>
          </table:table-cell>
          <table:covered-table-cell table:number-columns-repeated="3"/>
          <table:table-cell table:style-name="ce0" office:value-type="string" calcext:value-type="string">
            <text:p>53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78">
            <text:p>8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04.78">
            <text:p>104,78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51.1">
            <text:p>5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3654471000180550010000536161000320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9">
            <text:p>3058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3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211.33">
            <text:p>21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3901051401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2">
            <text:p>3059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213913337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4">
            <text:p>3059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3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3.52">
            <text:p>258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83.52">
            <text:p>25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3.52">
            <text:p>2583,52</text:p>
          </table:table-cell>
          <table:table-cell table:style-name="ce12N2" office:value-type="float" office:value="180.85">
            <text:p>1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321186601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1">
            <text:p>3060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82.7">
            <text:p>8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6841835737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5">
            <text:p>30600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6.1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96">
            <text:p>0,074</text:p>
          </table:table-cell>
          <table:table-cell table:style-name="ce12N2" office:value-type="float" office:value="43.13">
            <text:p>4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60.33">
            <text:p>6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61881648923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0">
            <text:p>30615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0.21">
            <text:p>1970,21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144.92">
            <text:p>14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601004422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7">
            <text:p>306157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1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04.49">
            <text:p>1120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0131.65">
            <text:p>10131,65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398">
            <text:p>0,024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04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79">
            <text:p>55,7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987.84">
            <text:p>987,84</text:p>
          </table:table-cell>
          <table:table-cell table:style-name="ce12N2" office:value-type="float" office:value="10216.65">
            <text:p>10216,65</text:p>
          </table:table-cell>
          <table:table-cell table:style-name="ce12N2" office:value-type="float" office:value="408.68">
            <text:p>40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10691158000370550010002916251859632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3">
            <text:p>30617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261.14">
            <text:p>2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311004422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2">
            <text:p>306272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16.19">
            <text:p>14916,19</text:p>
          </table:table-cell>
          <table:table-cell table:style-name="ce12N2" office:value-type="float" office:value="3433.93">
            <text:p>3433,93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7025">
            <text:p>170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1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">
            <text:p>8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325.12">
            <text:p>1325,12</text:p>
          </table:table-cell>
          <table:table-cell table:style-name="ce12N2" office:value-type="float" office:value="13591.07">
            <text:p>13591,07</text:p>
          </table:table-cell>
          <table:table-cell table:style-name="ce12N2" office:value-type="float" office:value="543.65">
            <text:p>54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81000336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7">
            <text:p>306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0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976">
            <text:p>0,021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1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14.13">
            <text:p>10714,13</text:p>
          </table:table-cell>
          <table:table-cell table:style-name="ce12N2" office:value-type="float" office:value="749.99">
            <text:p>74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0231262652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9">
            <text:p>306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38">
            <text:p>891,38</text:p>
          </table:table-cell>
          <table:table-cell table:style-name="ce12N2" office:value-type="float" office:value="62.4">
            <text:p>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711217572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5">
            <text:p>3063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0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54">
            <text:p>1593,54</text:p>
          </table:table-cell>
          <table:table-cell table:style-name="ce12N2" office:value-type="float" office:value="111.55">
            <text:p>11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0651791456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8">
            <text:p>306338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0.38">
            <text:p>900,38</text:p>
          </table:table-cell>
          <table:table-cell table:style-name="ce12N2" office:value-type="float" office:value="36.02">
            <text:p>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8954480005605500100000069613675614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9">
            <text:p>29,00</text:p>
          </table:table-cell>
          <table:table-cell table:style-name="ce26N2" office:value-type="float" office:value="3433.93">
            <text:p>3433,93</text:p>
          </table:table-cell>
          <table:table-cell table:style-name="ce26N2" office:value-type="float" office:value="185">
            <text:p>1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117.14">
            <text:p>3117,14</text:p>
          </table:table-cell>
          <table:table-cell table:style-name="ce26N2" office:value-type="float" office:value="102191.78">
            <text:p>102191,78</text:p>
          </table:table-cell>
          <table:table-cell table:style-name="ce26N2" office:value-type="float" office:value="5885.52">
            <text:p>5885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5308.92">
            <text:p>105308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781832">
            <text:p>1,782</text:p>
          </table:table-cell>
          <table:table-cell table:style-name="ce26N2" office:value-type="float" office:value="105440.71">
            <text:p>105440,71</text:p>
          </table:table-cell>
          <table:table-cell table:style-name="ce26N2" office:value-type="float" office:value="105308.92">
            <text:p>105308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28.27">
            <text:p>228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.5">
            <text:p>37,5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8" meta:object-count="0"/>
    <meta:generator>LibreOffice/4.3.0.4$Windows_x86 LibreOffice_project/62ad5818884a2fc2e5780dd45466868d41009ec0</meta:generator>
  </office:meta>
</office:document-meta>
</file>