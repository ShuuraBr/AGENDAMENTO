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3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3">
            <text:p>307893</text:p>
          </table:table-cell>
          <table:table-cell table:style-name="ce0" table:number-columns-spanned="4" table:number-rows-spanned="1" office:value-type="string" calcext:value-type="string">
            <text:p>2.840 - PBG S/A</text:p>
          </table:table-cell>
          <table:covered-table-cell table:number-columns-repeated="3"/>
          <table:table-cell table:style-name="ce0" office:value-type="string" calcext:value-type="string">
            <text:p>2.923.8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.9">
            <text:p>5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9">
            <text:p>0,001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39.57">
            <text:p>3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3475913000272550010029238891557611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5">
            <text:p>3079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9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397.47">
            <text:p>39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951838469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8">
            <text:p>308008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41728954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9">
            <text:p>308009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4">
            <text:p>41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51754454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0">
            <text:p>30801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5">
            <text:p>0,001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6">
            <text:p>41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39.86">
            <text:p>3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61844998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1">
            <text:p>30801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31.47">
            <text:p>3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461760740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2">
            <text:p>30801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88.89">
            <text:p>8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31439851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3">
            <text:p>30801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84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16.03">
            <text:p>1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41237469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6">
            <text:p>30801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14">
            <text:p>0,0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119.61">
            <text:p>1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51565619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3">
            <text:p>30803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.06">
            <text:p>1060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84.56">
            <text:p>9584,5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497">
            <text:p>0,045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04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9.66">
            <text:p>69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934.5">
            <text:p>934,50</text:p>
          </table:table-cell>
          <table:table-cell table:style-name="ce12N2" office:value-type="float" office:value="9669.56">
            <text:p>9669,56</text:p>
          </table:table-cell>
          <table:table-cell table:style-name="ce12N2" office:value-type="float" office:value="386.79">
            <text:p>38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04217356066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8">
            <text:p>30805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2.8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6">
            <text:p>0,816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239.04">
            <text:p>23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136190000131550010000628911620246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5">
            <text:p>308135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190.91">
            <text:p>19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234005000135550010000073891000007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1">
            <text:p>3081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8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5">
            <text:p>0,01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3.81">
            <text:p>2553,81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8">
            <text:p>2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211.81">
            <text:p>2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8281391530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9">
            <text:p>308249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1">
            <text:p>393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.58">
            <text:p>3313,58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3">
            <text:p>29,8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49.29">
            <text:p>349,29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143.3">
            <text:p>14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891398955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6">
            <text:p>3082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9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49">
            <text:p>2189,49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1">
            <text:p>19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181.6">
            <text:p>1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211814026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3">
            <text:p>30848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5">
            <text:p>0,01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6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02">
            <text:p>4089,02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">
            <text:p>36,8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319.43">
            <text:p>31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21911859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4">
            <text:p>30848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5">
            <text:p>0,006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53">
            <text:p>2668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1">
            <text:p>24,0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208.47">
            <text:p>2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3136608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5">
            <text:p>30848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.68">
            <text:p>682,68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41.97">
            <text:p>41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53.33">
            <text:p>5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41550813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6">
            <text:p>30848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38">
            <text:p>1365,38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106.66">
            <text:p>10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51098810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0">
            <text:p>30849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4">
            <text:p>0,0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35.56">
            <text:p>3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61333138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0">
            <text:p>3085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7.76">
            <text:p>1077,7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61993399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2">
            <text:p>3085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451740153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4">
            <text:p>3085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2.01">
            <text:p>2662,01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6">
            <text:p>23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220.79">
            <text:p>22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21154203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6">
            <text:p>30852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1.4">
            <text:p>1341,40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1.57">
            <text:p>1291,57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100.9">
            <text:p>1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8028676000103550010000568011004452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2">
            <text:p>308552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5.65">
            <text:p>394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68.5">
            <text:p>356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00.72">
            <text:p>3300,72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7">
            <text:p>29,7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77.15">
            <text:p>377,15</text:p>
          </table:table-cell>
          <table:table-cell table:style-name="ce12N2" office:value-type="float" office:value="3568.5">
            <text:p>3568,50</text:p>
          </table:table-cell>
          <table:table-cell table:style-name="ce12N2" office:value-type="float" office:value="142.74">
            <text:p>14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8101399114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2">
            <text:p>3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85">
            <text:p>1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946.32">
            <text:p>1946,32</text:p>
          </table:table-cell>
          <table:table-cell table:style-name="ce26N2" office:value-type="float" office:value="89320.77">
            <text:p>89320,77</text:p>
          </table:table-cell>
          <table:table-cell table:style-name="ce26N2" office:value-type="float" office:value="5092.25">
            <text:p>5092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1260.78">
            <text:p>91260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097208">
            <text:p>1,097</text:p>
          </table:table-cell>
          <table:table-cell table:style-name="ce26N2" office:value-type="float" office:value="89129.46">
            <text:p>89129,46</text:p>
          </table:table-cell>
          <table:table-cell table:style-name="ce26N2" office:value-type="float" office:value="91260.78">
            <text:p>91260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3501.09">
            <text:p>33501,09</text:p>
          </table:table-cell>
          <table:table-cell table:style-name="ce26N2" office:value-type="float" office:value="33.5">
            <text:p>33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01.5">
            <text:p>301,5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53.34">
            <text:p>253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35">
            <text:p>39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74" meta:object-count="0"/>
    <meta:generator>LibreOffice/4.3.0.4$Windows_x86 LibreOffice_project/62ad5818884a2fc2e5780dd45466868d41009ec0</meta:generator>
  </office:meta>
</office:document-meta>
</file>