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24/06/2026 07:16:26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9226">
            <text:p>30922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5.74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22.6">
            <text:p>2922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22.6">
            <text:p>2922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744">
            <text:p>0,001</text:p>
          </table:table-cell>
          <table:table-cell table:style-name="ce12N2" office:value-type="float" office:value="2.18">
            <text:p>2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22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66.6">
            <text:p>2466,60</text:p>
          </table:table-cell>
          <table:table-cell table:style-name="ce12N2" office:value-type="float" office:value="2.47">
            <text:p>2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2">
            <text:p>22,2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22.6">
            <text:p>2922,60</text:p>
          </table:table-cell>
          <table:table-cell table:style-name="ce12N2" office:value-type="float" office:value="204.58">
            <text:p>204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574210403100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42">
            <text:p>309242</text:p>
          </table:table-cell>
          <table:table-cell table:style-name="ce0" table:number-columns-spanned="4" table:number-rows-spanned="1" office:value-type="string" calcext:value-type="string">
            <text:p>22.015 - FOCO METALLO FABRICACAO E MONTAGEM DE LUMINARIAS E COMERCIO</text:p>
          </table:table-cell>
          <table:covered-table-cell table:number-columns-repeated="3"/>
          <table:table-cell table:style-name="ce0" office:value-type="string" calcext:value-type="string">
            <text:p>23.7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31.85">
            <text:p>1731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78">
            <text:p>157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292">
            <text:p>0,5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31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09.94">
            <text:p>1409,94</text:p>
          </table:table-cell>
          <table:table-cell table:style-name="ce12N2" office:value-type="float" office:value="1.41">
            <text:p>1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68">
            <text:p>12,68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53.85">
            <text:p>153,85</text:p>
          </table:table-cell>
          <table:table-cell table:style-name="ce12N2" office:value-type="float" office:value="1578">
            <text:p>1578,00</text:p>
          </table:table-cell>
          <table:table-cell table:style-name="ce12N2" office:value-type="float" office:value="110.46">
            <text:p>110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226708370001805500100002379915434199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46">
            <text:p>30934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8.12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98.76">
            <text:p>2898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98.76">
            <text:p>2898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946">
            <text:p>0,005</text:p>
          </table:table-cell>
          <table:table-cell table:style-name="ce12N2" office:value-type="float" office:value="1.75">
            <text:p>1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98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46.48">
            <text:p>2446,48</text:p>
          </table:table-cell>
          <table:table-cell table:style-name="ce12N2" office:value-type="float" office:value="2.45">
            <text:p>2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02">
            <text:p>22,0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98.76">
            <text:p>2898,76</text:p>
          </table:table-cell>
          <table:table-cell table:style-name="ce12N2" office:value-type="float" office:value="202.91">
            <text:p>20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812210194570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85">
            <text:p>309385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5.090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97.51">
            <text:p>6597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6011.4">
            <text:p>6011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597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37.13">
            <text:p>5237,13</text:p>
          </table:table-cell>
          <table:table-cell table:style-name="ce12N2" office:value-type="float" office:value="5.24">
            <text:p>5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13">
            <text:p>47,13</text:p>
          </table:table-cell>
          <table:table-cell table:style-name="ce12N2" office:value-type="float" office:value="57.33">
            <text:p>57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586.11">
            <text:p>586,11</text:p>
          </table:table-cell>
          <table:table-cell table:style-name="ce12N2" office:value-type="float" office:value="6011.4">
            <text:p>6011,40</text:p>
          </table:table-cell>
          <table:table-cell table:style-name="ce12N2" office:value-type="float" office:value="240.46">
            <text:p>240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356353460001405500200011509018064613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95">
            <text:p>309395</text:p>
          </table:table-cell>
          <table:table-cell table:style-name="ce0" table:number-columns-spanned="4" table:number-rows-spanned="1" office:value-type="string" calcext:value-type="string">
            <text:p>16.008 - MEKAL METALURGICA KADOW S.A.</text:p>
          </table:table-cell>
          <table:covered-table-cell table:number-columns-repeated="3"/>
          <table:table-cell table:style-name="ce0" office:value-type="string" calcext:value-type="string">
            <text:p>10.47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19.72">
            <text:p>351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19.72">
            <text:p>3519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19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70.54">
            <text:p>2970,54</text:p>
          </table:table-cell>
          <table:table-cell table:style-name="ce12N2" office:value-type="float" office:value="2.97">
            <text:p>2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73">
            <text:p>26,7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19.72">
            <text:p>3519,72</text:p>
          </table:table-cell>
          <table:table-cell table:style-name="ce12N2" office:value-type="float" office:value="246.38">
            <text:p>246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70373920001805500300001047315539357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98">
            <text:p>309398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2.261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57.93">
            <text:p>4157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157.93">
            <text:p>4157,9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608">
            <text:p>0,005</text:p>
          </table:table-cell>
          <table:table-cell table:style-name="ce12N2" office:value-type="float" office:value="53.13">
            <text:p>53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57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09.18">
            <text:p>3509,18</text:p>
          </table:table-cell>
          <table:table-cell table:style-name="ce12N2" office:value-type="float" office:value="3.51">
            <text:p>3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58">
            <text:p>31,58</text:p>
          </table:table-cell>
          <table:table-cell table:style-name="ce12N2" office:value-type="float" office:value="55.98">
            <text:p>55,9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57.93">
            <text:p>4157,93</text:p>
          </table:table-cell>
          <table:table-cell table:style-name="ce12N2" office:value-type="float" office:value="291.05">
            <text:p>291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8215460001025501000000226117105271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98">
            <text:p>309598</text:p>
          </table:table-cell>
          <table:table-cell table:style-name="ce0" table:number-columns-spanned="4" table:number-rows-spanned="1" office:value-type="string" calcext:value-type="string">
            <text:p>27.705 - DOKA - INDUSTRIA E COMERCIO LTDA</text:p>
          </table:table-cell>
          <table:covered-table-cell table:number-columns-repeated="3"/>
          <table:table-cell table:style-name="ce0" office:value-type="string" calcext:value-type="string">
            <text:p>63.9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32">
            <text:p>64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432">
            <text:p>64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2">
            <text:p>0,720</text:p>
          </table:table-cell>
          <table:table-cell table:style-name="ce12N2" office:value-type="float" office:value="43.5">
            <text:p>43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4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949.34">
            <text:p>5949,34</text:p>
          </table:table-cell>
          <table:table-cell table:style-name="ce12N2" office:value-type="float" office:value="5.95">
            <text:p>5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.54">
            <text:p>53,5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32">
            <text:p>6432,00</text:p>
          </table:table-cell>
          <table:table-cell table:style-name="ce12N2" office:value-type="float" office:value="257.28">
            <text:p>257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11361900001315500100006392017645446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50">
            <text:p>30965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19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42.04">
            <text:p>9242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242.04">
            <text:p>9242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862">
            <text:p>0,042</text:p>
          </table:table-cell>
          <table:table-cell table:style-name="ce12N2" office:value-type="float" office:value="14.04">
            <text:p>14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242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800.06">
            <text:p>7800,06</text:p>
          </table:table-cell>
          <table:table-cell table:style-name="ce12N2" office:value-type="float" office:value="7.8">
            <text:p>7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.2">
            <text:p>70,2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242.04">
            <text:p>9242,04</text:p>
          </table:table-cell>
          <table:table-cell table:style-name="ce12N2" office:value-type="float" office:value="646.94">
            <text:p>646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19617510513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69">
            <text:p>30966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35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6.74">
            <text:p>846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46.74">
            <text:p>846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0.43">
            <text:p>0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6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14.62">
            <text:p>714,62</text:p>
          </table:table-cell>
          <table:table-cell table:style-name="ce12N2" office:value-type="float" office:value="0.71">
            <text:p>0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43">
            <text:p>6,4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6.74">
            <text:p>846,74</text:p>
          </table:table-cell>
          <table:table-cell table:style-name="ce12N2" office:value-type="float" office:value="59.27">
            <text:p>59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35512884207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73">
            <text:p>30967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68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03.28">
            <text:p>2603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03.28">
            <text:p>2603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76">
            <text:p>0,006</text:p>
          </table:table-cell>
          <table:table-cell table:style-name="ce12N2" office:value-type="float" office:value="1.44">
            <text:p>1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03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97.11">
            <text:p>2197,11</text:p>
          </table:table-cell>
          <table:table-cell table:style-name="ce12N2" office:value-type="float" office:value="2.2">
            <text:p>2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77">
            <text:p>19,7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03.28">
            <text:p>2603,28</text:p>
          </table:table-cell>
          <table:table-cell table:style-name="ce12N2" office:value-type="float" office:value="182.23">
            <text:p>182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68614061055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74">
            <text:p>30967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77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13.42">
            <text:p>2213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13.42">
            <text:p>2213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353">
            <text:p>0,010</text:p>
          </table:table-cell>
          <table:table-cell table:style-name="ce12N2" office:value-type="float" office:value="1.65">
            <text:p>1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13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68.07">
            <text:p>1868,07</text:p>
          </table:table-cell>
          <table:table-cell table:style-name="ce12N2" office:value-type="float" office:value="1.87">
            <text:p>1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81">
            <text:p>16,8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13.42">
            <text:p>2213,42</text:p>
          </table:table-cell>
          <table:table-cell table:style-name="ce12N2" office:value-type="float" office:value="154.94">
            <text:p>154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77614199362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11">
            <text:p>11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739.96">
            <text:p>739,96</text:p>
          </table:table-cell>
          <table:table-cell table:style-name="ce26N2" office:value-type="float" office:value="42425.89">
            <text:p>42425,89</text:p>
          </table:table-cell>
          <table:table-cell table:style-name="ce26N2" office:value-type="float" office:value="2596.5">
            <text:p>2596,5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3165.85">
            <text:p>43165,8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.317473">
            <text:p>1,317</text:p>
          </table:table-cell>
          <table:table-cell table:style-name="ce26N2" office:value-type="float" office:value="42425.89">
            <text:p>42425,89</text:p>
          </table:table-cell>
          <table:table-cell table:style-name="ce26N2" office:value-type="float" office:value="43165.85">
            <text:p>43165,8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6569.07">
            <text:p>36569,07</text:p>
          </table:table-cell>
          <table:table-cell table:style-name="ce26N2" office:value-type="float" office:value="36.58">
            <text:p>36,5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29.09">
            <text:p>329,09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18.12">
            <text:p>118,1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5.46">
            <text:p>35,4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FINITUR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88" meta:object-count="0"/>
    <meta:generator>LibreOffice/4.3.0.4$Windows_x86 LibreOffice_project/62ad5818884a2fc2e5780dd45466868d41009ec0</meta:generator>
  </office:meta>
</office:document-meta>
</file>