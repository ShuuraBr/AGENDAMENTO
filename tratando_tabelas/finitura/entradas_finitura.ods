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5/06/2026 07:37:42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8086">
            <text:p>30808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2.07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.3">
            <text:p>8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67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08.44">
            <text:p>5808,44</text:p>
          </table:table-cell>
          <table:table-cell table:style-name="ce12N2" office:value-type="float" office:value="5.81">
            <text:p>5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.28">
            <text:p>52,2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266.69">
            <text:p>26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207812318337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15">
            <text:p>308715</text:p>
          </table:table-cell>
          <table:table-cell table:style-name="ce0" table:number-columns-spanned="4" table:number-rows-spanned="1" office:value-type="string" calcext:value-type="string">
            <text:p>16.540 - LEXXA METAIS SANITARIOS LTDA</text:p>
          </table:table-cell>
          <table:covered-table-cell table:number-columns-repeated="3"/>
          <table:table-cell table:style-name="ce0" office:value-type="string" calcext:value-type="string">
            <text:p>11.1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0.83">
            <text:p>376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430.18">
            <text:p>3430,18</text:p>
          </table:table-cell>
          <table:table-cell table:style-name="ce12N2" office:value-type="float" office:value="269">
            <text:p>269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0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21.59">
            <text:p>3421,59</text:p>
          </table:table-cell>
          <table:table-cell table:style-name="ce12N2" office:value-type="float" office:value="3.42">
            <text:p>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8">
            <text:p>30,80</text:p>
          </table:table-cell>
          <table:table-cell table:style-name="ce12N2" office:value-type="float" office:value="41">
            <text:p>4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61.65">
            <text:p>61,65</text:p>
          </table:table-cell>
          <table:table-cell table:style-name="ce12N2" office:value-type="float" office:value="3699.18">
            <text:p>3699,18</text:p>
          </table:table-cell>
          <table:table-cell table:style-name="ce12N2" office:value-type="float" office:value="147.96">
            <text:p>147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07002210002535500100001111718768678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33">
            <text:p>3087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9.53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27.89">
            <text:p>1527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34.64">
            <text:p>143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5">
            <text:p>0,009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27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0.8">
            <text:p>1210,80</text:p>
          </table:table-cell>
          <table:table-cell table:style-name="ce12N2" office:value-type="float" office:value="1.21">
            <text:p>1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9">
            <text:p>10,9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93.25">
            <text:p>93,25</text:p>
          </table:table-cell>
          <table:table-cell table:style-name="ce12N2" office:value-type="float" office:value="1434.64">
            <text:p>1434,64</text:p>
          </table:table-cell>
          <table:table-cell table:style-name="ce12N2" office:value-type="float" office:value="100.42">
            <text:p>100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5953514696605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6">
            <text:p>308856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5.0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918.03">
            <text:p>16918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15266.73">
            <text:p>15266,73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39892">
            <text:p>0,040</text:p>
          </table:table-cell>
          <table:table-cell table:style-name="ce12N2" office:value-type="float" office:value="35.26">
            <text:p>35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918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374.41">
            <text:p>13374,41</text:p>
          </table:table-cell>
          <table:table-cell table:style-name="ce12N2" office:value-type="float" office:value="13.4">
            <text:p>1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.37">
            <text:p>120,37</text:p>
          </table:table-cell>
          <table:table-cell table:style-name="ce12N2" office:value-type="float" office:value="55.86">
            <text:p>55,8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1566.3">
            <text:p>1566,30</text:p>
          </table:table-cell>
          <table:table-cell table:style-name="ce12N2" office:value-type="float" office:value="15351.73">
            <text:p>15351,73</text:p>
          </table:table-cell>
          <table:table-cell table:style-name="ce12N2" office:value-type="float" office:value="614.08">
            <text:p>614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10691158000370550010002950661391791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4">
            <text:p>4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54">
            <text:p>354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721.2">
            <text:p>1721,20</text:p>
          </table:table-cell>
          <table:table-cell table:style-name="ce26N2" office:value-type="float" office:value="27152.72">
            <text:p>27152,72</text:p>
          </table:table-cell>
          <table:table-cell table:style-name="ce26N2" office:value-type="float" office:value="1129.15">
            <text:p>1129,1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8873.92">
            <text:p>28873,9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048392">
            <text:p>0,048</text:p>
          </table:table-cell>
          <table:table-cell table:style-name="ce26N2" office:value-type="float" office:value="26798.72">
            <text:p>26798,72</text:p>
          </table:table-cell>
          <table:table-cell table:style-name="ce26N2" office:value-type="float" office:value="28873.92">
            <text:p>28873,9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3815.24">
            <text:p>23815,24</text:p>
          </table:table-cell>
          <table:table-cell table:style-name="ce26N2" office:value-type="float" office:value="23.84">
            <text:p>23,8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14.35">
            <text:p>214,35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49.56">
            <text:p>49,5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6.02">
            <text:p>46,0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FINITUR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26" meta:object-count="0"/>
    <meta:generator>LibreOffice/4.3.0.4$Windows_x86 LibreOffice_project/62ad5818884a2fc2e5780dd45466868d41009ec0</meta:generator>
  </office:meta>
</office:document-meta>
</file>