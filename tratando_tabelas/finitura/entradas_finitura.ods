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7/07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10272">
            <text:p>3102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7.26">
            <text:p>1317,2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56.96">
            <text:p>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689544800013655001000065985190495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3">
            <text:p>3104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3">
            <text:p>0,020</text:p>
          </table:table-cell>
          <table:table-cell table:style-name="ce12N2" office:value-type="float" office:value="4.37">
            <text:p>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6.03">
            <text:p>1026,03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3">
            <text:p>9,2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85.1">
            <text:p>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91211206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7">
            <text:p>3104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2.14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5.71">
            <text:p>581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6">
            <text:p>0,000</text:p>
          </table:table-cell>
          <table:table-cell table:style-name="ce12N2" office:value-type="float" office:value="19.94">
            <text:p>1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2.26">
            <text:p>4472,26</text:p>
          </table:table-cell>
          <table:table-cell table:style-name="ce12N2" office:value-type="float" office:value="4.47">
            <text:p>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24">
            <text:p>40,24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6.66">
            <text:p>516,66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370.94">
            <text:p>37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616460000152550020000721451534246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8">
            <text:p>310788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6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00.94">
            <text:p>430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841.4">
            <text:p>3841,4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5.6">
            <text:p>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00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0.69">
            <text:p>3420,69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79">
            <text:p>30,79</text:p>
          </table:table-cell>
          <table:table-cell table:style-name="ce12N2" office:value-type="float" office:value="41.72">
            <text:p>41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74.54">
            <text:p>374,54</text:p>
          </table:table-cell>
          <table:table-cell table:style-name="ce12N2" office:value-type="float" office:value="3926.4">
            <text:p>3926,40</text:p>
          </table:table-cell>
          <table:table-cell table:style-name="ce12N2" office:value-type="float" office:value="157.05">
            <text:p>15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6351416010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7">
            <text:p>31089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.96">
            <text:p>62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0.41">
            <text:p>510,4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59">
            <text:p>4,5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8.08">
            <text:p>38,08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23.44">
            <text:p>2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81275537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5">
            <text:p>31093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184">
            <text:p>0,009</text:p>
          </table:table-cell>
          <table:table-cell table:style-name="ce12N2" office:value-type="float" office:value="6.32">
            <text:p>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42.75">
            <text:p>2242,75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8">
            <text:p>20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102.97">
            <text:p>10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117657567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5">
            <text:p>310955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05.79">
            <text:p>660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924.3">
            <text:p>5924,3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0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5.31">
            <text:p>5235,31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2">
            <text:p>47,12</text:p>
          </table:table-cell>
          <table:table-cell table:style-name="ce12N2" office:value-type="float" office:value="55.64">
            <text:p>55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96.49">
            <text:p>596,49</text:p>
          </table:table-cell>
          <table:table-cell table:style-name="ce12N2" office:value-type="float" office:value="6009.3">
            <text:p>6009,30</text:p>
          </table:table-cell>
          <table:table-cell table:style-name="ce12N2" office:value-type="float" office:value="240.37">
            <text:p>2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9971675652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7">
            <text:p>31100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4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896">
            <text:p>0,027</text:p>
          </table:table-cell>
          <table:table-cell table:style-name="ce12N2" office:value-type="float" office:value="19.4">
            <text:p>1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.47">
            <text:p>563,47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46.73">
            <text:p>4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48815913715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8">
            <text:p>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70">
            <text:p>17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525.77">
            <text:p>1525,77</text:p>
          </table:table-cell>
          <table:table-cell table:style-name="ce26N2" office:value-type="float" office:value="21702.42">
            <text:p>21702,42</text:p>
          </table:table-cell>
          <table:table-cell table:style-name="ce26N2" office:value-type="float" office:value="1083.56">
            <text:p>1083,5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228.19">
            <text:p>23228,1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059083">
            <text:p>0,059</text:p>
          </table:table-cell>
          <table:table-cell table:style-name="ce26N2" office:value-type="float" office:value="21532.42">
            <text:p>21532,42</text:p>
          </table:table-cell>
          <table:table-cell table:style-name="ce26N2" office:value-type="float" office:value="23228.19">
            <text:p>23228,1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8788.18">
            <text:p>18788,18</text:p>
          </table:table-cell>
          <table:table-cell table:style-name="ce26N2" office:value-type="float" office:value="18.79">
            <text:p>18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9.08">
            <text:p>169,08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2.56">
            <text:p>62,5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4.79">
            <text:p>44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0" meta:object-count="0"/>
    <meta:generator>LibreOffice/4.3.0.4$Windows_x86 LibreOffice_project/62ad5818884a2fc2e5780dd45466868d41009ec0</meta:generator>
  </office:meta>
</office:document-meta>
</file>