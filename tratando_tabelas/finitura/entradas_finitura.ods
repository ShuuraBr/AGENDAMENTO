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8">
            <text:p>310788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0.94">
            <text:p>43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41.4">
            <text:p>3841,4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0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0.69">
            <text:p>3420,6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79">
            <text:p>30,79</text:p>
          </table:table-cell>
          <table:table-cell table:style-name="ce12N2" office:value-type="float" office:value="41.72">
            <text:p>4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74.54">
            <text:p>374,54</text:p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157.05">
            <text:p>15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6351416010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0">
            <text:p>17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25.77">
            <text:p>1525,77</text:p>
          </table:table-cell>
          <table:table-cell table:style-name="ce26N2" office:value-type="float" office:value="22403.46">
            <text:p>22403,46</text:p>
          </table:table-cell>
          <table:table-cell table:style-name="ce26N2" office:value-type="float" office:value="1111.6">
            <text:p>1111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929.23">
            <text:p>23929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62839">
            <text:p>0,063</text:p>
          </table:table-cell>
          <table:table-cell table:style-name="ce26N2" office:value-type="float" office:value="22233.46">
            <text:p>22233,46</text:p>
          </table:table-cell>
          <table:table-cell table:style-name="ce26N2" office:value-type="float" office:value="23929.23">
            <text:p>23929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788.18">
            <text:p>18788,18</text:p>
          </table:table-cell>
          <table:table-cell table:style-name="ce26N2" office:value-type="float" office:value="18.79">
            <text:p>18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9.08">
            <text:p>169,0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7.83">
            <text:p>67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48">
            <text:p>43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