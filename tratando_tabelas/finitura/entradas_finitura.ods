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3">
            <text:p>307893</text:p>
          </table:table-cell>
          <table:table-cell table:style-name="ce0" table:number-columns-spanned="4" table:number-rows-spanned="1" office:value-type="string" calcext:value-type="string">
            <text:p>2.840 - PBG S/A</text:p>
          </table:table-cell>
          <table:covered-table-cell table:number-columns-repeated="3"/>
          <table:table-cell table:style-name="ce0" office:value-type="string" calcext:value-type="string">
            <text:p>2.923.8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.9">
            <text:p>5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9">
            <text:p>0,001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39.57">
            <text:p>3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347591300027255001002923889155761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8">
            <text:p>30805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2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6">
            <text:p>0,816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239.04">
            <text:p>23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136190000131550010000628911620246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9">
            <text:p>308249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1">
            <text:p>393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.58">
            <text:p>3313,58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3">
            <text:p>29,8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49.29">
            <text:p>349,29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143.3">
            <text:p>14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891398955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6">
            <text:p>3082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49">
            <text:p>2189,49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1">
            <text:p>19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181.6">
            <text:p>1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21181402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04">
            <text:p>30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69.17">
            <text:p>1569,17</text:p>
          </table:table-cell>
          <table:table-cell table:style-name="ce26N2" office:value-type="float" office:value="86731.73">
            <text:p>86731,73</text:p>
          </table:table-cell>
          <table:table-cell table:style-name="ce26N2" office:value-type="float" office:value="4988.68">
            <text:p>4988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8294.59">
            <text:p>88294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097208">
            <text:p>1,097</text:p>
          </table:table-cell>
          <table:table-cell table:style-name="ce26N2" office:value-type="float" office:value="86421.42">
            <text:p>86421,42</text:p>
          </table:table-cell>
          <table:table-cell table:style-name="ce26N2" office:value-type="float" office:value="88294.59">
            <text:p>88294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200.37">
            <text:p>30200,37</text:p>
          </table:table-cell>
          <table:table-cell table:style-name="ce26N2" office:value-type="float" office:value="30.2">
            <text:p>30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71.8">
            <text:p>271,8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53.34">
            <text:p>253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3">
            <text:p>3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4" meta:object-count="0"/>
    <meta:generator>LibreOffice/4.3.0.4$Windows_x86 LibreOffice_project/62ad5818884a2fc2e5780dd45466868d41009ec0</meta:generator>
  </office:meta>
</office:document-meta>
</file>