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5/05/2026 07:39:20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2">
            <text:p>306272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6.19">
            <text:p>14916,19</text:p>
          </table:table-cell>
          <table:table-cell table:style-name="ce12N2" office:value-type="float" office:value="3433.93">
            <text:p>3433,9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7025">
            <text:p>170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1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">
            <text:p>8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325.12">
            <text:p>1325,12</text:p>
          </table:table-cell>
          <table:table-cell table:style-name="ce12N2" office:value-type="float" office:value="13591.07">
            <text:p>13591,07</text:p>
          </table:table-cell>
          <table:table-cell table:style-name="ce12N2" office:value-type="float" office:value="543.65">
            <text:p>54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8100033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1">
            <text:p>306581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11864484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0">
            <text:p>30,00</text:p>
          </table:table-cell>
          <table:table-cell table:style-name="ce26N2" office:value-type="float" office:value="4501.31">
            <text:p>4501,31</text:p>
          </table:table-cell>
          <table:table-cell table:style-name="ce26N2" office:value-type="float" office:value="759">
            <text:p>75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999.17">
            <text:p>2999,17</text:p>
          </table:table-cell>
          <table:table-cell table:style-name="ce26N2" office:value-type="float" office:value="121820">
            <text:p>121820,00</text:p>
          </table:table-cell>
          <table:table-cell table:style-name="ce26N2" office:value-type="float" office:value="6138.87">
            <text:p>6138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0203.37">
            <text:p>130203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25684">
            <text:p>1,257</text:p>
          </table:table-cell>
          <table:table-cell table:style-name="ce26N2" office:value-type="float" office:value="130946.51">
            <text:p>130946,51</text:p>
          </table:table-cell>
          <table:table-cell table:style-name="ce26N2" office:value-type="float" office:value="130203.37">
            <text:p>130203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04.85">
            <text:p>20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07">
            <text:p>48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