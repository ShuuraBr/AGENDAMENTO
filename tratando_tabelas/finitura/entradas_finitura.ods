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1/05/2026 05:30:34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6724">
            <text:p>306724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70.48">
            <text:p>97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6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.31">
            <text:p>6,31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97837181005378550010001611641514144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2">
            <text:p>3071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315176612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9">
            <text:p>3072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57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1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51181500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3">
            <text:p>3072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81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7.92">
            <text:p>207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77.92">
            <text:p>207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844">
            <text:p>0,008</text:p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7.92">
            <text:p>2077,92</text:p>
          </table:table-cell>
          <table:table-cell table:style-name="ce12N2" office:value-type="float" office:value="145.45">
            <text:p>14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81813231196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4">
            <text:p>3072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5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02.37">
            <text:p>440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02.37">
            <text:p>4402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02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02.37">
            <text:p>4402,37</text:p>
          </table:table-cell>
          <table:table-cell table:style-name="ce12N2" office:value-type="float" office:value="308.17">
            <text:p>308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5221064002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2">
            <text:p>3073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8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4.11">
            <text:p>1494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4.11">
            <text:p>1494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4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4.11">
            <text:p>1494,11</text:p>
          </table:table-cell>
          <table:table-cell table:style-name="ce12N2" office:value-type="float" office:value="104.59">
            <text:p>10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8341511429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8">
            <text:p>30734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3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0.01">
            <text:p>1360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954">
            <text:p>0,014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0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83.01">
            <text:p>83,01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89.39">
            <text:p>8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31611900568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2">
            <text:p>3074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4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12.04">
            <text:p>281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12.04">
            <text:p>281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844">
            <text:p>0,008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1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2.04">
            <text:p>2812,04</text:p>
          </table:table-cell>
          <table:table-cell table:style-name="ce12N2" office:value-type="float" office:value="196.84">
            <text:p>19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47912983080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23">
            <text:p>307523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3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5.7">
            <text:p>92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43.46">
            <text:p>843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4">
            <text:p>0,006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82.24">
            <text:p>82,24</text:p>
          </table:table-cell>
          <table:table-cell table:style-name="ce12N2" office:value-type="float" office:value="843.46">
            <text:p>843,46</text:p>
          </table:table-cell>
          <table:table-cell table:style-name="ce12N2" office:value-type="float" office:value="59.04">
            <text:p>59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3791956102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5">
            <text:p>3075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418134936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10">
            <text:p>1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71.56">
            <text:p>171,56</text:p>
          </table:table-cell>
          <table:table-cell table:style-name="ce26N2" office:value-type="float" office:value="15105.59">
            <text:p>15105,59</text:p>
          </table:table-cell>
          <table:table-cell table:style-name="ce26N2" office:value-type="float" office:value="1020.74">
            <text:p>1020,7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5270.84">
            <text:p>15270,8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048764">
            <text:p>0,049</text:p>
          </table:table-cell>
          <table:table-cell table:style-name="ce26N2" office:value-type="float" office:value="15099.28">
            <text:p>15099,28</text:p>
          </table:table-cell>
          <table:table-cell table:style-name="ce26N2" office:value-type="float" office:value="15270.84">
            <text:p>15270,8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1.56">
            <text:p>21,5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4.09">
            <text:p>24,0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0" meta:object-count="0"/>
    <meta:generator>LibreOffice/4.3.0.4$Windows_x86 LibreOffice_project/62ad5818884a2fc2e5780dd45466868d41009ec0</meta:generator>
  </office:meta>
</office:document-meta>
</file>