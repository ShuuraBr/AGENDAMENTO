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06/05/2026 07:54:53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5238">
            <text:p>30523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3.55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51">
            <text:p>275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51">
            <text:p>275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956">
            <text:p>0,012</text:p>
          </table:table-cell>
          <table:table-cell table:style-name="ce12N2" office:value-type="float" office:value="5.06">
            <text:p>5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51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51">
            <text:p>2751,00</text:p>
          </table:table-cell>
          <table:table-cell table:style-name="ce12N2" office:value-type="float" office:value="192.57">
            <text:p>192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355718581109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7">
            <text:p>30545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70.41">
            <text:p>477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4588.46">
            <text:p>4588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1499">
            <text:p>0,231</text:p>
          </table:table-cell>
          <table:table-cell table:style-name="ce12N2" office:value-type="float" office:value="35.08">
            <text:p>35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70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81.95">
            <text:p>181,95</text:p>
          </table:table-cell>
          <table:table-cell table:style-name="ce12N2" office:value-type="float" office:value="4588.46">
            <text:p>4588,46</text:p>
          </table:table-cell>
          <table:table-cell table:style-name="ce12N2" office:value-type="float" office:value="183.54">
            <text:p>18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618982501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0">
            <text:p>30547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717232975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80">
            <text:p>30548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73.3">
            <text:p>2373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228.46">
            <text:p>2228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86">
            <text:p>0,017</text:p>
          </table:table-cell>
          <table:table-cell table:style-name="ce12N2" office:value-type="float" office:value="12.33">
            <text:p>12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73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44.84">
            <text:p>144,84</text:p>
          </table:table-cell>
          <table:table-cell table:style-name="ce12N2" office:value-type="float" office:value="2228.46">
            <text:p>2228,46</text:p>
          </table:table-cell>
          <table:table-cell table:style-name="ce12N2" office:value-type="float" office:value="89.14">
            <text:p>89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515416692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25">
            <text:p>305725</text:p>
          </table:table-cell>
          <table:table-cell table:style-name="ce0" table:number-columns-spanned="4" table:number-rows-spanned="1" office:value-type="string" calcext:value-type="string">
            <text:p>27.705 - DOKA - INDUSTRIA E COMERCIO LTDA</text:p>
          </table:table-cell>
          <table:covered-table-cell table:number-columns-repeated="3"/>
          <table:table-cell table:style-name="ce0" office:value-type="string" calcext:value-type="string">
            <text:p>61.3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12.8">
            <text:p>1001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012.8">
            <text:p>10012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50038">
            <text:p>0,750</text:p>
          </table:table-cell>
          <table:table-cell table:style-name="ce12N2" office:value-type="float" office:value="38">
            <text:p>3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012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012.8">
            <text:p>10012,80</text:p>
          </table:table-cell>
          <table:table-cell table:style-name="ce12N2" office:value-type="float" office:value="400.51">
            <text:p>40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11361900001315500100006133113295722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31">
            <text:p>30573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7.2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47.73">
            <text:p>6247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247.73">
            <text:p>6247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808">
            <text:p>0,031</text:p>
          </table:table-cell>
          <table:table-cell table:style-name="ce12N2" office:value-type="float" office:value="6.05">
            <text:p>6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47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47.73">
            <text:p>6247,73</text:p>
          </table:table-cell>
          <table:table-cell table:style-name="ce12N2" office:value-type="float" office:value="437.34">
            <text:p>437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722010509759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78">
            <text:p>305778</text:p>
          </table:table-cell>
          <table:table-cell table:style-name="ce0" table:number-columns-spanned="4" table:number-rows-spanned="1" office:value-type="string" calcext:value-type="string">
            <text:p>11.857 - GOLDEN ART INDUSTRIA E COMERCIO LTDA - EPP</text:p>
          </table:table-cell>
          <table:covered-table-cell table:number-columns-repeated="3"/>
          <table:table-cell table:style-name="ce0" office:value-type="string" calcext:value-type="string">
            <text:p>53.6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4.78">
            <text:p>834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30">
            <text:p>73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4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104.78">
            <text:p>104,78</text:p>
          </table:table-cell>
          <table:table-cell table:style-name="ce12N2" office:value-type="float" office:value="730">
            <text:p>730,00</text:p>
          </table:table-cell>
          <table:table-cell table:style-name="ce12N2" office:value-type="float" office:value="51.1">
            <text:p>5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36544710001805500100005361610003201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21">
            <text:p>30582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2.73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62.34">
            <text:p>4462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62.34">
            <text:p>4462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272">
            <text:p>0,010</text:p>
          </table:table-cell>
          <table:table-cell table:style-name="ce12N2" office:value-type="float" office:value="3.7">
            <text:p>3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62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62.34">
            <text:p>4462,34</text:p>
          </table:table-cell>
          <table:table-cell table:style-name="ce12N2" office:value-type="float" office:value="312.36">
            <text:p>31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273211904270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22">
            <text:p>30582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2.72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64.23">
            <text:p>1464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64.23">
            <text:p>1464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473">
            <text:p>0,002</text:p>
          </table:table-cell>
          <table:table-cell table:style-name="ce12N2" office:value-type="float" office:value="0.77">
            <text:p>0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64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64.23">
            <text:p>1464,23</text:p>
          </table:table-cell>
          <table:table-cell table:style-name="ce12N2" office:value-type="float" office:value="102.5">
            <text:p>10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272313425560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2">
            <text:p>30594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213913337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7">
            <text:p>30595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712174805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6">
            <text:p>30596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09">
            <text:p>29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2">
            <text:p>0,003</text:p>
          </table:table-cell>
          <table:table-cell table:style-name="ce12N2" office:value-type="float" office:value="1.93">
            <text:p>1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1">
            <text:p>17,71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315276943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01">
            <text:p>30600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3.68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5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1.41">
            <text:p>1181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1.41">
            <text:p>1181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12">
            <text:p>0,000</text:p>
          </table:table-cell>
          <table:table-cell table:style-name="ce12N2" office:value-type="float" office:value="0.71">
            <text:p>0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1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1.41">
            <text:p>1181,41</text:p>
          </table:table-cell>
          <table:table-cell table:style-name="ce12N2" office:value-type="float" office:value="82.7">
            <text:p>82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368418357374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05">
            <text:p>306005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6.1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1.88">
            <text:p>861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61.88">
            <text:p>861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3796">
            <text:p>0,074</text:p>
          </table:table-cell>
          <table:table-cell table:style-name="ce12N2" office:value-type="float" office:value="43.13">
            <text:p>43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1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1.88">
            <text:p>861,88</text:p>
          </table:table-cell>
          <table:table-cell table:style-name="ce12N2" office:value-type="float" office:value="60.33">
            <text:p>60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618816489239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50">
            <text:p>306150</text:p>
          </table:table-cell>
          <table:table-cell table:style-name="ce0" table:number-columns-spanned="4" table:number-rows-spanned="1" office:value-type="string" calcext:value-type="string">
            <text:p>9.134 - L.MARTINKOSKI &amp; CIA LTDA</text:p>
          </table:table-cell>
          <table:covered-table-cell table:number-columns-repeated="3"/>
          <table:table-cell table:style-name="ce0" office:value-type="string" calcext:value-type="string">
            <text:p>56.2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70.21">
            <text:p>2070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70.21">
            <text:p>1970,21</text:p>
          </table:table-cell>
          <table:table-cell table:style-name="ce12N2" office:value-type="float" office:value="100">
            <text:p>100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4.15">
            <text:p>4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70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70.21">
            <text:p>2070,21</text:p>
          </table:table-cell>
          <table:table-cell table:style-name="ce12N2" office:value-type="float" office:value="144.92">
            <text:p>144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080286760001035500100005626010044228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73">
            <text:p>306173</text:p>
          </table:table-cell>
          <table:table-cell table:style-name="ce0" table:number-columns-spanned="4" table:number-rows-spanned="1" office:value-type="string" calcext:value-type="string">
            <text:p>9.134 - L.MARTINKOSKI &amp; CIA LTDA</text:p>
          </table:table-cell>
          <table:covered-table-cell table:number-columns-repeated="3"/>
          <table:table-cell table:style-name="ce0" office:value-type="string" calcext:value-type="string">
            <text:p>56.2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30.39">
            <text:p>3730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730.39">
            <text:p>3730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30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30.39">
            <text:p>3730,39</text:p>
          </table:table-cell>
          <table:table-cell table:style-name="ce12N2" office:value-type="float" office:value="261.14">
            <text:p>26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080286760001035500100005623110044222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72">
            <text:p>306272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2.0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916.19">
            <text:p>14916,19</text:p>
          </table:table-cell>
          <table:table-cell table:style-name="ce12N2" office:value-type="float" office:value="3433.93">
            <text:p>3433,93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7025">
            <text:p>1702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916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">
            <text:p>8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1325.12">
            <text:p>1325,12</text:p>
          </table:table-cell>
          <table:table-cell table:style-name="ce12N2" office:value-type="float" office:value="13591.07">
            <text:p>13591,07</text:p>
          </table:table-cell>
          <table:table-cell table:style-name="ce12N2" office:value-type="float" office:value="543.65">
            <text:p>543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77814120001095500100001203810003367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27">
            <text:p>30632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02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14.13">
            <text:p>10714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714.13">
            <text:p>10714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976">
            <text:p>0,021</text:p>
          </table:table-cell>
          <table:table-cell table:style-name="ce12N2" office:value-type="float" office:value="6.72">
            <text:p>6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714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714.13">
            <text:p>10714,13</text:p>
          </table:table-cell>
          <table:table-cell table:style-name="ce12N2" office:value-type="float" office:value="749.99">
            <text:p>749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02312626528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29">
            <text:p>30632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27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1.38">
            <text:p>89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91.38">
            <text:p>891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22">
            <text:p>0,004</text:p>
          </table:table-cell>
          <table:table-cell table:style-name="ce12N2" office:value-type="float" office:value="0.41">
            <text:p>0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91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91.38">
            <text:p>891,38</text:p>
          </table:table-cell>
          <table:table-cell table:style-name="ce12N2" office:value-type="float" office:value="62.4">
            <text:p>6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27112175721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5">
            <text:p>30633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9.06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3.54">
            <text:p>159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93.54">
            <text:p>1593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136">
            <text:p>0,005</text:p>
          </table:table-cell>
          <table:table-cell table:style-name="ce12N2" office:value-type="float" office:value="2.1">
            <text:p>2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93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93.54">
            <text:p>1593,54</text:p>
          </table:table-cell>
          <table:table-cell table:style-name="ce12N2" office:value-type="float" office:value="111.55">
            <text:p>111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906517914567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8">
            <text:p>306338</text:p>
          </table:table-cell>
          <table:table-cell table:style-name="ce0" table:number-columns-spanned="4" table:number-rows-spanned="1" office:value-type="string" calcext:value-type="string">
            <text:p>36.576 - GRUPO METAL DESIGN LTDA</text:p>
          </table:table-cell>
          <table:covered-table-cell table:number-columns-repeated="3"/>
          <table:table-cell table:style-name="ce0" office:value-type="string" calcext:value-type="string">
            <text:p>6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0.38">
            <text:p>900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900.38">
            <text:p>900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00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0.38">
            <text:p>900,38</text:p>
          </table:table-cell>
          <table:table-cell table:style-name="ce12N2" office:value-type="float" office:value="36.02">
            <text:p>36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68954480005605500100000069613675614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54">
            <text:p>306454</text:p>
          </table:table-cell>
          <table:table-cell table:style-name="ce0" table:number-columns-spanned="4" table:number-rows-spanned="1" office:value-type="string" calcext:value-type="string">
            <text:p>13.419 - METALDOMADO METALURGICA LTDA</text:p>
          </table:table-cell>
          <table:covered-table-cell table:number-columns-repeated="3"/>
          <table:table-cell table:style-name="ce0" office:value-type="string" calcext:value-type="string">
            <text:p>27.4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67.76">
            <text:p>3167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167.76">
            <text:p>3167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67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">
            <text:p>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67.76">
            <text:p>3167,76</text:p>
          </table:table-cell>
          <table:table-cell table:style-name="ce12N2" office:value-type="float" office:value="117.52">
            <text:p>11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05166390001245500100002741810956103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77">
            <text:p>30647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5.2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08.72">
            <text:p>3108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108.72">
            <text:p>3108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98">
            <text:p>0,002</text:p>
          </table:table-cell>
          <table:table-cell table:style-name="ce12N2" office:value-type="float" office:value="2.6">
            <text:p>2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08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08.72">
            <text:p>3108,72</text:p>
          </table:table-cell>
          <table:table-cell table:style-name="ce12N2" office:value-type="float" office:value="217.61">
            <text:p>217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525918006557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3">
            <text:p>30649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0.87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76.8">
            <text:p>287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01.22">
            <text:p>2701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908">
            <text:p>0,028</text:p>
          </table:table-cell>
          <table:table-cell table:style-name="ce12N2" office:value-type="float" office:value="3.56">
            <text:p>3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7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75.58">
            <text:p>175,58</text:p>
          </table:table-cell>
          <table:table-cell table:style-name="ce12N2" office:value-type="float" office:value="2701.22">
            <text:p>2701,22</text:p>
          </table:table-cell>
          <table:table-cell table:style-name="ce12N2" office:value-type="float" office:value="189.09">
            <text:p>189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3087715235316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35">
            <text:p>306535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2.3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84.2">
            <text:p>538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5384.2">
            <text:p>5384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054">
            <text:p>0,023</text:p>
          </table:table-cell>
          <table:table-cell table:style-name="ce12N2" office:value-type="float" office:value="28.62">
            <text:p>28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84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4132820001435500100297238017221315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40">
            <text:p>306540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2.0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38.26">
            <text:p>6638,26</text:p>
          </table:table-cell>
          <table:table-cell table:style-name="ce12N2" office:value-type="float" office:value="1067.38">
            <text:p>1067,38</text:p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115.9">
            <text:p>7115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38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">
            <text:p>10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589.74">
            <text:p>589,74</text:p>
          </table:table-cell>
          <table:table-cell table:style-name="ce12N2" office:value-type="float" office:value="6048.52">
            <text:p>6048,52</text:p>
          </table:table-cell>
          <table:table-cell table:style-name="ce12N2" office:value-type="float" office:value="241.94">
            <text:p>241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77814120001095500100001203910003367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45">
            <text:p>306545</text:p>
          </table:table-cell>
          <table:table-cell table:style-name="ce0" table:number-columns-spanned="4" table:number-rows-spanned="1" office:value-type="string" calcext:value-type="string">
            <text:p>36.576 - GRUPO METAL DESIGN LTDA</text:p>
          </table:table-cell>
          <table:covered-table-cell table:number-columns-repeated="3"/>
          <table:table-cell table:style-name="ce0" office:value-type="string" calcext:value-type="string">
            <text:p>6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71.52">
            <text:p>7171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171.52">
            <text:p>7171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71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">
            <text:p>3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71.52">
            <text:p>7171,52</text:p>
          </table:table-cell>
          <table:table-cell table:style-name="ce12N2" office:value-type="float" office:value="286.86">
            <text:p>286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68954480005605500100000069815269096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79">
            <text:p>306579</text:p>
          </table:table-cell>
          <table:table-cell table:style-name="ce0" table:number-columns-spanned="4" table:number-rows-spanned="1" office:value-type="string" calcext:value-type="string">
            <text:p>36.576 - GRUPO METAL DESIGN LTDA</text:p>
          </table:table-cell>
          <table:covered-table-cell table:number-columns-repeated="3"/>
          <table:table-cell table:style-name="ce0" office:value-type="string" calcext:value-type="string">
            <text:p>7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71.52">
            <text:p>7171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171.52">
            <text:p>7171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71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.66">
            <text:p>61,6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71.52">
            <text:p>7171,52</text:p>
          </table:table-cell>
          <table:table-cell table:style-name="ce12N2" office:value-type="float" office:value="286.86">
            <text:p>286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68954480005605500100000070010164081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81">
            <text:p>306581</text:p>
          </table:table-cell>
          <table:table-cell table:style-name="ce0" table:number-columns-spanned="4" table:number-rows-spanned="1" office:value-type="string" calcext:value-type="string">
            <text:p>36.576 - GRUPO METAL DESIGN LTDA</text:p>
          </table:table-cell>
          <table:covered-table-cell table:number-columns-repeated="3"/>
          <table:table-cell table:style-name="ce0" office:value-type="string" calcext:value-type="string">
            <text:p>7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6.5">
            <text:p>9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6.5">
            <text:p>96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6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6.5">
            <text:p>96,50</text:p>
          </table:table-cell>
          <table:table-cell table:style-name="ce12N2" office:value-type="float" office:value="3.86">
            <text:p>3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68954480005605500100000070118644846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85">
            <text:p>306585</text:p>
          </table:table-cell>
          <table:table-cell table:style-name="ce0" table:number-columns-spanned="4" table:number-rows-spanned="1" office:value-type="string" calcext:value-type="string">
            <text:p>16.540 - LEXXA METAIS SANITARIOS LTDA</text:p>
          </table:table-cell>
          <table:covered-table-cell table:number-columns-repeated="3"/>
          <table:table-cell table:style-name="ce0" office:value-type="string" calcext:value-type="string">
            <text:p>10.8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038.11">
            <text:p>24038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22949.18">
            <text:p>22949,18</text:p>
          </table:table-cell>
          <table:table-cell table:style-name="ce12N2" office:value-type="float" office:value="659">
            <text:p>659,00</text:p>
          </table:table-cell>
          <table:table-cell table:style-name="ce12N3" office:value-type="float" office:value="0.022336">
            <text:p>0,022</text:p>
          </table:table-cell>
          <table:table-cell table:style-name="ce12N2" office:value-type="float" office:value="5.96">
            <text:p>5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038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.46">
            <text:p>82,4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429.93">
            <text:p>429,93</text:p>
          </table:table-cell>
          <table:table-cell table:style-name="ce12N2" office:value-type="float" office:value="23608.18">
            <text:p>23608,18</text:p>
          </table:table-cell>
          <table:table-cell table:style-name="ce12N2" office:value-type="float" office:value="944.32">
            <text:p>94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07002210002535500100001088416380504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75">
            <text:p>30667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2.79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16.85">
            <text:p>311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16.85">
            <text:p>3116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766">
            <text:p>0,012</text:p>
          </table:table-cell>
          <table:table-cell table:style-name="ce12N2" office:value-type="float" office:value="2.1">
            <text:p>2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16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16.85">
            <text:p>3116,85</text:p>
          </table:table-cell>
          <table:table-cell table:style-name="ce12N2" office:value-type="float" office:value="218.18">
            <text:p>218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279316885293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3">
            <text:p>306713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6.3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85.6">
            <text:p>3485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88.3">
            <text:p>3288,30</text:p>
          </table:table-cell>
          <table:table-cell table:style-name="ce12N2" office:value-type="float" office:value="197.3">
            <text:p>197,3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85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">
            <text:p>2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85.6">
            <text:p>3485,60</text:p>
          </table:table-cell>
          <table:table-cell table:style-name="ce12N2" office:value-type="float" office:value="139.42">
            <text:p>139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248556330001405500100007636811400814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24">
            <text:p>306724</text:p>
          </table:table-cell>
          <table:table-cell table:style-name="ce0" table:number-columns-spanned="4" table:number-rows-spanned="1" office:value-type="string" calcext:value-type="string">
            <text:p>30.850 - DEXCO S.A</text:p>
          </table:table-cell>
          <table:covered-table-cell table:number-columns-repeated="3"/>
          <table:table-cell table:style-name="ce0" office:value-type="string" calcext:value-type="string">
            <text:p>161.1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6.79">
            <text:p>976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970.48">
            <text:p>970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76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6.31">
            <text:p>6,31</text:p>
          </table:table-cell>
          <table:table-cell table:style-name="ce12N2" office:value-type="float" office:value="976.79">
            <text:p>976,79</text:p>
          </table:table-cell>
          <table:table-cell table:style-name="ce12N2" office:value-type="float" office:value="68.38">
            <text:p>68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978371810053785500100016116415141440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26">
            <text:p>30672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2.42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6.74">
            <text:p>846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46.74">
            <text:p>846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0.43">
            <text:p>0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6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6.74">
            <text:p>846,74</text:p>
          </table:table-cell>
          <table:table-cell table:style-name="ce12N2" office:value-type="float" office:value="59.27">
            <text:p>59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242318928982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34">
            <text:p>34,00</text:p>
          </table:table-cell>
          <table:table-cell table:style-name="ce26N2" office:value-type="float" office:value="4501.31">
            <text:p>4501,31</text:p>
          </table:table-cell>
          <table:table-cell table:style-name="ce26N2" office:value-type="float" office:value="956.3">
            <text:p>956,3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005.48">
            <text:p>3005,48</text:p>
          </table:table-cell>
          <table:table-cell table:style-name="ce26N2" office:value-type="float" office:value="130245.98">
            <text:p>130245,98</text:p>
          </table:table-cell>
          <table:table-cell table:style-name="ce26N2" office:value-type="float" office:value="6624.12">
            <text:p>6624,1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38629.35">
            <text:p>138629,3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.268606">
            <text:p>1,269</text:p>
          </table:table-cell>
          <table:table-cell table:style-name="ce26N2" office:value-type="float" office:value="139168.88">
            <text:p>139168,88</text:p>
          </table:table-cell>
          <table:table-cell table:style-name="ce26N2" office:value-type="float" office:value="138629.35">
            <text:p>138629,3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223.38">
            <text:p>223,3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6.67">
            <text:p>46,6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FINITUR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58" meta:object-count="0"/>
    <meta:generator>LibreOffice/4.3.0.4$Windows_x86 LibreOffice_project/62ad5818884a2fc2e5780dd45466868d41009ec0</meta:generator>
  </office:meta>
</office:document-meta>
</file>