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11/06/2026 04:30:33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8086">
            <text:p>30808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2.07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67.17">
            <text:p>6667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667.17">
            <text:p>6667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.3">
            <text:p>8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67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808.44">
            <text:p>5808,44</text:p>
          </table:table-cell>
          <table:table-cell table:style-name="ce12N2" office:value-type="float" office:value="5.81">
            <text:p>5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.28">
            <text:p>52,2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67.17">
            <text:p>6667,17</text:p>
          </table:table-cell>
          <table:table-cell table:style-name="ce12N2" office:value-type="float" office:value="266.69">
            <text:p>266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207812318337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35">
            <text:p>308135</text:p>
          </table:table-cell>
          <table:table-cell table:style-name="ce0" table:number-columns-spanned="4" table:number-rows-spanned="1" office:value-type="string" calcext:value-type="string">
            <text:p>21.312 - JANAINA DE LIMA S. M. L. MICHELIN</text:p>
          </table:table-cell>
          <table:covered-table-cell table:number-columns-repeated="3"/>
          <table:table-cell table:style-name="ce0" office:value-type="string" calcext:value-type="string">
            <text:p>7.3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92.85">
            <text:p>5392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5392.85">
            <text:p>5392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92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0.33">
            <text:p>60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92.85">
            <text:p>5392,85</text:p>
          </table:table-cell>
          <table:table-cell table:style-name="ce12N2" office:value-type="float" office:value="190.91">
            <text:p>190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272340050001355500100000738910000073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83">
            <text:p>308483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4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63.36">
            <text:p>4563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563.36">
            <text:p>4563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05">
            <text:p>0,010</text:p>
          </table:table-cell>
          <table:table-cell table:style-name="ce12N2" office:value-type="float" office:value="30">
            <text:p>3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63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89.02">
            <text:p>4089,02</text:p>
          </table:table-cell>
          <table:table-cell table:style-name="ce12N2" office:value-type="float" office:value="4.09">
            <text:p>4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8">
            <text:p>36,80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63.36">
            <text:p>4563,36</text:p>
          </table:table-cell>
          <table:table-cell table:style-name="ce12N2" office:value-type="float" office:value="319.43">
            <text:p>319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42219118592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84">
            <text:p>308484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4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78.09">
            <text:p>2978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978.09">
            <text:p>2978,0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365">
            <text:p>0,006</text:p>
          </table:table-cell>
          <table:table-cell table:style-name="ce12N2" office:value-type="float" office:value="19">
            <text:p>19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78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68.53">
            <text:p>2668,53</text:p>
          </table:table-cell>
          <table:table-cell table:style-name="ce12N2" office:value-type="float" office:value="2.67">
            <text:p>2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.01">
            <text:p>24,01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78.09">
            <text:p>2978,09</text:p>
          </table:table-cell>
          <table:table-cell table:style-name="ce12N2" office:value-type="float" office:value="208.47">
            <text:p>208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42313660872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85">
            <text:p>308485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4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1.88">
            <text:p>761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61.88">
            <text:p>761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01">
            <text:p>0,002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61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82.68">
            <text:p>682,68</text:p>
          </table:table-cell>
          <table:table-cell table:style-name="ce12N2" office:value-type="float" office:value="0.68">
            <text:p>0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14">
            <text:p>6,14</text:p>
          </table:table-cell>
          <table:table-cell table:style-name="ce12N2" office:value-type="float" office:value="41.97">
            <text:p>41,9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1.88">
            <text:p>761,88</text:p>
          </table:table-cell>
          <table:table-cell table:style-name="ce12N2" office:value-type="float" office:value="53.33">
            <text:p>53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42415508130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86">
            <text:p>308486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4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23.76">
            <text:p>152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523.76">
            <text:p>1523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01">
            <text:p>0,002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23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65.38">
            <text:p>1365,38</text:p>
          </table:table-cell>
          <table:table-cell table:style-name="ce12N2" office:value-type="float" office:value="1.37">
            <text:p>1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29">
            <text:p>12,29</text:p>
          </table:table-cell>
          <table:table-cell table:style-name="ce12N2" office:value-type="float" office:value="41.98">
            <text:p>41,9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23.76">
            <text:p>1523,76</text:p>
          </table:table-cell>
          <table:table-cell table:style-name="ce12N2" office:value-type="float" office:value="106.66">
            <text:p>106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42510988103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90">
            <text:p>308490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42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7.92">
            <text:p>507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07.92">
            <text:p>507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34">
            <text:p>0,001</text:p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07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7.92">
            <text:p>507,92</text:p>
          </table:table-cell>
          <table:table-cell table:style-name="ce12N2" office:value-type="float" office:value="35.56">
            <text:p>35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42613331386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20">
            <text:p>30852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6.75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1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60.01">
            <text:p>1360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77">
            <text:p>127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954">
            <text:p>0,014</text:p>
          </table:table-cell>
          <table:table-cell table:style-name="ce12N2" office:value-type="float" office:value="1.78">
            <text:p>1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60,0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77.76">
            <text:p>1077,76</text:p>
          </table:table-cell>
          <table:table-cell table:style-name="ce12N2" office:value-type="float" office:value="1.08">
            <text:p>1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7">
            <text:p>9,7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83.01">
            <text:p>83,01</text:p>
          </table:table-cell>
          <table:table-cell table:style-name="ce12N2" office:value-type="float" office:value="1277">
            <text:p>1277,00</text:p>
          </table:table-cell>
          <table:table-cell table:style-name="ce12N2" office:value-type="float" office:value="89.39">
            <text:p>89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675619933997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22">
            <text:p>30852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6.74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1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52.31">
            <text:p>315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59.92">
            <text:p>2959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">
            <text:p>0,017</text:p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52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98.1">
            <text:p>2498,10</text:p>
          </table:table-cell>
          <table:table-cell table:style-name="ce12N2" office:value-type="float" office:value="2.5">
            <text:p>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48">
            <text:p>22,4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192.39">
            <text:p>192,39</text:p>
          </table:table-cell>
          <table:table-cell table:style-name="ce12N2" office:value-type="float" office:value="2959.92">
            <text:p>2959,92</text:p>
          </table:table-cell>
          <table:table-cell table:style-name="ce12N2" office:value-type="float" office:value="207.19">
            <text:p>207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674517401535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24">
            <text:p>30852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6.76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1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54.13">
            <text:p>3154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54.13">
            <text:p>3154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.3">
            <text:p>8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54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62.01">
            <text:p>2662,01</text:p>
          </table:table-cell>
          <table:table-cell table:style-name="ce12N2" office:value-type="float" office:value="2.66">
            <text:p>2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.96">
            <text:p>23,9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54.13">
            <text:p>3154,13</text:p>
          </table:table-cell>
          <table:table-cell table:style-name="ce12N2" office:value-type="float" office:value="220.79">
            <text:p>220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676211542038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26">
            <text:p>308526</text:p>
          </table:table-cell>
          <table:table-cell table:style-name="ce0" table:number-columns-spanned="4" table:number-rows-spanned="1" office:value-type="string" calcext:value-type="string">
            <text:p>9.134 - L.MARTINKOSKI &amp; CIA LTDA</text:p>
          </table:table-cell>
          <table:covered-table-cell table:number-columns-repeated="3"/>
          <table:table-cell table:style-name="ce0" office:value-type="string" calcext:value-type="string">
            <text:p>56.8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1.4">
            <text:p>1441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41.4">
            <text:p>1341,40</text:p>
          </table:table-cell>
          <table:table-cell table:style-name="ce12N2" office:value-type="float" office:value="100">
            <text:p>100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41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91.57">
            <text:p>1291,57</text:p>
          </table:table-cell>
          <table:table-cell table:style-name="ce12N2" office:value-type="float" office:value="1.29">
            <text:p>1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62">
            <text:p>11,6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41.4">
            <text:p>1441,40</text:p>
          </table:table-cell>
          <table:table-cell table:style-name="ce12N2" office:value-type="float" office:value="100.9">
            <text:p>100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080286760001035500100005680110044521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90">
            <text:p>30859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2.47">
            <text:p>202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0.11">
            <text:p>190,1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813">
            <text:p>0,002</text:p>
          </table:table-cell>
          <table:table-cell table:style-name="ce12N2" office:value-type="float" office:value="0.41">
            <text:p>0,4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2,4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0.44">
            <text:p>160,44</text:p>
          </table:table-cell>
          <table:table-cell table:style-name="ce12N2" office:value-type="float" office:value="0.16">
            <text:p>0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44">
            <text:p>1,4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12.36">
            <text:p>12,36</text:p>
          </table:table-cell>
          <table:table-cell table:style-name="ce12N2" office:value-type="float" office:value="190.11">
            <text:p>190,11</text:p>
          </table:table-cell>
          <table:table-cell table:style-name="ce12N2" office:value-type="float" office:value="13.31">
            <text:p>1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16113039251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27">
            <text:p>308627</text:p>
          </table:table-cell>
          <table:table-cell table:style-name="ce0" table:number-columns-spanned="4" table:number-rows-spanned="1" office:value-type="string" calcext:value-type="string">
            <text:p>32.615 - MADELUSTRE INDUSTRIAL LTDA</text:p>
          </table:table-cell>
          <table:covered-table-cell table:number-columns-repeated="3"/>
          <table:table-cell table:style-name="ce0" office:value-type="string" calcext:value-type="string">
            <text:p>71.71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47.45">
            <text:p>4047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687.88">
            <text:p>3687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.54">
            <text:p>8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047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12.48">
            <text:p>3112,48</text:p>
          </table:table-cell>
          <table:table-cell table:style-name="ce12N2" office:value-type="float" office:value="3.11">
            <text:p>3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01">
            <text:p>28,01</text:p>
          </table:table-cell>
          <table:table-cell table:style-name="ce12N2" office:value-type="float" office:value="40.75">
            <text:p>40,7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359.57">
            <text:p>359,57</text:p>
          </table:table-cell>
          <table:table-cell table:style-name="ce12N2" office:value-type="float" office:value="3687.88">
            <text:p>3687,88</text:p>
          </table:table-cell>
          <table:table-cell table:style-name="ce12N2" office:value-type="float" office:value="258.15">
            <text:p>258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96164600001525500200007171219277344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40">
            <text:p>30864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5.94">
            <text:p>335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5.94">
            <text:p>335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08">
            <text:p>0,000</text:p>
          </table:table-cell>
          <table:table-cell table:style-name="ce12N2" office:value-type="float" office:value="2.64">
            <text:p>2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5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5.94">
            <text:p>335,94</text:p>
          </table:table-cell>
          <table:table-cell table:style-name="ce12N2" office:value-type="float" office:value="13.44">
            <text:p>13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2112314219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51">
            <text:p>308651</text:p>
          </table:table-cell>
          <table:table-cell table:style-name="ce0" table:number-columns-spanned="4" table:number-rows-spanned="1" office:value-type="string" calcext:value-type="string">
            <text:p>21.312 - JANAINA DE LIMA S. M. L. MICHELIN</text:p>
          </table:table-cell>
          <table:covered-table-cell table:number-columns-repeated="3"/>
          <table:table-cell table:style-name="ce0" office:value-type="string" calcext:value-type="string">
            <text:p>7.4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19.4">
            <text:p>7119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7119.4">
            <text:p>7119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19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0.33">
            <text:p>60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119.4">
            <text:p>7119,40</text:p>
          </table:table-cell>
          <table:table-cell table:style-name="ce12N2" office:value-type="float" office:value="252.03">
            <text:p>252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43.72">
            <text:p>143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0.494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01/06/2026</text:p>
          </table:table-cell>
          <table:table-cell table:style-name="ce12" office:value-type="string" calcext:value-type="string">
            <text:p>143,72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35260527234005000135550010000074131000007423</text:p>
          </table:table-cell>
          <table:table-cell table:style-name="ce0" office:value-type="string" calcext:value-type="string">
            <text:p>35260611389565000200570050004004941000867863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15">
            <text:p>308715</text:p>
          </table:table-cell>
          <table:table-cell table:style-name="ce0" table:number-columns-spanned="4" table:number-rows-spanned="1" office:value-type="string" calcext:value-type="string">
            <text:p>16.540 - LEXXA METAIS SANITARIOS LTDA</text:p>
          </table:table-cell>
          <table:covered-table-cell table:number-columns-repeated="3"/>
          <table:table-cell table:style-name="ce0" office:value-type="string" calcext:value-type="string">
            <text:p>11.1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60.83">
            <text:p>3760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430.18">
            <text:p>3430,18</text:p>
          </table:table-cell>
          <table:table-cell table:style-name="ce12N2" office:value-type="float" office:value="269">
            <text:p>269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60,8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21.59">
            <text:p>3421,59</text:p>
          </table:table-cell>
          <table:table-cell table:style-name="ce12N2" office:value-type="float" office:value="3.42">
            <text:p>3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.8">
            <text:p>30,80</text:p>
          </table:table-cell>
          <table:table-cell table:style-name="ce12N2" office:value-type="float" office:value="41">
            <text:p>4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61.65">
            <text:p>61,65</text:p>
          </table:table-cell>
          <table:table-cell table:style-name="ce12N2" office:value-type="float" office:value="3699.18">
            <text:p>3699,18</text:p>
          </table:table-cell>
          <table:table-cell table:style-name="ce12N2" office:value-type="float" office:value="147.96">
            <text:p>147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07002210002535500100001111718768678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33">
            <text:p>30873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9.53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27.89">
            <text:p>1527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34.64">
            <text:p>1434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5">
            <text:p>0,009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27,8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10.8">
            <text:p>1210,80</text:p>
          </table:table-cell>
          <table:table-cell table:style-name="ce12N2" office:value-type="float" office:value="1.21">
            <text:p>1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9">
            <text:p>10,9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93.25">
            <text:p>93,25</text:p>
          </table:table-cell>
          <table:table-cell table:style-name="ce12N2" office:value-type="float" office:value="1434.64">
            <text:p>1434,64</text:p>
          </table:table-cell>
          <table:table-cell table:style-name="ce12N2" office:value-type="float" office:value="100.42">
            <text:p>100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5953514696605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76">
            <text:p>308776</text:p>
          </table:table-cell>
          <table:table-cell table:style-name="ce0" table:number-columns-spanned="4" table:number-rows-spanned="1" office:value-type="string" calcext:value-type="string">
            <text:p>13.012 - FELUX ILUMINACAO LTDA</text:p>
          </table:table-cell>
          <table:covered-table-cell table:number-columns-repeated="3"/>
          <table:table-cell table:style-name="ce0" office:value-type="string" calcext:value-type="string">
            <text:p>14.1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45.66">
            <text:p>3345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345.66">
            <text:p>3345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45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45.66">
            <text:p>3345,66</text:p>
          </table:table-cell>
          <table:table-cell table:style-name="ce12N2" office:value-type="float" office:value="118.77">
            <text:p>118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90.65">
            <text:p>90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0.736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05/06/2026</text:p>
          </table:table-cell>
          <table:table-cell table:style-name="ce12" office:value-type="string" calcext:value-type="string">
            <text:p>90,65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35260609662561000120550010000141591562093414</text:p>
          </table:table-cell>
          <table:table-cell table:style-name="ce0" office:value-type="string" calcext:value-type="string">
            <text:p>35260611389565000200570050004007361000870352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56">
            <text:p>308856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5.0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918.03">
            <text:p>16918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15266.73">
            <text:p>15266,73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0.039892">
            <text:p>0,040</text:p>
          </table:table-cell>
          <table:table-cell table:style-name="ce12N2" office:value-type="float" office:value="35.26">
            <text:p>35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918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374.41">
            <text:p>13374,41</text:p>
          </table:table-cell>
          <table:table-cell table:style-name="ce12N2" office:value-type="float" office:value="13.4">
            <text:p>13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0.37">
            <text:p>120,37</text:p>
          </table:table-cell>
          <table:table-cell table:style-name="ce12N2" office:value-type="float" office:value="55.86">
            <text:p>55,8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1566.3">
            <text:p>1566,30</text:p>
          </table:table-cell>
          <table:table-cell table:style-name="ce12N2" office:value-type="float" office:value="15351.73">
            <text:p>15351,73</text:p>
          </table:table-cell>
          <table:table-cell table:style-name="ce12N2" office:value-type="float" office:value="614.08">
            <text:p>614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106911580003705500100029506613917915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52">
            <text:p>308952</text:p>
          </table:table-cell>
          <table:table-cell table:style-name="ce0" table:number-columns-spanned="4" table:number-rows-spanned="1" office:value-type="string" calcext:value-type="string">
            <text:p>12.526 - LUMINATI IMPORTACAO E EXPORTACAO LTDA</text:p>
          </table:table-cell>
          <table:covered-table-cell table:number-columns-repeated="3"/>
          <table:table-cell table:style-name="ce0" office:value-type="string" calcext:value-type="string">
            <text:p>73.4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73.24">
            <text:p>2673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77">
            <text:p>2077,00</text:p>
          </table:table-cell>
          <table:table-cell table:style-name="ce12N2" office:value-type="float" office:value="393.73">
            <text:p>393,73</text:p>
          </table:table-cell>
          <table:table-cell table:style-name="ce12N3" office:value-type="float" office:value="0.0045">
            <text:p>0,0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73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52.5">
            <text:p>2152,50</text:p>
          </table:table-cell>
          <table:table-cell table:style-name="ce12N2" office:value-type="float" office:value="2.15">
            <text:p>2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37">
            <text:p>19,37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202.51">
            <text:p>202,51</text:p>
          </table:table-cell>
          <table:table-cell table:style-name="ce12N2" office:value-type="float" office:value="2470.73">
            <text:p>2470,73</text:p>
          </table:table-cell>
          <table:table-cell table:style-name="ce12N2" office:value-type="float" office:value="98.83">
            <text:p>98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138330000001145500100007343611822821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20">
            <text:p>20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847.73">
            <text:p>847,7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2571.04">
            <text:p>2571,04</text:p>
          </table:table-cell>
          <table:table-cell table:style-name="ce26N2" office:value-type="float" office:value="68862.75">
            <text:p>68862,75</text:p>
          </table:table-cell>
          <table:table-cell table:style-name="ce26N2" office:value-type="float" office:value="3416.31">
            <text:p>3416,3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234.37">
            <text:p>234,37</text:p>
          </table:table-cell>
          <table:table-cell table:style-name="ce26N2" office:value-type="float" office:value="71433.79">
            <text:p>71433,7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0.107842">
            <text:p>0,108</text:p>
          </table:table-cell>
          <table:table-cell table:style-name="ce26N2" office:value-type="float" office:value="68015.02">
            <text:p>68015,02</text:p>
          </table:table-cell>
          <table:table-cell table:style-name="ce26N2" office:value-type="float" office:value="71433.79">
            <text:p>71433,7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5575.71">
            <text:p>45575,71</text:p>
          </table:table-cell>
          <table:table-cell table:style-name="ce26N2" office:value-type="float" office:value="45.6">
            <text:p>45,6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410.17">
            <text:p>410,17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140.23">
            <text:p>140,2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2.54">
            <text:p>42,5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FINITUR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82" meta:object-count="0"/>
    <meta:generator>LibreOffice/4.3.0.4$Windows_x86 LibreOffice_project/62ad5818884a2fc2e5780dd45466868d41009ec0</meta:generator>
  </office:meta>
</office:document-meta>
</file>