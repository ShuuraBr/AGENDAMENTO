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5/06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2">
            <text:p>30855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5.65">
            <text:p>394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00.72">
            <text:p>3300,72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7">
            <text:p>29,7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77.15">
            <text:p>377,15</text:p>
          </table:table-cell>
          <table:table-cell table:style-name="ce12N2" office:value-type="float" office:value="3568.5">
            <text:p>3568,50</text:p>
          </table:table-cell>
          <table:table-cell table:style-name="ce12N2" office:value-type="float" office:value="142.74">
            <text:p>14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810139911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7">
            <text:p>3086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7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7.45">
            <text:p>40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54">
            <text:p>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47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.48">
            <text:p>3112,4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01">
            <text:p>28,01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9.57">
            <text:p>359,57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258.15">
            <text:p>25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61646000015255002000071712192773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51">
            <text:p>308651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252.03">
            <text:p>25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3.72">
            <text:p>14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49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43,7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27234005000135550010000074131000007423</text:p>
          </table:table-cell>
          <table:table-cell table:style-name="ce0" office:value-type="string" calcext:value-type="string">
            <text:p>352606113895650002005700500040049410008678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85">
            <text:p>1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314.58">
            <text:p>2314,58</text:p>
          </table:table-cell>
          <table:table-cell table:style-name="ce26N2" office:value-type="float" office:value="94112.87">
            <text:p>94112,87</text:p>
          </table:table-cell>
          <table:table-cell table:style-name="ce26N2" office:value-type="float" office:value="5350.57">
            <text:p>5350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3.72">
            <text:p>143,72</text:p>
          </table:table-cell>
          <table:table-cell table:style-name="ce26N2" office:value-type="float" office:value="96421.14">
            <text:p>96421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28273">
            <text:p>0,283</text:p>
          </table:table-cell>
          <table:table-cell table:style-name="ce26N2" office:value-type="float" office:value="93921.56">
            <text:p>93921,56</text:p>
          </table:table-cell>
          <table:table-cell table:style-name="ce26N2" office:value-type="float" office:value="96421.14">
            <text:p>96421,1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6774.01">
            <text:p>36774,01</text:p>
          </table:table-cell>
          <table:table-cell table:style-name="ce26N2" office:value-type="float" office:value="36.77">
            <text:p>36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30.95">
            <text:p>330,9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58.83">
            <text:p>158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4">
            <text:p>41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6" meta:object-count="0"/>
    <meta:generator>LibreOffice/4.3.0.4$Windows_x86 LibreOffice_project/62ad5818884a2fc2e5780dd45466868d41009ec0</meta:generator>
  </office:meta>
</office:document-meta>
</file>