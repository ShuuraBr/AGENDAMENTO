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6/07/2026 07:40:5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6">
            <text:p>31000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4.46">
            <text:p>1324,4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92">
            <text:p>11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109.85">
            <text:p>10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3164927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9">
            <text:p>310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476">
            <text:p>0,051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36">
            <text:p>6964,3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8">
            <text:p>6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577.63">
            <text:p>5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611908856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7">
            <text:p>3101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1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34">
            <text:p>0,030</text:p>
          </table:table-cell>
          <table:table-cell table:style-name="ce12N2" office:value-type="float" office:value="9.82">
            <text:p>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03.58">
            <text:p>12203,58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83">
            <text:p>109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1012.17">
            <text:p>10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1601700182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3">
            <text:p>31036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68">
            <text:p>6537,68</text:p>
          </table:table-cell>
          <table:table-cell table:style-name="ce12N2" office:value-type="float" office:value="1862.72">
            <text:p>1862,72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19.6">
            <text:p>78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4.99">
            <text:p>5094,99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80.8">
            <text:p>580,80</text:p>
          </table:table-cell>
          <table:table-cell table:style-name="ce12N2" office:value-type="float" office:value="5956.88">
            <text:p>5956,88</text:p>
          </table:table-cell>
          <table:table-cell table:style-name="ce12N2" office:value-type="float" office:value="238.27">
            <text:p>23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778141200010955001000012096100033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2">
            <text:p>12,00</text:p>
          </table:table-cell>
          <table:table-cell table:style-name="ce26N2" office:value-type="float" office:value="1862.72">
            <text:p>1862,72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8.57">
            <text:p>1678,57</text:p>
          </table:table-cell>
          <table:table-cell table:style-name="ce26N2" office:value-type="float" office:value="49171.61">
            <text:p>49171,61</text:p>
          </table:table-cell>
          <table:table-cell table:style-name="ce26N2" office:value-type="float" office:value="2996.31">
            <text:p>2996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850.18">
            <text:p>50850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87982">
            <text:p>0,388</text:p>
          </table:table-cell>
          <table:table-cell table:style-name="ce26N2" office:value-type="float" office:value="50949.33">
            <text:p>50949,33</text:p>
          </table:table-cell>
          <table:table-cell table:style-name="ce26N2" office:value-type="float" office:value="50850.18">
            <text:p>50850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832.23">
            <text:p>40832,23</text:p>
          </table:table-cell>
          <table:table-cell table:style-name="ce26N2" office:value-type="float" office:value="40.83">
            <text:p>40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7.47">
            <text:p>367,4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5.15">
            <text:p>95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09">
            <text:p>39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4" meta:object-count="0"/>
    <meta:generator>LibreOffice/4.3.0.4$Windows_x86 LibreOffice_project/62ad5818884a2fc2e5780dd45466868d41009ec0</meta:generator>
  </office:meta>
</office:document-meta>
</file>