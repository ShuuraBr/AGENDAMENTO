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0/05/2026 05:30:32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80">
            <text:p>3068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5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.5">
            <text:p>3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077181000133550030002245691053712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2">
            <text:p>307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31517661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9">
            <text:p>307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5118150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3">
            <text:p>3072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8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145.45">
            <text:p>14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8181323119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4">
            <text:p>3072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0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308.17">
            <text:p>3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5221064002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2">
            <text:p>307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8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104.59">
            <text:p>10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834151142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8">
            <text:p>3073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3161190056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2">
            <text:p>307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196.84">
            <text:p>19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791298308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0">
            <text:p>1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2.83">
            <text:p>92,83</text:p>
          </table:table-cell>
          <table:table-cell table:style-name="ce26N2" office:value-type="float" office:value="17110.75">
            <text:p>17110,75</text:p>
          </table:table-cell>
          <table:table-cell table:style-name="ce26N2" office:value-type="float" office:value="1067.53">
            <text:p>1067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197.27">
            <text:p>17197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3503">
            <text:p>0,035</text:p>
          </table:table-cell>
          <table:table-cell table:style-name="ce26N2" office:value-type="float" office:value="17104.44">
            <text:p>17104,44</text:p>
          </table:table-cell>
          <table:table-cell table:style-name="ce26N2" office:value-type="float" office:value="17197.27">
            <text:p>17197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8.29">
            <text:p>18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1.25">
            <text:p>21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0" meta:object-count="0"/>
    <meta:generator>LibreOffice/4.3.0.4$Windows_x86 LibreOffice_project/62ad5818884a2fc2e5780dd45466868d41009ec0</meta:generator>
  </office:meta>
</office:document-meta>
</file>