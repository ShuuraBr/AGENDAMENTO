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9/05/2026 04:30:29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6724">
            <text:p>306724</text:p>
          </table:table-cell>
          <table:table-cell table:style-name="ce0" table:number-columns-spanned="4" table:number-rows-spanned="1" office:value-type="string" calcext:value-type="string">
            <text:p>30.850 - DEXCO S.A</text:p>
          </table:table-cell>
          <table:covered-table-cell table:number-columns-repeated="3"/>
          <table:table-cell table:style-name="ce0" office:value-type="string" calcext:value-type="string">
            <text:p>161.1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6.79">
            <text:p>976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970.48">
            <text:p>970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6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6.31">
            <text:p>6,31</text:p>
          </table:table-cell>
          <table:table-cell table:style-name="ce12N2" office:value-type="float" office:value="976.79">
            <text:p>976,79</text:p>
          </table:table-cell>
          <table:table-cell table:style-name="ce12N2" office:value-type="float" office:value="68.38">
            <text:p>68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978371810053785500100016116415141440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90">
            <text:p>307590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1.8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18.42">
            <text:p>2418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18.42">
            <text:p>2418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">
            <text:p>3,000</text:p>
          </table:table-cell>
          <table:table-cell table:style-name="ce12N2" office:value-type="float" office:value="0.3">
            <text:p>0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18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18.42">
            <text:p>2418,42</text:p>
          </table:table-cell>
          <table:table-cell table:style-name="ce12N2" office:value-type="float" office:value="169.29">
            <text:p>169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5188816794331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67">
            <text:p>307667</text:p>
          </table:table-cell>
          <table:table-cell table:style-name="ce0" table:number-columns-spanned="4" table:number-rows-spanned="1" office:value-type="string" calcext:value-type="string">
            <text:p>33.829 - STUDIO LAMPLUZ COMERCIO E SERVICOS LTDA</text:p>
          </table:table-cell>
          <table:covered-table-cell table:number-columns-repeated="3"/>
          <table:table-cell table:style-name="ce0" office:value-type="string" calcext:value-type="string">
            <text:p>5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96.62">
            <text:p>119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96.62">
            <text:p>1196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96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96.62">
            <text:p>1196,62</text:p>
          </table:table-cell>
          <table:table-cell table:style-name="ce12N2" office:value-type="float" office:value="36.14">
            <text:p>36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9.72">
            <text:p>8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9.870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22/05/2026</text:p>
          </table:table-cell>
          <table:table-cell table:style-name="ce12" office:value-type="string" calcext:value-type="string">
            <text:p>89,72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35260558339477000186550010000005571000000560</text:p>
          </table:table-cell>
          <table:table-cell table:style-name="ce0" office:value-type="string" calcext:value-type="string">
            <text:p>3526051138956500020057005000399870100086139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06">
            <text:p>307806</text:p>
          </table:table-cell>
          <table:table-cell table:style-name="ce0" table:number-columns-spanned="4" table:number-rows-spanned="1" office:value-type="string" calcext:value-type="string">
            <text:p>16.540 - LEXXA METAIS SANITARIOS LTDA</text:p>
          </table:table-cell>
          <table:covered-table-cell table:number-columns-repeated="3"/>
          <table:table-cell table:style-name="ce0" office:value-type="string" calcext:value-type="string">
            <text:p>11.0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9.46">
            <text:p>97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60.46">
            <text:p>860,46</text:p>
          </table:table-cell>
          <table:table-cell table:style-name="ce12N2" office:value-type="float" office:value="119">
            <text:p>119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9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9.46">
            <text:p>979,46</text:p>
          </table:table-cell>
          <table:table-cell table:style-name="ce12N2" office:value-type="float" office:value="39.17">
            <text:p>39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07002210002535500100001103614737953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11">
            <text:p>30781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7.38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381">
            <text:p>0,001</text:p>
          </table:table-cell>
          <table:table-cell table:style-name="ce12N2" office:value-type="float" office:value="0.89">
            <text:p>0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6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98.48">
            <text:p>9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73891278045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13">
            <text:p>30781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7.56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22">
            <text:p>0,004</text:p>
          </table:table-cell>
          <table:table-cell table:style-name="ce12N2" office:value-type="float" office:value="0.89">
            <text:p>0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6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98.48">
            <text:p>9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756013959743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6">
            <text:p>30785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8.71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82.24">
            <text:p>688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882.24">
            <text:p>688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34">
            <text:p>0,046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8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82.24">
            <text:p>6882,24</text:p>
          </table:table-cell>
          <table:table-cell table:style-name="ce12N2" office:value-type="float" office:value="481.76">
            <text:p>481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871710545663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8">
            <text:p>30785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8.89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22">
            <text:p>0,004</text:p>
          </table:table-cell>
          <table:table-cell table:style-name="ce12N2" office:value-type="float" office:value="0.89">
            <text:p>0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6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98.48">
            <text:p>9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88971709299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1">
            <text:p>30786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9.04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86.16">
            <text:p>508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86.16">
            <text:p>5086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34">
            <text:p>0,046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086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86.16">
            <text:p>5086,16</text:p>
          </table:table-cell>
          <table:table-cell table:style-name="ce12N2" office:value-type="float" office:value="356.03">
            <text:p>35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904518182793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93">
            <text:p>307893</text:p>
          </table:table-cell>
          <table:table-cell table:style-name="ce0" table:number-columns-spanned="4" table:number-rows-spanned="1" office:value-type="string" calcext:value-type="string">
            <text:p>2.840 - PBG S/A</text:p>
          </table:table-cell>
          <table:covered-table-cell table:number-columns-repeated="3"/>
          <table:table-cell table:style-name="ce0" office:value-type="string" calcext:value-type="string">
            <text:p>2.923.8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8.9">
            <text:p>568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5.23">
            <text:p>565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99">
            <text:p>0,001</text:p>
          </table:table-cell>
          <table:table-cell table:style-name="ce12N2" office:value-type="float" office:value="68.1">
            <text:p>68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8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3.67">
            <text:p>3,67</text:p>
          </table:table-cell>
          <table:table-cell table:style-name="ce12N2" office:value-type="float" office:value="565.23">
            <text:p>565,23</text:p>
          </table:table-cell>
          <table:table-cell table:style-name="ce12N2" office:value-type="float" office:value="39.57">
            <text:p>39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34759130002725500100292388915576112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85">
            <text:p>30798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7.59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78.12">
            <text:p>5678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78.12">
            <text:p>56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892">
            <text:p>0,010</text:p>
          </table:table-cell>
          <table:table-cell table:style-name="ce12N2" office:value-type="float" office:value="4.08">
            <text:p>4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78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78.12">
            <text:p>5678,12</text:p>
          </table:table-cell>
          <table:table-cell table:style-name="ce12N2" office:value-type="float" office:value="397.47">
            <text:p>39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759518384696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08">
            <text:p>308008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2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9.62">
            <text:p>37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9.62">
            <text:p>379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7">
            <text:p>0,001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9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9.62">
            <text:p>379,62</text:p>
          </table:table-cell>
          <table:table-cell table:style-name="ce12N2" office:value-type="float" office:value="26.57">
            <text:p>26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22417289544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09">
            <text:p>308009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2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9.62">
            <text:p>37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9.62">
            <text:p>379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7">
            <text:p>0,001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9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1.94">
            <text:p>41,9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9.62">
            <text:p>379,62</text:p>
          </table:table-cell>
          <table:table-cell table:style-name="ce12N2" office:value-type="float" office:value="26.57">
            <text:p>26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2251754454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0">
            <text:p>308010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2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9.43">
            <text:p>569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9.43">
            <text:p>569,4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005">
            <text:p>0,001</text:p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9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1.96">
            <text:p>41,9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9.43">
            <text:p>569,43</text:p>
          </table:table-cell>
          <table:table-cell table:style-name="ce12N2" office:value-type="float" office:value="39.86">
            <text:p>39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22618449981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1">
            <text:p>308011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2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9.55">
            <text:p>44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9.55">
            <text:p>449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.55">
            <text:p>449,55</text:p>
          </table:table-cell>
          <table:table-cell table:style-name="ce12N2" office:value-type="float" office:value="31.47">
            <text:p>31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24617607403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2">
            <text:p>308012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2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9.8">
            <text:p>1269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69.8">
            <text:p>1269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35">
            <text:p>0,003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69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1.98">
            <text:p>41,9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69.8">
            <text:p>1269,80</text:p>
          </table:table-cell>
          <table:table-cell table:style-name="ce12N2" office:value-type="float" office:value="88.89">
            <text:p>88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26314398511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3">
            <text:p>308013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2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9">
            <text:p>22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9">
            <text:p>22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84">
            <text:p>0,001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9">
            <text:p>229,00</text:p>
          </table:table-cell>
          <table:table-cell table:style-name="ce12N2" office:value-type="float" office:value="16.03">
            <text:p>1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26412374699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6">
            <text:p>308016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5.93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90.35">
            <text:p>2990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90.35">
            <text:p>299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014">
            <text:p>0,040</text:p>
          </table:table-cell>
          <table:table-cell table:style-name="ce12N2" office:value-type="float" office:value="14.35">
            <text:p>14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90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90.35">
            <text:p>2990,35</text:p>
          </table:table-cell>
          <table:table-cell table:style-name="ce12N2" office:value-type="float" office:value="119.61">
            <text:p>11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593515656197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33">
            <text:p>308033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4.0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04.06">
            <text:p>10604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9584.56">
            <text:p>9584,56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4497">
            <text:p>0,045</text:p>
          </table:table-cell>
          <table:table-cell table:style-name="ce12N2" office:value-type="float" office:value="0.72">
            <text:p>0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604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9.66">
            <text:p>69,6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934.5">
            <text:p>934,50</text:p>
          </table:table-cell>
          <table:table-cell table:style-name="ce12N2" office:value-type="float" office:value="9669.56">
            <text:p>9669,56</text:p>
          </table:table-cell>
          <table:table-cell table:style-name="ce12N2" office:value-type="float" office:value="386.79">
            <text:p>386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06911580003705500100029404217356066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58">
            <text:p>308058</text:p>
          </table:table-cell>
          <table:table-cell table:style-name="ce0" table:number-columns-spanned="4" table:number-rows-spanned="1" office:value-type="string" calcext:value-type="string">
            <text:p>27.705 - DOKA - INDUSTRIA E COMERCIO LTDA</text:p>
          </table:table-cell>
          <table:covered-table-cell table:number-columns-repeated="3"/>
          <table:table-cell table:style-name="ce0" office:value-type="string" calcext:value-type="string">
            <text:p>62.8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76">
            <text:p>597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976">
            <text:p>597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16">
            <text:p>0,816</text:p>
          </table:table-cell>
          <table:table-cell table:style-name="ce12N2" office:value-type="float" office:value="38">
            <text:p>3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97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76">
            <text:p>5976,00</text:p>
          </table:table-cell>
          <table:table-cell table:style-name="ce12N2" office:value-type="float" office:value="239.04">
            <text:p>239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11361900001315500100006289116202460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6">
            <text:p>30808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2.07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67.17">
            <text:p>6667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67.17">
            <text:p>6667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.3">
            <text:p>8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67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08.44">
            <text:p>5808,44</text:p>
          </table:table-cell>
          <table:table-cell table:style-name="ce12N2" office:value-type="float" office:value="5.81">
            <text:p>5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.28">
            <text:p>52,2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67.17">
            <text:p>6667,17</text:p>
          </table:table-cell>
          <table:table-cell table:style-name="ce12N2" office:value-type="float" office:value="266.69">
            <text:p>26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207812318337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35">
            <text:p>308135</text:p>
          </table:table-cell>
          <table:table-cell table:style-name="ce0" table:number-columns-spanned="4" table:number-rows-spanned="1" office:value-type="string" calcext:value-type="string">
            <text:p>21.312 - JANAINA DE LIMA S. M. L. MICHELIN</text:p>
          </table:table-cell>
          <table:covered-table-cell table:number-columns-repeated="3"/>
          <table:table-cell table:style-name="ce0" office:value-type="string" calcext:value-type="string">
            <text:p>7.3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92.85">
            <text:p>5392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392.85">
            <text:p>5392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92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92.85">
            <text:p>5392,85</text:p>
          </table:table-cell>
          <table:table-cell table:style-name="ce12N2" office:value-type="float" office:value="190.91">
            <text:p>190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272340050001355500100000738910000073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81">
            <text:p>30818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2.82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25.92">
            <text:p>302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25.92">
            <text:p>3025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575">
            <text:p>0,017</text:p>
          </table:table-cell>
          <table:table-cell table:style-name="ce12N2" office:value-type="float" office:value="4.35">
            <text:p>4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25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53.81">
            <text:p>2553,81</text:p>
          </table:table-cell>
          <table:table-cell table:style-name="ce12N2" office:value-type="float" office:value="2.55">
            <text:p>2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98">
            <text:p>22,9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25.92">
            <text:p>3025,92</text:p>
          </table:table-cell>
          <table:table-cell table:style-name="ce12N2" office:value-type="float" office:value="211.81">
            <text:p>2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282813915300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23">
            <text:p>23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04">
            <text:p>204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944.48">
            <text:p>944,48</text:p>
          </table:table-cell>
          <table:table-cell table:style-name="ce26N2" office:value-type="float" office:value="65002.64">
            <text:p>65002,64</text:p>
          </table:table-cell>
          <table:table-cell table:style-name="ce26N2" office:value-type="float" office:value="3527.49">
            <text:p>3527,4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89.72">
            <text:p>89,72</text:p>
          </table:table-cell>
          <table:table-cell table:style-name="ce26N2" office:value-type="float" office:value="65940.81">
            <text:p>65940,8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4.03706">
            <text:p>4,037</text:p>
          </table:table-cell>
          <table:table-cell table:style-name="ce26N2" office:value-type="float" office:value="64792.33">
            <text:p>64792,33</text:p>
          </table:table-cell>
          <table:table-cell table:style-name="ce26N2" office:value-type="float" office:value="65940.81">
            <text:p>65940,8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8362.25">
            <text:p>8362,25</text:p>
          </table:table-cell>
          <table:table-cell table:style-name="ce26N2" office:value-type="float" office:value="8.36">
            <text:p>8,3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75.26">
            <text:p>75,26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75.87">
            <text:p>175,8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8.13">
            <text:p>38,1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FINITUR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80" meta:object-count="0"/>
    <meta:generator>LibreOffice/4.3.0.4$Windows_x86 LibreOffice_project/62ad5818884a2fc2e5780dd45466868d41009ec0</meta:generator>
  </office:meta>
</office:document-meta>
</file>