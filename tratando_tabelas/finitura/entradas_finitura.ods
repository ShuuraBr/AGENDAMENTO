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4/07/2026 04:30:32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10072">
            <text:p>31007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756">
            <text:p>0,004</text:p>
          </table:table-cell>
          <table:table-cell table:style-name="ce12N2" office:value-type="float" office:value="5.27">
            <text:p>5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1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28.04">
            <text:p>2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6413709591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72">
            <text:p>310272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9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24.12">
            <text:p>1424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24.12">
            <text:p>1424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24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17.26">
            <text:p>1317,26</text:p>
          </table:table-cell>
          <table:table-cell table:style-name="ce12N2" office:value-type="float" office:value="1.32">
            <text:p>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86">
            <text:p>11,8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24.12">
            <text:p>1424,12</text:p>
          </table:table-cell>
          <table:table-cell table:style-name="ce12N2" office:value-type="float" office:value="56.96">
            <text:p>5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68954480001365500100006598519049534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13">
            <text:p>31041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15.72">
            <text:p>1215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15.72">
            <text:p>1215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23">
            <text:p>0,020</text:p>
          </table:table-cell>
          <table:table-cell table:style-name="ce12N2" office:value-type="float" office:value="4.37">
            <text:p>4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15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26.03">
            <text:p>1026,03</text:p>
          </table:table-cell>
          <table:table-cell table:style-name="ce12N2" office:value-type="float" office:value="1.03">
            <text:p>1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23">
            <text:p>9,2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15.72">
            <text:p>1215,72</text:p>
          </table:table-cell>
          <table:table-cell table:style-name="ce12N2" office:value-type="float" office:value="85.1">
            <text:p>85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0912112068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27">
            <text:p>310427</text:p>
          </table:table-cell>
          <table:table-cell table:style-name="ce0" table:number-columns-spanned="4" table:number-rows-spanned="1" office:value-type="string" calcext:value-type="string">
            <text:p>32.615 - MADELUSTRE INDUSTRIAL LTDA</text:p>
          </table:table-cell>
          <table:covered-table-cell table:number-columns-repeated="3"/>
          <table:table-cell table:style-name="ce0" office:value-type="string" calcext:value-type="string">
            <text:p>72.14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15.71">
            <text:p>5815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299.05">
            <text:p>5299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E-6">
            <text:p>0,000</text:p>
          </table:table-cell>
          <table:table-cell table:style-name="ce12N2" office:value-type="float" office:value="19.94">
            <text:p>19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815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72.26">
            <text:p>4472,26</text:p>
          </table:table-cell>
          <table:table-cell table:style-name="ce12N2" office:value-type="float" office:value="4.47">
            <text:p>4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.24">
            <text:p>40,24</text:p>
          </table:table-cell>
          <table:table-cell table:style-name="ce12N2" office:value-type="float" office:value="53.51">
            <text:p>53,5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516.66">
            <text:p>516,66</text:p>
          </table:table-cell>
          <table:table-cell table:style-name="ce12N2" office:value-type="float" office:value="5299.05">
            <text:p>5299,05</text:p>
          </table:table-cell>
          <table:table-cell table:style-name="ce12N2" office:value-type="float" office:value="370.94">
            <text:p>37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96164600001525500200007214515342467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84">
            <text:p>310484</text:p>
          </table:table-cell>
          <table:table-cell table:style-name="ce0" table:number-columns-spanned="4" table:number-rows-spanned="1" office:value-type="string" calcext:value-type="string">
            <text:p>27.705 - DOKA - INDUSTRIA E COMERCIO LTDA</text:p>
          </table:table-cell>
          <table:covered-table-cell table:number-columns-repeated="3"/>
          <table:table-cell table:style-name="ce0" office:value-type="string" calcext:value-type="string">
            <text:p>64.4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03.68">
            <text:p>3703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03.68">
            <text:p>3703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03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25.75">
            <text:p>3425,75</text:p>
          </table:table-cell>
          <table:table-cell table:style-name="ce12N2" office:value-type="float" office:value="3.43">
            <text:p>3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83">
            <text:p>30,8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03.68">
            <text:p>3703,68</text:p>
          </table:table-cell>
          <table:table-cell table:style-name="ce12N2" office:value-type="float" office:value="148.15">
            <text:p>148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11361900001315500100006447610365755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88">
            <text:p>310788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7.6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00.94">
            <text:p>430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841.4">
            <text:p>3841,40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5.6">
            <text:p>5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300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20.69">
            <text:p>3420,69</text:p>
          </table:table-cell>
          <table:table-cell table:style-name="ce12N2" office:value-type="float" office:value="3.42">
            <text:p>3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79">
            <text:p>30,79</text:p>
          </table:table-cell>
          <table:table-cell table:style-name="ce12N2" office:value-type="float" office:value="41.72">
            <text:p>41,7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374.54">
            <text:p>374,54</text:p>
          </table:table-cell>
          <table:table-cell table:style-name="ce12N2" office:value-type="float" office:value="3926.4">
            <text:p>3926,40</text:p>
          </table:table-cell>
          <table:table-cell table:style-name="ce12N2" office:value-type="float" office:value="157.05">
            <text:p>157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106911580003705500100029763514160104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6">
            <text:p>6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85">
            <text:p>8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891.2">
            <text:p>891,20</text:p>
          </table:table-cell>
          <table:table-cell table:style-name="ce26N2" office:value-type="float" office:value="16270.01">
            <text:p>16270,01</text:p>
          </table:table-cell>
          <table:table-cell table:style-name="ce26N2" office:value-type="float" office:value="846.24">
            <text:p>846,2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7161.21">
            <text:p>17161,2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0.023987">
            <text:p>0,024</text:p>
          </table:table-cell>
          <table:table-cell table:style-name="ce26N2" office:value-type="float" office:value="16185.01">
            <text:p>16185,01</text:p>
          </table:table-cell>
          <table:table-cell table:style-name="ce26N2" office:value-type="float" office:value="17161.21">
            <text:p>17161,2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3661.99">
            <text:p>13661,99</text:p>
          </table:table-cell>
          <table:table-cell table:style-name="ce26N2" office:value-type="float" office:value="13.67">
            <text:p>13,6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22.95">
            <text:p>122,95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44.18">
            <text:p>44,1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8.94">
            <text:p>38,9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FINITUR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58" meta:object-count="0"/>
    <meta:generator>LibreOffice/4.3.0.4$Windows_x86 LibreOffice_project/62ad5818884a2fc2e5780dd45466868d41009ec0</meta:generator>
  </office:meta>
</office:document-meta>
</file>