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30/06/2026 04:30:28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9395">
            <text:p>309395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4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19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70.54">
            <text:p>2970,54</text:p>
          </table:table-cell>
          <table:table-cell table:style-name="ce12N2" office:value-type="float" office:value="2.97">
            <text:p>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73">
            <text:p>26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246.38">
            <text:p>24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70373920001805500300001047315539357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8">
            <text:p>309598</text:p>
          </table:table-cell>
          <table:table-cell table:style-name="ce0" table:number-columns-spanned="4" table:number-rows-spanned="1" office:value-type="string" calcext:value-type="string">
            <text:p>27.705 - DOKA - INDUSTRIA E COMERCIO LTDA</text:p>
          </table:table-cell>
          <table:covered-table-cell table:number-columns-repeated="3"/>
          <table:table-cell table:style-name="ce0" office:value-type="string" calcext:value-type="string">
            <text:p>63.9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32">
            <text:p>64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432">
            <text:p>64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2">
            <text:p>0,720</text:p>
          </table:table-cell>
          <table:table-cell table:style-name="ce12N2" office:value-type="float" office:value="43.5">
            <text:p>4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4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49.34">
            <text:p>5949,34</text:p>
          </table:table-cell>
          <table:table-cell table:style-name="ce12N2" office:value-type="float" office:value="5.95">
            <text:p>5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.54">
            <text:p>53,5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32">
            <text:p>6432,00</text:p>
          </table:table-cell>
          <table:table-cell table:style-name="ce12N2" office:value-type="float" office:value="257.28">
            <text:p>25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11361900001315500100006392017645446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50">
            <text:p>30965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19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42.04">
            <text:p>924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42.04">
            <text:p>9242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862">
            <text:p>0,042</text:p>
          </table:table-cell>
          <table:table-cell table:style-name="ce12N2" office:value-type="float" office:value="14.04">
            <text:p>14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42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800.06">
            <text:p>7800,06</text:p>
          </table:table-cell>
          <table:table-cell table:style-name="ce12N2" office:value-type="float" office:value="7.8">
            <text:p>7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.2">
            <text:p>70,2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42.04">
            <text:p>9242,04</text:p>
          </table:table-cell>
          <table:table-cell table:style-name="ce12N2" office:value-type="float" office:value="646.94">
            <text:p>646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19617510513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69">
            <text:p>30966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3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6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4.62">
            <text:p>714,62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43">
            <text:p>6,4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59.27">
            <text:p>5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35512884207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3">
            <text:p>30967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6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03.28">
            <text:p>260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03.28">
            <text:p>2603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76">
            <text:p>0,006</text:p>
          </table:table-cell>
          <table:table-cell table:style-name="ce12N2" office:value-type="float" office:value="1.44">
            <text:p>1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03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97.11">
            <text:p>2197,11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77">
            <text:p>19,7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03.28">
            <text:p>2603,28</text:p>
          </table:table-cell>
          <table:table-cell table:style-name="ce12N2" office:value-type="float" office:value="182.23">
            <text:p>18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68614061055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4">
            <text:p>30967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77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13.42">
            <text:p>221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13.42">
            <text:p>2213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353">
            <text:p>0,010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13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68.07">
            <text:p>1868,07</text:p>
          </table:table-cell>
          <table:table-cell table:style-name="ce12N2" office:value-type="float" office:value="1.87">
            <text:p>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81">
            <text:p>16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3.42">
            <text:p>2213,42</text:p>
          </table:table-cell>
          <table:table-cell table:style-name="ce12N2" office:value-type="float" office:value="154.94">
            <text:p>15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7761419936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4">
            <text:p>30973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17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64.74">
            <text:p>2764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638.8">
            <text:p>263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898">
            <text:p>0,036</text:p>
          </table:table-cell>
          <table:table-cell table:style-name="ce12N2" office:value-type="float" office:value="4.91">
            <text:p>4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64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27.08">
            <text:p>2227,08</text:p>
          </table:table-cell>
          <table:table-cell table:style-name="ce12N2" office:value-type="float" office:value="2.23">
            <text:p>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04">
            <text:p>20,0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25.94">
            <text:p>125,94</text:p>
          </table:table-cell>
          <table:table-cell table:style-name="ce12N2" office:value-type="float" office:value="2638.8">
            <text:p>2638,80</text:p>
          </table:table-cell>
          <table:table-cell table:style-name="ce12N2" office:value-type="float" office:value="184.72">
            <text:p>18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1741213710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6">
            <text:p>31000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0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9.31">
            <text:p>156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9.31">
            <text:p>1569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2.19">
            <text:p>2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69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24.46">
            <text:p>1324,46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92">
            <text:p>11,9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9.31">
            <text:p>1569,31</text:p>
          </table:table-cell>
          <table:table-cell table:style-name="ce12N2" office:value-type="float" office:value="109.85">
            <text:p>10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09316492750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19">
            <text:p>31001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7.66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51.85">
            <text:p>825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251.85">
            <text:p>8251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1476">
            <text:p>0,051</text:p>
          </table:table-cell>
          <table:table-cell table:style-name="ce12N2" office:value-type="float" office:value="8.85">
            <text:p>8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51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64.36">
            <text:p>6964,36</text:p>
          </table:table-cell>
          <table:table-cell table:style-name="ce12N2" office:value-type="float" office:value="6.96">
            <text:p>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68">
            <text:p>62,6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51.85">
            <text:p>8251,85</text:p>
          </table:table-cell>
          <table:table-cell table:style-name="ce12N2" office:value-type="float" office:value="577.63">
            <text:p>57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76611908856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9">
            <text:p>9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25.94">
            <text:p>125,94</text:p>
          </table:table-cell>
          <table:table-cell table:style-name="ce26N2" office:value-type="float" office:value="37317.16">
            <text:p>37317,16</text:p>
          </table:table-cell>
          <table:table-cell table:style-name="ce26N2" office:value-type="float" office:value="2419.24">
            <text:p>2419,2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7443.1">
            <text:p>37443,1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870485">
            <text:p>0,870</text:p>
          </table:table-cell>
          <table:table-cell table:style-name="ce26N2" office:value-type="float" office:value="37317.16">
            <text:p>37317,16</text:p>
          </table:table-cell>
          <table:table-cell table:style-name="ce26N2" office:value-type="float" office:value="37443.1">
            <text:p>37443,1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2015.64">
            <text:p>32015,64</text:p>
          </table:table-cell>
          <table:table-cell table:style-name="ce26N2" office:value-type="float" office:value="32.01">
            <text:p>32,0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88.12">
            <text:p>288,12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77.01">
            <text:p>77,0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8">
            <text:p>28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56" meta:object-count="0"/>
    <meta:generator>LibreOffice/4.3.0.4$Windows_x86 LibreOffice_project/62ad5818884a2fc2e5780dd45466868d41009ec0</meta:generator>
  </office:meta>
</office:document-meta>
</file>