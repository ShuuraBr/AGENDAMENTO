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3/07/2026 07:42:1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4">
            <text:p>310484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4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75">
            <text:p>3425,75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148.15">
            <text:p>14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136190000131550010000644761036575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6">
            <text:p>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16.66">
            <text:p>516,66</text:p>
          </table:table-cell>
          <table:table-cell table:style-name="ce26N2" office:value-type="float" office:value="15863.33">
            <text:p>15863,33</text:p>
          </table:table-cell>
          <table:table-cell table:style-name="ce26N2" office:value-type="float" office:value="935.57">
            <text:p>935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379.99">
            <text:p>16379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23987">
            <text:p>0,024</text:p>
          </table:table-cell>
          <table:table-cell table:style-name="ce26N2" office:value-type="float" office:value="15863.33">
            <text:p>15863,33</text:p>
          </table:table-cell>
          <table:table-cell table:style-name="ce26N2" office:value-type="float" office:value="16379.99">
            <text:p>16379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211.84">
            <text:p>13211,84</text:p>
          </table:table-cell>
          <table:table-cell table:style-name="ce26N2" office:value-type="float" office:value="13.22">
            <text:p>13,2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8.89">
            <text:p>118,8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8.58">
            <text:p>3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.86">
            <text:p>35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8" meta:object-count="0"/>
    <meta:generator>LibreOffice/4.3.0.4$Windows_x86 LibreOffice_project/62ad5818884a2fc2e5780dd45466868d41009ec0</meta:generator>
  </office:meta>
</office:document-meta>
</file>