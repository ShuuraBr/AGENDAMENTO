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9/06/2026 04:30:31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9190">
            <text:p>309190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4.61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187.37">
            <text:p>64187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58730.21">
            <text:p>58730,2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.187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165.75">
            <text:p>51165,75</text:p>
          </table:table-cell>
          <table:table-cell table:style-name="ce12N2" office:value-type="float" office:value="51.17">
            <text:p>5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0.49">
            <text:p>460,49</text:p>
          </table:table-cell>
          <table:table-cell table:style-name="ce12N2" office:value-type="float" office:value="84.9">
            <text:p>84,9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5457.16">
            <text:p>5457,16</text:p>
          </table:table-cell>
          <table:table-cell table:style-name="ce12N2" office:value-type="float" office:value="58730.21">
            <text:p>58730,21</text:p>
          </table:table-cell>
          <table:table-cell table:style-name="ce12N2" office:value-type="float" office:value="2349.21">
            <text:p>2349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461219106802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26">
            <text:p>30922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5.74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22.6">
            <text:p>292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22.6">
            <text:p>2922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44">
            <text:p>0,001</text:p>
          </table:table-cell>
          <table:table-cell table:style-name="ce12N2" office:value-type="float" office:value="2.18">
            <text:p>2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22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66.6">
            <text:p>2466,60</text:p>
          </table:table-cell>
          <table:table-cell table:style-name="ce12N2" office:value-type="float" office:value="2.47">
            <text:p>2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2">
            <text:p>22,2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22.6">
            <text:p>2922,60</text:p>
          </table:table-cell>
          <table:table-cell table:style-name="ce12N2" office:value-type="float" office:value="204.58">
            <text:p>204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574210403100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2">
            <text:p>309242</text:p>
          </table:table-cell>
          <table:table-cell table:style-name="ce0" table:number-columns-spanned="4" table:number-rows-spanned="1" office:value-type="string" calcext:value-type="string">
            <text:p>22.015 - FOCO METALLO FABRICACAO E MONTAGEM DE LUMINARIAS E COMERCIO</text:p>
          </table:table-cell>
          <table:covered-table-cell table:number-columns-repeated="3"/>
          <table:table-cell table:style-name="ce0" office:value-type="string" calcext:value-type="string">
            <text:p>23.7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31.85">
            <text:p>1731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78">
            <text:p>157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292">
            <text:p>0,5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31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9.94">
            <text:p>1409,94</text:p>
          </table:table-cell>
          <table:table-cell table:style-name="ce12N2" office:value-type="float" office:value="1.41">
            <text:p>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68">
            <text:p>12,68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53.85">
            <text:p>153,85</text:p>
          </table:table-cell>
          <table:table-cell table:style-name="ce12N2" office:value-type="float" office:value="1578">
            <text:p>1578,00</text:p>
          </table:table-cell>
          <table:table-cell table:style-name="ce12N2" office:value-type="float" office:value="110.46">
            <text:p>11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26708370001805500100002379915434199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76">
            <text:p>309276</text:p>
          </table:table-cell>
          <table:table-cell table:style-name="ce0" table:number-columns-spanned="4" table:number-rows-spanned="1" office:value-type="string" calcext:value-type="string">
            <text:p>33.829 - STUDIO LAMPLUZ COMERCIO E SERVICOS LTDA</text:p>
          </table:table-cell>
          <table:covered-table-cell table:number-columns-repeated="3"/>
          <table:table-cell table:style-name="ce0" office:value-type="string" calcext:value-type="string">
            <text:p>5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99.12">
            <text:p>1299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99.12">
            <text:p>1299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99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7.5">
            <text:p>1367,50</text:p>
          </table:table-cell>
          <table:table-cell table:style-name="ce12N2" office:value-type="float" office:value="1.37">
            <text:p>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31">
            <text:p>12,31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99.12">
            <text:p>1299,12</text:p>
          </table:table-cell>
          <table:table-cell table:style-name="ce12N2" office:value-type="float" office:value="39.23">
            <text:p>39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394770001865500100000058510000005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46">
            <text:p>30934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8.12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98.76">
            <text:p>2898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98.76">
            <text:p>2898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46">
            <text:p>0,005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98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46.48">
            <text:p>2446,48</text:p>
          </table:table-cell>
          <table:table-cell table:style-name="ce12N2" office:value-type="float" office:value="2.45">
            <text:p>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02">
            <text:p>22,0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98.76">
            <text:p>2898,76</text:p>
          </table:table-cell>
          <table:table-cell table:style-name="ce12N2" office:value-type="float" office:value="202.91">
            <text:p>20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812210194570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85">
            <text:p>309385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5.09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97.51">
            <text:p>6597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011.4">
            <text:p>601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97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37.13">
            <text:p>5237,13</text:p>
          </table:table-cell>
          <table:table-cell table:style-name="ce12N2" office:value-type="float" office:value="5.24">
            <text:p>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13">
            <text:p>47,13</text:p>
          </table:table-cell>
          <table:table-cell table:style-name="ce12N2" office:value-type="float" office:value="57.33">
            <text:p>57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586.11">
            <text:p>586,11</text:p>
          </table:table-cell>
          <table:table-cell table:style-name="ce12N2" office:value-type="float" office:value="6011.4">
            <text:p>6011,40</text:p>
          </table:table-cell>
          <table:table-cell table:style-name="ce12N2" office:value-type="float" office:value="240.46">
            <text:p>24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509018064613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5">
            <text:p>309395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47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19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70.54">
            <text:p>2970,54</text:p>
          </table:table-cell>
          <table:table-cell table:style-name="ce12N2" office:value-type="float" office:value="2.97">
            <text:p>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73">
            <text:p>26,7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246.38">
            <text:p>24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70373920001805500300001047315539357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8">
            <text:p>309398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2.261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57.93">
            <text:p>4157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157.93">
            <text:p>4157,9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608">
            <text:p>0,005</text:p>
          </table:table-cell>
          <table:table-cell table:style-name="ce12N2" office:value-type="float" office:value="53.13">
            <text:p>53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57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09.18">
            <text:p>3509,18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58">
            <text:p>31,58</text:p>
          </table:table-cell>
          <table:table-cell table:style-name="ce12N2" office:value-type="float" office:value="55.98">
            <text:p>55,9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57.93">
            <text:p>4157,93</text:p>
          </table:table-cell>
          <table:table-cell table:style-name="ce12N2" office:value-type="float" office:value="291.05">
            <text:p>29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8215460001025501000000226117105271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8">
            <text:p>8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197.12">
            <text:p>6197,12</text:p>
          </table:table-cell>
          <table:table-cell table:style-name="ce26N2" office:value-type="float" office:value="81117.74">
            <text:p>81117,74</text:p>
          </table:table-cell>
          <table:table-cell table:style-name="ce26N2" office:value-type="float" office:value="3684.28">
            <text:p>3684,2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7314.86">
            <text:p>87314,8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539498">
            <text:p>0,539</text:p>
          </table:table-cell>
          <table:table-cell table:style-name="ce26N2" office:value-type="float" office:value="81117.74">
            <text:p>81117,74</text:p>
          </table:table-cell>
          <table:table-cell table:style-name="ce26N2" office:value-type="float" office:value="87314.86">
            <text:p>87314,8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0573.12">
            <text:p>70573,12</text:p>
          </table:table-cell>
          <table:table-cell table:style-name="ce26N2" office:value-type="float" office:value="70.59">
            <text:p>70,5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35.14">
            <text:p>635,14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61.56">
            <text:p>61,5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3.55">
            <text:p>73,5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90" meta:object-count="0"/>
    <meta:generator>LibreOffice/4.3.0.4$Windows_x86 LibreOffice_project/62ad5818884a2fc2e5780dd45466868d41009ec0</meta:generator>
  </office:meta>
</office:document-meta>
</file>