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2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4">
            <text:p>3072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0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308.17">
            <text:p>3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5221064002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2">
            <text:p>307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196.84">
            <text:p>19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791298308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3">
            <text:p>307523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5.7">
            <text:p>92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82.24">
            <text:p>82,24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59.04">
            <text:p>5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379195610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5">
            <text:p>307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41813493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7">
            <text:p>30758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6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6.41">
            <text:p>126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12.51">
            <text:p>112,51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46.16">
            <text:p>4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599342000123550020001046641345815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0">
            <text:p>3075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">
            <text:p>3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169.29">
            <text:p>16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81679433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9">
            <text:p>3075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62">
            <text:p>0,003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184.14">
            <text:p>18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536140846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8">
            <text:p>3076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5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59">
            <text:p>376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29.89">
            <text:p>229,89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247.57">
            <text:p>24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5471995545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7">
            <text:p>307667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36.14">
            <text:p>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39477000186550010000005571000000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4">
            <text:p>307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6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82.65">
            <text:p>8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6201670547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6">
            <text:p>1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13.96">
            <text:p>513,96</text:p>
          </table:table-cell>
          <table:table-cell table:style-name="ce26N2" office:value-type="float" office:value="27222.49">
            <text:p>27222,49</text:p>
          </table:table-cell>
          <table:table-cell table:style-name="ce26N2" office:value-type="float" office:value="1786.69">
            <text:p>1786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730.14">
            <text:p>27730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079846">
            <text:p>3,080</text:p>
          </table:table-cell>
          <table:table-cell table:style-name="ce26N2" office:value-type="float" office:value="27216.18">
            <text:p>27216,18</text:p>
          </table:table-cell>
          <table:table-cell table:style-name="ce26N2" office:value-type="float" office:value="27730.14">
            <text:p>27730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0.56">
            <text:p>30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6.11">
            <text:p>26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2" meta:object-count="0"/>
    <meta:generator>LibreOffice/4.3.0.4$Windows_x86 LibreOffice_project/62ad5818884a2fc2e5780dd45466868d41009ec0</meta:generator>
  </office:meta>
</office:document-meta>
</file>