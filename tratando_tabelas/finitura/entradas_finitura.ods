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6/06/2026 07:31:43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9346">
            <text:p>30934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98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46.48">
            <text:p>2446,48</text:p>
          </table:table-cell>
          <table:table-cell table:style-name="ce12N2" office:value-type="float" office:value="2.45">
            <text:p>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02">
            <text:p>22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98.76">
            <text:p>2898,76</text:p>
          </table:table-cell>
          <table:table-cell table:style-name="ce12N2" office:value-type="float" office:value="202.91">
            <text:p>20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221019457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8">
            <text:p>309598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3.9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">
            <text:p>0,720</text:p>
          </table:table-cell>
          <table:table-cell table:style-name="ce12N2" office:value-type="float" office:value="43.5">
            <text:p>4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9.34">
            <text:p>5949,34</text:p>
          </table:table-cell>
          <table:table-cell table:style-name="ce12N2" office:value-type="float" office:value="5.95">
            <text:p>5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54">
            <text:p>53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257.28">
            <text:p>25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1136190000131550010000639201764544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0">
            <text:p>3096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19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4.04">
            <text:p>1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4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00.06">
            <text:p>7800,06</text:p>
          </table:table-cell>
          <table:table-cell table:style-name="ce12N2" office:value-type="float" office:value="7.8">
            <text:p>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.2">
            <text:p>70,2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42.04">
            <text:p>9242,04</text:p>
          </table:table-cell>
          <table:table-cell table:style-name="ce12N2" office:value-type="float" office:value="646.94">
            <text:p>646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1961751051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69">
            <text:p>30966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4.62">
            <text:p>714,6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6.74">
            <text:p>846,74</text:p>
          </table:table-cell>
          <table:table-cell table:style-name="ce12N2" office:value-type="float" office:value="59.27">
            <text:p>5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51288420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3">
            <text:p>3096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6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6">
            <text:p>0,006</text:p>
          </table:table-cell>
          <table:table-cell table:style-name="ce12N2" office:value-type="float" office:value="1.44">
            <text:p>1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0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97.11">
            <text:p>2197,11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7">
            <text:p>19,7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3.28">
            <text:p>2603,28</text:p>
          </table:table-cell>
          <table:table-cell table:style-name="ce12N2" office:value-type="float" office:value="182.23">
            <text:p>18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6861406105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4">
            <text:p>3096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7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35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13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68.07">
            <text:p>1868,07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81">
            <text:p>16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3.42">
            <text:p>2213,42</text:p>
          </table:table-cell>
          <table:table-cell table:style-name="ce12N2" office:value-type="float" office:value="154.94">
            <text:p>15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7761419936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4">
            <text:p>3097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1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4.74">
            <text:p>276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638.8">
            <text:p>263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898">
            <text:p>0,036</text:p>
          </table:table-cell>
          <table:table-cell table:style-name="ce12N2" office:value-type="float" office:value="4.91">
            <text:p>4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64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27.08">
            <text:p>2227,08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04">
            <text:p>20,0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25.94">
            <text:p>125,94</text:p>
          </table:table-cell>
          <table:table-cell table:style-name="ce12N2" office:value-type="float" office:value="2638.8">
            <text:p>2638,80</text:p>
          </table:table-cell>
          <table:table-cell table:style-name="ce12N2" office:value-type="float" office:value="184.72">
            <text:p>18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1741213710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8">
            <text:p>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5.94">
            <text:p>125,94</text:p>
          </table:table-cell>
          <table:table-cell table:style-name="ce26N2" office:value-type="float" office:value="30394.76">
            <text:p>30394,76</text:p>
          </table:table-cell>
          <table:table-cell table:style-name="ce26N2" office:value-type="float" office:value="1934.67">
            <text:p>1934,6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0520.7">
            <text:p>30520,7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818819">
            <text:p>0,819</text:p>
          </table:table-cell>
          <table:table-cell table:style-name="ce26N2" office:value-type="float" office:value="30394.76">
            <text:p>30394,76</text:p>
          </table:table-cell>
          <table:table-cell table:style-name="ce26N2" office:value-type="float" office:value="30520.7">
            <text:p>30520,7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6173.3">
            <text:p>26173,30</text:p>
          </table:table-cell>
          <table:table-cell table:style-name="ce26N2" office:value-type="float" office:value="26.18">
            <text:p>26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35.54">
            <text:p>235,54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7.72">
            <text:p>67,7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8">
            <text:p>2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0" meta:object-count="0"/>
    <meta:generator>LibreOffice/4.3.0.4$Windows_x86 LibreOffice_project/62ad5818884a2fc2e5780dd45466868d41009ec0</meta:generator>
  </office:meta>
</office:document-meta>
</file>