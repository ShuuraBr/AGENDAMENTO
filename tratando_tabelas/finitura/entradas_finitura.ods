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3/07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9395">
            <text:p>309395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4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9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0.54">
            <text:p>2970,54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73">
            <text:p>2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246.38">
            <text:p>24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4731553935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8">
            <text:p>309598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3.9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2">
            <text:p>0,720</text:p>
          </table:table-cell>
          <table:table-cell table:style-name="ce12N2" office:value-type="float" office:value="43.5">
            <text:p>4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49.34">
            <text:p>5949,34</text:p>
          </table:table-cell>
          <table:table-cell table:style-name="ce12N2" office:value-type="float" office:value="5.95">
            <text:p>5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54">
            <text:p>53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32">
            <text:p>6432,00</text:p>
          </table:table-cell>
          <table:table-cell table:style-name="ce12N2" office:value-type="float" office:value="257.28">
            <text:p>25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11361900001315500100006392017645446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6">
            <text:p>31000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0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9.31">
            <text:p>156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9.31">
            <text:p>1569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9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24.46">
            <text:p>1324,46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92">
            <text:p>11,9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9.31">
            <text:p>1569,31</text:p>
          </table:table-cell>
          <table:table-cell table:style-name="ce12N2" office:value-type="float" office:value="109.85">
            <text:p>10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09316492750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9">
            <text:p>3100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66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51.85">
            <text:p>825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251.85">
            <text:p>8251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476">
            <text:p>0,051</text:p>
          </table:table-cell>
          <table:table-cell table:style-name="ce12N2" office:value-type="float" office:value="8.85">
            <text:p>8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5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64.36">
            <text:p>6964,36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68">
            <text:p>62,6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51.85">
            <text:p>8251,85</text:p>
          </table:table-cell>
          <table:table-cell table:style-name="ce12N2" office:value-type="float" office:value="577.63">
            <text:p>57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6611908856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2">
            <text:p>3100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4137095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7">
            <text:p>3101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1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59.67">
            <text:p>1445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459.67">
            <text:p>14459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334">
            <text:p>0,030</text:p>
          </table:table-cell>
          <table:table-cell table:style-name="ce12N2" office:value-type="float" office:value="9.82">
            <text:p>9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59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03.58">
            <text:p>12203,58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.83">
            <text:p>109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59.67">
            <text:p>14459,67</text:p>
          </table:table-cell>
          <table:table-cell table:style-name="ce12N2" office:value-type="float" office:value="1012.17">
            <text:p>101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1601700182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7">
            <text:p>31025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313884142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1">
            <text:p>310261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6.9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9.45">
            <text:p>364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247.79">
            <text:p>3247,79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77924">
            <text:p>0,078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9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03.55">
            <text:p>2903,55</text:p>
          </table:table-cell>
          <table:table-cell table:style-name="ce12N2" office:value-type="float" office:value="2.9">
            <text:p>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13">
            <text:p>26,13</text:p>
          </table:table-cell>
          <table:table-cell table:style-name="ce12N2" office:value-type="float" office:value="41.67">
            <text:p>41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316.66">
            <text:p>316,66</text:p>
          </table:table-cell>
          <table:table-cell table:style-name="ce12N2" office:value-type="float" office:value="3332.79">
            <text:p>3332,79</text:p>
          </table:table-cell>
          <table:table-cell table:style-name="ce12N2" office:value-type="float" office:value="133.31">
            <text:p>13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06911580003705500100029692516903938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2">
            <text:p>31027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7.26">
            <text:p>1317,26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86">
            <text:p>11,8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56.96">
            <text:p>5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6895448000136550010000659851904953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5">
            <text:p>310325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9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26.95">
            <text:p>302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762.5">
            <text:p>276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2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55.2">
            <text:p>2555,20</text:p>
          </table:table-cell>
          <table:table-cell table:style-name="ce12N2" office:value-type="float" office:value="2.56">
            <text:p>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64.45">
            <text:p>264,45</text:p>
          </table:table-cell>
          <table:table-cell table:style-name="ce12N2" office:value-type="float" office:value="2762.5">
            <text:p>2762,50</text:p>
          </table:table-cell>
          <table:table-cell table:style-name="ce12N2" office:value-type="float" office:value="110.5">
            <text:p>11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77162630001025500100001090914081463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0">
            <text:p>1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81.11">
            <text:p>581,11</text:p>
          </table:table-cell>
          <table:table-cell table:style-name="ce26N2" office:value-type="float" office:value="43131.96">
            <text:p>43131,96</text:p>
          </table:table-cell>
          <table:table-cell table:style-name="ce26N2" office:value-type="float" office:value="2559.28">
            <text:p>2559,2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3713.07">
            <text:p>43713,0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087751">
            <text:p>1,088</text:p>
          </table:table-cell>
          <table:table-cell table:style-name="ce26N2" office:value-type="float" office:value="43046.96">
            <text:p>43046,96</text:p>
          </table:table-cell>
          <table:table-cell table:style-name="ce26N2" office:value-type="float" office:value="43713.07">
            <text:p>43713,0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6188.29">
            <text:p>36188,29</text:p>
          </table:table-cell>
          <table:table-cell table:style-name="ce26N2" office:value-type="float" office:value="36.18">
            <text:p>36,1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25.69">
            <text:p>325,69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14.34">
            <text:p>114,3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0.47">
            <text:p>30,4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22" meta:object-count="0"/>
    <meta:generator>LibreOffice/4.3.0.4$Windows_x86 LibreOffice_project/62ad5818884a2fc2e5780dd45466868d41009ec0</meta:generator>
  </office:meta>
</office:document-meta>
</file>