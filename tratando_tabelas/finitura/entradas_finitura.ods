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1/07/2026 04:30:2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7">
            <text:p>31089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0.41">
            <text:p>510,4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9">
            <text:p>4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81275537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5">
            <text:p>31093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42.75">
            <text:p>2242,75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8">
            <text:p>20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102.97">
            <text:p>10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1176575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5">
            <text:p>31095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05.79">
            <text:p>660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924.3">
            <text:p>5924,3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0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5.31">
            <text:p>5235,31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2">
            <text:p>47,12</text:p>
          </table:table-cell>
          <table:table-cell table:style-name="ce12N2" office:value-type="float" office:value="55.64">
            <text:p>55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96.49">
            <text:p>596,49</text:p>
          </table:table-cell>
          <table:table-cell table:style-name="ce12N2" office:value-type="float" office:value="6009.3">
            <text:p>6009,30</text:p>
          </table:table-cell>
          <table:table-cell table:style-name="ce12N2" office:value-type="float" office:value="240.37">
            <text:p>2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971675652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7">
            <text:p>31100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96">
            <text:p>0,027</text:p>
          </table:table-cell>
          <table:table-cell table:style-name="ce12N2" office:value-type="float" office:value="19.4">
            <text:p>1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.47">
            <text:p>563,4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46.73">
            <text:p>4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815913715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2">
            <text:p>311162</text:p>
          </table:table-cell>
          <table:table-cell table:style-name="ce0" table:number-columns-spanned="4" table:number-rows-spanned="1" office:value-type="string" calcext:value-type="string">
            <text:p>9.715 - OLD ARTISAN LTDA ME</text:p>
          </table:table-cell>
          <table:covered-table-cell table:number-columns-repeated="3"/>
          <table:table-cell table:style-name="ce0" office:value-type="string" calcext:value-type="string">
            <text:p>39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3.12">
            <text:p>82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50">
            <text:p>7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4">
            <text:p>0,035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2.04">
            <text:p>672,04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4">
            <text:p>6,04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73.12">
            <text:p>73,12</text:p>
          </table:table-cell>
          <table:table-cell table:style-name="ce12N2" office:value-type="float" office:value="750">
            <text:p>750,00</text:p>
          </table:table-cell>
          <table:table-cell table:style-name="ce12N2" office:value-type="float" office:value="52.5">
            <text:p>5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050351000132550010000393971033700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2">
            <text:p>3112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3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688">
            <text:p>0,016</text:p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18.12">
            <text:p>3618,12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56">
            <text:p>32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300.09">
            <text:p>30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3171206052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7">
            <text:p>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07.69">
            <text:p>707,69</text:p>
          </table:table-cell>
          <table:table-cell table:style-name="ce26N2" office:value-type="float" office:value="16298.25">
            <text:p>16298,25</text:p>
          </table:table-cell>
          <table:table-cell table:style-name="ce26N2" office:value-type="float" office:value="823.06">
            <text:p>823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005.94">
            <text:p>17005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8994">
            <text:p>0,090</text:p>
          </table:table-cell>
          <table:table-cell table:style-name="ce26N2" office:value-type="float" office:value="16213.25">
            <text:p>16213,25</text:p>
          </table:table-cell>
          <table:table-cell table:style-name="ce26N2" office:value-type="float" office:value="17005.94">
            <text:p>17005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4159.36">
            <text:p>14159,36</text:p>
          </table:table-cell>
          <table:table-cell table:style-name="ce26N2" office:value-type="float" office:value="14.15">
            <text:p>14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7.42">
            <text:p>127,4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5.12">
            <text:p>35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78">
            <text:p>38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/4.3.0.4$Windows_x86 LibreOffice_project/62ad5818884a2fc2e5780dd45466868d41009ec0</meta:generator>
  </office:meta>
</office:document-meta>
</file>