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6/05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6724">
            <text:p>306724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70.48">
            <text:p>97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6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.31">
            <text:p>6,31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97837181005378550010001611641514144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2">
            <text:p>3074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4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12.04">
            <text:p>281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12.04">
            <text:p>281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844">
            <text:p>0,008</text:p>
          </table:table-cell>
          <table:table-cell table:style-name="ce12N2" office:value-type="float" office:value="1.78">
            <text:p>1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1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2.04">
            <text:p>2812,04</text:p>
          </table:table-cell>
          <table:table-cell table:style-name="ce12N2" office:value-type="float" office:value="196.84">
            <text:p>19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47912983080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23">
            <text:p>307523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3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5.7">
            <text:p>92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43.46">
            <text:p>843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4">
            <text:p>0,006</text:p>
          </table:table-cell>
          <table:table-cell table:style-name="ce12N2" office:value-type="float" office:value="1.1">
            <text:p>1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82.24">
            <text:p>82,24</text:p>
          </table:table-cell>
          <table:table-cell table:style-name="ce12N2" office:value-type="float" office:value="843.46">
            <text:p>843,46</text:p>
          </table:table-cell>
          <table:table-cell table:style-name="ce12N2" office:value-type="float" office:value="59.04">
            <text:p>59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3791956102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5">
            <text:p>3075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418134936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7">
            <text:p>307587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4.66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6.41">
            <text:p>126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3.9">
            <text:p>1153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6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12.51">
            <text:p>112,51</text:p>
          </table:table-cell>
          <table:table-cell table:style-name="ce12N2" office:value-type="float" office:value="1153.9">
            <text:p>1153,90</text:p>
          </table:table-cell>
          <table:table-cell table:style-name="ce12N2" office:value-type="float" office:value="46.16">
            <text:p>4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599342000123550020001046641345815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0">
            <text:p>30759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1.8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8.42">
            <text:p>241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18.42">
            <text:p>2418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">
            <text:p>3,000</text:p>
          </table:table-cell>
          <table:table-cell table:style-name="ce12N2" office:value-type="float" office:value="0.3">
            <text:p>0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1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8.42">
            <text:p>2418,42</text:p>
          </table:table-cell>
          <table:table-cell table:style-name="ce12N2" office:value-type="float" office:value="169.29">
            <text:p>16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18881679433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9">
            <text:p>30759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3.5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0.6">
            <text:p>263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0.6">
            <text:p>263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62">
            <text:p>0,003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0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30.6">
            <text:p>2630,60</text:p>
          </table:table-cell>
          <table:table-cell table:style-name="ce12N2" office:value-type="float" office:value="184.14">
            <text:p>18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35361408465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58">
            <text:p>3076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54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6.59">
            <text:p>376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36.7">
            <text:p>353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6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29.89">
            <text:p>229,89</text:p>
          </table:table-cell>
          <table:table-cell table:style-name="ce12N2" office:value-type="float" office:value="3536.7">
            <text:p>3536,70</text:p>
          </table:table-cell>
          <table:table-cell table:style-name="ce12N2" office:value-type="float" office:value="247.57">
            <text:p>24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54719955457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67">
            <text:p>307667</text:p>
          </table:table-cell>
          <table:table-cell table:style-name="ce0" table:number-columns-spanned="4" table:number-rows-spanned="1" office:value-type="string" calcext:value-type="string">
            <text:p>33.829 - STUDIO LAMPLUZ COMERCIO E SERVICOS LTDA</text:p>
          </table:table-cell>
          <table:covered-table-cell table:number-columns-repeated="3"/>
          <table:table-cell table:style-name="ce0" office:value-type="string" calcext:value-type="string">
            <text:p>5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6.62">
            <text:p>119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96.62">
            <text:p>1196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96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6.62">
            <text:p>1196,62</text:p>
          </table:table-cell>
          <table:table-cell table:style-name="ce12N2" office:value-type="float" office:value="36.14">
            <text:p>3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39477000186550010000005571000000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74">
            <text:p>30767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6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0.66">
            <text:p>118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0.66">
            <text:p>1180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12">
            <text:p>0,000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0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0.66">
            <text:p>1180,66</text:p>
          </table:table-cell>
          <table:table-cell table:style-name="ce12N2" office:value-type="float" office:value="82.65">
            <text:p>8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62016705476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47">
            <text:p>307747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1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13.89">
            <text:p>3613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305.39">
            <text:p>3305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.07">
            <text:p>2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13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308.5">
            <text:p>308,50</text:p>
          </table:table-cell>
          <table:table-cell table:style-name="ce12N2" office:value-type="float" office:value="3305.39">
            <text:p>3305,39</text:p>
          </table:table-cell>
          <table:table-cell table:style-name="ce12N2" office:value-type="float" office:value="231.38">
            <text:p>23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2.96">
            <text:p>7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655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0/05/2026</text:p>
          </table:table-cell>
          <table:table-cell table:style-name="ce12" office:value-type="string" calcext:value-type="string">
            <text:p>72,9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35260512077181000133550030002251591994100929</text:p>
          </table:table-cell>
          <table:table-cell table:style-name="ce0" office:value-type="string" calcext:value-type="string">
            <text:p>3526051138956500020057005000399655100085923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61">
            <text:p>3077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21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3.8">
            <text:p>866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63.8">
            <text:p>866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814">
            <text:p>0,668</text:p>
          </table:table-cell>
          <table:table-cell table:style-name="ce12N2" office:value-type="float" office:value="45">
            <text:p>4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6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63.8">
            <text:p>8663,80</text:p>
          </table:table-cell>
          <table:table-cell table:style-name="ce12N2" office:value-type="float" office:value="606.47">
            <text:p>606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21418025193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62">
            <text:p>3077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1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88.88">
            <text:p>288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88.88">
            <text:p>288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82">
            <text:p>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8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88.88">
            <text:p>2888,88</text:p>
          </table:table-cell>
          <table:table-cell table:style-name="ce12N2" office:value-type="float" office:value="202.22">
            <text:p>20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19911976501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06">
            <text:p>307806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1.0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9.46">
            <text:p>97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60.46">
            <text:p>860,46</text:p>
          </table:table-cell>
          <table:table-cell table:style-name="ce12N2" office:value-type="float" office:value="119">
            <text:p>119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9.46">
            <text:p>979,46</text:p>
          </table:table-cell>
          <table:table-cell table:style-name="ce12N2" office:value-type="float" office:value="39.17">
            <text:p>3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0700221000253550010000110361473795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1">
            <text:p>30781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3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381">
            <text:p>0,001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3891278045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3">
            <text:p>3078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601395974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6">
            <text:p>3078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7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8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481.76">
            <text:p>48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71710545663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8">
            <text:p>3078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8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8971709299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1">
            <text:p>3078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0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356.03">
            <text:p>35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0451818279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19">
            <text:p>19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19">
            <text:p>119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39.45">
            <text:p>739,45</text:p>
          </table:table-cell>
          <table:table-cell table:style-name="ce26N2" office:value-type="float" office:value="49130.98">
            <text:p>49130,98</text:p>
          </table:table-cell>
          <table:table-cell table:style-name="ce26N2" office:value-type="float" office:value="3316.89">
            <text:p>3316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2.96">
            <text:p>72,96</text:p>
          </table:table-cell>
          <table:table-cell table:style-name="ce26N2" office:value-type="float" office:value="49864.12">
            <text:p>49864,1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.827841">
            <text:p>3,828</text:p>
          </table:table-cell>
          <table:table-cell table:style-name="ce26N2" office:value-type="float" office:value="49005.67">
            <text:p>49005,67</text:p>
          </table:table-cell>
          <table:table-cell table:style-name="ce26N2" office:value-type="float" office:value="49864.12">
            <text:p>49864,1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79.62">
            <text:p>79,6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7.43">
            <text:p>27,4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28" meta:object-count="0"/>
    <meta:generator>LibreOffice/4.3.0.4$Windows_x86 LibreOffice_project/62ad5818884a2fc2e5780dd45466868d41009ec0</meta:generator>
  </office:meta>
</office:document-meta>
</file>