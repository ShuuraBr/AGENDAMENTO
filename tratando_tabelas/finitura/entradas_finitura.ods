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2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0">
            <text:p>3085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47">
            <text:p>20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13">
            <text:p>0,002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.44">
            <text:p>160,44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13.31">
            <text:p>1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61130392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0">
            <text:p>308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112314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5">
            <text:p>30871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.83">
            <text:p>376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30.18">
            <text:p>3430,18</text:p>
          </table:table-cell>
          <table:table-cell table:style-name="ce12N2" office:value-type="float" office:value="269">
            <text:p>26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1.59">
            <text:p>3421,5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3699.18">
            <text:p>3699,18</text:p>
          </table:table-cell>
          <table:table-cell table:style-name="ce12N2" office:value-type="float" office:value="147.96">
            <text:p>14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700221000253550010000111171876867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3">
            <text:p>3087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7.89">
            <text:p>152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7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.8">
            <text:p>1210,80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3.25">
            <text:p>93,25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100.42">
            <text:p>10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5351469660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6">
            <text:p>30885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5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18.03">
            <text:p>1691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5266.73">
            <text:p>15266,73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39892">
            <text:p>0,040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18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74.41">
            <text:p>13374,41</text:p>
          </table:table-cell>
          <table:table-cell table:style-name="ce12N2" office:value-type="float" office:value="13.4">
            <text:p>1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37">
            <text:p>120,37</text:p>
          </table:table-cell>
          <table:table-cell table:style-name="ce12N2" office:value-type="float" office:value="55.86">
            <text:p>55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6.3">
            <text:p>1566,30</text:p>
          </table:table-cell>
          <table:table-cell table:style-name="ce12N2" office:value-type="float" office:value="15351.73">
            <text:p>15351,73</text:p>
          </table:table-cell>
          <table:table-cell table:style-name="ce12N2" office:value-type="float" office:value="614.08">
            <text:p>61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5066139179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6">
            <text:p>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4">
            <text:p>35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33.56">
            <text:p>1733,56</text:p>
          </table:table-cell>
          <table:table-cell table:style-name="ce26N2" office:value-type="float" office:value="27678.77">
            <text:p>27678,77</text:p>
          </table:table-cell>
          <table:table-cell table:style-name="ce26N2" office:value-type="float" office:value="1155.9">
            <text:p>1155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9412.33">
            <text:p>29412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50613">
            <text:p>0,051</text:p>
          </table:table-cell>
          <table:table-cell table:style-name="ce26N2" office:value-type="float" office:value="27324.77">
            <text:p>27324,77</text:p>
          </table:table-cell>
          <table:table-cell table:style-name="ce26N2" office:value-type="float" office:value="29412.33">
            <text:p>29412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975.68">
            <text:p>23975,68</text:p>
          </table:table-cell>
          <table:table-cell table:style-name="ce26N2" office:value-type="float" office:value="24">
            <text:p>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5.79">
            <text:p>215,7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2.61">
            <text:p>52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37">
            <text:p>45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8" meta:object-count="0"/>
    <meta:generator>LibreOffice/4.3.0.4$Windows_x86 LibreOffice_project/62ad5818884a2fc2e5780dd45466868d41009ec0</meta:generator>
  </office:meta>
</office:document-meta>
</file>