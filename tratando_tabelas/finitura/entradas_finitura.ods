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02/07/2026 04:30:31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9395">
            <text:p>309395</text:p>
          </table:table-cell>
          <table:table-cell table:style-name="ce0" table:number-columns-spanned="4" table:number-rows-spanned="1" office:value-type="string" calcext:value-type="string">
            <text:p>16.008 - MEKAL METALURGICA KADOW S.A.</text:p>
          </table:table-cell>
          <table:covered-table-cell table:number-columns-repeated="3"/>
          <table:table-cell table:style-name="ce0" office:value-type="string" calcext:value-type="string">
            <text:p>10.47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19.72">
            <text:p>351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19.72">
            <text:p>3519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19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70.54">
            <text:p>2970,54</text:p>
          </table:table-cell>
          <table:table-cell table:style-name="ce12N2" office:value-type="float" office:value="2.97">
            <text:p>2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73">
            <text:p>26,7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19.72">
            <text:p>3519,72</text:p>
          </table:table-cell>
          <table:table-cell table:style-name="ce12N2" office:value-type="float" office:value="246.38">
            <text:p>246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70373920001805500300001047315539357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98">
            <text:p>309598</text:p>
          </table:table-cell>
          <table:table-cell table:style-name="ce0" table:number-columns-spanned="4" table:number-rows-spanned="1" office:value-type="string" calcext:value-type="string">
            <text:p>27.705 - DOKA - INDUSTRIA E COMERCIO LTDA</text:p>
          </table:table-cell>
          <table:covered-table-cell table:number-columns-repeated="3"/>
          <table:table-cell table:style-name="ce0" office:value-type="string" calcext:value-type="string">
            <text:p>63.9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32">
            <text:p>64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432">
            <text:p>64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2">
            <text:p>0,720</text:p>
          </table:table-cell>
          <table:table-cell table:style-name="ce12N2" office:value-type="float" office:value="43.5">
            <text:p>43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4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949.34">
            <text:p>5949,34</text:p>
          </table:table-cell>
          <table:table-cell table:style-name="ce12N2" office:value-type="float" office:value="5.95">
            <text:p>5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.54">
            <text:p>53,5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32">
            <text:p>6432,00</text:p>
          </table:table-cell>
          <table:table-cell table:style-name="ce12N2" office:value-type="float" office:value="257.28">
            <text:p>257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11361900001315500100006392017645446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50">
            <text:p>30965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19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42.04">
            <text:p>9242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242.04">
            <text:p>9242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862">
            <text:p>0,042</text:p>
          </table:table-cell>
          <table:table-cell table:style-name="ce12N2" office:value-type="float" office:value="14.04">
            <text:p>14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242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800.06">
            <text:p>7800,06</text:p>
          </table:table-cell>
          <table:table-cell table:style-name="ce12N2" office:value-type="float" office:value="7.8">
            <text:p>7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.2">
            <text:p>70,2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242.04">
            <text:p>9242,04</text:p>
          </table:table-cell>
          <table:table-cell table:style-name="ce12N2" office:value-type="float" office:value="646.94">
            <text:p>646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19617510513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69">
            <text:p>30966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35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6.74">
            <text:p>846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46.74">
            <text:p>846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0.43">
            <text:p>0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6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14.62">
            <text:p>714,62</text:p>
          </table:table-cell>
          <table:table-cell table:style-name="ce12N2" office:value-type="float" office:value="0.71">
            <text:p>0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43">
            <text:p>6,4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6.74">
            <text:p>846,74</text:p>
          </table:table-cell>
          <table:table-cell table:style-name="ce12N2" office:value-type="float" office:value="59.27">
            <text:p>59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35512884207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73">
            <text:p>30967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68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03.28">
            <text:p>2603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03.28">
            <text:p>2603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76">
            <text:p>0,006</text:p>
          </table:table-cell>
          <table:table-cell table:style-name="ce12N2" office:value-type="float" office:value="1.44">
            <text:p>1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03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97.11">
            <text:p>2197,11</text:p>
          </table:table-cell>
          <table:table-cell table:style-name="ce12N2" office:value-type="float" office:value="2.2">
            <text:p>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77">
            <text:p>19,7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03.28">
            <text:p>2603,28</text:p>
          </table:table-cell>
          <table:table-cell table:style-name="ce12N2" office:value-type="float" office:value="182.23">
            <text:p>182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68614061055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74">
            <text:p>30967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77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13.42">
            <text:p>2213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13.42">
            <text:p>2213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353">
            <text:p>0,010</text:p>
          </table:table-cell>
          <table:table-cell table:style-name="ce12N2" office:value-type="float" office:value="1.65">
            <text:p>1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13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68.07">
            <text:p>1868,07</text:p>
          </table:table-cell>
          <table:table-cell table:style-name="ce12N2" office:value-type="float" office:value="1.87">
            <text:p>1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81">
            <text:p>16,8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13.42">
            <text:p>2213,42</text:p>
          </table:table-cell>
          <table:table-cell table:style-name="ce12N2" office:value-type="float" office:value="154.94">
            <text:p>154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77614199362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34">
            <text:p>30973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3.17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64.74">
            <text:p>2764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638.8">
            <text:p>263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5898">
            <text:p>0,036</text:p>
          </table:table-cell>
          <table:table-cell table:style-name="ce12N2" office:value-type="float" office:value="4.91">
            <text:p>4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64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27.08">
            <text:p>2227,08</text:p>
          </table:table-cell>
          <table:table-cell table:style-name="ce12N2" office:value-type="float" office:value="2.23">
            <text:p>2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04">
            <text:p>20,0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125.94">
            <text:p>125,94</text:p>
          </table:table-cell>
          <table:table-cell table:style-name="ce12N2" office:value-type="float" office:value="2638.8">
            <text:p>2638,80</text:p>
          </table:table-cell>
          <table:table-cell table:style-name="ce12N2" office:value-type="float" office:value="184.72">
            <text:p>18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317412137103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06">
            <text:p>31000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8.09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69.31">
            <text:p>1569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69.31">
            <text:p>1569,3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136">
            <text:p>0,005</text:p>
          </table:table-cell>
          <table:table-cell table:style-name="ce12N2" office:value-type="float" office:value="2.19">
            <text:p>2,1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69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24.46">
            <text:p>1324,46</text:p>
          </table:table-cell>
          <table:table-cell table:style-name="ce12N2" office:value-type="float" office:value="1.32">
            <text:p>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92">
            <text:p>11,9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69.31">
            <text:p>1569,31</text:p>
          </table:table-cell>
          <table:table-cell table:style-name="ce12N2" office:value-type="float" office:value="109.85">
            <text:p>109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809316492750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19">
            <text:p>31001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7.66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51.85">
            <text:p>8251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251.85">
            <text:p>8251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1476">
            <text:p>0,051</text:p>
          </table:table-cell>
          <table:table-cell table:style-name="ce12N2" office:value-type="float" office:value="8.85">
            <text:p>8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251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64.36">
            <text:p>6964,36</text:p>
          </table:table-cell>
          <table:table-cell table:style-name="ce12N2" office:value-type="float" office:value="6.96">
            <text:p>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.68">
            <text:p>62,6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251.85">
            <text:p>8251,85</text:p>
          </table:table-cell>
          <table:table-cell table:style-name="ce12N2" office:value-type="float" office:value="577.63">
            <text:p>577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766119088565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72">
            <text:p>31007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756">
            <text:p>0,004</text:p>
          </table:table-cell>
          <table:table-cell table:style-name="ce12N2" office:value-type="float" office:value="5.27">
            <text:p>5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1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28.04">
            <text:p>2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6413709591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17">
            <text:p>31011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9.16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59.67">
            <text:p>14459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4459.67">
            <text:p>14459,6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334">
            <text:p>0,030</text:p>
          </table:table-cell>
          <table:table-cell table:style-name="ce12N2" office:value-type="float" office:value="9.82">
            <text:p>9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459,6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203.58">
            <text:p>12203,58</text:p>
          </table:table-cell>
          <table:table-cell table:style-name="ce12N2" office:value-type="float" office:value="12.2">
            <text:p>1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9.83">
            <text:p>109,8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459.67">
            <text:p>14459,67</text:p>
          </table:table-cell>
          <table:table-cell table:style-name="ce12N2" office:value-type="float" office:value="1012.17">
            <text:p>1012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916017001829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47">
            <text:p>310147</text:p>
          </table:table-cell>
          <table:table-cell table:style-name="ce0" table:number-columns-spanned="4" table:number-rows-spanned="1" office:value-type="string" calcext:value-type="string">
            <text:p>35.980 - POWERLUME INDUSTRIA E COMERCIO LTDA</text:p>
          </table:table-cell>
          <table:covered-table-cell table:number-columns-repeated="3"/>
          <table:table-cell table:style-name="ce0" office:value-type="string" calcext:value-type="string">
            <text:p>23.122</text:p>
          </table:table-cell>
          <table:table-cell table:style-name="ce9" office:value-type="string" calcext:value-type="string">
            <text:p>10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59.29">
            <text:p>2859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05.28">
            <text:p>2605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.67">
            <text:p>1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59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98.79">
            <text:p>2198,79</text:p>
          </table:table-cell>
          <table:table-cell table:style-name="ce12N2" office:value-type="float" office:value="2.2">
            <text:p>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79">
            <text:p>19,7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7/2026</text:p>
          </table:table-cell>
          <table:table-cell table:style-name="ce12N2" office:value-type="float" office:value="254.01">
            <text:p>254,01</text:p>
          </table:table-cell>
          <table:table-cell table:style-name="ce12N2" office:value-type="float" office:value="2605.28">
            <text:p>2605,28</text:p>
          </table:table-cell>
          <table:table-cell table:style-name="ce12N2" office:value-type="float" office:value="182.37">
            <text:p>182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172506900001305510100002312210000390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12">
            <text:p>12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79.95">
            <text:p>379,95</text:p>
          </table:table-cell>
          <table:table-cell table:style-name="ce26N2" office:value-type="float" office:value="55083.15">
            <text:p>55083,15</text:p>
          </table:table-cell>
          <table:table-cell table:style-name="ce26N2" office:value-type="float" office:value="3641.82">
            <text:p>3641,8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5463.1">
            <text:p>55463,1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0.904575">
            <text:p>0,905</text:p>
          </table:table-cell>
          <table:table-cell table:style-name="ce26N2" office:value-type="float" office:value="55083.15">
            <text:p>55083,15</text:p>
          </table:table-cell>
          <table:table-cell table:style-name="ce26N2" office:value-type="float" office:value="55463.1">
            <text:p>55463,1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6418.01">
            <text:p>46418,01</text:p>
          </table:table-cell>
          <table:table-cell table:style-name="ce26N2" office:value-type="float" office:value="46.41">
            <text:p>46,4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417.74">
            <text:p>417,74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93.77">
            <text:p>93,7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7.65">
            <text:p>27,6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FINITUR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54" meta:object-count="0"/>
    <meta:generator>LibreOffice/4.3.0.4$Windows_x86 LibreOffice_project/62ad5818884a2fc2e5780dd45466868d41009ec0</meta:generator>
  </office:meta>
</office:document-meta>
</file>