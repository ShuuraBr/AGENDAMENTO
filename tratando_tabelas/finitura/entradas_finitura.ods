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8:38:3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2">
            <text:p>30627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6.19">
            <text:p>14916,19</text:p>
          </table:table-cell>
          <table:table-cell table:style-name="ce12N2" office:value-type="float" office:value="3433.93">
            <text:p>3433,9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025">
            <text:p>170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1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">
            <text:p>8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325.12">
            <text:p>1325,12</text:p>
          </table:table-cell>
          <table:table-cell table:style-name="ce12N2" office:value-type="float" office:value="13591.07">
            <text:p>13591,07</text:p>
          </table:table-cell>
          <table:table-cell table:style-name="ce12N2" office:value-type="float" office:value="543.65">
            <text:p>54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8100033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3">
            <text:p>30671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3">
            <text:p>3288,30</text:p>
          </table:table-cell>
          <table:table-cell table:style-name="ce12N2" office:value-type="float" office:value="197.3">
            <text:p>197,3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139.42">
            <text:p>13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3681140081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4501.31">
            <text:p>4501,31</text:p>
          </table:table-cell>
          <table:table-cell table:style-name="ce26N2" office:value-type="float" office:value="956.3">
            <text:p>956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005.48">
            <text:p>3005,48</text:p>
          </table:table-cell>
          <table:table-cell table:style-name="ce26N2" office:value-type="float" office:value="130245.98">
            <text:p>130245,98</text:p>
          </table:table-cell>
          <table:table-cell table:style-name="ce26N2" office:value-type="float" office:value="6624.12">
            <text:p>6624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8629.35">
            <text:p>13862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268606">
            <text:p>1,269</text:p>
          </table:table-cell>
          <table:table-cell table:style-name="ce26N2" office:value-type="float" office:value="139168.88">
            <text:p>139168,88</text:p>
          </table:table-cell>
          <table:table-cell table:style-name="ce26N2" office:value-type="float" office:value="138629.35">
            <text:p>13862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23.38">
            <text:p>223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7">
            <text:p>46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58" meta:object-count="0"/>
    <meta:generator>LibreOffice/4.3.0.4$Windows_x86 LibreOffice_project/62ad5818884a2fc2e5780dd45466868d41009ec0</meta:generator>
  </office:meta>
</office:document-meta>
</file>