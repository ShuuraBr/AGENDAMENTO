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1/05/2026 07:42:26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0">
            <text:p>3060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7.71">
            <text:p>138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7.71">
            <text:p>138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25">
            <text:p>0,006</text:p>
          </table:table-cell>
          <table:table-cell table:style-name="ce12N2" office:value-type="float" office:value="2.87">
            <text:p>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7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7.71">
            <text:p>1387,71</text:p>
          </table:table-cell>
          <table:table-cell table:style-name="ce12N2" office:value-type="float" office:value="97.14">
            <text:p>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801549441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0">
            <text:p>30654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8.26">
            <text:p>6638,26</text:p>
          </table:table-cell>
          <table:table-cell table:style-name="ce12N2" office:value-type="float" office:value="1067.38">
            <text:p>1067,38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15.9">
            <text:p>711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89.74">
            <text:p>589,74</text:p>
          </table:table-cell>
          <table:table-cell table:style-name="ce12N2" office:value-type="float" office:value="6048.52">
            <text:p>6048,52</text:p>
          </table:table-cell>
          <table:table-cell table:style-name="ce12N2" office:value-type="float" office:value="241.94">
            <text:p>24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91000336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5">
            <text:p>306545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81526909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9">
            <text:p>30657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6">
            <text:p>61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71.52">
            <text:p>7171,52</text:p>
          </table:table-cell>
          <table:table-cell table:style-name="ce12N2" office:value-type="float" office:value="286.86">
            <text:p>28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01016408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1">
            <text:p>306581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.5">
            <text:p>96,50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7011864484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5">
            <text:p>30658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8.11">
            <text:p>2403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2949.18">
            <text:p>22949,18</text:p>
          </table:table-cell>
          <table:table-cell table:style-name="ce12N2" office:value-type="float" office:value="659">
            <text:p>659,00</text:p>
          </table:table-cell>
          <table:table-cell table:style-name="ce12N3" office:value-type="float" office:value="0.022336">
            <text:p>0,022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3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46">
            <text:p>82,4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429.93">
            <text:p>429,93</text:p>
          </table:table-cell>
          <table:table-cell table:style-name="ce12N2" office:value-type="float" office:value="23608.18">
            <text:p>23608,18</text:p>
          </table:table-cell>
          <table:table-cell table:style-name="ce12N2" office:value-type="float" office:value="944.32">
            <text:p>9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8841638050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3">
            <text:p>30671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3">
            <text:p>3288,30</text:p>
          </table:table-cell>
          <table:table-cell table:style-name="ce12N2" office:value-type="float" office:value="197.3">
            <text:p>197,3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5.6">
            <text:p>3485,60</text:p>
          </table:table-cell>
          <table:table-cell table:style-name="ce12N2" office:value-type="float" office:value="139.42">
            <text:p>13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3681140081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1">
            <text:p>30687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138.46">
            <text:p>1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5188352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2">
            <text:p>3068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38">
            <text:p>0,003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39.83">
            <text:p>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7159102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3">
            <text:p>30687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6">
            <text:p>0,007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206.83">
            <text:p>20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81605277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4">
            <text:p>30687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638">
            <text:p>0,012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159">
            <text:p>15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11440833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5">
            <text:p>3068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94">
            <text:p>0,022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380.54">
            <text:p>3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0110198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6">
            <text:p>3068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068">
            <text:p>0,030</text:p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431">
            <text:p>4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91337116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9">
            <text:p>306969</text:p>
          </table:table-cell>
          <table:table-cell table:style-name="ce0" table:number-columns-spanned="4" table:number-rows-spanned="1" office:value-type="string" calcext:value-type="string">
            <text:p>26.619 - DICAN COMERCIO EXTERIOR LTDA</text:p>
          </table:table-cell>
          <table:covered-table-cell table:number-columns-repeated="3"/>
          <table:table-cell table:style-name="ce0" office:value-type="string" calcext:value-type="string">
            <text:p>1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5.8">
            <text:p>362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10.28">
            <text:p>310,28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132.63">
            <text:p>13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761373000107550010001200771315409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5">
            <text:p>3069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68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4147471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6">
            <text:p>3069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21041239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7">
            <text:p>306977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11298829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9">
            <text:p>39,00</text:p>
          </table:table-cell>
          <table:table-cell table:style-name="ce26N2" office:value-type="float" office:value="1067.38">
            <text:p>1067,38</text:p>
          </table:table-cell>
          <table:table-cell table:style-name="ce26N2" office:value-type="float" office:value="1221.3">
            <text:p>1221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40.79">
            <text:p>1540,79</text:p>
          </table:table-cell>
          <table:table-cell table:style-name="ce26N2" office:value-type="float" office:value="126410.18">
            <text:p>126410,18</text:p>
          </table:table-cell>
          <table:table-cell table:style-name="ce26N2" office:value-type="float" office:value="7178.85">
            <text:p>7178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3328.86">
            <text:p>133328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242922">
            <text:p>0,243</text:p>
          </table:table-cell>
          <table:table-cell table:style-name="ce26N2" office:value-type="float" office:value="131634.15">
            <text:p>131634,15</text:p>
          </table:table-cell>
          <table:table-cell table:style-name="ce26N2" office:value-type="float" office:value="133328.86">
            <text:p>133328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96.76">
            <text:p>196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29">
            <text:p>46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68" meta:object-count="0"/>
    <meta:generator>LibreOffice/4.3.0.4$Windows_x86 LibreOffice_project/62ad5818884a2fc2e5780dd45466868d41009ec0</meta:generator>
  </office:meta>
</office:document-meta>
</file>