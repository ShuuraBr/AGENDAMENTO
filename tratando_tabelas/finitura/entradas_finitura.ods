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7:42:27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0">
            <text:p>10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28594.46">
            <text:p>28594,46</text:p>
          </table:table-cell>
          <table:table-cell table:style-name="ce26N2" office:value-type="float" office:value="1444.81">
            <text:p>1444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273.03">
            <text:p>30273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01036">
            <text:p>0,301</text:p>
          </table:table-cell>
          <table:table-cell table:style-name="ce26N2" office:value-type="float" office:value="30372.18">
            <text:p>30372,18</text:p>
          </table:table-cell>
          <table:table-cell table:style-name="ce26N2" office:value-type="float" office:value="30273.03">
            <text:p>30273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765.58">
            <text:p>23765,58</text:p>
          </table:table-cell>
          <table:table-cell table:style-name="ce26N2" office:value-type="float" office:value="23.78">
            <text:p>23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3.87">
            <text:p>213,8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3.29">
            <text:p>83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2">
            <text:p>46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2" meta:object-count="0"/>
    <meta:generator>LibreOffice/4.3.0.4$Windows_x86 LibreOffice_project/62ad5818884a2fc2e5780dd45466868d41009ec0</meta:generator>
  </office:meta>
</office:document-meta>
</file>